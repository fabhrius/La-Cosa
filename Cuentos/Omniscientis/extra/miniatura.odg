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D000008001F89B8FF76CD4142.jpg" manifest:media-type="image/jpeg"/>
  <manifest:file-entry manifest:full-path="Pictures/10000001000005DC000003E8F5CE175F74B550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svg:stroke-opacity="100%" draw:fill="none" draw:fill-color="#ffffff" fo:min-height="23.8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B Garamond" fo:font-size="40pt" fo:letter-spacing="0.353cm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font-name="EB Garamond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font-name="EB Garamond" fo:font-size="96pt" fo:font-weight="bold" style:font-size-asian="96pt" style:font-weight-asian="bold" style:font-size-complex="96pt" style:font-weight-complex="bold"/>
    </style:style>
    <style:style style:name="T4" style:family="text">
      <style:text-properties style:font-name="EB Garamond" fo:font-size="20pt" style:font-size-asian="20pt" style:font-size-complex="20pt"/>
    </style:style>
    <style:style style:name="T5" style:family="text">
      <style:text-properties style:font-name="EB Garamon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26.116cm" svg:x="1cm" svg:y="1cm">
          <draw:image xlink:href="Pictures/10000000000004CD000008001F89B8FF76CD4142.jpg" xlink:type="simple" xlink:show="embed" xlink:actuate="onLoad" draw:mime-type="image/jpeg">
            <text:p/>
          </draw:image>
        </draw:frame>
        <draw:frame draw:style-name="gr2" draw:text-style-name="P3" draw:layer="layout" svg:width="17.145cm" svg:height="24.182cm" svg:x="2.27cm" svg:y="1.952cm">
          <draw:text-box>
            <text:p/>
            <text:p/>
            <text:p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text:span text:style-name="T1">OMNISCIENTIS</text:span></text:p>
            <text:p text:style-name="P2"><text:span text:style-name="T2">Relatos</text:span></text:p>
            <text:p text:style-name="P2"><text:span text:style-name="T2"/></text:p>
            <text:p text:style-name="P2"><text:span text:style-name="T3">La Bola de Cristal</text:span></text:p>
            <text:p text:style-name="P2"><text:span text:style-name="T4"/></text:p>
            <text:p text:style-name="P2"><text:span text:style-name="T4"/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ny Fabrico</text:span></text:p>
          </draw:text-box>
        </draw:frame>
        <draw:frame draw:style-name="gr3" draw:text-style-name="P2" draw:layer="layout" svg:width="19.589cm" svg:height="13.059cm" svg:x="-1.439cm" svg:y="-1.453cm">
          <draw:image xlink:href="Pictures/10000001000005DC000003E8F5CE175F74B550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d32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7-15T19:34:36.872000000</meta:creation-date>
    <dc:date>2026-07-20T21:19:41.775000000</dc:date>
    <meta:editing-duration>PT55M26S</meta:editing-duration>
    <meta:editing-cycles>12</meta:editing-cycles>
    <meta:generator>LibreOffice/7.3.5.2$Windows_X86_64 LibreOffice_project/184fe81b8c8c30d8b5082578aee2fed2ea847c01</meta:generator>
    <meta:document-statistic meta:object-count="3"/>
  </office:meta>
</office:document-meta>
</file>