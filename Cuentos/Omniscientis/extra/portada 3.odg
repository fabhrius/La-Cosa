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D000008001F89B8FF76CD4142.jpg" manifest:media-type="image/jpeg"/>
  <manifest:file-entry manifest:full-path="Pictures/10000001000005DC000003E8F5CE175F74B5503A.png" manifest:media-type="image/png"/>
  <manifest:file-entry manifest:full-path="Pictures/10000000000004E6000004E606D2A309746D2BB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6.116cm" svg:x="1cm" svg:y="1cm">
          <draw:image xlink:href="Pictures/10000000000004CD000008001F89B8FF76CD4142.jpg" xlink:type="simple" xlink:show="embed" xlink:actuate="onLoad" draw:mime-type="image/jpeg">
            <text:p/>
          </draw:image>
        </draw:frame>
        <draw:frame draw:style-name="gr1" draw:text-style-name="P2" draw:layer="layout" svg:width="19.589cm" svg:height="13.059cm" svg:x="-1.039cm" svg:y="-1.653cm">
          <draw:image xlink:href="Pictures/10000001000005DC000003E8F5CE175F74B5503A.png" xlink:type="simple" xlink:show="embed" xlink:actuate="onLoad" draw:mime-type="image/png">
            <text:p/>
          </draw:image>
        </draw:frame>
        <draw:frame draw:style-name="gr2" draw:text-style-name="P3" draw:layer="layout" svg:width="16.826cm" svg:height="16.826cm" svg:x="2.501cm" svg:y="9.051cm">
          <draw:image xlink:href="Pictures/10000000000004E6000004E606D2A309746D2BB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d32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7-15T19:34:36.872000000</meta:creation-date>
    <dc:date>2026-07-21T09:56:27.752000000</dc:date>
    <meta:editing-duration>PT35M39S</meta:editing-duration>
    <meta:editing-cycles>11</meta:editing-cycles>
    <meta:generator>LibreOffice/7.3.5.2$Windows_X86_64 LibreOffice_project/184fe81b8c8c30d8b5082578aee2fed2ea847c01</meta:generator>
    <meta:document-statistic meta:object-count="3"/>
  </office:meta>
</office:document-meta>
</file>