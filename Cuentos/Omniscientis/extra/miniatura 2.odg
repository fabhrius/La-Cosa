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CD000008001F89B8FF76CD4142.jpg" manifest:media-type="image/jpeg"/>
  <manifest:file-entry manifest:full-path="Pictures/10000000000004000000060095BA000D51E62F09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EB Garamond" svg:font-family="'EB Garamon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bitmap" draw:fill-image-name="background" style:repeat="stretch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23.88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d320" loext:opacity="100%" style:font-name="EB Garamond" fo:font-size="60pt" style:font-size-asian="60pt" style:font-size-complex="60pt"/>
    </style:style>
    <style:style style:name="P3" style:family="paragraph">
      <loext:graphic-properties draw:fill="none" draw:fill-color="#ffffff"/>
      <style:paragraph-properties fo:text-align="center"/>
      <style:text-properties fo:color="#ffd320" loext:opacity="100%" style:font-name="EB Garamond" fo:font-size="60pt" style:font-size-asian="60pt" style:font-size-complex="60pt"/>
    </style:style>
    <style:style style:name="T1" style:family="text">
      <style:text-properties fo:color="#ffd320" loext:opacity="100%" style:font-name="EB Garamond" fo:font-size="96pt" style:font-size-asian="96pt" style:font-size-complex="96pt"/>
    </style:style>
    <style:style style:name="T2" style:family="text">
      <style:text-properties fo:color="#ffd320" loext:opacity="100%" style:font-name="EB Garamond"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6.676cm" svg:height="25.015cm" svg:x="2.505cm" svg:y="1.519cm">
          <draw:image xlink:href="Pictures/10000000000004000000060095BA000D51E62F09.png" xlink:type="simple" xlink:show="embed" xlink:actuate="onLoad" draw:mime-type="image/png">
            <text:p/>
          </draw:image>
        </draw:frame>
        <draw:frame draw:style-name="gr2" draw:text-style-name="P3" draw:layer="layout" svg:width="18.098cm" svg:height="24.13cm" svg:x="1.817cm" svg:y="2.27cm">
          <draw:text-box>
            <text:p text:style-name="P2"><text:span text:style-name="T1">La Bola de Cristal</text:span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>Tony Fabrico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EB Garamond" svg:font-family="'EB Garamon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ackground" xlink:href="Pictures/10000000000004CD000008001F89B8FF76CD4142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6-07-20T21:01:04.021000000</meta:creation-date>
    <dc:date>2026-07-20T21:19:10.241000000</dc:date>
    <meta:editing-duration>PT7M55S</meta:editing-duration>
    <meta:editing-cycles>2</meta:editing-cycles>
    <meta:generator>LibreOffice/7.3.5.2$Windows_X86_64 LibreOffice_project/184fe81b8c8c30d8b5082578aee2fed2ea847c01</meta:generator>
    <meta:document-statistic meta:object-count="2"/>
  </office:meta>
</office:document-meta>
</file>