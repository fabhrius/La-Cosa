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Horizontal_20_Line"/>
      <text:p text:style-name="First_20_paragraph">title: La Bola de Cristal</text:p>
      <text:p text:style-name="Text_20_body">author: Tony Fabrico</text:p>
      <text:p text:style-name="Text_20_body">series: Omniscientis</text:p>
      <text:p text:style-name="Text_20_body">version: 1.0</text:p>
      <text:p text:style-name="Horizontal_20_Line"/>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h text:style-name="Heading_20_1" text:outline-level="1"><text:bookmark-start text:name="acto-i"/>Acto I<text:bookmark-end text:name="acto-i"/></text:h>
      <text:list text:style-name="List_20_1">
        <text:list-item>
          <text:p text:style-name="List_20_Bullet_20_Tight">“El conocimiento cambia al observador,</text:p>
        </text:list-item>
      </text:list>
      <text:p text:style-name="Quotations">y el observador cambia aquello que observa.” *</text:p>
      <text:p text:style-name="Preformatted_20_Text"><text:s text:c="38"/>— Fabhrius</text:p>
      <text:p text:style-name="Horizontal_20_Line"/>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list text:style-name="List_20_1">
        <text:list-item>
          <text:p text:style-name="List_20_Bullet_20_Tight">“Muchas veces no existe una solución perfecta.</text:p>
        </text:list-item>
      </text:list>
      <text:p text:style-name="Quotations">Solo existe la menos mala.” *</text:p>
      <text:p text:style-name="Preformatted_20_Text"><text:s text:c="10"/>—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 text:c="1"/>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7-09T03:21:49Z</meta:creation-date>
    <dc:date>2026-07-09T03:21:49Z</dc:date>
  </office:meta>
</office:document-meta>
</file>