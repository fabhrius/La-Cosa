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La Llave</text:p>
      <text:p text:style-name="Author">Tony Fabrico</text:p>
      <text:h text:style-name="Heading_20_1" text:outline-level="1"><text:bookmark-start text:name="la-llave"/>La Llave<text:bookmark-end text:name="la-llave"/></text:h>
      <text:p text:style-name="First_20_paragraph">Nohk observó la entrada de la cueva.</text:p>
      <text:p text:style-name="Text_20_body">El viento descendía desde las montañas.</text:p>
      <text:p text:style-name="Text_20_body"><text:span text:style-name="Emphasis">Había llegado demasiado lejos para regresar.</text:span></text:p>
      <text:p text:style-name="Text_20_body">—Quizá aún haya tiempo.</text:p>
      <text:p text:style-name="Text_20_body">—No lo creo.</text:p>
      <text:p text:style-name="Quotations">La puerta se abrirá únicamente para quien posea la llave.</text:p>
      <text:p text:style-name="Horizontal_20_Line"/>
      <text:p text:style-name="First_20_paragraph">La noche cayó sobre el vall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pitch="variable" style:name="EB Garamond" svg:font-family="'EB Garamond'"/>
    <style:font-face style:font-adornments="Italic" style:font-pitch="variable" style:name="EB Garamond1" svg:font-family="'EB Garamond'"/>
    <style:font-face style:font-adornments="Regular" style:font-pitch="variable" style:name="EB Garamond2" svg:font-family="'EB Garamond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Microsoft YaHei'" style:font-family-complex="'Lucida Sans'" style:font-family-generic="swiss" style:font-family-generic-asian="system" style:font-family-generic-complex="system" style:font-name="Liberation Sans" style:font-name-asian="Microsoft YaHei" style:font-name-complex="Lucida San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family-complex="'Lucida Sans'" style:font-family-generic-complex="swiss" style:font-name-complex="Lucida Sans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Lucida Sans'" style:font-family-generic-complex="swiss" style:font-name-complex="Lucida Sans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country-asian="none" style:country-complex="none" style:font-family-complex="'Lucida Sans'" style:font-family-generic-complex="swiss" style:font-name-complex="Lucida Sans" style:font-size-asian="12pt" style:language-asian="zxx" style:language-complex="zxx" fo:country="none" fo:language="zxx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extra" style:family="paragraph" style:name="Header" style:parent-style-name="Header_20_and_20_Footer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extra" style:family="paragraph" style:name="Footer" style:parent-style-name="Header_20_and_20_Footer">
      <style:paragraph-properties text:line-number="0" text:number-lines="false">
        <style:tab-stops>
          <style:tab-stop style:position="5.65cm" style:type="center"/>
          <style:tab-stop style:position="11.301cm" style:type="right"/>
        </style:tab-stops>
      </style:paragraph-properties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size-asian="28pt" style:font-size-complex="28pt" style:font-weight-asian="bold" style:font-weight-complex="bold" fo:font-size="28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106cm" fo:text-align="center"/>
      <style:text-properties style:font-name="EB Garamond1" style:font-pitch="variable" style:font-size-asian="18pt" style:font-size-complex="18pt" style:font-style-name="Italic" fo:font-family="'EB Garamond'" fo:font-size="14pt" fo:font-style="italic"/>
    </style:style>
    <style:style style:class="html" style:family="paragraph" style:name="Quotations" style:parent-style-name="Standard">
      <style:paragraph-properties style:auto-text-indent="false" style:contextual-spacing="false" fo:margin-bottom="0.499cm" fo:margin-left="0.37cm" fo:margin-right="0.37cm" fo:margin-top="0cm" fo:text-indent="0cm"/>
      <style:text-properties fo:font-size="11pt" fo:font-style="italic"/>
    </style:style>
    <style:style style:display-name="Scene Break" style:family="paragraph" style:master-page-name="" style:name="Scene_20_Break" style:parent-style-name="Text_20_body">
      <style:paragraph-properties style:justify-single-word="false" style:page-number="auto" fo:text-align="center"/>
      <style:text-properties style:font-name="EB Garamond2" style:font-pitch="variable" style:font-style-name="Regular" fo:font-family="'EB Garamond'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List_20_Bullet" style:display-name="List Bullet" style:family="paragraph" style:parent-style-name="List" style:class="list"/>
    <style:style style:name="List_20_Bullet_20_Tight" style:display-name="List Bullet Tight" style:family="paragraph" style:parent-style-name="List" style:class="list">
      <style:paragraph-properties fo:margin-top="0in" fo:margin-bottom="0in" style:contextual-spacing="false"/>
    </style:style>
    <style:style style:name="List_20_Number" style:display-name="List Number" style:family="paragraph" style:parent-style-name="List" style:class="list"/>
    <style:style style:name="List_20_Number_20_Tight" style:display-name="List Number Tight" style:family="paragraph" style:parent-style-name="List" style:class="list">
      <style:paragraph-properties fo:margin-top="0in" fo:margin-bottom="0in" style:contextual-spacing="false"/>
    </style:style>
  </office:styles>
  <office:automatic-styles>
    <style:page-layout style:name="Mpm1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1.799cm" fo:margin-left="2cm" fo:margin-right="1.499cm" fo:margin-top="1.799cm" fo:page-height="21.001cm" fo:page-width="14.8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draw:fill="none" draw:fill-color="#729fcf" style:dynamic-spacing="false" fo:background-color="transparent" fo:margin-bottom="0.499cm" fo:margin-left="0cm" fo:margin-right="0cm" fo:min-height="0.998cm"/>
      </style:header-style>
      <style:footer-style>
        <style:header-footer-properties draw:fill="none" draw:fill-color="#729fcf" style:dynamic-spacing="false" fo:background-color="transparent" fo:margin-left="0cm" fo:margin-right="0cm" fo:margin-top="0.499cm" fo:min-height="0.998c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header>
        <text:p text:style-name="Footer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0</meta:generator>
    <dc:title>La Llave</dc:title>
    <dc:description/>
    <dc:subject/>
    <meta:keyword/>
    <meta:initial-creator>Tony Fabrico</meta:initial-creator>
    <dc:creator>Tony Fabrico</dc:creator>
    <meta:creation-date>2026-07-02T21:17:30Z</meta:creation-date>
    <dc:date>2026-07-02T21:17:30Z</dc:date>
  </office:meta>
</office:document-meta>
</file>