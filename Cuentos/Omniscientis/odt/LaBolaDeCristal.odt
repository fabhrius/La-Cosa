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ChapterStart">Existió una vez, mucho tiempo atras, un pequeño pueblo llamado Drywind.</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FigureWithCaption"><draw:frame draw:name="img1" style:rel-width="100.0%" style:rel-height="scale" svg:width="1536.0pt" svg:height="1024.0pt"><draw:image xlink:href="Pictures/0.png" xlink:type="simple" xlink:show="embed" xlink:actuate="onLoad"/></draw:frame></text:p>
      <text:p text:style-name="FigureCaption">La Almoneda de Maese Dahg</text:p>
      <text:p text:style-name="Separator">✦ ✦ ✦</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p text:style-name="PageBreak"> </text:p>
      <text:h text:style-name="Heading_20_2" text:outline-level="2"><text:bookmark-start text:name="capítulo-2"/>Capítulo 2<text:bookmark-end text:name="capítulo-2"/></text:h>
      <text:p text:style-name="PartTitle">Parte 1 - Una lente de lectura</text:p>
      <text:p text:style-name="ChapterStart">Dahg señaló una mesa de trabajo situada al fondo de la tienda. —Por aquí, si es tan amable. La mujer asintió y lo siguió entre los estrechos pasillos formados por estanterías y montones de antigüedades. Ahora que podía observarla de cerca, Dahg comprendió que no se trataba de una cliente corriente. Debía rondar los cuarenta años. Vestía un elegante abrigo de viaje confeccionado con telas de gran calidad y llevaba guantes de cuero impecablemente cuidados. Cada detalle de su apariencia transmitía refinamiento.</text:p>
      <text:p text:style-name="First_20_paragraph">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Bold" style:font-pitch="variable" style:name="EB Garamond" svg:font-family="'EB Garamond'"/>
    <style:font-face style:font-adornments="Italic" style:font-pitch="variable" style:name="EB Garamond1" svg:font-family="'EB Garamond'"/>
    <style:font-face style:font-adornments="Regular" style:font-pitch="variable" style:name="EB Garamond2" svg:font-family="'EB Garamond'"/>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1.251cm"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style:justify-single-word="false" fo:margin-bottom="0.152cm" fo:margin-top="0.152cm" fo:text-align="justify"/>
      <style:text-properties style:font-name="EB Garamond2" style:font-pitch="variable" style:font-style-name="Regular" fo:font-family="'EB Garamond'"/>
    </style:style>
    <style:style style:class="chapter" style:family="paragraph" style:name="Title" style:next-style-name="Subtitle" style:parent-style-name="Heading">
      <style:paragraph-properties style:contextual-spacing="false" style:justify-single-word="false" fo:margin-bottom="0.212cm" fo:margin-top="0cm" fo:text-align="center"/>
      <style:text-properties style:font-name="EB Garamond" style:font-pitch="variable" style:font-size-asian="28pt" style:font-size-complex="28pt" style:font-style-name="Bold" style:font-weight-asian="bold" style:font-weight-complex="bold" fo:font-family="'EB Garamond'" fo:font-size="20pt" fo:font-weight="bold"/>
    </style:style>
    <style:style style:class="chapter" style:family="paragraph" style:name="Subtitle" style:next-style-name="Text_20_body" style:parent-style-name="Heading">
      <style:paragraph-properties style:contextual-spacing="false" style:justify-single-word="false" fo:margin-bottom="0.212cm" fo:margin-top="0.212cm"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list" style:family="paragraph" style:name="List" style:parent-style-name="Text_20_body">
      <style:text-properties style:font-family-complex="Tahoma" style:font-name-complex="Tahoma"/>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cm" fo:margin-top="0cm"/>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cm" fo:margin-top="0cm"/>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margin-bottom="0.499cm" fo:margin-top="0.801cm" fo:text-align="center"/>
      <style:text-properties style:font-name="EB Garamond" style:font-pitch="variable" style:font-size-asian="115%" style:font-size-complex="115%" style:font-style-name="Bold" style:font-weight-asian="bold" style:font-weight-complex="bold" fo:font-family="'EB Garamond'" fo:font-size="115%" fo:font-weight="bold"/>
    </style:style>
    <style:style style:class="text" style:default-outline-level="2" style:display-name="Heading 2" style:family="paragraph" style:name="Heading_20_2" style:next-style-name="Text_20_body" style:parent-style-name="Heading">
      <style:paragraph-properties style:auto-text-indent="false" style:contextual-spacing="false" style:justify-single-word="false" fo:margin-bottom="0.499cm" fo:margin-left="1cm" fo:margin-right="0.499cm" fo:margin-top="1cm" fo:text-align="center" fo:text-indent="0cm"/>
      <style:text-properties style:font-name="EB Garamond" style:font-pitch="variable" style:font-size-asian="14pt" style:font-size-complex="14pt" style:font-style-asian="italic" style:font-style-complex="italic" style:font-style-name="Bold" style:font-weight-asian="bold" style:font-weight-complex="bold" fo:font-family="'EB Garamon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style:justify-single-word="false" fo:margin-bottom="0.4cm" fo:margin-left="1cm" fo:margin-right="1cm" fo:margin-top="0.4cm" fo:text-align="center" fo:text-indent="0cm"/>
      <style:text-properties style:font-name="EB Garamond1" style:font-pitch="variable" style:font-style-name="Italic" fo:font-family="'EB Garamond'" fo:font-size="11pt" fo:font-style="italic"/>
    </style:style>
    <style:style style:class="html" style:display-name="Preformatted Text" style:family="paragraph" style:name="Preformatted_20_Text" style:parent-style-name="Standard">
      <style:paragraph-properties style:contextual-spacing="false" fo:margin-bottom="0cm" fo:margin-top="0cm"/>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text" style:display-name="First line indent" style:family="paragraph" style:name="First_20_line_20_indent" style:parent-style-name="Text_20_body">
      <style:paragraph-properties style:auto-text-indent="false" fo:margin-left="0cm" fo:margin-right="0cm" fo:text-indent="0.499cm"/>
    </style:style>
    <style:style style:family="paragraph" style:master-page-name="Standard" style:name="PageBreak" style:parent-style-name="Standard">
      <style:paragraph-properties style:page-number="auto" fo:break-after="auto" fo:break-before="auto"/>
    </style:style>
    <style:style style:family="paragraph" style:name="Credits" style:parent-style-name="Standard">
      <style:paragraph-properties style:auto-text-indent="false" style:justify-single-word="false" fo:line-height="115%" fo:margin-left="0cm" fo:margin-right="0.3cm" fo:text-align="center" fo:text-indent="0cm"/>
      <style:text-properties style:font-name="EB Garamond2" style:font-pitch="variable" style:font-style-name="Regular" fo:font-family="'EB Garamond'" fo:font-size="11pt"/>
    </style:style>
    <style:style style:family="paragraph" style:name="PartTitle" style:parent-style-name="Standard">
      <style:paragraph-properties style:auto-text-indent="false" style:contextual-spacing="false" style:justify-single-word="false" fo:margin-bottom="0.801cm" fo:margin-left="0.6cm" fo:margin-right="0.801cm" fo:margin-top="0.6cm" fo:text-align="center" fo:text-indent="0cm"/>
      <style:text-properties style:font-name="EB Garamond1" style:font-pitch="variable" style:font-style-name="Italic" fo:font-family="'EB Garamond'" fo:font-style="italic"/>
    </style:style>
    <style:style style:family="paragraph" style:name="FinalPage" style:parent-style-name="Standard">
      <style:paragraph-properties style:auto-text-indent="false" style:contextual-spacing="false" style:justify-single-word="false" fo:margin-bottom="0cm" fo:margin-left="7.999cm" fo:margin-right="0cm" fo:margin-top="0cm" fo:text-align="center" fo:text-indent="0cm"/>
      <style:text-properties style:font-name="EB Garamond2" style:font-pitch="variable" style:font-style-name="Regular" fo:font-family="'EB Garamond'" fo:font-size="14pt"/>
    </style:style>
    <style:style style:family="paragraph" style:name="OmniIllustration" style:parent-style-name="Standard">
      <style:paragraph-properties style:auto-text-indent="false" style:justify-single-word="false" fo:margin-left="0.499cm" fo:margin-right="0.499cm" fo:text-align="center" fo:text-indent="0cm"/>
    </style:style>
    <style:style style:family="paragraph" style:name="Separator" style:parent-style-name="Standard">
      <style:paragraph-properties style:auto-text-indent="false" style:contextual-spacing="false" style:justify-single-word="false" fo:margin-bottom="0.499cm" fo:margin-left="0.499cm" fo:margin-right="0.499cm" fo:margin-top="0.499cm" fo:text-align="center" fo:text-indent="0cm"/>
    </style:style>
    <style:style style:class="extra" style:display-name="Footer left" style:family="paragraph" style:name="Footer_20_left" style:parent-style-name="Footer">
      <style:paragraph-properties text:line-number="0" text:number-lines="false">
        <style:tab-stops>
          <style:tab-stop style:position="5.5cm" style:type="center"/>
          <style:tab-stop style:position="11.001cm" style:type="right"/>
        </style:tab-stops>
      </style:paragraph-properties>
    </style:style>
    <style:style style:class="extra" style:family="paragraph" style:name="Illustration" style:parent-style-name="Caption"/>
    <style:style style:family="paragraph" style:name="ChapterStart" style:parent-style-name="Standard">
      <style:paragraph-properties>
        <style:drop-cap style:distance="0.199cm" style:lines="3"/>
      </style:paragraph-properties>
      <style:text-properties style:font-name="EB Garamond2" style:font-pitch="variable" style:font-style-name="Regular" fo:font-family="'EB Garamond'"/>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country="none" fo:font-family="'Courier New'"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paragraph-properties style:justify-single-word="false" fo:text-align="center"/>
    </style:style>
    <style:style style:family="text" style:name="MT1">
      <style:text-properties officeooo:rsid="003b130d"/>
    </style:style>
    <style:style style:family="text" style:name="MT2">
      <style:text-properties officeooo:rsid="003bbf75"/>
    </style:style>
    <style:page-layout style:name="Mpm1" style:page-usage="mirrored">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2cm" fo:margin-right="1.799cm" fo:margin-top="2cm" fo:page-height="21.001cm" fo:page-width="15cm" loext:margin-gutter="0cm">
        <style:footnote-sep style:adjustment="left" style:color="#000000" style:distance-after-sep="0.101cm" style:distance-before-sep="0.101cm" style:line-style="none"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1.001cm" fo:page-width="15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span text:style-name="MT1"> <text:s/>✦ · <text:s/></text:span><text:page-number text:select-page="current">3</text:page-number><text:s/><text:span text:style-name="MT1"><text:s/>· ✦</text:span><text:span text:style-name="MT2"> </text:span><text:span text:style-name="MT1"><text:s/></text:span>────────</text:p>
      </style:footer>
    </style:master-page>
    <style:master-page draw:style-name="Mdp1" style:display-name="First Page" style:name="First_20_Page" style:next-style-name="Standard"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La Bola de Cristal</dc:title>
    <dc:description/>
    <dc:subject/>
    <meta:keyword/>
    <meta:initial-creator>Tony Fabrico</meta:initial-creator>
    <dc:creator>Tony Fabrico</dc:creator>
    <meta:creation-date>2026-07-15T01:32:08Z</meta:creation-date>
    <dc:date>2026-07-15T01:32:08Z</dc:date>
    <meta:user-defined meta:name="series" meta:value-type="string">Omniscientis</meta:user-defined>
    <meta:user-defined meta:name="version" meta:value-type="string">1</meta:user-defined>
  </office:meta>
</office:document-meta>
</file>