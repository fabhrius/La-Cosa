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. Con tu perfil, <text:span text:style-name="Strong_20_Emphasis">no te enseñaría IA como a un principiante</text:span>.</text:p>
      <text:p text:style-name="Text_20_body">Tú ya tienes varias ventajas importantes:</text:p>
      <text:list xml:id="list860057986" text:style-name="L1">
        <text:list-item>
          <text:p text:style-name="P1">Formación universitaria en informática.</text:p>
        </text:list-item>
        <text:list-item>
          <text:p text:style-name="P1">Experiencia senior desarrollando software complejo.</text:p>
        </text:list-item>
        <text:list-item>
          <text:p text:style-name="P1">Conocimiento de arquitectura, APIs y microservicios.</text:p>
        </text:list-item>
        <text:list-item>
          <text:p text:style-name="P1">Has visto redes neuronales y Python anteriormente.</text:p>
        </text:list-item>
        <text:list-item>
          <text:p text:style-name="P1">No tienes una presión inmediata por encontrar trabajo.</text:p>
        </text:list-item>
      </text:list>
      <text:p text:style-name="Text_20_body">Tu principal reto no es aprender a programar ni aprender informática. Es <text:span text:style-name="Strong_20_Emphasis">actualizarte a los paradigmas de IA modernos (2017-2026)</text:span> y refrescar las matemáticas justo cuando hagan falta.</text:p>
      <text:p text:style-name="Horizontal_20_Line"/>
      <text:h text:style-name="Heading_20_1" text:outline-level="1">Tu objetivo real</text:h>
      <text:p text:style-name="Text_20_body">No es aprender IA.</text:p>
      <text:p text:style-name="Text_20_body">Es aprender a construir sistemas que utilicen IA.</text:p>
      <text:p text:style-name="Text_20_body">Hay una diferencia enorme.</text:p>
      <text:p text:style-name="Text_20_body">Muchas personas pasan meses estudiando derivadas, backpropagation y álgebra lineal para terminar sin crear nada útil.</text:p>
      <text:p text:style-name="Text_20_body">En cambio, alguien con tu experiencia puede empezar a crear productos en pocas semanas.</text:p>
      <text:p text:style-name="Text_20_body">Por eso te propondría dos caminos paralelos:</text:p>
      <text:h text:style-name="Heading_20_2" text:outline-level="2">Camino A: Constructor</text:h>
      <text:p text:style-name="Text_20_body">Aprender a utilizar IA para crear aplicaciones.</text:p>
      <text:list xml:id="list3983035057" text:style-name="L2">
        <text:list-item>
          <text:p text:style-name="P2">Python moderno</text:p>
        </text:list-item>
        <text:list-item>
          <text:p text:style-name="P2">APIs de modelos</text:p>
        </text:list-item>
        <text:list-item>
          <text:p text:style-name="P2">LLMs</text:p>
        </text:list-item>
        <text:list-item>
          <text:p text:style-name="P2">Agentes</text:p>
        </text:list-item>
        <text:list-item>
          <text:p text:style-name="P2">RAG</text:p>
        </text:list-item>
        <text:list-item>
          <text:p text:style-name="P2">Bases de datos vectoriales</text:p>
        </text:list-item>
        <text:list-item>
          <text:p text:style-name="P2">Automatización</text:p>
        </text:list-item>
      </text:list>
      <text:h text:style-name="Heading_20_2" text:outline-level="2"><text:soft-page-break/>Camino B: Científico</text:h>
      <text:p text:style-name="Text_20_body">Entender qué ocurre dentro.</text:p>
      <text:list xml:id="list1867479377" text:style-name="L3">
        <text:list-item>
          <text:p text:style-name="P3">Probabilidad</text:p>
        </text:list-item>
        <text:list-item>
          <text:p text:style-name="P3">Álgebra lineal</text:p>
        </text:list-item>
        <text:list-item>
          <text:p text:style-name="P3">Gradiente descendente</text:p>
        </text:list-item>
        <text:list-item>
          <text:p text:style-name="P3">Redes neuronales</text:p>
        </text:list-item>
        <text:list-item>
          <text:p text:style-name="P3">Transformers</text:p>
        </text:list-item>
        <text:list-item>
          <text:p text:style-name="P3">Entrenamiento de modelos</text:p>
        </text:list-item>
      </text:list>
      <text:p text:style-name="Text_20_body">El camino A será el 80% y el B el 20%.</text:p>
      <text:p text:style-name="Horizontal_20_Line"/>
      <text:h text:style-name="Heading_20_1" text:outline-level="1">Plan para alguien con 2 horas semanales</text:h>
      <text:h text:style-name="Heading_20_2" text:outline-level="2">Fase 1 (1-2 meses)</text:h>
      <text:h text:style-name="Heading_20_3" text:outline-level="3">Actualización del ecosistema IA</text:h>
      <text:p text:style-name="Text_20_body">Objetivo:<text:line-break/>Entender qué ha pasado desde que saliste de la universidad.</text:p>
      <text:p text:style-name="Text_20_body">Temas:</text:p>
      <text:list xml:id="list2890702425" text:style-name="L4">
        <text:list-item>
          <text:p text:style-name="P4">IA vs Machine Learning vs Deep Learning</text:p>
        </text:list-item>
        <text:list-item>
          <text:p text:style-name="P4">Redes neuronales modernas</text:p>
        </text:list-item>
        <text:list-item>
          <text:p text:style-name="P4">¿Qué es un Transformer?</text:p>
        </text:list-item>
        <text:list-item>
          <text:p text:style-name="P4">¿Qué es un LLM?</text:p>
        </text:list-item>
        <text:list-item>
          <text:p text:style-name="P4">¿Por qué ChatGPT funciona?</text:p>
        </text:list-item>
        <text:list-item>
          <text:p text:style-name="P4">Embeddings</text:p>
        </text:list-item>
        <text:list-item>
          <text:p text:style-name="P4">Fine-tuning</text:p>
        </text:list-item>
        <text:list-item>
          <text:p text:style-name="P4">Agentes</text:p>
        </text:list-item>
      </text:list>
      <text:p text:style-name="Text_20_body">No necesitas programar todavía.</text:p>
      <text:p text:style-name="Horizontal_20_Line"/>
      <text:h text:style-name="Heading_20_2" text:outline-level="2"><text:soft-page-break/>Fase 2 (1-2 meses)</text:h>
      <text:h text:style-name="Heading_20_3" text:outline-level="3">Python para IA</text:h>
      <text:p text:style-name="Text_20_body">No aprender Python completo.</text:p>
      <text:p text:style-name="Text_20_body">Solo lo necesario.</text:p>
      <text:list xml:id="list1429449182" text:style-name="L5">
        <text:list-item>
          <text:p text:style-name="P5">notebooks</text:p>
        </text:list-item>
        <text:list-item>
          <text:p text:style-name="P5">numpy</text:p>
        </text:list-item>
        <text:list-item>
          <text:p text:style-name="P5">pandas</text:p>
        </text:list-item>
        <text:list-item>
          <text:p text:style-name="P5">requests</text:p>
        </text:list-item>
        <text:list-item>
          <text:p text:style-name="P5">entornos virtuales</text:p>
        </text:list-item>
        <text:list-item>
          <text:p text:style-name="P5">manejo básico de modelos</text:p>
        </text:list-item>
      </text:list>
      <text:p text:style-name="Text_20_body">Con tu experiencia Java probablemente te llevará pocas semanas.</text:p>
      <text:p text:style-name="Horizontal_20_Line"/>
      <text:h text:style-name="Heading_20_2" text:outline-level="2">Fase 3 (2-3 meses)</text:h>
      <text:h text:style-name="Heading_20_3" text:outline-level="3">Construir proyectos reales</text:h>
      <text:p text:style-name="Text_20_body">Por ejemplo:</text:p>
      <text:list xml:id="list10682511" text:style-name="L6">
        <text:list-item>
          <text:p text:style-name="P6">Chat con documentos PDF.</text:p>
        </text:list-item>
        <text:list-item>
          <text:p text:style-name="P6">Buscador semántico.</text:p>
        </text:list-item>
        <text:list-item>
          <text:p text:style-name="P6">Resumen automático de documentación técnica.</text:p>
        </text:list-item>
        <text:list-item>
          <text:p text:style-name="P6">Asistente para microservicios.</text:p>
        </text:list-item>
        <text:list-item>
          <text:p text:style-name="P6">Generador de documentación OpenAPI.</text:p>
        </text:list-item>
        <text:list-item>
          <text:p text:style-name="P6">Asistente para revisar código Java.</text:p>
        </text:list-item>
      </text:list>
      <text:p text:style-name="Text_20_body">Aquí es donde más vas a disfrutar.</text:p>
      <text:p text:style-name="Horizontal_20_Line"/>
      <text:h text:style-name="Heading_20_2" text:outline-level="2">Fase 4 (continua)</text:h>
      <text:h text:style-name="Heading_20_3" text:outline-level="3">Comprender la magia</text:h>
      <text:p text:style-name="Text_20_body">Aquí sí entramos en:</text:p>
      <text:list xml:id="list3740354390" text:style-name="L7">
        <text:list-item>
          <text:p text:style-name="P7">embeddings</text:p>
        </text:list-item>
        <text:list-item>
          <text:p text:style-name="P7">atención</text:p>
        </text:list-item>
        <text:list-item>
          <text:p text:style-name="P7"><text:soft-page-break/>transformers</text:p>
        </text:list-item>
        <text:list-item>
          <text:p text:style-name="P7">entrenamiento</text:p>
        </text:list-item>
        <text:list-item>
          <text:p text:style-name="P7">backpropagation</text:p>
        </text:list-item>
        <text:list-item>
          <text:p text:style-name="P7">RLHF</text:p>
        </text:list-item>
        <text:list-item>
          <text:p text:style-name="P7">fine-tuning</text:p>
        </text:list-item>
      </text:list>
      <text:p text:style-name="Text_20_body">Pero ya con contexto práctico.</text:p>
      <text:p text:style-name="Horizontal_20_Line"/>
      <text:h text:style-name="Heading_20_1" text:outline-level="1">Lo que yo haría en tu caso</text:h>
      <text:p text:style-name="Text_20_body">Si tuviera tu perfil, dedicaría los próximos 6 meses a:</text:p>
      <text:list xml:id="list2964267471" text:style-name="L8">
        <text:list-item>
          <text:p text:style-name="P8">Entender LLMs.</text:p>
        </text:list-item>
        <text:list-item>
          <text:p text:style-name="P8">Aprender embeddings.</text:p>
        </text:list-item>
        <text:list-item>
          <text:p text:style-name="P8">Aprender RAG.</text:p>
        </text:list-item>
        <text:list-item>
          <text:p text:style-name="P8">Construir agentes.</text:p>
        </text:list-item>
        <text:list-item>
          <text:p text:style-name="P8">Integrar IA con sistemas empresariales.</text:p>
        </text:list-item>
      </text:list>
      <text:p text:style-name="Text_20_body">No intentaría entrenar modelos desde cero.</text:p>
      <text:p text:style-name="Text_20_body">Hoy el valor empresarial está mucho más en:</text:p>
      <text:list xml:id="list374526952" text:style-name="L9">
        <text:list-item>
          <text:p text:style-name="P9">Orquestar modelos.</text:p>
        </text:list-item>
        <text:list-item>
          <text:p text:style-name="P9">Diseñar productos.</text:p>
        </text:list-item>
        <text:list-item>
          <text:p text:style-name="P9">Integrar sistemas.</text:p>
        </text:list-item>
        <text:list-item>
          <text:p text:style-name="P9">Crear flujos de trabajo.</text:p>
        </text:list-item>
      </text:list>
      <text:p text:style-name="Text_20_body">Que en entrenar redes neuronales desde cero.</text:p>
      <text:p text:style-name="Horizontal_20_Line"/>
      <text:h text:style-name="Heading_20_1" text:outline-level="1">Clase 2: ¿Por qué ChatGPT fue una revolución?</text:h>
      <text:p text:style-name="Text_20_body">Antes de 2017, la mayoría de redes neuronales procesaban información de forma secuencial.</text:p>
      <text:p text:style-name="Text_20_body">El gran cambio llegó con el artículo:</text:p>
      <text:p text:style-name="Text_20_body">Attention Is All You Need</text:p>
      <text:p text:style-name="Text_20_body">que introdujo la arquitectura Transformer.</text:p>
      <text:p text:style-name="Text_20_body">La idea central fue:</text:p>
      <text:p text:style-name="Quotations"><text:soft-page-break/>En lugar de leer una frase palabra por palabra, el modelo puede prestar atención simultáneamente a todas las palabras y a sus relaciones.</text:p>
      <text:p text:style-name="Text_20_body">Por ejemplo, en:</text:p>
      <text:p text:style-name="Quotations">"El programador corrigió el error porque él lo encontró."</text:p>
      <text:p text:style-name="Text_20_body">Para entender quién es "él", el modelo debe relacionar palabras separadas en la frase.</text:p>
      <text:p text:style-name="Text_20_body">Los Transformers hacen eso extraordinariamente bien.</text:p>
      <text:p text:style-name="Text_20_body">Gracias a ello aparecieron modelos como:</text:p>
      <text:list xml:id="list1411688463" text:style-name="L10">
        <text:list-item>
          <text:p text:style-name="P10">ChatGPT</text:p>
        </text:list-item>
        <text:list-item>
          <text:p text:style-name="P10">Claude</text:p>
        </text:list-item>
        <text:list-item>
          <text:p text:style-name="P10">Gemini</text:p>
        </text:list-item>
      </text:list>
      <text:p text:style-name="Horizontal_20_Line"/>
      <text:h text:style-name="Heading_20_2" text:outline-level="2">Tu primer ejercicio</text:h>
      <text:p text:style-name="Text_20_body">Sin buscar información externa, intenta responder:</text:p>
      <text:p text:style-name="Text_20_body"><text:span text:style-name="Strong_20_Emphasis">¿Cuál crees que es la diferencia entre una búsqueda tradicional en Google y una conversación con ChatGPT?</text:span></text:p>
      <text:p text:style-name="Text_20_body">No busco una respuesta técnica perfecta. Quiero saber cómo lo entiendes intuitivamente para construir sobre esa base en la siguiente clase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15T15:26:14.137000000</meta:creation-date>
    <dc:date>2026-06-15T15:37:57.836000000</dc:date>
    <meta:editing-duration>PT11M44S</meta:editing-duration>
    <meta:editing-cycles>1</meta:editing-cycles>
    <meta:document-statistic meta:table-count="0" meta:image-count="0" meta:object-count="0" meta:page-count="5" meta:paragraph-count="112" meta:word-count="605" meta:character-count="3666" meta:non-whitespace-character-count="3230"/>
    <meta:generator>LibreOffice/7.3.5.2$Windows_X86_64 LibreOffice_project/184fe81b8c8c30d8b5082578aee2fed2ea847c01</meta:generator>
  </office:meta>
</office:document-meta>
</file>