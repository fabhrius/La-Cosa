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EB Garamond" svg:font-family="'EB Garamond'" style:font-pitch="variable"/>
    <style:font-face style:name="EB Garamond1" svg:font-family="'EB Garamond'" style:font-adornments="Ital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paragraph-rsid="0020640a"/>
    </style:style>
    <style:style style:name="P2" style:family="paragraph" style:parent-style-name="Standard">
      <style:text-properties officeooo:paragraph-rsid="0020640a"/>
    </style:style>
    <style:style style:name="P3" style:family="paragraph" style:parent-style-name="Standard">
      <style:paragraph-properties fo:break-before="page"/>
      <style:text-properties officeooo:paragraph-rsid="0020640a"/>
    </style:style>
    <style:style style:name="P4" style:family="paragraph" style:parent-style-name="Text_20_body">
      <style:text-properties officeooo:paragraph-rsid="0020640a"/>
    </style:style>
    <style:style style:name="P5" style:family="paragraph" style:parent-style-name="Text_20_body">
      <style:paragraph-properties fo:text-align="center" style:justify-single-word="false"/>
      <style:text-properties officeooo:paragraph-rsid="002378d8"/>
    </style:style>
    <style:style style:name="P6" style:family="paragraph" style:parent-style-name="Text_20_body">
      <style:text-properties fo:font-style="italic" style:font-style-asian="italic" style:font-style-complex="italic"/>
    </style:style>
    <style:style style:name="P7" style:family="paragraph" style:parent-style-name="Title">
      <style:text-properties officeooo:paragraph-rsid="0021de35"/>
    </style:style>
    <style:style style:name="T1" style:family="text">
      <style:text-properties officeooo:rsid="000f32ae"/>
    </style:style>
    <style:style style:name="T2" style:family="text">
      <style:text-properties officeooo:rsid="000d0314"/>
    </style:style>
    <style:style style:name="T3" style:family="text">
      <style:text-properties officeooo:rsid="000eaf09"/>
    </style:style>
    <style:style style:name="T4" style:family="text">
      <style:text-properties officeooo:rsid="000f039e"/>
    </style:style>
    <style:style style:name="T5" style:family="text">
      <style:text-properties officeooo:rsid="000f195a"/>
    </style:style>
    <style:style style:name="T6" style:family="text">
      <style:text-properties officeooo:rsid="000f5bd4"/>
    </style:style>
    <style:style style:name="T7" style:family="text">
      <style:text-properties officeooo:rsid="0010de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P7">OMNISCIENTIS</text:p>
      <text:p text:style-name="P2"/>
      <text:p text:style-name="Subtitle">RELATOS</text:p>
      <text:p text:style-name="P2"/>
      <text:p text:style-name="Title">La Llave</text:p>
      <text:p text:style-name="P2"/>
      <text:p text:style-name="Subtitle">Tony Fabrico</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Text_20_body">© Tony Fabrico</text:p>
      <text:p text:style-name="Text_20_body"/>
      <text:p text:style-name="Text_20_body">Relato perteneciente al universo Omniscientis.</text:p>
      <text:p text:style-name="Text_20_body"/>
      <text:p text:style-name="Text_20_body">Versión prelimina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Text_20_body">Los relatos de Omniscientis son historias independientes ambientadas en un universo donde el conocimiento, el misterio y la inteligencia se entrelazan.</text:p>
      <text:p text:style-name="Text_20_body"/>
      <text:p text:style-name="Text_20_body">Cada relato puede leerse de forma independient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Title">La Llav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Subtitle">Capítulo 1 - La llave de hierro</text:p>
      <text:h text:style-name="P1" text:outline-level="2"/>
      <text:p text:style-name="Subtitle"><text:span text:style-name="T1">Parte 1 - </text:span>El valle</text:p>
      <text:p text:style-name="P4"/>
      <text:p text:style-name="Text_20_body">Sucedio durante el reinado de Aldouseadhrickan<text:span text:style-name="T2">.</text:span></text:p>
      <text:p text:style-name="Text_20_body">En algun lugar del valle al este de las montañas. Allí, donde el río Bager desciende de las tierras altas atravesando los bosques de Oldwood, vivía un joven campesino llamado Nohk.</text:p>
      <text:p text:style-name="Text_20_body"><text:soft-page-break/>Poseía una pequeña casa de madera construida junto al río, en una estrecha franja de terreno fértil donde cultivaba granos y criaba algunos animales: cuatro gallinas, cuatro cabras<text:span text:style-name="T2">,</text:span> dos caballos.</text:p>
      <text:p text:style-name="Text_20_body">No era rico.</text:p>
      <text:p text:style-name="Text_20_body">Pero tampoco era pobre.</text:p>
      <text:p text:style-name="Text_20_body">Tenía suficiente para vivir.</text:p>
      <text:p text:style-name="Text_20_body">Y en aquellos tiempos, aquello era una fortuna.</text:p>
      <text:p text:style-name="Text_20_body">Las mañanas comenzaban con la luz dorada del amanecer reflejándose sobre el agua.</text:p>
      <text:p text:style-name="Text_20_body">Las tardes transcurrían entre el trabajo de los campos y el sonido constante del río golpeando suavemente contra las raíces de los árboles.</text:p>
      <text:p text:style-name="Text_20_body">Y por las noches, cuando el viento descendía desde las montañas, el valle quedaba envuelto en un silencio tan profundo que podía escucharse el canto lejano de los búhos en el bosque.</text:p>
      <text:p text:style-name="Text_20_body">Nohk amaba aquel lugar.</text:p>
      <text:p text:style-name="Text_20_body">Conocía cada curva del río.<text:span text:style-name="T2"> </text:span>Cada árbol.<text:span text:style-name="T2"> </text:span>Cada sendero.</text:p>
      <text:p text:style-name="Text_20_body">Sabía dónde crecían las flores en primavera y dónde aparecían los primeros hongos después de la lluvia.</text:p>
      <text:p text:style-name="Text_20_body">Aquella parte del mundo parecía existir fuera del tiempo.</text:p>
      <text:p text:style-name="Text_20_body">Todo encontraba allí un equilibrio perfecto.</text:p>
      <text:p text:style-name="Text_20_body"><text:soft-page-break/>La lluvia llegaba cuando era necesaria.<text:span text:style-name="T3"> </text:span>El sol calentaba sin quemar.<text:span text:style-name="T3"> </text:span>Las cosechas crecían.<text:span text:style-name="T3"> </text:span>Los animales prosperaban.<text:span text:style-name="T3"> </text:span>Y los años pasaban con una serenidad que hacía difícil imaginar que algo pudiera cambiar.</text:p>
      <text:p text:style-name="Text_20_body">Algunas tardes caminaba hasta el pueblo.</text:p>
      <text:p text:style-name="Text_20_body">No estaba lejos.<text:span text:style-name="T4"> </text:span>Media hora siguiendo el sendero que atravesaba el bosque.</text:p>
      <text:p text:style-name="Text_20_body">Allí compraba herramientas, vendía parte de sus productos o simplemente se reunía con los amigos en la cantina.</text:p>
      <text:p text:style-name="Text_20_body">Aquellos encuentros eran una de las pocas diversiones disponibles en la región.</text:p>
      <text:p text:style-name="Text_20_body">Los jóvenes discutían negocios, hablaban de cosechas, intercambiaban noticias y soñaban con proyectos que casi nunca llegaban a realizar.</text:p>
      <text:p text:style-name="Text_20_body">Y aunque todos se quejaban ocasionalmente de la monotonía de la vida rural, en el fondo ninguno deseaba realmente cambiarla.</text:p>
      <text:p text:style-name="Text_20_body">Eran felices.</text:p>
      <text:p text:style-name="Text_20_body">Tal vez sin saberlo.</text:p>
      <text:p text:style-name="Text_20_body"/>
      <text:p text:style-name="Text_20_body">Aquella tarde parecía una más entre tantas otras.</text:p>
      <text:p text:style-name="Text_20_body">El sol descendía lentamente detrás de las montañas.<text:span text:style-name="T5"> </text:span>Una brisa suave agitaba las hojas de los árboles.</text:p>
      <text:p text:style-name="Text_20_body"><text:soft-page-break/>Y Nohk caminaba hacia el pueblo siguiendo el sendero habitual.</text:p>
      <text:p text:style-name="Text_20_body"/>
      <text:p text:style-name="Text_20_body">Entonces vio algo extraño.</text:p>
      <text:p text:style-name="Text_20_body">Un destello.<text:span text:style-name="T1"> </text:span>Algo brillaba entre la hierba.</text:p>
      <text:p text:style-name="Text_20_body"/>
      <text:p text:style-name="Text_20_body">Nohk abandonó el sendero y se acercó.</text:p>
      <text:p text:style-name="P5">* * *</text:p>
      <text:p text:style-name="Subtitle"><text:span text:style-name="T6">Parte 2 - </text:span>La llave</text:p>
      <text:p text:style-name="Text_20_body"/>
      <text:p text:style-name="P6">¿Había valido la pena?</text:p>
      <text:p text:style-name="Text_20_body">El brillo procedía de la base de un viejo roble.</text:p>
      <text:p text:style-name="Text_20_body">Entre la maleza sobresalía parcialmente un objeto metálico.</text:p>
      <text:p text:style-name="Text_20_body">Nohk apartó algunas ramas<text:span text:style-name="T7"> y </text:span>lo recogió.</text:p>
      <text:p text:style-name="Text_20_body">Era una llave<text:span text:style-name="T7"> </text:span>de hierro.</text:p>
      <text:p text:style-name="Text_20_body">—No es una llave corriente.</text:p>
      <text:p text:style-name="Text_20_body"><text:span text:style-name="T7">Aunque</text:span> no se parecía a ninguna que hubiera visto antes.</text:p>
      <text:p text:style-name="Text_20_body">Era más grande que las <text:span text:style-name="T7">de las </text:span>cerraduras habituales.</text:p>
      <text:p text:style-name="Text_20_body">El metal estaba trabajado con una precisión poco común.</text:p>
      <text:p text:style-name="Text_20_body"><text:soft-page-break/>El mango formaba un diseño elegante compuesto por líneas curvas y figuras geométricas entrelazadas.</text:p>
      <text:p text:style-name="Text_20_body">Y en el centro destacaba una piedra verde del tamaño de una nuez.</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EB Garamond" svg:font-family="'EB Garamond'" style:font-pitch="variable"/>
    <style:font-face style:name="EB Garamond1" svg:font-family="'EB Garamond'" style:font-adornments="Ital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5.65cm" style:type="center"/>
          <style:tab-stop style:position="11.3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5.65cm" style:type="center"/>
          <style:tab-stop style:position="11.3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5.65cm" style:type="center"/>
          <style:tab-stop style:position="11.3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EB Garamond1" fo:font-family="'EB Garamond'" style:font-style-name="Italic" style:font-pitch="variable" fo:font-size="14pt" fo:font-style="italic" style:font-size-asian="18pt" style:font-size-complex="18pt"/>
    </style:style>
    <style:style style:name="Quotations" style:family="paragraph" style:parent-style-name="Standard" style:class="html">
      <style:paragraph-properties fo:margin-left="0.37cm" fo:margin-right="0.37cm" fo:margin-top="0cm" fo:margin-bottom="0.499cm" style:contextual-spacing="false" fo:text-indent="0cm" style:auto-text-indent="false"/>
      <style:text-properties fo:font-size="11pt" fo:font-style="italic"/>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799cm" fo:margin-bottom="1.7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
      </style:header>
      <style:footer>
        <text:p text:style-name="Footer"><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2T10:29:23.673000000</meta:creation-date>
    <dc:date>2026-07-02T15:17:38.192000000</dc:date>
    <meta:editing-duration>PT36M2S</meta:editing-duration>
    <meta:editing-cycles>5</meta:editing-cycles>
    <meta:generator>LibreOffice/7.3.5.2$Windows_X86_64 LibreOffice_project/184fe81b8c8c30d8b5082578aee2fed2ea847c01</meta:generator>
    <meta:document-statistic meta:table-count="0" meta:image-count="0" meta:object-count="0" meta:page-count="11" meta:paragraph-count="56" meta:word-count="538" meta:character-count="3279" meta:non-whitespace-character-count="2797"/>
  </office:meta>
</office:document-meta>
</file>