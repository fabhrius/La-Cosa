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Perfecto. Ahora entramos en la parte que realmente determinará si el sistema será fácil de mantener durante años: el <text:span text:style-name="Strong_20_Emphasis">mapa de estilos</text:span>.</text:p>
      <text:p text:style-name="Text_20_body">La idea es que cada elemento de Markdown tenga un destino claro dentro de LibreOffice. Si hacemos esto bien, podrás escribir cientos de cuentos sin preocuparte por el formato.</text:p>
      <text:h text:style-name="Heading_20_1" text:outline-level="1">Especificación de Estilos Omniscientis v1.0</text:h>
      <text:h text:style-name="Heading_20_2" text:outline-level="2">Filosofía</text:h>
      <text:p text:style-name="Text_20_body">No vamos a crear veinte estilos personalizados.</text:p>
      <text:p text:style-name="Text_20_body">Vamos a reutilizar los estilos estándar que Pandoc ya entiende.</text:p>
      <text:p text:style-name="Text_20_body">Eso simplifica enormemente la automatización.</text:p>
      <text:p text:style-name="Horizontal_20_Line"/>
      <text:h text:style-name="Heading_20_1" text:outline-level="1">Estilos de párrafo</text:h>
      <text:h text:style-name="Heading_20_2" text:outline-level="2">Title</text:h>
      <text:p text:style-name="Text_20_body">Utilizado para:</text:p>
      <text:p text:style-name="P1"><text:span text:style-name="Source_20_Text"># La Llave</text:span></text:p>
      <text:p text:style-name="Text_20_body">Aspecto:</text:p>
      <text:p text:style-name="Preformatted_20_Text"><text:span text:style-name="Source_20_Text">Alineación: Centrada</text:span></text:p>
      <text:p text:style-name="Preformatted_20_Text"><text:span text:style-name="Source_20_Text">Fuente: EB Garamond</text:span></text:p>
      <text:p text:style-name="Preformatted_20_Text"><text:span text:style-name="Source_20_Text">Tamaño: 22 pt</text:span></text:p>
      <text:p text:style-name="Preformatted_20_Text"><text:span text:style-name="Source_20_Text">Negrita</text:span></text:p>
      <text:p text:style-name="Preformatted_20_Text"><text:span text:style-name="Source_20_Text">Espacio superior: 40 pt</text:span></text:p>
      <text:p text:style-name="Preformatted_20_Text"><text:span text:style-name="Source_20_Text">Espacio inferior: 20 pt</text:span></text:p>
      <text:p text:style-name="P1"><text:span text:style-name="Source_20_Text">Salto de página antes: No</text:span></text:p>
      <text:p text:style-name="Horizontal_20_Line"/>
      <text:h text:style-name="Heading_20_2" text:outline-level="2">Subtitle</text:h>
      <text:p text:style-name="Text_20_body">Utilizado para:</text:p>
      <text:p text:style-name="P1"><text:span text:style-name="Source_20_Text">## Un cuento de Omniscientis</text:span></text:p>
      <text:p text:style-name="Text_20_body">solo en portada.</text:p>
      <text:p text:style-name="Text_20_body">Aspecto:</text:p>
      <text:p text:style-name="Preformatted_20_Text"><text:span text:style-name="Source_20_Text">Centrado</text:span></text:p>
      <text:p text:style-name="Preformatted_20_Text"><text:span text:style-name="Source_20_Text">Cursiva</text:span></text:p>
      <text:p text:style-name="P1"><text:soft-page-break/><text:span text:style-name="Source_20_Text">14 pt</text:span></text:p>
      <text:p text:style-name="Horizontal_20_Line"/>
      <text:h text:style-name="Heading_20_2" text:outline-level="2">Heading 1</text:h>
      <text:p text:style-name="Text_20_body">Utilizado para:</text:p>
      <text:p text:style-name="P1"><text:span text:style-name="Source_20_Text"># Capítulo 1</text:span></text:p>
      <text:p text:style-name="Text_20_body">o</text:p>
      <text:p text:style-name="P1"><text:span text:style-name="Source_20_Text"># La búsqueda</text:span></text:p>
      <text:p text:style-name="Text_20_body">si algún día decides dividir cuentos largos.</text:p>
      <text:p text:style-name="Text_20_body">Aspecto:</text:p>
      <text:p text:style-name="Preformatted_20_Text"><text:span text:style-name="Source_20_Text">16 pt</text:span></text:p>
      <text:p text:style-name="Preformatted_20_Text"><text:span text:style-name="Source_20_Text">Negrita</text:span></text:p>
      <text:p text:style-name="Preformatted_20_Text"><text:span text:style-name="Source_20_Text">Espacio superior: 18 pt</text:span></text:p>
      <text:p text:style-name="P1"><text:span text:style-name="Source_20_Text">Espacio inferior: 8 pt</text:span></text:p>
      <text:p text:style-name="Horizontal_20_Line"/>
      <text:h text:style-name="Heading_20_2" text:outline-level="2">Heading 2</text:h>
      <text:p text:style-name="Text_20_body">Utilizado raramente.</text:p>
      <text:p text:style-name="P1"><text:span text:style-name="Source_20_Text">## Subsección</text:span></text:p>
      <text:p text:style-name="Text_20_body">Aspecto:</text:p>
      <text:p text:style-name="Preformatted_20_Text"><text:span text:style-name="Source_20_Text">14 pt</text:span></text:p>
      <text:p text:style-name="P1"><text:span text:style-name="Source_20_Text">Negrita</text:span></text:p>
      <text:p text:style-name="Horizontal_20_Line"/>
      <text:h text:style-name="Heading_20_2" text:outline-level="2">Text Body</text:h>
      <text:p text:style-name="Text_20_body">El estilo más importante.</text:p>
      <text:p text:style-name="Text_20_body">Aspecto:</text:p>
      <text:p text:style-name="Preformatted_20_Text"><text:span text:style-name="Source_20_Text">Fuente: EB Garamond</text:span></text:p>
      <text:p text:style-name="Preformatted_20_Text"><text:span text:style-name="Source_20_Text">12 pt</text:span></text:p>
      <text:p text:style-name="Preformatted_20_Text"/>
      <text:p text:style-name="Preformatted_20_Text"><text:span text:style-name="Source_20_Text">Justificado</text:span></text:p>
      <text:p text:style-name="Preformatted_20_Text"/>
      <text:p text:style-name="Preformatted_20_Text"><text:span text:style-name="Source_20_Text">Sangría primera línea:</text:span></text:p>
      <text:p text:style-name="Preformatted_20_Text"><text:span text:style-name="Source_20_Text">0.5 cm</text:span></text:p>
      <text:p text:style-name="Preformatted_20_Text"/>
      <text:p text:style-name="Preformatted_20_Text"><text:span text:style-name="Source_20_Text">Interlineado:</text:span></text:p>
      <text:p text:style-name="Preformatted_20_Text"><text:span text:style-name="Source_20_Text">115%</text:span></text:p>
      <text:p text:style-name="Preformatted_20_Text"><text:soft-page-break/></text:p>
      <text:p text:style-name="Preformatted_20_Text"><text:span text:style-name="Source_20_Text">Espacio superior:</text:span></text:p>
      <text:p text:style-name="Preformatted_20_Text"><text:span text:style-name="Source_20_Text">0</text:span></text:p>
      <text:p text:style-name="Preformatted_20_Text"/>
      <text:p text:style-name="Preformatted_20_Text"><text:span text:style-name="Source_20_Text">Espacio inferior:</text:span></text:p>
      <text:p text:style-name="P1"><text:span text:style-name="Source_20_Text">0</text:span></text:p>
      <text:p text:style-name="Text_20_body">Esto produce aspecto de novela tradicional.</text:p>
      <text:p text:style-name="Horizontal_20_Line"/>
      <text:h text:style-name="Heading_20_2" text:outline-level="2">Quotation</text:h>
      <text:p text:style-name="Text_20_body">Para:</text:p>
      <text:p text:style-name="P1"><text:span text:style-name="Source_20_Text">&gt; Texto antiguo</text:span></text:p>
      <text:p text:style-name="Text_20_body">o</text:p>
      <text:p text:style-name="P1"><text:span text:style-name="Source_20_Text">&gt; Fragmento del códice</text:span></text:p>
      <text:p text:style-name="Text_20_body">Aspecto:</text:p>
      <text:p text:style-name="Preformatted_20_Text"><text:span text:style-name="Source_20_Text">11 pt</text:span></text:p>
      <text:p text:style-name="Preformatted_20_Text"><text:span text:style-name="Source_20_Text">Cursiva</text:span></text:p>
      <text:p text:style-name="Preformatted_20_Text"/>
      <text:p text:style-name="Preformatted_20_Text"><text:span text:style-name="Source_20_Text">Margen izquierdo:</text:span></text:p>
      <text:p text:style-name="Preformatted_20_Text"><text:span text:style-name="Source_20_Text">1 cm</text:span></text:p>
      <text:p text:style-name="Preformatted_20_Text"/>
      <text:p text:style-name="Preformatted_20_Text"><text:span text:style-name="Source_20_Text">Margen derecho:</text:span></text:p>
      <text:p text:style-name="Preformatted_20_Text"><text:span text:style-name="Source_20_Text">1 cm</text:span></text:p>
      <text:p text:style-name="Preformatted_20_Text"/>
      <text:p text:style-name="P1"><text:span text:style-name="Source_20_Text">Sin sangría inicial</text:span></text:p>
      <text:p text:style-name="Horizontal_20_Line"/>
      <text:h text:style-name="Heading_20_1" text:outline-level="1">Estilos de carácter</text:h>
      <text:p text:style-name="Text_20_body">Estos los gestionará Markdown automáticamente.</text:p>
      <text:h text:style-name="Heading_20_2" text:outline-level="2">Énfasis</text:h>
      <text:p text:style-name="Text_20_body">Markdown:</text:p>
      <text:p text:style-name="P1"><text:span text:style-name="Source_20_Text">*texto*</text:span></text:p>
      <text:p text:style-name="Text_20_body">Resultado:</text:p>
      <text:p text:style-name="P1"><text:span text:style-name="Source_20_Text">Cursiva</text:span></text:p>
      <text:p text:style-name="Text_20_body">Se usará para:</text:p>
      <text:list xml:id="list3106373160" text:style-name="L1">
        <text:list-item>
          <text:p text:style-name="P2">pensamientos</text:p>
        </text:list-item>
        <text:list-item>
          <text:p text:style-name="P2"><text:soft-page-break/>palabras enfatizadas</text:p>
        </text:list-item>
        <text:list-item>
          <text:p text:style-name="P2">términos especiales</text:p>
        </text:list-item>
      </text:list>
      <text:p text:style-name="Horizontal_20_Line"/>
      <text:h text:style-name="Heading_20_2" text:outline-level="2">Strong</text:h>
      <text:p text:style-name="Text_20_body">Markdown:</text:p>
      <text:p text:style-name="P1"><text:span text:style-name="Source_20_Text">**texto**</text:span></text:p>
      <text:p text:style-name="Text_20_body">Resultado:</text:p>
      <text:p text:style-name="P1"><text:span text:style-name="Source_20_Text">Negrita</text:span></text:p>
      <text:p text:style-name="Horizontal_20_Line"/>
      <text:h text:style-name="Heading_20_1" text:outline-level="1">Elementos especiales</text:h>
      <text:p text:style-name="Text_20_body">Aquí aparece el primer detalle importante.</text:p>
      <text:p text:style-name="Horizontal_20_Line"/>
      <text:h text:style-name="Heading_20_2" text:outline-level="2">Separador de escena</text:h>
      <text:p text:style-name="Text_20_body">En el manuscrito:</text:p>
      <text:p text:style-name="P1"><text:span text:style-name="Source_20_Text">***</text:span></text:p>
      <text:p text:style-name="Text_20_body">Queremos que aparezca como:</text:p>
      <text:p text:style-name="P1"><text:span text:style-name="Source_20_Text">✦</text:span></text:p>
      <text:p text:style-name="Text_20_body">centrado.</text:p>
      <text:p text:style-name="Text_20_body">Hay dos formas.</text:p>
      <text:h text:style-name="Heading_20_3" text:outline-level="3">Opción simple</text:h>
      <text:p text:style-name="Text_20_body">Dejar:</text:p>
      <text:p text:style-name="P1"><text:span text:style-name="Source_20_Text">* * *</text:span></text:p>
      <text:p text:style-name="Text_20_body">centrado.</text:p>
      <text:p text:style-name="Text_20_body">Funciona inmediatamente.</text:p>
      <text:p text:style-name="Horizontal_20_Line"/>
      <text:h text:style-name="Heading_20_3" text:outline-level="3">Opción elegante</text:h>
      <text:p text:style-name="Text_20_body">Crear un estilo llamado:</text:p>
      <text:p text:style-name="P1"><text:soft-page-break/><text:span text:style-name="Source_20_Text">SceneBreak</text:span></text:p>
      <text:p text:style-name="Text_20_body">y reemplazar automáticamente:</text:p>
      <text:p text:style-name="P1"><text:span text:style-name="Source_20_Text">***</text:span></text:p>
      <text:p text:style-name="Text_20_body">por:</text:p>
      <text:p text:style-name="P1"><text:span text:style-name="Source_20_Text">✦</text:span></text:p>
      <text:p text:style-name="Text_20_body">durante la conversión.</text:p>
      <text:p text:style-name="Text_20_body">Yo empezaría con la opción simple.</text:p>
      <text:p text:style-name="Horizontal_20_Line"/>
      <text:h text:style-name="Heading_20_1" text:outline-level="1">Portada</text:h>
      <text:p text:style-name="Text_20_body">Aquí hay una decisión importante.</text:p>
      <text:h text:style-name="Heading_20_2" text:outline-level="2">Opción A</text:h>
      <text:p text:style-name="Text_20_body">La portada vive en la plantilla.</text:p>
      <text:p text:style-name="Text_20_body">Ventajas:</text:p>
      <text:list xml:id="list2977312476" text:style-name="L2">
        <text:list-item>
          <text:p text:style-name="P3">Aspecto perfecto.</text:p>
        </text:list-item>
      </text:list>
      <text:p text:style-name="Text_20_body">Problema:</text:p>
      <text:list xml:id="list2202305146" text:style-name="L3">
        <text:list-item>
          <text:p text:style-name="P4">El título cambia en cada cuento.</text:p>
        </text:list-item>
      </text:list>
      <text:p text:style-name="Horizontal_20_Line"/>
      <text:h text:style-name="Heading_20_2" text:outline-level="2">Opción B</text:h>
      <text:p text:style-name="Text_20_body">La portada se genera desde metadatos.</text:p>
      <text:p text:style-name="Text_20_body">Por ejemplo:</text:p>
      <text:p text:style-name="Preformatted_20_Text"><text:span text:style-name="Source_20_Text">---</text:span></text:p>
      <text:p text:style-name="Preformatted_20_Text"><text:span text:style-name="Source_20_Text">title: La Llave</text:span></text:p>
      <text:p text:style-name="Preformatted_20_Text"><text:span text:style-name="Source_20_Text">author: Tony Fabrico</text:span></text:p>
      <text:p text:style-name="P1"><text:span text:style-name="Source_20_Text">---</text:span></text:p>
      <text:p text:style-name="Text_20_body">Pandoc inserta automáticamente el título.</text:p>
      <text:p text:style-name="Text_20_body">Esta es la opción más escalable.</text:p>
      <text:p text:style-name="Horizontal_20_Line"/>
      <text:h text:style-name="Heading_20_1" text:outline-level="1"><text:soft-page-break/>Encabezados y pies</text:h>
      <text:h text:style-name="Heading_20_2" text:outline-level="2">Encabezado izquierdo</text:h>
      <text:p text:style-name="P1"><text:span text:style-name="Source_20_Text">OMNISCIENTIS</text:span></text:p>
      <text:h text:style-name="Heading_20_2" text:outline-level="2">Encabezado derecho</text:h>
      <text:p text:style-name="Text_20_body">Título del cuento</text:p>
      <text:p text:style-name="Text_20_body">Idealmente obtenido desde:</text:p>
      <text:p text:style-name="P1"><text:span text:style-name="Source_20_Text">title:</text:span></text:p>
      <text:p text:style-name="Horizontal_20_Line"/>
      <text:h text:style-name="Heading_20_2" text:outline-level="2">Pie</text:h>
      <text:p text:style-name="P1"><text:span text:style-name="Source_20_Text">Página X</text:span></text:p>
      <text:p text:style-name="Text_20_body">centrado.</text:p>
      <text:p text:style-name="Horizontal_20_Line"/>
      <text:h text:style-name="Heading_20_1" text:outline-level="1">Metadatos definitivos</text:h>
      <text:p text:style-name="Text_20_body">Yo ampliaría el bloque YAML.</text:p>
      <text:p text:style-name="Preformatted_20_Text"><text:span text:style-name="Source_20_Text">---</text:span></text:p>
      <text:p text:style-name="Preformatted_20_Text"><text:span text:style-name="Source_20_Text">title: La Llave</text:span></text:p>
      <text:p text:style-name="Preformatted_20_Text"><text:span text:style-name="Source_20_Text">subtitle: Relato I</text:span></text:p>
      <text:p text:style-name="Preformatted_20_Text"><text:span text:style-name="Source_20_Text">author: Tony Fabrico</text:span></text:p>
      <text:p text:style-name="Preformatted_20_Text"><text:span text:style-name="Source_20_Text">series: Omniscientis</text:span></text:p>
      <text:p text:style-name="Preformatted_20_Text"><text:span text:style-name="Source_20_Text">version: 1.0</text:span></text:p>
      <text:p text:style-name="Preformatted_20_Text"><text:span text:style-name="Source_20_Text">date: 2026</text:span></text:p>
      <text:p text:style-name="P1"><text:span text:style-name="Source_20_Text">---</text:span></text:p>
      <text:p text:style-name="Text_20_body">No porque los necesites ahora.</text:p>
      <text:p text:style-name="Text_20_body">Sino porque en el futuro podrás generar:</text:p>
      <text:list xml:id="list2001141375" text:style-name="L4">
        <text:list-item>
          <text:p text:style-name="P5">catálogos</text:p>
        </text:list-item>
        <text:list-item>
          <text:p text:style-name="P5">recopilaciones</text:p>
        </text:list-item>
        <text:list-item>
          <text:p text:style-name="P5">ebooks</text:p>
        </text:list-item>
        <text:list-item>
          <text:p text:style-name="P5">índices automáticos</text:p>
        </text:list-item>
      </text:list>
      <text:p text:style-name="Text_20_body">sin modificar los cuentos antiguos.</text:p>
      <text:p text:style-name="Horizontal_20_Line"/>
      <text:h text:style-name="Heading_20_1" text:outline-level="1"><text:soft-page-break/>Estructura del repositorio</text:h>
      <text:p text:style-name="Text_20_body">Desde el principio conviene organizarlo así:</text:p>
      <text:p text:style-name="Preformatted_20_Text"><text:span text:style-name="Source_20_Text">Omniscientis/</text:span></text:p>
      <text:p text:style-name="Preformatted_20_Text"/>
      <text:p text:style-name="Preformatted_20_Text"><text:span text:style-name="Source_20_Text">├── plantilla/</text:span></text:p>
      <text:p text:style-name="Preformatted_20_Text"><text:span text:style-name="Source_20_Text">│ <text:s text:c="2"/>└── Omniscientis_Cuento.ott</text:span></text:p>
      <text:p text:style-name="Preformatted_20_Text"><text:span text:style-name="Source_20_Text">│</text:span></text:p>
      <text:p text:style-name="Preformatted_20_Text"><text:span text:style-name="Source_20_Text">├── cuentos/</text:span></text:p>
      <text:p text:style-name="Preformatted_20_Text"><text:span text:style-name="Source_20_Text">│ <text:s text:c="2"/>├── 001_La_Llave.md</text:span></text:p>
      <text:p text:style-name="Preformatted_20_Text"><text:span text:style-name="Source_20_Text">│ <text:s text:c="2"/>├── 002_El_Vigia.md</text:span></text:p>
      <text:p text:style-name="Preformatted_20_Text"><text:span text:style-name="Source_20_Text">│ <text:s text:c="2"/>└── ...</text:span></text:p>
      <text:p text:style-name="Preformatted_20_Text"><text:span text:style-name="Source_20_Text">│</text:span></text:p>
      <text:p text:style-name="Preformatted_20_Text"><text:span text:style-name="Source_20_Text">├── pdf/</text:span></text:p>
      <text:p text:style-name="Preformatted_20_Text"><text:span text:style-name="Source_20_Text">│</text:span></text:p>
      <text:p text:style-name="Preformatted_20_Text"><text:span text:style-name="Source_20_Text">├── odt/</text:span></text:p>
      <text:p text:style-name="Preformatted_20_Text"><text:span text:style-name="Source_20_Text">│</text:span></text:p>
      <text:p text:style-name="P1"><text:span text:style-name="Source_20_Text">└── imagenes/</text:span></text:p>
      <text:p text:style-name="Text_20_body">Cuando tengas 50 cuentos agradecerás haber empezado así.</text:p>
      <text:h text:style-name="Heading_20_1" text:outline-level="1">Lo que falta definir antes de abrir LibreOffice</text:h>
      <text:p text:style-name="Text_20_body">Todavía quedan tres decisiones editoriales importantes:</text:p>
      <text:list xml:id="list2361282950" text:style-name="L5">
        <text:list-item>
          <text:p text:style-name="P6"><text:span text:style-name="Strong_20_Emphasis">Tipografía exacta</text:span> (EB Garamond, Libertinus o otra).</text:p>
        </text:list-item>
        <text:list-item>
          <text:p text:style-name="P6"><text:span text:style-name="Strong_20_Emphasis">Diseño de la portada</text:span> (minimalista, ilustrada o con marco de colección).</text:p>
        </text:list-item>
        <text:list-item>
          <text:p text:style-name="P6"><text:span text:style-name="Strong_20_Emphasis">Páginas fijas finales</text:span> ("Sobre Omniscientis", Ko-Fi, próximos relatos, etc.).</text:p>
        </text:list-item>
      </text:list>
      <text:p text:style-name="Text_20_body">Esas tres decisiones afectan directamente a la plantilla maestra. Una vez fijadas, podremos diseñar la plantilla de forma definitiva y evitar rehacerla más adelante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7-02T10:25:43.767000000</meta:creation-date>
    <dc:date>2026-07-02T10:26:07.980000000</dc:date>
    <meta:editing-duration>PT24S</meta:editing-duration>
    <meta:editing-cycles>1</meta:editing-cycles>
    <meta:document-statistic meta:table-count="0" meta:image-count="0" meta:object-count="0" meta:page-count="7" meta:paragraph-count="178" meta:word-count="544" meta:character-count="3436" meta:non-whitespace-character-count="3074"/>
    <meta:generator>LibreOffice/7.3.5.2$Windows_X86_64 LibreOffice_project/184fe81b8c8c30d8b5082578aee2fed2ea847c01</meta:generator>
  </office:meta>
</office:document-meta>
</file>