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Antes de abrir LibreOffice, conviene definir la <text:span text:style-name="Strong_20_Emphasis">especificación editorial</text:span>. Piensa en ella como el "contrato" que deberán respetar todos los cuentos futuros.</text:p>
      <text:p text:style-name="Text_20_body">Dado lo que conozco de Omniscientis, propondría algo orientado a:</text:p>
      <text:list xml:id="list3307273533" text:style-name="L1">
        <text:list-item>
          <text:p text:style-name="P2">Lectura digital (PDF).</text:p>
        </text:list-item>
        <text:list-item>
          <text:p text:style-name="P2">Público adulto.</text:p>
        </text:list-item>
        <text:list-item>
          <text:p text:style-name="P2">Aspecto sobrio y profesional.</text:p>
        </text:list-item>
        <text:list-item>
          <text:p text:style-name="P2">Producción automatizada.</text:p>
        </text:list-item>
        <text:list-item>
          <text:p text:style-name="P2">Relatos de entre 5.000 y 15.000 palabras.</text:p>
        </text:list-item>
        <text:list-item>
          <text:p text:style-name="P2">Serie potencialmente muy extensa.</text:p>
        </text:list-item>
      </text:list>
      <text:p text:style-name="Horizontal_20_Line"/>
      <text:h text:style-name="Heading_20_1" text:outline-level="1">Especificación Editorial Omniscientis</text:h>
      <text:h text:style-name="Heading_20_2" text:outline-level="2">Versión 1.0</text:h>
      <text:h text:style-name="Heading_20_3" text:outline-level="3">Objetivo</text:h>
      <text:p text:style-name="Text_20_body">Crear una colección de relatos cortos ambientados en el universo de Omniscientis, con una identidad visual consistente y fácilmente automatizable mediante Markdown + Pandoc + LibreOffice.</text:p>
      <text:p text:style-name="Horizontal_20_Line"/>
      <text:h text:style-name="Heading_20_1" text:outline-level="1">1. Formato físico</text:h>
      <text:h text:style-name="Heading_20_2" text:outline-level="2">Tamaño de página</text:h>
      <text:p text:style-name="Text_20_body">A5</text:p>
      <text:p text:style-name="P1"><text:span text:style-name="Source_20_Text">148 mm × 210 mm</text:span></text:p>
      <text:p text:style-name="Text_20_body">¿Por qué A5?</text:p>
      <text:list xml:id="list380862636" text:style-name="L2">
        <text:list-item>
          <text:p text:style-name="P3">Aspecto de libro real.</text:p>
        </text:list-item>
        <text:list-item>
          <text:p text:style-name="P3">Cómodo en PDF.</text:p>
        </text:list-item>
        <text:list-item>
          <text:p text:style-name="P3">Cómodo en móviles.</text:p>
        </text:list-item>
        <text:list-item>
          <text:p text:style-name="P3">Menos páginas que un formato pequeño.</text:p>
        </text:list-item>
      </text:list>
      <text:p text:style-name="Horizontal_20_Line"/>
      <text:h text:style-name="Heading_20_2" text:outline-level="2"><text:soft-page-break/>Márgenes</text:h>
      <text:p text:style-name="Preformatted_20_Text"><text:span text:style-name="Source_20_Text">Superior: 20 mm</text:span></text:p>
      <text:p text:style-name="Preformatted_20_Text"><text:span text:style-name="Source_20_Text">Inferior: 20 mm</text:span></text:p>
      <text:p text:style-name="Preformatted_20_Text"><text:span text:style-name="Source_20_Text">Interior: 20 mm</text:span></text:p>
      <text:p text:style-name="P1"><text:span text:style-name="Source_20_Text">Exterior: 15 mm</text:span></text:p>
      <text:p text:style-name="Text_20_body">Aspecto limpio y profesional.</text:p>
      <text:p text:style-name="Horizontal_20_Line"/>
      <text:h text:style-name="Heading_20_1" text:outline-level="1">2. Tipografías</text:h>
      <text:p text:style-name="Text_20_body">Intentaría usar únicamente fuentes gratuitas.</text:p>
      <text:h text:style-name="Heading_20_2" text:outline-level="2">Títulos</text:h>
      <text:p text:style-name="Text_20_body">EB Garamond</text:p>
      <text:p text:style-name="Text_20_body">o</text:p>
      <text:p text:style-name="Text_20_body">Libertinus Serif</text:p>
      <text:p text:style-name="Horizontal_20_Line"/>
      <text:h text:style-name="Heading_20_2" text:outline-level="2">Texto principal</text:h>
      <text:p text:style-name="Text_20_body">EB Garamond</text:p>
      <text:p text:style-name="Text_20_body">12 pt</text:p>
      <text:p text:style-name="Text_20_body">Justificado.</text:p>
      <text:p text:style-name="Horizontal_20_Line"/>
      <text:h text:style-name="Heading_20_2" text:outline-level="2">Pensamientos</text:h>
      <text:p text:style-name="Text_20_body">Misma fuente.</text:p>
      <text:p text:style-name="Text_20_body">12 pt cursiva.</text:p>
      <text:p text:style-name="Horizontal_20_Line"/>
      <text:h text:style-name="Heading_20_2" text:outline-level="2">Citas</text:h>
      <text:p text:style-name="Text_20_body">Misma fuente.</text:p>
      <text:p text:style-name="Text_20_body">11 pt.</text:p>
      <text:p text:style-name="Text_20_body">Márgenes laterales aumentados.</text:p>
      <text:p text:style-name="Horizontal_20_Line"/>
      <text:h text:style-name="Heading_20_1" text:outline-level="1"><text:soft-page-break/>3. Estructura fija del documento</text:h>
      <text:p text:style-name="Text_20_body">Todos los cuentos tendrán exactamente esta estructura.</text:p>
      <text:h text:style-name="Heading_20_2" text:outline-level="2">Página 1</text:h>
      <text:p text:style-name="Text_20_body">Portada</text:p>
      <text:p text:style-name="Horizontal_20_Line"/>
      <text:h text:style-name="Heading_20_2" text:outline-level="2">Página 2</text:h>
      <text:p text:style-name="Text_20_body">Créditos</text:p>
      <text:p text:style-name="Horizontal_20_Line"/>
      <text:h text:style-name="Heading_20_2" text:outline-level="2">Página 3</text:h>
      <text:p text:style-name="Text_20_body">Presentación de la colección</text:p>
      <text:p text:style-name="Horizontal_20_Line"/>
      <text:h text:style-name="Heading_20_2" text:outline-level="2">Página 4</text:h>
      <text:p text:style-name="Text_20_body">Inicio del cuento</text:p>
      <text:p text:style-name="Horizontal_20_Line"/>
      <text:h text:style-name="Heading_20_2" text:outline-level="2">Última página</text:h>
      <text:p text:style-name="Text_20_body">Fin</text:p>
      <text:p text:style-name="Horizontal_20_Line"/>
      <text:h text:style-name="Heading_20_2" text:outline-level="2">Página final</text:h>
      <text:p text:style-name="Text_20_body">Sobre Omniscientis</text:p>
      <text:p text:style-name="Horizontal_20_Line"/>
      <text:h text:style-name="Heading_20_1" text:outline-level="1">4. Portada</text:h>
      <text:p text:style-name="Text_20_body">Siempre idéntica.</text:p>
      <text:p text:style-name="Text_20_body">Solo cambian:</text:p>
      <text:p text:style-name="Preformatted_20_Text"><text:span text:style-name="Source_20_Text">Título</text:span></text:p>
      <text:p text:style-name="P1"><text:span text:style-name="Source_20_Text">Subtítulo opcional</text:span></text:p>
      <text:p text:style-name="Text_20_body"><text:soft-page-break/>Ejemplo:</text:p>
      <text:p text:style-name="Preformatted_20_Text"><text:span text:style-name="Source_20_Text">OMNISCIENTIS</text:span></text:p>
      <text:p text:style-name="Preformatted_20_Text"/>
      <text:p text:style-name="Preformatted_20_Text"><text:span text:style-name="Source_20_Text">RELATOS</text:span></text:p>
      <text:p text:style-name="Preformatted_20_Text"/>
      <text:p text:style-name="Preformatted_20_Text"><text:span text:style-name="Source_20_Text">La Llave</text:span></text:p>
      <text:p text:style-name="Preformatted_20_Text"/>
      <text:p text:style-name="P1"><text:span text:style-name="Source_20_Text">Tony Fabrico</text:span></text:p>
      <text:p text:style-name="Horizontal_20_Line"/>
      <text:h text:style-name="Heading_20_1" text:outline-level="1">5. Créditos</text:h>
      <text:p text:style-name="Text_20_body">Texto fijo.</text:p>
      <text:p text:style-name="Text_20_body">Ejemplo:</text:p>
      <text:p text:style-name="Preformatted_20_Text"><text:span text:style-name="Source_20_Text">© Tony Fabrico</text:span></text:p>
      <text:p text:style-name="Preformatted_20_Text"/>
      <text:p text:style-name="Preformatted_20_Text"><text:span text:style-name="Source_20_Text">Relato perteneciente al universo Omniscientis.</text:span></text:p>
      <text:p text:style-name="Preformatted_20_Text"/>
      <text:p text:style-name="P1"><text:span text:style-name="Source_20_Text">Todos los derechos reservados.</text:span></text:p>
      <text:p text:style-name="Horizontal_20_Line"/>
      <text:h text:style-name="Heading_20_1" text:outline-level="1">6. Presentación de la colección</text:h>
      <text:p text:style-name="Text_20_body">Texto fijo para todos los relatos.</text:p>
      <text:p text:style-name="Text_20_body">Algo parecido a:</text:p>
      <text:p text:style-name="Quotations">Los relatos de Omniscientis exploran misterios, paradojas e interrogantes sobre la inteligencia, la existencia y la realidad. Cada historia puede leerse de forma independiente.</text:p>
      <text:p text:style-name="Horizontal_20_Line"/>
      <text:h text:style-name="Heading_20_1" text:outline-level="1">7. Estilos</text:h>
      <text:h text:style-name="Heading_20_2" text:outline-level="2">Title</text:h>
      <text:p text:style-name="Text_20_body">Uso:</text:p>
      <text:p text:style-name="P1"><text:span text:style-name="Source_20_Text"># La Llave</text:span></text:p>
      <text:p text:style-name="Text_20_body">Aspecto:</text:p>
      <text:p text:style-name="Preformatted_20_Text"><text:span text:style-name="Source_20_Text">Centrado</text:span></text:p>
      <text:p text:style-name="Preformatted_20_Text"><text:span text:style-name="Source_20_Text">22 pt</text:span></text:p>
      <text:p text:style-name="P1"><text:span text:style-name="Source_20_Text">Negrita</text:span></text:p>
      <text:p text:style-name="Horizontal_20_Line"><text:soft-page-break/></text:p>
      <text:h text:style-name="Heading_20_2" text:outline-level="2">Heading 1</text:h>
      <text:p text:style-name="Text_20_body">Uso:</text:p>
      <text:p text:style-name="P1"><text:span text:style-name="Source_20_Text">## Capítulo</text:span></text:p>
      <text:p text:style-name="Text_20_body">Aspecto:</text:p>
      <text:p text:style-name="Preformatted_20_Text"><text:span text:style-name="Source_20_Text">16 pt</text:span></text:p>
      <text:p text:style-name="P1"><text:span text:style-name="Source_20_Text">Negrita</text:span></text:p>
      <text:p text:style-name="Horizontal_20_Line"/>
      <text:h text:style-name="Heading_20_2" text:outline-level="2">Text Body</text:h>
      <text:p text:style-name="Text_20_body">Narración estándar.</text:p>
      <text:p text:style-name="Preformatted_20_Text"><text:span text:style-name="Source_20_Text">12 pt</text:span></text:p>
      <text:p text:style-name="Preformatted_20_Text"><text:span text:style-name="Source_20_Text">Justificado</text:span></text:p>
      <text:p text:style-name="P1"><text:span text:style-name="Source_20_Text">Sangría primera línea</text:span></text:p>
      <text:p text:style-name="Horizontal_20_Line"/>
      <text:h text:style-name="Heading_20_2" text:outline-level="2">Quotation</text:h>
      <text:p text:style-name="Text_20_body">Uso:</text:p>
      <text:p text:style-name="P1"><text:span text:style-name="Source_20_Text">&gt; Texto citado</text:span></text:p>
      <text:p text:style-name="Text_20_body">Aspecto:</text:p>
      <text:p text:style-name="Preformatted_20_Text"><text:span text:style-name="Source_20_Text">Cursiva</text:span></text:p>
      <text:p text:style-name="P1"><text:span text:style-name="Source_20_Text">Márgenes laterales</text:span></text:p>
      <text:p text:style-name="Horizontal_20_Line"/>
      <text:h text:style-name="Heading_20_2" text:outline-level="2">Emphasis</text:h>
      <text:p text:style-name="Text_20_body">Uso:</text:p>
      <text:p text:style-name="P1"><text:span text:style-name="Source_20_Text">*Pensamiento*</text:span></text:p>
      <text:p text:style-name="Text_20_body">Aspecto:</text:p>
      <text:p text:style-name="P1"><text:span text:style-name="Source_20_Text">Cursiva</text:span></text:p>
      <text:p text:style-name="Horizontal_20_Line"/>
      <text:h text:style-name="Heading_20_1" text:outline-level="1"><text:soft-page-break/>8. Separadores de escena</text:h>
      <text:p text:style-name="Text_20_body">Markdown:</text:p>
      <text:p text:style-name="P1"><text:span text:style-name="Source_20_Text">***</text:span></text:p>
      <text:p text:style-name="Text_20_body">Convertido visualmente a:</text:p>
      <text:p text:style-name="P1"><text:span text:style-name="Source_20_Text">✦</text:span></text:p>
      <text:p text:style-name="Text_20_body">centrado.</text:p>
      <text:p text:style-name="Text_20_body">Esto puede automatizarse después.</text:p>
      <text:p text:style-name="Horizontal_20_Line"/>
      <text:h text:style-name="Heading_20_1" text:outline-level="1">9. Encabezados</text:h>
      <text:p text:style-name="Text_20_body">Páginas pares:</text:p>
      <text:p text:style-name="P1"><text:span text:style-name="Source_20_Text">OMNISCIENTIS</text:span></text:p>
      <text:p text:style-name="Text_20_body">Páginas impares:</text:p>
      <text:p text:style-name="P1"><text:span text:style-name="Source_20_Text">Título del cuento</text:span></text:p>
      <text:p text:style-name="Horizontal_20_Line"/>
      <text:h text:style-name="Heading_20_1" text:outline-level="1">10. Pie de página</text:h>
      <text:p text:style-name="Text_20_body">Solo número de página.</text:p>
      <text:p text:style-name="Text_20_body">Centrado.</text:p>
      <text:p text:style-name="Horizontal_20_Line"/>
      <text:h text:style-name="Heading_20_1" text:outline-level="1">11. Convenciones narrativas</text:h>
      <text:h text:style-name="Heading_20_2" text:outline-level="2">Pensamientos</text:h>
      <text:p text:style-name="Text_20_body">Siempre:</text:p>
      <text:p text:style-name="P1"><text:span text:style-name="Source_20_Text">*Pensamiento*</text:span></text:p>
      <text:p text:style-name="Text_20_body">Nunca:</text:p>
      <text:p text:style-name="P1"><text:span text:style-name="Source_20_Text">—Pensamiento—</text:span></text:p>
      <text:p text:style-name="Text_20_body">ni comillas.</text:p>
      <text:p text:style-name="Horizontal_20_Line"><text:soft-page-break/></text:p>
      <text:h text:style-name="Heading_20_2" text:outline-level="2">Diálogos</text:h>
      <text:p text:style-name="Text_20_body">Siempre:</text:p>
      <text:p text:style-name="P1"><text:span text:style-name="Source_20_Text">—Texto del diálogo.</text:span></text:p>
      <text:p text:style-name="Text_20_body">Formato tradicional en español.</text:p>
      <text:p text:style-name="Horizontal_20_Line"/>
      <text:h text:style-name="Heading_20_2" text:outline-level="2">Cambios de escena</text:h>
      <text:p text:style-name="Text_20_body">Siempre:</text:p>
      <text:p text:style-name="P1"><text:span text:style-name="Source_20_Text">***</text:span></text:p>
      <text:p text:style-name="Text_20_body">Nunca líneas vacías múltiples.</text:p>
      <text:p text:style-name="Horizontal_20_Line"/>
      <text:h text:style-name="Heading_20_1" text:outline-level="1">12. Metadatos Markdown</text:h>
      <text:p text:style-name="Text_20_body">Todos los cuentos comenzarán con:</text:p>
      <text:p text:style-name="Preformatted_20_Text"><text:span text:style-name="Source_20_Text">---</text:span></text:p>
      <text:p text:style-name="Preformatted_20_Text"><text:span text:style-name="Source_20_Text">title: La Llave</text:span></text:p>
      <text:p text:style-name="Preformatted_20_Text"><text:span text:style-name="Source_20_Text">author: Tony Fabrico</text:span></text:p>
      <text:p text:style-name="Preformatted_20_Text"><text:span text:style-name="Source_20_Text">series: Omniscientis</text:span></text:p>
      <text:p text:style-name="Preformatted_20_Text"><text:span text:style-name="Source_20_Text">version: 1.0</text:span></text:p>
      <text:p text:style-name="P1"><text:span text:style-name="Source_20_Text">---</text:span></text:p>
      <text:p text:style-name="Text_20_body">Esto permitirá automatizar futuras funciones:</text:p>
      <text:list xml:id="list2424146624" text:style-name="L3">
        <text:list-item>
          <text:p text:style-name="P4">generación de portadas</text:p>
        </text:list-item>
        <text:list-item>
          <text:p text:style-name="P4">catálogos</text:p>
        </text:list-item>
        <text:list-item>
          <text:p text:style-name="P4">índices</text:p>
        </text:list-item>
        <text:list-item>
          <text:p text:style-name="P4">recopilaciones</text:p>
        </text:list-item>
        <text:list-item>
          <text:p text:style-name="P4">ebooks</text:p>
        </text:list-item>
      </text:list>
      <text:p text:style-name="Horizontal_20_Line"/>
      <text:h text:style-name="Heading_20_1" text:outline-level="1">13. Principio fundamental</text:h>
      <text:p text:style-name="Text_20_body">El manuscrito Markdown debe contener <text:span text:style-name="Strong_20_Emphasis">solo contenido narrativo y metadatos</text:span>.</text:p>
      <text:p text:style-name="Text_20_body">No debe contener:</text:p>
      <text:list xml:id="list2980843929" text:style-name="L4">
        <text:list-item>
          <text:p text:style-name="P5"><text:soft-page-break/>tamaños de fuente</text:p>
        </text:list-item>
        <text:list-item>
          <text:p text:style-name="P5">márgenes</text:p>
        </text:list-item>
        <text:list-item>
          <text:p text:style-name="P5">saltos de página manuales</text:p>
        </text:list-item>
        <text:list-item>
          <text:p text:style-name="P5">numeración</text:p>
        </text:list-item>
        <text:list-item>
          <text:p text:style-name="P5">elementos visuales</text:p>
        </text:list-item>
      </text:list>
      <text:p text:style-name="Text_20_body">Todo eso pertenece a la plantilla LibreOffice.</text:p>
      <text:p text:style-name="Horizontal_20_Line"/>
      <text:p text:style-name="Text_20_body">Con esta especificación ya tendríamos una base sólida para construir la plantilla maestra <text:span text:style-name="Source_20_Text">Omniscientis_Cuento.ott</text:span> y, más adelante, el flujo de conversión automática con Pandoc. El siguiente paso sería definir exactamente qué estilos de LibreOffice vamos a modificar y cómo se mapearán desde Markdown para que la automatización sea totalmente predecibl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2T10:12:46.792000000</meta:creation-date>
    <dc:date>2026-07-02T10:13:59.585000000</dc:date>
    <meta:editing-duration>PT1M13S</meta:editing-duration>
    <meta:editing-cycles>1</meta:editing-cycles>
    <meta:document-statistic meta:table-count="0" meta:image-count="0" meta:object-count="0" meta:page-count="8" meta:paragraph-count="162" meta:word-count="519" meta:character-count="3379" meta:non-whitespace-character-count="3042"/>
    <meta:generator>LibreOffice/7.3.5.2$Windows_X86_64 LibreOffice_project/184fe81b8c8c30d8b5082578aee2fed2ea847c01</meta:generator>
  </office:meta>
</office:document-meta>
</file>