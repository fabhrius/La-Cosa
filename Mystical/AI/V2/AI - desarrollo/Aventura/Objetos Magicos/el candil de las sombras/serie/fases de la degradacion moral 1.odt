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magina la progresión.</text:p>
      <text:h text:style-name="Heading_20_3" text:outline-level="3">Fase 1: El regalo</text:h>
      <text:p text:style-name="Text_20_body">El protagonista encuentra la lámpara.</text:p>
      <text:p text:style-name="Text_20_body">Desea algo pequeño.</text:p>
      <text:p text:style-name="Text_20_body">Quizá dinero para pagar una deuda.</text:p>
      <text:p text:style-name="Text_20_body">Quizá recuperar una herramienta perdida.</text:p>
      <text:p text:style-name="Text_20_body">Quizá una oportunidad que creía imposible.</text:p>
      <text:p text:style-name="Text_20_body">Y ocurre.</text:p>
      <text:p text:style-name="Text_20_body">Al día siguiente alguien ha desaparecido.</text:p>
      <text:p text:style-name="Text_20_body">Pero nadie relaciona ambos hechos.</text:p>
      <text:p text:style-name="Text_20_body">Ni siquiera el lector.</text:p>
      <text:p text:style-name="Horizontal_20_Line"/>
      <text:h text:style-name="Heading_20_3" text:outline-level="3">Fase 2: La sospecha</text:h>
      <text:p text:style-name="Text_20_body">Vuelve a ocurrir.</text:p>
      <text:p text:style-name="Text_20_body">Ahora el protagonista empieza a sospechar.</text:p>
      <text:p text:style-name="Text_20_body">Observa una correlación.</text:p>
      <text:p text:style-name="Text_20_body">Pero todavía conserva sus principios.</text:p>
      <text:p text:style-name="Text_20_body">Se siente culpable.</text:p>
      <text:p text:style-name="Text_20_body">Se promete no volver a usar la lámpara.</text:p>
      <text:p text:style-name="Horizontal_20_Line"/>
      <text:h text:style-name="Heading_20_3" text:outline-level="3">Fase 3: La justificación</text:h>
      <text:p text:style-name="Text_20_body">Aquí empieza la transformación.</text:p>
      <text:p text:style-name="Text_20_body">Necesita algo importante.</text:p>
      <text:p text:style-name="Text_20_body">La tentación es demasiado fuerte.</text:p>
      <text:p text:style-name="Text_20_body">Se convence de que será la última vez.</text:p>
      <text:p text:style-name="Text_20_body">Después de todo:</text:p>
      <text:p text:style-name="Quotations">"No sé si realmente están relacionadas las desapariciones."</text:p>
      <text:p text:style-name="Text_20_body">Y aunque lo estén...</text:p>
      <text:p text:style-name="Quotations">"Yo no maté a nadie."</text:p>
      <text:p text:style-name="Text_20_body"><text:soft-page-break/>Todavía se considera una buena persona.</text:p>
      <text:p text:style-name="Horizontal_20_Line"/>
      <text:h text:style-name="Heading_20_3" text:outline-level="3">Fase 4: La racionalización</text:h>
      <text:p text:style-name="Text_20_body">Ahora ya sabe.</text:p>
      <text:p text:style-name="Text_20_body">No tiene dudas.</text:p>
      <text:p text:style-name="Text_20_body">Comprende el precio.</text:p>
      <text:p text:style-name="Text_20_body">Pero empieza a pensar de otra manera.</text:p>
      <text:p text:style-name="Quotations">"La persona que desapareció ni siquiera era de aquí."</text:p>
      <text:p text:style-name="Quotations">"Era un anciano."</text:p>
      <text:p text:style-name="Quotations">"Era un criminal."</text:p>
      <text:p text:style-name="Quotations">"No tenía familia."</text:p>
      <text:p text:style-name="Text_20_body">La lámpara ya no necesita engañarlo.</text:p>
      <text:p text:style-name="Text_20_body">Ahora él se engaña solo.</text:p>
      <text:p text:style-name="Horizontal_20_Line"/>
      <text:h text:style-name="Heading_20_3" text:outline-level="3">Fase 5: La inversión moral</text:h>
      <text:p text:style-name="Text_20_body">Este es el momento clave.</text:p>
      <text:p text:style-name="Text_20_body">Ya no piensa:</text:p>
      <text:p text:style-name="Quotations">"Estoy pagando un precio terrible por mis deseos."</text:p>
      <text:p text:style-name="Text_20_body">Ahora piensa:</text:p>
      <text:p text:style-name="Quotations">"Estoy obteniendo grandes beneficios."</text:p>
      <text:p text:style-name="Text_20_body">La desaparición deja de ser el coste.</text:p>
      <text:p text:style-name="Text_20_body">Se convierte en un detalle secundario.</text:p>
      <text:p text:style-name="Horizontal_20_Line"/>
      <text:h text:style-name="Heading_20_3" text:outline-level="3">Fase 6: La corrupción completa</text:h>
      <text:p text:style-name="Text_20_body">Y aquí aparece la idea que me parece más inquietante.</text:p>
      <text:p text:style-name="Text_20_body">Llega un momento en que el protagonista ya no desea cosas porque las necesite.</text:p>
      <text:p text:style-name="Text_20_body">Desea cosas porque quiere ver qué ocurrirá.</text:p>
      <text:p text:style-name="Text_20_body">Porque puede.</text:p>
      <text:p text:style-name="Text_20_body"><text:soft-page-break/>Porque se ha acostumbrado.</text:p>
      <text:p text:style-name="Text_20_body">Porque el acto de desear se ha convertido en parte de él.</text:p>
      <text:p text:style-name="Text_20_body">La lámpara ya ha ganado.</text:p>
      <text:p text:style-name="Horizontal_20_Line"/>
      <text:p text:style-name="Text_20_body">Lo más interesante es que la transformación debería ser tan gradual que el lector la acepte junto con el personaje.</text:p>
      <text:p text:style-name="Text_20_body">Al principio el lector piensa:</text:p>
      <text:p text:style-name="Quotations">"Yo también habría usado la lámpara."</text:p>
      <text:p text:style-name="Text_20_body">Más adelante:</text:p>
      <text:p text:style-name="Quotations">"Bueno... quizá una vez más."</text:p>
      <text:p text:style-name="Text_20_body">Luego:</text:p>
      <text:p text:style-name="Quotations">"Está haciendo algo horrible."</text:p>
      <text:p text:style-name="Text_20_body">Y finalmente:</text:p>
      <text:p text:style-name="Quotations">"¿Cuándo ocurrió?"</text:p>
      <text:p text:style-name="Horizontal_20_Line"/>
      <text:p text:style-name="Text_20_body">Porque ahí aparece la enseñanza.</text:p>
      <text:p text:style-name="Text_20_body">No es:</text:p>
      <text:p text:style-name="Quotations">El poder corrompe.</text:p>
      <text:p text:style-name="Text_20_body">Eso es demasiado simple.</text:p>
      <text:p text:style-name="Text_20_body">La enseñanza es más cercana a:</text:p>
      <text:p text:style-name="Quotations">Ningún sistema conserva su identidad de forma perfecta.</text:p>
      <text:p text:style-name="Quotations">Cada decisión modifica el sistema que la toma.</text:p>
      <text:p text:style-name="Quotations">Y cuando una decisión se repite suficientes veces, termina transformando a quien la tomó.</text:p>
      <text:p text:style-name="Text_20_body">O incluso:</text:p>
      <text:p text:style-name="Quotations">Creemos que utilizamos nuestras decisiones para cambiar el mundo.</text:p>
      <text:p text:style-name="Quotations">Pero cada decisión también nos cambia a nosotros.</text:p>
      <text:p text:style-name="Horizontal_20_Line"/>
      <text:p text:style-name="Text_20_body">Y entonces la lámpara adquiere un significado simbólico mucho más fuerte.</text:p>
      <text:p text:style-name="Text_20_body"><text:soft-page-break/>Parece conceder deseos.</text:p>
      <text:p text:style-name="Text_20_body">Pero en realidad intercambia algo.</text:p>
      <text:p text:style-name="Text_20_body">No cambia el mundo a cambio de vidas.</text:p>
      <text:p text:style-name="Text_20_body">Cambia al propietario a cambio de deseos.</text:p>
      <text:p text:style-name="Text_20_body">Las desapariciones son solo el efecto visible.</text:p>
      <text:p text:style-name="Text_20_body">La verdadera operación ocurre dentro de él.</text:p>
      <text:p text:style-name="Text_20_body">Por eso me gusta mucho la idea de que, cuando finalmente el héroe rompe la lámpara, el propietario sea absorbido junto con ella.</text:p>
      <text:p text:style-name="Text_20_body">No porque la lámpara se vengue.</text:p>
      <text:p text:style-name="Text_20_body">Sino porque ya no queda una separación clara entre ambos.</text:p>
      <text:p text:style-name="Text_20_body">Después de años utilizándola, la pregunta es:</text:p>
      <text:p text:style-name="Quotations">¿Quién estaba usando a quién?</text:p>
      <text:p text:style-name="Text_20_body">Y la respuesta final podría ser:</text:p>
      <text:p text:style-name="Quotations">La lámpara nunca necesitó matar a su propietario.</text:p>
      <text:p text:style-name="Quotations">Lo había ido sustituyendo poco a poco desde el primer deseo.</text:p>
      <text:p text:style-name="Text_20_body">Eso conecta de forma muy elegante con la idea de identidad como proceso. El hombre desaparece físicamente al final, pero, desde un punto de vista filosófico, llevaba mucho tiempo desaparecido. El pueblo simplemente tardó años en darse cuen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10T09:31:47.175000000</meta:creation-date>
    <dc:date>2026-07-10T10:14:48.357000000</dc:date>
    <meta:editing-duration>PT32M51S</meta:editing-duration>
    <meta:editing-cycles>1</meta:editing-cycles>
    <meta:document-statistic meta:table-count="0" meta:image-count="0" meta:object-count="0" meta:page-count="4" meta:paragraph-count="91" meta:word-count="557" meta:character-count="3348" meta:non-whitespace-character-count="2882"/>
    <meta:generator>LibreOffice/7.3.5.2$Windows_X86_64 LibreOffice_project/184fe81b8c8c30d8b5082578aee2fed2ea847c01</meta:generator>
  </office:meta>
</office:document-meta>
</file>