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arte 2 - Al caer la noche</text:h>
      <text:p text:style-name="Text_20_body">La oscuridad llegó rápidamente a las montañas.</text:p>
      <text:p text:style-name="Text_20_body">Las últimas franjas de luz desaparecieron detrás de los picos y la casa quedó sumida en penumbras.</text:p>
      <text:p text:style-name="Text_20_body">Después de esperar durante horas, las hermanas terminaron aceptando que Tagha no regresaría aquella noche.</text:p>
      <text:p text:style-name="Text_20_body">Prepararon un rincón donde dormir.</text:p>
      <text:p text:style-name="Text_20_body">No era mucho.</text:p>
      <text:p text:style-name="Text_20_body">Unas mantas viejas.</text:p>
      <text:p text:style-name="Text_20_body">Una mesa.</text:p>
      <text:p text:style-name="Text_20_body">Un techo sobre sus cabezas.</text:p>
      <text:p text:style-name="Text_20_body">Pero después de tantos días de viaje resultaba suficiente.</text:p>
      <text:p text:style-name="Text_20_body">Mientras acomodaban sus cosas, Kahsia se quedó observando el pequeño saco que había traído desde Ramasville.</text:p>
      <text:p text:style-name="Text_20_body">Lo abrió una vez más.</text:p>
      <text:p text:style-name="Text_20_body">Como si esperara encontrar algo que ya sabía que no estaba allí.</text:p>
      <text:p text:style-name="Text_20_body">—¿Qué ocurre? —preguntó Rylhet.</text:p>
      <text:p text:style-name="Text_20_body">Kahsia bajó la mirada.</text:p>
      <text:p text:style-name="Text_20_body">—He perdido a Miri.</text:p>
      <text:p text:style-name="Text_20_body">Miri era una vieja muñeca de trapo.</text:p>
      <text:p text:style-name="Text_20_body">Estaba desgastada.</text:p>
      <text:p text:style-name="Text_20_body">Tenía un brazo cosido varias veces y un ojo de distinto color que el otro.</text:p>
      <text:p text:style-name="Text_20_body">Pero Kahsia había dormido con ella desde que tenía memoria.</text:p>
      <text:p text:style-name="Text_20_body">La había acompañado durante enfermedades, tormentas y noches difíciles.</text:p>
      <text:p text:style-name="Text_20_body">Y ahora había quedado atrás.</text:p>
      <text:p text:style-name="Text_20_body">Perdida en algún lugar del camino.</text:p>
      <text:p text:style-name="Text_20_body">—Lo sé —dijo Rylhet.</text:p>
      <text:p text:style-name="Text_20_body">Kahsia intentó contener las lágrimas.</text:p>
      <text:p text:style-name="Text_20_body">—La echo de menos.</text:p>
      <text:p text:style-name="Text_20_body">Rylhet apoyó una mano sobre su hombro.</text:p>
      <text:p text:style-name="Text_20_body">—Cuando las cosas mejoren te conseguiré otra.</text:p>
      <text:p text:style-name="Text_20_body"><text:soft-page-break/>Kahsia asintió.</text:p>
      <text:p text:style-name="Text_20_body">Pero ambas sabían que no era lo mismo.</text:p>
      <text:p text:style-name="Text_20_body">Ninguna muñeca nueva sería aquella muñeca.</text:p>
      <text:p text:style-name="Text_20_body">Durante unos instantes permanecieron en silencio.</text:p>
      <text:p text:style-name="Text_20_body">Entonces el estómago de Rylhet protestó con un largo gruñido.</text:p>
      <text:p text:style-name="Text_20_body">Las dos se miraron.</text:p>
      <text:p text:style-name="Text_20_body">Y por primera vez desde la muerte de su padre estuvieron a punto de reír.</text:p>
      <text:p text:style-name="Text_20_body">—Tengo hambre —admitió Rylhet.</text:p>
      <text:p text:style-name="Text_20_body">—Yo también.</text:p>
      <text:p text:style-name="Text_20_body">—Mañana encontraré algo para comer.</text:p>
      <text:p text:style-name="Text_20_body">—¿Cómo?</text:p>
      <text:p text:style-name="Text_20_body">Rylhet intentó sonreír.</text:p>
      <text:p text:style-name="Text_20_body">—Todavía no lo sé.</text:p>
      <text:p text:style-name="Text_20_body">Pero lo haré.</text:p>
      <text:p text:style-name="Text_20_body">La noche terminó de envolver la casa.</text:p>
      <text:p text:style-name="Text_20_body">Las sombras ocuparon cada rincón.</text:p>
      <text:p text:style-name="Text_20_body">Fue entonces cuando Rylhet vio la lámpara.</text:p>
      <text:p text:style-name="Text_20_body">Reposaba sobre el suelo, cerca del centro de la sala.</text:p>
      <text:p text:style-name="Text_20_body">No recordaba haberle prestado atención antes.</text:p>
      <text:p text:style-name="Text_20_body">Parecía una vieja lámpara de aceite olvidada por su dueña.</text:p>
      <text:p text:style-name="Text_20_body">La tomó entre sus manos.</text:p>
      <text:p text:style-name="Text_20_body">Todavía contenía combustible.</text:p>
      <text:p text:style-name="Text_20_body">—Al menos no tendremos que dormir a oscuras.</text:p>
      <text:p text:style-name="Text_20_body">Buscó una yesca.</text:p>
      <text:p text:style-name="Text_20_body">Y la encendió.</text:p>
      <text:p text:style-name="Text_20_body">La llama cobró vida lentamente.</text:p>
      <text:p text:style-name="Text_20_body">Una luz cálida comenzó a extenderse por la habitación.</text:p>
      <text:p text:style-name="Text_20_body">Las paredes se iluminaron.</text:p>
      <text:p text:style-name="Text_20_body">Las sombras retrocedieron.</text:p>
      <text:p text:style-name="Text_20_body">Y durante un breve instante ambas hermanas sintieron alivio.</text:p>
      <text:p text:style-name="Text_20_body"><text:soft-page-break/>La casa parecía menos extraña.</text:p>
      <text:p text:style-name="Text_20_body">Menos vacía.</text:p>
      <text:p text:style-name="Text_20_body">Menos solitaria.</text:p>
      <text:p text:style-name="Text_20_body">La luz anaranjada temblaba suavemente.</text:p>
      <text:p text:style-name="Text_20_body">Las sombras danzaban sobre las paredes.</text:p>
      <text:p text:style-name="Text_20_body">Entonces Kahsia se quedó inmóvil.</text:p>
      <text:p text:style-name="Text_20_body">—Rylhet...</text:p>
      <text:p text:style-name="Text_20_body">—¿Qué ocurre?</text:p>
      <text:p text:style-name="Text_20_body">—Tu sombra.</text:p>
      <text:p text:style-name="Text_20_body">Rylhet levantó la vista.</text:p>
      <text:p text:style-name="Text_20_body">—¿Qué pasa con ella?</text:p>
      <text:p text:style-name="Text_20_body">Kahsia señaló la pared.</text:p>
      <text:p text:style-name="Text_20_body">—Creo que se ha movido.</text:p>
      <text:p text:style-name="Text_20_body">Rylhet observó la sombra proyectada detrás de ella.</text:p>
      <text:p text:style-name="Text_20_body">No vio nada extraño.</text:p>
      <text:p text:style-name="Text_20_body">—Estás cansada.</text:p>
      <text:p text:style-name="Text_20_body">—La vi moverse.</text:p>
      <text:p text:style-name="Text_20_body">—Claro que se mueve. La llama no deja de temblar.</text:p>
      <text:p text:style-name="Text_20_body">Kahsia no respondió.</text:p>
      <text:p text:style-name="Text_20_body">Intentó convencerse de que su hermana tenía razón.</text:p>
      <text:p text:style-name="Text_20_body">Aquella casa era desconocida.</text:p>
      <text:p text:style-name="Text_20_body">Estaba oscura.</text:p>
      <text:p text:style-name="Text_20_body">Y ella estaba asustada.</text:p>
      <text:p text:style-name="Text_20_body">Pero unos segundos después volvió a suceder.</text:p>
      <text:p text:style-name="Text_20_body">Esta vez la sombra no osciló con la luz.</text:p>
      <text:p text:style-name="Text_20_body">Dio un paso.</text:p>
      <text:p text:style-name="Text_20_body">Un único paso.</text:p>
      <text:p text:style-name="Text_20_body">Por sí sola.</text:p>
      <text:p text:style-name="Text_20_body">Kahsia contuvo la respiración.</text:p>
      <text:p text:style-name="Text_20_body">—Rylhet...</text:p>
      <text:p text:style-name="Text_20_body"><text:soft-page-break/>Ahora su hermana también lo había visto.</text:p>
      <text:p text:style-name="Text_20_body">Las dos permanecieron inmóviles.</text:p>
      <text:p text:style-name="Text_20_body">La habitación quedó en silencio.</text:p>
      <text:p text:style-name="Text_20_body">Ni una palabra.</text:p>
      <text:p text:style-name="Text_20_body">Ni un movimiento.</text:p>
      <text:p text:style-name="Text_20_body">Entonces otra sombra se desprendió lentamente de la pared.</text:p>
      <text:p text:style-name="Text_20_body">Era la de Kahsia.</text:p>
      <text:p text:style-name="Text_20_body">Durante un instante las figuras oscuras permanecieron quietas.</text:p>
      <text:p text:style-name="Text_20_body">Observándolas.</text:p>
      <text:p text:style-name="Text_20_body">Como animales estudiando una presa.</text:p>
      <text:p text:style-name="Text_20_body">Después comenzaron a moverse.</text:p>
      <text:p text:style-name="Text_20_body">Sin prisa.</text:p>
      <text:p text:style-name="Text_20_body">Sin hacer ruido.</text:p>
      <text:p text:style-name="Text_20_body">Deslizándose por el suelo.</text:p>
      <text:p text:style-name="Text_20_body">Rodeándolas.</text:p>
      <text:p text:style-name="Text_20_body">Acechándolas.</text:p>
      <text:p text:style-name="Text_20_body">Las hermanas retrocedieron hasta quedar juntas.</text:p>
      <text:p text:style-name="Text_20_body">Las sombras continuaron girando a su alrededor.</text:p>
      <text:p text:style-name="Text_20_body">Una vez.</text:p>
      <text:p text:style-name="Text_20_body">Dos veces.</text:p>
      <text:p text:style-name="Text_20_body">Como si estuvieran examinándolas.</text:p>
      <text:p text:style-name="Text_20_body">Como si buscaran algo.</text:p>
      <text:p text:style-name="Text_20_body">O intentaran comprender algo.</text:p>
      <text:p text:style-name="Text_20_body">Y entonces ocurrió lo peor.</text:p>
      <text:p text:style-name="Text_20_body">Las sombras se dirigieron hacia la puerta.</text:p>
      <text:p text:style-name="Text_20_body">La puerta se abrió sola.</text:p>
      <text:p text:style-name="Text_20_body">Lentamente.</text:p>
      <text:p text:style-name="Text_20_body">Con un largo crujido.</text:p>
      <text:p text:style-name="Text_20_body">El viento frío de la montaña irrumpió en la casa.</text:p>
      <text:p text:style-name="Text_20_body">Las dos figuras oscuras atravesaron el umbral.</text:p>
      <text:p text:style-name="Text_20_body"><text:soft-page-break/>Y desaparecieron en la noche.</text:p>
      <text:p text:style-name="Text_20_body">La puerta permaneció abierta.</text:p>
      <text:p text:style-name="Text_20_body">Balanceándose suavemente.</text:p>
      <text:p text:style-name="Text_20_body">Las hermanas corrieron hacia ella.</text:p>
      <text:p text:style-name="Text_20_body">La cerraron de golpe.</text:p>
      <text:p text:style-name="Text_20_body">Atrancaron el pestillo.</text:p>
      <text:p text:style-name="Text_20_body">Empujaron una mesa contra la madera.</text:p>
      <text:p text:style-name="Text_20_body">Y después permanecieron allí.</text:p>
      <text:p text:style-name="Text_20_body">Abrazadas.</text:p>
      <text:p text:style-name="Text_20_body">Escuchando.</text:p>
      <text:p text:style-name="Text_20_body">Esperando.</text:p>
      <text:p text:style-name="Text_20_body">Sin atreverse a acercarse a las ventanas.</text:p>
      <text:p text:style-name="Text_20_body">Sin atreverse a apagar la lámpara.</text:p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7-13T11:38:44.391000000</meta:creation-date>
    <dc:date>2026-07-13T11:46:15.668000000</dc:date>
    <meta:editing-duration>PT7M31S</meta:editing-duration>
    <meta:editing-cycles>1</meta:editing-cycles>
    <meta:document-statistic meta:table-count="0" meta:image-count="0" meta:object-count="0" meta:page-count="5" meta:paragraph-count="131" meta:word-count="675" meta:character-count="4121" meta:non-whitespace-character-count="3577"/>
    <meta:generator>LibreOffice/7.3.5.2$Windows_X86_64 LibreOffice_project/184fe81b8c8c30d8b5082578aee2fed2ea847c01</meta:generator>
  </office:meta>
</office:document-meta>
</file>