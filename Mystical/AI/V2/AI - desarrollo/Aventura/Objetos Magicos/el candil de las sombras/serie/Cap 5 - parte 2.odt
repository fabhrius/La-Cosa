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officeooo:rsid="000eabd2"/>
    </style:style>
    <style:style style:name="P2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Parte 2 - La responsabilidad</text:h>
      <text:p text:style-name="Text_20_body">La tarde fue apagándose lentamente.</text:p>
      <text:p text:style-name="Text_20_body">Las sombras comenzaron a alargarse sobre las paredes.</text:p>
      <text:p text:style-name="Text_20_body">Y con ellas regresó el recuerdo de las noches anteriores.</text:p>
      <text:p text:style-name="Text_20_body">Kahsia observaba las ventanas con inquietud.</text:p>
      <text:p text:style-name="Text_20_body">Cada vez que la luz disminuía parecía más nerviosa.</text:p>
      <text:p text:style-name="Text_20_body">Finalmente Rylhet se levantó.</text:p>
      <text:p text:style-name="Text_20_body">Tomó una vela de la cocina.</text:p>
      <text:p text:style-name="Text_20_body">—¿Qué haces? —preguntó Kahsia.</text:p>
      <text:p text:style-name="Text_20_body">—Va a oscurecer.</text:p>
      <text:p text:style-name="Text_20_body">—No la enciendas.</text:p>
      <text:p text:style-name="Text_20_body">Rylhet se detuvo.</text:p>
      <text:p text:style-name="Text_20_body">—¿Por qué?</text:p>
      <text:p text:style-name="Text_20_body">—Las sombras volverán.</text:p>
      <text:p text:style-name="Text_20_body">La respuesta quedó suspendida en el aire.</text:p>
      <text:p text:style-name="Text_20_body">Durante unos segundos ninguna habló.</text:p>
      <text:p text:style-name="Text_20_body">Después Rylhet acercó la llama a la mecha.</text:p>
      <text:p text:style-name="Text_20_body">La vela se encendió.</text:p>
      <text:p text:style-name="Text_20_body">Las dos observaron las paredes.</text:p>
      <text:p text:style-name="Text_20_body">Las sombras aparecieron.</text:p>
      <text:p text:style-name="Text_20_body">Oscuras.</text:p>
      <text:p text:style-name="Text_20_body">Silenciosas.</text:p>
      <text:p text:style-name="Text_20_body">Inmóviles.</text:p>
      <text:p text:style-name="Text_20_body">Pasó un minuto.</text:p>
      <text:p text:style-name="Text_20_body">Después otro.</text:p>
      <text:p text:style-name="Text_20_body">No ocurrió nada.</text:p>
      <text:p text:style-name="Text_20_body">La casa permaneció tranquila.</text:p>
      <text:p text:style-name="Text_20_body">Finalmente Rylhet dejó escapar el aire que había estado reteniendo.</text:p>
      <text:p text:style-name="Text_20_body"><text:soft-page-break/>—Lo ves.</text:p>
      <text:p text:style-name="Text_20_body">Kahsia continuó observando la habitación.</text:p>
      <text:p text:style-name="Text_20_body">—Todavía puede pasar.</text:p>
      <text:p text:style-name="Text_20_body">—No.</text:p>
      <text:p text:style-name="Text_20_body">—¿Cómo lo sabes?</text:p>
      <text:p text:style-name="Text_20_body">—Porque anoche tampoco pasó nada hasta mucho más tarde.</text:p>
      <text:p text:style-name="Text_20_body">Las dos volvieron a guardar silencio.</text:p>
      <text:p text:style-name="Text_20_body">Esperando.</text:p>
      <text:p text:style-name="Text_20_body">Escuchando.</text:p>
      <text:p text:style-name="Text_20_body">Pero la casa siguió igual.</text:p>
      <text:p text:style-name="Text_20_body">Al cabo de unos minutos Rylhet consiguió sonreír.</text:p>
      <text:p text:style-name="Text_20_body">Una sonrisa cansada.</text:p>
      <text:p text:style-name="Text_20_body">—Quizá ya no vuelvan.</text:p>
      <text:p text:style-name="Text_20_body">—¿Y si vuelven?</text:p>
      <text:p text:style-name="Text_20_body">—Entonces nos ocuparemos de ello.</text:p>
      <text:p text:style-name="Text_20_body">Kahsia bajó la mirada.</text:p>
      <text:p text:style-name="Text_20_body">No parecía convencida.</text:p>
      <text:p text:style-name="Text_20_body">—El cocinero murió.</text:p>
      <text:p text:style-name="Text_20_body">Rylhet no respondió.</text:p>
      <text:p text:style-name="Text_20_body">—Y después murió el hombre de los cerdos.</text:p>
      <text:p text:style-name="Text_20_body">—Lo sé.</text:p>
      <text:p text:style-name="Text_20_body">—Y las dos veces ocurrió después de que las sombras salieran.</text:p>
      <text:p text:style-name="Text_20_body">Rylhet apoyó las manos sobre la mesa.</text:p>
      <text:p text:style-name="Text_20_body">Pensó unos segundos antes de responder.</text:p>
      <text:p text:style-name="Text_20_body">—No sabemos eso.</text:p>
      <text:p text:style-name="Text_20_body">—Sí lo sabemos.</text:p>
      <text:p text:style-name="Text_20_body">—No.</text:p>
      <text:p text:style-name="Text_20_body">Su tono era firme.</text:p>
      <text:p text:style-name="Text_20_body">Demasiado firme.</text:p>
      <text:p text:style-name="Text_20_body">—Vimos sombras.</text:p>
      <text:p text:style-name="Text_20_body"><text:soft-page-break/>Después vimos cosas extrañas.</text:p>
      <text:p text:style-name="Text_20_body">Eso es todo.</text:p>
      <text:p text:style-name="Text_20_body">—Y el dinero.</text:p>
      <text:p text:style-name="Text_20_body">Rylhet desvió la mirada hacia las monedas.</text:p>
      <text:p text:style-name="Text_20_body">Seguían sobre la mesa.</text:p>
      <text:p text:style-name="Text_20_body">—No sabemos de dónde salió realmente.</text:p>
      <text:p text:style-name="Text_20_body">—Claro que lo sabemos.</text:p>
      <text:p text:style-name="Text_20_body">Rylhet permaneció callada.</text:p>
      <text:p text:style-name="Text_20_body">Aquello era exactamente lo que no quería pensar.</text:p>
      <text:p text:style-name="Text_20_body">—Kahsia...</text:p>
      <text:p text:style-name="Text_20_body">La pequeña esperó.</text:p>
      <text:p text:style-name="Text_20_body">—¿Crees que podríamos haber evitado algo?</text:p>
      <text:p text:style-name="Text_20_body">—No lo sé.</text:p>
      <text:p text:style-name="Text_20_body">—Yo tampoco.</text:p>
      <text:p text:style-name="Text_20_body">Rylhet tomó una de las monedas entre los dedos.</text:p>
      <text:p text:style-name="Text_20_body">La hizo girar lentamente.</text:p>
      <text:p text:style-name="Text_20_body">—No sabemos qué son esas sombras.</text:p>
      <text:p text:style-name="Text_20_body">No sabemos por qué aparecen.</text:p>
      <text:p text:style-name="Text_20_body">No sabemos qué hacen cuando salen.</text:p>
      <text:p text:style-name="Text_20_body">Y tampoco sabemos si tienen algo que ver con esas muertes.</text:p>
      <text:p text:style-name="Text_20_body">Kahsia la observó.</text:p>
      <text:p text:style-name="Text_20_body">—Pero lo sospechamos.</text:p>
      <text:p text:style-name="Text_20_body">—Sospechar no es saber.</text:p>
      <text:p text:style-name="Text_20_body">La moneda continuó girando entre sus dedos.</text:p>
      <text:p text:style-name="Text_20_body">—Y aunque fuera cierto...</text:p>
      <text:p text:style-name="Text_20_body">Kahsia levantó la vista.</text:p>
      <text:p text:style-name="Text_20_body">Rylhet tardó unos segundos en terminar la frase.</text:p>
      <text:p text:style-name="Text_20_body">—Aunque fuera cierto, ¿qué podríamos haber hecho?</text:p>
      <text:p text:style-name="Text_20_body">La pregunta quedó flotando entre ellas.</text:p>
      <text:p text:style-name="Text_20_body">Ninguna respondió.</text:p>
      <text:p text:style-name="Text_20_body"><text:soft-page-break/>Porque ambas conocían la respuesta.</text:p>
      <text:p text:style-name="Text_20_body">Nada.</text:p>
      <text:p text:style-name="Text_20_body">No habían pedido el dinero.</text:p>
      <text:p text:style-name="Text_20_body">No habían perseguido a nadie.</text:p>
      <text:p text:style-name="Text_20_body">No habían levantado ningún cuchillo.</text:p>
      <text:p text:style-name="Text_20_body">No habían matado a nadie.</text:p>
      <text:p text:style-name="Text_20_body">La sensación de culpa seguía allí.</text:p>
      <text:p text:style-name="Text_20_body">Pero ahora tenía una grieta.</text:p>
      <text:p text:style-name="Text_20_body">Una pequeña grieta.</text:p>
      <text:p text:style-name="Text_20_body">Lo bastante grande para que Rylhet pudiera respirar.</text:p>
      <text:p text:style-name="Text_20_body">Lo bastante grande para que pudiera dormir aquella noche.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8T19:26:44.043000000</meta:creation-date>
    <dc:date>2026-07-18T19:30:30.008000000</dc:date>
    <meta:editing-duration>PT3M46S</meta:editing-duration>
    <meta:editing-cycles>1</meta:editing-cycles>
    <meta:document-statistic meta:table-count="0" meta:image-count="0" meta:object-count="0" meta:page-count="4" meta:paragraph-count="99" meta:word-count="452" meta:character-count="2741" meta:non-whitespace-character-count="2388"/>
    <meta:generator>LibreOffice/7.3.5.2$Windows_X86_64 LibreOffice_project/184fe81b8c8c30d8b5082578aee2fed2ea847c01</meta:generator>
  </office:meta>
</office:document-meta>
</file>