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1fcc50" officeooo:paragraph-rsid="001fcc50"/>
    </style:style>
    <style:style style:name="T1" style:family="text">
      <style:text-properties officeooo:rsid="001fcc5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Acto I - La lámpara</text:h>
      <text:h text:style-name="Heading_20_3" text:outline-level="3">Capítulo 1 - El encantamiento</text:h>
      <text:p text:style-name="Text_20_body">La tía intenta crear una lámpara mágica.</text:p>
      <text:p text:style-name="Text_20_body">Pierde el control.</text:p>
      <text:p text:style-name="Text_20_body">Rompe la lámpara.</text:p>
      <text:p text:style-name="Text_20_body">Desaparece.</text:p>
      <text:p text:style-name="Horizontal_20_Line"/>
      <text:h text:style-name="Heading_20_3" text:outline-level="3">Capítulo 2 - La casa vacía</text:h>
      <text:p text:style-name="Text_20_body">Las dos hermanas llegan.</text:p>
      <text:p text:style-name="Text_20_body">Buscan a la tía.</text:p>
      <text:p text:style-name="Text_20_body">No la encuentran.</text:p>
      <text:p text:style-name="Text_20_body">Deciden pasar la noche.</text:p>
      <text:p text:style-name="Text_20_body">Descubren la lámpara.</text:p>
      <text:p text:style-name="Text_20_body">La encienden.</text:p>
      <text:p text:style-name="P2">Observan con horror como </text:p>
      <text:p text:style-name="Text_20_body">La sombra cobra vida.</text:p>
      <text:p text:style-name="Text_20_body"/>
      <text:p text:style-name="Horizontal_20_Line"/>
      <text:h text:style-name="Heading_20_1" text:outline-level="1">Acto II - La transformación</text:h>
      <text:p text:style-name="Text_20_body">Aquí están tus seis fases.</text:p>
      <text:h text:style-name="Heading_20_3" text:outline-level="3">Capítulo 3 - El regalo</text:h>
      <text:p text:style-name="Text_20_body">Primer beneficio.</text:p>
      <text:p text:style-name="Text_20_body">Todo parece maravilloso.</text:p>
      <text:p text:style-name="Horizontal_20_Line"/>
      <text:h text:style-name="Heading_20_3" text:outline-level="3">Capítulo 4 - La sospecha</text:h>
      <text:p text:style-name="Text_20_body">Aparece la primera desaparición.</text:p>
      <text:p text:style-name="Text_20_body"><text:soft-page-break/>La hermana menor empieza a inquietarse.</text:p>
      <text:p text:style-name="Horizontal_20_Line"/>
      <text:h text:style-name="Heading_20_3" text:outline-level="3">Capítulo 5 - La justificación</text:h>
      <text:p text:style-name="Text_20_body">La mayor vuelve a usar la lámpara.</text:p>
      <text:p text:style-name="Text_20_body">Encuentra excusas.</text:p>
      <text:p text:style-name="Horizontal_20_Line"/>
      <text:h text:style-name="Heading_20_3" text:outline-level="3">Capítulo 6 - La racionalización</text:h>
      <text:p text:style-name="Text_20_body">Ya conoce el precio.</text:p>
      <text:p text:style-name="Text_20_body">Pero sigue adelante.</text:p>
      <text:p text:style-name="Horizontal_20_Line"/>
      <text:h text:style-name="Heading_20_3" text:outline-level="3">Capítulo 7 - La inversión moral</text:h>
      <text:p text:style-name="Text_20_body">Empieza a considerar aceptables las desapariciones.</text:p>
      <text:p text:style-name="Text_20_body">La menor se asusta.</text:p>
      <text:p text:style-name="Horizontal_20_Line"/>
      <text:h text:style-name="Heading_20_3" text:outline-level="3">Capítulo 8 - La corrupción</text:h>
      <text:p text:style-name="Text_20_body">La mayor ya no se parece a la persona que llegó al pueblo.</text:p>
      <text:p text:style-name="Text_20_body">La menor comprende que está perdiendo a su hermana.</text:p>
      <text:p text:style-name="Horizontal_20_Line"/>
      <text:h text:style-name="Heading_20_1" text:outline-level="1">Acto III - La sombra</text:h>
      <text:h text:style-name="Heading_20_3" text:outline-level="3">Capítulo 9 - La última petición</text:h>
      <text:p text:style-name="Text_20_body">La hermana mayor realiza un deseo especialmente oscuro.</text:p>
      <text:p text:style-name="Text_20_body">La hermana menor intenta detenerla.</text:p>
      <text:p text:style-name="Text_20_body">La lámpara se rompe.</text:p>
      <text:p text:style-name="Text_20_body">La hermana mayor desaparece.</text:p>
      <text:p text:style-name="Text_20_body">La sombra desaparece.</text:p>
      <text:p text:style-name="Text_20_body">Silencio.</text:p>
      <text:p text:style-name="Text_20_body">La menor cree haber terminado con el horror.</text:p>
      <text:p text:style-name="Horizontal_20_Line"/>
      <text:h text:style-name="Heading_20_3" text:outline-level="3"><text:soft-page-break/>Capítulo 1<text:span text:style-name="T1">0</text:span> - La carreta</text:h>
      <text:p text:style-name="Text_20_body">Amanece.</text:p>
      <text:p text:style-name="Text_20_body">La hermana menor abandona el pueblo.</text:p>
      <text:p text:style-name="Text_20_body">Mira por última vez las calles.</text:p>
      <text:p text:style-name="Text_20_body">Todo parece normal.</text:p>
      <text:p text:style-name="Text_20_body">Ve a una mujer caminando hacia el granero.</text:p>
      <text:p text:style-name="Text_20_body">Lleva una lámpara.</text:p>
      <text:p text:style-name="Text_20_body">La misma lámpara.</text:p>
      <text:p text:style-name="Text_20_body">Dentro está reunido todo el pueblo.</text:p>
      <text:p text:style-name="Text_20_body">La mujer abre la puerta.</text:p>
      <text:p text:style-name="Text_20_body">La hermana menor observa.</text:p>
      <text:p text:style-name="Text_20_body">La carreta sigue avanzando.</text:p>
      <text:p text:style-name="Text_20_body">Fin.</text:p>
      <text:p text:style-name="Horizontal_20_Line"/>
      <text:h text:style-name="Heading_20_2" text:outline-level="2">Y aquí aparece una posibilidad muy interesante</text:h>
      <text:p text:style-name="Text_20_body">Fabhrius podría cerrar el cuento con una reflexión que no hable de la lámpara.</text:p>
      <text:p text:style-name="Text_20_body">Podría hablar de las personas.</text:p>
      <text:p text:style-name="Text_20_body">Algo cercano a:</text:p>
      <text:p text:style-name="Quotations">Los sistemas inteligentes cambian constantemente para adaptarse a su entorno.</text:p>
      <text:p text:style-name="Quotations">También lo hacen las personas.</text:p>
      <text:p text:style-name="Quotations">Cada decisión modifica ligeramente al individuo que la toma.</text:p>
      <text:p text:style-name="Quotations">Y aunque esos cambios sean imperceptibles, se acumulan.</text:p>
      <text:p text:style-name="Quotations">Con el tiempo pueden transformar por completo a alguien sin que exista un instante preciso en que dejó de ser quien era.</text:p>
      <text:p text:style-name="Quotations">La identidad no es una posesión.</text:p>
      <text:p text:style-name="Quotations">Es un proceso.</text:p>
      <text:p text:style-name="Text_20_body">Y entonces el lector comprende algo inquietante:</text:p>
      <text:p text:style-name="Text_20_body">La historia nunca trató realmente sobre una lámpara indestructible.</text:p>
      <text:p text:style-name="Text_20_body"><text:soft-page-break/>Trató sobre una transformación que ocurre en todos nosotros, sólo que normalmente es tan lenta que nadie la not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0T13:50:38.617000000</meta:creation-date>
    <dc:date>2026-07-10T14:11:38.848000000</dc:date>
    <meta:editing-duration>PT10M49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71" meta:word-count="388" meta:character-count="2277" meta:non-whitespace-character-count="1959"/>
  </office:meta>
</office:document-meta>
</file>