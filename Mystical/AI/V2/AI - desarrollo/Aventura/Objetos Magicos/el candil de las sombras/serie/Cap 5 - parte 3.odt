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3" text:outline-level="3">Parte 3 - El descubrimiento</text:h>
      <text:p text:style-name="Text_20_body">Y nada sucedió.</text:p>
      <text:p text:style-name="Text_20_body">Las sombras permanecieron inmóviles.</text:p>
      <text:p text:style-name="Text_20_body">La vela siguió ardiendo.</text:p>
      <text:p text:style-name="Text_20_body">La noche continuó avanzando.</text:p>
      <text:p text:style-name="Text_20_body">Poco a poco la tensión comenzó a desaparecer.</text:p>
      <text:p text:style-name="Text_20_body">Tal vez Rylhet tuviera razón.</text:p>
      <text:p text:style-name="Text_20_body">Tal vez las apariciones hubieran terminado.</text:p>
      <text:p text:style-name="Text_20_body">Tal vez todo aquello hubiera sido una coincidencia imposible de explicar.</text:p>
      <text:p text:style-name="Text_20_body">Finalmente prepararon una cena sencilla.</text:p>
      <text:p text:style-name="Text_20_body">Pan.</text:p>
      <text:p text:style-name="Text_20_body">Queso.</text:p>
      <text:p text:style-name="Text_20_body">Y un poco de fruta que todavía quedaba de la mañana anterior.</text:p>
      <text:p text:style-name="Text_20_body">Se sentaron juntas en la cocina.</text:p>
      <text:p text:style-name="Text_20_body">Intentando hablar de otras cosas.</text:p>
      <text:p text:style-name="Text_20_body">Intentando olvidar.</text:p>
      <text:p text:style-name="Text_20_body">Kahsia estaba terminando un trozo de pan cuando Rylhet recordó que había dejado una jarra de agua en la sala.</text:p>
      <text:p text:style-name="Text_20_body">Se levantó de la mesa.</text:p>
      <text:p text:style-name="Text_20_body">—Ahora vuelvo.</text:p>
      <text:p text:style-name="Text_20_body">La cocina quedó iluminada únicamente por una pequeña vela.</text:p>
      <text:p text:style-name="Text_20_body">La sala, en cambio, estaba completamente oscura.</text:p>
      <text:p text:style-name="Text_20_body">Rylhet entró en ella.</text:p>
      <text:p text:style-name="Text_20_body">Y por costumbre tomó la lámpara.</text:p>
      <text:p text:style-name="Text_20_body">No pensó en ello.</text:p>
      <text:p text:style-name="Text_20_body">No dudó.</text:p>
      <text:p text:style-name="Text_20_body">Simplemente la encendió.</text:p>
      <text:p text:style-name="Text_20_body">La llama cobró vida.</text:p>
      <text:p text:style-name="Text_20_body">Una luz anaranjada se extendió por la habitación.</text:p>
      <text:p text:style-name="Text_20_body"><text:soft-page-break/>Y entonces sucedió.</text:p>
      <text:p text:style-name="Text_20_body">Rylhet lo vio inmediatamente.</text:p>
      <text:p text:style-name="Text_20_body">La sombra proyectada sobre la pared no imitó sus movimientos.</text:p>
      <text:p text:style-name="Text_20_body">Ni siquiera esperó.</text:p>
      <text:p text:style-name="Text_20_body">Comenzó a caminar.</text:p>
      <text:p text:style-name="Text_20_body">El terror la atravesó como un cuchillo.</text:p>
      <text:p text:style-name="Text_20_body">La figura oscura avanzó por la pared.</text:p>
      <text:p text:style-name="Text_20_body">Después descendió al suelo.</text:p>
      <text:p text:style-name="Text_20_body">Moviéndose con aquella misma naturalidad imposible.</text:p>
      <text:p text:style-name="Text_20_body">Como si poseyera voluntad propia.</text:p>
      <text:p text:style-name="Text_20_body">Como si hubiera estado esperando.</text:p>
      <text:p text:style-name="Text_20_body">Esperando exactamente ese momento.</text:p>
      <text:p text:style-name="Text_20_body">Rylhet sintió que el corazón se detenía.</text:p>
      <text:p text:style-name="Text_20_body">No era la oscuridad.</text:p>
      <text:p text:style-name="Text_20_body">No era una ilusión.</text:p>
      <text:p text:style-name="Text_20_body">No era el cansancio.</text:p>
      <text:p text:style-name="Text_20_body">La sombra había aparecido en el mismo instante en que encendió la lámpara.</text:p>
      <text:p text:style-name="Text_20_body">Ni antes.</text:p>
      <text:p text:style-name="Text_20_body">Ni después.</text:p>
      <text:p text:style-name="Text_20_body">En el mismo instante.</text:p>
      <text:p text:style-name="Text_20_body">Y aquello significaba algo.</text:p>
      <text:p text:style-name="Text_20_body">Algo horrible.</text:p>
      <text:p text:style-name="Text_20_body">La sombra abandonó la sala.</text:p>
      <text:p text:style-name="Text_20_body">Dirigiéndose hacia la cocina.</text:p>
      <text:p text:style-name="Text_20_body">—¡Kahsia!</text:p>
      <text:p text:style-name="Text_20_body">Rylhet corrió tras ella.</text:p>
      <text:p text:style-name="Text_20_body">El sonido de sus pasos resonó en toda la casa.</text:p>
      <text:p text:style-name="Text_20_body">Entró en la cocina casi derribando la puerta.</text:p>
      <text:p text:style-name="Text_20_body">Y encontró a Kahsia paralizada.</text:p>
      <text:p text:style-name="Text_20_body">La pequeña señalaba la pared.</text:p>
      <text:p text:style-name="Text_20_body"><text:soft-page-break/>Sin poder hablar.</text:p>
      <text:p text:style-name="Text_20_body">Sin poder apartar la vista.</text:p>
      <text:p text:style-name="Text_20_body">La sombra atravesó lentamente la habitación.</text:p>
      <text:p text:style-name="Text_20_body">Deslizándose junto a la mesa.</text:p>
      <text:p text:style-name="Text_20_body">Junto al fuego.</text:p>
      <text:p text:style-name="Text_20_body">Junto a ellas.</text:p>
      <text:p text:style-name="Text_20_body">Las dos retrocedieron.</text:p>
      <text:p text:style-name="Text_20_body">Ninguna se atrevió a acercarse.</text:p>
      <text:p text:style-name="Text_20_body">Ninguna se atrevió a tocarla.</text:p>
      <text:p text:style-name="Text_20_body">La figura llegó a la ventana.</text:p>
      <text:p text:style-name="Text_20_body">Y allí se detuvo.</text:p>
      <text:p text:style-name="Text_20_body">Por un instante pareció observarlas.</text:p>
      <text:p text:style-name="Text_20_body">Como un depredador observando a sus presas.</text:p>
      <text:p text:style-name="Text_20_body">Como algo que sabía que había sido descubierto.</text:p>
      <text:p text:style-name="Text_20_body">Después atravesó el marco abierto.</text:p>
      <text:p text:style-name="Text_20_body">Se fundió con la oscuridad exterior.</text:p>
      <text:p text:style-name="Text_20_body">Y desapareció.</text:p>
      <text:p text:style-name="Text_20_body">El silencio que quedó detrás fue insoportable.</text:p>
      <text:p text:style-name="Text_20_body">Durante varios segundos ninguna de las dos habló.</text:p>
      <text:p text:style-name="Text_20_body">Sólo escuchaban su propia respiración.</text:p>
      <text:p text:style-name="Text_20_body">Finalmente Kahsia rompió el silencio.</text:p>
      <text:p text:style-name="Text_20_body">—Ha sido la lámpara.</text:p>
      <text:p text:style-name="Text_20_body">Rylhet no respondió.</text:p>
      <text:p text:style-name="Text_20_body">Porque ya lo sabía.</text:p>
      <text:p text:style-name="Text_20_body">Las dos miraron hacia la sala.</text:p>
      <text:p text:style-name="Text_20_body">La llama continuaba ardiendo.</text:p>
      <text:p text:style-name="Text_20_body">Pequeña.</text:p>
      <text:p text:style-name="Text_20_body">Inofensiva.</text:p>
      <text:p text:style-name="Text_20_body">Silenciosa.</text:p>
      <text:p text:style-name="Text_20_body">Pero ahora comprendían.</text:p>
      <text:p text:style-name="Text_20_body"><text:soft-page-break/>La comida.</text:p>
      <text:p text:style-name="Text_20_body">La muñeca.</text:p>
      <text:p text:style-name="Text_20_body">Las monedas.</text:p>
      <text:p text:style-name="Text_20_body">Las muertes.</text:p>
      <text:p text:style-name="Text_20_body">Las sombras.</text:p>
      <text:p text:style-name="Text_20_body">Todo estaba unido.</text:p>
      <text:p text:style-name="Text_20_body">Todo nacía allí.</text:p>
      <text:p text:style-name="Text_20_body">En aquella vieja lámpara de aceite.</text:p>
      <text:p text:style-name="Text_20_body">Y por primera vez comprendieron algo aún más inquietante.</text:p>
      <text:p text:style-name="Text_20_body">No era la sombra quien elegía cuándo salir.</text:p>
      <text:p text:style-name="Text_20_body">Eran ellas.</text:p>
      <text:p text:style-name="Horizontal_20_Line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18T19:37:24.633000000</meta:creation-date>
    <dc:date>2026-07-18T19:40:42.599000000</dc:date>
    <meta:editing-duration>PT3M18S</meta:editing-duration>
    <meta:editing-cycles>1</meta:editing-cycles>
    <meta:document-statistic meta:table-count="0" meta:image-count="0" meta:object-count="0" meta:page-count="4" meta:paragraph-count="99" meta:word-count="479" meta:character-count="2893" meta:non-whitespace-character-count="2513"/>
    <meta:generator>LibreOffice/7.3.5.2$Windows_X86_64 LibreOffice_project/184fe81b8c8c30d8b5082578aee2fed2ea847c01</meta:generator>
  </office:meta>
</office:document-meta>
</file>