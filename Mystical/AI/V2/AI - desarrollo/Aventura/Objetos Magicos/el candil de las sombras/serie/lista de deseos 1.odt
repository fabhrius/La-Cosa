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reo que aquí hay una oportunidad muy interesante.</text:p>
      <text:p text:style-name="Text_20_body">Los deseos no deberían crecer simplemente en tamaño.</text:p>
      <text:p text:style-name="Text_20_body">No debería ser:</text:p>
      <text:list xml:id="list3778634408" text:style-name="L1">
        <text:list-item>
          <text:p text:style-name="P1">comida,</text:p>
        </text:list-item>
        <text:list-item>
          <text:p text:style-name="P1">dinero,</text:p>
        </text:list-item>
        <text:list-item>
          <text:p text:style-name="P1">más dinero,</text:p>
        </text:list-item>
        <text:list-item>
          <text:p text:style-name="P1">una casa,</text:p>
        </text:list-item>
        <text:list-item>
          <text:p text:style-name="P1">un castillo,</text:p>
        </text:list-item>
        <text:list-item>
          <text:p text:style-name="P1">un reino.</text:p>
        </text:list-item>
      </text:list>
      <text:p text:style-name="Text_20_body">Eso sería una progresión material.</text:p>
      <text:p text:style-name="Text_20_body">Lo que realmente estamos narrando es una <text:span text:style-name="Strong_20_Emphasis">progresión moral</text:span>.</text:p>
      <text:p text:style-name="Text_20_body">Los deseos deberían revelar la transformación de la hermana mayor.</text:p>
      <text:p text:style-name="Text_20_body">Cada deseo debería mostrar que está cambiando como persona.</text:p>
      <text:p text:style-name="Text_20_body">Podríamos incluso asociarlos a tus seis fases.</text:p>
      <text:p text:style-name="Horizontal_20_Line"/>
      <text:h text:style-name="Heading_20_2" text:outline-level="2">Fase 1 - El regalo</text:h>
      <text:h text:style-name="Heading_20_3" text:outline-level="3">Deseo: comida</text:h>
      <text:p text:style-name="Text_20_body">Las hermanas tienen hambre.</text:p>
      <text:p text:style-name="Text_20_body">Llegan agotadas.</text:p>
      <text:p text:style-name="Text_20_body">No encuentran a la tía.</text:p>
      <text:p text:style-name="Text_20_body">La hermana mayor piensa:</text:p>
      <text:p text:style-name="Quotations">"Ojalá tuviéramos algo para cenar."</text:p>
      <text:p text:style-name="Text_20_body">La sombra sale.</text:p>
      <text:p text:style-name="Text_20_body">Aparece comida.</text:p>
      <text:p text:style-name="Text_20_body">Al día siguiente un viajero desaparece.</text:p>
      <text:p text:style-name="Text_20_body">Nadie relaciona ambos hechos.</text:p>
      <text:p text:style-name="Text_20_body">El lector tampoco.</text:p>
      <text:p text:style-name="Text_20_body">Este deseo es inocente.</text:p>
      <text:p text:style-name="Horizontal_20_Line"/>
      <text:h text:style-name="Heading_20_2" text:outline-level="2"><text:soft-page-break/>Fase 2 - La sospecha</text:h>
      <text:h text:style-name="Heading_20_3" text:outline-level="3">Deseo: dinero</text:h>
      <text:p text:style-name="Text_20_body">Necesitan mantenerse unos días.</text:p>
      <text:p text:style-name="Text_20_body">La hermana mayor desea algunas monedas.</text:p>
      <text:p text:style-name="Text_20_body">Aparece una bolsa.</text:p>
      <text:p text:style-name="Text_20_body">Más tarde descubren que un comerciante perdió exactamente esa cantidad.</text:p>
      <text:p text:style-name="Text_20_body">O quizá el comerciante desapareció.</text:p>
      <text:p text:style-name="Text_20_body">Ahora aparece la sospecha.</text:p>
      <text:p text:style-name="Horizontal_20_Line"/>
      <text:h text:style-name="Heading_20_2" text:outline-level="2">Fase 3 - La justificación</text:h>
      <text:p text:style-name="Text_20_body">Aquí debería pedir algo que no necesita realmente.</text:p>
      <text:p text:style-name="Text_20_body">Algo que quiere.</text:p>
      <text:h text:style-name="Heading_20_3" text:outline-level="3">Deseo: ropa nueva</text:h>
      <text:p text:style-name="Text_20_body">o</text:p>
      <text:h text:style-name="Heading_20_3" text:outline-level="3">Deseo: una habitación mejor</text:h>
      <text:p text:style-name="Text_20_body">o</text:p>
      <text:h text:style-name="Heading_20_3" text:outline-level="3">Deseo: joyas</text:h>
      <text:p text:style-name="Text_20_body">La hermana menor podría preguntar:</text:p>
      <text:p text:style-name="Quotations">"¿Realmente necesitamos eso?"</text:p>
      <text:p text:style-name="Text_20_body">Y la mayor responder:</text:p>
      <text:p text:style-name="Quotations">"Sólo esta vez."</text:p>
      <text:p text:style-name="Text_20_body">Ya no se trata de sobrevivir.</text:p>
      <text:p text:style-name="Horizontal_20_Line"/>
      <text:h text:style-name="Heading_20_2" text:outline-level="2">Fase 4 - La racionalización</text:h>
      <text:p text:style-name="Text_20_body">Ahora entra en juego el estatus.</text:p>
      <text:p text:style-name="Text_20_body">La hermana mayor descubre que el pueblo respeta a quienes poseen riqueza.</text:p>
      <text:h text:style-name="Heading_20_3" text:outline-level="3"><text:soft-page-break/>Deseo: una casa propia</text:h>
      <text:p text:style-name="Text_20_body">o</text:p>
      <text:h text:style-name="Heading_20_3" text:outline-level="3">Deseo: una granja</text:h>
      <text:p text:style-name="Text_20_body">o</text:p>
      <text:h text:style-name="Heading_20_3" text:outline-level="3">Deseo: tierras</text:h>
      <text:p text:style-name="Text_20_body">La gente empieza a admirarla.</text:p>
      <text:p text:style-name="Text_20_body">Ella empieza a disfrutarlo.</text:p>
      <text:p text:style-name="Text_20_body">Ya sabe el precio.</text:p>
      <text:p text:style-name="Text_20_body">Pero considera que merece lo que recibe.</text:p>
      <text:p text:style-name="Horizontal_20_Line"/>
      <text:h text:style-name="Heading_20_2" text:outline-level="2">Fase 5 - La inversión moral</text:h>
      <text:p text:style-name="Text_20_body">Aquí los deseos dejan de ser objetos.</text:p>
      <text:p text:style-name="Text_20_body">Empiezan a ser personas.</text:p>
      <text:p text:style-name="Text_20_body">Esto es importante.</text:p>
      <text:h text:style-name="Heading_20_3" text:outline-level="3">Deseo: que alguien la ame</text:h>
      <text:p text:style-name="Text_20_body">o</text:p>
      <text:h text:style-name="Heading_20_3" text:outline-level="3">Deseo: ganarse la confianza de alguien</text:h>
      <text:p text:style-name="Text_20_body">o</text:p>
      <text:h text:style-name="Heading_20_3" text:outline-level="3">Deseo: ocupar una posición importante en el pueblo</text:h>
      <text:p text:style-name="Text_20_body">Ahora la lámpara altera vidas enteras.</text:p>
      <text:p text:style-name="Text_20_body">Quizá desaparece alguien que ocupaba ese puesto.</text:p>
      <text:p text:style-name="Text_20_body">Quizá desaparece el prometido de otra mujer.</text:p>
      <text:p text:style-name="Text_20_body">La hermana mayor empieza a beneficiarse directamente de las desgracias ajenas.</text:p>
      <text:p text:style-name="Horizontal_20_Line"/>
      <text:h text:style-name="Heading_20_2" text:outline-level="2">Fase 6 - La corrupción</text:h>
      <text:p text:style-name="Text_20_body">Aquí aparece el verdadero horror.</text:p>
      <text:p text:style-name="Text_20_body">La hermana mayor ya no desea cosas.</text:p>
      <text:p text:style-name="Text_20_body"><text:soft-page-break/>Desea eliminar obstáculos.</text:p>
      <text:h text:style-name="Heading_20_3" text:outline-level="3">Deseo:</text:h>
      <text:p text:style-name="Quotations">"Ojalá nadie pudiera impedirme hacer lo que quiero."</text:p>
      <text:p text:style-name="Text_20_body">o</text:p>
      <text:p text:style-name="Quotations">"Ojalá esa persona desapareciera."</text:p>
      <text:p text:style-name="Text_20_body">o</text:p>
      <text:p text:style-name="Quotations">"Ojalá todos me obedecieran."</text:p>
      <text:p text:style-name="Text_20_body">Aquí la transformación está completa.</text:p>
      <text:p text:style-name="Text_20_body">La lámpara ya no necesita interpretar deseos.</text:p>
      <text:p text:style-name="Text_20_body">La propia hermana se ha convertido en alguien dispuesto a pagar el precio.</text:p>
      <text:p text:style-name="Horizontal_20_Line"/>
      <text:h text:style-name="Heading_20_2" text:outline-level="2">Una alternativa aún más interesante</text:h>
      <text:p text:style-name="Text_20_body">Creo que podríamos hacer que todos los deseos giren alrededor de una única necesidad.</text:p>
      <text:p text:style-name="Text_20_body">Eso suele dar más coherencia psicológica.</text:p>
      <text:p text:style-name="Text_20_body">Por ejemplo:</text:p>
      <text:p text:style-name="Text_20_body">Las hermanas son huérfanas.</text:p>
      <text:p text:style-name="Text_20_body">Han perdido a toda su familia.</text:p>
      <text:p text:style-name="Text_20_body">Entonces los deseos evolucionan así:</text:p>
      <text:list xml:id="list2368472541" text:style-name="L2">
        <text:list-item>
          <text:p text:style-name="P2">Comida.</text:p>
        </text:list-item>
        <text:list-item>
          <text:p text:style-name="P2">Dinero.</text:p>
        </text:list-item>
        <text:list-item>
          <text:p text:style-name="P2">Una casa.</text:p>
        </text:list-item>
        <text:list-item>
          <text:p text:style-name="P2">Seguridad.</text:p>
        </text:list-item>
        <text:list-item>
          <text:p text:style-name="P2">Ser querida por el pueblo.</text:p>
        </text:list-item>
        <text:list-item>
          <text:p text:style-name="P2">Que nadie pueda abandonarla nunca.</text:p>
        </text:list-item>
      </text:list>
      <text:p text:style-name="Text_20_body">Fíjate cómo cambia la naturaleza del deseo.</text:p>
      <text:p text:style-name="Text_20_body">Al principio parecen cosas distintas.</text:p>
      <text:p text:style-name="Text_20_body">Pero en realidad todos nacen de la misma herida.</text:p>
      <text:p text:style-name="Text_20_body">El miedo a volver a quedarse sola.</text:p>
      <text:p text:style-name="Text_20_body"><text:soft-page-break/>Y eso vuelve la historia mucho más trágica.</text:p>
      <text:p text:style-name="Text_20_body">Porque la hermana mayor no se corrompe por avaricia.</text:p>
      <text:p text:style-name="Text_20_body">Se corrompe intentando curar una pérdida.</text:p>
      <text:p text:style-name="Text_20_body">Eso hace que el lector pueda comprenderla incluso cuando empieza a convertirse en un monstruo.</text:p>
      <text:p text:style-name="Text_20_body">Y los mejores cuentos de esta clase suelen funcionar así: el protagonista no cae porque sea malo, sino porque persigue algo profundamente humano durante demasiado tiemp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2T10:30:07.128000000</meta:creation-date>
    <dc:date>2026-07-12T10:30:48.560000000</dc:date>
    <meta:editing-duration>PT41S</meta:editing-duration>
    <meta:editing-cycles>1</meta:editing-cycles>
    <meta:document-statistic meta:table-count="0" meta:image-count="0" meta:object-count="0" meta:page-count="5" meta:paragraph-count="108" meta:word-count="556" meta:character-count="3326" meta:non-whitespace-character-count="2890"/>
    <meta:generator>LibreOffice/7.3.5.2$Windows_X86_64 LibreOffice_project/184fe81b8c8c30d8b5082578aee2fed2ea847c01</meta:generator>
  </office:meta>
</office:document-meta>
</file>