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 parece una mejora enorme respecto al planteamiento original.</text:p>
      <text:p text:style-name="Text_20_body">Has resuelto varios problemas narrativos al mismo tiempo:</text:p>
      <text:list xml:id="list2534457676" text:style-name="L1">
        <text:list-item>
          <text:p text:style-name="P1"><text:span text:style-name="Strong_20_Emphasis">Ahora hay una protagonista clara</text:span>: la hermana menor.</text:p>
        </text:list-item>
        <text:list-item>
          <text:p text:style-name="P1"><text:span text:style-name="Strong_20_Emphasis">La transformación ocurre delante de nuestros ojos</text:span>.</text:p>
        </text:list-item>
        <text:list-item>
          <text:p text:style-name="P1"><text:span text:style-name="Strong_20_Emphasis">La destrucción de la lámpara tiene un coste emocional</text:span> porque implica perder a su hermana.</text:p>
        </text:list-item>
        <text:list-item>
          <text:p text:style-name="P1"><text:span text:style-name="Strong_20_Emphasis">El tema de la identidad se vuelve personal</text:span>, no abstracto.</text:p>
        </text:list-item>
        <text:list-item>
          <text:p text:style-name="P1"><text:span text:style-name="Strong_20_Emphasis">El final adquiere una dimensión trágica</text:span> porque la hermana menor cree haber salvado a todos.</text:p>
        </text:list-item>
      </text:list>
      <text:p text:style-name="Text_20_body">Y además has introducido una idea muy interesante:</text:p>
      <text:p text:style-name="Quotations">La lámpara ya fue destruida una vez.</text:p>
      <text:p text:style-name="Text_20_body">La tía la rompió.</text:p>
      <text:p text:style-name="Text_20_body">Desapareció.</text:p>
      <text:p text:style-name="Text_20_body">La lámpara siguió existiendo.</text:p>
      <text:p text:style-name="Text_20_body">Años después la hermana menor repite exactamente el mismo acto.</text:p>
      <text:p text:style-name="Text_20_body">La lámpara vuelve a sobrevivir.</text:p>
      <text:p text:style-name="Text_20_body">Eso convierte a la lámpara en algo mucho más inquietante que un objeto maldito.</text:p>
      <text:p text:style-name="Text_20_body">Empieza a parecer una ley de la naturaleza.</text:p>
      <text:p text:style-name="Text_20_body">Algo que no puede eliminarse.</text:p>
      <text:p text:style-name="Horizontal_20_Line"/>
      <text:h text:style-name="Heading_20_2" text:outline-level="2">Lo que más me gusta</text:h>
      <text:p text:style-name="Text_20_body">La estructura de las dos hermanas.</text:p>
      <text:p text:style-name="Text_20_body">Porque permite que el lector vea simultáneamente dos procesos:</text:p>
      <text:h text:style-name="Heading_20_3" text:outline-level="3">La hermana mayor</text:h>
      <text:p text:style-name="Text_20_body">Se transforma.</text:p>
      <text:h text:style-name="Heading_20_3" text:outline-level="3">La hermana menor</text:h>
      <text:p text:style-name="Text_20_body">Observa la transformación.</text:p>
      <text:p text:style-name="Text_20_body">La mayor está dentro del proceso.</text:p>
      <text:p text:style-name="Text_20_body">La menor está fuera.</text:p>
      <text:p text:style-name="Text_20_body">Esto es ideal para desarrollar la enseñanza filosófica.</text:p>
      <text:p text:style-name="Text_20_body"><text:soft-page-break/>Porque la hermana mayor no percibirá sus propios cambios.</text:p>
      <text:p text:style-name="Text_20_body">La menor sí.</text:p>
      <text:p text:style-name="Horizontal_20_Line"/>
      <text:p text:style-name="Text_20_body">De hecho, hay una frase implícita muy poderosa:</text:p>
      <text:p text:style-name="Quotations">Nadie ve su propia transformación con la misma claridad con que la ven quienes le rodean.</text:p>
      <text:p text:style-name="Text_20_body">Eso ocurre constantemente en la vida real.</text:p>
      <text:p text:style-name="Horizontal_20_Line"/>
      <text:h text:style-name="Heading_20_2" text:outline-level="2">La verdadera víctima</text:h>
      <text:p text:style-name="Text_20_body">Hay algo que me parece especialmente potente.</text:p>
      <text:p text:style-name="Text_20_body">La hermana menor podría llegar a una conclusión equivocada.</text:p>
      <text:p text:style-name="Text_20_body">Durante gran parte del relato podría creer:</text:p>
      <text:p text:style-name="Quotations">La lámpara mata personas.</text:p>
      <text:p text:style-name="Text_20_body">Pero hacia el final comprendería:</text:p>
      <text:p text:style-name="Quotations">No.</text:p>
      <text:p text:style-name="Quotations">La primera víctima siempre es quien la utiliza.</text:p>
      <text:p text:style-name="Text_20_body">Las desapariciones son sólo consecuencias secundarias.</text:p>
      <text:p text:style-name="Text_20_body">La hermana mayor es la auténtica presa.</text:p>
      <text:p text:style-name="Text_20_body">Y eso conecta perfectamente con la enseñanza sobre identidad.</text:p>
      <text:p text:style-name="Horizontal_20_Line"/>
      <text:h text:style-name="Heading_20_2" text:outline-level="2">Posible estructura</text:h>
      <text:p text:style-name="Text_20_body">Yo lo organizaría en tres actos.</text:p>
      <text:h text:style-name="Heading_20_1" text:outline-level="1">Acto I - La lámpara</text:h>
      <text:h text:style-name="Heading_20_3" text:outline-level="3">Capítulo 1 - El encantamiento</text:h>
      <text:p text:style-name="Text_20_body">La tía intenta crear una lámpara mágica.</text:p>
      <text:p text:style-name="Text_20_body">Pierde el control.</text:p>
      <text:p text:style-name="Text_20_body">Rompe la lámpara.</text:p>
      <text:p text:style-name="Text_20_body"><text:soft-page-break/>Desaparece.</text:p>
      <text:p text:style-name="Horizontal_20_Line"/>
      <text:h text:style-name="Heading_20_3" text:outline-level="3">Capítulo 2 - La casa vacía</text:h>
      <text:p text:style-name="Text_20_body">Las dos hermanas llegan.</text:p>
      <text:p text:style-name="Text_20_body">Buscan a la tía.</text:p>
      <text:p text:style-name="Text_20_body">No la encuentran.</text:p>
      <text:p text:style-name="Text_20_body">Deciden pasar la noche.</text:p>
      <text:p text:style-name="Text_20_body">Descubren la lámpara.</text:p>
      <text:p text:style-name="Text_20_body">La encienden.</text:p>
      <text:p text:style-name="Text_20_body">La sombra cobra vida.</text:p>
      <text:p text:style-name="Text_20_body">Primer deseo.</text:p>
      <text:p text:style-name="Text_20_body">Primer regalo.</text:p>
      <text:p text:style-name="Horizontal_20_Line"/>
      <text:h text:style-name="Heading_20_1" text:outline-level="1">Acto II - La transformación</text:h>
      <text:p text:style-name="Text_20_body">Aquí están tus seis fases.</text:p>
      <text:h text:style-name="Heading_20_3" text:outline-level="3">Capítulo 3 - El regalo</text:h>
      <text:p text:style-name="Text_20_body">Primer beneficio.</text:p>
      <text:p text:style-name="Text_20_body">Todo parece maravilloso.</text:p>
      <text:p text:style-name="Horizontal_20_Line"/>
      <text:h text:style-name="Heading_20_3" text:outline-level="3">Capítulo 4 - La sospecha</text:h>
      <text:p text:style-name="Text_20_body">Aparece la primera desaparición.</text:p>
      <text:p text:style-name="Text_20_body">La hermana menor empieza a inquietarse.</text:p>
      <text:p text:style-name="Horizontal_20_Line"/>
      <text:h text:style-name="Heading_20_3" text:outline-level="3">Capítulo 5 - La justificación</text:h>
      <text:p text:style-name="Text_20_body">La mayor vuelve a usar la lámpara.</text:p>
      <text:p text:style-name="Text_20_body">Encuentra excusas.</text:p>
      <text:p text:style-name="Horizontal_20_Line"/>
      <text:h text:style-name="Heading_20_3" text:outline-level="3"><text:soft-page-break/>Capítulo 6 - La racionalización</text:h>
      <text:p text:style-name="Text_20_body">Ya conoce el precio.</text:p>
      <text:p text:style-name="Text_20_body">Pero sigue adelante.</text:p>
      <text:p text:style-name="Horizontal_20_Line"/>
      <text:h text:style-name="Heading_20_3" text:outline-level="3">Capítulo 7 - La inversión moral</text:h>
      <text:p text:style-name="Text_20_body">Empieza a considerar aceptables las desapariciones.</text:p>
      <text:p text:style-name="Text_20_body">La menor se asusta.</text:p>
      <text:p text:style-name="Horizontal_20_Line"/>
      <text:h text:style-name="Heading_20_3" text:outline-level="3">Capítulo 8 - La corrupción</text:h>
      <text:p text:style-name="Text_20_body">La mayor ya no se parece a la persona que llegó al pueblo.</text:p>
      <text:p text:style-name="Text_20_body">La menor comprende que está perdiendo a su hermana.</text:p>
      <text:p text:style-name="Horizontal_20_Line"/>
      <text:h text:style-name="Heading_20_1" text:outline-level="1">Acto III - La sombra</text:h>
      <text:h text:style-name="Heading_20_3" text:outline-level="3">Capítulo 9 - La última petición</text:h>
      <text:p text:style-name="Text_20_body">La hermana mayor realiza un deseo especialmente oscuro.</text:p>
      <text:p text:style-name="Text_20_body">La hermana menor intenta detenerla.</text:p>
      <text:p text:style-name="Horizontal_20_Line"/>
      <text:h text:style-name="Heading_20_3" text:outline-level="3">Capítulo 10 - La lámpara rota</text:h>
      <text:p text:style-name="Text_20_body">La lámpara se rompe.</text:p>
      <text:p text:style-name="Text_20_body">La hermana mayor desaparece.</text:p>
      <text:p text:style-name="Text_20_body">La sombra desaparece.</text:p>
      <text:p text:style-name="Text_20_body">Silencio.</text:p>
      <text:p text:style-name="Text_20_body">La menor cree haber terminado con el horror.</text:p>
      <text:p text:style-name="Horizontal_20_Line"/>
      <text:h text:style-name="Heading_20_3" text:outline-level="3">Capítulo 11 - La carreta</text:h>
      <text:p text:style-name="Text_20_body">Amanece.</text:p>
      <text:p text:style-name="Text_20_body">La hermana menor abandona el pueblo.</text:p>
      <text:p text:style-name="Text_20_body">Mira por última vez las calles.</text:p>
      <text:p text:style-name="Text_20_body"><text:soft-page-break/>Todo parece normal.</text:p>
      <text:p text:style-name="Horizontal_20_Line"/>
      <text:h text:style-name="Heading_20_3" text:outline-level="3">Capítulo 12 - La reunión</text:h>
      <text:p text:style-name="Text_20_body">Ve a una mujer caminando hacia el granero.</text:p>
      <text:p text:style-name="Text_20_body">Lleva una lámpara.</text:p>
      <text:p text:style-name="Text_20_body">La misma lámpara.</text:p>
      <text:p text:style-name="Text_20_body">Dentro está reunido todo el pueblo.</text:p>
      <text:p text:style-name="Text_20_body">La mujer abre la puerta.</text:p>
      <text:p text:style-name="Text_20_body">La hermana menor observa.</text:p>
      <text:p text:style-name="Text_20_body">La carreta sigue avanzando.</text:p>
      <text:p text:style-name="Text_20_body">Fin.</text:p>
      <text:p text:style-name="Horizontal_20_Line"/>
      <text:h text:style-name="Heading_20_2" text:outline-level="2">Y aquí aparece una posibilidad muy interesante</text:h>
      <text:p text:style-name="Text_20_body">Fabhrius podría cerrar el cuento con una reflexión que no hable de la lámpara.</text:p>
      <text:p text:style-name="Text_20_body">Podría hablar de las personas.</text:p>
      <text:p text:style-name="Text_20_body">Algo cercano a:</text:p>
      <text:p text:style-name="Quotations">Los sistemas inteligentes cambian constantemente para adaptarse a su entorno.</text:p>
      <text:p text:style-name="Quotations">También lo hacen las personas.</text:p>
      <text:p text:style-name="Quotations">Cada decisión modifica ligeramente al individuo que la toma.</text:p>
      <text:p text:style-name="Quotations">Y aunque esos cambios sean imperceptibles, se acumulan.</text:p>
      <text:p text:style-name="Quotations">Con el tiempo pueden transformar por completo a alguien sin que exista un instante preciso en que dejó de ser quien era.</text:p>
      <text:p text:style-name="Quotations">La identidad no es una posesión.</text:p>
      <text:p text:style-name="Quotations">Es un proceso.</text:p>
      <text:p text:style-name="Text_20_body">Y entonces el lector comprende algo inquietante:</text:p>
      <text:p text:style-name="Text_20_body">La historia nunca trató realmente sobre una lámpara indestructible.</text:p>
      <text:p text:style-name="Text_20_body">Trató sobre una transformación que ocurre en todos nosotros, sólo que normalmente es tan lenta que nadie la nota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0T13:50:38.617000000</meta:creation-date>
    <dc:date>2026-07-10T13:59:05.723000000</dc:date>
    <meta:editing-duration>PT8M27S</meta:editing-duration>
    <meta:editing-cycles>1</meta:editing-cycles>
    <meta:document-statistic meta:table-count="0" meta:image-count="0" meta:object-count="0" meta:page-count="6" meta:paragraph-count="119" meta:word-count="708" meta:character-count="4210" meta:non-whitespace-character-count="3626"/>
    <meta:generator>LibreOffice/7.3.5.2$Windows_X86_64 LibreOffice_project/184fe81b8c8c30d8b5082578aee2fed2ea847c01</meta:generator>
  </office:meta>
</office:document-meta>
</file>