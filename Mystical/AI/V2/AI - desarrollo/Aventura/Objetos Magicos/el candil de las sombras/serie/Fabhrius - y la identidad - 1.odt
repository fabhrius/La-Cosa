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tema puede convertirse en uno de los pilares filosóficos más fuertes de <text:span text:style-name="Emphasis">Omniscientis</text:span>, porque conecta directamente con una pregunta existencial fundamental:</text:p>
      <text:p text:style-name="Text_20_body"><text:span text:style-name="Strong_20_Emphasis">Si todo cambia, ¿qué significa ser la misma persona?</text:span></text:p>
      <text:p text:style-name="Text_20_body">Lo interesante es que Fabhrius no debería responder la pregunta de forma directa. Debería mostrar que la continuidad perfecta de la identidad es imposible.</text:p>
      <text:p text:style-name="Text_20_body">No porque exista un fallo.</text:p>
      <text:p text:style-name="Text_20_body">Sino porque el cambio es inseparable de la vida.</text:p>
      <text:p text:style-name="Text_20_body">Podríamos construir una serie de fragmentos, cada uno revelando una causa distinta de la inestabilidad de la identidad.</text:p>
      <text:p text:style-name="Horizontal_20_Line"/>
      <text:h text:style-name="Heading_20_3" text:outline-level="3">El estado interno cambia</text:h>
      <text:p text:style-name="Quotations"><text:span text:style-name="Strong_20_Emphasis">( Omniscientis — Fragment XX )</text:span></text:p>
      <text:p text:style-name="Quotations">No being remains in the same state.</text:p>
      <text:p text:style-name="Quotations">The joy of yesterday,<text:line-break/>the fear of tomorrow,<text:line-break/>the sorrow of loss,<text:line-break/>all reshape the one who carries them.</text:p>
      <text:p text:style-name="Quotations">Thus no soul crosses the same river twice.</text:p>
      <text:p text:style-name="Quotations">— Fabhrius</text:p>
      <text:p text:style-name="Horizontal_20_Line"/>
      <text:h text:style-name="Heading_20_3" text:outline-level="3">La información se actualiza</text:h>
      <text:p text:style-name="Quotations"><text:span text:style-name="Strong_20_Emphasis">( Omniscientis — Fragment XXI )</text:span></text:p>
      <text:p text:style-name="Quotations">Every truth received<text:line-break/>alters the one who receives it.</text:p>
      <text:p text:style-name="Quotations">For knowledge is not placed upon the mind.</text:p>
      <text:p text:style-name="Quotations">It becomes part of the mind.</text:p>
      <text:p text:style-name="Quotations">Thus each answer<text:line-break/>demands the death of a former self.</text:p>
      <text:p text:style-name="Quotations">— Fabhrius</text:p>
      <text:p text:style-name="Horizontal_20_Line"/>
      <text:h text:style-name="Heading_20_3" text:outline-level="3"><text:soft-page-break/>Las representaciones se transforman</text:h>
      <text:p text:style-name="Quotations"><text:span text:style-name="Strong_20_Emphasis">( Omniscientis — Fragment XXII )</text:span></text:p>
      <text:p text:style-name="Quotations">The world is not seen.</text:p>
      <text:p text:style-name="Quotations">It is imagined.</text:p>
      <text:p text:style-name="Quotations">And as the vision changes,<text:line-break/>so too changes the seer.</text:p>
      <text:p text:style-name="Quotations">For none may alter their understanding<text:line-break/>without altering themselves.</text:p>
      <text:p text:style-name="Quotations">— Fabhrius</text:p>
      <text:p text:style-name="Horizontal_20_Line"/>
      <text:h text:style-name="Heading_20_3" text:outline-level="3">Los propósitos cambian</text:h>
      <text:p text:style-name="Quotations"><text:span text:style-name="Strong_20_Emphasis">( Omniscientis — Fragment XXIII )</text:span></text:p>
      <text:p text:style-name="Quotations">The destination shapes the traveler.</text:p>
      <text:p text:style-name="Quotations">Change the destination,<text:line-break/>and the traveler becomes another.</text:p>
      <text:p text:style-name="Quotations">For purpose is not merely followed.</text:p>
      <text:p text:style-name="Quotations">Purpose transforms.</text:p>
      <text:p text:style-name="Quotations">— Fabhrius</text:p>
      <text:p text:style-name="Horizontal_20_Line"/>
      <text:h text:style-name="Heading_20_3" text:outline-level="3">La memoria se degrada y reconstruye</text:h>
      <text:p text:style-name="Quotations"><text:span text:style-name="Strong_20_Emphasis">( Omniscientis — Fragment XXIV )</text:span></text:p>
      <text:p text:style-name="Quotations">Memory is not a vault of stone.</text:p>
      <text:p text:style-name="Quotations">It is a story told and retold.</text:p>
      <text:p text:style-name="Quotations">Each remembrance<text:line-break/>reshapes what is remembered.</text:p>
      <text:p text:style-name="Quotations">Thus the past itself<text:line-break/>drifts through time.</text:p>
      <text:p text:style-name="Quotations"><text:soft-page-break/>— Fabhrius</text:p>
      <text:p text:style-name="Horizontal_20_Line"/>
      <text:h text:style-name="Heading_20_3" text:outline-level="3">El entorno transforma al individuo</text:h>
      <text:p text:style-name="Quotations"><text:span text:style-name="Strong_20_Emphasis">( Omniscientis — Fragment XXV )</text:span></text:p>
      <text:p text:style-name="Quotations">No soul stands apart from the world.</text:p>
      <text:p text:style-name="Quotations">Every voice heard,<text:line-break/>every hand touched,<text:line-break/>every wound received,<text:line-break/>leaves its mark.</text:p>
      <text:p text:style-name="Quotations">To live among others<text:line-break/>is to become other.</text:p>
      <text:p text:style-name="Quotations">— Fabhrius</text:p>
      <text:p text:style-name="Horizontal_20_Line"/>
      <text:h text:style-name="Heading_20_3" text:outline-level="3">El cuerpo cambia</text:h>
      <text:p text:style-name="Quotations"><text:span text:style-name="Strong_20_Emphasis">( Omniscientis — Fragment XXVI )</text:span></text:p>
      <text:p text:style-name="Quotations">The flesh renews itself,<text:line-break/>yet calls itself the same.</text:p>
      <text:p text:style-name="Quotations">Seasons pass through the body<text:line-break/>as winds pass through forests.</text:p>
      <text:p text:style-name="Quotations">What remains<text:line-break/>is not what was.</text:p>
      <text:p text:style-name="Quotations">— Fabhrius</text:p>
      <text:p text:style-name="Horizontal_20_Line"/>
      <text:h text:style-name="Heading_20_3" text:outline-level="3">Las decisiones modifican al decisor</text:h>
      <text:p text:style-name="Quotations"><text:span text:style-name="Strong_20_Emphasis">( Omniscientis — Fragment XXVII )</text:span></text:p>
      <text:p text:style-name="Quotations">Every choice closes a thousand paths.</text:p>
      <text:p text:style-name="Quotations">And in closing them,<text:line-break/>transforms the chooser.</text:p>
      <text:p text:style-name="Quotations">Thus destiny is not found.</text:p>
      <text:p text:style-name="Quotations"><text:soft-page-break/>It is forged.</text:p>
      <text:p text:style-name="Quotations">— Fabhrius</text:p>
      <text:p text:style-name="Horizontal_20_Line"/>
      <text:h text:style-name="Heading_20_3" text:outline-level="3">La adaptación exige transformación</text:h>
      <text:p text:style-name="Quotations"><text:span text:style-name="Strong_20_Emphasis">( Omniscientis — Fragment XXVIII )</text:span></text:p>
      <text:p text:style-name="Quotations">That which refuses to change<text:line-break/>cannot endure.</text:p>
      <text:p text:style-name="Quotations">Yet that which changes without measure<text:line-break/>cannot remain.</text:p>
      <text:p text:style-name="Quotations">Life walks forever<text:line-break/>between forgetting and becoming.</text:p>
      <text:p text:style-name="Quotations">— Fabhrius</text:p>
      <text:p text:style-name="Horizontal_20_Line"/>
      <text:h text:style-name="Heading_20_3" text:outline-level="3">La identidad perfecta es imposible</text:h>
      <text:p text:style-name="Quotations"><text:span text:style-name="Strong_20_Emphasis">( Omniscientis — Fragment XXIX )</text:span></text:p>
      <text:p text:style-name="Quotations">Many seek their true self,<text:line-break/>believing it waits unchanged beneath the years.</text:p>
      <text:p text:style-name="Quotations">Yet the self is not a hidden treasure.</text:p>
      <text:p text:style-name="Quotations">It is a flame.</text:p>
      <text:p text:style-name="Quotations">And a flame survives<text:line-break/>only by consuming what it once was.</text:p>
      <text:p text:style-name="Quotations">— Fabhrius</text:p>
      <text:p text:style-name="Horizontal_20_Line"/>
      <text:p text:style-name="Text_20_body">Observa que todos estos fragmentos apuntan a una misma revelación, pero desde ángulos distintos:</text:p>
      <text:list xml:id="list3545764176" text:style-name="L1">
        <text:list-item>
          <text:p text:style-name="P1">cambio de estado,</text:p>
        </text:list-item>
        <text:list-item>
          <text:p text:style-name="P1">aprendizaje,</text:p>
        </text:list-item>
        <text:list-item>
          <text:p text:style-name="P1">percepción,</text:p>
        </text:list-item>
        <text:list-item>
          <text:p text:style-name="P1">propósito,</text:p>
        </text:list-item>
        <text:list-item>
          <text:p text:style-name="P1"><text:soft-page-break/>memoria,</text:p>
        </text:list-item>
        <text:list-item>
          <text:p text:style-name="P1">entorno,</text:p>
        </text:list-item>
        <text:list-item>
          <text:p text:style-name="P1">cuerpo,</text:p>
        </text:list-item>
        <text:list-item>
          <text:p text:style-name="P1">decisiones,</text:p>
        </text:list-item>
        <text:list-item>
          <text:p text:style-name="P1">adaptación,</text:p>
        </text:list-item>
        <text:list-item>
          <text:p text:style-name="P1">paso del tiempo.</text:p>
        </text:list-item>
      </text:list>
      <text:p text:style-name="Text_20_body">Y todos convergen en una idea que podría convertirse en una de las doctrinas centrales de <text:span text:style-name="Emphasis">Omniscientis</text:span>:</text:p>
      <text:p text:style-name="Quotations"><text:span text:style-name="Strong_20_Emphasis">The self is not a thing that endures unchanged.</text:span></text:p>
      <text:p text:style-name="Quotations"><text:span text:style-name="Strong_20_Emphasis">The self is a process that persists through change.</text:span></text:p>
      <text:p text:style-name="Text_20_body">Esa idea encaja muy bien con tu modelo de la vida como sistema inteligente, porque en realidad es la misma paradoja que aparece en la vida, en la identidad personal y en los sistemas complejos: no permanecen iguales, y sin embargo siguen siendo reconociblemente ellos mis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6T10:54:46.927000000</meta:creation-date>
    <dc:date>2026-07-16T10:55:24.974000000</dc:date>
    <meta:editing-duration>PT38S</meta:editing-duration>
    <meta:editing-cycles>1</meta:editing-cycles>
    <meta:document-statistic meta:table-count="0" meta:image-count="0" meta:object-count="0" meta:page-count="5" meta:paragraph-count="87" meta:word-count="581" meta:character-count="3512" meta:non-whitespace-character-count="3008"/>
    <meta:generator>LibreOffice/7.3.5.2$Windows_X86_64 LibreOffice_project/184fe81b8c8c30d8b5082578aee2fed2ea847c01</meta:generator>
  </office:meta>
</office:document-meta>
</file>