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20c62"/>
    </style:style>
    <style:style style:name="T1" style:family="text">
      <style:text-properties officeooo:rsid="0000aa3f"/>
    </style:style>
    <style:style style:name="T2" style:family="text">
      <style:text-properties officeooo:rsid="00016823"/>
    </style:style>
    <style:style style:name="T3" style:family="text">
      <style:text-properties officeooo:rsid="00020c62"/>
    </style:style>
    <style:style style:name="T4" style:family="text">
      <style:text-properties officeooo:rsid="000286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apítulo 3 - Regalos</text:h>
      <text:h text:style-name="Heading_20_2" text:outline-level="2">Parte 1 - La mañana siguiente</text:h>
      <text:p text:style-name="Text_20_body">El cansancio terminó venciendo al miedo.</text:p>
      <text:p text:style-name="Text_20_body">En algún momento de la noche, abrazadas junto a la puerta atrancada, las dos hermanas se quedaron dormidas.</text:p>
      <text:p text:style-name="Text_20_body">Cuando despertaron, el sol ya iluminaba el interior de la casa.</text:p>
      <text:p text:style-name="Text_20_body">Los rayos de la mañana entraban por las ventanas y llenaban la sala de una luz cálida y tranquila.</text:p>
      <text:p text:style-name="Text_20_body">La tormenta había desaparecido.</text:p>
      <text:p text:style-name="Text_20_body">Todo parecía normal.</text:p>
      <text:p text:style-name="Text_20_body"><text:span text:style-name="T1">L</text:span>as sombras de la noche anterior habían sido<text:span text:style-name="T1">, posiblemente, </text:span>un sueño.</text:p>
      <text:p text:style-name="Text_20_body">Se incorporó lentamente.</text:p>
      <text:p text:style-name="Text_20_body">Y entonces vio la mesa.</text:p>
      <text:p text:style-name="Text_20_body"><text:span text:style-name="T1">E</text:span>staba cubierta de comida.<text:span text:style-name="T1"> U</text:span>n auténtico banquete.</text:p>
      <text:p text:style-name="Text_20_body">Había un gran pavo asado rodeado de patatas doradas.<text:span text:style-name="T1"> </text:span>Una pierna de cerdo.<text:span text:style-name="T1"> </text:span>Queso.<text:span text:style-name="T1"> </text:span>Fruta.<text:span text:style-name="T1"> </text:span>Pan <text:span text:style-name="T1">, l</text:span>eche.</text:p>
      <text:p text:style-name="Text_20_body">Durante unos segundos contempló la escena<text:span text:style-name="T1"> s</text:span>in comprender.</text:p>
      <text:p text:style-name="Text_20_body">Corrió hacia la mesa.<text:span text:style-name="T1"> </text:span>Arrancó un trozo de pan.<text:span text:style-name="T1"> Y l</text:span>o devoró.</text:p>
      <text:p text:style-name="Text_20_body">—¡Kahsia! —gritó—. ¡Despierta!</text:p>
      <text:p text:style-name="Text_20_body">La pequeña abrió los ojos sobresaltada.</text:p>
      <text:p text:style-name="Text_20_body">—¿Qué ocurre?</text:p>
      <text:p text:style-name="Text_20_body"><text:span text:style-name="T2">E</text:span>ntonces Kahsia descubrió <text:span text:style-name="T2">que estaba</text:span> sujetando una muñeca de trapo contra el pecho.</text:p>
      <text:p text:style-name="Text_20_body">—Es la señorita Lily<text:span text:style-name="T2">!</text:span></text:p>
      <text:p text:style-name="Text_20_body">Rylhet observó la muñeca.</text:p>
      <text:p text:style-name="Text_20_body"><text:span text:style-name="T2">Era ella, sin duda, l</text:span>a señorita Lily.</text:p>
      <text:p text:style-name="Text_20_body">La muñeca que había quedado olvidada en algún punto lejano del camino.</text:p>
      <text:p text:style-name="Text_20_body">—¿Cómo ha llegado aquí?</text:p>
      <text:p text:style-name="Text_20_body">Rylhet no respondió.</text:p>
      <text:p text:style-name="Text_20_body">Miró la comida.</text:p>
      <text:p text:style-name="Text_20_body">Miró la muñeca.</text:p>
      <text:p text:style-name="Text_20_body"><text:soft-page-break/><text:span text:style-name="T2">O</text:span>bservó la habitación vacía.</text:p>
      <text:p text:style-name="P1">—¿Tía Tagha<text:span text:style-name="T2">?</text:span></text:p>
      <text:p text:style-name="Text_20_body">Kahsia levantó la vista.</text:p>
      <text:p text:style-name="Text_20_body">—¿Crees que fue ella?</text:p>
      <text:p text:style-name="Text_20_body">—Tiene que haber sido ella.</text:p>
      <text:p text:style-name="Text_20_body">No existía ninguna otra explicación razonable.</text:p>
      <text:p text:style-name="Text_20_body">Tagha había regresado durante la noche.<text:span text:style-name="T3"> </text:span>Y después había vuelto a marcharse.</text:p>
      <text:p text:style-name="Text_20_body">Sí.<text:span text:style-name="T2"> </text:span>Tenía que ser eso.</text:p>
      <text:p text:style-name="Text_20_body">Quizá estaba en el pueblo.<text:span text:style-name="T2"> </text:span><text:span text:style-name="T4">Tal vez</text:span> había salido a trabajar.</text:p>
      <text:p text:style-name="Text_20_body"><text:span text:style-name="T4">Posiblemente</text:span> regresaría aquella misma tarde.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13T15:47:45.186000000</meta:creation-date>
    <dc:date>2026-07-13T16:10:00.221000000</dc:date>
    <meta:editing-duration>PT12M3S</meta:editing-duration>
    <meta:editing-cycles>4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37" meta:word-count="258" meta:character-count="1538" meta:non-whitespace-character-count="1318"/>
  </office:meta>
</office:document-meta>
</file>