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029" officeooo:paragraph-rsid="0008d029"/>
    </style:style>
    <style:style style:name="P2" style:family="paragraph" style:parent-style-name="Quotations">
      <style:text-properties officeooo:paragraph-rsid="0008d029"/>
    </style:style>
    <style:style style:name="P3" style:family="paragraph" style:parent-style-name="Text_20_body">
      <style:text-properties officeooo:rsid="0008d029" officeooo:paragraph-rsid="0008d029"/>
    </style:style>
    <style:style style:name="P4" style:family="paragraph" style:parent-style-name="Text_20_body">
      <style:text-properties officeooo:paragraph-rsid="0008d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2 - Visitando el pueblo</text:h>
      <text:p text:style-name="Text_20_body">Después de desayunar decidieron acercarse al pueblo.</text:p>
      <text:p text:style-name="Text_20_body">Coldrock se encontraba a pocos minutos de la casa de Tagha, siguiendo un sendero que descendía por la ladera entre pinos y afloramientos de roca gris.</text:p>
      <text:p text:style-name="Text_20_body">La mañana era luminosa.</text:p>
      <text:p text:style-name="Text_20_body">El aire olía a tierra húmeda después de la tormenta.</text:p>
      <text:p text:style-name="Text_20_body">Por primera vez desde que habían llegado, las dos hermanas podían contemplar el paisaje sin la preocupación constante del hambre.</text:p>
      <text:p text:style-name="Text_20_body">El pueblo resultó más agradable de lo que habían imaginado.</text:p>
      <text:p text:style-name="Text_20_body">Las casas estaban bien cuidadas.</text:p>
      <text:p text:style-name="Text_20_body">Las calles eran limpias.</text:p>
      <text:p text:style-name="Text_20_body">Había pequeños jardines frente a muchas viviendas.</text:p>
      <text:p text:style-name="Text_20_body">Una iglesia de piedra dominaba la plaza principal.</text:p>
      <text:p text:style-name="Text_20_body">También había una escuela, una herrería, una sala comunal y una posada donde los viajeros podían pasar la noche.</text:p>
      <text:p text:style-name="Text_20_body">Parecía un lugar tranquilo.</text:p>
      <text:p text:style-name="Text_20_body">Un lugar donde una persona podía construir una nueva vida.</text:p>
      <text:p text:style-name="Text_20_body">Pero algo no encajaba.</text:p>
      <text:p text:style-name="Text_20_body">A medida que se acercaban a la plaza comenzaron a notar una extraña tensión en el ambiente.</text:p>
      <text:p text:style-name="Text_20_body">Grupos de vecinos permanecían reunidos en las esquinas.</text:p>
      <text:p text:style-name="Text_20_body">Hablaban en voz baja.</text:p>
      <text:p text:style-name="Text_20_body">Intercambiaban miradas nerviosas.</text:p>
      <text:p text:style-name="Text_20_body">Algunos parecían asustados.</text:p>
      <text:p text:style-name="Text_20_body">Otros simplemente confundidos.</text:p>
      <text:p text:style-name="Text_20_body">La mayoría miraba en dirección a la posada.</text:p>
      <text:p text:style-name="Text_20_body">Las hermanas siguieron aquellas miradas.</text:p>
      <text:p text:style-name="Text_20_body">Una multitud se había congregado frente al edificio.</text:p>
      <text:p text:style-name="Text_20_body">Nadie gritaba.</text:p>
      <text:p text:style-name="Text_20_body">Nadie discutía.</text:p>
      <text:p text:style-name="Text_20_body">Aquello era incluso más inquietante.</text:p>
      <text:p text:style-name="Text_20_body"><text:soft-page-break/>La gente susurraba.</text:p>
      <text:p text:style-name="Text_20_body">Como si temiera pronunciar ciertas palabras en voz alta.</text:p>
      <text:p text:style-name="Text_20_body">La puerta de la posada permanecía abierta.</text:p>
      <text:p text:style-name="Text_20_body">Pero nadie entraba.</text:p>
      <text:p text:style-name="Text_20_body">Ni nadie salía.</text:p>
      <text:p text:style-name="Text_20_body">Todos permanecían allí.</text:p>
      <text:p text:style-name="Text_20_body">Observando.</text:p>
      <text:p text:style-name="Text_20_body">Esperando.</text:p>
      <text:p text:style-name="Text_20_body">Las dos hermanas se aproximaron con cautela.</text:p>
      <text:p text:style-name="Text_20_body">Buscaron entre los rostros conocidos.</text:p>
      <text:p text:style-name="Text_20_body">Quizá Tagha estuviera allí.</text:p>
      <text:p text:style-name="Text_20_body">Pero no la encontraron.</text:p>
      <text:p text:style-name="Text_20_body">Entonces apareció un hombre uniformado.</text:p>
      <text:p text:style-name="Text_20_body">Salió de la posada acompañado por otro vecino.</text:p>
      <text:p text:style-name="Text_20_body">Ambos tenían el rostro serio.</text:p>
      <text:p text:style-name="Text_20_body">Hablaron brevemente con varias personas de la multitud y después se alejaron a paso rápido hacia la plaza.</text:p>
      <text:p text:style-name="Text_20_body">Parecían tener demasiadas cosas que hacer.</text:p>
      <text:p text:style-name="Text_20_body">Y demasiado poco tiempo.</text:p>
      <text:p text:style-name="Text_20_body">Kahsia observó a una anciana que permanecía junto a la entrada.</text:p>
      <text:p text:style-name="Text_20_body">La mujer tenía los ojos enrojecidos.</text:p>
      <text:p text:style-name="Text_20_body">—¿Qué ha ocurrido? —preguntó con timidez.</text:p>
      <text:p text:style-name="Text_20_body">La anciana tardó unos segundos en responder.</text:p>
      <text:p text:style-name="Text_20_body">Como si aún estuviera intentando aceptar lo sucedido.</text:p>
      <text:p text:style-name="Text_20_body">—Han matado a Janhs.</text:p>
      <text:p text:style-name="Text_20_body">—¿Quién es Janhs? —preguntó Rylhet.</text:p>
      <text:p text:style-name="Text_20_body">—El cocinero de la posada.</text:p>
      <text:p text:style-name="Text_20_body">La anciana tragó saliva.</text:p>
      <text:p text:style-name="Text_20_body">Miró hacia la puerta abierta.</text:p>
      <text:p text:style-name="Text_20_body">Y bajó la voz todavía más.</text:p>
      <text:p text:style-name="Text_20_body"><text:soft-page-break/>—Lo encontraron esta mañana.</text:p>
      <text:p text:style-name="Text_20_body">Las hermanas permanecieron en silencio.</text:p>
      <text:p text:style-name="Text_20_body">—¿Qué le pasó?</text:p>
      <text:p text:style-name="Text_20_body">La mujer negó lentamente con la cabeza.</text:p>
      <text:p text:style-name="Text_20_body">—No lo sé exactamente. Nadie parece entenderlo.</text:p>
      <text:p text:style-name="Text_20_body">Hizo una pausa.</text:p>
      <text:p text:style-name="Text_20_body">—Pero quien lo hizo utilizó los cuchillos de la cocina.</text:p>
      <text:p text:style-name="Text_20_body">La multitud cercana guardó silencio.</text:p>
      <text:p text:style-name="Text_20_body">Algunas personas apartaron la mirada.</text:p>
      <text:p text:style-name="Text_20_body">—Dicen que el lugar estaba cubierto de sangre.</text:p>
      <text:p text:style-name="Text_20_body">Kahsia sintió un escalofrío.</text:p>
      <text:p text:style-name="Text_20_body">—¿Fue un robo?</text:p>
      <text:p text:style-name="Text_20_body">—No.</text:p>
      <text:p text:style-name="Text_20_body">—¿Una pelea?</text:p>
      <text:p text:style-name="Text_20_body">—No.</text:p>
      <text:p text:style-name="Text_20_body">La anciana parecía sinceramente desconcertada.</text:p>
      <text:p text:style-name="Text_20_body">—Eso es lo extraño.</text:p>
      <text:p text:style-name="Text_20_body">Janhs no tenía enemigos.</text:p>
      <text:p text:style-name="Text_20_body">Era un buen hombre.</text:p>
      <text:p text:style-name="Text_20_body">Trabajador.</text:p>
      <text:p text:style-name="Text_20_body">Respetado.</text:p>
      <text:p text:style-name="Text_20_body">No faltaba dinero.</text:p>
      <text:p text:style-name="Text_20_body">No faltaba comida.</text:p>
      <text:p text:style-name="Text_20_body">No faltaba nada.</text:p>
      <text:p text:style-name="Text_20_body">La mujer observó la puerta de la posada una vez más.</text:p>
      <text:p text:style-name="Text_20_body">—Parece que alguien lo mató simplemente porque podía hacerlo.</text:p>
      <text:p text:style-name="Text_20_body">Las palabras quedaron suspendidas en el aire.</text:p>
      <text:p text:style-name="Text_20_body">Durante unos instantes nadie dijo nada.</text:p>
      <text:p text:style-name="Text_20_body">La mañana seguía siendo luminosa.</text:p>
      <text:p text:style-name="Text_20_body">El sol seguía brillando sobre Coldrock.</text:p>
      <text:p text:style-name="Text_20_body"><text:soft-page-break/>Los pájaros continuaban cantando en los árboles.</text:p>
      <text:p text:style-name="Text_20_body">Y sin embargo, por primera vez desde su llegada, las dos hermanas sintieron que algo oscuro se ocultaba bajo la aparente tranquilidad del pueblo.</text:p>
      <text:p text:style-name="Text_20_body">Algo que todavía no podían comprender.</text:p>
      <text:p text:style-name="Text_20_body">Algo que había despertado durante la noche.</text:p>
      <text:p text:style-name="Text_20_body"/>
      <text:p text:style-name="Text_20_body"/>
      <text:p text:style-name="Horizontal_20_Line"/>
      <text:p text:style-name="Text_20_body"/>
      <text:p text:style-name="Text_20_body"/>
      <text:p text:style-name="P3">(REFACTORIZACION - VERSION MAS OSCURA)</text:p>
      <text:p text:style-name="P3"/>
      <text:p text:style-name="P3"/>
      <text:p text:style-name="P3"/>
      <text:p text:style-name="P4"/>
      <text:p text:style-name="P4">Después de desayunar salieron a conocer el pueblo.</text:p>
      <text:p text:style-name="P4">La mañana era fresca y luminosa.</text:p>
      <text:p text:style-name="P4">El cielo estaba despejado.</text:p>
      <text:p text:style-name="P4">Por primera vez en mucho tiempo las dos hermanas caminaban sin preocuparse por el hambre.</text:p>
      <text:p text:style-name="P4">Tenían un techo.</text:p>
      <text:p text:style-name="P4">Habían llegado a la casa de su tía.</text:p>
      <text:p text:style-name="P4">Kahsia había recuperado a la señorita Lily.</text:p>
      <text:p text:style-name="P4">Y si Tagha regresaba aquella tarde, tal vez todo empezaría a mejorar.</text:p>
      <text:p text:style-name="P4">Coldrock parecía un buen lugar para vivir.</text:p>
      <text:p text:style-name="P4">Las calles eran limpias.</text:p>
      <text:p text:style-name="P4">Las casas estaban bien cuidadas.</text:p>
      <text:p text:style-name="P4">En los jardines crecían flores tempranas de primavera.</text:p>
      <text:p text:style-name="P4">Los vecinos que encontraban a su paso les dedicaban saludos amables.</text:p>
      <text:p text:style-name="P4">Nada hacía pensar que algo pudiera ir mal allí.</text:p>
      <text:p text:style-name="P4">Hasta que llegaron a la plaza.</text:p>
      <text:p text:style-name="P4"><text:soft-page-break/>Entonces lo vieron.</text:p>
      <text:p text:style-name="P4">Una multitud se había reunido frente a la posada.</text:p>
      <text:p text:style-name="P4">Había demasiada gente.</text:p>
      <text:p text:style-name="P4">Demasiado silencio.</text:p>
      <text:p text:style-name="P4">Nadie lloraba.</text:p>
      <text:p text:style-name="P4">Nadie gritaba.</text:p>
      <text:p text:style-name="P4">La gente permanecía inmóvil.</text:p>
      <text:p text:style-name="P4">Agrupada frente a la puerta abierta.</text:p>
      <text:p text:style-name="P4">Susurrando.</text:p>
      <text:p text:style-name="P4">Mirando siempre hacia el interior.</text:p>
      <text:p text:style-name="P4">Como si no pudieran apartar la vista.</text:p>
      <text:p text:style-name="P4">Las hermanas se acercaron.</text:p>
      <text:p text:style-name="P4">Intentaron localizar a Tagha entre los rostros.</text:p>
      <text:p text:style-name="P4">No estaba.</text:p>
      <text:p text:style-name="P4">Entonces un policía salió del edificio acompañado por dos hombres.</text:p>
      <text:p text:style-name="P4">Uno de ellos parecía a punto de vomitar.</text:p>
      <text:p text:style-name="P4">El otro tenía manchas oscuras en las mangas de la camisa.</text:p>
      <text:p text:style-name="P4">Hablaron con varios vecinos y se alejaron rápidamente.</text:p>
      <text:p text:style-name="P4">Nadie les hizo preguntas.</text:p>
      <text:p text:style-name="P4">Nadie parecía querer escuchar las respuestas.</text:p>
      <text:p text:style-name="P4">Kahsia observó a una anciana que permanecía junto a la puerta.</text:p>
      <text:p text:style-name="P4">Era una mujer muy delgada.</text:p>
      <text:p text:style-name="P4">Demasiado delgada.</text:p>
      <text:p text:style-name="P4">Su piel parecía cuero seco.</text:p>
      <text:p text:style-name="P4">Y sus dedos huesudos se aferraban a un bastón nudoso como si fuera la única cosa que la mantenía en pie.</text:p>
      <text:p text:style-name="P4">—¿Qué ha ocurrido? —preguntó Kahsia.</text:p>
      <text:p text:style-name="P4">La anciana giró lentamente la cabeza.</text:p>
      <text:p text:style-name="P4">Sus ojos grises se posaron sobre las niñas.</text:p>
      <text:p text:style-name="P4">Durante unos segundos no respondió.</text:p>
      <text:p text:style-name="P4"><text:soft-page-break/>Simplemente las observó.</text:p>
      <text:p text:style-name="P4">Como si estuviera valorando si debían conocer la verdad.</text:p>
      <text:p text:style-name="P4">Finalmente habló.</text:p>
      <text:p text:style-name="P4">—Han matado a Janhs.</text:p>
      <text:p text:style-name="P4">—¿Quién es Janhs? —preguntó Rylhet.</text:p>
      <text:p text:style-name="P4">—El cocinero.</text:p>
      <text:p text:style-name="P4">Su voz era apenas un susurro.</text:p>
      <text:p text:style-name="P4">Una voz gastada.</text:p>
      <text:p text:style-name="P4">Rota.</text:p>
      <text:p text:style-name="P4">—Lo encontraron esta mañana.</text:p>
      <text:p text:style-name="P4">Kahsia tragó saliva.</text:p>
      <text:p text:style-name="P4">—¿Qué le pasó?</text:p>
      <text:p text:style-name="P4">La anciana guardó silencio.</text:p>
      <text:p text:style-name="P4">Miró hacia la puerta de la posada.</text:p>
      <text:p text:style-name="P4">Luego volvió a mirar a las niñas.</text:p>
      <text:p text:style-name="P4">Y se inclinó ligeramente hacia ellas.</text:p>
      <text:p text:style-name="P4">—Lo cortaron en pedazos.</text:p>
      <text:p text:style-name="P4">Las hermanas quedaron inmóviles.</text:p>
      <text:p text:style-name="P4">—¿Qué?</text:p>
      <text:p text:style-name="P4">—Lo despedazaron.</text:p>
      <text:p text:style-name="P4">La anciana levantó una mano temblorosa.</text:p>
      <text:p text:style-name="P4">—Con los cuchillos de su propia cocina.</text:p>
      <text:p text:style-name="P4">Su voz descendió todavía más.</text:p>
      <text:p text:style-name="P4">—Y después arrojaron los trozos al fogón.</text:p>
      <text:p text:style-name="P4">El estómago de Kahsia se encogió.</text:p>
      <text:p text:style-name="P4">—¿Quién hizo eso?</text:p>
      <text:p text:style-name="P4">La anciana negó lentamente con la cabeza.</text:p>
      <text:p text:style-name="P4">—Nadie lo sabe.</text:p>
      <text:p text:style-name="P4">—¿Nadie vio nada?</text:p>
      <text:p text:style-name="P4">—No.</text:p>
      <text:p text:style-name="P4"><text:soft-page-break/>—Pero la posada está en medio del pueblo.</text:p>
      <text:p text:style-name="P4">—Lo sé.</text:p>
      <text:p text:style-name="P4">—Y Janhs era un hombre grande.</text:p>
      <text:p text:style-name="P4">—Lo sé.</text:p>
      <text:p text:style-name="P4">La anciana apretó con fuerza el bastón.</text:p>
      <text:p text:style-name="P4">Sus nudillos blanquearon.</text:p>
      <text:p text:style-name="P4">—Por eso la gente tiene miedo.</text:p>
      <text:p text:style-name="P4">Las niñas no dijeron nada.</text:p>
      <text:p text:style-name="P4">La mujer se acercó un poco más.</text:p>
      <text:p text:style-name="P4">Tanto que pudieron percibir el olor de su aliento.</text:p>
      <text:p text:style-name="P4">—Porque nadie entra en una cocina y hace algo así a un hombre como Janhs.</text:p>
      <text:p text:style-name="P4">—...</text:p>
      <text:p text:style-name="P4">—Nadie.</text:p>
      <text:p text:style-name="P4">La anciana volvió la mirada hacia la puerta abierta de la posada.</text:p>
      <text:p text:style-name="P4">Y por primera vez pareció realmente asustada.</text:p>
      <text:p text:style-name="P4">—Ni siquiera entre diez hombres podrían haberlo hecho sin que alguien oyera los gritos.</text:p>
      <text:p text:style-name="P4">Un escalofrío recorrió la espalda de Kahsia.</text:p>
      <text:p text:style-name="P4">—Entonces...</text:p>
      <text:p text:style-name="P4">La anciana respondió antes de que terminara la pregunta.</text:p>
      <text:p text:style-name="P4">—Algunos dicen que fue un demonio.</text:p>
      <text:p text:style-name="P4">Nadie se rió.</text:p>
      <text:p text:style-name="P4">Nadie protestó.</text:p>
      <text:p text:style-name="P4">Nadie dijo que aquello fuera una estupidez.</text:p>
      <text:p text:style-name="P4">La multitud siguió observando la oscuridad que se extendía más allá de la puerta de la posada.</text:p>
      <text:p text:style-name="P4">Y eso fue lo peor de todo.</text:p>
      <text:p text:style-name="P4">Porque durante un instante, las dos hermanas tuvieron la sensación de que aquellas personas realmente lo creí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6:23:42.542000000</meta:creation-date>
    <dc:date>2026-07-13T17:24:06.343000000</dc:date>
    <meta:editing-duration>PT6M5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191" meta:word-count="1158" meta:character-count="6991" meta:non-whitespace-character-count="6024"/>
  </office:meta>
</office:document-meta>
</file>