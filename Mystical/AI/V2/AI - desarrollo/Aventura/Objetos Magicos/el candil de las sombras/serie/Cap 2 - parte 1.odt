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5908"/>
    </style:style>
    <style:style style:name="T1" style:family="text">
      <style:text-properties officeooo:rsid="001159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pítulo 2 - La casa vacía</text:h>
      <text:h text:style-name="Heading_20_2" text:outline-level="2">Parte 1 - Dos hermanas huérfanas</text:h>
      <text:p text:style-name="Text_20_body">Los primeros días de abril habían llegado acompañados por lluvias persistentes y caminos embarrados cuando Kahsia y Rylhet alcanzaron finalmente las montañas de Coldrock.</text:p>
      <text:p text:style-name="Text_20_body">Habían partido de Ramasville, un pequeño pueblo de la región de Bosqueseco, varias jornadas atrás.</text:p>
      <text:p text:style-name="Text_20_body">El viaje había sido largo.</text:p>
      <text:p text:style-name="Text_20_body">Y también silencioso.</text:p>
      <text:p text:style-name="Text_20_body">Desde la muerte de su padre apenas hablaban de ello.</text:p>
      <text:p text:style-name="Text_20_body">No hacía falta.</text:p>
      <text:p text:style-name="Text_20_body">La ausencia viajaba con ellas.</text:p>
      <text:p text:style-name="Text_20_body">Se sentaba a su lado en cada carreta.</text:p>
      <text:p text:style-name="Text_20_body">Dormía junto a ellas por las noches.</text:p>
      <text:p text:style-name="Text_20_body">Las acompañaba en cada tramo del camino.</text:p>
      <text:p text:style-name="Text_20_body">Ahora estaban solas.</text:p>
      <text:p text:style-name="Text_20_body">Su madre había muerto años atrás.</text:p>
      <text:p text:style-name="Text_20_body">Y su padre había sido lo único que les quedaba.</text:p>
      <text:p text:style-name="Text_20_body">La única familia cercana que conocían era Tagha, hermana de su padre, una mujer que vivía aislada en las montañas próximas a Coldrock.</text:p>
      <text:p text:style-name="Text_20_body">Por eso habían emprendido el viaje.</text:p>
      <text:p text:style-name="Text_20_body">Debían comunicarle la noticia.</text:p>
      <text:p text:style-name="Text_20_body">Y quizá, si la fortuna les sonreía, encontrar junto a ella un lugar donde empezar de nuevo.</text:p>
      <text:p text:style-name="Text_20_body">No tenían otro destino.</text:p>
      <text:p text:style-name="Text_20_body">Ni otro hogar.</text:p>
      <text:p text:style-name="Text_20_body">Rylhet, la mayor de las dos, tenía diecisiete años.</text:p>
      <text:p text:style-name="Text_20_body">Era alta, decidida y acostumbraba a tomar las decisiones difíciles.</text:p>
      <text:p text:style-name="Text_20_body">Kahsia había cumplido quince apenas unas semanas antes.</text:p>
      <text:p text:style-name="Text_20_body">Era más observadora y reservada.</text:p>
      <text:p text:style-name="Text_20_body">Mientras Rylhet avanzaba mirando siempre hacia delante, Kahsia tenía la costumbre de detenerse a contemplar las cosas que los demás pasaban por alto.</text:p>
      <text:p text:style-name="Text_20_body"><text:soft-page-break/>Llegaron a la casa cuando la tarde comenzaba a apagarse.</text:p>
      <text:p text:style-name="Text_20_body">La cabaña se alzaba sola sobre una ladera rocosa, rodeada por un terreno abandonado y algunas cercas deterioradas por el tiempo.</text:p>
      <text:p text:style-name="Text_20_body">No había humo saliendo de la chimenea.</text:p>
      <text:p text:style-name="Text_20_body">No había luces en las ventanas.</text:p>
      <text:p text:style-name="Text_20_body">Ni señales de actividad.</text:p>
      <text:p text:style-name="Text_20_body">Rylhet llamó a la puerta.</text:p>
      <text:p text:style-name="Text_20_body">Esperaron.</text:p>
      <text:p text:style-name="Text_20_body">No hubo respuesta.</text:p>
      <text:p text:style-name="Text_20_body">Volvió a llamar.</text:p>
      <text:p text:style-name="Text_20_body">El único sonido fue el viento moviendo los árboles de la ladera.</text:p>
      <text:p text:style-name="Text_20_body">Entonces descubrieron que la puerta estaba entreabierta.</text:p>
      <text:p text:style-name="Text_20_body">—¿Tía Tagha? —llamó Rylhet desde el umbral.</text:p>
      <text:p text:style-name="Text_20_body">Nadie respondió.</text:p>
      <text:p text:style-name="Text_20_body">Finalmente decidieron entrar.</text:p>
      <text:p text:style-name="Text_20_body">Quizá había salido a realizar alguna tarea y regresaría antes del anochecer.</text:p>
      <text:p text:style-name="Text_20_body">La casa estaba limpia.</text:p>
      <text:p text:style-name="Text_20_body">Pero demasiado silenciosa.</text:p>
      <text:p text:style-name="Text_20_body">Demasiado inmóvil.</text:p>
      <text:p text:style-name="Text_20_body">Como si nadie hubiera vivido allí durante bastante tiempo.</text:p>
      <text:p text:style-name="Text_20_body">Las hermanas dejaron sus pocas pertenencias junto a una pared y comenzaron a buscar algo de comer.</text:p>
      <text:p text:style-name="Text_20_body">El hambre empezaba a resultar difícil de ignorar.</text:p>
      <text:p text:style-name="Text_20_body">Durante los últimos días habían sobrevivido gracias a la generosidad de algunos campesinos que les permitieron viajar en sus carretas.</text:p>
      <text:p text:style-name="Text_20_body">Lo poco que llevaban se había agotado hacía tiempo.</text:p>
      <text:p text:style-name="Text_20_body">Revisaron la despensa.</text:p>
      <text:p text:style-name="Text_20_body">Encontraron algunas frutas arrugadas por el paso de los días.</text:p>
      <text:p text:style-name="Text_20_body">Un trozo de pan endurecido.</text:p>
      <text:p text:style-name="Text_20_body">Y poco más.</text:p>
      <text:p text:style-name="Text_20_body">Nada parecía comestible.</text:p>
      <text:p text:style-name="Text_20_body"><text:soft-page-break/>Salieron a inspeccionar el terreno.</text:p>
      <text:p text:style-name="Text_20_body">No había gallinas en el corral.</text:p>
      <text:p text:style-name="Text_20_body">No había cabras.</text:p>
      <text:p text:style-name="Text_20_body">No había animales de ningún tipo.</text:p>
      <text:p text:style-name="Text_20_body">La huerta estaba descuidada.</text:p>
      <text:p text:style-name="Text_20_body">La hierba crecía donde antes debían existir cultivos.</text:p>
      <text:p text:style-name="Text_20_body">Todo indicaba que la casa llevaba vacía mucho más tiempo del que esperaban.</text:p>
      <text:p text:style-name="Text_20_body">Quizá semanas.</text:p>
      <text:p text:style-name="Text_20_body">Tal vez incluso más.</text:p>
      <text:p text:style-name="Text_20_body">Cuando regresaron al interior, la luz del día comenzaba a desaparecer tras las montañas.</text:p>
      <text:p text:style-name="P1">Y ambas comprendieron <text:span text:style-name="T1">que q</text:span>uizá Tagha<text:span text:style-name="T1"> no</text:span> regresaría <text:span text:style-name="T1">a casa </text:span>aquella noch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3T11:20:00.736000000</meta:creation-date>
    <dc:date>2026-07-13T11:27:34.008000000</dc:date>
    <meta:editing-duration>PT7M33S</meta:editing-duration>
    <meta:editing-cycles>1</meta:editing-cycles>
    <meta:document-statistic meta:table-count="0" meta:image-count="0" meta:object-count="0" meta:page-count="3" meta:paragraph-count="65" meta:word-count="506" meta:character-count="3061" meta:non-whitespace-character-count="2620"/>
    <meta:generator>LibreOffice/7.3.5.2$Windows_X86_64 LibreOffice_project/184fe81b8c8c30d8b5082578aee2fed2ea847c01</meta:generator>
  </office:meta>
</office:document-meta>
</file>