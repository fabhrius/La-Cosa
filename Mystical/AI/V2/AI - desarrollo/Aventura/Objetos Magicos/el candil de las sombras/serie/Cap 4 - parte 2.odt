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f9c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Parte 2 - Un saco de monedas</text:h>
      <text:p text:style-name="Text_20_body">Durante varios segundos Rylhet permaneció inmóvil.</text:p>
      <text:p text:style-name="Text_20_body">Observando la oscuridad.</text:p>
      <text:p text:style-name="Text_20_body">Esperando que la sombra volviera a moverse.</text:p>
      <text:p text:style-name="Text_20_body">No ocurrió nada.</text:p>
      <text:p text:style-name="Text_20_body">La habitación estaba en silencio.</text:p>
      <text:p text:style-name="Text_20_body">La lámpara continuaba ardiendo suavemente sobre la mesa.</text:p>
      <text:p text:style-name="Text_20_body">Todo parecía normal.</text:p>
      <text:p text:style-name="Text_20_body">Poco a poco recuperó el control de su respiración.</text:p>
      <text:p text:style-name="Text_20_body">Entonces volvió a fijarse en el saco.</text:p>
      <text:p text:style-name="Text_20_body">Seguía allí.</text:p>
      <text:p text:style-name="Text_20_body">En mitad de la mesa.</text:p>
      <text:p text:style-name="Text_20_body">Esperándola.</text:p>
      <text:p text:style-name="Text_20_body">Se acercó con cautela.</text:p>
      <text:p text:style-name="Text_20_body">Lo tocó con la punta de los dedos.</text:p>
      <text:p text:style-name="Text_20_body">Era real.</text:p>
      <text:p text:style-name="Text_20_body">Lo levantó.</text:p>
      <text:p text:style-name="Text_20_body">Pesaba.</text:p>
      <text:p text:style-name="Text_20_body">Más de lo que debería pesar un saco vacío.</text:p>
      <text:p text:style-name="Text_20_body">Su corazón comenzó a acelerarse.</text:p>
      <text:p text:style-name="Text_20_body">Aflojó el cordón.</text:p>
      <text:p text:style-name="Text_20_body">Miró el interior.</text:p>
      <text:p text:style-name="Text_20_body">Y contuvo el aliento.</text:p>
      <text:p text:style-name="Text_20_body">Monedas.</text:p>
      <text:p text:style-name="Text_20_body">Decenas de monedas.</text:p>
      <text:p text:style-name="Text_20_body">Monedas de plata.</text:p>
      <text:p text:style-name="Text_20_body">Monedas auténticas.</text:p>
      <text:p text:style-name="Text_20_body">Volcó el contenido sobre la mesa.</text:p>
      <text:p text:style-name="Text_20_body"><text:soft-page-break/>El metal repiqueteó sobre la madera.</text:p>
      <text:p text:style-name="Text_20_body">Las observó una por una.</text:p>
      <text:p text:style-name="Text_20_body">Contó varias.</text:p>
      <text:p text:style-name="Text_20_body">Después volvió a contarlas.</text:p>
      <text:p text:style-name="Text_20_body">Era suficiente dinero para alimentarse durante semanas.</text:p>
      <text:p text:style-name="Text_20_body">Quizá durante meses si tenían cuidado.</text:p>
      <text:p text:style-name="Text_20_body">Rylhet sintió alivio.</text:p>
      <text:p text:style-name="P1">guardó las monedas nuevamente en el saco, y se fue a dormir junto a su hermana.</text:p>
      <text:p text:style-name="Text_20_body"/>
      <text:p text:style-name="Horizontal_20_Line"/>
      <text:p text:style-name="Text_20_body">A la mañana siguiente despertó llena de energía.</text:p>
      <text:p text:style-name="Text_20_body">Kahsia seguía dormida.</text:p>
      <text:p text:style-name="Text_20_body">La luz del amanecer entraba por las ventanas.</text:p>
      <text:p text:style-name="Text_20_body">Y sobre la mesa permanecía el saco.</text:p>
      <text:p text:style-name="Text_20_body">La prueba de que no había sido un sueño.</text:p>
      <text:p text:style-name="Text_20_body">Cuando Kahsia abrió los ojos, Rylhet no pudo contenerse más.</text:p>
      <text:p text:style-name="Text_20_body">Le contó todo.</text:p>
      <text:p text:style-name="Text_20_body">La sombra.</text:p>
      <text:p text:style-name="Text_20_body">La aparición.</text:p>
      <text:p text:style-name="Text_20_body">El saco.</text:p>
      <text:p text:style-name="Text_20_body">Las monedas.</text:p>
      <text:p text:style-name="Text_20_body">Kahsia escuchó sin interrumpir.</text:p>
      <text:p text:style-name="Text_20_body">Después tomó el saco entre las manos.</text:p>
      <text:p text:style-name="Text_20_body">Lo examinó detenidamente.</text:p>
      <text:p text:style-name="Text_20_body">Había una mancha oscura.</text:p>
      <text:p text:style-name="Text_20_body">Marrón rojiza.</text:p>
      <text:p text:style-name="Text_20_body">Durante unos segundos ninguna de las dos habló.</text:p>
      <text:p text:style-name="Text_20_body">—Parece sangre —susurró Kahsia.</text:p>
      <text:p text:style-name="Text_20_body">Rylhet apartó la mirada.</text:p>
      <text:p text:style-name="Text_20_body">No quería pensar en eso.</text:p>
      <text:p text:style-name="Horizontal_20_Line"><text:soft-page-break/></text:p>
      <text:p text:style-name="Text_20_body">Pese a todo decidieron bajar al pueblo.</text:p>
      <text:p text:style-name="Text_20_body">Llevaron algunas monedas.</text:p>
      <text:p text:style-name="Text_20_body">Comprarían comida.</text:p>
      <text:p text:style-name="Text_20_body">Quizá preguntarían por Tagha.</text:p>
      <text:p text:style-name="Text_20_body">Quizá las cosas empezarían finalmente a encajar.</text:p>
      <text:p text:style-name="Text_20_body">La mañana era hermosa.</text:p>
      <text:p text:style-name="Text_20_body">El sol brillaba sobre los tejados.</text:p>
      <text:p text:style-name="Text_20_body">Los pájaros cantaban entre los árboles.</text:p>
      <text:p text:style-name="Text_20_body">Por momentos resultaba fácil creer que todo iría bien.</text:p>
      <text:p text:style-name="Text_20_body">Hasta que llegaron a la plaza.</text:p>
      <text:p text:style-name="Text_20_body">Otra multitud.</text:p>
      <text:p text:style-name="Text_20_body">Otra vez.</text:p>
      <text:p text:style-name="Text_20_body">Y eso bastó para que ambas sintieran un nudo en el estómago.</text:p>
      <text:p text:style-name="Text_20_body">La gente se agrupaba en una esquina.</text:p>
      <text:p text:style-name="Text_20_body">Hablaban en voz baja.</text:p>
      <text:p text:style-name="Text_20_body">Con los mismos rostros tensos del día anterior.</text:p>
      <text:p text:style-name="Text_20_body">Las hermanas se acercaron.</text:p>
      <text:p text:style-name="Text_20_body">Una carreta acababa de detenerse junto a la multitud.</text:p>
      <text:p text:style-name="Text_20_body">Una mujer elegantemente vestida asomó la cabeza por la ventanilla.</text:p>
      <text:p text:style-name="Text_20_body">—¿Qué ha pasado?</text:p>
      <text:p text:style-name="Text_20_body">Un hombre respondió sin apartar la vista del lugar donde todos miraban.</text:p>
      <text:p text:style-name="Text_20_body">—Han matado a Rohmp.</text:p>
      <text:p text:style-name="Text_20_body">—¿Quién?</text:p>
      <text:p text:style-name="Text_20_body">—El granjero.</text:p>
      <text:p text:style-name="Text_20_body">La mujer guardó silencio.</text:p>
      <text:p text:style-name="Text_20_body">—Lo encontraron esta mañana.</text:p>
      <text:p text:style-name="Text_20_body">—¿Qué querían?</text:p>
      <text:p text:style-name="Text_20_body">—Su dinero.</text:p>
      <text:p text:style-name="Text_20_body">El hombre escupió al suelo.</text:p>
      <text:p text:style-name="Text_20_body"><text:soft-page-break/>—Vendió varios cerdos ayer.</text:p>
      <text:p text:style-name="Text_20_body">Regresaba a casa con el pago.</text:p>
      <text:p text:style-name="Text_20_body">Alguien lo apuñaló y se llevó las monedas.</text:p>
      <text:p text:style-name="Text_20_body">Rylhet sintió un frío repentino.</text:p>
      <text:p text:style-name="Text_20_body">Kahsia también.</text:p>
      <text:p text:style-name="Text_20_body">Las dos pensaron en el saco.</text:p>
      <text:p text:style-name="Text_20_body">En la sangre.</text:p>
      <text:p text:style-name="Text_20_body">En las monedas.</text:p>
      <text:p text:style-name="Text_20_body">En la sombra.</text:p>
      <text:p text:style-name="Text_20_body">La misma idea apareció en sus mentes al mismo tiempo.</text:p>
      <text:p text:style-name="Text_20_body">Ninguna quiso pronunciarla.</text:p>
      <text:p text:style-name="Text_20_body">Una anciana que estaba cerca observó sus rostros.</text:p>
      <text:p text:style-name="Text_20_body">—Volved a casa, niñas.</text:p>
      <text:p text:style-name="Text_20_body">Su voz sonó cansada.</text:p>
      <text:p text:style-name="Text_20_body">Derrotada.</text:p>
      <text:p text:style-name="Text_20_body">—He vivido aquí más de sesenta años.</text:p>
      <text:p text:style-name="Text_20_body">Nunca había visto algo así.</text:p>
      <text:p text:style-name="Text_20_body">Dos muertes violentas en dos noches.</text:p>
      <text:p text:style-name="Text_20_body">Algo malo ha llegado a Coldrock.</text:p>
      <text:p text:style-name="Text_20_body">Muy malo.</text:p>
      <text:p text:style-name="Horizontal_20_Line"/>
      <text:p text:style-name="Text_20_body">Regresaron a la casa casi corriendo.</text:p>
      <text:p text:style-name="Text_20_body">Ninguna habló durante el camino.</text:p>
      <text:p text:style-name="Text_20_body">Cuando cerraron la puerta detrás de ellas, Kahsia dejó el pan sobre la mesa.</text:p>
      <text:p text:style-name="Text_20_body">Miró el saco.</text:p>
      <text:p text:style-name="Text_20_body">Después miró a su hermana.</text:p>
      <text:p text:style-name="Text_20_body">—Es su dinero.</text:p>
      <text:p text:style-name="Text_20_body">Rylhet no respondió.</text:p>
      <text:p text:style-name="Text_20_body">—El dinero de Rohmp.</text:p>
      <text:p text:style-name="Text_20_body">—No lo sabemos.</text:p>
      <text:p text:style-name="Text_20_body"><text:soft-page-break/>—Sí lo sabemos.</text:p>
      <text:p text:style-name="Text_20_body">La habitación quedó en silencio.</text:p>
      <text:p text:style-name="Text_20_body">Kahsia dio un paso hacia la mesa.</text:p>
      <text:p text:style-name="Text_20_body">—Tenemos que devolverlo.</text:p>
      <text:p text:style-name="Text_20_body">—¿Y qué vamos a decir?</text:p>
      <text:p text:style-name="Text_20_body">—La verdad.</text:p>
      <text:p text:style-name="Text_20_body">Rylhet soltó una risa nerviosa.</text:p>
      <text:p text:style-name="Text_20_body">—¿Qué verdad?</text:p>
      <text:p text:style-name="Text_20_body">Kahsia no respondió.</text:p>
      <text:p text:style-name="Text_20_body">Porque ambas conocían la respuesta.</text:p>
      <text:p text:style-name="Text_20_body">"Nuestra sombra salió de la casa durante la noche y regresó con un saco de monedas."</text:p>
      <text:p text:style-name="Text_20_body">Nadie iba a creer algo así.</text:p>
      <text:p text:style-name="Text_20_body">Y si alguien lo hacía...</text:p>
      <text:p text:style-name="Text_20_body">probablemente sospecharía de ellas.</text:p>
      <text:p text:style-name="Text_20_body">Las dos permanecieron en silencio.</text:p>
      <text:p text:style-name="Text_20_body">Mirando las monedas.</text:p>
      <text:p text:style-name="Text_20_body">Finalmente Rylhet tomó el saco.</text:p>
      <text:p text:style-name="Text_20_body">Lo abrió.</text:p>
      <text:p text:style-name="Text_20_body">Volcó el contenido sobre la mesa.</text:p>
      <text:p text:style-name="Text_20_body">Después arrojó la tela manchada al fuego de la chimenea.</text:p>
      <text:p text:style-name="Text_20_body">Las llamas comenzaron a consumirla lentamente.</text:p>
      <text:p text:style-name="Text_20_body">Las dos observaron cómo ardía.</text:p>
      <text:p text:style-name="Text_20_body">Pero ninguna se sintió mejor.</text:p>
      <text:p text:style-name="Text_20_body">Porque el saco desaparecía.</text:p>
      <text:p text:style-name="Text_20_body">Las monedas seguían allí.</text:p>
      <text:p text:style-name="Horizontal_20_Line"/>
      <text:p text:style-name="Text_20_body">Creo que la última frase es la clave del capítulo.</text:p>
      <text:p text:style-name="Text_20_body">El saco puede quemarse.</text:p>
      <text:p text:style-name="Text_20_body">La evidencia puede desaparecer.</text:p>
      <text:p text:style-name="Text_20_body">Pero las monedas siguen sobre la mesa.</text:p>
      <text:p text:style-name="Text_20_body"><text:soft-page-break/>Y también la decisión moral que representan. Ahí nace realmente la historia de la corrupción de Rylhet. Todavía no ha cruzado ninguna línea, pero ya está mirando el dinero sabiendo de dónde podría haber veni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13T17:53:43.984000000</meta:creation-date>
    <dc:date>2026-07-13T18:06:09.248000000</dc:date>
    <meta:editing-duration>PT12M24S</meta:editing-duration>
    <meta:editing-cycles>2</meta:editing-cycles>
    <meta:generator>LibreOffice/7.3.5.2$Windows_X86_64 LibreOffice_project/184fe81b8c8c30d8b5082578aee2fed2ea847c01</meta:generator>
    <meta:document-statistic meta:table-count="0" meta:image-count="0" meta:object-count="0" meta:page-count="6" meta:paragraph-count="144" meta:word-count="747" meta:character-count="4354" meta:non-whitespace-character-count="3751"/>
  </office:meta>
</office:document-meta>
</file>