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. Antes de escribir el capítulo completo, yo construiría una <text:span text:style-name="Strong_20_Emphasis">estructura dramática</text:span> muy precisa, porque este es el capítulo más importante del cuento.</text:p>
      <text:p text:style-name="Text_20_body">Aquí se cierran simultáneamente tres historias:</text:p>
      <text:list xml:id="list1661079341" text:style-name="L1">
        <text:list-item>
          <text:p text:style-name="P1">La historia de la lámpara.</text:p>
        </text:list-item>
        <text:list-item>
          <text:p text:style-name="P1">La historia de la corrupción de Rylhet.</text:p>
        </text:list-item>
        <text:list-item>
          <text:p text:style-name="P1">La relación entre las dos hermanas.</text:p>
        </text:list-item>
      </text:list>
      <text:p text:style-name="Text_20_body">Además, el capítulo debe responder una pregunta que el lector lleva haciéndose desde el principio:</text:p>
      <text:p text:style-name="Quotations">¿Qué hará Rylhet cuando tenga que elegir entre Kahsia y la lámpara?</text:p>
      <text:p text:style-name="Text_20_body">Y la respuesta debe ser dolorosa.</text:p>
      <text:p text:style-name="Horizontal_20_Line"/>
      <text:h text:style-name="Heading_20_1" text:outline-level="1">Capítulo Final - La última llama</text:h>
      <text:h text:style-name="Heading_20_2" text:outline-level="2">Parte 1 - El último deseo</text:h>
      <text:h text:style-name="Heading_20_3" text:outline-level="3">Objetivo</text:h>
      <text:p text:style-name="Text_20_body">Mostrar que Rylhet ya no es la misma.</text:p>
      <text:p text:style-name="Text_20_body">No debe parecer una villana caricaturesca.</text:p>
      <text:p text:style-name="Text_20_body">Debe parecer una persona que ha cruzado demasiadas líneas.</text:p>
      <text:p text:style-name="Horizontal_20_Line"/>
      <text:h text:style-name="Heading_20_3" text:outline-level="3">Situación inicial</text:h>
      <text:p text:style-name="Text_20_body">Ha pasado algún tiempo.</text:p>
      <text:p text:style-name="Text_20_body">Quizá días.</text:p>
      <text:p text:style-name="Text_20_body">Quizá semanas.</text:p>
      <text:p text:style-name="Text_20_body">La lámpara ha concedido numerosos deseos.</text:p>
      <text:p text:style-name="Text_20_body">Dinero.</text:p>
      <text:p text:style-name="Text_20_body">Joyas.</text:p>
      <text:p text:style-name="Text_20_body">Influencia.</text:p>
      <text:p text:style-name="Text_20_body">Información.</text:p>
      <text:p text:style-name="Text_20_body">Ventajas.</text:p>
      <text:p text:style-name="Text_20_body">Todo lo que Rylhet ha pedido.</text:p>
      <text:p text:style-name="Horizontal_20_Line"><text:soft-page-break/></text:p>
      <text:h text:style-name="Heading_20_3" text:outline-level="3">Estado de las hermanas</text:h>
      <text:p text:style-name="Text_20_body">Kahsia vive aterrorizada.</text:p>
      <text:p text:style-name="Text_20_body">Ya sabe qué ocurre cada vez que la lámpara se enciende.</text:p>
      <text:p text:style-name="Text_20_body">Ya sabe que alguien morirá.</text:p>
      <text:p text:style-name="Text_20_body">Ya sabe que Rylhet lo sabe.</text:p>
      <text:p text:style-name="Text_20_body">Y aun así Rylhet continúa.</text:p>
      <text:p text:style-name="Horizontal_20_Line"/>
      <text:h text:style-name="Heading_20_3" text:outline-level="3">Descubrimiento</text:h>
      <text:p text:style-name="Text_20_body">Kahsia descubre que Rylhet planea utilizar la lámpara una vez más.</text:p>
      <text:p text:style-name="Text_20_body">Pero esta vez por un motivo especialmente oscuro.</text:p>
      <text:p text:style-name="Text_20_body">Algo que no puede justificarse.</text:p>
      <text:p text:style-name="Text_20_body">Algo que demuestra que la transformación está completa.</text:p>
      <text:p text:style-name="Text_20_body">Por ejemplo:</text:p>
      <text:list xml:id="list1640746128" text:style-name="L2">
        <text:list-item>
          <text:p text:style-name="P2">eliminar a alguien que sospecha de ella;</text:p>
        </text:list-item>
        <text:list-item>
          <text:p text:style-name="P2">obtener una gran fortuna;</text:p>
        </text:list-item>
        <text:list-item>
          <text:p text:style-name="P2">adquirir una propiedad;</text:p>
        </text:list-item>
        <text:list-item>
          <text:p text:style-name="P2">convertirse en la persona más poderosa del pueblo.</text:p>
        </text:list-item>
      </text:list>
      <text:p text:style-name="Text_20_body">Lo importante es que ya no sea supervivencia.</text:p>
      <text:p text:style-name="Text_20_body">Ahora es ambición.</text:p>
      <text:p text:style-name="Horizontal_20_Line"/>
      <text:h text:style-name="Heading_20_2" text:outline-level="2">Parte 2 - La confrontación</text:h>
      <text:h text:style-name="Heading_20_3" text:outline-level="3">Objetivo</text:h>
      <text:p text:style-name="Text_20_body">Confrontar a las dos versiones de Rylhet.</text:p>
      <text:p text:style-name="Text_20_body">La del principio.</text:p>
      <text:p text:style-name="Text_20_body">Y la del final.</text:p>
      <text:p text:style-name="Horizontal_20_Line"/>
      <text:h text:style-name="Heading_20_3" text:outline-level="3"><text:soft-page-break/>Escenario</text:h>
      <text:p text:style-name="Text_20_body">Lugar aislado.</text:p>
      <text:p text:style-name="Text_20_body">Oscuro.</text:p>
      <text:p text:style-name="Text_20_body">La lámpara encendida.</text:p>
      <text:p text:style-name="Text_20_body">Quizá:</text:p>
      <text:list xml:id="list2223614708" text:style-name="L3">
        <text:list-item>
          <text:p text:style-name="P3">un granero abandonado,</text:p>
        </text:list-item>
        <text:list-item>
          <text:p text:style-name="P3">la sala comunal vacía,</text:p>
        </text:list-item>
        <text:list-item>
          <text:p text:style-name="P3">la vieja casa de Tagha.</text:p>
        </text:list-item>
      </text:list>
      <text:p text:style-name="Horizontal_20_Line"/>
      <text:h text:style-name="Heading_20_3" text:outline-level="3">Diálogo central</text:h>
      <text:p text:style-name="Text_20_body">Kahsia intenta hacerla reaccionar.</text:p>
      <text:p text:style-name="Text_20_body">Le recuerda:</text:p>
      <text:list xml:id="list3983699955" text:style-name="L4">
        <text:list-item>
          <text:p text:style-name="P4">a su padre;</text:p>
        </text:list-item>
        <text:list-item>
          <text:p text:style-name="P4">el viaje;</text:p>
        </text:list-item>
        <text:list-item>
          <text:p text:style-name="P4">la primera noche;</text:p>
        </text:list-item>
        <text:list-item>
          <text:p text:style-name="P4">la señorita Lily;</text:p>
        </text:list-item>
        <text:list-item>
          <text:p text:style-name="P4">la comida;</text:p>
        </text:list-item>
        <text:list-item>
          <text:p text:style-name="P4">quién era antes.</text:p>
        </text:list-item>
      </text:list>
      <text:p text:style-name="Text_20_body">Rylhet rechaza todo.</text:p>
      <text:p text:style-name="Text_20_body">No porque sea malvada.</text:p>
      <text:p text:style-name="Text_20_body">Sino porque ya piensa de otra manera.</text:p>
      <text:p text:style-name="Horizontal_20_Line"/>
      <text:h text:style-name="Heading_20_3" text:outline-level="3">Momento filosófico</text:h>
      <text:p text:style-name="Text_20_body">Aquí puede aparecer la enseñanza del cuento.</text:p>
      <text:p text:style-name="Text_20_body">No como una lección explícita.</text:p>
      <text:p text:style-name="Text_20_body">Sino encarnada en Rylhet.</text:p>
      <text:p text:style-name="Text_20_body">Por ejemplo:</text:p>
      <text:p text:style-name="Quotations">"Todo ha mejorado desde que encontré la lámpara."</text:p>
      <text:p text:style-name="Quotations">"Ya no pasamos hambre."</text:p>
      <text:p text:style-name="Quotations"><text:soft-page-break/>"Ya no somos pobres."</text:p>
      <text:p text:style-name="Quotations">"Todo lo que tengo lo conseguí gracias a ella."</text:p>
      <text:p text:style-name="Text_20_body">Y Kahsia responde algo como:</text:p>
      <text:p text:style-name="Quotations">"No. Todo lo que tienes lo consiguió ella gracias a ti."</text:p>
      <text:p text:style-name="Text_20_body">Ese es exactamente el tema del relato.</text:p>
      <text:p text:style-name="Text_20_body">La lámpara parece una herramienta.</text:p>
      <text:p text:style-name="Text_20_body">Pero en realidad usa a Rylhet.</text:p>
      <text:p text:style-name="Horizontal_20_Line"/>
      <text:h text:style-name="Heading_20_2" text:outline-level="2">Parte 3 - La decisión</text:h>
      <text:h text:style-name="Heading_20_3" text:outline-level="3">Objetivo</text:h>
      <text:p text:style-name="Text_20_body">Llegar al punto sin retorno.</text:p>
      <text:p text:style-name="Horizontal_20_Line"/>
      <text:p text:style-name="Text_20_body">Kahsia intenta apagar la lámpara.</text:p>
      <text:p text:style-name="Text_20_body">Rylhet lo impide.</text:p>
      <text:p text:style-name="Text_20_body">Kahsia intenta llevársela.</text:p>
      <text:p text:style-name="Text_20_body">Rylhet la recupera.</text:p>
      <text:p text:style-name="Text_20_body">Kahsia intenta huir con ella.</text:p>
      <text:p text:style-name="Text_20_body">Rylhet la persigue.</text:p>
      <text:p text:style-name="Text_20_body">La discusión escala.</text:p>
      <text:p text:style-name="Horizontal_20_Line"/>
      <text:h text:style-name="Heading_20_3" text:outline-level="3">Revelación visual</text:h>
      <text:p text:style-name="Text_20_body">Aquí puede suceder algo muy inquietante.</text:p>
      <text:p text:style-name="Text_20_body">La sombra de Rylhet ya no se comporta como una sombra.</text:p>
      <text:p text:style-name="Text_20_body">Se mueve sola.</text:p>
      <text:p text:style-name="Text_20_body">Observa.</text:p>
      <text:p text:style-name="Text_20_body">Imita.</text:p>
      <text:p text:style-name="Text_20_body">Se adelanta a sus movimientos.</text:p>
      <text:p text:style-name="Text_20_body">Como si la separación estuviera casi completa.</text:p>
      <text:p text:style-name="Text_20_body"><text:soft-page-break/>El lector comprende que el proceso ha terminado.</text:p>
      <text:p text:style-name="Horizontal_20_Line"/>
      <text:h text:style-name="Heading_20_2" text:outline-level="2">Parte 4 - El accidente</text:h>
      <text:h text:style-name="Heading_20_3" text:outline-level="3">Objetivo</text:h>
      <text:p text:style-name="Text_20_body">Rylhet provoca su propia caída.</text:p>
      <text:p text:style-name="Horizontal_20_Line"/>
      <text:p text:style-name="Text_20_body">Kahsia se interpone entre ella y la lámpara.</text:p>
      <text:p text:style-name="Text_20_body">La suplica por última vez.</text:p>
      <text:p text:style-name="Text_20_body">Rylhet pierde el control.</text:p>
      <text:p text:style-name="Text_20_body">Toma un objeto.</text:p>
      <text:p text:style-name="Text_20_body">Lo arroja.</text:p>
      <text:p text:style-name="Text_20_body">No pretende romper la lámpara.</text:p>
      <text:p text:style-name="Text_20_body">Pretende apartar a Kahsia.</text:p>
      <text:p text:style-name="Text_20_body">Pero falla.</text:p>
      <text:p text:style-name="Horizontal_20_Line"/>
      <text:h text:style-name="Heading_20_3" text:outline-level="3">Impacto</text:h>
      <text:p text:style-name="Text_20_body">El objeto golpea la lámpara.</text:p>
      <text:p text:style-name="Text_20_body">La lámpara cae.</text:p>
      <text:p text:style-name="Text_20_body">Se rompe.</text:p>
      <text:p text:style-name="Text_20_body">Silencio.</text:p>
      <text:p text:style-name="Horizontal_20_Line"/>
      <text:h text:style-name="Heading_20_2" text:outline-level="2">Parte 5 - El precio</text:h>
      <text:h text:style-name="Heading_20_3" text:outline-level="3">Objetivo</text:h>
      <text:p text:style-name="Text_20_body">Pagar la deuda acumulada durante todo el relato.</text:p>
      <text:p text:style-name="Horizontal_20_Line"/>
      <text:p text:style-name="Text_20_body">La sombra reacciona.</text:p>
      <text:p text:style-name="Text_20_body">La habitación cambia.</text:p>
      <text:p text:style-name="Text_20_body">Oscuridad.</text:p>
      <text:p text:style-name="Text_20_body"><text:soft-page-break/>Viento.</text:p>
      <text:p text:style-name="Text_20_body">Ruido imposible.</text:p>
      <text:p text:style-name="Text_20_body">Lo que ocurrió con Tagha vuelve a suceder.</text:p>
      <text:p text:style-name="Horizontal_20_Line"/>
      <text:h text:style-name="Heading_20_3" text:outline-level="3">Momento final de Rylhet</text:h>
      <text:p text:style-name="Text_20_body">Aquí puedes decidir entre dos versiones.</text:p>
      <text:h text:style-name="Heading_20_4" text:outline-level="4">Versión A - Sin redención</text:h>
      <text:p text:style-name="Text_20_body">Rylhet desaparece aterrorizada.</text:p>
      <text:p text:style-name="Text_20_body">Comprende demasiado tarde lo que era la lámpara.</text:p>
      <text:p text:style-name="Horizontal_20_Line"/>
      <text:h text:style-name="Heading_20_4" text:outline-level="4">Versión B - Un instante de regreso</text:h>
      <text:p text:style-name="Text_20_body">Durante un segundo vuelve a ser ella.</text:p>
      <text:p text:style-name="Text_20_body">Mira a Kahsia.</text:p>
      <text:p text:style-name="Text_20_body">La verdadera Rylhet.</text:p>
      <text:p text:style-name="Text_20_body">La del principio.</text:p>
      <text:p text:style-name="Text_20_body">Y desaparece.</text:p>
      <text:p text:style-name="Text_20_body">Personalmente creo que esta versión es más triste.</text:p>
      <text:p text:style-name="Horizontal_20_Line"/>
      <text:h text:style-name="Heading_20_2" text:outline-level="2">Parte 6 - Después</text:h>
      <text:h text:style-name="Heading_20_3" text:outline-level="3">Objetivo</text:h>
      <text:p text:style-name="Text_20_body">Crear la falsa sensación de que todo ha terminado.</text:p>
      <text:p text:style-name="Horizontal_20_Line"/>
      <text:p text:style-name="Text_20_body">Kahsia queda sola.</text:p>
      <text:p text:style-name="Text_20_body">La lámpara está rota.</text:p>
      <text:p text:style-name="Text_20_body">Rylhet ha desaparecido.</text:p>
      <text:p text:style-name="Text_20_body">Las sombras ya no se mueven.</text:p>
      <text:p text:style-name="Text_20_body">La pesadilla parece terminada.</text:p>
      <text:p text:style-name="Horizontal_20_Line"/>
      <text:h text:style-name="Heading_20_2" text:outline-level="2"><text:soft-page-break/>Parte 7 - Epílogo</text:h>
      <text:h text:style-name="Heading_20_3" text:outline-level="3">Objetivo</text:h>
      <text:p text:style-name="Text_20_body">El último golpe de horror.</text:p>
      <text:p text:style-name="Horizontal_20_Line"/>
      <text:p text:style-name="Text_20_body">A la mañana siguiente.</text:p>
      <text:p text:style-name="Text_20_body">Kahsia abandona Coldrock.</text:p>
      <text:p text:style-name="Text_20_body">Sube a una carreta.</text:p>
      <text:p text:style-name="Text_20_body">Se aleja.</text:p>
      <text:p text:style-name="Text_20_body">Mira atrás una última vez.</text:p>
      <text:p text:style-name="Text_20_body">Y entonces ve a una mujer caminando hacia la reunión mensual del pueblo.</text:p>
      <text:p text:style-name="Text_20_body">Lleva una lámpara de aceite.</text:p>
      <text:p text:style-name="Text_20_body">La misma lámpara.</text:p>
      <text:p text:style-name="Text_20_body">Intacta.</text:p>
      <text:p text:style-name="Text_20_body">Como si jamás hubiera sido destruida.</text:p>
      <text:p text:style-name="Horizontal_20_Line"/>
      <text:h text:style-name="Heading_20_3" text:outline-level="3">Última imagen</text:h>
      <text:p text:style-name="Text_20_body">La mujer entra en el edificio.</text:p>
      <text:p text:style-name="Text_20_body">Dentro está reunido prácticamente todo el pueblo.</text:p>
      <text:p text:style-name="Text_20_body">Kahsia comprende lo que significa.</text:p>
      <text:p text:style-name="Text_20_body">Pero ya está demasiado lejos.</text:p>
      <text:p text:style-name="Text_20_body">Y no puede hacer nada.</text:p>
      <text:p text:style-name="Text_20_body">Fin.</text:p>
      <text:p text:style-name="Horizontal_20_Line"/>
      <text:p text:style-name="Text_20_body">Lo que más me gusta de esta estructura es que el capítulo no trata realmente sobre destruir la lámpara.</text:p>
      <text:p text:style-name="Text_20_body">Trata sobre descubrir que la lámpara ya ganó hace mucho tiempo.</text:p>
      <text:p text:style-name="Text_20_body">La destrucción de la lámpara sólo revela cuánto había cambiado Rylhet. Y eso encaja perfectamente con el tema de la identidad como proceso gradual de transformació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4T14:34:36.425000000</meta:creation-date>
    <dc:date>2026-07-14T14:35:11.852000000</dc:date>
    <meta:editing-duration>PT35S</meta:editing-duration>
    <meta:editing-cycles>1</meta:editing-cycles>
    <meta:document-statistic meta:table-count="0" meta:image-count="0" meta:object-count="0" meta:page-count="7" meta:paragraph-count="169" meta:word-count="822" meta:character-count="4775" meta:non-whitespace-character-count="4138"/>
    <meta:generator>LibreOffice/7.3.5.2$Windows_X86_64 LibreOffice_project/184fe81b8c8c30d8b5082578aee2fed2ea847c01</meta:generator>
  </office:meta>
</office:document-meta>
</file>