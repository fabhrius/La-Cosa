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7505" officeooo:paragraph-rsid="00117505"/>
    </style:style>
    <style:style style:name="P2" style:family="paragraph" style:parent-style-name="Text_20_body">
      <style:text-properties officeooo:rsid="00120312" officeooo:paragraph-rsid="00120312"/>
    </style:style>
    <style:style style:name="T1" style:family="text">
      <style:text-properties officeooo:rsid="001203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pítulo 1 - El encantamiento</text:h>
      <text:p text:style-name="Text_20_body">La tormenta había llegado antes del anochecer.</text:p>
      <text:p text:style-name="Text_20_body">Las nubes cubrían las montañas y el viento golpeaba las paredes de la pequeña cabaña como si quisiera arrancarlas de sus cimientos.</text:p>
      <text:p text:style-name="P2">La lluvia comenzo a caer con fuerza.</text:p>
      <text:p text:style-name="Text_20_body">En el interior, Tagha trabajaba sola.</text:p>
      <text:p text:style-name="Text_20_body">Había apartado los muebles hacia los extremos de la habitación.</text:p>
      <text:p text:style-name="Text_20_body">Sobre el suelo de piedra trazó un círculo de ceniza.</text:p>
      <text:p text:style-name="Text_20_body">Después colocó una lámpara de aceite en el centro.</text:p>
      <text:p text:style-name="Text_20_body">Era una lámpara ordinaria.</text:p>
      <text:p text:style-name="Text_20_body">De cobre envejecido.</text:p>
      <text:p text:style-name="Text_20_body">Sin adornos.</text:p>
      <text:p text:style-name="Text_20_body">Sin valor.</text:p>
      <text:p text:style-name="Text_20_body">Al menos, todavía.</text:p>
      <text:p text:style-name="Text_20_body">Tagha se arrodilló frente a ella.</text:p>
      <text:p text:style-name="Text_20_body">Cerró los ojos.</text:p>
      <text:p text:style-name="Text_20_body">Y comenzó a recitar las palabras.</text:p>
      <text:p text:style-name="Text_20_body">No eran palabras humanas.</text:p>
      <text:p text:style-name="Text_20_body">No pertenecían a ningún idioma conocido.</text:p>
      <text:p text:style-name="Text_20_body">Eran sonidos antiguos, ásperos, difíciles de pronunciar, que parecían resonar más allá de las paredes de la cabaña.</text:p>
      <text:p text:style-name="Text_20_body">Durante años había estudiado aquel ritual.</text:p>
      <text:p text:style-name="Text_20_body">Durante años había buscado fragmentos dispersos en manuscritos olvidados.</text:p>
      <text:p text:style-name="Text_20_body">Creía comprenderlo.</text:p>
      <text:p text:style-name="Text_20_body">Creía haber calculado cada detalle.</text:p>
      <text:p text:style-name="Text_20_body">Creía que podría controlar lo que estaba a punto de invocar.</text:p>
      <text:p text:style-name="Text_20_body">Entonces el cielo respondió.</text:p>
      <text:p text:style-name="Text_20_body">Un relámpago iluminó la habitación.</text:p>
      <text:p text:style-name="Text_20_body">La luz atravesó las rendijas de la madera.</text:p>
      <text:p text:style-name="Text_20_body"><text:soft-page-break/>Por un instante, las sombras desaparecieron.</text:p>
      <text:p text:style-name="Text_20_body">Un segundo después llegó el trueno.</text:p>
      <text:p text:style-name="Text_20_body">La montaña entera tembló.</text:p>
      <text:p text:style-name="Text_20_body">Tagha abrió los ojos.</text:p>
      <text:p text:style-name="Text_20_body">Algo había cambiado.</text:p>
      <text:p text:style-name="Text_20_body">No sabía qué.</text:p>
      <text:p text:style-name="Text_20_body">Pero lo sintió de inmediato.</text:p>
      <text:p text:style-name="Text_20_body">El aire se había vuelto pesado.</text:p>
      <text:p text:style-name="Text_20_body">Extrañamente pesado.</text:p>
      <text:p text:style-name="Text_20_body">Como si la habitación estuviera llena de una presencia invisible.</text:p>
      <text:p text:style-name="Text_20_body">Las llamas de las velas comenzaron a inclinarse hacia el centro del círculo.</text:p>
      <text:p text:style-name="Text_20_body">La lámpara permanecía inmóvil.</text:p>
      <text:p text:style-name="Text_20_body">Sin embargo, la oscuridad a su alrededor parecía moverse.</text:p>
      <text:p text:style-name="Text_20_body">Tagha continuó el ritual.</text:p>
      <text:p text:style-name="Text_20_body">Intentó ignorar la inquietud.</text:p>
      <text:p text:style-name="Text_20_body">Pronunció la siguiente frase.</text:p>
      <text:p text:style-name="Text_20_body">Y comprendió que había cometido un error.</text:p>
      <text:p text:style-name="Text_20_body">Una palabra.</text:p>
      <text:p text:style-name="Text_20_body">Un gesto.</text:p>
      <text:p text:style-name="Text_20_body">Un instante fuera de lugar.</text:p>
      <text:p text:style-name="Text_20_body">Nunca supo cuál.<text:span text:style-name="T1"> </text:span></text:p>
      <text:p text:style-name="Text_20_body">Pero algo había salido mal.</text:p>
      <text:p text:style-name="Text_20_body">La oscuridad comenzó a extenderse por el suelo.</text:p>
      <text:p text:style-name="Text_20_body">No era una sombra.</text:p>
      <text:p text:style-name="Text_20_body">Las sombras obedecen a la luz.</text:p>
      <text:p text:style-name="Text_20_body">Aquello parecía obedecer a otra cosa.</text:p>
      <text:p text:style-name="Text_20_body">Las paredes crujieron.</text:p>
      <text:p text:style-name="Text_20_body">Las ventanas estallaron hacia afuera.</text:p>
      <text:p text:style-name="Text_20_body">El viento irrumpió en la cabaña.</text:p>
      <text:p text:style-name="Text_20_body">Las velas se apagaron.</text:p>
      <text:p text:style-name="Text_20_body"><text:soft-page-break/>Y aun así la habitación siguió oscureciéndose.</text:p>
      <text:p text:style-name="Text_20_body">Tagha retrocedió.</text:p>
      <text:p text:style-name="Text_20_body">Intentó deshacer el conjuro.</text:p>
      <text:p text:style-name="Text_20_body">Repitió las fórmulas en orden inverso.</text:p>
      <text:p text:style-name="Text_20_body">Corrigió los gestos.</text:p>
      <text:p text:style-name="Text_20_body">Pronunció palabras de protección.</text:p>
      <text:p text:style-name="Text_20_body">Nada funcionó.</text:p>
      <text:p text:style-name="Text_20_body">La oscuridad seguía creciendo.</text:p>
      <text:p text:style-name="Text_20_body">Como si hubiera encontrado una grieta por la que abrirse paso.</text:p>
      <text:p text:style-name="Text_20_body">Como si hubiera estado esperando durante mucho tiempo.</text:p>
      <text:p text:style-name="Text_20_body">Entonces comprendió que ya no podía detenerla.</text:p>
      <text:p text:style-name="Text_20_body">Sólo podía impedir que continuara.</text:p>
      <text:p text:style-name="Text_20_body">Con un grito desesperado tomó la lámpara.</text:p>
      <text:p text:style-name="Text_20_body">La levantó sobre su cabeza.</text:p>
      <text:p text:style-name="Text_20_body">Y la estrelló contra el suelo.</text:p>
      <text:p text:style-name="Text_20_body">El cobre se partió.</text:p>
      <text:p text:style-name="Text_20_body">La habitación entera se llenó de una luz blanca y cegadora.</text:p>
      <text:p text:style-name="Text_20_body">El trueno que siguió fue tan intenso que pareció partir la montaña en dos.</text:p>
      <text:p text:style-name="Text_20_body">Y después...</text:p>
      <text:p text:style-name="Text_20_body">silencio.</text:p>
      <text:p text:style-name="Text_20_body">La tormenta continuaba fuera.</text:p>
      <text:p text:style-name="Text_20_body">La lluvia seguía golpeando el tejado.</text:p>
      <text:p text:style-name="Text_20_body">Las paredes seguían en pie.</text:p>
      <text:p text:style-name="Text_20_body">La cabaña parecía exactamente igual que antes.</text:p>
      <text:p text:style-name="Text_20_body">Pero Tagha había desaparecido.</text:p>
      <text:p text:style-name="Text_20_body">No quedaba rastro de ella.</text:p>
      <text:p text:style-name="Text_20_body">Ni una huella.</text:p>
      <text:p text:style-name="Text_20_body">Nada.</text:p>
      <text:p text:style-name="Text_20_body">En el centro del círculo de ceniza reposaba la lámpara.</text:p>
      <text:p text:style-name="Text_20_body">Intacta.</text:p>
      <text:p text:style-name="P1"><text:soft-page-break/>Como un testigo solitario de lo que pasó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3T10:53:45.783000000</meta:creation-date>
    <dc:date>2026-07-18T17:15:32.587000000</dc:date>
    <meta:editing-duration>PT13M17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88" meta:word-count="503" meta:character-count="3062" meta:non-whitespace-character-count="2646"/>
  </office:meta>
</office:document-meta>
</file>