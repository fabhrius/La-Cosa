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h text:style-name="Heading_20_3" text:outline-level="3">Parte 1 - Una nueva aparición</text:h>
      <text:p text:style-name="Text_20_body">Volvieron a la casa antes del mediodía.</text:p>
      <text:p text:style-name="Text_20_body">Tagha seguía sin aparecer.</text:p>
      <text:p text:style-name="Text_20_body">Nadie en Coldrock la había visto recientemente.</text:p>
      <text:p text:style-name="Text_20_body">Algunos vecinos recordaban haber hablado con ella semanas atrás.</text:p>
      <text:p text:style-name="Text_20_body">Otros aseguraban que llevaba meses sin bajar al pueblo.</text:p>
      <text:p text:style-name="Text_20_body">Nadie parecía saberlo con certeza.</text:p>
      <text:p text:style-name="Text_20_body">Aquello resultaba inquietante.</text:p>
      <text:p text:style-name="Text_20_body">Pero no resolvía el problema inmediato.</text:p>
      <text:p text:style-name="Text_20_body">Necesitaban dinero.</text:p>
      <text:p text:style-name="Text_20_body">La comida de la mesa podía durar uno o dos días más.</text:p>
      <text:p text:style-name="Text_20_body">Después de eso volverían a encontrarse exactamente donde estaban al llegar.</text:p>
      <text:p text:style-name="Text_20_body">Sin familia.</text:p>
      <text:p text:style-name="Text_20_body">Sin trabajo.</text:p>
      <text:p text:style-name="Text_20_body">Sin recursos.</text:p>
      <text:p text:style-name="Text_20_body">Pasaron gran parte de la tarde registrando la casa.</text:p>
      <text:p text:style-name="Text_20_body">Abrieron armarios.</text:p>
      <text:p text:style-name="Text_20_body">Examinaron cajones.</text:p>
      <text:p text:style-name="Text_20_body">Revisaron cofres olvidados.</text:p>
      <text:p text:style-name="Text_20_body">Buscaron bajo las tablas del suelo y detrás de los muebles.</text:p>
      <text:p text:style-name="Text_20_body">No encontraron nada.</text:p>
      <text:p text:style-name="Text_20_body">Ni una sola moneda.</text:p>
      <text:p text:style-name="Text_20_body">Cuando cayó la noche estaban agotadas.</text:p>
      <text:p text:style-name="Text_20_body">Kahsia se acostó poco después de cenar.</text:p>
      <text:p text:style-name="Text_20_body">El cansancio pudo más que las preocupaciones.</text:p>
      <text:p text:style-name="Text_20_body">Rylhet permaneció despierta.</text:p>
      <text:p text:style-name="Text_20_body">Sentada en la sala.</text:p>
      <text:p text:style-name="Text_20_body">Pensando.</text:p>
      <text:p text:style-name="Text_20_body"><text:soft-page-break/>Por primera vez comprendía realmente lo que significaba estar sola.</text:p>
      <text:p text:style-name="Text_20_body">Su padre siempre había encontrado una solución.</text:p>
      <text:p text:style-name="Text_20_body">Siempre había sabido qué hacer.</text:p>
      <text:p text:style-name="Text_20_body">Ahora aquella responsabilidad era suya.</text:p>
      <text:p text:style-name="Text_20_body">Y no tenía ninguna respuesta.</text:p>
      <text:p text:style-name="Text_20_body">La oscuridad llenaba los rincones de la casa.</text:p>
      <text:p text:style-name="Text_20_body">Finalmente tomó la lámpara.</text:p>
      <text:p text:style-name="Text_20_body">La encendió.</text:p>
      <text:p text:style-name="Text_20_body">La llama vaciló unos instantes antes de estabilizarse.</text:p>
      <text:p text:style-name="Text_20_body">La luz anaranjada se extendió por la habitación.</text:p>
      <text:p text:style-name="Text_20_body">Las sombras regresaron.</text:p>
      <text:p text:style-name="Text_20_body">Largas.</text:p>
      <text:p text:style-name="Text_20_body">Silenciosas.</text:p>
      <text:p text:style-name="Text_20_body">Temblorosas.</text:p>
      <text:p text:style-name="Text_20_body">Rylhet intentó concentrarse.</text:p>
      <text:p text:style-name="Text_20_body">Necesitaba un plan.</text:p>
      <text:p text:style-name="Text_20_body">Necesitaba dinero.</text:p>
      <text:p text:style-name="Text_20_body">Necesitaba alguna forma de proteger a Kahsia.</text:p>
      <text:p text:style-name="Text_20_body">Se levantó para buscar una manta.</text:p>
      <text:p text:style-name="Text_20_body">La tomó del respaldo de un sillón.</text:p>
      <text:p text:style-name="Text_20_body">La colocó sobre sus hombros.</text:p>
      <text:p text:style-name="Text_20_body">Y al girarse...</text:p>
      <text:p text:style-name="Text_20_body">su sangre se congeló.</text:p>
      <text:p text:style-name="Text_20_body">Su sombra seguía sentada.</text:p>
      <text:p text:style-name="Text_20_body">Rylhet quedó inmóvil.</text:p>
      <text:p text:style-name="Text_20_body">La silla estaba vacía.</text:p>
      <text:p text:style-name="Text_20_body">Ella estaba de pie.</text:p>
      <text:p text:style-name="Text_20_body">Pero la sombra continuaba allí.</text:p>
      <text:p text:style-name="Text_20_body">Sentada.</text:p>
      <text:p text:style-name="Text_20_body">Observándola.</text:p>
      <text:p text:style-name="Text_20_body"><text:soft-page-break/>Durante un segundo interminable ninguna de las dos se movió.</text:p>
      <text:p text:style-name="Text_20_body">Después la sombra inclinó lentamente la cabeza.</text:p>
      <text:p text:style-name="Text_20_body">Como si hubiera tomado una decisión.</text:p>
      <text:p text:style-name="Text_20_body">Y se puso en pie.</text:p>
      <text:p text:style-name="Text_20_body">Rylhet intentó gritar.</text:p>
      <text:p text:style-name="Text_20_body">No salió ningún sonido.</text:p>
      <text:p text:style-name="Text_20_body">Intentó retroceder.</text:p>
      <text:p text:style-name="Text_20_body">Las piernas dejaron de obedecerla.</text:p>
      <text:p text:style-name="Text_20_body">La sombra caminó hacia la puerta.</text:p>
      <text:p text:style-name="Text_20_body">No corría.</text:p>
      <text:p text:style-name="Text_20_body">No se apresuraba.</text:p>
      <text:p text:style-name="Text_20_body">Se movía con una tranquilidad antinatural.</text:p>
      <text:p text:style-name="Text_20_body">Como alguien que sabe exactamente adónde va.</text:p>
      <text:p text:style-name="Text_20_body">La puerta se abrió sola.</text:p>
      <text:p text:style-name="Text_20_body">Y la figura desapareció en la oscuridad exterior.</text:p>
      <text:p text:style-name="Text_20_body">El silencio que siguió fue peor.</text:p>
      <text:p text:style-name="Text_20_body">Mucho peor.</text:p>
      <text:p text:style-name="Text_20_body">Rylhet permaneció inmóvil durante varios minutos.</text:p>
      <text:p text:style-name="Text_20_body">Escuchando.</text:p>
      <text:p text:style-name="Text_20_body">Esperando.</text:p>
      <text:p text:style-name="Text_20_body">Mirando la puerta abierta.</text:p>
      <text:p text:style-name="Text_20_body">Convencida de que algo iba a entrar.</text:p>
      <text:p text:style-name="Text_20_body">Pero no ocurrió nada.</text:p>
      <text:p text:style-name="Text_20_body">Finalmente consiguió obligarse a respirar.</text:p>
      <text:p text:style-name="Text_20_body">Cerró la puerta.</text:p>
      <text:p text:style-name="Text_20_body">Se sentó de nuevo.</text:p>
      <text:p text:style-name="Text_20_body">Y trató de convencerse de que había imaginado todo aquello.</text:p>
      <text:p text:style-name="Text_20_body">La mente puede inventar cosas extrañas.</text:p>
      <text:p text:style-name="Text_20_body">Especialmente de noche.</text:p>
      <text:p text:style-name="Text_20_body">Especialmente en una casa desconocida.</text:p>
      <text:p text:style-name="Text_20_body"><text:soft-page-break/>Especialmente después de lo ocurrido en la posada.</text:p>
      <text:p text:style-name="Text_20_body">Sí.</text:p>
      <text:p text:style-name="Text_20_body">Debía ser eso.</text:p>
      <text:p text:style-name="Text_20_body">Sólo eso.</text:p>
      <text:p text:style-name="Text_20_body">Poco a poco fue recuperando la calma.</text:p>
      <text:p text:style-name="Text_20_body">Volvió a pensar en sus problemas.</text:p>
      <text:p text:style-name="Text_20_body">En Kahsia.</text:p>
      <text:p text:style-name="Text_20_body">En el dinero.</text:p>
      <text:p text:style-name="Text_20_body">En el futuro.</text:p>
      <text:p text:style-name="Text_20_body">En todo aquello que no podía resolver.</text:p>
      <text:p text:style-name="Text_20_body">Pasó más de una hora.</text:p>
      <text:p text:style-name="Text_20_body">La casa permaneció en silencio.</text:p>
      <text:p text:style-name="Text_20_body">Y cuando empezó a sentir sueño decidió acostarse.</text:p>
      <text:p text:style-name="Text_20_body">Se levantó de la silla.</text:p>
      <text:p text:style-name="Text_20_body">Apagó casi por completo la llama.</text:p>
      <text:p text:style-name="Text_20_body">Y entonces escuchó un ruido.</text:p>
      <text:p text:style-name="Text_20_body">Un roce.</text:p>
      <text:p text:style-name="Text_20_body">Suave.</text:p>
      <text:p text:style-name="Text_20_body">Como tela arrastrándose sobre madera.</text:p>
      <text:p text:style-name="Text_20_body">Rylhet levantó la vista.</text:p>
      <text:p text:style-name="Text_20_body">Algo acababa de entrar por la ventana.</text:p>
      <text:p text:style-name="Text_20_body">La sombra.</text:p>
      <text:p text:style-name="Text_20_body">Se deslizó por el suelo de la habitación.</text:p>
      <text:p text:style-name="Text_20_body">Más oscura que la oscuridad.</text:p>
      <text:p text:style-name="Text_20_body">Más negra que cualquier ausencia de luz.</text:p>
      <text:p text:style-name="Text_20_body">Avanzó lentamente hacia la mesa.</text:p>
      <text:p text:style-name="Text_20_body">Rylhet sintió un terror tan intenso que apenas podía respirar.</text:p>
      <text:p text:style-name="Text_20_body">La figura llevaba algo entre las manos.</text:p>
      <text:p text:style-name="Text_20_body">Un pequeño saco de tela.</text:p>
      <text:p text:style-name="Text_20_body">Lo depositó sobre la madera.</text:p>
      <text:p text:style-name="Text_20_body"><text:soft-page-break/>Con cuidado.</text:p>
      <text:p text:style-name="Text_20_body">Casi con delicadeza.</text:p>
      <text:p text:style-name="Text_20_body">Después regresó junto a la pared.</text:p>
      <text:p text:style-name="Text_20_body">Buscó la sombra de Rylhet.</text:p>
      <text:p text:style-name="Text_20_body">Y se fundió con ella.</text:p>
      <text:p text:style-name="Text_20_body">Como una gota de tinta desapareciendo en agua negra.</text:p>
      <text:p text:style-name="Text_20_body">La habitación volvió a quedar inmóvil.</text:p>
      <text:p text:style-name="Text_20_body">Silenciosa.</text:p>
      <text:p text:style-name="Text_20_body">Vacía.</text:p>
      <text:p text:style-name="Text_20_body">Durante largo tiempo Rylhet no se atrevió a acercarse.</text:p>
      <text:p text:style-name="Text_20_body">Pero el saco seguía allí.</text:p>
      <text:p text:style-name="Text_20_body">Esperándola.</text:p>
      <text:p text:style-name="Text_20_body">En mitad de la mesa.</text:p>
      <text:p text:style-name="Text_20_body">Como un regalo.</text:p>
      <text:p text:style-name="Text_20_body">O como una advertencia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7-13T17:44:08.224000000</meta:creation-date>
    <dc:date>2026-07-13T17:49:30.867000000</dc:date>
    <meta:editing-duration>PT5M22S</meta:editing-duration>
    <meta:editing-cycles>1</meta:editing-cycles>
    <meta:document-statistic meta:table-count="0" meta:image-count="0" meta:object-count="0" meta:page-count="5" meta:paragraph-count="133" meta:word-count="639" meta:character-count="3868" meta:non-whitespace-character-count="3362"/>
    <meta:generator>LibreOffice/7.3.5.2$Windows_X86_64 LibreOffice_project/184fe81b8c8c30d8b5082578aee2fed2ea847c01</meta:generator>
  </office:meta>
</office:document-meta>
</file>