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rte 1 - La presión</text:h>
      <text:p text:style-name="Text_20_body">Durante el resto de la tarde intentaron no hablar de las monedas.</text:p>
      <text:p text:style-name="Text_20_body">Ni del robo.</text:p>
      <text:p text:style-name="Text_20_body">Ni de los asesinatos.</text:p>
      <text:p text:style-name="Text_20_body">Era más fácil fingir que nada había ocurrido.</text:p>
      <text:p text:style-name="Text_20_body">Las dos se ocuparon de limpiar la casa.</text:p>
      <text:p text:style-name="Text_20_body">Sacudieron el polvo.</text:p>
      <text:p text:style-name="Text_20_body">Ordenaron algunas habitaciones.</text:p>
      <text:p text:style-name="Text_20_body">Retiraron trastos acumulados durante años.</text:p>
      <text:p text:style-name="Text_20_body">Era una forma de mantenerse ocupadas.</text:p>
      <text:p text:style-name="Text_20_body">De no pensar.</text:p>
      <text:p text:style-name="Text_20_body">La casa de Tagha era pequeña, pero estaba mejorando poco a poco.</text:p>
      <text:p text:style-name="Text_20_body">Al terminar, Kahsia parecía satisfecha.</text:p>
      <text:p text:style-name="Text_20_body">Rylhet no.</text:p>
      <text:p text:style-name="Text_20_body">Cada vez que observaba la vivienda veía lo mismo.</text:p>
      <text:p text:style-name="Text_20_body">No era un hogar.</text:p>
      <text:p text:style-name="Text_20_body">Era un refugio temporal.</text:p>
      <text:p text:style-name="Text_20_body">Un lugar prestado.</text:p>
      <text:p text:style-name="Text_20_body">Un lugar que no les pertenecía.</text:p>
      <text:p text:style-name="Text_20_body">Y cuya dueña seguía desaparecida.</text:p>
      <text:p text:style-name="Text_20_body">Aquello la inquietaba.</text:p>
      <text:p text:style-name="Text_20_body">Mucho más de lo que admitía.</text:p>
      <text:p text:style-name="Horizontal_20_Line"/>
      <text:p text:style-name="Text_20_body">Cuando el sol comenzó a descender tras las montañas, Kahsia salió al exterior.</text:p>
      <text:p text:style-name="Text_20_body">Encontró algunas flores silvestres.</text:p>
      <text:p text:style-name="Text_20_body">Las colocó en una jarra de barro.</text:p>
      <text:p text:style-name="Text_20_body">Después se sentó en el porche.</text:p>
      <text:p text:style-name="Text_20_body">Contemplando el valle.</text:p>
      <text:p text:style-name="Text_20_body">Por un momento parecía feliz.</text:p>
      <text:p text:style-name="Text_20_body"><text:soft-page-break/>Rylhet la observó desde la puerta.</text:p>
      <text:p text:style-name="Text_20_body">Y sintió algo parecido a la culpa.</text:p>
      <text:p text:style-name="Text_20_body">Kahsia todavía era una niña.</text:p>
      <text:p text:style-name="Text_20_body">Intentaba ser valiente.</text:p>
      <text:p text:style-name="Text_20_body">Intentaba ayudar.</text:p>
      <text:p text:style-name="Text_20_body">Pero seguía siendo una niña.</text:p>
      <text:p text:style-name="Text_20_body">No comprendía realmente la situación.</text:p>
      <text:p text:style-name="Text_20_body">No pensaba en el invierno.</text:p>
      <text:p text:style-name="Text_20_body">No pensaba en el dinero.</text:p>
      <text:p text:style-name="Text_20_body">No pensaba en dónde dormirían dentro de un mes.</text:p>
      <text:p text:style-name="Text_20_body">No pensaba en qué ocurriría si Tagha jamás regresaba.</text:p>
      <text:p text:style-name="Text_20_body">Rylhet sí.</text:p>
      <text:p text:style-name="Text_20_body">Pensaba en ello constantemente.</text:p>
      <text:p text:style-name="Horizontal_20_Line"/>
      <text:p text:style-name="Text_20_body">Aquella noche cenaron pan y queso.</text:p>
      <text:p text:style-name="Text_20_body">Sentadas junto a la chimenea.</text:p>
      <text:p text:style-name="Text_20_body">El fuego crepitaba suavemente.</text:p>
      <text:p text:style-name="Text_20_body">Durante un rato ninguna habló.</text:p>
      <text:p text:style-name="Text_20_body">Finalmente Kahsia rompió el silencio.</text:p>
      <text:p text:style-name="Text_20_body">—¿Crees que la tía volverá?</text:p>
      <text:p text:style-name="Text_20_body">Rylhet tardó en responder.</text:p>
      <text:p text:style-name="Text_20_body">—Sí.</text:p>
      <text:p text:style-name="Text_20_body">Mintió.</text:p>
      <text:p text:style-name="Text_20_body">Porque no quería preocuparla.</text:p>
      <text:p text:style-name="Text_20_body">Porque alguien tenía que ser fuerte.</text:p>
      <text:p text:style-name="Text_20_body">Porque alguien tenía que tener respuestas.</text:p>
      <text:p text:style-name="Text_20_body">Aunque no las tuviera.</text:p>
      <text:p text:style-name="Horizontal_20_Line"/>
      <text:p text:style-name="Text_20_body">Más tarde, cuando Kahsia se había distraído observando las llamas, Rylhet se acercó a la ventana.</text:p>
      <text:p text:style-name="Text_20_body">Desde allí podía verse el camino principal.</text:p>
      <text:p text:style-name="Text_20_body"><text:soft-page-break/>Precisamente entonces pasó un carruaje.</text:p>
      <text:p text:style-name="Text_20_body">Era el mismo que habían visto aquella mañana.</text:p>
      <text:p text:style-name="Text_20_body">La mujer elegante viajaba en su interior.</text:p>
      <text:p text:style-name="Text_20_body">Las últimas luces del atardecer hicieron brillar las piedras preciosas que llevaba sobre el cuello y las manos.</text:p>
      <text:p text:style-name="Text_20_body">Rylhet la observó alejarse.</text:p>
      <text:p text:style-name="Text_20_body">En silencio.</text:p>
      <text:p text:style-name="Text_20_body">Pensó en la casa.</text:p>
      <text:p text:style-name="Text_20_body">Pensó en las monedas.</text:p>
      <text:p text:style-name="Text_20_body">Pensó en su padre.</text:p>
      <text:p text:style-name="Text_20_body">Pensó en el miedo constante que había acompañado a su familia durante toda la vida.</text:p>
      <text:p text:style-name="Text_20_body">El miedo a quedarse sin comida.</text:p>
      <text:p text:style-name="Text_20_body">El miedo a no tener suficiente.</text:p>
      <text:p text:style-name="Text_20_body">El miedo a perderlo todo.</text:p>
      <text:p text:style-name="Text_20_body">Y sintió una rabia amarga.</text:p>
      <text:p text:style-name="Text_20_body">Una rabia que no sabía contra quién dirigir.</text:p>
      <text:p text:style-name="Text_20_body">—¿Qué miras? —preguntó Kahsia.</text:p>
      <text:p text:style-name="Text_20_body">Rylhet señaló el carruaje.</text:p>
      <text:p text:style-name="Text_20_body">—A esa mujer.</text:p>
      <text:p text:style-name="Text_20_body">Kahsia se acercó.</text:p>
      <text:p text:style-name="Text_20_body">—Lleva muchas joyas.</text:p>
      <text:p text:style-name="Text_20_body">—Sí.</text:p>
      <text:p text:style-name="Text_20_body">El carruaje desapareció tras una curva.</text:p>
      <text:p text:style-name="Text_20_body">Rylhet continuó observando el camino vacío.</text:p>
      <text:p text:style-name="Text_20_body">—Debe de ser agradable vivir así.</text:p>
      <text:p text:style-name="Text_20_body">—¿Cómo?</text:p>
      <text:p text:style-name="Text_20_body">—Sin preocuparse por nada.</text:p>
      <text:p text:style-name="Text_20_body">Kahsia no respondió.</text:p>
      <text:p text:style-name="Text_20_body">Rylhet apoyó la frente contra el marco de la ventana.</text:p>
      <text:p text:style-name="Text_20_body">—A veces pienso que la vida sería mucho más fácil si tuviéramos dinero.</text:p>
      <text:p text:style-name="Text_20_body"><text:soft-page-break/>Guardó silencio unos segundos.</text:p>
      <text:p text:style-name="Text_20_body">Y después añadió:</text:p>
      <text:p text:style-name="Text_20_body">—Mucho más fácil.</text:p>
      <text:p text:style-name="Horizontal_20_Line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8T19:15:52.251000000</meta:creation-date>
    <dc:date>2026-07-18T19:20:28.382000000</dc:date>
    <meta:editing-duration>PT4M36S</meta:editing-duration>
    <meta:editing-cycles>1</meta:editing-cycles>
    <meta:document-statistic meta:table-count="0" meta:image-count="0" meta:object-count="0" meta:page-count="4" meta:paragraph-count="88" meta:word-count="481" meta:character-count="2828" meta:non-whitespace-character-count="2435"/>
    <meta:generator>LibreOffice/7.3.5.2$Windows_X86_64 LibreOffice_project/184fe81b8c8c30d8b5082578aee2fed2ea847c01</meta:generator>
  </office:meta>
</office:document-meta>
</file>