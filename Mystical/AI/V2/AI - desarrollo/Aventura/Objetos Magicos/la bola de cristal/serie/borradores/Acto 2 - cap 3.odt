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ce90f"/>
    </style:style>
    <style:style style:name="P2" style:family="paragraph" style:parent-style-name="Text_20_body">
      <style:text-properties officeooo:paragraph-rsid="001ce90f"/>
    </style:style>
    <style:style style:name="P3" style:family="paragraph" style:parent-style-name="Text_20_body">
      <style:text-properties officeooo:paragraph-rsid="00201ce0"/>
    </style:style>
    <style:style style:name="T1" style:family="text">
      <style:text-properties officeooo:rsid="001ce90f"/>
    </style:style>
    <style:style style:name="T2" style:family="text">
      <style:text-properties officeooo:rsid="00201c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Capitulo 3 - Penht.</text:span></text:h>
      <text:h text:style-name="P1" text:outline-level="3"/>
      <text:h text:style-name="P1" text:outline-level="3"><text:span text:style-name="T1">Parte </text:span>1<text:span text:style-name="T1"> - </text:span>Dahg sale de su casa</text:h>
      <text:p text:style-name="P2"/>
      <text:p text:style-name="Text_20_body">Era viernes.</text:p>
      <text:p text:style-name="Text_20_body">Poco después de las siete de la tarde, Dahg cerró la puerta de la almoneda y emprendió el camino hacia el muelle del río.</text:p>
      <text:p text:style-name="Text_20_body">Debía llegar antes de las nueve para abordar el barco que lo llevaría a Cittaprospera.</text:p>
      <text:p text:style-name="Text_20_body">Al pasar frente a la propiedad de Omhp se detuvo unos minutos para saludar al anciano granjero.</text:p>
      <text:p text:style-name="Text_20_body">Conversaron brevemente.</text:p>
      <text:p text:style-name="Text_20_body">Después Dahg continuó caminando.</text:p>
      <text:p text:style-name="Text_20_body">Se sentía tranquilo.</text:p>
      <text:p text:style-name="Text_20_body">Había salido con tiempo suficiente y estaba convencido de que esta vez no perdería el barco.</text:p>
      <text:p text:style-name="Text_20_body">Las nubes comenzaban a cubrir el cielo cuando alcanzó la curva del camino.</text:p>
      <text:p text:style-name="Text_20_body">Entonces un potente trueno resonó sobre las llanuras.</text:p>
      <text:p text:style-name="Text_20_body">El sonido fue tan repentino que Dahg se volvió instintivamente hacia el campo abierto.</text:p>
      <text:p text:style-name="Text_20_body">Y en ese mismo instante una carreta fuera de control apareció a su espalda.</text:p>
      <text:p text:style-name="Text_20_body">No tuvo tiempo de apartarse.</text:p>
      <text:p text:style-name="Text_20_body">El impacto lo arrojó fuera del camino.</text:p>
      <text:p text:style-name="Text_20_body">Cayó al suelo con violencia.</text:p>
      <text:p text:style-name="Text_20_body">La carreta continuó avanzando sin detenerse.</text:p>
      <text:p text:style-name="Text_20_body">Unos segundos después desapareció tras la curva.</text:p>
      <text:p text:style-name="Text_20_body">Se escuchó un fuerte golpe.</text:p>
      <text:p text:style-name="Text_20_body">Después otro.</text:p>
      <text:p text:style-name="Text_20_body">Y poco más tarde una columna de humo comenzó a elevarse sobre los tejados de Drywind.</text:p>
      <text:p text:style-name="Text_20_body">Dahg intentó ponerse en pie.</text:p>
      <text:p text:style-name="Text_20_body">Un dolor intenso en la rodilla se lo impidió.</text:p>
      <text:p text:style-name="Text_20_body">Desde el suelo observó cómo el humo aumentaba de tamaño.</text:p>
      <text:p text:style-name="Text_20_body">Y poco después aparecieron las primeras llamas.</text:p>
      <text:p text:style-name="Text_20_body"><text:soft-page-break/></text:p>
      <text:p text:style-name="Horizontal_20_Line"/>
      <text:p text:style-name="Text_20_body"/>
      <text:h text:style-name="Heading_20_3" text:outline-level="3">2. Una columna de humo</text:h>
      <text:p text:style-name="Text_20_body">No muy lejos de allí, junto a la orilla del río, el mismo trueno también llamó la atención de Penht.</text:p>
      <text:p text:style-name="Text_20_body">Penht era un joven granjero de unos treinta años.</text:p>
      <text:p text:style-name="Text_20_body">Había nacido en Drywind y había pasado allí toda su vida.</text:p>
      <text:p text:style-name="Text_20_body">Trabajador, responsable y siempre dispuesto a ayudar a los demás, era una de esas personas que parecían llevarse bien con todo el mundo.</text:p>
      <text:p text:style-name="Text_20_body">Muchos vecinos lo apreciaban.</text:p>
      <text:p text:style-name="Text_20_body">Y Dahg lo apreciaba más que nadie.</text:p>
      <text:p text:style-name="Text_20_body">Con los años había llegado a considerarlo casi como un hijo.</text:p>
      <text:p text:style-name="Text_20_body">Aquella tarde Penht se encontraba terminando la jornada en su granja.</text:p>
      <text:p text:style-name="Text_20_body">El sonido del trueno lo obligó a levantar la vista hacia el cielo.</text:p>
      <text:p text:style-name="Text_20_body">Una tormenta parecía estar formándose sobre la región.</text:p>
      <text:p text:style-name="Text_20_body">Las nubes negras continuaban acumulándose lentamente y avanzaban desde las llanuras.</text:p>
      <text:p text:style-name="Text_20_body">Penht cultivaba maíz y criaba un pequeño grupo de caballos.</text:p>
      <text:p text:style-name="Text_20_body">Pensó que sería prudente dejar los animales bajo techo antes de que comenzara a llover.</text:p>
      <text:p text:style-name="Text_20_body">Se dirigió al establo y comenzó a acomodarlos en el interior.</text:p>
      <text:p text:style-name="Text_20_body">Estaba cerrando una de las puertas cuando algo llamó su atención.</text:p>
      <text:p text:style-name="Text_20_body">A lo lejos, por encima de los árboles, una columna de humo se elevaba sobre el horizonte.</text:p>
      <text:p text:style-name="Text_20_body">Penht se quedó observándola.</text:p>
      <text:p text:style-name="Text_20_body">Era demasiado grande para ser una chimenea.</text:p>
      <text:p text:style-name="Text_20_body">Demasiado oscura.</text:p>
      <text:p text:style-name="Text_20_body">Y parecía provenir directamente del pueblo.</text:p>
      <text:p text:style-name="Text_20_body">Frunció el ceño.</text:p>
      <text:p text:style-name="Text_20_body">¿Qué podía estar ocurriendo?</text:p>
      <text:p text:style-name="Text_20_body">Entonces escuchó una explosión.</text:p>
      <text:p text:style-name="P3"><text:span text:style-name="T2">Y u</text:span>n instante después distinguió las llamas<text:span text:style-name="T2"> en la distancia</text:span>.</text:p>
      <text:p text:style-name="Text_20_body"><text:span text:style-name="T2">Un incendio en el pueblo</text:span>.</text:p>
      <text:p text:style-name="Text_20_body"><text:soft-page-break/></text:p>
      <text:p text:style-name="Horizontal_20_Line"/>
      <text:p text:style-name="Text_20_body"/>
      <text:h text:style-name="Heading_20_3" text:outline-level="3">3. Ayuda</text:h>
      <text:p text:style-name="Text_20_body">Penht no perdió tiempo.</text:p>
      <text:p text:style-name="Text_20_body">Salió del establo, montó uno de sus caballos y se dirigió al pueblo al galope.</text:p>
      <text:p text:style-name="Text_20_body">La columna de humo crecía a cada minuto.</text:p>
      <text:p text:style-name="Text_20_body">Y cuanto más se acercaba, más evidente resultaba la magnitud del incendio.</text:p>
      <text:p text:style-name="Text_20_body">Pocos minutos después llegó a las primeras casas de Drywind.</text:p>
      <text:p text:style-name="Text_20_body">El aire olía a humo.</text:p>
      <text:p text:style-name="Text_20_body">Pequeñas cenizas eran arrastradas por el viento.</text:p>
      <text:p text:style-name="Text_20_body">Los vecinos corrían de un lado a otro transportando cubos de agua, herramientas y cualquier cosa que pudiera servir para combatir el fuego.</text:p>
      <text:p text:style-name="Text_20_body">Penht avanzó por la calle principal.</text:p>
      <text:p text:style-name="Text_20_body">Varias viviendas estaban ardiendo.</text:p>
      <text:p text:style-name="Text_20_body">Otras habían sido desalojadas por precaución.</text:p>
      <text:p text:style-name="Text_20_body">Los habitantes intentaban salvar muebles, herramientas, animales y provisiones antes de que las llamas alcanzaran sus propiedades.</text:p>
      <text:p text:style-name="Text_20_body">El incendio parecía haberse originado en la zona del almacén.</text:p>
      <text:p text:style-name="Text_20_body">Desde allí se había extendido a las construcciones más cercanas.</text:p>
      <text:p text:style-name="Text_20_body">Las llamas sobresalían por encima de los tejados y una densa nube de humo cubría buena parte del centro del pueblo.</text:p>
      <text:p text:style-name="Text_20_body">Penht intentó acercarse.</text:p>
      <text:p text:style-name="Text_20_body">Pero el calor era demasiado intenso.</text:p>
      <text:p text:style-name="Text_20_body">Y el humo demasiado espeso.</text:p>
      <text:p text:style-name="Text_20_body">Comprendió que llegar hasta el almacén era imposible.</text:p>
      <text:p text:style-name="Text_20_body">Se detuvo unos instantes para observar la situación.</text:p>
      <text:p text:style-name="Text_20_body">Los vecinos que trabajaban cerca del incendio parecían concentrar sus esfuerzos en impedir que el fuego alcanzara nuevas construcciones.</text:p>
      <text:p text:style-name="Text_20_body">Aquello tenía sentido.</text:p>
      <text:p text:style-name="Text_20_body">El almacén y las casas más próximas parecían perdidos.</text:p>
      <text:p text:style-name="Text_20_body"><text:soft-page-break/>La prioridad ahora era evitar que las llamas continuaran avanzando.</text:p>
      <text:p text:style-name="Text_20_body">Penht desmontó.</text:p>
      <text:p text:style-name="Text_20_body">Ató el caballo a una cerca.</text:p>
      <text:p text:style-name="Text_20_body">Y fue a reunirse con los demás.</text:p>
      <text:p text:style-name="Horizontal_20_Line"/>
      <text:p text:style-name="Text_20_body"/>
      <text:h text:style-name="Heading_20_3" text:outline-level="3">4. Un acto heroico</text:h>
      <text:p text:style-name="Text_20_body">Penht se detuvo un momento para evaluar la situación.</text:p>
      <text:p text:style-name="Text_20_body">Quería ayudar.</text:p>
      <text:p text:style-name="Text_20_body">Pero comprendía que no era posible salvarlo todo.</text:p>
      <text:p text:style-name="Text_20_body">Había que elegir dónde actuar.</text:p>
      <text:p text:style-name="Text_20_body">Entonces escuchó relinchos.</text:p>
      <text:p text:style-name="Text_20_body">Venían de un establo situado al otro lado de la calle.</text:p>
      <text:p text:style-name="Text_20_body">Miró hacia allí.</text:p>
      <text:p text:style-name="Text_20_body">El fuego había alcanzado una de las paredes exteriores y comenzaba a extenderse por el tejado.</text:p>
      <text:p text:style-name="Text_20_body">Todavía no estaba completamente envuelto en llamas.</text:p>
      <text:p text:style-name="Text_20_body">Pero no quedaba mucho tiempo.</text:p>
      <text:p text:style-name="Text_20_body">Si había animales dentro, pronto quedarían atrapados.</text:p>
      <text:p text:style-name="Text_20_body">Penht cruzó la calle corriendo.</text:p>
      <text:p text:style-name="Text_20_body">Empujó la puerta.</text:p>
      <text:p text:style-name="Text_20_body">Una bocanada de humo caliente salió al exterior.</text:p>
      <text:p text:style-name="Text_20_body">Tuvo que apartarse un instante para poder respirar.</text:p>
      <text:p text:style-name="Text_20_body">Después volvió a acercarse.</text:p>
      <text:p text:style-name="Text_20_body">Se cubrió la boca y la nariz con una manga de la camisa y entró.</text:p>
      <text:p text:style-name="Text_20_body">El interior estaba lleno de humo.</text:p>
      <text:p text:style-name="Text_20_body">La visibilidad era escasa.</text:p>
      <text:p text:style-name="Text_20_body">Las llamas avanzaban por una de las paredes y comenzaban a propagarse por las vigas del techo.</text:p>
      <text:p text:style-name="Text_20_body">Los caballos estaban al fondo.</text:p>
      <text:p text:style-name="Text_20_body">Asustados.</text:p>
      <text:p text:style-name="Text_20_body"><text:soft-page-break/>Golpeando las puertas de los compartimentos con las patas.</text:p>
      <text:p text:style-name="Text_20_body">Intentando escapar.</text:p>
      <text:p text:style-name="Text_20_body">Penht se dirigió hacia ellos.</text:p>
      <text:p text:style-name="Text_20_body">Liberó al primero.</text:p>
      <text:p text:style-name="Text_20_body">El animal salió disparado hacia la salida.</text:p>
      <text:p text:style-name="Text_20_body">Después soltó al segundo.</text:p>
      <text:p text:style-name="Text_20_body">Y al tercero.</text:p>
      <text:p text:style-name="Text_20_body">El humo era cada vez más espeso.</text:p>
      <text:p text:style-name="Text_20_body">Le costaba respirar.</text:p>
      <text:p text:style-name="Text_20_body">Los ojos le ardían.</text:p>
      <text:p text:style-name="Text_20_body">Aun así continuó avanzando hacia el último compartimento.</text:p>
      <text:p text:style-name="Text_20_body">Consiguió abrir el cierre.</text:p>
      <text:p text:style-name="Text_20_body">El caballo se lanzó hacia delante y corrió hacia la puerta.</text:p>
      <text:p text:style-name="Text_20_body">Penht se volvió para seguirlo.</text:p>
      <text:p text:style-name="Text_20_body">Entonces escuchó un crujido.</text:p>
      <text:p text:style-name="Text_20_body">Una de las vigas principales había cedido.</text:p>
      <text:p text:style-name="Text_20_body">Levantó la vista.</text:p>
      <text:p text:style-name="Text_20_body">Y apenas tuvo tiempo de comprender lo que ocurría.</text:p>
      <text:p text:style-name="Text_20_body">Una parte del techo se desplomó sobre él.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7T10:36:40.390000000</meta:creation-date>
    <dc:date>2026-07-07T11:13:33.779000000</dc:date>
    <meta:editing-duration>PT26M40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122" meta:word-count="978" meta:character-count="5780" meta:non-whitespace-character-count="4924"/>
  </office:meta>
</office:document-meta>
</file>