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d0341" officeooo:paragraph-rsid="001d0341"/>
    </style:style>
    <style:style style:name="P2" style:family="paragraph" style:parent-style-name="Text_20_body">
      <style:text-properties officeooo:paragraph-rsid="001d0341"/>
    </style:style>
    <style:style style:name="P3" style:family="paragraph" style:parent-style-name="Text_20_body">
      <style:text-properties officeooo:rsid="001dad28" officeooo:paragraph-rsid="001dad28"/>
    </style:style>
    <style:style style:name="P4" style:family="paragraph" style:parent-style-name="Heading_20_3">
      <style:text-properties officeooo:paragraph-rsid="001f5d30"/>
    </style:style>
    <style:style style:name="P5" style:family="paragraph" style:parent-style-name="Heading_20_3">
      <style:text-properties officeooo:paragraph-rsid="001f6972"/>
    </style:style>
    <style:style style:name="P6" style:family="paragraph" style:parent-style-name="Heading_20_3">
      <style:text-properties officeooo:paragraph-rsid="002273fd"/>
    </style:style>
    <style:style style:name="P7" style:family="paragraph" style:parent-style-name="Horizontal_20_Line">
      <style:text-properties officeooo:paragraph-rsid="002273fd"/>
    </style:style>
    <style:style style:name="P8" style:family="paragraph" style:parent-style-name="Standard">
      <style:text-properties officeooo:rsid="001f5d30" officeooo:paragraph-rsid="001f5d30"/>
    </style:style>
    <style:style style:name="P9" style:family="paragraph" style:parent-style-name="Standard">
      <style:text-properties officeooo:paragraph-rsid="002273fd"/>
    </style:style>
    <style:style style:name="P10" style:family="paragraph" style:parent-style-name="Text_20_body">
      <style:text-properties officeooo:rsid="001f5d30" officeooo:paragraph-rsid="001f5d30"/>
    </style:style>
    <style:style style:name="P11" style:family="paragraph" style:parent-style-name="Text_20_body">
      <style:text-properties officeooo:paragraph-rsid="001f5d30"/>
    </style:style>
    <style:style style:name="P12" style:family="paragraph" style:parent-style-name="Text_20_body">
      <style:text-properties officeooo:paragraph-rsid="001f6972"/>
    </style:style>
    <style:style style:name="P13" style:family="paragraph" style:parent-style-name="Text_20_body">
      <style:text-properties officeooo:paragraph-rsid="002273fd"/>
    </style:style>
    <style:style style:name="T1" style:family="text">
      <style:text-properties officeooo:rsid="001d0341"/>
    </style:style>
    <style:style style:name="T2" style:family="text">
      <style:text-properties officeooo:rsid="001f5d30"/>
    </style:style>
    <style:style style:name="T3" style:family="text">
      <style:text-properties officeooo:rsid="002273f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cto 3</text:h>
      <text:h text:style-name="P4" text:outline-level="3">Capítulo 1 - </text:h>
      <text:h text:style-name="P4" text:outline-level="3"><text:span text:style-name="T2">Parte 1 - </text:span>Tiempo después</text:h>
      <text:p text:style-name="Text_20_body"/>
      <text:p text:style-name="Text_20_body">Habían pasado tres semanas desde el día del incendio.</text:p>
      <text:p text:style-name="Text_20_body">El pueblo recuperaba poco a poco su ritmo habitual mientras comenzaban los trabajos de reconstrucción de los edificios dañados.</text:p>
      <text:p text:style-name="Text_20_body">Dahg todavía caminaba con cierta dificultad debido a una lesión en la rodilla que ya empezaba a superar.</text:p>
      <text:p text:style-name="Text_20_body">Más difícil de superar estaba resultando la ausencia de sus amigos.</text:p>
      <text:p text:style-name="Text_20_body">Y especialmente la de Penht.</text:p>
      <text:p text:style-name="Text_20_body">La venta del terreno había quedado suspendida.</text:p>
      <text:p text:style-name="Text_20_body">Retomaría las gestiones, posiblemente, en la próxima primavera.</text:p>
      <text:p text:style-name="Text_20_body">Ahora necesitaba tiempo y tranquilidad.</text:p>
      <text:p text:style-name="Text_20_body">Aquella mañana se sentía con más energía.</text:p>
      <text:p text:style-name="Text_20_body">Decidió poner orden en la tienda.</text:p>
      <text:p text:style-name="Text_20_body">Mover algunos muebles.</text:p>
      <text:p text:style-name="Text_20_body">Limpiar.</text:p>
      <text:p text:style-name="Text_20_body">Dar mejor aspecto a los objetos expuestos.</text:p>
      <text:p text:style-name="Text_20_body">Pasó así varias horas reorganizando mercancías y retirando el polvo acumulado, hasta que su atención se posó sobre la bola de cristal.</text:p>
      <text:p text:style-name="Text_20_body">Continuaba exactamente donde la había dejado aquella noche.</text:p>
      <text:p text:style-name="Text_20_body">No había vuelto a tocarla desde entonces.</text:p>
      <text:p text:style-name="Text_20_body">Tal vez podía retomar el trabajo de restauración que había pensado realizar antes de ponerla a la venta.</text:p>
      <text:p text:style-name="Text_20_body">La tomó entre sus manos.</text:p>
      <text:p text:style-name="Text_20_body">La observó detenidamente.</text:p>
      <text:p text:style-name="Text_20_body">La giró hacia un lado y hacia el otro.</text:p>
      <text:p text:style-name="Text_20_body">Seguía siendo un objeto extraordinario.</text:p>
      <text:p text:style-name="Text_20_body">Hermoso.</text:p>
      <text:p text:style-name="Text_20_body"><text:soft-page-break/>Intrigante.</text:p>
      <text:p text:style-name="Text_20_body">Y profundamente inquietante.</text:p>
      <text:p text:style-name="Text_20_body">Lo que había visto aquella noche continuaba sin encontrar explicación.</text:p>
      <text:p text:style-name="Text_20_body">¿Había mostrado realmente el futuro?</text:p>
      <text:p text:style-name="Text_20_body">¿O todo había sido una extraña ilusión nacida de su imaginación?</text:p>
      <text:p text:style-name="Text_20_body">Sin embargo, había perdido el barco.</text:p>
      <text:p text:style-name="Text_20_body">Se había encontrado con Omhp.</text:p>
      <text:p text:style-name="Text_20_body">Y el rayo había caído exactamente como lo había visto.</text:p>
      <text:p text:style-name="Text_20_body">¿Coincidencias?</text:p>
      <text:p text:style-name="Text_20_body">Quizás.</text:p>
      <text:p text:style-name="Text_20_body">Pero costaba creerlo.</text:p>
      <text:p text:style-name="Text_20_body">Y si la bola mostraba el futuro...</text:p>
      <text:p text:style-name="Text_20_body">¿Por qué permanecía ahora en silencio?</text:p>
      <text:p text:style-name="Text_20_body">Dahg la dejó con cuidado sobre la mesa y se apartó unos pasos.</text:p>
      <text:p text:style-name="P3">El misterio crecía en su <text:span text:style-name="T1">imaginación</text:span>.</text:p>
      <text:p text:style-name="Text_20_body">Permaneció observándola.</text:p>
      <text:p text:style-name="Text_20_body">Pensando.</text:p>
      <text:p text:style-name="Text_20_body">Intentando comprender.</text:p>
      <text:p text:style-name="Text_20_body">Y entonces sucedió de nuevo.</text:p>
      <text:p text:style-name="Text_20_body">Un fino hilo de humo blanco apareció en el interior del cristal.</text:p>
      <text:p text:style-name="Text_20_body">Se extendió lentamente.</text:p>
      <text:p text:style-name="Text_20_body">Giró sobre sí mismo.</text:p>
      <text:p text:style-name="Text_20_body">Y acabó llenando toda la esfera hasta volverla completamente opaca.</text:p>
      <text:p text:style-name="P2">Dahg sintió un escalofrío.<text:span text:style-name="T1"> Aquello le heló la sangre.</text:span></text:p>
      <text:p text:style-name="P1">Ahora ya no parecía ser su imaginación.</text:p>
      <text:p text:style-name="Text_20_body"><text:span text:style-name="T1">Y n</text:span>o estaba seguro de querer ver lo que mostraría esta vez.</text:p>
      <text:p text:style-name="Text_20_body">Pero tampoco pudo apartar la vista.</text:p>
      <text:p text:style-name="Text_20_body"/>
      <text:p text:style-name="Horizontal_20_Line"/>
      <text:p text:style-name="Text_20_body"/>
      <text:p text:style-name="Text_20_body"><text:soft-page-break/></text:p>
      <text:h text:style-name="P4" text:outline-level="3"><text:span text:style-name="T2">Parte 2 - Una nueva visión.</text:span></text:h>
      <text:p text:style-name="P11"/>
      <text:p text:style-name="P8"/>
      <text:p text:style-name="P8"/>
      <text:p text:style-name="P11">La imagen se hizo más nítida.</text:p>
      <text:p text:style-name="P11">Dahg avanzaba despacio por el camino del puente viejo.</text:p>
      <text:p text:style-name="P11">Reconoció el lugar al instante.</text:p>
      <text:p text:style-name="P11">Era la ruta que conducía a Leavebehind, un pequeño pueblo del valle occidental al que viajaba con frecuencia por negocios.</text:p>
      <text:p text:style-name="P11">A lo lejos apareció la silueta del puente.</text:p>
      <text:p text:style-name="P11">Y sobre él, una carreta.</text:p>
      <text:p text:style-name="P11">Dahg sintió una inmediata inquietud.</text:p>
      <text:p text:style-name="P11">Nadie utilizaba aquel puente desde hacía años.</text:p>
      <text:p text:style-name="P11">Las maderas estaban podridas y varias de las vigas habían cedido. Los vecinos preferían recorrer varios kilómetros adicionales antes que arriesgarse a cruzarlo.</text:p>
      <text:p text:style-name="P11">Cuando se acercó comprobó que la situación era todavía peor de lo que parecía.</text:p>
      <text:p text:style-name="P11">Una de las ruedas de la carreta había atravesado el entablado y había quedado atrapada entre las vigas.</text:p>
      <text:p text:style-name="P11">El caballo ya había sido desenganchado.</text:p>
      <text:p text:style-name="P11">Su dueño esperaba junto al camino observando impotente.</text:p>
      <text:p text:style-name="P11">Hablaron unos momentos.</text:p>
      <text:p text:style-name="P11">El hombre explicó que transportaba herramientas y mercancías valiosas. Si perdía la carreta lo perdería casi todo.</text:p>
      <text:p text:style-name="P11">Entonces ambos decidieron intentar rescatarla.</text:p>
      <text:p text:style-name="P11">Ataron una gruesa cuerda entre las dos carretas.</text:p>
      <text:p text:style-name="P11">Dahg avanzó lentamente.</text:p>
      <text:p text:style-name="P11">La cuerda se tensó.</text:p>
      <text:p text:style-name="P11">La carreta atrapada no se movió.</text:p>
      <text:p text:style-name="P11">Volvió a intentarlo.</text:p>
      <text:p text:style-name="P11">Las tablas del puente crujieron.</text:p>
      <text:p text:style-name="P11">La cuerda quedó rígida como una barra de hierro.</text:p>
      <text:p text:style-name="P11"><text:soft-page-break/>Y de pronto la rueda salió de la trampa.</text:p>
      <text:p text:style-name="P11">La carreta se desplazó bruscamente hacia adelante.</text:p>
      <text:p text:style-name="P11">Al mismo tiempo se escuchó un chasquido seco.</text:p>
      <text:p text:style-name="P11">Una de las vigas principales acababa de romperse.</text:p>
      <text:p text:style-name="P11">El puente entero se inclinó unos centímetros.</text:p>
      <text:p text:style-name="P11">Las dos carretas quedaron atravesadas sobre la estructura.</text:p>
      <text:p text:style-name="P11">Dahg intentó hacer retroceder a su caballo.</text:p>
      <text:p text:style-name="P11">Demasiado tarde.</text:p>
      <text:p text:style-name="P11">El puente seguía cediendo bajo el peso.</text:p>
      <text:p text:style-name="P11">Las tablas se partían una tras otra.</text:p>
      <text:p text:style-name="P11">Comprendió que ya no podría salvar ninguna de las dos.</text:p>
      <text:p text:style-name="P11">Corrió hacia el caballo y soltó los arneses.</text:p>
      <text:p text:style-name="P11">El animal retrocedió aterrorizado hasta terreno firme.</text:p>
      <text:p text:style-name="P11">Los dos hombres se alejaron apresuradamente.</text:p>
      <text:p text:style-name="P11">Un instante después el puente se derrumbó.</text:p>
      <text:p text:style-name="P11">Las dos carretas desaparecieron entre una nube de polvo y astillas.</text:p>
      <text:p text:style-name="P10">Veinte metros más abajo, el río Verdastro se las tragó.</text:p>
      <text:p text:style-name="P10"/>
      <text:p text:style-name="Horizontal_20_Line"/>
      <text:p text:style-name="Text_20_body"/>
      <text:h text:style-name="P5" text:outline-level="3"><text:span text:style-name="T2">Parte 3 - ¿Y ahora qué?</text:span></text:h>
      <text:p text:style-name="P11"/>
      <text:p text:style-name="P12">La visión se desvaneció tan repentinamente como había aparecido.</text:p>
      <text:p text:style-name="P12">El humo blanco desapareció del interior de la esfera.</text:p>
      <text:p text:style-name="P12">Y el cristal volvió a ser una simple lente de lectura.</text:p>
      <text:p text:style-name="P12">Dahg permaneció inmóvil.</text:p>
      <text:p text:style-name="P12">No podía apartar la vista de ella.</text:p>
      <text:p text:style-name="P12">Acababa de ver cómo perdía la carreta.</text:p>
      <text:p text:style-name="P12">Su carreta.</text:p>
      <text:p text:style-name="P12"><text:soft-page-break/>La misma por la que había trabajado durante años.</text:p>
      <text:p text:style-name="P12">La misma en la que había invertido todos sus ahorros.</text:p>
      <text:p text:style-name="P12">Sin ella no podría transportar mercancías.</text:p>
      <text:p text:style-name="P12">No podría ampliar el negocio.</text:p>
      <text:p text:style-name="P12">No podría recuperarse de las pérdidas que había sufrido tras el incendio.</text:p>
      <text:p text:style-name="P12">Aquella carreta no era un lujo.</text:p>
      <text:p text:style-name="P12">Era su futuro.</text:p>
      <text:p text:style-name="P12">Se levantó lentamente de la silla.</text:p>
      <text:p text:style-name="P12">Comenzó a caminar por la habitación.</text:p>
      <text:p text:style-name="P12">Intentó convencerse de que aquello no significaba nada.</text:p>
      <text:p text:style-name="P12">Tal vez la primera visión había sido una coincidencia.</text:p>
      <text:p text:style-name="P12">Tal vez todo aquello era producto de su imaginación.</text:p>
      <text:p text:style-name="P12">Pero ya no lo creía.</text:p>
      <text:p text:style-name="P12">Había visto demasiadas cosas.</text:p>
      <text:p text:style-name="P12">El encuentro con Omhp.</text:p>
      <text:p text:style-name="P12">El trueno.</text:p>
      <text:p text:style-name="P12">La pérdida del barco.</text:p>
      <text:p text:style-name="P12">Demasiadas coincidencias.</text:p>
      <text:p text:style-name="P12">Y ahora una segunda advertencia.</text:p>
      <text:p text:style-name="P12">—¿Y ahora qué? —murmuró para sí.</text:p>
      <text:p text:style-name="P12">No encontró respuesta.</text:p>
      <text:p text:style-name="P12">Se alejó de la mesa y continuó trabajando en la tienda durante el resto del día.</text:p>
      <text:p text:style-name="P12">Intentó concentrarse en los clientes.</text:p>
      <text:p text:style-name="P12">Intentó ordenar mercancías.</text:p>
      <text:p text:style-name="P12">Intentó pensar en cualquier otra cosa.</text:p>
      <text:p text:style-name="P12">Pero la imagen del puente regresaba una y otra vez.</text:p>
      <text:p text:style-name="P12">La carreta atrapada.</text:p>
      <text:p text:style-name="P12">Las tablas crujiendo.</text:p>
      <text:p text:style-name="P12">El puente cediendo lentamente.</text:p>
      <text:p text:style-name="P12">Su propia carreta desapareciendo en el río.</text:p>
      <text:p text:style-name="P12"><text:soft-page-break/>Aquella noche se acostó más temprano de lo habitual.</text:p>
      <text:p text:style-name="P12">Y durmió mal.</text:p>
      <text:p text:style-name="P12">Soñó con caminos que se bifurcaban.</text:p>
      <text:p text:style-name="P12">Con decisiones imposibles.</text:p>
      <text:p text:style-name="P12">Se despertó sobresaltado antes del amanecer.</text:p>
      <text:p text:style-name="P12">La habitación estaba oscura.</text:p>
      <text:p text:style-name="P12">Y sin embargo su decisión era clara.</text:p>
      <text:p text:style-name="P12">Tenía que deshacerse de aquella cosa.</text:p>
      <text:p text:style-name="P12">No quería volver a ver otra visión.</text:p>
      <text:p text:style-name="P12">No quería volver a preguntarse qué debía cambiar.</text:p>
      <text:p text:style-name="P12">No quería seguir viviendo pendiente de futuros que aún no existían.</text:p>
      <text:p text:style-name="P12">Se vistió.</text:p>
      <text:p text:style-name="P12">Bajó a la tienda.</text:p>
      <text:p text:style-name="P12">Y antes incluso de abrir las puertas colocó la esfera de cristal en el escaparate.</text:p>
      <text:p text:style-name="P12">Ya no pretendía obtener una gran ganancia.</text:p>
      <text:p text:style-name="P12">Ni siquiera un beneficio.</text:p>
      <text:p text:style-name="P12">Le bastaba con recuperar el dinero que había pagado por ella.</text:p>
      <text:p text:style-name="P12">Quería verla lejos.</text:p>
      <text:p text:style-name="P12">Lo antes posible.</text:p>
      <text:p text:style-name="P12"/>
      <text:p text:style-name="Horizontal_20_Line"/>
      <text:p text:style-name="Text_20_body"/>
      <text:p text:style-name="P13"/>
      <text:h text:style-name="P6" text:outline-level="3"><text:span text:style-name="T3">Parte </text:span>4 - La venta</text:h>
      <text:p text:style-name="P13"/>
      <text:p text:style-name="P13">Aquella mañana abrió la tienda con los primeros rayos del sol.</text:p>
      <text:p text:style-name="P13">Todavía estaba retirando las cubiertas que protegían el escaparate cuando oyó abrirse la puerta.</text:p>
      <text:p text:style-name="P13">Un hombre acababa de entrar.</text:p>
      <text:p text:style-name="P13">Vestía ropa de viaje de buena calidad y llevaba una cartera de cuero bajo el brazo.</text:p>
      <text:p text:style-name="P13"><text:soft-page-break/>Su aspecto era distinguido.</text:p>
      <text:p text:style-name="P13">No parecía un noble, sino un hombre instruido.</text:p>
      <text:p text:style-name="P13">Alguien acostumbrado a trabajar con documentos y libros.</text:p>
      <text:p text:style-name="P13">Recorrió la tienda con una rápida mirada y casi de inmediato se detuvo frente a la esfera de cristal.</text:p>
      <text:p text:style-name="P13">—¿Puedo verla? —preguntó.</text:p>
      <text:p text:style-name="P13">Dahg asintió.</text:p>
      <text:p text:style-name="P13">El visitante tomó el objeto con cuidado.</text:p>
      <text:p text:style-name="P13">Observó los grabados de marfil.</text:p>
      <text:p text:style-name="P13">Examinó el cristal a contraluz.</text:p>
      <text:p text:style-name="P13">Comprobó el estado del soporte.</text:p>
      <text:p text:style-name="P13">Y después sonrió con evidente satisfacción.</text:p>
      <text:p text:style-name="P13">Parecía conocer perfectamente aquella clase de instrumentos.</text:p>
      <text:p text:style-name="P13">Explicó que era escribano.</text:p>
      <text:p text:style-name="P13">Procedía de Fogliempilate, una ciudad situada muy al sur, en la región de Mediaplanta.</text:p>
      <text:p text:style-name="P13">Viajaba por negocios.</text:p>
      <text:p text:style-name="P13">Aquella misma tarde partiría hacia Pomagrande siguiendo la ruta comercial del río.</text:p>
      <text:p text:style-name="P13">Durante varios minutos conversaron sobre mapas, documentos antiguos, rutas mercantiles y métodos de copia.</text:p>
      <text:p text:style-name="P13">Era un hombre culto.</text:p>
      <text:p text:style-name="P13">Educado.</text:p>
      <text:p text:style-name="P13">Y extraordinariamente agradable.</text:p>
      <text:p text:style-name="P13">Dahg disfrutó de la conversación.</text:p>
      <text:p text:style-name="P13">Sin embargo, algo no dejaba de inquietarlo.</text:p>
      <text:p text:style-name="P13">Apenas habían pasado unas horas desde que decidió deshacerse de la esfera.</text:p>
      <text:p text:style-name="P13">Y ahora tenía delante exactamente al comprador que necesitaba.</text:p>
      <text:p text:style-name="P13">Un hombre con dinero.</text:p>
      <text:p text:style-name="P13">Con conocimientos suficientes para apreciar el objeto.</text:p>
      <text:p text:style-name="P13">Con una necesidad real de utilizarlo.</text:p>
      <text:p text:style-name="P13">Y además un viajero que abandonaría la región aquel mismo día.</text:p>
      <text:p text:style-name="P13">Era, en todos los sentidos posibles, el cliente perfecto.</text:p>
      <text:p text:style-name="P13"><text:soft-page-break/>Aquello debía ser una coincidencia.</text:p>
      <text:p text:style-name="P13">Sin duda lo era.</text:p>
      <text:p text:style-name="P13">Pero resultaba una coincidencia extrañamente oportuna.</text:p>
      <text:p text:style-name="P13">Finalmente el hombre dejó la esfera sobre el mostrador.</text:p>
      <text:p text:style-name="P13">—¿Cuál es su precio? —preguntó.</text:p>
      <text:p text:style-name="P13">Solo entonces Dahg dudó.</text:p>
      <text:p text:style-name="P13">Su mirada descendió hacia el cristal.</text:p>
      <text:p text:style-name="P13">Por un instante recordó el humo blanco.</text:p>
      <text:p text:style-name="P13">Las imágenes.</text:p>
      <text:p text:style-name="P13">El incendio.</text:p>
      <text:p text:style-name="P13">El puente.</text:p>
      <text:p text:style-name="P13">La sensación de estar observando algo que ningún ser humano debería conocer.</text:p>
      <text:p text:style-name="P13">¿Debía venderla?</text:p>
      <text:p text:style-name="P13">Aquella pregunta no tenía una respuesta sencilla.</text:p>
      <text:p text:style-name="P13">No sabía qué era realmente la esfera.</text:p>
      <text:p text:style-name="P13">No sabía cómo funcionaba.</text:p>
      <text:p text:style-name="P13">Ni siquiera estaba seguro de que fuese peligrosa.</text:p>
      <text:p text:style-name="P13">Después de todo, la esfera no había provocado el incendio.</text:p>
      <text:p text:style-name="P13">Ni había derribado el puente.</text:p>
      <text:p text:style-name="P13">Solo había mostrado algo.</text:p>
      <text:p text:style-name="P13">Información.</text:p>
      <text:p text:style-name="P13">Nada más.</text:p>
      <text:p text:style-name="P13">Y la información no era buena ni mala por sí misma.</text:p>
      <text:p text:style-name="P13">Todo dependía de lo que cada persona decidiera hacer con ella.</text:p>
      <text:p text:style-name="P13">Quizá, en manos adecuadas, aquel objeto podría resultar útil.</text:p>
      <text:p text:style-name="P13">Quizá incluso beneficioso.</text:p>
      <text:p text:style-name="P13">Dahg apoyó ambas manos sobre el mostrador.</text:p>
      <text:p text:style-name="P13">Miró al escribano.</text:p>
      <text:p text:style-name="P13">Y respondió:</text:p>
      <text:p text:style-name="P13">—¿Cuánto cree usted que vale?</text:p>
      <text:p text:style-name="P7"><text:soft-page-break/></text:p>
      <text:p text:style-name="P13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7T14:59:22.135000000</meta:creation-date>
    <dc:date>2026-07-07T20:23:18.645000000</dc:date>
    <meta:editing-duration>PT1H55M46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214" meta:word-count="1461" meta:character-count="8910" meta:non-whitespace-character-count="7662"/>
  </office:meta>
</office:document-meta>
</file>