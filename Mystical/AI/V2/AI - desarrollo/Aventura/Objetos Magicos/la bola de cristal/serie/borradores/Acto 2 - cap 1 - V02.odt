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center" style:justify-single-word="false"/>
      <style:text-properties style:font-name="Cinzel Decorative" fo:font-style="normal" style:font-style-asian="normal" style:font-style-complex="normal"/>
    </style:style>
    <style:style style:name="P3" style:family="paragraph" style:parent-style-name="Text_20_body">
      <style:text-properties officeooo:rsid="000d26dd" officeooo:paragraph-rsid="000d26dd"/>
    </style:style>
    <style:style style:name="P4" style:family="paragraph" style:parent-style-name="Text_20_body">
      <style:text-properties officeooo:paragraph-rsid="000d5e2f"/>
    </style:style>
    <style:style style:name="P5" style:family="paragraph" style:parent-style-name="Text_20_body">
      <style:text-properties officeooo:paragraph-rsid="000f8bf3"/>
    </style:style>
    <style:style style:name="P6" style:family="paragraph" style:parent-style-name="Text_20_body">
      <style:text-properties officeooo:paragraph-rsid="00122bb3"/>
    </style:style>
    <style:style style:name="P7" style:family="paragraph" style:parent-style-name="Text_20_body">
      <style:text-properties officeooo:paragraph-rsid="001692f5"/>
    </style:style>
    <style:style style:name="P8" style:family="paragraph" style:parent-style-name="Text_20_body">
      <style:text-properties officeooo:paragraph-rsid="0018e35d"/>
    </style:style>
    <style:style style:name="P9" style:family="paragraph" style:parent-style-name="Text_20_body">
      <style:text-properties officeooo:rsid="0018e35d" officeooo:paragraph-rsid="0018e35d"/>
    </style:style>
    <style:style style:name="P10" style:family="paragraph" style:parent-style-name="Text_20_body">
      <style:text-properties officeooo:paragraph-rsid="001b5b06"/>
    </style:style>
    <style:style style:name="P11" style:family="paragraph" style:parent-style-name="Text_20_body">
      <style:text-properties officeooo:paragraph-rsid="001bad5f"/>
    </style:style>
    <style:style style:name="P12" style:family="paragraph" style:parent-style-name="Text_20_body">
      <style:text-properties officeooo:paragraph-rsid="001ecd83"/>
    </style:style>
    <style:style style:name="T1" style:family="text">
      <style:text-properties officeooo:rsid="000ac2a0"/>
    </style:style>
    <style:style style:name="T2" style:family="text">
      <style:text-properties officeooo:rsid="000d26dd"/>
    </style:style>
    <style:style style:name="T3" style:family="text">
      <style:text-properties officeooo:rsid="000d5e2f"/>
    </style:style>
    <style:style style:name="T4" style:family="text">
      <style:text-properties officeooo:rsid="000f5b7a"/>
    </style:style>
    <style:style style:name="T5" style:family="text">
      <style:text-properties officeooo:rsid="000f8bf3"/>
    </style:style>
    <style:style style:name="T6" style:family="text">
      <style:text-properties officeooo:rsid="00114eb5"/>
    </style:style>
    <style:style style:name="T7" style:family="text">
      <style:text-properties officeooo:rsid="00122bb3"/>
    </style:style>
    <style:style style:name="T8" style:family="text">
      <style:text-properties officeooo:rsid="00140428"/>
    </style:style>
    <style:style style:name="T9" style:family="text">
      <style:text-properties officeooo:rsid="00155b37"/>
    </style:style>
    <style:style style:name="T10" style:family="text">
      <style:text-properties officeooo:rsid="001692f5"/>
    </style:style>
    <style:style style:name="T11" style:family="text">
      <style:text-properties officeooo:rsid="0017d597"/>
    </style:style>
    <style:style style:name="T12" style:family="text">
      <style:text-properties officeooo:rsid="0018e35d"/>
    </style:style>
    <style:style style:name="T13" style:family="text">
      <style:text-properties officeooo:rsid="001b5b06"/>
    </style:style>
    <style:style style:name="T14" style:family="text">
      <style:text-properties officeooo:rsid="001bad5f"/>
    </style:style>
    <style:style style:name="T15" style:family="text">
      <style:text-properties officeooo:rsid="001bfb00"/>
    </style:style>
    <style:style style:name="T16" style:family="text">
      <style:text-properties officeooo:rsid="001dab58"/>
    </style:style>
    <style:style style:name="T17" style:family="text">
      <style:text-properties officeooo:rsid="001ecd83"/>
    </style:style>
    <style:style style:name="T18" style:family="text">
      <style:text-properties officeooo:rsid="001f30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I</text:h>
      <text:p text:style-name="Text_20_body"/>
      <text:p text:style-name="P1"><text:span text:style-name="T1">"M</text:span>uchas veces no existe una solución perfecta.</text:p>
      <text:p text:style-name="P1">Solo existe la menos mala.<text:span text:style-name="T1">"</text:span></text:p>
      <text:p text:style-name="P2"><text:span text:style-name="T1"><text:tab/><text:tab/><text:tab/><text:tab/><text:tab/></text:span>— Fabhrius</text:p>
      <text:p text:style-name="Text_20_body"/>
      <text:p text:style-name="Horizontal_20_Line"/>
      <text:h text:style-name="Heading_20_3" text:outline-level="3">Capítulo 1 - Omhp<text:span text:style-name="T15">.</text:span></text:h>
      <text:h text:style-name="Heading_20_4" text:outline-level="4"><text:span text:style-name="T15">Parte </text:span>1<text:span text:style-name="T15"> - </text:span>Dahg inicia la marcha<text:span text:style-name="T15">.</text:span></text:h>
      <text:p text:style-name="P3">Dia: viernes, hora: 7 pm.</text:p>
      <text:p text:style-name="P3"/>
      <text:p text:style-name="Text_20_body">Dahg abandonó la almoneda y emprendió el camino<text:span text:style-name="T2"> a pie</text:span> hacia el muelle del río.</text:p>
      <text:p text:style-name="Text_20_body">Llevaba consigo una pequeña bolsa con documentos, algunas monedas y todo lo necesario para el viaje.</text:p>
      <text:p text:style-name="Text_20_body">Era un día importante.</text:p>
      <text:p text:style-name="P4">En <text:span text:style-name="T3">Próspera</text:span>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text:span text:style-name="T4">Posiblemente</text:span> una de esas tormentas pasajeras que aparecían con frecuencia al final del verano.</text:p>
      <text:p text:style-name="Text_20_body">Dahg avanzó a buen ritmo.<text:span text:style-name="T4"> </text:span>Conocía perfectamente el camino.</text:p>
      <text:p text:style-name="Text_20_body">Había recorrido aquella ruta decenas de veces a lo largo de los años.</text:p>
      <text:p text:style-name="Text_20_body">Y tenía <text:span text:style-name="T4">la </text:span>intención de <text:span text:style-name="T4">no </text:span>cometer los errores que había visto en la esfera.</text:p>
      <text:p text:style-name="Text_20_body"><text:soft-page-break/>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Standard"/>
      <text:p text:style-name="Horizontal_20_Line"/>
      <text:p text:style-name="Text_20_body"/>
      <text:h text:style-name="Heading_20_4" text:outline-level="4"><text:span text:style-name="T15">Parte </text:span>2<text:span text:style-name="T15"> - </text:span>El encuentro con Omhp<text:span text:style-name="T15">.</text:span></text:h>
      <text:p text:style-name="Text_20_body"/>
      <text:p text:style-name="Text_20_body">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span text:style-name="T5">,</text:span> en aquel lugar.</text:p>
      <text:p text:style-name="Text_20_body"><text:span text:style-name="T5">C</text:span>on Omhp.</text:p>
      <text:p text:style-name="Text_20_body">Durante un instante estuvo tentado de continuar caminando sin detenerse.</text:p>
      <text:p text:style-name="Text_20_body">Pero descartó la idea inmediatamente.</text:p>
      <text:p text:style-name="Text_20_body">Omhp era un buen vecino.<text:span text:style-name="T5"> </text:span>Y además parecía preocupado.</text:p>
      <text:p text:style-name="Text_20_body">Así que se acercó unos pasos y esperó.</text:p>
      <text:p text:style-name="Text_20_body">—Buenas tardes, Dahg.</text:p>
      <text:p text:style-name="Text_20_body"><text:soft-page-break/>—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P5">—Me gustaría ayudarte ahora mismo —respondió—, pero debo llegar al muelle antes de las nueve. Esta noche sale el barco hacia <text:span text:style-name="T5">Próspera</text:span>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text:soft-page-break/>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Text_20_body"/>
      <text:p text:style-name="Text_20_body"/>
      <text:p text:style-name="Horizontal_20_Line"/>
      <text:p text:style-name="Text_20_body"/>
      <text:h text:style-name="Heading_20_4" text:outline-level="4"><text:span text:style-name="T15">Parte </text:span>3<text:span text:style-name="T15"> -</text:span> Omhp sale con su carreta<text:span text:style-name="T15">.</text:span></text:h>
      <text:p text:style-name="Text_20_body"/>
      <text:p text:style-name="Text_20_body">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text:soft-page-break/>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text:span text:style-name="T6">Y p</text:span>oco después salió conduciendo su vieja carreta.</text:p>
      <text:p text:style-name="Text_20_body">El caballo avanzó por el sendero con paso nervioso.</text:p>
      <text:p text:style-name="Text_20_body">Más inquieto de lo habitual.</text:p>
      <text:p text:style-name="Text_20_body"><text:span text:style-name="T7">M</text:span>ovía las orejas.<text:span text:style-name="T7"> </text:span>Sacudía la cabeza.</text:p>
      <text:p text:style-name="Text_20_body">Y golpeaba el suelo con los cascos con impaciencia.</text:p>
      <text:p text:style-name="Text_20_body">—¿Qué te ocurre hoy? —murmuró el granjer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Probablemente no fuera nada.</text:p>
      <text:p text:style-name="Text_20_body">Tiró suavemente de las riendas<text:span text:style-name="T7"> y</text:span>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P6"><text:span text:style-name="T7">Pensó que</text:span> podía acercarlo hasta el muelle.</text:p>
      <text:p text:style-name="Text_20_body"><text:soft-page-break/>La granja de Cumhp quedaba prácticamente en la misma dirección.</text:p>
      <text:p text:style-name="Text_20_body">Y así Dahg llegaría todavía antes a su barco.</text:p>
      <text:p text:style-name="Text_20_body">Le pareció una buena idea.</text:p>
      <text:p text:style-name="Text_20_body"/>
      <text:p text:style-name="Horizontal_20_Line"/>
      <text:p text:style-name="Text_20_body"/>
      <text:h text:style-name="Heading_20_4" text:outline-level="4"><text:span text:style-name="T15">Parte </text:span>4<text:span text:style-name="T15"> -</text:span> El trueno<text:span text:style-name="T15">.</text:span></text:h>
      <text:p text:style-name="Text_20_body"/>
      <text:p text:style-name="Text_20_body">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text:span text:style-name="T8">.</text:span></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text:soft-page-break/>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La carreta pasó junto a él como una masa de madera y hierro fuera de control.</text:p>
      <text:p text:style-name="Text_20_body">Omhp seguía aferrado a las riendas<text:span text:style-name="T9"> i</text:span>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
      <text:p text:style-name="Text_20_body"/>
      <text:p text:style-name="Text_20_body"/>
      <text:p text:style-name="Horizontal_20_Line"/>
      <text:p text:style-name="Text_20_body"/>
      <text:p text:style-name="Text_20_body"/>
      <text:h text:style-name="Heading_20_4" text:outline-level="4"><text:span text:style-name="T15">Parte </text:span>5<text:span text:style-name="T15"> -</text:span> Fuego<text:span text:style-name="T15">.</text:span></text:h>
      <text:p text:style-name="Text_20_body"/>
      <text:p text:style-name="Text_20_body">Dahg permaneció tendido junto al camino.</text:p>
      <text:p text:style-name="P8"><text:span text:style-name="T14">Estaba a</text:span>turdido.</text:p>
      <text:p text:style-name="Text_20_body">Intentó incorporarse<text:span text:style-name="T10"> pero u</text:span>n dolor agudo atravesó su rodilla<text:span text:style-name="T10"> y v</text:span>olvió a caer al suelo.</text:p>
      <text:p text:style-name="Text_20_body"><text:span text:style-name="T12">U</text:span>n instante después escuchó el impacto.</text:p>
      <text:p text:style-name="Text_20_body"><text:soft-page-break/>Un estruendo seco.</text:p>
      <text:p text:style-name="Text_20_body">Violento.</text:p>
      <text:p text:style-name="P7">El sonido <text:span text:style-name="T10">d</text:span>e algo pesado<text:span text:style-name="T12"> golpeando con fuerza</text:span><text:span text:style-name="T14">. D</text:span>e madera rompiéndose.</text:p>
      <text:p text:style-name="P7">Después gritos.<text:span text:style-name="T10"> </text:span></text:p>
      <text:p text:style-name="P7">Voces lejanas.<text:span text:style-name="T10"> </text:span>Confusas.<text:span text:style-name="T10"> </text:span>Alarmadas.</text:p>
      <text:p text:style-name="Text_20_body"><text:span text:style-name="T10">L</text:span>evantó la cabeza<text:span text:style-name="T10"> i</text:span>ntent<text:span text:style-name="T10">ando</text:span> descubrir <text:span text:style-name="T10">lo </text:span>qué había sucedido.</text:p>
      <text:p text:style-name="P11">Durante <text:span text:style-name="T14">los primeros</text:span> segundos <text:span text:style-name="T14">todo parecía normal</text:span>.</text:p>
      <text:p text:style-name="Text_20_body"><text:span text:style-name="T14">Pero e</text:span>ntonces apareció el humo.</text:p>
      <text:p text:style-name="Text_20_body">Una columna oscura comenzó a elevarse lentamente hacia el cielo.</text:p>
      <text:p text:style-name="Text_20_body"><text:span text:style-name="T11">P</text:span>arecía surgir del almacén situado junto a la avenida principal.</text:p>
      <text:p text:style-name="P10"><text:span text:style-name="T13">Después vió</text:span> las llamas.</text:p>
      <text:p text:style-name="Text_20_body"><text:span text:style-name="T13">U</text:span>n resplandor anaranjado<text:span text:style-name="T12"> parpadeando</text:span> tras los tejados.</text:p>
      <text:p text:style-name="P8"><text:span text:style-name="T12">E</text:span>l edificio parecía <text:span text:style-name="T12">estar </text:span>ard<text:span text:style-name="T12">iendo</text:span>.</text:p>
      <text:p text:style-name="P9">El incendio rapidamente se hizo perfectamente visible.</text:p>
      <text:p text:style-name="P9">Estaba creciendo.</text:p>
      <text:p text:style-name="P10"><text:span text:style-name="T18">P</text:span><text:span text:style-name="T16">oco</text:span><text:span text:style-name="T11"> después </text:span>se produjo una explosión.</text:p>
      <text:p text:style-name="Text_20_body">El estallido resonó <text:span text:style-name="T11">en el aire.</text:span></text:p>
      <text:p text:style-name="P9">Sintió el golpe en el pecho.</text:p>
      <text:p text:style-name="P12">Y mientras el humo oscurecía el cielo del atardecer, Dahg permaneció <text:span text:style-name="T11">en el suelo,</text:span> junto al camino,<text:span text:style-name="T11"> inmóvil, impotente</text:span><text:span text:style-name="T17">.</text:span> </text:p>
      <text:p text:style-name="P12"><text:span text:style-name="T17">C</text:span>ontemplando <text:span text:style-name="T14">con horror </text:span><text:span text:style-name="T12">desde la distancia </text:span>cómo Drywind comenzaba a arder.</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6T11:11:59.844000000</meta:creation-date>
    <dc:date>2026-07-17T15:17:51.182000000</dc:date>
    <meta:editing-duration>PT1H21M26S</meta:editing-duration>
    <meta:editing-cycles>20</meta:editing-cycles>
    <meta:generator>LibreOffice/7.3.5.2$Windows_X86_64 LibreOffice_project/184fe81b8c8c30d8b5082578aee2fed2ea847c01</meta:generator>
    <meta:document-statistic meta:table-count="0" meta:image-count="0" meta:object-count="0" meta:page-count="8" meta:paragraph-count="195" meta:word-count="1501" meta:character-count="9176" meta:non-whitespace-character-count="7864"/>
  </office:meta>
</office:document-meta>
</file>