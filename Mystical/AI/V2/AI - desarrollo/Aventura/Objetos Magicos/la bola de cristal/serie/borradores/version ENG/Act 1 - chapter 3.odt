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Chapter 3 – Knowledge</text:h>
      <text:h text:style-name="Heading_20_3" text:outline-level="3">Part 1 – The Vision</text:h>
      <text:p text:style-name="Text_20_body">The crystal no longer showed the pages of the ledger.</text:p>
      <text:p text:style-name="Text_20_body">The numbers and handwritten entries had vanished completely behind the strange white mist that now filled the interior of the sphere.</text:p>
      <text:p text:style-name="Text_20_body">The mist continued to move slowly.</text:p>
      <text:p text:style-name="Text_20_body">Turning upon itself.</text:p>
      <text:p text:style-name="Text_20_body">Like clouds driven by an invisible wind.</text:p>
      <text:p text:style-name="Text_20_body">And little by little, it began to clear.</text:p>
      <text:p text:style-name="Text_20_body">First came shadows.</text:p>
      <text:p text:style-name="Text_20_body">Then shapes.</text:p>
      <text:p text:style-name="Text_20_body">And finally, an entire scene.</text:p>
      <text:p text:style-name="Text_20_body">Dahg held his breath.</text:p>
      <text:p text:style-name="Text_20_body">He was looking at the main street of Drywind.</text:p>
      <text:p text:style-name="Text_20_body">He recognized it immediately.</text:p>
      <text:p text:style-name="Text_20_body">The market road.</text:p>
      <text:p text:style-name="Text_20_body">The fronts of the houses.</text:p>
      <text:p text:style-name="Text_20_body">The stone fountain beside the square.</text:p>
      <text:p text:style-name="Text_20_body">Everything was there.</text:p>
      <text:p text:style-name="Text_20_body">And then he saw himself.</text:p>
      <text:p text:style-name="Text_20_body">The shock was so great that he jerked back from the table.</text:p>
      <text:p text:style-name="Text_20_body">For several seconds, he remained motionless.</text:p>
      <text:p text:style-name="Text_20_body">Watching.</text:p>
      <text:p text:style-name="Text_20_body">Unable to understand.</text:p>
      <text:p text:style-name="Text_20_body">The man inside the sphere was him.</text:p>
      <text:p text:style-name="Text_20_body">There could be no doubt.</text:p>
      <text:p text:style-name="Text_20_body">The same clothes.</text:p>
      <text:p text:style-name="Text_20_body">The same hat.</text:p>
      <text:p text:style-name="Text_20_body"><text:soft-page-break/>The same way of walking.</text:p>
      <text:p text:style-name="Text_20_body">The scene showed him closing the doors of the auction house at the end of the day.</text:p>
      <text:p text:style-name="Text_20_body">The sun was sinking toward the horizon.</text:p>
      <text:p text:style-name="Text_20_body">The shadows were long.</text:p>
      <text:p text:style-name="Text_20_body">And the light carried that reddish glow that comes in the final moments before evening.</text:p>
      <text:p text:style-name="Text_20_body">Slowly, Dahg leaned closer again.</text:p>
      <text:p text:style-name="Text_20_body">The image was impossible.</text:p>
      <text:p text:style-name="Text_20_body">Mrs. Alhat appeared in the street as well.</text:p>
      <text:p text:style-name="Text_20_body">The old woman was waiting atop the driver's seat of her wagon, drawn by the gray mule she used to transport goods between Drywind and the neighboring villages.</text:p>
      <text:p text:style-name="Text_20_body">Dahg watched as his other self approached.</text:p>
      <text:p text:style-name="Text_20_body">They exchanged a few words.</text:p>
      <text:p text:style-name="Text_20_body">Then he climbed into the wagon, and together they set off down the main road.</text:p>
      <text:p text:style-name="Text_20_body">The wagon rolled slowly to the end of the avenue.</text:p>
      <text:p text:style-name="Text_20_body">There it stopped beside Omhp's house.</text:p>
      <text:p text:style-name="Text_20_body">The old farmer stepped out onto the road.</text:p>
      <text:p text:style-name="Text_20_body">He seemed to be speaking with them.</text:p>
      <text:p text:style-name="Text_20_body">The three remained there for several minutes.</text:p>
      <text:p text:style-name="Text_20_body">Then the wagon moved on.</text:p>
      <text:p text:style-name="Text_20_body">The image shifted.</text:p>
      <text:p text:style-name="Text_20_body">Now it showed the road leading toward the river.</text:p>
      <text:p text:style-name="Text_20_body">The shadows had grown even longer.</text:p>
      <text:p text:style-name="Text_20_body">The journey appeared to be proceeding normally.</text:p>
      <text:p text:style-name="Text_20_body">Until something strange happened.</text:p>
      <text:p text:style-name="Text_20_body">A brilliant flash of lightning streaked across the sky.</text:p>
      <text:p text:style-name="Text_20_body">Even within the sphere, the flash was dazzling.</text:p>
      <text:p text:style-name="Text_20_body">And at that very instant, the mule stopped.</text:p>
      <text:p text:style-name="Text_20_body">It simply stopped walking.</text:p>
      <text:p text:style-name="Text_20_body">Dahg watched as Mrs. Alhat pulled on the reins.</text:p>
      <text:p text:style-name="Text_20_body">Then climbed down from the wagon.</text:p>
      <text:p text:style-name="Text_20_body"><text:soft-page-break/>His other self climbed down as well.</text:p>
      <text:p text:style-name="Text_20_body">Both seemed to be trying to persuade the animal to continue.</text:p>
      <text:p text:style-name="Text_20_body">But the mule remained motionless.</text:p>
      <text:p text:style-name="Text_20_body">Like a statue.</text:p>
      <text:p text:style-name="Text_20_body">The scene continued for quite some time.</text:p>
      <text:p text:style-name="Text_20_body">At last, he saw himself bid farewell to Mrs. Alhat.</text:p>
      <text:p text:style-name="Text_20_body">Then continue the journey on foot.</text:p>
      <text:p text:style-name="Text_20_body">The sphere shifted once more.</text:p>
      <text:p text:style-name="Text_20_body">Now it showed Penht's farm.</text:p>
      <text:p text:style-name="Text_20_body">The young man emerged from one of the barns.</text:p>
      <text:p text:style-name="Text_20_body">Dahg smiled when he recognized him.</text:p>
      <text:p text:style-name="Text_20_body">He cared for Penht as though he were the son he had never had.</text:p>
      <text:p text:style-name="Text_20_body">The two spoke for a few moments.</text:p>
      <text:p text:style-name="Text_20_body">Then Penht pointed toward the road.</text:p>
      <text:p text:style-name="Text_20_body">Finally, both climbed into the young man's wagon and continued toward the river together.</text:p>
      <text:p text:style-name="Text_20_body">The vision moved forward once again.</text:p>
      <text:p text:style-name="Text_20_body">And the dock appeared.</text:p>
      <text:p text:style-name="Text_20_body">Dahg felt a chill run through him.</text:p>
      <text:p text:style-name="Text_20_body">He knew that place well.</text:p>
      <text:p text:style-name="Text_20_body">It was where he was supposed to board the riverboat in a few days' time for his journey to Prosperous City.</text:p>
      <text:p text:style-name="Text_20_body">He watched as the wagon drew nearer.</text:p>
      <text:p text:style-name="Text_20_body">Closer and closer.</text:p>
      <text:p text:style-name="Text_20_body">Until the river came into view.</text:p>
      <text:p text:style-name="Text_20_body">And then he saw it.</text:p>
      <text:p text:style-name="Text_20_body">The riverboat was pulling away from the dock.</text:p>
      <text:p text:style-name="Text_20_body">Its sails unfurled.</text:p>
      <text:p text:style-name="Text_20_body">The current carrying it slowly downstream.</text:p>
      <text:p text:style-name="Text_20_body">Inside the sphere, Dahg stood motionless, watching the vessel drift away.</text:p>
      <text:p text:style-name="Text_20_body">Then he seemed to say something to Penht.</text:p>
      <text:p text:style-name="Text_20_body"><text:soft-page-break/>The two remained there for a few moments.</text:p>
      <text:p text:style-name="Text_20_body">And finally, they turned around.</text:p>
      <text:p text:style-name="Text_20_body">The wagon departed from the dock.</text:p>
      <text:p text:style-name="Text_20_body">The image began to fade.</text:p>
      <text:p text:style-name="Text_20_body">The shapes lost their clarity.</text:p>
      <text:p text:style-name="Text_20_body">And before long, the white mist once again filled the interior of the crystal.</text:p>
      <text:p text:style-name="Text_20_body">Dahg remained motionless.</text:p>
      <text:p text:style-name="Text_20_body">His gaze fixed upon the sphere.</text:p>
      <text:p text:style-name="Text_20_body">Trying to understand what he had just witnessed.</text:p>
      <text:p text:style-name="Standard"/>
      <text:p text:style-name="Horizontal_20_Line"/>
      <text:p text:style-name="Text_20_body"/>
      <text:h text:style-name="Heading_20_3" text:outline-level="3">Part 2 – The Meaning</text:h>
      <text:p text:style-name="Text_20_body">For several minutes, Dahg remained seated at the table, unable to take his eyes off the sphere.</text:p>
      <text:p text:style-name="Text_20_body">The mist had vanished.</text:p>
      <text:p text:style-name="Text_20_body">The crystal was once again perfectly transparent.</text:p>
      <text:p text:style-name="Text_20_body">As though nothing had happened.</text:p>
      <text:p text:style-name="Text_20_body">As though the strange vision had been nothing more than an illusion brought on by fatigue.</text:p>
      <text:p text:style-name="Text_20_body">But Dahg knew better.</text:p>
      <text:p text:style-name="Text_20_body">He had recognized every place.</text:p>
      <text:p text:style-name="Text_20_body">Every person.</text:p>
      <text:p text:style-name="Text_20_body">Every detail.</text:p>
      <text:p text:style-name="Text_20_body">It could not have been a coincidence.</text:p>
      <text:p text:style-name="Text_20_body">And the more he thought about it, the more obvious the answer became.</text:p>
      <text:p text:style-name="Text_20_body">The sphere was showing him the future.</text:p>
      <text:p text:style-name="Text_20_body">A chill ran through him.</text:p>
      <text:p text:style-name="Text_20_body">The idea was absurd.</text:p>
      <text:p text:style-name="Text_20_body">Impossible.</text:p>
      <text:p text:style-name="Text_20_body">And yet it explained perfectly what he had just witnessed.</text:p>
      <text:p text:style-name="Text_20_body">They were not memories.</text:p>
      <text:p text:style-name="Text_20_body"><text:soft-page-break/>Nor were they dreams.</text:p>
      <text:p text:style-name="Text_20_body">They were events that had not yet taken place.</text:p>
      <text:p text:style-name="Text_20_body">He rose from his chair and began pacing slowly around the room.</text:p>
      <text:p text:style-name="Text_20_body">Trying to put his thoughts in order.</text:p>
      <text:p text:style-name="Text_20_body">In a few days, he was due to travel to Prosperous City.</text:p>
      <text:p text:style-name="Text_20_body">Everything had already been arranged.</text:p>
      <text:p text:style-name="Text_20_body">He had purchased his passage. He had organized the journey.</text:p>
      <text:p text:style-name="Text_20_body">And the scribe was expecting him to prepare the documents required for the sale of the land he had inherited.</text:p>
      <text:p text:style-name="Text_20_body">That transaction was one of the most important pieces of his plans.</text:p>
      <text:p text:style-name="Text_20_body">With that money, he would expand the business.</text:p>
      <text:p text:style-name="Text_20_body">Acquire new merchandise. Seek customers in other places.</text:p>
      <text:p text:style-name="Text_20_body">And make full use of the opportunities offered by his new wagon.</text:p>
      <text:p text:style-name="Text_20_body">For the first time in many years, he felt that he was moving toward something better.</text:p>
      <text:p text:style-name="Text_20_body">And now the sphere was showing him that he would miss the riverboat.</text:p>
      <text:p text:style-name="Text_20_body">He stopped beside the window.</text:p>
      <text:p text:style-name="Text_20_body">And looked out into the darkness that blanketed the village streets.</text:p>
      <text:p text:style-name="Text_20_body">Missing the riverboat would mean losing his passage.</text:p>
      <text:p text:style-name="Text_20_body">But that was the least of it.</text:p>
      <text:p text:style-name="Text_20_body">The real problem would be the delay.</text:p>
      <text:p text:style-name="Text_20_body">Perhaps the scribe would not be able to see him again for weeks.</text:p>
      <text:p text:style-name="Text_20_body">Perhaps the sale would be postponed for months.</text:p>
      <text:p text:style-name="Text_20_body">Maybe even until the following year.</text:p>
      <text:p text:style-name="Text_20_body">The thought filled him with unease.</text:p>
      <text:p text:style-name="Text_20_body">He was no longer a young man.</text:p>
      <text:p text:style-name="Text_20_body">He had spent decades building that business.</text:p>
      <text:p text:style-name="Text_20_body">Decades saving coin after coin.</text:p>
      <text:p text:style-name="Text_20_body">And although he rarely admitted it aloud, he was beginning to feel the weight of the years.</text:p>
      <text:p text:style-name="Text_20_body">He did not want to keep waiting.</text:p>
      <text:p text:style-name="Text_20_body">He did not want to postpone, once again, the changes he had planned for so long.</text:p>
      <text:p text:style-name="Text_20_body"><text:soft-page-break/>He needed things to move forward.</text:p>
      <text:p text:style-name="Text_20_body">He needed the future to begin at last.</text:p>
      <text:p text:style-name="Text_20_body">He looked at the sphere again.</text:p>
      <text:p text:style-name="Text_20_body">And then something changed in the way he saw it.</text:p>
      <text:p text:style-name="Text_20_body">The worry gradually faded.</text:p>
      <text:p text:style-name="Text_20_body">Replaced by something entirely different.</text:p>
      <text:p text:style-name="Text_20_body">An advantage.</text:p>
      <text:p text:style-name="Text_20_body">Because the vision showed something that had not yet happened.</text:p>
      <text:p text:style-name="Text_20_body">And that meant he could still act.</text:p>
      <text:p text:style-name="Text_20_body">He immediately understood the true value of the information.</text:p>
      <text:p text:style-name="Text_20_body">The sphere had not shown him an unavoidable misfortune.</text:p>
      <text:p text:style-name="Text_20_body">It had shown him a problem before it occurred.</text:p>
      <text:p text:style-name="Text_20_body">A warning.</text:p>
      <text:p text:style-name="Text_20_body">An opportunity.</text:p>
      <text:p text:style-name="Text_20_body">A chance to correct his mistakes before making them.</text:p>
      <text:p text:style-name="Text_20_body">A slow smile spread across his face.</text:p>
      <text:p text:style-name="Text_20_body">Now he knew the cause of the delay.</text:p>
      <text:p text:style-name="Text_20_body">The conversation with Omhp.</text:p>
      <text:p text:style-name="Text_20_body">The trouble with Mrs. Alhat's mule.</text:p>
      <text:p text:style-name="Text_20_body">The setbacks along the road.</text:p>
      <text:p text:style-name="Text_20_body">It was all there.</text:p>
      <text:p text:style-name="Text_20_body">And it could all be avoided.</text:p>
      <text:p text:style-name="Text_20_body">He stepped closer to the table.</text:p>
      <text:p text:style-name="Text_20_body">Rested a hand upon the crystal.</text:p>
      <text:p text:style-name="Text_20_body">And felt at peace.</text:p>
      <text:p text:style-name="Text_20_body">"I am not going to miss that riverboat," he murmured.</text:p>
      <text:p text:style-name="Text_20_body">Then he looked at the sphere once more.</text:p>
      <text:p text:style-name="Text_20_body">Motionless.</text:p>
      <text:p text:style-name="Text_20_body">Silent.</text:p>
      <text:p text:style-name="Text_20_body">Harmless.</text:p>
      <text:p text:style-name="Text_20_body"><text:soft-page-break/>And he thought that perhaps he had just made the best purchase of his entire life.</text:p>
      <text:p text:style-name="Text_20_body"/>
      <text:p text:style-name="Horizontal_20_Line"/>
      <text:p text:style-name="Text_20_body"/>
      <text:h text:style-name="Heading_20_3" text:outline-level="3">Part 3 – The Plan</text:h>
      <text:p text:style-name="Text_20_body">The answer was obvious.</text:p>
      <text:p text:style-name="Text_20_body">He did not need to change anything major.</text:p>
      <text:p text:style-name="Text_20_body">He only needed to avoid the delays.</text:p>
      <text:p text:style-name="Text_20_body">Nothing more.</text:p>
      <text:p text:style-name="Text_20_body">He sat down beside the table once again and went over the vision in his mind.</text:p>
      <text:p text:style-name="Text_20_body">The conversation with Omhp.</text:p>
      <text:p text:style-name="Text_20_body">Mrs. Alhat's wagon.</text:p>
      <text:p text:style-name="Text_20_body">The mule stopping beside the road.</text:p>
      <text:p text:style-name="Text_20_body">Each delay had added a few minutes to the journey.</text:p>
      <text:p text:style-name="Text_20_body">Minutes that had ultimately cost him the riverboat.</text:p>
      <text:p text:style-name="Text_20_body">But now he knew the problem.</text:p>
      <text:p text:style-name="Text_20_body">And knowing the problem was the first step toward solving it.</text:p>
      <text:p text:style-name="Text_20_body">Mrs. Alhat often offered him a ride to the dock whenever their journeys happened to coincide.</text:p>
      <text:p text:style-name="Text_20_body">She was a good neighbor and was always willing to help.</text:p>
      <text:p text:style-name="Text_20_body">However, her old mule could be unpredictable.</text:p>
      <text:p text:style-name="Text_20_body">Sometimes it stopped for no apparent reason, refused to cross a bridge, or simply would not continue along certain roads.</text:p>
      <text:p text:style-name="Text_20_body">Dahg should have taken that into account from the beginning.</text:p>
      <text:p text:style-name="Text_20_body">But it was not too late to correct it.</text:p>
      <text:p text:style-name="Text_20_body">He would speak with her the following day.</text:p>
      <text:p text:style-name="Text_20_body">He would thank her for the offer.</text:p>
      <text:p text:style-name="Text_20_body">And explain that he preferred to make the journey on foot.</text:p>
      <text:p text:style-name="Text_20_body">After all, the distance was not that great.</text:p>
      <text:p text:style-name="Text_20_body">He could easily walk it.</text:p>
      <text:p text:style-name="Text_20_body">And if he avoided wasting time along the way, he would reach the dock with plenty of time to spare.</text:p>
      <text:p text:style-name="Text_20_body"><text:soft-page-break/>Nor would he stop to speak with Omhp.</text:p>
      <text:p text:style-name="Text_20_body">The old farmer was a kind man, but he enjoyed long conversations.</text:p>
      <text:p text:style-name="Text_20_body">This time, Dahg would have to apologize and continue walking.</text:p>
      <text:p text:style-name="Text_20_body">It was that simple.</text:p>
      <text:p text:style-name="Text_20_body">The more he thought about it, the more certain he became that it would work.</text:p>
      <text:p text:style-name="Text_20_body">The vision had shown him exactly where the problem lay.</text:p>
      <text:p text:style-name="Text_20_body">And he had just found the solution.</text:p>
      <text:p text:style-name="Text_20_body">A feeling of relief began to replace the worry he had felt moments before.</text:p>
      <text:p text:style-name="Text_20_body"/>
      <text:p text:style-name="Text_20_body">After all, it was not a matter of life and death.</text:p>
      <text:p text:style-name="Text_20_body">The village was not burning down.</text:p>
      <text:p text:style-name="Text_20_body"/>
      <text:p text:style-name="Text_20_body">It was only a matter of arriving at a boat on time.</text:p>
      <text:p text:style-name="Text_20_body"/>
      <text:p text:style-name="Text_20_body">Nothing more.</text:p>
      <text:p text:style-name="Text_20_body">And now that he knew the obstacles, he had no reason to fail.</text:p>
      <text:p text:style-name="Text_20_body">Finally, he extinguished the lamp.</text:p>
      <text:p text:style-name="Text_20_body">Lay down.</text:p>
      <text:p text:style-name="Text_20_body">And slept better than he would have imagined.</text:p>
      <text:p text:style-name="Text_20_body">Over the following days, he barely thought about the sphere.</text:p>
      <text:p text:style-name="Text_20_body">He carried out his usual duties.</text:p>
      <text:p text:style-name="Text_20_body">Served customers.</text:p>
      <text:p text:style-name="Text_20_body">Organized merchandise.</text:p>
      <text:p text:style-name="Text_20_body">Prepared documents.</text:p>
      <text:p text:style-name="Text_20_body">And arranged everything necessary for the journey.</text:p>
      <text:p text:style-name="Text_20_body">Just as he had decided, he spoke with Mrs. Alhat and politely declined her help.</text:p>
      <text:p text:style-name="Text_20_body">The old woman seemed surprised, but did not insist.</text:p>
      <text:p text:style-name="Text_20_body">The preparations continued.</text:p>
      <text:p text:style-name="Text_20_body">And the days passed.</text:p>
      <text:p text:style-name="Text_20_body">Until finally, the appointed date arrived.</text:p>
      <text:p text:style-name="Text_20_body"><text:soft-page-break/>The afternoon of the journey passed with apparent normality.</text:p>
      <text:p text:style-name="Text_20_body">Dahg checked his documents one final time.</text:p>
      <text:p text:style-name="Text_20_body">Made sure he had the necessary money with him.</text:p>
      <text:p text:style-name="Text_20_body">And ensured that nothing remained unfinished in the shop.</text:p>
      <text:p text:style-name="Text_20_body">Only then, when he was about to leave, did he feel a small uneasiness return.</text:p>
      <text:p text:style-name="Text_20_body">It was not fear.</text:p>
      <text:p text:style-name="Text_20_body">Nor was it doubt.</text:p>
      <text:p text:style-name="Text_20_body">Only an uncomfortable sensation he could not explain.</text:p>
      <text:p text:style-name="Text_20_body">He remained still for a few moments beside the door.</text:p>
      <text:p text:style-name="Text_20_body">Remembering the vision.</text:p>
      <text:p text:style-name="Text_20_body">Remembering the riverboat disappearing down the river.</text:p>
      <text:p text:style-name="Text_20_body">Remembering the strange mist that had filled the crystal.</text:p>
      <text:p text:style-name="Text_20_body">None of that mattered anymore.</text:p>
      <text:p text:style-name="Text_20_body">He had anticipated the delays.</text:p>
      <text:p text:style-name="Text_20_body">He had taken precautions.</text:p>
      <text:p text:style-name="Text_20_body">He had corrected the problem.</text:p>
      <text:p text:style-name="Text_20_body"><text:span text:style-name="Emphasis">I will arrive on time,</text:span> he told himself.</text:p>
      <text:p text:style-name="Text_20_body">Outside, the sun was beginning to sink toward the horizon.</text:p>
      <text:p text:style-name="Text_20_body">Some dark clouds were slowly gathering in the distance.</text:p>
      <text:p text:style-name="Text_20_body">He took his hat.</text:p>
      <text:p text:style-name="Text_20_body">Opened the door.</text:p>
      <text:p text:style-name="Text_20_body">Closed it behind him.</text:p>
      <text:p text:style-name="Text_20_body">And began walking toward the dock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20T10:12:21.388000000</meta:creation-date>
    <dc:date>2026-07-20T10:17:28.324000000</dc:date>
    <meta:editing-duration>PT5M5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247" meta:word-count="1831" meta:character-count="10149" meta:non-whitespace-character-count="8561"/>
  </office:meta>
</office:document-meta>
</file>