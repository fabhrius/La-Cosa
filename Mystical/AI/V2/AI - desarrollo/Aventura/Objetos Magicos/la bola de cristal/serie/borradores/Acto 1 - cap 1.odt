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o I</text:h>
      <text:h text:style-name="Heading_20_3" text:outline-level="3">Capítulo 1: La Almoneda de Maese Dahg</text:h>
      <text:p text:style-name="Text_20_body"/>
      <text:h text:style-name="Heading_20_4" text:outline-level="4">Parte 1 - La Almoneda de Maese Dahg</text:h>
      <text:p text:style-name="Text_20_body">Hace mucho tiempo, en una época que ya no aparece en los mapas ni en los registros de los escribanos, existió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text:soft-page-break/>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Standard"/>
      <text:p text:style-name="Standard"/>
      <text:p text:style-name="Horizontal_20_Line"/>
      <text:p text:style-name="Text_20_body"/>
      <text:h text:style-name="Heading_20_4" text:outline-level="4">Parte 2 - Dahg el tendero</text:h>
      <text:p text:style-name="Text_20_body">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text:soft-page-break/>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Text_20_body"/>
      <text:p text:style-name="Horizontal_20_Line"/>
      <text:p text:style-name="Text_20_body"/>
      <text:h text:style-name="Heading_20_4" text:outline-level="4">Parte 3 - El negocio</text:h>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text:soft-page-break/>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text:soft-page-break/>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5T10:34:55.035000000</meta:creation-date>
    <dc:date>2026-07-05T11:09:28.700000000</dc:date>
    <meta:editing-duration>PT23M59S</meta:editing-duration>
    <meta:editing-cycles>3</meta:editing-cycles>
    <meta:generator>LibreOffice/7.3.5.2$Windows_X86_64 LibreOffice_project/184fe81b8c8c30d8b5082578aee2fed2ea847c01</meta:generator>
    <meta:document-statistic meta:table-count="0" meta:image-count="0" meta:object-count="0" meta:page-count="5" meta:paragraph-count="100" meta:word-count="1449" meta:character-count="9135" meta:non-whitespace-character-count="7786"/>
  </office:meta>
</office:document-meta>
</file>