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Text_20_body"><text:span text:style-name="Strong_20_Emphasis">Prologue</text:span></text:p>
      <text:p text:style-name="Text_20_body">Time.</text:p>
      <text:p text:style-name="Text_20_body">It buries cities. Erases roads. Turns certainty into legend.</text:p>
      <text:p text:style-name="Text_20_body">And even now, as we speak, it is slowly being consumed—like the oil in a lamp.</text:p>
      <text:p text:style-name="Text_20_body">Some believe that time is a path already laid before us.</text:p>
      <text:p text:style-name="Text_20_body">That the past, the present, and the future all exist at once, and that every event occupies a place that cannot be changed.</text:p>
      <text:p text:style-name="Text_20_body">Others claim that only the present is real.</text:p>
      <text:p text:style-name="Text_20_body">That the past survives only in memory, and that the future is nothing more than a collection of possibilities.</text:p>
      <text:p text:style-name="Text_20_body">Time has fascinated mankind since the beginning of days.</text:p>
      <text:p text:style-name="Text_20_body">The sages of old sought answers in the stars, in dreams, and in numbers.</text:p>
      <text:p text:style-name="Text_20_body">Some legends say they even built strange instruments for the sole purpose of unveiling what was yet to come—destiny itself.</text:p>
      <text:p text:style-name="Text_20_body">Those secrets have been lost to the passing centuries.</text:p>
      <text:p text:style-name="Text_20_body">But...</text:p>
      <text:p text:style-name="Text_20_body">What would you do if you could know the future?</text:p>
      <text:p text:style-name="Text_20_body">What I am about to tell happened so long ago that no one remembers when.</text:p>
      <text:p text:style-name="Text_20_body">In a place that no longer appears on any map.</text:p>
      <text:p text:style-name="Text_20_body">In a small village called Drywind, north of the Flatlands, not far from Prosperous City.</text:p>
      <text:p text:style-name="Text_20_body">There once stood an auction house there.</text:p>
      <text:p text:style-name="Text_20_body">And this story begins exactly there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7-19T20:22:23.128000000</meta:creation-date>
    <dc:date>2026-07-19T20:25:54.482000000</dc:date>
    <meta:editing-duration>PT3M31S</meta:editing-duration>
    <meta:editing-cycles>1</meta:editing-cycles>
    <meta:document-statistic meta:table-count="0" meta:image-count="0" meta:object-count="0" meta:page-count="1" meta:paragraph-count="19" meta:word-count="206" meta:character-count="1122" meta:non-whitespace-character-count="937"/>
    <meta:generator>LibreOffice/7.3.5.2$Windows_X86_64 LibreOffice_project/184fe81b8c8c30d8b5082578aee2fed2ea847c01</meta:generator>
  </office:meta>
</office:document-meta>
</file>