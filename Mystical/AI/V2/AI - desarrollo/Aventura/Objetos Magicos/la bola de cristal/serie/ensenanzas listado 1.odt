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reo que este cuento tiene potencial para varias enseñanzas muy interesantes porque toca un problema fundamental: <text:span text:style-name="Strong_20_Emphasis">qué ocurre cuando intentamos optimizar un sistema que no comprendemos completamente</text:span>.</text:p>
      <text:p text:style-name="Text_20_body">De hecho, la maldición de la bola de cristal puede interpretarse como una metáfora de muchos conceptos reales de matemáticas, informática y teoría de sistemas.</text:p>
      <text:h text:style-name="Heading_20_2" text:outline-level="2">1. Optimización local vs optimización global</text:h>
      <text:p text:style-name="Text_20_body">Esta sería probablemente mi favorita para <text:span text:style-name="Emphasis">Omniscientis</text:span>.</text:p>
      <text:p text:style-name="Text_20_body">El protagonista observa un problema pequeño:</text:p>
      <text:list xml:id="list1813464468" text:style-name="L1">
        <text:list-item>
          <text:p text:style-name="P1">perder un barco</text:p>
        </text:list-item>
        <text:list-item>
          <text:p text:style-name="P1">perder dinero</text:p>
        </text:list-item>
        <text:list-item>
          <text:p text:style-name="P1">sufrir una molestia</text:p>
        </text:list-item>
      </text:list>
      <text:p text:style-name="Text_20_body">Y decide optimizar ese resultado.</text:p>
      <text:p text:style-name="Text_20_body">Pero el sistema completo contiene miles de variables invisibles.</text:p>
      <text:p text:style-name="Text_20_body">Lo que mejora una parte empeora el conjunto.</text:p>
      <text:p text:style-name="Text_20_body">En informática esto ocurre continuamente.</text:p>
      <text:p text:style-name="Text_20_body">Un algoritmo puede encontrar una solución que parece mejor desde su posición actual y, sin embargo, alejarse de la mejor solución posible.</text:p>
      <text:p text:style-name="Text_20_body">Fabhrius podría resumirlo así:</text:p>
      <text:p text:style-name="Quotations">"Quien contempla una sola pieza del tablero cree ver un error. Quien contempla el tablero completo descubre que aquel error sostenía el equilibrio de todas las demás."</text:p>
      <text:p text:style-name="Text_20_body">O incluso:</text:p>
      <text:p text:style-name="Quotations">"No todo lo que parece un problema es un problema. A veces es la solución de otro problema que aún no hemos visto."</text:p>
      <text:p text:style-name="Horizontal_20_Line"/>
      <text:h text:style-name="Heading_20_2" text:outline-level="2">2. Efecto mariposa y sensibilidad a las condiciones iniciales</text:h>
      <text:p text:style-name="Text_20_body">La bola muestra un instante trivial.</text:p>
      <text:p text:style-name="Text_20_body">Un retraso de minutos.</text:p>
      <text:p text:style-name="Text_20_body">Una conversación.</text:p>
      <text:p text:style-name="Text_20_body">Un desvío.</text:p>
      <text:p text:style-name="Text_20_body">Pero pequeños cambios producen consecuencias enormes.</text:p>
      <text:p text:style-name="Text_20_body"><text:soft-page-break/>Esto conecta con la teoría del caos.</text:p>
      <text:p text:style-name="Text_20_body">No hace falta introducir ecuaciones; basta la idea.</text:p>
      <text:p text:style-name="Text_20_body">Fabhrius podría decir:</text:p>
      <text:p text:style-name="Quotations">"Las montañas no siempre nacen de grandes terremotos. A veces nacen de una piedra desplazada en el momento exacto."</text:p>
      <text:p text:style-name="Text_20_body">La enseñanza sería:</text:p>
      <text:p text:style-name="Quotations">No podemos predecir las consecuencias completas de nuestras acciones.</text:p>
      <text:p text:style-name="Horizontal_20_Line"/>
      <text:h text:style-name="Heading_20_2" text:outline-level="2">3. Información incompleta</text:h>
      <text:p text:style-name="Text_20_body">Esta encaja muchísimo con la bola.</text:p>
      <text:p text:style-name="Text_20_body">El protagonista cree estar tomando decisiones racionales.</text:p>
      <text:p text:style-name="Text_20_body">Pero trabaja con una muestra minúscula de información.</text:p>
      <text:p text:style-name="Text_20_body">Ve un fotograma del futuro.</text:p>
      <text:p text:style-name="Text_20_body">No ve la película completa.</text:p>
      <text:p text:style-name="Text_20_body">Desde la teoría de la decisión esto es muy potente.</text:p>
      <text:p text:style-name="Text_20_body">La enseñanza:</text:p>
      <text:p text:style-name="Quotations">Tener más información no significa tener información suficiente.</text:p>
      <text:p text:style-name="Text_20_body">Fabhrius podría decir:</text:p>
      <text:p text:style-name="Quotations">"La ignorancia absoluta es peligrosa. Pero existe una ignorancia aún más peligrosa: la que se cree conocimiento."</text:p>
      <text:p text:style-name="Horizontal_20_Line"/>
      <text:h text:style-name="Heading_20_2" text:outline-level="2">4. El problema de la intervención</text:h>
      <text:p text:style-name="Text_20_body">Hay una idea muy profunda en ciencias:</text:p>
      <text:p text:style-name="Text_20_body">observar un sistema puede modificarlo.</text:p>
      <text:p text:style-name="Text_20_body">En física aparece en distintos contextos.</text:p>
      <text:p text:style-name="Text_20_body">En sistemas complejos aparece constantemente.</text:p>
      <text:p text:style-name="Text_20_body">La bola no destruye el futuro.</text:p>
      <text:p text:style-name="Text_20_body">La intervención del protagonista es la que altera el sistema.</text:p>
      <text:p text:style-name="Text_20_body"><text:soft-page-break/>La enseñanza:</text:p>
      <text:p text:style-name="Quotations">El conocimiento cambia al observador, y el observador cambia aquello que observa.</text:p>
      <text:p text:style-name="Horizontal_20_Line"/>
      <text:h text:style-name="Heading_20_2" text:outline-level="2">5. Robustez de los sistemas</text:h>
      <text:p text:style-name="Text_20_body">Esta me parece especialmente original.</text:p>
      <text:p text:style-name="Text_20_body">La visión inicial representa un sistema estable.</text:p>
      <text:p text:style-name="Text_20_body">Hay una pequeña pérdida.</text:p>
      <text:p text:style-name="Text_20_body">Un pequeño fallo.</text:p>
      <text:p text:style-name="Text_20_body">Pero el sistema absorbe ese fallo sin colapsar.</text:p>
      <text:p text:style-name="Text_20_body">Cuando el protagonista intenta eliminar el fallo, elimina también mecanismos invisibles que mantenían la estabilidad.</text:p>
      <text:p text:style-name="Text_20_body">Es muy parecido a lo que ocurre en ingeniería.</text:p>
      <text:p text:style-name="Text_20_body">Muchos sistemas parecen imperfectos porque incorporan redundancias y pérdidas deliberadas.</text:p>
      <text:p text:style-name="Text_20_body">Fabhrius podría explicar:</text:p>
      <text:p text:style-name="Quotations">"Las estructuras más resistentes no son las que eliminan todos los errores. Son las que saben convivir con ellos."</text:p>
      <text:p text:style-name="Horizontal_20_Line"/>
      <text:h text:style-name="Heading_20_2" text:outline-level="2">6. El concepto de óptimo oculto</text:h>
      <text:p text:style-name="Text_20_body">Esta es probablemente la más inquietante.</text:p>
      <text:p text:style-name="Text_20_body">La bola muestra el mejor resultado posible.</text:p>
      <text:p text:style-name="Text_20_body">No el perfecto.</text:p>
      <text:p text:style-name="Text_20_body">No el deseable.</text:p>
      <text:p text:style-name="Text_20_body">El mejor.</text:p>
      <text:p text:style-name="Text_20_body">La diferencia es enorme.</text:p>
      <text:p text:style-name="Text_20_body">En optimización matemática muchas veces no existe una solución perfecta.</text:p>
      <text:p text:style-name="Text_20_body">Solo existe la menos mala.</text:p>
      <text:p text:style-name="Text_20_body">El protagonista asume que puede mejorarla.</text:p>
      <text:p text:style-name="Text_20_body">Y descubre que no.</text:p>
      <text:p text:style-name="Text_20_body">Fabhrius podría concluir:</text:p>
      <text:p text:style-name="Quotations"><text:soft-page-break/>"Los hombres pasan la vida persiguiendo un mundo sin pérdidas. Pero algunos sistemas no pueden mejorarse. Solo pueden empeorarse."</text:p>
      <text:p text:style-name="Horizontal_20_Line"/>
      <text:h text:style-name="Heading_20_2" text:outline-level="2">Mi elección</text:h>
      <text:p text:style-name="Text_20_body">Si este fuera un relato de <text:span text:style-name="Emphasis">Omniscientis</text:span>, uniría dos ideas:</text:p>
      <text:list xml:id="list3494681580" text:style-name="L2">
        <text:list-item>
          <text:p text:style-name="P2"><text:span text:style-name="Strong_20_Emphasis">Optimización local vs global</text:span> (tema principal).</text:p>
        </text:list-item>
        <text:list-item>
          <text:p text:style-name="P2"><text:span text:style-name="Strong_20_Emphasis">Información incompleta</text:span> (causa del error).</text:p>
        </text:list-item>
      </text:list>
      <text:p text:style-name="Text_20_body">Porque describen exactamente lo que hace el protagonista:</text:p>
      <text:list xml:id="list1977196660" text:style-name="L3">
        <text:list-item>
          <text:p text:style-name="P3">ve una pequeña pérdida local,</text:p>
        </text:list-item>
        <text:list-item>
          <text:p text:style-name="P3">desconoce el sistema global,</text:p>
        </text:list-item>
        <text:list-item>
          <text:p text:style-name="P3">intenta optimizar,</text:p>
        </text:list-item>
        <text:list-item>
          <text:p text:style-name="P3">degrada el resultado total.</text:p>
        </text:list-item>
      </text:list>
      <text:p text:style-name="Text_20_body">Y además conectan directamente con muchas preguntas existenciales:</text:p>
      <text:p text:style-name="Quotations">¿Por qué suceden cosas que parecen injustas?</text:p>
      <text:p text:style-name="Quotations">¿Por qué a veces una desgracia menor evita una mayor?</text:p>
      <text:p text:style-name="Quotations">¿Por qué es tan difícil saber si una decisión fue realmente buena o mala?</text:p>
      <text:p text:style-name="Text_20_body">Eso permitiría a Fabhrius cerrar el cuento con una reflexión muy propia de <text:span text:style-name="Emphasis">Omniscientis</text:span>:</text:p>
      <text:p text:style-name="Quotations">"Los hombres llaman desgracia a aquello que pueden ver. Pero el universo no se construye con lo visible. Cada acontecimiento sostiene otros mil que permanecen ocultos. Y quizá por eso, aquello que intentamos corregir con más empeño sea precisamente lo que mantenía el mundo en equilibrio."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3T11:18:23.092000000</meta:creation-date>
    <dc:date>2026-07-03T11:18:48.142000000</dc:date>
    <meta:editing-duration>PT25S</meta:editing-duration>
    <meta:editing-cycles>1</meta:editing-cycles>
    <meta:document-statistic meta:table-count="0" meta:image-count="0" meta:object-count="0" meta:page-count="4" meta:paragraph-count="88" meta:word-count="715" meta:character-count="4590" meta:non-whitespace-character-count="3972"/>
    <meta:generator>LibreOffice/7.3.5.2$Windows_X86_64 LibreOffice_project/184fe81b8c8c30d8b5082578aee2fed2ea847c01</meta:generator>
  </office:meta>
</office:document-meta>
</file>