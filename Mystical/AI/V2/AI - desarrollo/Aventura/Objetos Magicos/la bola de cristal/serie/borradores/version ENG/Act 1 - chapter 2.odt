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Chapter 2 – A Unique Piece</text:h>
      <text:h text:style-name="Heading_20_3" text:outline-level="3">Part 1 – A Reading Lens</text:h>
      <text:p text:style-name="Text_20_body">Dahg gestured toward a worktable at the back of the shop.</text:p>
      <text:p text:style-name="Text_20_body">"Over here, if you please."</text:p>
      <text:p text:style-name="Text_20_body">The woman nodded and followed him through the narrow aisles formed by shelves and towering stacks of antiques.</text:p>
      <text:p text:style-name="Text_20_body">Now that he could observe her more closely, Dahg realized she was no ordinary customer.</text:p>
      <text:p text:style-name="Text_20_body">She appeared to be around forty years old. She wore an elegant traveling coat made from fine fabrics and a pair of impeccably maintained leather gloves. Every detail of her appearance spoke of refinement.</text:p>
      <text:p text:style-name="Text_20_body">She did not seem like someone in need.</text:p>
      <text:p text:style-name="Text_20_body">Nor someone accustomed to selling her possessions.</text:p>
      <text:p text:style-name="Text_20_body">The way she walked, spoke, and observed her surroundings revealed the upbringing of someone from the affluent circles of Prosperous City.</text:p>
      <text:p text:style-name="Text_20_body">When she reached the table, she carefully set down a package wrapped in dark leather.</text:p>
      <text:p text:style-name="Text_20_body">For a moment, she remained still, as if hesitating.</text:p>
      <text:p text:style-name="Text_20_body">Then she loosened the straps and slowly unfolded the covering.</text:p>
      <text:p text:style-name="Text_20_body">Dahg felt his interest awaken immediately.</text:p>
      <text:p text:style-name="Text_20_body">Before him appeared an extraordinary object.</text:p>
      <text:p text:style-name="Text_20_body">Its main component was a large hemispherical lens of perfectly transparent crystal, so clean and polished that it seemed to contain still water within. Its surface caught the candlelight in soft reflections.</text:p>
      <text:p text:style-name="Text_20_body">The crystal rested upon an elaborate circular frame of ebony and ivory.</text:p>
      <text:p text:style-name="Text_20_body">The wood had been crafted by skilled hands.</text:p>
      <text:p text:style-name="Text_20_body">Delicate engravings covered the entire structure, forming intricate geometric patterns intertwined with symbols that Dahg could not identify.</text:p>
      <text:p text:style-name="Text_20_body">Small gemstones had been set into various points of the frame, adding flashes of color that further enhanced the beauty of the piece.</text:p>
      <text:p text:style-name="Text_20_body">It was a genuine work of art.</text:p>
      <text:p text:style-name="Text_20_body">And a remarkable feat of craftsmanship.</text:p>
      <text:p text:style-name="Text_20_body">Dahg did not need to examine it closely to understand that such a piece must have cost a fortune.</text:p>
      <text:p text:style-name="Text_20_body"><text:soft-page-break/>The woman noticed the merchant's expression and allowed herself a faint smile.</text:p>
      <text:p text:style-name="Text_20_body">"It is not a decorative object," she explained. "Although most people believe it is."</text:p>
      <text:p text:style-name="Text_20_body">She placed an open book upon the table and set the device on top of it.</text:p>
      <text:p text:style-name="Text_20_body">Only then did Dahg notice a detail he had overlooked.</text:p>
      <text:p text:style-name="Text_20_body">The base contained a circular opening that allowed the flat surface of the crystal to rest directly upon the page.</text:p>
      <text:p text:style-name="Text_20_body">The woman slowly moved the instrument across the text.</text:p>
      <text:p text:style-name="Text_20_body"/>
      <text:p text:style-name="Text_20_body">And the letters grew.</text:p>
      <text:p text:style-name="Text_20_body"/>
      <text:p text:style-name="Text_20_body">Dahg blinked in surprise.</text:p>
      <text:p text:style-name="Text_20_body">The tiny lines of writing appeared enlarged within the crystal with astonishing clarity.</text:p>
      <text:p text:style-name="Text_20_body">Every letter seemed sharper. More distinct. Easier to read.</text:p>
      <text:p text:style-name="Text_20_body">The effect was so remarkable that, for a moment, it was difficult to believe there was no hidden trick involved.</text:p>
      <text:p text:style-name="Text_20_body">"It is a reading lens," said the woman. "It was created to assist scribes, scholars, and copyists in their work."</text:p>
      <text:p text:style-name="Text_20_body">Dahg studied the instrument with renewed interest.</text:p>
      <text:p text:style-name="Text_20_body">Now he saw more than a beautiful object.</text:p>
      <text:p text:style-name="Text_20_body">He saw a valuable tool. A sophisticated instrument.</text:p>
      <text:p text:style-name="Text_20_body">A rare combination of art, science, and practical utility.</text:p>
      <text:p text:style-name="Text_20_body">And yet, as he watched the reflections dancing within the crystal, he could not shake a strange feeling.</text:p>
      <text:p text:style-name="Text_20_body">There was something about the object.</text:p>
      <text:p text:style-name="Text_20_body">Something difficult to define.</text:p>
      <text:p text:style-name="Text_20_body">A quality unlike anything he had encountered in all the years he had spent handling rare and unusual items.</text:p>
      <text:p text:style-name="Text_20_body">As though the lens had been created to do more than merely enlarge the words printed upon a page.</text:p>
      <text:p text:style-name="Text_20_body">As though it concealed a purpose it had not yet revealed.</text:p>
      <text:p text:style-name="Text_20_body">For beyond its decorative beauty, seeing it in use gave it an almost magical quality.</text:p>
      <text:p text:style-name="Standard"/>
      <text:p text:style-name="Horizontal_20_Line"/>
      <text:p text:style-name="Text_20_body"><text:soft-page-break/></text:p>
      <text:h text:style-name="Heading_20_3" text:outline-level="3"/>
      <text:h text:style-name="Heading_20_3" text:outline-level="3">Part 2 – The Purchase</text:h>
      <text:p text:style-name="Text_20_body">Dahg continued examining the lens for several minutes.</text:p>
      <text:p text:style-name="Text_20_body">He studied it from different angles, inspected the engravings on its base, and carefully ran his fingers over the ebony and ivory.</text:p>
      <text:p text:style-name="Text_20_body">The piece appeared to be old.</text:p>
      <text:p text:style-name="Text_20_body">It showed no significant damage, yet the wear visible in certain places revealed that it had passed through many hands over the years. In the deepest recesses of the engravings, traces of dark dust still remained, left there by the slow passage of time.</text:p>
      <text:p text:style-name="Text_20_body">"Do you know who made it?" Dahg asked.</text:p>
      <text:p text:style-name="Text_20_body">The woman shook her head.</text:p>
      <text:p text:style-name="Text_20_body">"No."</text:p>
      <text:p text:style-name="Text_20_body">"And where does it come from?"</text:p>
      <text:p text:style-name="Text_20_body">"I don't know that either."</text:p>
      <text:p text:style-name="Text_20_body">The answer surprised the merchant.</text:p>
      <text:p text:style-name="Text_20_body">The woman seemed to notice.</text:p>
      <text:p text:style-name="Text_20_body">"I bought it about a year ago at an antiques market in Prosperous City. The seller didn't know its origin either. According to him, it had belonged to another dealer before he acquired it. And that dealer had obtained it from someone else."</text:p>
      <text:p text:style-name="Text_20_body">Dahg nodded slowly.</text:p>
      <text:p text:style-name="Text_20_body">That was not as unusual as it might sound.</text:p>
      <text:p text:style-name="Text_20_body">Many old objects found their way into auction houses after passing through countless owners.</text:p>
      <text:p text:style-name="Text_20_body">Yet in this case, the situation was particularly striking.</text:p>
      <text:p text:style-name="Text_20_body">An item so unusual would normally be accompanied by stories, documents, or records that allowed at least part of its history to be traced.</text:p>
      <text:p text:style-name="Text_20_body">This one, however, seemed to have left behind nothing but a chain of nameless owners.</text:p>
      <text:p text:style-name="Text_20_body">As though it had been passed from hand to hand for years.</text:p>
      <text:p text:style-name="Text_20_body">As though no one had kept it long enough to discover where it had come from.</text:p>
      <text:p text:style-name="Text_20_body">Dahg looked at the lens once more.</text:p>
      <text:p text:style-name="Text_20_body">The longer he studied it, the more convinced he became that he was looking at an exceptional piece.</text:p>
      <text:p text:style-name="Text_20_body"><text:soft-page-break/>The quality of the materials.</text:p>
      <text:p text:style-name="Text_20_body">The precision of the crystal.</text:p>
      <text:p text:style-name="Text_20_body">The complexity of the engravings.</text:p>
      <text:p text:style-name="Text_20_body">Everything suggested it had been crafted by extraordinary artisans.</text:p>
      <text:p text:style-name="Text_20_body">And that meant only one thing.</text:p>
      <text:p text:style-name="Text_20_body">It was worth a great deal of money.</text:p>
      <text:p text:style-name="Text_20_body">Perhaps more than he could afford at that moment.</text:p>
      <text:p text:style-name="Text_20_body">Even so, he decided to try.</text:p>
      <text:p text:style-name="Text_20_body">"How much are you asking for it?"</text:p>
      <text:p text:style-name="Text_20_body">The woman answered immediately.</text:p>
      <text:p text:style-name="Text_20_body">"Ten coins."</text:p>
      <text:p text:style-name="Text_20_body">Her tone was firm and final.</text:p>
      <text:p text:style-name="Text_20_body">As though the decision had been made long before she entered the shop.</text:p>
      <text:p text:style-name="Text_20_body">Dahg remained silent for several seconds.</text:p>
      <text:p text:style-name="Text_20_body">He had spent his entire life buying and selling things.</text:p>
      <text:p text:style-name="Text_20_body">He understood the rules of a negotiation perfectly well.</text:p>
      <text:p text:style-name="Text_20_body">The seller named a price.</text:p>
      <text:p text:style-name="Text_20_body">The buyer offered another.</text:p>
      <text:p text:style-name="Text_20_body">They argued.</text:p>
      <text:p text:style-name="Text_20_body">They bargained.</text:p>
      <text:p text:style-name="Text_20_body">They searched for common ground.</text:p>
      <text:p text:style-name="Text_20_body">That was how such matters worked.</text:p>
      <text:p text:style-name="Text_20_body">But not this time.</text:p>
      <text:p text:style-name="Text_20_body">The amount was absurdly low.</text:p>
      <text:p text:style-name="Text_20_body">It was nowhere near the true value of the piece.</text:p>
      <text:p text:style-name="Text_20_body">For a moment, he wondered whether the woman simply did not realize what she was selling.</text:p>
      <text:p text:style-name="Text_20_body">Yet her manner, her education, and the way she had presented the object ruled out that possibility.</text:p>
      <text:p text:style-name="Text_20_body">She knew exactly what she had.</text:p>
      <text:p text:style-name="Text_20_body">And yet she was willing to sell it for a fraction of its worth.</text:p>
      <text:p text:style-name="Text_20_body">Dahg asked no further questions.</text:p>
      <text:p text:style-name="Text_20_body"><text:soft-page-break/>He walked to the room behind the counter.</text:p>
      <text:p text:style-name="Text_20_body">There he unlocked a small iron strongbox.</text:p>
      <text:p text:style-name="Text_20_body">He removed a leather pouch.</text:p>
      <text:p text:style-name="Text_20_body">And returned to the table.</text:p>
      <text:p text:style-name="Text_20_body">Carefully, he counted out ten coins.</text:p>
      <text:p text:style-name="Text_20_body">One by one.</text:p>
      <text:p text:style-name="Text_20_body">Then he placed them before the woman.</text:p>
      <text:p text:style-name="Text_20_body">She barely glanced at them.</text:p>
      <text:p text:style-name="Text_20_body">She gathered them up immediately.</text:p>
      <text:p text:style-name="Text_20_body">Put the money away.</text:p>
      <text:p text:style-name="Text_20_body">And rose to her feet.</text:p>
      <text:p text:style-name="Text_20_body">"It has been a pleasure doing business with you, Master Dahg."</text:p>
      <text:p text:style-name="Text_20_body">"The pleasure is mine, madam."</text:p>
      <text:p text:style-name="Text_20_body">The woman inclined her head slightly.</text:p>
      <text:p text:style-name="Text_20_body">Then she turned toward the door.</text:p>
      <text:p text:style-name="Text_20_body">And left.</text:p>
      <text:p text:style-name="Text_20_body">Dahg watched her through the window as she walked away.</text:p>
      <text:p text:style-name="Text_20_body">He expected to see her stop at one of the market stalls or exchange words with an acquaintance.</text:p>
      <text:p text:style-name="Text_20_body">But she did neither.</text:p>
      <text:p text:style-name="Text_20_body">She crossed the street at a brisk pace.</text:p>
      <text:p text:style-name="Text_20_body">Then, rounding the corner of the neighboring building, disappeared into the crowd.</text:p>
      <text:p text:style-name="Text_20_body">As though she had been eager to leave.</text:p>
      <text:p text:style-name="Text_20_body">As though the true purpose of her visit had not been to sell the lens.</text:p>
      <text:p text:style-name="Text_20_body">But to be rid of it.</text:p>
      <text:p text:style-name="Text_20_body"/>
      <text:p text:style-name="Horizontal_20_Line"/>
      <text:p text:style-name="Text_20_body"/>
      <text:h text:style-name="Heading_20_3" text:outline-level="3">Part 3 – A Closer Examination</text:h>
      <text:p text:style-name="Text_20_body">As soon as the woman left the shop, Dahg turned his full attention back to the strange reading lens.</text:p>
      <text:p text:style-name="Text_20_body"><text:soft-page-break/>He placed it on the counter and began examining it carefully.</text:p>
      <text:p text:style-name="Text_20_body">Now that it belonged to him, he could study every detail at his leisure.</text:p>
      <text:p text:style-name="Text_20_body">The ebony-and-ivory base was just as impressive as it had been at first sight. Yet upon closer inspection, he discovered small cracks in parts of the wood and signs of wear along the more prominent carvings.</text:p>
      <text:p text:style-name="Text_20_body">Nothing serious.</text:p>
      <text:p text:style-name="Text_20_body">A little cleaning.</text:p>
      <text:p text:style-name="Text_20_body">Some wax.</text:p>
      <text:p text:style-name="Text_20_body">Perhaps a light polishing.</text:p>
      <text:p text:style-name="Text_20_body">With a few minor repairs, it would recover much of its former splendor.</text:p>
      <text:p text:style-name="Text_20_body">And then he could sell it for a considerable sum.</text:p>
      <text:p text:style-name="Text_20_body">Dahg smiled.</text:p>
      <text:p text:style-name="Text_20_body">He had made an excellent purchase.</text:p>
      <text:p text:style-name="Text_20_body">Opportunities like that came along only a handful of times in a lifetime.</text:p>
      <text:p text:style-name="Text_20_body">At that moment, the bell above the door rang.</text:p>
      <text:p text:style-name="Text_20_body">A customer had entered the shop looking for carpentry tools.</text:p>
      <text:p text:style-name="Text_20_body">Dahg set the lens aside and returned to his duties.</text:p>
      <text:p text:style-name="Text_20_body">Then more visitors arrived.</text:p>
      <text:p text:style-name="Text_20_body">A farmer interested in a lamp.</text:p>
      <text:p text:style-name="Text_20_body">An elderly woman searching for an iron pot.</text:p>
      <text:p text:style-name="Text_20_body">A traveler hoping to sell a bundle of blankets.</text:p>
      <text:p text:style-name="Text_20_body">And before he realized it, afternoon had given way to night.</text:p>
      <text:p text:style-name="Text_20_body">By the time he finally closed the shop and extinguished the last candles in the main hall, he was tired.</text:p>
      <text:p text:style-name="Text_20_body">He slowly climbed the stairs leading to his rooms.</text:p>
      <text:p text:style-name="Text_20_body">He was about to go to bed when he remembered the lens.</text:p>
      <text:p text:style-name="Text_20_body">For some reason, he did not want the day to end without looking at it one more time.</text:p>
      <text:p text:style-name="Text_20_body">He went back for it.</text:p>
      <text:p text:style-name="Text_20_body">And carried it with him to his bedroom.</text:p>
      <text:p text:style-name="Text_20_body">The room was simple.</text:p>
      <text:p text:style-name="Text_20_body">A bed.</text:p>
      <text:p text:style-name="Text_20_body"><text:soft-page-break/>A wardrobe.</text:p>
      <text:p text:style-name="Text_20_body">A worktable.</text:p>
      <text:p text:style-name="Text_20_body">Several shelves crowded with books and documents.</text:p>
      <text:p text:style-name="Text_20_body">Dahg placed the lens upon the table and pulled an oil lamp closer.</text:p>
      <text:p text:style-name="Text_20_body">Then he picked up his ledger.</text:p>
      <text:p text:style-name="Text_20_body">If the instrument had truly been designed to make reading easier, there could be no better test than a long list of numbers.</text:p>
      <text:p text:style-name="Text_20_body">He carefully rested the flat surface of the crystal upon one of the pages.</text:p>
      <text:p text:style-name="Text_20_body">And looked.</text:p>
      <text:p text:style-name="Text_20_body">The figures appeared enlarged with astonishing clarity.</text:p>
      <text:p text:style-name="Text_20_body">Every stroke.</text:p>
      <text:p text:style-name="Text_20_body">Every line.</text:p>
      <text:p text:style-name="Text_20_body">Every tiny detail of the handwriting.</text:p>
      <text:p text:style-name="Text_20_body">Everything seemed sharper.</text:p>
      <text:p text:style-name="Text_20_body">Easier to distinguish.</text:p>
      <text:p text:style-name="Text_20_body">Dahg smiled with satisfaction.</text:p>
      <text:p text:style-name="Text_20_body">The woman had told the truth.</text:p>
      <text:p text:style-name="Text_20_body">It was a magnificent tool.</text:p>
      <text:p text:style-name="Text_20_body">He slowly moved the lens across different pages of the ledger, reviewing old entries.</text:p>
      <text:p text:style-name="Text_20_body">And then something strange happened.</text:p>
      <text:p text:style-name="Text_20_body">At first, he thought it was merely a reflection.</text:p>
      <text:p text:style-name="Text_20_body">A faint mist appeared within the crystal.</text:p>
      <text:p text:style-name="Text_20_body">It was barely visible.</text:p>
      <text:p text:style-name="Text_20_body">A thin, whitish cloud that seemed to drift beneath the surface.</text:p>
      <text:p text:style-name="Text_20_body">The mist began to spread.</text:p>
      <text:p text:style-name="Text_20_body">Growing denser.</text:p>
      <text:p text:style-name="Text_20_body">More opaque.</text:p>
      <text:p text:style-name="Text_20_body">Until it completely obscured the writing beneath.</text:p>
      <text:p text:style-name="Text_20_body">The merchant lifted the lens from the book.</text:p>
      <text:p text:style-name="Text_20_body">He held it up to the light.</text:p>
      <text:p text:style-name="Text_20_body"><text:soft-page-break/>He saw no cracks.</text:p>
      <text:p text:style-name="Text_20_body">No moisture.</text:p>
      <text:p text:style-name="Text_20_body">No defect of any kind.</text:p>
      <text:p text:style-name="Text_20_body">And yet the mist remained.</text:p>
      <text:p text:style-name="Text_20_body">He turned the object over.</text:p>
      <text:p text:style-name="Text_20_body">Tilted it.</text:p>
      <text:p text:style-name="Text_20_body">Held it closer to the lamp.</text:p>
      <text:p text:style-name="Text_20_body">Nothing changed.</text:p>
      <text:p text:style-name="Text_20_body">For a moment, he thought it might be a reflection coming from the window.</text:p>
      <text:p text:style-name="Text_20_body">He rose from his chair and drew the curtain shut.</text:p>
      <text:p text:style-name="Text_20_body">Then he returned.</text:p>
      <text:p text:style-name="Text_20_body">The mist was still floating within the crystal.</text:p>
      <text:p text:style-name="Text_20_body">And now it seemed to be moving.</text:p>
      <text:p text:style-name="Text_20_body">Dahg felt a faint chill run through him.</text:p>
      <text:p text:style-name="Text_20_body">He moved the lamp farther away.</text:p>
      <text:p text:style-name="Text_20_body">Then brought it closer again.</text:p>
      <text:p text:style-name="Text_20_body">Once more, he examined the surface.</text:p>
      <text:p text:style-name="Text_20_body">That was when he noticed something that made his heart skip a beat.</text:p>
      <text:p text:style-name="Text_20_body">Shapes were beginning to emerge within the white clouds.</text:p>
      <text:p text:style-name="Text_20_body">Shadows.</text:p>
      <text:p text:style-name="Text_20_body">Tiny figures that seemed to move slowly.</text:p>
      <text:p text:style-name="Text_20_body">As though he were watching something taking place far away.</text:p>
      <text:p text:style-name="Text_20_body">As though the crystal had become a window.</text:p>
      <text:p text:style-name="Text_20_body">Unable to understand what he was seeing, Dahg leaned forward.</text:p>
      <text:p text:style-name="Text_20_body">Closer and closer.</text:p>
      <text:p text:style-name="Text_20_body">Until his face was only inches from the sphere.</text:p>
      <text:p text:style-name="Text_20_body">And at last, he was able to make out a human figure.</text:p>
      <text:p text:style-name="Text_20_body">A figure that seemed disturbingly familiar.</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20T09:32:07.251000000</meta:creation-date>
    <dc:date>2026-07-20T09:39:46.684000000</dc:date>
    <meta:editing-duration>PT7M39S</meta:editing-duration>
    <meta:editing-cycles>3</meta:editing-cycles>
    <meta:generator>LibreOffice/7.3.5.2$Windows_X86_64 LibreOffice_project/184fe81b8c8c30d8b5082578aee2fed2ea847c01</meta:generator>
    <meta:document-statistic meta:table-count="0" meta:image-count="0" meta:object-count="0" meta:page-count="8" meta:paragraph-count="210" meta:word-count="1905" meta:character-count="10696" meta:non-whitespace-character-count="8997"/>
  </office:meta>
</office:document-meta>
</file>