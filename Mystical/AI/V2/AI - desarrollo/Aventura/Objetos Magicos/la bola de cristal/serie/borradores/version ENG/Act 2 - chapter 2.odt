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1b8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Chapter <text:span text:style-name="T1">2</text:span> – Alhat</text:h>
      <text:h text:style-name="Heading_20_3" text:outline-level="3">Part 1 – Dahg Leaves Home</text:h>
      <text:p text:style-name="Text_20_body"><text:span text:style-name="Strong_20_Emphasis">Day: Friday. Time: 7 p.m.</text:span></text:p>
      <text:p text:style-name="Text_20_body">Inside the shop, Dahg was making his final preparations before leaving.</text:p>
      <text:p text:style-name="Text_20_body">At nine o'clock that evening, he was due to board the boat that would carry him to the city.</text:p>
      <text:p text:style-name="Text_20_body">Shortly before seven, he locked the doors of the auction house and set off on foot toward the river dock.</text:p>
      <text:p text:style-name="Text_20_body">He carried with him the documents for his meeting with the scribe in Prosperous City, as well as the hope that this journey would mark the beginning of a better future for his business.</text:p>
      <text:p text:style-name="Text_20_body">He walked with a steady stride.</text:p>
      <text:p text:style-name="Text_20_body">The evening air was pleasant.</text:p>
      <text:p text:style-name="Text_20_body">A gentle breeze drifted through the streets of Drywind as the warmth of the day slowly faded away.</text:p>
      <text:p text:style-name="Text_20_body">Out across the plains, dark clouds were gathering on the horizon.</text:p>
      <text:p text:style-name="Text_20_body">The shops along the market road were beginning to close their doors.</text:p>
      <text:p text:style-name="Text_20_body">And the streets were slowly emptying.</text:p>
      <text:p text:style-name="Text_20_body">As he reached the edge of the village, Dahg spotted Omhp working beside the fence surrounding his property.</text:p>
      <text:p text:style-name="Text_20_body">The old farmer raised a hand in greeting.</text:p>
      <text:p text:style-name="Text_20_body">Then stepped over to the roadside.</text:p>
      <text:p text:style-name="Text_20_body">For a few minutes, they spoke about several problems that had been affecting his crops.</text:p>
      <text:p text:style-name="Text_20_body">Omhp had hoped for some advice.</text:p>
      <text:p text:style-name="Text_20_body">But Dahg was in a hurry.</text:p>
      <text:p text:style-name="Text_20_body">He explained that he had to board the boat that very night and promised to return the following day to help him.</text:p>
      <text:p text:style-name="Text_20_body">The two men parted on friendly terms.</text:p>
      <text:p text:style-name="Text_20_body">And Dahg continued on his way.</text:p>
      <text:p text:style-name="Horizontal_20_Line"/>
      <text:p text:style-name="Text_20_body"/>
      <text:h text:style-name="Heading_20_3" text:outline-level="3"><text:soft-page-break/>Part 2 – Bound for the Warehouse</text:h>
      <text:p text:style-name="Text_20_body">Not far from there, at the southern edge of Drywind, Mrs. Alhat was finishing her daily chores.</text:p>
      <text:p text:style-name="Text_20_body">The elderly woman moved slowly through the pens, making sure all the animals were secure before nightfall.</text:p>
      <text:p text:style-name="Text_20_body">The clouds were gathering more quickly now.</text:p>
      <text:p text:style-name="Text_20_body">A storm seemed to be forming over the plains.</text:p>
      <text:p text:style-name="Text_20_body">And although it had not yet begun to rain, the air carried that familiar scent that foretold a change in the weather.</text:p>
      <text:p text:style-name="Text_20_body">Mrs. Alhat watched the sky for a moment.</text:p>
      <text:p text:style-name="Text_20_body">Then returned to her work.</text:p>
      <text:p text:style-name="Text_20_body">She had lived alone for many years.</text:p>
      <text:p text:style-name="Text_20_body">Her small farm covered only a few acres, but it was enough to provide a simple and peaceful life.</text:p>
      <text:p text:style-name="Text_20_body">She kept half a dozen goats. A few pigs. A flock of sheep.</text:p>
      <text:p text:style-name="Text_20_body">Several chickens.</text:p>
      <text:p text:style-name="Text_20_body">And an old gray mule that had been at her side for so long that she thought of it more as a friend than a beast of burden.</text:p>
      <text:p text:style-name="Text_20_body">And although the work was never truly finished, she rarely complained.</text:p>
      <text:p text:style-name="Text_20_body">She was a patient woman. Practical.</text:p>
      <text:p text:style-name="Text_20_body">Accustomed to solving problems through hard work and perseverance.</text:p>
      <text:p text:style-name="Text_20_body">Once she had finished checking the pens, she made sure the animals had enough water to last through the night.</text:p>
      <text:p text:style-name="Text_20_body">Only then did she remember the order waiting for her at the village warehouse.</text:p>
      <text:p text:style-name="Text_20_body">She had purchased several sacks of grain. Oil. A few tools.</text:p>
      <text:p text:style-name="Text_20_body">And other supplies she would need in the weeks ahead.</text:p>
      <text:p text:style-name="Text_20_body">She glanced up at the sky once more.</text:p>
      <text:p text:style-name="Text_20_body">There was still time.</text:p>
      <text:p text:style-name="Text_20_body">If she hurried, she could collect everything before the storm arrived.</text:p>
      <text:p text:style-name="Text_20_body">She readied the wagon.</text:p>
      <text:p text:style-name="Text_20_body">Hitched the mule.</text:p>
      <text:p text:style-name="Text_20_body">And soon afterward left the farm.</text:p>
      <text:p text:style-name="Text_20_body"><text:soft-page-break/>Her old companion moved along at its usual unhurried pace while the wagon wheels creaked softly on the road.</text:p>
      <text:p text:style-name="Text_20_body">Mrs. Alhat smiled.</text:p>
      <text:p text:style-name="Text_20_body">According to the original plan, she would have been taking Dahg to the river dock that evening.</text:p>
      <text:p text:style-name="Text_20_body">But the merchant had decided to walk instead.</text:p>
      <text:p text:style-name="Text_20_body">Which meant she now had some free time.</text:p>
      <text:p text:style-name="Text_20_body">And she had decided to use it to collect the supplies she needed.</text:p>
      <text:p text:style-name="Text_20_body">No hurry.</text:p>
      <text:p text:style-name="Text_20_body">No worries.</text:p>
      <text:p text:style-name="Horizontal_20_Line"/>
      <text:p text:style-name="Text_20_body"/>
      <text:h text:style-name="Heading_20_3" text:outline-level="3">Part 3 – The Thunderclap</text:h>
      <text:p text:style-name="Text_20_body">Mrs. Alhat arrived at the warehouse shortly afterward.</text:p>
      <text:p text:style-name="Text_20_body">The building stood beside the main road, near the northern entrance to Drywind.</text:p>
      <text:p text:style-name="Text_20_body">It was one of the largest structures in the village.</text:p>
      <text:p text:style-name="Text_20_body">A massive wooden building erected many years before, resembling an enormous barn.</text:p>
      <text:p text:style-name="Text_20_body">The ground floor served as a storage depot for merchandise.</text:p>
      <text:p text:style-name="Text_20_body">The upper level was used to store surplus grain, tools, and materials that were not needed on a regular basis.</text:p>
      <text:p text:style-name="Text_20_body">A wide porch stretched across the entire front of the building.</text:p>
      <text:p text:style-name="Text_20_body">Beneath its roof were piled sacks, barrels, crates, and every sort of goods awaiting collection or distribution.</text:p>
      <text:p text:style-name="Text_20_body">At that hour, there was still plenty of activity.</text:p>
      <text:p text:style-name="Text_20_body">Several farmers were finishing their purchases.</text:p>
      <text:p text:style-name="Text_20_body">A pair of teamsters stood near the entrance arguing over prices.</text:p>
      <text:p text:style-name="Text_20_body">Two laborers were unloading cargo from a river barge that had arrived that very morning.</text:p>
      <text:p text:style-name="Text_20_body">And Xenhk, the warehouse owner, was personally attending to the last customers of the day.</text:p>
      <text:p text:style-name="Text_20_body">It seemed as though all the daily life of Drywind had gathered there.</text:p>
      <text:p text:style-name="Text_20_body">Mrs. Alhat brought her wagon to a stop in front of the porch.</text:p>
      <text:p text:style-name="Text_20_body">Her order was already waiting.</text:p>
      <text:p text:style-name="Text_20_body"><text:soft-page-break/>Everything had been stacked against the front wall of the building.</text:p>
      <text:p text:style-name="Text_20_body">Very close to a long row of enormous clay jars filled with oil.</text:p>
      <text:p text:style-name="Text_20_body">There were dozens of them.</text:p>
      <text:p text:style-name="Text_20_body">Large containers sealed with wax and treated cloth.</text:p>
      <text:p text:style-name="Text_20_body">Some stood nearly as tall as a person.</text:p>
      <text:p text:style-name="Text_20_body">Others had been stacked atop one another, forming veritable walls of pottery.</text:p>
      <text:p text:style-name="Text_20_body">Oil was one of the most valuable commodities Xenhk stored.</text:p>
      <text:p text:style-name="Text_20_body">And that week he had received an especially large shipment.</text:p>
      <text:p text:style-name="Text_20_body">Mrs. Alhat exchanged a few words with the merchant.</text:p>
      <text:p text:style-name="Text_20_body">They spoke of the weather.</text:p>
      <text:p text:style-name="Text_20_body">Of the harvest.</text:p>
      <text:p text:style-name="Text_20_body">And of the storm that seemed to be rolling in across the plains.</text:p>
      <text:p text:style-name="Text_20_body">Then she began slowly loading the sacks into her wagon.</text:p>
      <text:p text:style-name="Text_20_body">The old mule waited patiently.</text:p>
      <text:p text:style-name="Text_20_body">Motionless.</text:p>
      <text:p text:style-name="Text_20_body">With the calm of one that had performed the same routine hundreds of times before.</text:p>
      <text:p text:style-name="Text_20_body">Several minutes passed.</text:p>
      <text:p text:style-name="Text_20_body">The wagon was nearly loaded.</text:p>
      <text:p text:style-name="Text_20_body">Mrs. Alhat was lifting one of the last sacks when it happened.</text:p>
      <text:p text:style-name="Text_20_body">A blinding flash tore across the sky.</text:p>
      <text:p text:style-name="Text_20_body">So bright that, for an instant, it seemed to turn evening into broad daylight.</text:p>
      <text:p text:style-name="Text_20_body">Lightning struck somewhere in the nearby fields.</text:p>
      <text:p text:style-name="Text_20_body">The bolt hit the earth with terrifying force.</text:p>
      <text:p text:style-name="Text_20_body">And at that very moment came the thunder.</text:p>
      <text:p text:style-name="Text_20_body">A crash so violent it seemed to split the world in two.</text:p>
      <text:p text:style-name="Text_20_body">Mrs. Alhat involuntarily dropped the sack she was carrying.</text:p>
      <text:p text:style-name="Text_20_body">The mule leapt sideways.</text:p>
      <text:p text:style-name="Text_20_body">The old woman needed a moment to recover.</text:p>
      <text:p text:style-name="Text_20_body">Then she burst out laughing.</text:p>
      <text:p text:style-name="Text_20_body">"Did that frighten you?" she asked, stroking the animal's neck.</text:p>
      <text:p text:style-name="Text_20_body"><text:soft-page-break/>The mule snorted.</text:p>
      <text:p text:style-name="Text_20_body">And that only made her laugh harder.</text:p>
      <text:p text:style-name="Text_20_body">It was a brief moment.</text:p>
      <text:p text:style-name="Text_20_body">A small pause in an otherwise ordinary evening.</text:p>
      <text:p text:style-name="Text_20_body">Until something appeared around the bend in the road.</text:p>
      <text:p text:style-name="Text_20_body">A wagon.</text:p>
      <text:p text:style-name="Text_20_body">It was moving at an impossible speed.</text:p>
      <text:p text:style-name="Text_20_body">Out of control.</text:p>
      <text:p text:style-name="Horizontal_20_Line"/>
      <text:p text:style-name="Text_20_body"/>
      <text:h text:style-name="Heading_20_3" text:outline-level="3">Part 4 – A Wagon Out of Control</text:h>
      <text:p text:style-name="Text_20_body">Mrs. Alhat had no time to react.</text:p>
      <text:p text:style-name="Text_20_body">The wagon burst around the bend like a projectile.</text:p>
      <text:p text:style-name="Text_20_body">And came hurtling straight toward her.</text:p>
      <text:p text:style-name="Text_20_body">It slammed into Mrs. Alhat's wagon with a deafening crash.</text:p>
      <text:p text:style-name="Text_20_body">And together, the two wagons smashed through the front wall of the warehouse.</text:p>
      <text:p text:style-name="Text_20_body">They burst into the building like a battering ram.</text:p>
      <text:p text:style-name="Text_20_body">Plowing through the oil jars stacked along the front of the structure.</text:p>
      <text:p text:style-name="Text_20_body">One of the oil lamps hanging from the ceiling was torn loose by the impact.</text:p>
      <text:p text:style-name="Text_20_body">Its flame touched the spilled oil.</text:p>
      <text:p text:style-name="Text_20_body">And the fire began.</text:p>
      <text:p text:style-name="Text_20_body">Within seconds, the entire building was ablaze.</text:p>
      <text:p text:style-name="Text_20_body">The heat became unbearable.</text:p>
      <text:p text:style-name="Text_20_body">Old Omhp and Mrs. Alhat were trapped inside a prison of burning wood.</text:p>
      <text:p text:style-name="Text_20_body">The intense heat reached the oil jars that had remained intact and triggered an explosion.</text:p>
      <text:p text:style-name="Text_20_body">The fire doubled in size in a matter of seconds.</text:p>
      <text:p text:style-name="Text_20_body">And then the neighboring buildings began to burn.</text:p>
      <text:p text:style-name="Text_20_body">Not far away, beside the bend in the road leading to the dock, Dahg was trying to understand what was happening.</text:p>
      <text:p text:style-name="Text_20_body">Watching the scene in horror from the ground.</text:p>
      <text:p text:style-name="Text_20_body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0T09:45:01.400000000</meta:creation-date>
    <dc:date>2026-07-20T10:08:30.126000000</dc:date>
    <meta:editing-duration>PT15M54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30" meta:word-count="1268" meta:character-count="7037" meta:non-whitespace-character-count="5894"/>
  </office:meta>
</office:document-meta>
</file>