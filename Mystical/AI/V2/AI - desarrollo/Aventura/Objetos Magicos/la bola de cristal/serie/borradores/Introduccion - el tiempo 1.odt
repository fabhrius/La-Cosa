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c1e6"/>
    </style:style>
    <style:style style:name="P2" style:family="paragraph" style:parent-style-name="Text_20_body">
      <style:text-properties officeooo:paragraph-rsid="00173f20"/>
    </style:style>
    <style:style style:name="P3" style:family="paragraph" style:parent-style-name="Text_20_body">
      <style:text-properties officeooo:rsid="00173f20" officeooo:paragraph-rsid="00173f20"/>
    </style:style>
    <style:style style:name="P4" style:family="paragraph" style:parent-style-name="Text_20_body">
      <style:text-properties officeooo:paragraph-rsid="0017fee9"/>
    </style:style>
    <style:style style:name="P5" style:family="paragraph" style:parent-style-name="Text_20_body">
      <style:text-properties officeooo:paragraph-rsid="001a6490"/>
    </style:style>
    <style:style style:name="P6" style:family="paragraph" style:parent-style-name="Text_20_body">
      <style:text-properties officeooo:paragraph-rsid="001b2a02"/>
    </style:style>
    <style:style style:name="P7" style:family="paragraph" style:parent-style-name="Text_20_body">
      <style:text-properties officeooo:rsid="001a6490" officeooo:paragraph-rsid="001a6490"/>
    </style:style>
    <style:style style:name="P8" style:family="paragraph" style:parent-style-name="Text_20_body">
      <style:text-properties officeooo:paragraph-rsid="001d2560"/>
    </style:style>
    <style:style style:name="P9" style:family="paragraph" style:parent-style-name="Text_20_body">
      <style:text-properties officeooo:rsid="001e9f3f" officeooo:paragraph-rsid="001e9f3f"/>
    </style:style>
    <style:style style:name="P10" style:family="paragraph" style:parent-style-name="Text_20_body">
      <style:text-properties officeooo:paragraph-rsid="00205a9a"/>
    </style:style>
    <style:style style:name="P11" style:family="paragraph" style:parent-style-name="Text_20_body">
      <style:text-properties officeooo:rsid="00205a9a" officeooo:paragraph-rsid="00205a9a"/>
    </style:style>
    <style:style style:name="P12" style:family="paragraph" style:parent-style-name="Text_20_body">
      <style:text-properties officeooo:rsid="00205a9a" officeooo:paragraph-rsid="0023d259"/>
    </style:style>
    <style:style style:name="P13" style:family="paragraph" style:parent-style-name="Text_20_body">
      <style:text-properties officeooo:rsid="00173f20" officeooo:paragraph-rsid="00173f20"/>
    </style:style>
    <style:style style:name="T1" style:family="text">
      <style:text-properties officeooo:rsid="0016c1e6"/>
    </style:style>
    <style:style style:name="T2" style:family="text">
      <style:text-properties officeooo:rsid="00173f20"/>
    </style:style>
    <style:style style:name="T3" style:family="text">
      <style:text-properties officeooo:rsid="0017fee9"/>
    </style:style>
    <style:style style:name="T4" style:family="text">
      <style:text-properties officeooo:rsid="0018c336"/>
    </style:style>
    <style:style style:name="T5" style:family="text">
      <style:text-properties officeooo:rsid="0018cbb1"/>
    </style:style>
    <style:style style:name="T6" style:family="text">
      <style:text-properties officeooo:rsid="001b2a02"/>
    </style:style>
    <style:style style:name="T7" style:family="text">
      <style:text-properties officeooo:rsid="001d2560"/>
    </style:style>
    <style:style style:name="T8" style:family="text">
      <style:text-properties officeooo:rsid="00245810"/>
    </style:style>
    <style:style style:name="T9" style:family="text">
      <style:text-properties officeooo:rsid="00276d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ólogo </text:p>
      <text:p text:style-name="P6"/>
      <text:p text:style-name="P6"/>
      <text:p text:style-name="P6">El tiempo<text:span text:style-name="T6">.</text:span></text:p>
      <text:p text:style-name="P6"/>
      <text:p text:style-name="P10">Sepulta las ciudades. Borra los caminos. Convierte las certezas en leyendas.</text:p>
      <text:p text:style-name="P10"/>
      <text:p text:style-name="P11">Y mientras hablamos, se consume lentamente. Igual que el aceite de una lámpara.</text:p>
      <text:p text:style-name="P11"/>
      <text:p text:style-name="P10"/>
      <text:p text:style-name="P8">Hay quienes<text:span text:style-name="T3"> </text:span>sostienen que el tiempo es como un camino ya trazado. </text:p>
      <text:p text:style-name="P8"/>
      <text:p text:style-name="P8">Que el pasado, el presente y el futuro existen al mismo tiempo, y que cada acontecimiento ocupa un lugar que no puede ser alterado.</text:p>
      <text:p text:style-name="P4"/>
      <text:p text:style-name="P4">Otro<text:span text:style-name="T3">s, en cambio,</text:span> afirman que solo existe el presente. </text:p>
      <text:p text:style-name="P4"/>
      <text:p text:style-name="P4">Que el pasado sobrevive únicamente en la memoria<text:span text:style-name="T8">,</text:span> y que el futuro no es más que un conjunto de posibilidades.</text:p>
      <text:p text:style-name="P4"/>
      <text:p text:style-name="P4"/>
      <text:p text:style-name="P12"><text:span text:style-name="T9">El tiempo</text:span> ha fascinado a los hombres desde el principio de los días.</text:p>
      <text:p text:style-name="P12"/>
      <text:p text:style-name="P12"/>
      <text:p text:style-name="P1">Los sabios de la antigüedad buscaron respuestas en los astros, en los sueños, en los números<text:span text:style-name="T1">.</text:span></text:p>
      <text:p text:style-name="P1"/>
      <text:p text:style-name="P2"><text:span text:style-name="T1">Algunas leyendas afirman que llegaron a construir</text:span> extraños instrumentos<text:span text:style-name="T1"> con el </text:span><text:span text:style-name="T2">unico </text:span><text:span text:style-name="T1">objetivo de desvelar lo que ocurrirá</text:span><text:span text:style-name="T2">, el destino.</text:span></text:p>
      <text:p text:style-name="P2"/>
      <text:p text:style-name="P2"/>
      <text:p text:style-name="P2"><text:span text:style-name="T4">Aquellos</text:span> secretos se han perdido con el paso de los siglos.</text:p>
      <text:p text:style-name="P2"><text:soft-page-break/></text:p>
      <text:p text:style-name="P3">Pero,</text:p>
      <text:p text:style-name="P2"/>
      <text:p text:style-name="P3">¿qué haría<text:span text:style-name="T7">s</text:span><text:span text:style-name="T4"> tú</text:span> si pudi<text:span text:style-name="T4">e</text:span>ra<text:span text:style-name="T7">s</text:span> conocer el futuro?</text:p>
      <text:p text:style-name="P2"/>
      <text:p text:style-name="P2"/>
      <text:p text:style-name="P2"/>
      <text:p text:style-name="Text_20_body"><text:span text:style-name="T5">Lo que voy a relatar ahora,</text:span> sucedió hace tanto tiempo que ya nadie recuerda cuándo.</text:p>
      <text:p text:style-name="Text_20_body">En un lugar que ya no aparece en ningún mapa.</text:p>
      <text:p text:style-name="Text_20_body"/>
      <text:p text:style-name="Text_20_body">En un pequeño pueblo llamado Drywind, al norte de las Regiones Planas, no muy lejos de Ciudad Próspera.</text:p>
      <text:p text:style-name="Text_20_body"/>
      <text:p text:style-name="Text_20_body">Allí hubo una vez una almoneda.</text:p>
      <text:p text:style-name="Text_20_body"/>
      <text:p text:style-name="P7">Y esta historia, comienza exactamente allí.</text:p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4T10:56:32.687000000</meta:creation-date>
    <dc:date>2026-07-16T18:05:10.939000000</dc:date>
    <meta:editing-duration>PT43M18S</meta:editing-duration>
    <meta:editing-cycles>16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9" meta:word-count="216" meta:character-count="1243" meta:non-whitespace-character-count="1043"/>
  </office:meta>
</office:document-meta>
</file>