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c1e6"/>
    </style:style>
    <style:style style:name="P2" style:family="paragraph" style:parent-style-name="Text_20_body">
      <style:text-properties officeooo:paragraph-rsid="00173f20"/>
    </style:style>
    <style:style style:name="P3" style:family="paragraph" style:parent-style-name="Text_20_body">
      <style:text-properties officeooo:rsid="00173f20" officeooo:paragraph-rsid="00173f20"/>
    </style:style>
    <style:style style:name="P4" style:family="paragraph" style:parent-style-name="Text_20_body">
      <style:text-properties officeooo:paragraph-rsid="0017fee9"/>
    </style:style>
    <style:style style:name="T1" style:family="text">
      <style:text-properties officeooo:rsid="0016c1e6"/>
    </style:style>
    <style:style style:name="T2" style:family="text">
      <style:text-properties officeooo:rsid="00173f20"/>
    </style:style>
    <style:style style:name="T3" style:family="text">
      <style:text-properties officeooo:rsid="0017f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tiempo ha fascinado a los hombres desde el principio de los días.</text:p>
      <text:p text:style-name="Text_20_body"/>
      <text:p text:style-name="P4">Hay quienes<text:span text:style-name="T3"> </text:span>sostienen que el tiempo es como un camino ya trazado. Que el pasado, el presente y el futuro existen al mismo tiempo, y que cada acontecimiento ocupa un lugar que no puede ser alterado.</text:p>
      <text:p text:style-name="P4"/>
      <text:p text:style-name="P4">Otro<text:span text:style-name="T3">s, en cambio,</text:span> afirman que solo existe el presente. </text:p>
      <text:p text:style-name="P4">Que el pasado sobrevive únicamente en la memoria y que el futuro no es más que un conjunto de posibilidades.</text:p>
      <text:p text:style-name="P4"/>
      <text:p text:style-name="Text_20_body">Nadie ha conseguido demostrar quién tiene razón.</text:p>
      <text:p text:style-name="Text_20_body"/>
      <text:p text:style-name="P1">Los sabios de la antigüedad buscaron respuestas en los astros, en los sueños, en los números<text:span text:style-name="T1">.</text:span></text:p>
      <text:p text:style-name="P2"><text:span text:style-name="T1">Algunas leyendas afirman que llegaron a construir</text:span> extraños instrumentos<text:span text:style-name="T1"> con el </text:span><text:span text:style-name="T2">unico </text:span><text:span text:style-name="T1">objetivo de desvelar lo que ocurrirá</text:span><text:span text:style-name="T2">, el destino.</text:span></text:p>
      <text:p text:style-name="P2"><text:span text:style-name="T2">Y</text:span> cuyos secretos se han perdido con el paso de los siglos.</text:p>
      <text:p text:style-name="P3">Pero,</text:p>
      <text:p text:style-name="P3">¿qué haríamos si pudiéramos conocer el futuro?</text:p>
      <text:p text:style-name="P2"/>
      <text:p text:style-name="Text_20_body"><text:span text:style-name="T2">E</text:span>l tiempo es un adversario paciente.</text:p>
      <text:p text:style-name="Text_20_body">Sepulta las ciudades. Borra los caminos. Convierte las certezas en leyendas.</text:p>
      <text:p text:style-name="Text_20_body"/>
      <text:p text:style-name="Text_20_body">Y sucedió hace tanto tiempo que ya nadie recuerda cuándo.</text:p>
      <text:p text:style-name="Text_20_body">En un lugar que ya no aparece en ningún mapa.</text:p>
      <text:p text:style-name="Text_20_body">En un pequeño pueblo llamado Drywind, al norte de las Regiones Planas, no muy lejos de Ciudad Próspera.</text:p>
      <text:p text:style-name="Text_20_body">Allí hubo una vez una almoneda.</text:p>
      <text:p text:style-name="Text_20_body">Y en aquella almoneda comenzó esta histor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4T10:56:32.687000000</meta:creation-date>
    <dc:date>2026-07-14T11:14:58.298000000</dc:date>
    <meta:editing-duration>PT8M14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7" meta:word-count="209" meta:character-count="1204" meta:non-whitespace-character-count="1011"/>
  </office:meta>
</office:document-meta>
</file>