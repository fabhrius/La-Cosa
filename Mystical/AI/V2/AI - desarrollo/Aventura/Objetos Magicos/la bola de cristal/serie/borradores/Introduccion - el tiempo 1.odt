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6c1e6"/>
    </style:style>
    <style:style style:name="P2" style:family="paragraph" style:parent-style-name="Text_20_body">
      <style:text-properties officeooo:paragraph-rsid="00173f20"/>
    </style:style>
    <style:style style:name="P3" style:family="paragraph" style:parent-style-name="Text_20_body">
      <style:text-properties officeooo:rsid="00173f20" officeooo:paragraph-rsid="00173f20"/>
    </style:style>
    <style:style style:name="P4" style:family="paragraph" style:parent-style-name="Text_20_body">
      <style:text-properties officeooo:paragraph-rsid="0017fee9"/>
    </style:style>
    <style:style style:name="P5" style:family="paragraph" style:parent-style-name="Text_20_body">
      <style:text-properties officeooo:paragraph-rsid="00173f20"/>
    </style:style>
    <style:style style:name="P6" style:family="paragraph" style:parent-style-name="Text_20_body">
      <style:text-properties officeooo:rsid="0018cbb1" officeooo:paragraph-rsid="0018cbb1"/>
    </style:style>
    <style:style style:name="P7" style:family="paragraph" style:parent-style-name="Text_20_body">
      <style:text-properties officeooo:paragraph-rsid="001a6490"/>
    </style:style>
    <style:style style:name="P8" style:family="paragraph" style:parent-style-name="Text_20_body">
      <style:text-properties officeooo:paragraph-rsid="001b2a02"/>
    </style:style>
    <style:style style:name="T1" style:family="text">
      <style:text-properties officeooo:rsid="0016c1e6"/>
    </style:style>
    <style:style style:name="T2" style:family="text">
      <style:text-properties officeooo:rsid="00173f20"/>
    </style:style>
    <style:style style:name="T3" style:family="text">
      <style:text-properties officeooo:rsid="0017fee9"/>
    </style:style>
    <style:style style:name="T4" style:family="text">
      <style:text-properties officeooo:rsid="0018c336"/>
    </style:style>
    <style:style style:name="T5" style:family="text">
      <style:text-properties officeooo:rsid="0018cbb1"/>
    </style:style>
    <style:style style:name="T6" style:family="text">
      <style:text-properties officeooo:rsid="001a6490"/>
    </style:style>
    <style:style style:name="T7" style:family="text">
      <style:text-properties officeooo:rsid="001b2a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El tiempo<text:span text:style-name="T7">.</text:span></text:p>
      <text:p text:style-name="P8"><text:span text:style-name="T7">Es un fenómeno que</text:span> ha fascinado a los hombres desde el principio de los días.</text:p>
      <text:p text:style-name="Text_20_body"/>
      <text:p text:style-name="P4">Hay quienes<text:span text:style-name="T3"> </text:span>sostienen que el tiempo es como un camino ya trazado. Que el pasado, el presente y el futuro existen al mismo tiempo, y que cada acontecimiento ocupa un lugar que no puede ser alterado.</text:p>
      <text:p text:style-name="P4"/>
      <text:p text:style-name="P4">Otro<text:span text:style-name="T3">s, en cambio,</text:span> afirman que solo existe el presente. </text:p>
      <text:p text:style-name="P4">Que el pasado sobrevive únicamente en la memoria y que el futuro no es más que un conjunto de posibilidades.</text:p>
      <text:p text:style-name="P4"/>
      <text:p text:style-name="P1">Los sabios de la antigüedad buscaron respuestas en los astros, en los sueños, en los números<text:span text:style-name="T1">.</text:span></text:p>
      <text:p text:style-name="P2"><text:span text:style-name="T1">Algunas leyendas afirman que llegaron a construir</text:span> extraños instrumentos<text:span text:style-name="T1"> con el </text:span><text:span text:style-name="T2">unico </text:span><text:span text:style-name="T1">objetivo de desvelar lo que ocurrirá</text:span><text:span text:style-name="T2">, el destino.</text:span></text:p>
      <text:p text:style-name="P2"/>
      <text:p text:style-name="P2"><text:span text:style-name="T4">Aquellos</text:span> secretos se han perdido con el paso de los siglos.</text:p>
      <text:p text:style-name="P3">Pero,</text:p>
      <text:p text:style-name="P3">¿qué haría<text:span text:style-name="T4"> usted</text:span> si pudi<text:span text:style-name="T4">e</text:span>ra conocer el futuro?</text:p>
      <text:p text:style-name="P2"/>
      <text:p text:style-name="P6">Esa es con seguridad una pregunta difícil.</text:p>
      <text:p text:style-name="Text_20_body"><text:span text:style-name="T5">Porque e</text:span>l tiempo es un adversario paciente.</text:p>
      <text:p text:style-name="Text_20_body">Sepulta las ciudades. Borra los caminos. Convierte las certezas en leyendas.</text:p>
      <text:p text:style-name="Text_20_body"/>
      <text:p text:style-name="Text_20_body"><text:span text:style-name="T5">Lo que voy a relatar ahora,</text:span> sucedió hace tanto tiempo que ya nadie recuerda cuándo.</text:p>
      <text:p text:style-name="Text_20_body">En un lugar que ya no aparece en ningún mapa.</text:p>
      <text:p text:style-name="Text_20_body">En un pequeño pueblo llamado Drywind, al norte de las Regiones Planas, no muy lejos de Ciudad Próspera.</text:p>
      <text:p text:style-name="Text_20_body">Allí hubo una vez una almoneda.</text:p>
      <text:p text:style-name="P7"><text:span text:style-name="T6">Y esta historia, comienza exactamente allí.</text:span></text:p>
      <text:p text:style-name="P7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7-14T10:56:32.687000000</meta:creation-date>
    <dc:date>2026-07-14T17:45:04.761000000</dc:date>
    <meta:editing-duration>PT16M18S</meta:editing-duration>
    <meta:editing-cycles>6</meta:editing-cycles>
    <meta:generator>LibreOffice/7.3.5.2$Windows_X86_64 LibreOffice_project/184fe81b8c8c30d8b5082578aee2fed2ea847c01</meta:generator>
    <meta:document-statistic meta:table-count="0" meta:image-count="0" meta:object-count="0" meta:page-count="1" meta:paragraph-count="18" meta:word-count="218" meta:character-count="1250" meta:non-whitespace-character-count="1049"/>
  </office:meta>
</office:document-meta>
</file>