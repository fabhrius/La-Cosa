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o que lo más importante es que la catástrofe cumpla tres condiciones:</text:p>
      <text:list xml:id="list230547802" text:style-name="L1">
        <text:list-item>
          <text:p text:style-name="P1">Debe surgir de forma natural a partir del cambio que hace el protagonista.</text:p>
        </text:list-item>
        <text:list-item>
          <text:p text:style-name="P1">Debe ser mucho peor que el problema original.</text:p>
        </text:list-item>
        <text:list-item>
          <text:p text:style-name="P1">Debe parecer perfectamente evitable cuando el lector mira hacia atrás.</text:p>
        </text:list-item>
      </text:list>
      <text:p text:style-name="Text_20_body">Si el problema original es perder el barco y el dinero del pasaje, las consecuencias deberían escalar gradualmente hasta algo que haga pensar:</text:p>
      <text:p text:style-name="Quotations">"Habría sido mejor perder el barco."</text:p>
      <text:p text:style-name="Text_20_body">Aquí tienes varias posibilidades.</text:p>
      <text:h text:style-name="Heading_20_3" text:outline-level="3">Opción 1: El incendio del pueblo</text:h>
      <text:p text:style-name="Text_20_body"><text:span text:style-name="Strong_20_Emphasis">Visión</text:span><text:line-break/>El protagonista pierde el barco porque se detiene a ayudar a un anciano cuyo carro ha volcado.</text:p>
      <text:p text:style-name="Text_20_body"><text:span text:style-name="Strong_20_Emphasis">Cambio</text:span><text:line-break/>Decide ignorar al anciano y seguir caminando.</text:p>
      <text:p text:style-name="Text_20_body"><text:span text:style-name="Strong_20_Emphasis">Consecuencia</text:span><text:line-break/>El anciano queda atrapado bajo el carro. Una lámpara de aceite se rompe. Horas después se produce un incendio.</text:p>
      <text:p text:style-name="Text_20_body">El fuego se extiende:</text:p>
      <text:list xml:id="list3111263887" text:style-name="L2">
        <text:list-item>
          <text:p text:style-name="P2">varias casas son destruidas</text:p>
        </text:list-item>
        <text:list-item>
          <text:p text:style-name="P2">mueren personas</text:p>
        </text:list-item>
        <text:list-item>
          <text:p text:style-name="P2">el protagonista pierde su propia vivienda</text:p>
        </text:list-item>
      </text:list>
      <text:p text:style-name="Text_20_body">Además, el caos obliga a suspender la travesía del barco.</text:p>
      <text:p text:style-name="Text_20_body">Al final tampoco cruza el río.</text:p>
      <text:p text:style-name="Horizontal_20_Line"/>
      <text:h text:style-name="Heading_20_3" text:outline-level="3">Opción 2: El asesinato involuntario</text:h>
      <text:p text:style-name="Text_20_body"><text:span text:style-name="Strong_20_Emphasis">Visión</text:span><text:line-break/>Se entretiene hablando con un viajero y pierde el barco.</text:p>
      <text:p text:style-name="Text_20_body"><text:span text:style-name="Strong_20_Emphasis">Cambio</text:span><text:line-break/>Evita encontrarse con el viajero.</text:p>
      <text:p text:style-name="Text_20_body"><text:span text:style-name="Strong_20_Emphasis">Consecuencia</text:span><text:line-break/>El viajero continúa su ruta y llega a una taberna.</text:p>
      <text:p text:style-name="Text_20_body">Allí provoca una pelea.</text:p>
      <text:p text:style-name="Text_20_body"><text:soft-page-break/>Un hombre muere.</text:p>
      <text:p text:style-name="Text_20_body">La familia de la víctima acusa a otra persona inocente.</text:p>
      <text:p text:style-name="Text_20_body">El protagonista descubre después que aquella conversación que evitó habría retrasado al viajero unos minutos y nada de eso habría ocurrido.</text:p>
      <text:p text:style-name="Horizontal_20_Line"/>
      <text:h text:style-name="Heading_20_3" text:outline-level="3">Opción 3: La epidemia</text:h>
      <text:p text:style-name="Text_20_body"><text:span text:style-name="Strong_20_Emphasis">Visión</text:span><text:line-break/>Pierde el barco porque se detiene en el mercado.</text:p>
      <text:p text:style-name="Text_20_body"><text:span text:style-name="Strong_20_Emphasis">Cambio</text:span><text:line-break/>Sale antes y evita el mercado.</text:p>
      <text:p text:style-name="Text_20_body"><text:span text:style-name="Strong_20_Emphasis">Consecuencia</text:span><text:line-break/>Una comerciante que normalmente habría hablado con él carga sola unos sacos.</text:p>
      <text:p text:style-name="Text_20_body">Sufre un accidente.</text:p>
      <text:p text:style-name="Text_20_body">La mercancía contaminada llega al pueblo sin ser revisada.</text:p>
      <text:p text:style-name="Text_20_body">Semanas después aparece una enfermedad.</text:p>
      <text:p text:style-name="Text_20_body">La visión mostraba la única línea temporal donde el problema era simplemente perder un barco.</text:p>
      <text:p text:style-name="Horizontal_20_Line"/>
      <text:h text:style-name="Heading_20_3" text:outline-level="3">Opción 4: La prisión</text:h>
      <text:p text:style-name="Text_20_body"><text:span text:style-name="Strong_20_Emphasis">Visión</text:span><text:line-break/>Pierde el barco porque se retrasa.</text:p>
      <text:p text:style-name="Text_20_body"><text:span text:style-name="Strong_20_Emphasis">Cambio</text:span><text:line-break/>Llega con tiempo de sobra.</text:p>
      <text:p text:style-name="Text_20_body"><text:span text:style-name="Strong_20_Emphasis">Consecuencia</text:span><text:line-break/>Al llegar temprano presencia un robo.</text:p>
      <text:p text:style-name="Text_20_body">Los guardias lo confunden con el culpable.</text:p>
      <text:p text:style-name="Text_20_body">Es encarcelado.</text:p>
      <text:p text:style-name="Text_20_body">Pierde años de su vida intentando demostrar su inocencia.</text:p>
      <text:p text:style-name="Text_20_body">Y el barco zarpa sin él mientras está siendo interrogado.</text:p>
      <text:p text:style-name="Horizontal_20_Line"/>
      <text:h text:style-name="Heading_20_3" text:outline-level="3"><text:soft-page-break/>Opción 5: La guerra local</text:h>
      <text:p text:style-name="Text_20_body"><text:span text:style-name="Strong_20_Emphasis">Visión</text:span><text:line-break/>Pierde el barco por unos minutos.</text:p>
      <text:p text:style-name="Text_20_body"><text:span text:style-name="Strong_20_Emphasis">Cambio</text:span><text:line-break/>Sale antes.</text:p>
      <text:p text:style-name="Text_20_body"><text:span text:style-name="Strong_20_Emphasis">Consecuencia</text:span><text:line-break/>En el camino observa una discusión.</text:p>
      <text:p text:style-name="Text_20_body">Interviene para evitarla.</text:p>
      <text:p text:style-name="Text_20_body">Su intervención provoca malentendidos entre dos familias influyentes.</text:p>
      <text:p text:style-name="Text_20_body">Las tensiones escalan durante semanas.</text:p>
      <text:p text:style-name="Text_20_body">Acaban produciéndose enfrentamientos violentos.</text:p>
      <text:p text:style-name="Text_20_body">El protagonista comprende demasiado tarde que su presencia en aquel lugar y momento fue consecuencia directa de intentar evitar la visión.</text:p>
      <text:p text:style-name="Horizontal_20_Line"/>
      <text:h text:style-name="Heading_20_3" text:outline-level="3">Opción 6: La muerte de un ser querido</text:h>
      <text:p text:style-name="Text_20_body">Esta suele ser la más emocional.</text:p>
      <text:p text:style-name="Text_20_body"><text:span text:style-name="Strong_20_Emphasis">Visión</text:span><text:line-break/>Pierde el barco porque visita a un familiar enfermo.</text:p>
      <text:p text:style-name="Text_20_body"><text:span text:style-name="Strong_20_Emphasis">Cambio</text:span><text:line-break/>Decide no visitarlo.</text:p>
      <text:p text:style-name="Text_20_body"><text:span text:style-name="Strong_20_Emphasis">Consecuencia</text:span><text:line-break/>El familiar sale de casa para buscarlo.</text:p>
      <text:p text:style-name="Text_20_body">Sufre un accidente mortal.</text:p>
      <text:p text:style-name="Text_20_body">La pérdida económica del barco se convierte en una pérdida irreversible.</text:p>
      <text:p text:style-name="Horizontal_20_Line"/>
      <text:h text:style-name="Heading_20_3" text:outline-level="3">Opción 7: La versión más inquietante</text:h>
      <text:p text:style-name="Text_20_body">Esta encaja muy bien con <text:span text:style-name="Emphasis">Omniscientis</text:span>.</text:p>
      <text:p text:style-name="Text_20_body"><text:span text:style-name="Strong_20_Emphasis">Visión</text:span><text:line-break/>Pierde el barco.</text:p>
      <text:p text:style-name="Text_20_body"><text:span text:style-name="Strong_20_Emphasis">Cambio</text:span><text:line-break/>Hace todo lo posible para llegar a tiempo.</text:p>
      <text:p text:style-name="Text_20_body"><text:soft-page-break/><text:span text:style-name="Strong_20_Emphasis">Consecuencia</text:span><text:line-break/>Cada corrección genera otra corrección.</text:p>
      <text:p text:style-name="Text_20_body">Evita un encuentro.<text:line-break/>Provoca otro.</text:p>
      <text:p text:style-name="Text_20_body">Evita un retraso.<text:line-break/>Produce un accidente.</text:p>
      <text:p text:style-name="Text_20_body">Evita una pérdida.<text:line-break/>Produce una tragedia.</text:p>
      <text:p text:style-name="Text_20_body">Al final:</text:p>
      <text:list xml:id="list655875325" text:style-name="L3">
        <text:list-item>
          <text:p text:style-name="P3">pierde el barco igualmente</text:p>
        </text:list-item>
        <text:list-item>
          <text:p text:style-name="P3">pierde sus bienes</text:p>
        </text:list-item>
        <text:list-item>
          <text:p text:style-name="P3">destruye relaciones</text:p>
        </text:list-item>
        <text:list-item>
          <text:p text:style-name="P3">causa sufrimiento a terceros</text:p>
        </text:list-item>
      </text:list>
      <text:p text:style-name="Text_20_body">Y descubre algo aterrador:</text:p>
      <text:p text:style-name="Text_20_body">La bola nunca le mostró un futuro malo.</text:p>
      <text:p text:style-name="Text_20_body">Le mostró el mejor futuro disponible.</text:p>
      <text:p text:style-name="Text_20_body">Esta última variante tiene la ventaja de reforzar directamente el mensaje central del cuento:</text:p>
      <text:p text:style-name="Quotations">Los seres humanos juzgan los acontecimientos por lo que pierden en ese instante.</text:p>
      <text:p text:style-name="Quotations">Pero no pueden ver todas las consecuencias que ese mismo acontecimiento evita.</text:p>
      <text:p text:style-name="Text_20_body">Y precisamente por eso la bola de cristal es una maldición. No porque muestre el futuro, sino porque muestra suficiente información para tentar al usuario a cambiarlo, pero no suficiente para comprender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3T11:13:36.583000000</meta:creation-date>
    <dc:date>2026-07-03T11:18:02.342000000</dc:date>
    <meta:editing-duration>PT4M26S</meta:editing-duration>
    <meta:editing-cycles>1</meta:editing-cycles>
    <meta:document-statistic meta:table-count="0" meta:image-count="0" meta:object-count="0" meta:page-count="4" meta:paragraph-count="77" meta:word-count="625" meta:character-count="3864" meta:non-whitespace-character-count="3326"/>
    <meta:generator>LibreOffice/7.3.5.2$Windows_X86_64 LibreOffice_project/184fe81b8c8c30d8b5082578aee2fed2ea847c01</meta:generator>
  </office:meta>
</office:document-meta>
</file>