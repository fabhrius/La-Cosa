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a7a48"/>
    </style:style>
    <style:style style:name="P2" style:family="paragraph" style:parent-style-name="Heading_20_3">
      <style:text-properties officeooo:paragraph-rsid="001dc49e"/>
    </style:style>
    <style:style style:name="P3" style:family="paragraph" style:parent-style-name="Text_20_body">
      <style:text-properties officeooo:paragraph-rsid="001589c4"/>
    </style:style>
    <style:style style:name="P4" style:family="paragraph" style:parent-style-name="Text_20_body">
      <style:text-properties officeooo:paragraph-rsid="001a7a48"/>
    </style:style>
    <style:style style:name="P5" style:family="paragraph" style:parent-style-name="Text_20_body">
      <style:text-properties officeooo:rsid="001bb301" officeooo:paragraph-rsid="001bb301"/>
    </style:style>
    <style:style style:name="P6" style:family="paragraph" style:parent-style-name="Text_20_body">
      <style:text-properties officeooo:paragraph-rsid="001dc49e"/>
    </style:style>
    <style:style style:name="T1" style:family="text">
      <style:text-properties officeooo:rsid="001589c4"/>
    </style:style>
    <style:style style:name="T2" style:family="text">
      <style:text-properties officeooo:rsid="0018db10"/>
    </style:style>
    <style:style style:name="T3" style:family="text">
      <style:text-properties officeooo:rsid="001dda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ítulo 2 - Alhat</text:h>
      <text:p text:style-name="Horizontal_20_Line"/>
      <text:h text:style-name="Heading_20_3" text:outline-level="3">1. Dahg sale de su casa</text:h>
      <text:p text:style-name="Text_20_body"/>
      <text:p text:style-name="P3"><text:span text:style-name="T1">Dia: viernes, hora: las 7 pm.</text:span></text:p>
      <text:p text:style-name="P3"><text:span text:style-name="T1">Dahg dentro de la tienda hacia los ultimos preparativos antes de salir.</text:span></text:p>
      <text:p text:style-name="P3"><text:span text:style-name="T1">Debia abordar a las 9 pm el barco que lo llevaria hasta la ciudad.</text:span></text:p>
      <text:p text:style-name="Text_20_body">Poco antes de las siete, Dahg cerró la puerta de la almoneda y emprendió el camino hacia el muelle del río.</text:p>
      <text:p text:style-name="Text_20_body">Llevaba consigo los documentos para reunirse con el escribano de Cittaprospera y la esperanza de que aquel viaje marcara el comienzo de una etapa mejor para su negocio.</text:p>
      <text:p text:style-name="Text_20_body">Caminaba con paso firme.</text:p>
      <text:p text:style-name="Text_20_body">El aire era agradable.</text:p>
      <text:p text:style-name="Text_20_body">Una suave brisa recorría las calles de Drywind mientras el calor del día comenzaba a disiparse.</text:p>
      <text:p text:style-name="Text_20_body">Sobre las llanuras, algunas nubes oscuras se agrupaban lentamente en el horizonte.</text:p>
      <text:p text:style-name="Text_20_body">Las tiendas de la avenida comercial empezaban a cerrar sus puertas.</text:p>
      <text:p text:style-name="Text_20_body">Y las calles se vaciaban poco a poco.</text:p>
      <text:p text:style-name="Text_20_body">Al llegar al extremo del pueblo, Dahg divisó a Omhp trabajando junto a la cerca de su propiedad.</text:p>
      <text:p text:style-name="Text_20_body">El anciano levantó una mano para saludarlo.</text:p>
      <text:p text:style-name="Text_20_body">Después se acercó al camino.</text:p>
      <text:p text:style-name="Text_20_body">Durante unos minutos conversaron acerca de ciertos problemas que estaban afectando a los cultivos del granjero.</text:p>
      <text:p text:style-name="Text_20_body">Omhp esperaba recibir algunos consejos.</text:p>
      <text:p text:style-name="Text_20_body">Pero Dahg tenía prisa.</text:p>
      <text:p text:style-name="Text_20_body">Le explicó que debía embarcar aquella misma noche y prometió regresar al día siguiente para ayudarlo.</text:p>
      <text:p text:style-name="Text_20_body">Los dos hombres se despidieron cordialmente.</text:p>
      <text:p text:style-name="Text_20_body">Y Dahg continuó caminando.</text:p>
      <text:p text:style-name="Text_20_body"/>
      <text:p text:style-name="Horizontal_20_Line"/>
      <text:p text:style-name="Text_20_body"/>
      <text:h text:style-name="Heading_20_3" text:outline-level="3"><text:soft-page-break/>2. Rumbo al almacén</text:h>
      <text:p text:style-name="Text_20_body"/>
      <text:p text:style-name="Text_20_body">No muy lejos de allí, en el extremo sur de Drywind, la señora Alhat terminaba sus tareas diarias.</text:p>
      <text:p text:style-name="Text_20_body">La anciana recorría lentamente los corrales asegurándose de que todos los animales estuvieran protegidos antes de la llegada de la noche.</text:p>
      <text:p text:style-name="Text_20_body">Las nubes se acumulaban cada vez con más rapidez.</text:p>
      <text:p text:style-name="Text_20_body">Una tormenta parecía estar formándose sobre las llanuras.</text:p>
      <text:p text:style-name="Text_20_body">Y aunque todavía no llovía, el aire tenía ese olor característico que anunciaba cambios en el tiempo.</text:p>
      <text:p text:style-name="Text_20_body">La señora Alhat observó el cielo durante unos instantes.</text:p>
      <text:p text:style-name="Text_20_body">Después continuó trabajando.</text:p>
      <text:p text:style-name="Text_20_body">Vivía sola desde hacía muchos años.</text:p>
      <text:p text:style-name="Text_20_body">Su pequeña granja apenas ocupaba unas pocas hectáreas, pero era suficiente para mantener una vida sencilla y tranquila.</text:p>
      <text:p text:style-name="Text_20_body">Criaba media docena de cabras.</text:p>
      <text:p text:style-name="Text_20_body">Algunos cerdos.</text:p>
      <text:p text:style-name="Text_20_body">Un rebaño de ovejas.</text:p>
      <text:p text:style-name="Text_20_body">Varias gallinas.</text:p>
      <text:p text:style-name="Text_20_body">Y una vieja mula gris que la acompañaba desde hacía tanto tiempo que ya la consideraba una amiga más que un animal de trabajo.</text:p>
      <text:p text:style-name="Text_20_body">Conocía cada rincón de la propiedad.</text:p>
      <text:p text:style-name="Text_20_body">Cada árbol.</text:p>
      <text:p text:style-name="Text_20_body">Cada cerca.</text:p>
      <text:p text:style-name="Text_20_body">Cada sendero.</text:p>
      <text:p text:style-name="Text_20_body">Y aunque el trabajo nunca terminaba realmente, rara vez se quejaba.</text:p>
      <text:p text:style-name="Text_20_body">Era una mujer paciente.</text:p>
      <text:p text:style-name="Text_20_body">Práctica.</text:p>
      <text:p text:style-name="Text_20_body">Acostumbrada a resolver los problemas con esfuerzo y perseverancia.</text:p>
      <text:p text:style-name="Text_20_body">Cuando terminó de revisar los corrales comprobó también que los animales dispusieran de agua suficiente para pasar la noche.</text:p>
      <text:p text:style-name="Text_20_body">Solo entonces recordó el encargo que la esperaba en el almacén del pueblo.</text:p>
      <text:p text:style-name="Text_20_body">Había pedido varios sacos de grano.</text:p>
      <text:p text:style-name="Text_20_body"><text:soft-page-break/>Aceite.</text:p>
      <text:p text:style-name="Text_20_body">Algunas herramientas.</text:p>
      <text:p text:style-name="Text_20_body">Y otras provisiones necesarias para las semanas siguientes.</text:p>
      <text:p text:style-name="Text_20_body">Miró nuevamente hacia el cielo.</text:p>
      <text:p text:style-name="Text_20_body">Aún tenía tiempo.</text:p>
      <text:p text:style-name="Text_20_body">Si se apresuraba podría recogerlo todo antes de que comenzara la tormenta.</text:p>
      <text:p text:style-name="Text_20_body">Preparó la carreta.</text:p>
      <text:p text:style-name="Text_20_body">Enganchó a la mula.</text:p>
      <text:p text:style-name="Text_20_body">Y poco después abandonó la granja.</text:p>
      <text:p text:style-name="Text_20_body">La vieja compañera avanzaba con su habitual paso tranquilo mientras las ruedas crujían suavemente sobre el camino.</text:p>
      <text:p text:style-name="Text_20_body">La señora Alhat sonrió.</text:p>
      <text:p text:style-name="Text_20_body">Aquella noche, según los planes originales, habría estado llevando a Dahg hacia el muelle.</text:p>
      <text:p text:style-name="Text_20_body">Pero el comerciante había decidido caminar.</text:p>
      <text:p text:style-name="Text_20_body">De modo que ahora disponía de tiempo libre.</text:p>
      <text:p text:style-name="Text_20_body">Y había decidido aprovecharlo para recoger las mercancías que necesitaba.</text:p>
      <text:p text:style-name="Text_20_body">Sin prisa.</text:p>
      <text:p text:style-name="Text_20_body">Sin preocupaciones.</text:p>
      <text:p text:style-name="Text_20_body"/>
      <text:p text:style-name="Horizontal_20_Line"/>
      <text:p text:style-name="Standard"/>
      <text:h text:style-name="Heading_20_3" text:outline-level="3">3. El trueno</text:h>
      <text:p text:style-name="Text_20_body"/>
      <text:p text:style-name="Text_20_body">La señora Alhat llegó al almacén poco después.</text:p>
      <text:p text:style-name="Text_20_body">El edificio se encontraba junto a la avenida principal, cerca de la entrada norte de Drywind.</text:p>
      <text:p text:style-name="Text_20_body">Era una de las construcciones más grandes del pueblo.</text:p>
      <text:p text:style-name="Text_20_body">Un enorme edificio de madera levantado muchos años atrás, con aspecto de granero o establo gigante.</text:p>
      <text:p text:style-name="Text_20_body">La planta inferior servía como almacén de mercancías.</text:p>
      <text:p text:style-name="Text_20_body">La superior se utilizaba para guardar excedentes de grano, herramientas y materiales que no se necesitaban con frecuencia.</text:p>
      <text:p text:style-name="Text_20_body"><text:soft-page-break/>Un amplio porche recorría toda la fachada principal.</text:p>
      <text:p text:style-name="Text_20_body">Bajo aquel techo se acumulaban sacos, barriles, cajas y todo tipo de mercancías esperando ser recogidas o distribuidas.</text:p>
      <text:p text:style-name="Text_20_body">A aquella hora todavía había actividad.</text:p>
      <text:p text:style-name="Text_20_body">Algunos granjeros terminaban sus compras.</text:p>
      <text:p text:style-name="Text_20_body">Un par de carreteros discutían precios junto a la entrada.</text:p>
      <text:p text:style-name="Text_20_body">Dos trabajadores descargaban mercancías procedentes de una barcaza llegada esa misma mañana por el río.</text:p>
      <text:p text:style-name="Text_20_body">Y Xenhk, el propietario del almacén, atendía personalmente a los últimos clientes del día.</text:p>
      <text:p text:style-name="Text_20_body">La vida cotidiana de Drywind parecía concentrarse allí.</text:p>
      <text:p text:style-name="Text_20_body">La señora Alhat detuvo la carreta frente al porche.</text:p>
      <text:p text:style-name="Text_20_body">Su pedido ya estaba preparado.</text:p>
      <text:p text:style-name="Text_20_body">Varios sacos de grano.</text:p>
      <text:p text:style-name="Text_20_body">Algunas herramientas.</text:p>
      <text:p text:style-name="Text_20_body">Un pequeño barril de salazón.</text:p>
      <text:p text:style-name="Text_20_body">Y otros suministros que necesitaba para las semanas siguientes.</text:p>
      <text:p text:style-name="Text_20_body">Todo estaba apilado junto a la pared frontal del edificio.</text:p>
      <text:p text:style-name="Text_20_body">Muy cerca de una enorme hilera de vasijas de barro repletas de aceite.</text:p>
      <text:p text:style-name="Text_20_body">Había decenas de ellas.</text:p>
      <text:p text:style-name="Text_20_body">Grandes recipientes sellados con cera y tela encerada.</text:p>
      <text:p text:style-name="Text_20_body">Algunos alcanzaban casi la altura de una persona.</text:p>
      <text:p text:style-name="Text_20_body">Otros estaban apilados unos sobre otros formando verdaderas paredes de cerámica.</text:p>
      <text:p text:style-name="Text_20_body">El aceite era uno de los productos más valiosos que almacenaba Xenhk.</text:p>
      <text:p text:style-name="Text_20_body">Y aquella semana había recibido un cargamento especialmente grande.</text:p>
      <text:p text:style-name="Text_20_body">La señora Alhat intercambió algunas palabras con el comerciante.</text:p>
      <text:p text:style-name="Text_20_body">Hablaron del tiempo.</text:p>
      <text:p text:style-name="Text_20_body">De las cosechas.</text:p>
      <text:p text:style-name="Text_20_body">Y de la tormenta que parecía acercarse desde las llanuras.</text:p>
      <text:p text:style-name="Text_20_body">Después comenzó a cargar lentamente los sacos en la carreta.</text:p>
      <text:p text:style-name="Text_20_body">La vieja mula aguardaba pacientemente.</text:p>
      <text:p text:style-name="Text_20_body"><text:soft-page-break/>Inmóvil.</text:p>
      <text:p text:style-name="Text_20_body">Con la tranquilidad de quien había repetido aquella rutina cientos de veces.</text:p>
      <text:p text:style-name="Text_20_body">Pasaron varios minutos.</text:p>
      <text:p text:style-name="Text_20_body">La carga estaba casi terminada.</text:p>
      <text:p text:style-name="Text_20_body">La señora Alhat levantaba uno de los últimos sacos cuando ocurrió.</text:p>
      <text:p text:style-name="Text_20_body">Un resplandor cegador atravesó el cielo.</text:p>
      <text:p text:style-name="Text_20_body">Tan brillante que durante un instante pareció convertir la tarde en pleno día.</text:p>
      <text:p text:style-name="Text_20_body">Un rayo cayó en algún lugar de los campos cercanos.</text:p>
      <text:p text:style-name="Text_20_body">La descarga golpeó la tierra con una violencia estremecedora.</text:p>
      <text:p text:style-name="Text_20_body">Y un segundo después llegó el trueno.</text:p>
      <text:p text:style-name="Text_20_body">El estruendo fue tan brutal que hizo vibrar las paredes del almacén.</text:p>
      <text:p text:style-name="Text_20_body">Las ventanas temblaron.</text:p>
      <text:p text:style-name="Text_20_body">Las vasijas resonaron unas contra otras.</text:p>
      <text:p text:style-name="Text_20_body">Y muchas personas se sobresaltaron al mismo tiempo.</text:p>
      <text:p text:style-name="Text_20_body">La señora Alhat soltó involuntariamente el saco que llevaba en brazos.</text:p>
      <text:p text:style-name="Text_20_body">La mula dio un salto.</text:p>
      <text:p text:style-name="Text_20_body">Sacudió la cabeza.</text:p>
      <text:p text:style-name="Text_20_body">Y permaneció inmóvil.</text:p>
      <text:p text:style-name="Text_20_body">Con los ojos muy abiertos.</text:p>
      <text:p text:style-name="Text_20_body">La anciana tardó apenas un instante en recuperarse.</text:p>
      <text:p text:style-name="Text_20_body">Entonces soltó una carcajada.</text:p>
      <text:p text:style-name="Text_20_body">—¿Te has asustado? —preguntó acariciando el cuello del animal.</text:p>
      <text:p text:style-name="Text_20_body">La mula resopló.</text:p>
      <text:p text:style-name="Text_20_body">Y aquello la hizo reír todavía más.</text:p>
      <text:p text:style-name="Text_20_body">Fue un momento breve.</text:p>
      <text:p text:style-name="Text_20_body">Una pequeña pausa en una tarde completamente normal.</text:p>
      <text:p text:style-name="Text_20_body">Hasta que algo apareció en la curva del camino.</text:p>
      <text:p text:style-name="Text_20_body">Una carreta.</text:p>
      <text:p text:style-name="Text_20_body">Avanzaba a una velocidad imposible.</text:p>
      <text:p text:style-name="Text_20_body">Fuera de control.</text:p>
      <text:p text:style-name="Horizontal_20_Line"><text:soft-page-break/></text:p>
      <text:h text:style-name="P1" text:outline-level="3">4. Una carreta fuera de control</text:h>
      <text:p text:style-name="P4">La señora Alhat <text:span text:style-name="T2">no</text:span> tuvo tiempo de <text:span text:style-name="T2">reaccionar</text:span>.</text:p>
      <text:p text:style-name="P4">La carreta surgió de la curva como un proyectil.</text:p>
      <text:p text:style-name="P4"><text:span text:style-name="T2">I</text:span>mpactó contra la de la señora Alhat con un estruendo ensordecedor.</text:p>
      <text:p text:style-name="P4">Y todo el conjunto atravesó la fachada del almacén.</text:p>
      <text:p text:style-name="P4">Las dos carretas irrumpieron en el edificio como un ariete.</text:p>
      <text:p text:style-name="P4"><text:span text:style-name="T2">Atravesando las</text:span> vasijas de aceite almacenadas junto a la pared frontal.</text:p>
      <text:p text:style-name="P5">Derramando de un golpe una gran cantidad de aceite.</text:p>
      <text:p text:style-name="P4"/>
      <text:p text:style-name="P4"/>
      <text:p text:style-name="Horizontal_20_Line"/>
      <text:h text:style-name="P2" text:outline-level="3">5. El fuego</text:h>
      <text:p text:style-name="P6"/>
      <text:p text:style-name="P6">Una de las lámparas de aceite que colgaban del techo se desprendió durante el impacto.</text:p>
      <text:p text:style-name="P6">La llama tocó el aceite derramado.</text:p>
      <text:p text:style-name="P6">En pocos segundos el edificio entero estaba ardiendo.</text:p>
      <text:p text:style-name="P6">El calor se volvió insoportable.</text:p>
      <text:p text:style-name="P6"><text:s/>el viejo Omhp <text:span text:style-name="T3">y </text:span>La señora Alhat <text:span text:style-name="T3">quedaron atrapados en el interior en </text:span>Una prisión de madera en llamas.</text:p>
      <text:p text:style-name="P6">El intenso calor alcanzó las vasijas de aceite que habían permanecido intactas<text:span text:style-name="T3"> y provocó una explosión.</text:span></text:p>
      <text:p text:style-name="P6">El incendio duplicó su tamaño en cuestión de segundos.</text:p>
      <text:p text:style-name="P6"><text:span text:style-name="T3">Y </text:span>Las construcciones vecinas comenzaron a arder.</text:p>
      <text:p text:style-name="P6"/>
      <text:p text:style-name="P6"><text:span text:style-name="T3">No muy </text:span>Lejos de allí, junto a<text:span text:style-name="T3"> </text:span>l<text:span text:style-name="T3">a curva del</text:span> camino que conducía al muelle, Dahg observaba<text:span text:style-name="T3"> con horror</text:span> la escena desde el suelo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6T17:23:00.705000000</meta:creation-date>
    <dc:date>2026-07-06T19:04:19.412000000</dc:date>
    <meta:editing-duration>PT1H41M17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48" meta:word-count="1250" meta:character-count="7624" meta:non-whitespace-character-count="6521"/>
  </office:meta>
</office:document-meta>
</file>