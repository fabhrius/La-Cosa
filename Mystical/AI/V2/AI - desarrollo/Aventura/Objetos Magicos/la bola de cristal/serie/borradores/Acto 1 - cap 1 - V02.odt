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af78"/>
    </style:style>
    <style:style style:name="P2" style:family="paragraph" style:parent-style-name="Text_20_body">
      <style:text-properties officeooo:rsid="0006ed89" officeooo:paragraph-rsid="0006ed89"/>
    </style:style>
    <style:style style:name="P3" style:family="paragraph" style:parent-style-name="Text_20_body">
      <style:text-properties officeooo:paragraph-rsid="000a86c8"/>
    </style:style>
    <style:style style:name="P4" style:family="paragraph" style:parent-style-name="Text_20_body">
      <style:text-properties officeooo:rsid="000b5d65" officeooo:paragraph-rsid="000b5d65"/>
    </style:style>
    <style:style style:name="P5" style:family="paragraph" style:parent-style-name="Text_20_body">
      <style:text-properties officeooo:paragraph-rsid="000ed7c7"/>
    </style:style>
    <style:style style:name="P6" style:family="paragraph" style:parent-style-name="Text_20_body">
      <style:text-properties officeooo:rsid="000b5d65" officeooo:paragraph-rsid="000b5d65"/>
    </style:style>
    <style:style style:name="P7" style:family="paragraph" style:parent-style-name="Text_20_body">
      <style:text-properties officeooo:paragraph-rsid="00109865"/>
    </style:style>
    <style:style style:name="P8" style:family="paragraph" style:parent-style-name="Text_20_body">
      <style:text-properties officeooo:paragraph-rsid="00126292"/>
    </style:style>
    <style:style style:name="T1" style:family="text">
      <style:text-properties officeooo:rsid="0006af78"/>
    </style:style>
    <style:style style:name="T2" style:family="text">
      <style:text-properties officeooo:rsid="0006ed89"/>
    </style:style>
    <style:style style:name="T3" style:family="text">
      <style:text-properties officeooo:rsid="00085a05"/>
    </style:style>
    <style:style style:name="T4" style:family="text">
      <style:text-properties officeooo:rsid="000968f4"/>
    </style:style>
    <style:style style:name="T5" style:family="text">
      <style:text-properties officeooo:rsid="000a86c8"/>
    </style:style>
    <style:style style:name="T6" style:family="text">
      <style:text-properties officeooo:rsid="000d0815"/>
    </style:style>
    <style:style style:name="T7" style:family="text">
      <style:text-properties officeooo:rsid="000ed7c7"/>
    </style:style>
    <style:style style:name="T8" style:family="text">
      <style:text-properties officeooo:rsid="001098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h text:style-name="Heading_20_3" text:outline-level="3">Capítulo 1: La Almoneda de Maese Dahg</text:h>
      <text:p text:style-name="Text_20_body"/>
      <text:h text:style-name="Heading_20_4" text:outline-level="4">Parte 1 - La Almoneda de Maese Dahg</text:h>
      <text:p text:style-name="Text_20_body"/>
      <text:p text:style-name="P8"><text:span text:style-name="T8">En un pequeño pueblo llamado Drywind existió una vez una almoneda llamada, "La Almoneda de Maese Dahg".</text:span></text:p>
      <text:p text:style-name="P7">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En el exterior se exhibían herramientas usadas, cofres desgastados y toda clase de objetos corrientes rescatados del olvido.</text:p>
      <text:p text:style-name="P1">El interior era un vasto salón donde la luz del sol apenas lograba abrirse paso <text:span text:style-name="T1">por</text:span> las estrechas ventanas cubiertas de polvo<text:span text:style-name="T1">, dejando en penumbra su mayor parte</text:span>. Las llamas vacilantes de <text:span text:style-name="T1">algunas</text:span> velas <text:span text:style-name="T1">y lámparas de aceite le conferian un aspecto misterioso, </text:span>proyecta<text:span text:style-name="T1">ndo</text:span> sombras <text:span text:style-name="T1">inquietantes</text:span> sobre las paredes<text:span text:style-name="T1">.</text:span> <text:span text:style-name="T1">Haciendo</text:span> que los objetos parecieran moverse cuando <text:span text:style-name="T2">no eran observados</text:span>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P2">Cada objeto parecía encerrar una historia. </text:p>
      <text:p text:style-name="P2">Recuerdos, desgracias, secretos, atrapados en la memoria de un testigo silencioso.</text:p>
      <text:p text:style-name="Text_20_body">Tal vez fueran simples supersticiones.</text:p>
      <text:p text:style-name="Text_20_body">O tal vez no.</text:p>
      <text:p text:style-name="Text_20_body">Lo cierto es que la mayoría de los habitantes de Drywind evitaban permanecer demasiado tiempo dentro de <text:span text:style-name="T2">aquella</text:span> tienda.</text:p>
      <text:p text:style-name="P3"><text:span text:style-name="T4">Muchos de ellos realmente creían que</text:span> los objetos que se acumulaban en la almoneda eran<text:span text:style-name="T5">... </text:span><text:span text:style-name="T3">algo mas</text:span><text:span text:style-name="T5">,</text:span></text:p>
      <text:p text:style-name="P3"><text:span text:style-name="T3">que solo</text:span> cosas viejas.</text:p>
      <text:p text:style-name="Text_20_body"/>
      <text:p text:style-name="Standard"/>
      <text:p text:style-name="Standard"><text:soft-page-break/></text:p>
      <text:p text:style-name="Horizontal_20_Line"/>
      <text:p text:style-name="Text_20_body"/>
      <text:h text:style-name="Heading_20_4" text:outline-level="4">Parte 2 - Dahg el tendero</text:h>
      <text:p text:style-name="Text_20_body"/>
      <text:p text:style-name="P4">El propietario de la tienda era un hombre de cincuenta <text:s/>años llamado Dahg.</text:p>
      <text:p text:style-name="P4">Vivía justo sobre la tienda, en la planta superior.</text:p>
      <text:p text:style-name="P4">Solo.</text:p>
      <text:p text:style-name="Text_20_body">No tenía esposa ni hijos,<text:span text:style-name="T6"> ni otra familia,</text:span>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text:soft-page-break/>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P5">Sus verdaderos clientes vivían en <text:span text:style-name="T7">Próspera, la ciudad vecina</text:span>.</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text:soft-page-break/>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P5">La operación se encontraba ya en manos de un escribano de <text:span text:style-name="T7">P</text:span>róspera.</text:p>
      <text:p text:style-name="Text_20_body">Todo parecía avanzar según lo previsto.</text:p>
      <text:p text:style-name="Text_20_body">Los documentos estaban preparados.<text:span text:style-name="T7"> </text:span>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text:soft-page-break/>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16T18:08:03.691000000</dc:date>
    <meta:editing-duration>PT44M51S</meta:editing-duration>
    <meta:editing-cycles>10</meta:editing-cycles>
    <meta:generator>LibreOffice/7.3.5.2$Windows_X86_64 LibreOffice_project/184fe81b8c8c30d8b5082578aee2fed2ea847c01</meta:generator>
    <meta:document-statistic meta:table-count="0" meta:image-count="0" meta:object-count="0" meta:page-count="5" meta:paragraph-count="86" meta:word-count="1244" meta:character-count="7852" meta:non-whitespace-character-count="6692"/>
  </office:meta>
</office:document-meta>
</file>