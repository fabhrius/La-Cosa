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af78"/>
    </style:style>
    <style:style style:name="P2" style:family="paragraph" style:parent-style-name="Text_20_body">
      <style:text-properties officeooo:rsid="0006ed89" officeooo:paragraph-rsid="0006ed89"/>
    </style:style>
    <style:style style:name="P3" style:family="paragraph" style:parent-style-name="Text_20_body">
      <style:text-properties officeooo:paragraph-rsid="0006ed89"/>
    </style:style>
    <style:style style:name="T1" style:family="text">
      <style:text-properties officeooo:rsid="0006af78"/>
    </style:style>
    <style:style style:name="T2" style:family="text">
      <style:text-properties officeooo:rsid="0006ed89"/>
    </style:style>
    <style:style style:name="T3" style:family="text">
      <style:text-properties officeooo:rsid="00085a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h text:style-name="Heading_20_3" text:outline-level="3">Capítulo 1: La Almoneda de Maese Dahg</text:h>
      <text:p text:style-name="Text_20_body"/>
      <text:h text:style-name="Heading_20_4" text:outline-level="4">Parte 1 - La Almoneda de Maese Dahg</text:h>
      <text:p text:style-name="Text_20_body"/>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En el exterior se exhibían herramientas usadas, cofres desgastados y toda clase de objetos corrientes rescatados del olvido.</text:p>
      <text:p text:style-name="P1">El interior era un vasto salón donde la luz del sol apenas lograba abrirse paso <text:span text:style-name="T1">por</text:span> las estrechas ventanas cubiertas de polvo<text:span text:style-name="T1">, dejando en penumbra su mayor parte</text:span>. Las llamas vacilantes de <text:span text:style-name="T1">algunas</text:span> velas <text:span text:style-name="T1">y lámparas de aceite le conferian un aspecto misterioso, </text:span>proyecta<text:span text:style-name="T1">ndo</text:span> sombras <text:span text:style-name="T1">inquietantes</text:span> sobre las paredes<text:span text:style-name="T1">.</text:span> <text:span text:style-name="T1">Haciendo</text:span> que los objetos parecieran moverse cuando <text:span text:style-name="T2">no eran observados</text:span>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P2">Cada objeto parecía encerrar una historia. </text:p>
      <text:p text:style-name="P3"><text:span text:style-name="T2">Recuerdos, desgracias, secretos, atrapados en la memoria de un testigo silencioso.</text:span></text:p>
      <text:p text:style-name="Text_20_body">Tal vez fueran simples supersticiones.</text:p>
      <text:p text:style-name="Text_20_body">O tal vez no.</text:p>
      <text:p text:style-name="Text_20_body">Lo cierto es que la mayoría de los habitantes de Drywind evitaban permanecer demasiado tiempo dentro de <text:span text:style-name="T2">aquella</text:span> tienda.</text:p>
      <text:p text:style-name="Text_20_body"><text:span text:style-name="T3">Como si</text:span> los objetos que se acumulaban en la almoneda <text:span text:style-name="T3">fu</text:span>eran <text:span text:style-name="T3">algo mas que solo</text:span> cosas viejas.</text:p>
      <text:p text:style-name="Standard"/>
      <text:p text:style-name="Standard"/>
      <text:p text:style-name="Horizontal_20_Line"/>
      <text:p text:style-name="Text_20_body"/>
      <text:h text:style-name="Heading_20_4" text:outline-level="4"><text:soft-page-break/>Parte 2 - Dahg el tendero</text:h>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text:soft-page-break/>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text:soft-page-break/>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text:soft-page-break/>Cuando llegó frente al mostrador observó a Dahg durante unos segundos.</text:p>
      <text:p text:style-name="Text_20_body">Luego apoyó cuidadosamente el paquete sobre la madera y dijo:</text:p>
      <text:p text:style-name="Text_20_body">—Tengo algo que podría interesarl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14T16:15:15.854000000</dc:date>
    <meta:editing-duration>PT24M44S</meta:editing-duration>
    <meta:editing-cycles>4</meta:editing-cycles>
    <meta:generator>LibreOffice/7.3.5.2$Windows_X86_64 LibreOffice_project/184fe81b8c8c30d8b5082578aee2fed2ea847c01</meta:generator>
    <meta:document-statistic meta:table-count="0" meta:image-count="0" meta:object-count="0" meta:page-count="5" meta:paragraph-count="86" meta:word-count="1243" meta:character-count="7860" meta:non-whitespace-character-count="6702"/>
  </office:meta>
</office:document-meta>
</file>