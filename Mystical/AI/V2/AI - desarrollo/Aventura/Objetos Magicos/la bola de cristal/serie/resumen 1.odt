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reo que el argumento ya tiene una estructura muy sólida. Lo que haría ahora es organizarlo en una forma más limpia, identificando la función narrativa de cada capítulo y el mensaje que aporta al conjunto.</text:p>
      <text:p text:style-name="Horizontal_20_Line"/>
      <text:h text:style-name="Heading_20_1" text:outline-level="1">La Bola de Cristal</text:h>
      <text:h text:style-name="Heading_20_2" text:outline-level="2">Resumen general</text:h>
      <text:p text:style-name="Text_20_body">Dahg, un comerciante de objetos usados del pueblo de Drywind, adquiere una antigua esfera de cristal que aparentemente fue diseñada como lente de lectura.</text:p>
      <text:p text:style-name="Text_20_body">Esa misma noche descubre que el objeto muestra fragmentos del futuro.</text:p>
      <text:p text:style-name="Text_20_body">La primera visión le muestra un pequeño contratiempo: perder un barco y una importante oportunidad de negocio.</text:p>
      <text:p text:style-name="Text_20_body">Convencido de que puede evitarlo, modifica sus planes.</text:p>
      <text:p text:style-name="Text_20_body">Sin embargo, sus acciones desencadenan una cadena de acontecimientos imprevistos que terminan provocando un incendio devastador, la muerte de varias personas cercanas y la destrucción de parte del pueblo.</text:p>
      <text:p text:style-name="Text_20_body">Después de comprender el coste de alterar el futuro, la esfera le muestra una segunda visión.</text:p>
      <text:p text:style-name="Text_20_body">En ella observa cómo perderá su valiosa carreta si ayuda a un desconocido en un puente a punto de derrumbarse.</text:p>
      <text:p text:style-name="Text_20_body">Aterrado por la posibilidad de volver a intervenir en el destino, decide vender la esfera.</text:p>
      <text:p text:style-name="Text_20_body">Cuando finalmente llega el día de la visión, se encuentra exactamente ante la situación anunciada.</text:p>
      <text:p text:style-name="Text_20_body">Un desconocido le pide ayuda.</text:p>
      <text:p text:style-name="Text_20_body">Dahg sabe lo que perderá si interviene.</text:p>
      <text:p text:style-name="Text_20_body">Pero también sabe lo que ocurrió la última vez que intentó cambiar el futuro.</text:p>
      <text:p text:style-name="Text_20_body">La historia termina antes de que tome una decisión.</text:p>
      <text:p text:style-name="Horizontal_20_Line"/>
      <text:h text:style-name="Heading_20_1" text:outline-level="1"><text:soft-page-break/>Acto I - La advertencia</text:h>
      <text:h text:style-name="Heading_20_2" text:outline-level="2">Capítulo 1 - El comerciante de Drywind</text:h>
      <text:h text:style-name="Heading_20_3" text:outline-level="3">Objetivo</text:h>
      <text:p text:style-name="Text_20_body">Presentar a Dahg y su vida cotidiana.</text:p>
      <text:h text:style-name="Heading_20_3" text:outline-level="3">Resumen</text:h>
      <text:p text:style-name="Text_20_body">Dahg dirige una pequeña tienda de compra y venta de objetos usados en Drywind.</text:p>
      <text:p text:style-name="Text_20_body">Es trabajador, prudente y aprecia las oportunidades de negocio.</text:p>
      <text:p text:style-name="Text_20_body">Posee una carreta nueva adquirida con los ahorros de toda una vida.</text:p>
      <text:p text:style-name="Text_20_body">Mantiene buenas relaciones con los vecinos del pueblo:</text:p>
      <text:list xml:id="list1518594134" text:style-name="L1">
        <text:list-item>
          <text:p text:style-name="P1">Omhp</text:p>
        </text:list-item>
        <text:list-item>
          <text:p text:style-name="P1">la señora Alhat</text:p>
        </text:list-item>
        <text:list-item>
          <text:p text:style-name="P1">Penht</text:p>
        </text:list-item>
      </text:list>
      <text:p text:style-name="Text_20_body">Estos personajes serán importantes más adelante.</text:p>
      <text:p text:style-name="Horizontal_20_Line"/>
      <text:h text:style-name="Heading_20_2" text:outline-level="2">Capítulo 2 - La esfera de cristal</text:h>
      <text:h text:style-name="Heading_20_3" text:outline-level="3">Objetivo</text:h>
      <text:p text:style-name="Text_20_body">Introducir el objeto maldito.</text:p>
      <text:h text:style-name="Heading_20_3" text:outline-level="3">Resumen</text:h>
      <text:p text:style-name="Text_20_body">Una misteriosa mujer llegada de Cittaprospera vende una extraña lente de lectura de cristal de roca.</text:p>
      <text:p text:style-name="Text_20_body">La ofrece por un precio ridículamente bajo.</text:p>
      <text:p text:style-name="Text_20_body">Parece ansiosa por deshacerse de ella.</text:p>
      <text:p text:style-name="Text_20_body">Dahg la compra inmediatamente.</text:p>
      <text:p text:style-name="Horizontal_20_Line"/>
      <text:h text:style-name="Heading_20_2" text:outline-level="2">Capítulo 3 - La primera visión</text:h>
      <text:h text:style-name="Heading_20_3" text:outline-level="3">Objetivo</text:h>
      <text:p text:style-name="Text_20_body">Descubrir el poder de la esfera.</text:p>
      <text:h text:style-name="Heading_20_3" text:outline-level="3"><text:soft-page-break/>Resumen</text:h>
      <text:p text:style-name="Text_20_body">Mientras examina el objeto durante la noche, la esfera se llena de niebla blanca.</text:p>
      <text:p text:style-name="Text_20_body">A continuación muestra imágenes del futuro.</text:p>
      <text:p text:style-name="Text_20_body">Dahg observa una secuencia completa de acontecimientos:</text:p>
      <text:list xml:id="list376780148" text:style-name="L2">
        <text:list-item>
          <text:p text:style-name="P2">viaje hacia el muelle</text:p>
        </text:list-item>
        <text:list-item>
          <text:p text:style-name="P2">retrasos inesperados</text:p>
        </text:list-item>
        <text:list-item>
          <text:p text:style-name="P2">conversación con Omhp</text:p>
        </text:list-item>
        <text:list-item>
          <text:p text:style-name="P2">problemas con la mula de Alhat</text:p>
        </text:list-item>
        <text:list-item>
          <text:p text:style-name="P2">encuentro con Penht</text:p>
        </text:list-item>
        <text:list-item>
          <text:p text:style-name="P2">pérdida del barco</text:p>
        </text:list-item>
      </text:list>
      <text:p text:style-name="Text_20_body">Comprende que la esfera le está mostrando el día siguiente.</text:p>
      <text:p text:style-name="Horizontal_20_Line"/>
      <text:h text:style-name="Heading_20_2" text:outline-level="2">Capítulo 4 - El error que debe evitar</text:h>
      <text:h text:style-name="Heading_20_3" text:outline-level="3">Objetivo</text:h>
      <text:p text:style-name="Text_20_body">Crear la tentación.</text:p>
      <text:h text:style-name="Heading_20_3" text:outline-level="3">Resumen</text:h>
      <text:p text:style-name="Text_20_body">Dahg calcula las consecuencias de perder el barco.</text:p>
      <text:p text:style-name="Text_20_body">Perderá dinero.</text:p>
      <text:p text:style-name="Text_20_body">La firma de una importante venta se retrasará.</text:p>
      <text:p text:style-name="Text_20_body">Toda su planificación se verá afectada.</text:p>
      <text:p text:style-name="Text_20_body">Decide cambiar el futuro.</text:p>
      <text:p text:style-name="Horizontal_20_Line"/>
      <text:h text:style-name="Heading_20_1" text:outline-level="1">Acto II - La intervención</text:h>
      <text:h text:style-name="Heading_20_2" text:outline-level="2">Capítulo 5 - El cambio</text:h>
      <text:h text:style-name="Heading_20_3" text:outline-level="3">Objetivo</text:h>
      <text:p text:style-name="Text_20_body">Mostrar la primera desviación.</text:p>
      <text:h text:style-name="Heading_20_3" text:outline-level="3"><text:soft-page-break/>Resumen</text:h>
      <text:p text:style-name="Text_20_body">Dahg modifica deliberadamente su itinerario.</text:p>
      <text:p text:style-name="Text_20_body">Evita los retrasos mostrados por la esfera.</text:p>
      <text:p text:style-name="Text_20_body">Está convencido de que llegará a tiempo.</text:p>
      <text:p text:style-name="Horizontal_20_Line"/>
      <text:h text:style-name="Heading_20_2" text:outline-level="2">Capítulo 6 - El trueno</text:h>
      <text:h text:style-name="Heading_20_3" text:outline-level="3">Objetivo</text:h>
      <text:p text:style-name="Text_20_body">Mostrar que las consecuencias empiezan a divergir.</text:p>
      <text:h text:style-name="Heading_20_3" text:outline-level="3">Resumen</text:h>
      <text:p text:style-name="Text_20_body">Una tormenta repentina altera el comportamiento del caballo de Omhp.</text:p>
      <text:p text:style-name="Text_20_body">La carreta queda fuera de control.</text:p>
      <text:p text:style-name="Text_20_body">Dahg es atropellado.</text:p>
      <text:p text:style-name="Text_20_body">El accidente desencadena una serie de sucesos que no aparecían en la visión original.</text:p>
      <text:p text:style-name="Horizontal_20_Line"/>
      <text:h text:style-name="Heading_20_2" text:outline-level="2">Capítulo 7 - El incendio</text:h>
      <text:h text:style-name="Heading_20_3" text:outline-level="3">Objetivo</text:h>
      <text:p text:style-name="Text_20_body">Mostrar la catástrofe.</text:p>
      <text:h text:style-name="Heading_20_3" text:outline-level="3">Resumen</text:h>
      <text:p text:style-name="Text_20_body">La carreta desbocada provoca un accidente en el almacén.</text:p>
      <text:p text:style-name="Text_20_body">El aceite almacenado se incendia.</text:p>
      <text:p text:style-name="Text_20_body">Las llamas se extienden por Drywind.</text:p>
      <text:p text:style-name="Text_20_body">El pueblo entero queda atrapado en el desastre.</text:p>
      <text:p text:style-name="Horizontal_20_Line"/>
      <text:h text:style-name="Heading_20_2" text:outline-level="2">Capítulo 8 - Las pérdidas</text:h>
      <text:h text:style-name="Heading_20_3" text:outline-level="3">Objetivo</text:h>
      <text:p text:style-name="Text_20_body">Mostrar el precio de alterar el futuro.</text:p>
      <text:h text:style-name="Heading_20_3" text:outline-level="3"><text:soft-page-break/>Resumen</text:h>
      <text:p text:style-name="Text_20_body">Durante el incendio mueren:</text:p>
      <text:list xml:id="list1823835606" text:style-name="L3">
        <text:list-item>
          <text:p text:style-name="P3">Omhp</text:p>
        </text:list-item>
        <text:list-item>
          <text:p text:style-name="P3">la señora Alhat</text:p>
        </text:list-item>
        <text:list-item>
          <text:p text:style-name="P3">Penht</text:p>
        </text:list-item>
      </text:list>
      <text:p text:style-name="Text_20_body">Además, varias viviendas son destruidas.</text:p>
      <text:p text:style-name="Text_20_body">Dahg también pierde el barco.</text:p>
      <text:p text:style-name="Text_20_body">Exactamente aquello que había intentado evitar.</text:p>
      <text:p text:style-name="Horizontal_20_Line"/>
      <text:h text:style-name="Heading_20_1" text:outline-level="1">Acto III - La segunda visión</text:h>
      <text:h text:style-name="Heading_20_2" text:outline-level="2">Capítulo 9 - El día después</text:h>
      <text:h text:style-name="Heading_20_3" text:outline-level="3">Objetivo</text:h>
      <text:p text:style-name="Text_20_body">Mostrar las consecuencias emocionales.</text:p>
      <text:h text:style-name="Heading_20_3" text:outline-level="3">Resumen</text:h>
      <text:p text:style-name="Text_20_body">Dahg contempla las ruinas del pueblo.</text:p>
      <text:p text:style-name="Text_20_body">Comprende que sus acciones podrían haber contribuido a la tragedia.</text:p>
      <text:p text:style-name="Text_20_body">Empieza a cuestionarse la naturaleza de la esfera.</text:p>
      <text:p text:style-name="Horizontal_20_Line"/>
      <text:h text:style-name="Heading_20_2" text:outline-level="2">Capítulo 10 - La segunda advertencia</text:h>
      <text:h text:style-name="Heading_20_3" text:outline-level="3">Objetivo</text:h>
      <text:p text:style-name="Text_20_body">Plantear el dilema final.</text:p>
      <text:h text:style-name="Heading_20_3" text:outline-level="3">Resumen</text:h>
      <text:p text:style-name="Text_20_body">La esfera vuelve a activarse.</text:p>
      <text:p text:style-name="Text_20_body">Muestra una nueva escena.</text:p>
      <text:p text:style-name="Text_20_body">Un puente de madera a punto de colapsar.</text:p>
      <text:p text:style-name="Text_20_body">Un desconocido.</text:p>
      <text:p text:style-name="Text_20_body"><text:soft-page-break/>Una carreta atrapada.</text:p>
      <text:p text:style-name="Text_20_body">Dahg ayuda.</text:p>
      <text:p text:style-name="Text_20_body">La carreta del desconocido se salva.</text:p>
      <text:p text:style-name="Text_20_body">La suya cae al río.</text:p>
      <text:p text:style-name="Horizontal_20_Line"/>
      <text:h text:style-name="Heading_20_2" text:outline-level="2">Capítulo 11 - Las pesadillas</text:h>
      <text:h text:style-name="Heading_20_3" text:outline-level="3">Objetivo</text:h>
      <text:p text:style-name="Text_20_body">Mostrar la transformación psicológica.</text:p>
      <text:h text:style-name="Heading_20_3" text:outline-level="3">Resumen</text:h>
      <text:p text:style-name="Text_20_body">Dahg ya no piensa en salvarse.</text:p>
      <text:p text:style-name="Text_20_body">Piensa en las consecuencias.</text:p>
      <text:p text:style-name="Text_20_body">La visión le provoca terror.</text:p>
      <text:p text:style-name="Text_20_body">Pasa la noche imaginando futuros cada vez peores.</text:p>
      <text:p text:style-name="Horizontal_20_Line"/>
      <text:h text:style-name="Heading_20_2" text:outline-level="2">Capítulo 12 - Deshacerse del futuro</text:h>
      <text:h text:style-name="Heading_20_3" text:outline-level="3">Objetivo</text:h>
      <text:p text:style-name="Text_20_body">Romper la relación con la esfera.</text:p>
      <text:h text:style-name="Heading_20_3" text:outline-level="3">Resumen</text:h>
      <text:p text:style-name="Text_20_body">Decide venderla.</text:p>
      <text:p text:style-name="Text_20_body">Un escribano viajero la compra.</text:p>
      <text:p text:style-name="Text_20_body">Dahg siente culpa al entregarla.</text:p>
      <text:p text:style-name="Text_20_body">Ahora otro será el dueño de la maldición.</text:p>
      <text:p text:style-name="Horizontal_20_Line"/>
      <text:h text:style-name="Heading_20_1" text:outline-level="1"><text:soft-page-break/>Acto IV - El puente</text:h>
      <text:h text:style-name="Heading_20_2" text:outline-level="2">Capítulo 13 - La decisión</text:h>
      <text:h text:style-name="Heading_20_3" text:outline-level="3">Objetivo</text:h>
      <text:p text:style-name="Text_20_body">Cerrar el ciclo.</text:p>
      <text:h text:style-name="Heading_20_3" text:outline-level="3">Resumen</text:h>
      <text:p text:style-name="Text_20_body">Llega el día de la segunda visión.</text:p>
      <text:p text:style-name="Text_20_body">Dahg reconoce el lugar.</text:p>
      <text:p text:style-name="Text_20_body">Reconoce el puente.</text:p>
      <text:p text:style-name="Text_20_body">Reconoce la carreta atrapada.</text:p>
      <text:p text:style-name="Text_20_body">Reconoce al desconocido.</text:p>
      <text:p text:style-name="Text_20_body">Todo ocurre exactamente como había visto.</text:p>
      <text:p text:style-name="Text_20_body">El hombre grita:</text:p>
      <text:p text:style-name="Quotations">—¡Por favor! ¡Ayúdame!</text:p>
      <text:p text:style-name="Text_20_body">Dahg sabe que perderá su carreta si interviene.</text:p>
      <text:p text:style-name="Text_20_body">También sabe lo que ocurrió cuando intentó cambiar el futuro.</text:p>
      <text:p text:style-name="Text_20_body">La carreta atrapada se inclina peligrosamente.</text:p>
      <text:p text:style-name="Text_20_body">El hombre vuelve a gritar:</text:p>
      <text:p text:style-name="Quotations">—¿Qué vas a hacer?</text:p>
      <text:p text:style-name="Text_20_body">Dahg mira su propia carreta.</text:p>
      <text:p text:style-name="Text_20_body">Después mira al hombre.</text:p>
      <text:p text:style-name="Text_20_body">Y la historia termina.</text:p>
      <text:p text:style-name="Horizontal_20_Line"/>
      <text:h text:style-name="Heading_20_1" text:outline-level="1">Tema central</text:h>
      <text:p text:style-name="Text_20_body">El cuento explora una idea muy cercana a la teoría de sistemas y a la optimización:</text:p>
      <text:p text:style-name="Quotations">Las personas juzgan los acontecimientos por las consecuencias que pueden ver, pero desconocen todas aquellas que permanecen ocultas.</text:p>
      <text:p text:style-name="Text_20_body">La esfera no muestra tragedias.</text:p>
      <text:p text:style-name="Text_20_body"><text:soft-page-break/>Muestra pequeñas pérdidas.</text:p>
      <text:p text:style-name="Text_20_body">Lo que convierte la esfera en una maldición es que ofrece suficiente información para tentar a su dueño a intervenir, pero nunca suficiente para comprender el sistema completo.</text:p>
      <text:p text:style-name="Text_20_body">Por eso la pregunta final no es realmente para Dahg.</text:p>
      <text:p text:style-name="Text_20_body">Es para el lector:</text:p>
      <text:p text:style-name="Quotations">Si supieras que una pequeña pérdida podría evitar una catástrofe invisible, ¿aceptarías perderla? ¿O intentarías cambiar el destino una vez más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4T17:26:44.309000000</meta:creation-date>
    <dc:date>2026-07-04T19:23:59.012000000</dc:date>
    <meta:editing-duration>PT1H47M4S</meta:editing-duration>
    <meta:editing-cycles>1</meta:editing-cycles>
    <meta:document-statistic meta:table-count="0" meta:image-count="0" meta:object-count="0" meta:page-count="8" meta:paragraph-count="161" meta:word-count="994" meta:character-count="6025" meta:non-whitespace-character-count="5204"/>
    <meta:generator>LibreOffice/7.3.5.2$Windows_X86_64 LibreOffice_project/184fe81b8c8c30d8b5082578aee2fed2ea847c01</meta:generator>
  </office:meta>
</office:document-meta>
</file>