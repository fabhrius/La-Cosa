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d0341" officeooo:paragraph-rsid="001d0341"/>
    </style:style>
    <style:style style:name="P2" style:family="paragraph" style:parent-style-name="Text_20_body">
      <style:text-properties officeooo:paragraph-rsid="001d0341"/>
    </style:style>
    <style:style style:name="P3" style:family="paragraph" style:parent-style-name="Text_20_body">
      <style:text-properties officeooo:rsid="001dad28" officeooo:paragraph-rsid="001dad28"/>
    </style:style>
    <style:style style:name="P4" style:family="paragraph" style:parent-style-name="Heading_20_3">
      <style:text-properties officeooo:paragraph-rsid="001f5d30"/>
    </style:style>
    <style:style style:name="P5" style:family="paragraph" style:parent-style-name="Text_20_body">
      <style:text-properties officeooo:paragraph-rsid="001f5d30"/>
    </style:style>
    <style:style style:name="P6" style:family="paragraph" style:parent-style-name="Text_20_body">
      <style:text-properties officeooo:paragraph-rsid="001f6972"/>
    </style:style>
    <style:style style:name="P7" style:family="paragraph" style:parent-style-name="Heading_20_3">
      <style:text-properties officeooo:paragraph-rsid="002273fd"/>
    </style:style>
    <style:style style:name="P8" style:family="paragraph" style:parent-style-name="Horizontal_20_Line">
      <style:text-properties officeooo:paragraph-rsid="002273fd"/>
    </style:style>
    <style:style style:name="P9" style:family="paragraph" style:parent-style-name="Text_20_body">
      <style:text-properties officeooo:paragraph-rsid="002273fd"/>
    </style:style>
    <style:style style:name="P10" style:family="paragraph" style:parent-style-name="Text_20_body">
      <style:text-properties officeooo:rsid="001f5d30" officeooo:paragraph-rsid="001f5d30"/>
    </style:style>
    <style:style style:name="P11" style:family="paragraph" style:parent-style-name="Heading_20_3">
      <style:text-properties officeooo:rsid="001f5d30" officeooo:paragraph-rsid="001f5d30"/>
    </style:style>
    <style:style style:name="P12" style:family="paragraph" style:parent-style-name="Heading_20_3">
      <style:text-properties officeooo:rsid="001f5d30" officeooo:paragraph-rsid="001f6972"/>
    </style:style>
    <style:style style:name="P13" style:family="paragraph" style:parent-style-name="Heading_20_3">
      <style:text-properties officeooo:paragraph-rsid="0023c1f0"/>
    </style:style>
    <style:style style:name="P14" style:family="paragraph" style:parent-style-name="Text_20_body">
      <style:text-properties officeooo:paragraph-rsid="0023c1f0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251e82"/>
    </style:style>
    <style:style style:name="P17" style:family="paragraph" style:parent-style-name="Text_20_body">
      <style:text-properties officeooo:paragraph-rsid="0026358c"/>
    </style:style>
    <style:style style:name="P18" style:family="paragraph" style:parent-style-name="Text_20_body">
      <style:text-properties officeooo:paragraph-rsid="0029560b"/>
    </style:style>
    <style:style style:name="P19" style:family="paragraph" style:parent-style-name="Text_20_body">
      <style:text-properties officeooo:rsid="002c7544" officeooo:paragraph-rsid="002c7544"/>
    </style:style>
    <style:style style:name="P20" style:family="paragraph" style:parent-style-name="Text_20_body">
      <style:text-properties officeooo:rsid="0029560b" officeooo:paragraph-rsid="0029560b"/>
    </style:style>
    <style:style style:name="T1" style:family="text">
      <style:text-properties officeooo:rsid="001d0341"/>
    </style:style>
    <style:style style:name="T2" style:family="text">
      <style:text-properties officeooo:rsid="001f5d30"/>
    </style:style>
    <style:style style:name="T3" style:family="text">
      <style:text-properties officeooo:rsid="002273fd"/>
    </style:style>
    <style:style style:name="T4" style:family="text">
      <style:text-properties officeooo:rsid="00251e82"/>
    </style:style>
    <style:style style:name="T5" style:family="text">
      <style:text-properties officeooo:rsid="0026358c"/>
    </style:style>
    <style:style style:name="T6" style:family="text">
      <style:text-properties officeooo:rsid="0029560b"/>
    </style:style>
    <style:style style:name="T7" style:family="text">
      <style:text-properties officeooo:rsid="002b4a36"/>
    </style:style>
    <style:style style:name="T8" style:family="text">
      <style:text-properties officeooo:rsid="002c7544"/>
    </style:style>
    <style:style style:name="T9" style:family="text">
      <style:text-properties officeooo:rsid="002d82d6"/>
    </style:style>
    <style:style style:name="T10" style:family="text">
      <style:text-properties officeooo:rsid="002ec8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cto 3</text:h>
      <text:p text:style-name="Text_20_body"/>
      <text:p text:style-name="P16">"Algunas veces, algo que parece un problema, </text:p>
      <text:p text:style-name="P16">es en realidad la solución de otro problema que aún no hemos visto."</text:p>
      <text:p text:style-name="P15"><text:span text:style-name="T4"><text:tab/><text:tab/><text:tab/><text:tab/><text:tab/><text:tab/><text:tab/><text:tab/><text:tab/></text:span>— Fabhrius</text:p>
      <text:p text:style-name="Text_20_body"/>
      <text:p text:style-name="Horizontal_20_Line"/>
      <text:h text:style-name="P4" text:outline-level="3">Capítulo 1 - <text:span text:style-name="T10">Lo Oculto.</text:span></text:h>
      <text:h text:style-name="P4" text:outline-level="3"><text:span text:style-name="T2">Parte 1 - </text:span>Tiempo después</text:h>
      <text:p text:style-name="Text_20_body"/>
      <text:p text:style-name="Text_20_body">Habían pasado tres semanas desde el día del incendio.</text:p>
      <text:p text:style-name="Text_20_body">El pueblo recuperaba poco a poco su ritmo habitual mientras comenzaban los trabajos de reconstrucción de los edificios dañados.</text:p>
      <text:p text:style-name="Text_20_body">Dahg todavía caminaba con cierta dificultad debido a una lesión en la rodilla que ya empezaba a superar.</text:p>
      <text:p text:style-name="Text_20_body">Más difícil de superar estaba resultando la ausencia de sus amigos.</text:p>
      <text:p text:style-name="Text_20_body">Y especialmente la de Penht.</text:p>
      <text:p text:style-name="Text_20_body">La venta del terreno había quedado suspendida.</text:p>
      <text:p text:style-name="Text_20_body">Retomaría las gestiones, posiblemente, en la próxima primavera.</text:p>
      <text:p text:style-name="Text_20_body">Ahora necesitaba tiempo y tranquilidad.</text:p>
      <text:p text:style-name="Text_20_body">Aquella mañana se sentía con más energía.</text:p>
      <text:p text:style-name="Text_20_body">Decidió poner orden en la tienda.</text:p>
      <text:p text:style-name="Text_20_body">Mover algunos muebles.</text:p>
      <text:p text:style-name="Text_20_body">Limpiar.</text:p>
      <text:p text:style-name="Text_20_body">Dar mejor aspecto a los objetos expuestos.</text:p>
      <text:p text:style-name="Text_20_body">Pasó así varias horas reorganizando mercancías y retirando el polvo acumulado, hasta que su atención se posó sobre la bola de cristal.</text:p>
      <text:p text:style-name="Text_20_body">Continuaba exactamente donde la había dejado aquella noche.</text:p>
      <text:p text:style-name="Text_20_body">No había vuelto a tocarla desde entonces.</text:p>
      <text:p text:style-name="Text_20_body"><text:soft-page-break/>Pensó que tal vez podía retomar el trabajo de restauración que había pensado realizar antes de ponerla a la venta.</text:p>
      <text:p text:style-name="Text_20_body">La tomó entre sus manos.</text:p>
      <text:p text:style-name="Text_20_body">La observó detenidamente.</text:p>
      <text:p text:style-name="Text_20_body">La giró hacia un lado y hacia el otro.</text:p>
      <text:p text:style-name="Text_20_body">Seguía siendo un objeto extraordinario.</text:p>
      <text:p text:style-name="Text_20_body">Hermoso.</text:p>
      <text:p text:style-name="Text_20_body">Intrigante.</text:p>
      <text:p text:style-name="Text_20_body">Y profundamente inquietante.</text:p>
      <text:p text:style-name="Text_20_body">Lo que había visto aquella noche continuaba sin encontrar explicación.</text:p>
      <text:p text:style-name="Text_20_body">¿Había mostrado realmente el futuro?</text:p>
      <text:p text:style-name="Text_20_body">¿O todo había sido una extraña ilusión nacida de su imaginación?</text:p>
      <text:p text:style-name="Text_20_body">Sin embargo, había perdido el barco.</text:p>
      <text:p text:style-name="Text_20_body">Se había encontrado con Omhp.</text:p>
      <text:p text:style-name="Text_20_body">Y el rayo había caído exactamente como lo había visto.</text:p>
      <text:p text:style-name="Text_20_body">¿Coincidencias?</text:p>
      <text:p text:style-name="Text_20_body">Quizás.</text:p>
      <text:p text:style-name="Text_20_body">Y si la bola mostraba el futuro...</text:p>
      <text:p text:style-name="Text_20_body">¿Por qué permanecía ahora en silencio?</text:p>
      <text:p text:style-name="Text_20_body">Dahg la dejó con cuidado sobre la mesa y se apartó unos pasos.</text:p>
      <text:p text:style-name="P3">El misterio crecía en su <text:span text:style-name="T1">imaginación</text:span>.</text:p>
      <text:p text:style-name="Text_20_body">Permaneció observándola.</text:p>
      <text:p text:style-name="Text_20_body">Pensando.</text:p>
      <text:p text:style-name="Text_20_body">Intentando comprender.</text:p>
      <text:p text:style-name="Text_20_body">Y entonces sucedió de nuevo.</text:p>
      <text:p text:style-name="Text_20_body">Un fino hilo de humo blanco apareció en el interior del cristal.</text:p>
      <text:p text:style-name="Text_20_body">Se extendió lentamente.</text:p>
      <text:p text:style-name="Text_20_body">Giró sobre sí mismo.</text:p>
      <text:p text:style-name="Text_20_body">Y acabó llenando toda la esfera hasta volverla completamente opaca.</text:p>
      <text:p text:style-name="P2">Dahg sintió un escalofrío.<text:span text:style-name="T1"> Aquello le heló la sangre.</text:span></text:p>
      <text:p text:style-name="P1"><text:soft-page-break/>Ahora ya no parecía ser su imaginación.</text:p>
      <text:p text:style-name="Text_20_body"><text:span text:style-name="T1">Y n</text:span>o estaba seguro de querer ver lo que mostraría esta vez.</text:p>
      <text:p text:style-name="Text_20_body">Pero tampoco pudo apartar la vista.</text:p>
      <text:p text:style-name="Text_20_body"/>
      <text:p text:style-name="Horizontal_20_Line"/>
      <text:p text:style-name="Text_20_body"/>
      <text:p text:style-name="Text_20_body"/>
      <text:h text:style-name="P11" text:outline-level="3">Parte 2 - Una nueva visión.</text:h>
      <text:p text:style-name="P10"/>
      <text:p text:style-name="P5">La imagen se hizo más nítida.</text:p>
      <text:p text:style-name="P5">Dahg avanzaba despacio por el camino del puente viejo.</text:p>
      <text:p text:style-name="P5">Reconoció el lugar al instante.</text:p>
      <text:p text:style-name="P5">Era la ruta que conducía a Leavebehind, un pequeño pueblo del valle occidental al que viajaba con frecuencia por negocios.</text:p>
      <text:p text:style-name="P5">A lo lejos apareció la silueta del puente.</text:p>
      <text:p text:style-name="P5">Y sobre él, una carreta.</text:p>
      <text:p text:style-name="P5">Dahg sintió una inmediata inquietud.</text:p>
      <text:p text:style-name="P5">Nadie utilizaba aquel puente desde hacía años.</text:p>
      <text:p text:style-name="P5">Las maderas estaban podridas y varias de las vigas habían cedido. Los vecinos preferían recorrer varios kilómetros adicionales antes que arriesgarse a cruzarlo.</text:p>
      <text:p text:style-name="P5">Cuando se acercó comprobó que la situación era todavía peor de lo que parecía.</text:p>
      <text:p text:style-name="P5">Una de las ruedas de la carreta había atravesado el entablado y había quedado atrapada entre las vigas.</text:p>
      <text:p text:style-name="P5">El caballo ya había sido desenganchado.</text:p>
      <text:p text:style-name="P5">Su dueño esperaba junto al camino observando impotente.</text:p>
      <text:p text:style-name="P5">Hablaron unos momentos.</text:p>
      <text:p text:style-name="P17"><text:span text:style-name="T5">Despues de eso, a</text:span>taron una gruesa cuerda entre las dos carretas.</text:p>
      <text:p text:style-name="P5">Dahg avanzó lentamente.</text:p>
      <text:p text:style-name="P5">La cuerda se tensó.</text:p>
      <text:p text:style-name="P5">La carreta atrapada no se movió.</text:p>
      <text:p text:style-name="P5">Volvió a intentarlo.</text:p>
      <text:p text:style-name="P5"><text:soft-page-break/>La cuerda quedó rígida como una barra de hierro.</text:p>
      <text:p text:style-name="P5">Y de pronto la rueda salió de la trampa.</text:p>
      <text:p text:style-name="P5">La carreta se desplazó bruscamente hacia adelante.</text:p>
      <text:p text:style-name="P17">Una de las vigas principales <text:span text:style-name="T5">se </text:span>romp<text:span text:style-name="T5">ió, e</text:span>l puente entero se inclinó unos centímetros.</text:p>
      <text:p text:style-name="P5"><text:span text:style-name="T5">Y l</text:span>as dos carretas quedaron atravesadas sobre la estructura.</text:p>
      <text:p text:style-name="P5">Dahg intentó hacer retroceder a su caballo.</text:p>
      <text:p text:style-name="P5">Demasiado tarde.</text:p>
      <text:p text:style-name="P5">El puente seguía cediendo bajo el peso.</text:p>
      <text:p text:style-name="P5">Las tablas se partían una tras otra.</text:p>
      <text:p text:style-name="P5">Comprendió que ya no podría salvar ninguna de las dos.</text:p>
      <text:p text:style-name="P5">Corrió hacia el caballo y soltó los arneses.</text:p>
      <text:p text:style-name="P5">El animal retrocedió aterrorizado hasta terreno firme.</text:p>
      <text:p text:style-name="P5">Los dos hombres se alejaron apresuradamente.</text:p>
      <text:p text:style-name="P5">Un instante después el puente se derrumbó.</text:p>
      <text:p text:style-name="P5">Las dos carretas desaparecieron entre una nube de polvo y astillas.</text:p>
      <text:p text:style-name="P10">Veinte metros más abajo, el río Verdastro se las tragó.</text:p>
      <text:p text:style-name="P10"/>
      <text:p text:style-name="Horizontal_20_Line"/>
      <text:p text:style-name="Text_20_body"/>
      <text:h text:style-name="P12" text:outline-level="3">Parte 3 - ¿Y ahora qué?</text:h>
      <text:p text:style-name="P5"/>
      <text:p text:style-name="P6">La visión se desvaneció tan repentinamente como había aparecido.</text:p>
      <text:p text:style-name="P6">El humo blanco desapareció del interior de la esfera.</text:p>
      <text:p text:style-name="P6">Y el cristal volvió a ser una simple lente de lectura.</text:p>
      <text:p text:style-name="P6">Dahg permaneció inmóvil.</text:p>
      <text:p text:style-name="P6">No podía apartar la vista de ella.</text:p>
      <text:p text:style-name="P6">Acababa de ver cómo perdía la carreta.</text:p>
      <text:p text:style-name="P6">Su carreta.</text:p>
      <text:p text:style-name="P6">La misma por la que había trabajado durante años.</text:p>
      <text:p text:style-name="P6"><text:soft-page-break/>La misma en la que había invertido todos sus ahorros.</text:p>
      <text:p text:style-name="P6">Sin ella no podría transportar mercancías.</text:p>
      <text:p text:style-name="P6">No podría ampliar el negocio.</text:p>
      <text:p text:style-name="P6">No podría recuperarse de las pérdidas que había sufrido tras el incendio.</text:p>
      <text:p text:style-name="P6">Aquella carreta no era un lujo.</text:p>
      <text:p text:style-name="P6">Era su futuro.</text:p>
      <text:p text:style-name="P6">Se levantó lentamente de la silla.</text:p>
      <text:p text:style-name="P6">Comenzó a caminar por la habitación.</text:p>
      <text:p text:style-name="P18"><text:span text:style-name="T6">Esto era realmente serio. Una </text:span>advertencia.</text:p>
      <text:p text:style-name="P6">Se alejó de la mesa y continuó trabajando en la tienda durante el resto del día.</text:p>
      <text:p text:style-name="P6">Intentó concentrarse en los clientes.</text:p>
      <text:p text:style-name="P18"><text:span text:style-name="T6">Ordenó</text:span> mercancías.</text:p>
      <text:p text:style-name="P6">Intentó pensar en cualquier otra cosa.</text:p>
      <text:p text:style-name="P6">Pero la imagen del puente regresaba una y otra vez.</text:p>
      <text:p text:style-name="P6">La carreta atrapada.</text:p>
      <text:p text:style-name="P6">Las tablas crujiendo.</text:p>
      <text:p text:style-name="P6">El puente cediendo lentamente.</text:p>
      <text:p text:style-name="P6">Su propia carreta desapareciendo en el río.</text:p>
      <text:p text:style-name="P6">Aquella noche se acostó más temprano de lo habitual.<text:span text:style-name="T6"> </text:span>Y durmió mal.</text:p>
      <text:p text:style-name="P6">Soñó con caminos que se bifurcaban.</text:p>
      <text:p text:style-name="P6">Con decisiones imposibles.</text:p>
      <text:p text:style-name="P6">Se despertó sobresaltado antes del amanecer.</text:p>
      <text:p text:style-name="P6">La habitación estaba oscura.</text:p>
      <text:p text:style-name="P20">Ya lo había decidido.</text:p>
      <text:p text:style-name="P6">Tenía que deshacerse de aquella cosa.</text:p>
      <text:p text:style-name="P6">No quería volver a ver otra visión.</text:p>
      <text:p text:style-name="P6">No quería volver a preguntarse qué debía cambiar.</text:p>
      <text:p text:style-name="P6">No quería seguir viviendo pendiente de futuros que aún no existían.</text:p>
      <text:p text:style-name="P6">Se vistió.</text:p>
      <text:p text:style-name="P6">Bajó a la tienda.</text:p>
      <text:p text:style-name="P6"><text:soft-page-break/>Y antes incluso de abrir las puertas colocó la esfera de cristal en el escaparate.</text:p>
      <text:p text:style-name="P6">Ya no pretendía obtener una gran ganancia.</text:p>
      <text:p text:style-name="P6">Ni siquiera un beneficio.</text:p>
      <text:p text:style-name="P6">Le bastaba con recuperar el dinero que había pagado por ella.</text:p>
      <text:p text:style-name="P6">Quería verla lejos.</text:p>
      <text:p text:style-name="P6">Lo antes posible.</text:p>
      <text:p text:style-name="P6"/>
      <text:p text:style-name="Horizontal_20_Line"/>
      <text:p text:style-name="Text_20_body"/>
      <text:p text:style-name="P9"/>
      <text:h text:style-name="P7" text:outline-level="3"><text:span text:style-name="T3">Parte </text:span>4 - La venta</text:h>
      <text:p text:style-name="P9"/>
      <text:p text:style-name="P9">Aquella mañana abrió la tienda con los primeros rayos del sol.</text:p>
      <text:p text:style-name="P9">Todavía estaba retirando las cubiertas que protegían el escaparate cuando oyó abrirse la puerta.</text:p>
      <text:p text:style-name="P9">Un hombre acababa de entrar.</text:p>
      <text:p text:style-name="P9">Vestía ropa de viaje de buena calidad y llevaba una cartera de cuero bajo el brazo.</text:p>
      <text:p text:style-name="P9">Su aspecto era distinguido.</text:p>
      <text:p text:style-name="P9">No parecía un noble, sino un hombre instruido.</text:p>
      <text:p text:style-name="P9">Alguien acostumbrado a trabajar con documentos y libros.</text:p>
      <text:p text:style-name="P9">Recorrió la tienda con una rápida mirada y casi de inmediato se detuvo frente a la esfera de cristal.</text:p>
      <text:p text:style-name="P9">—¿Puedo verla? —preguntó.</text:p>
      <text:p text:style-name="P9">Dahg asintió.</text:p>
      <text:p text:style-name="P9">El visitante tomó el objeto con cuidado.</text:p>
      <text:p text:style-name="P9">Observó los grabados de marfil.</text:p>
      <text:p text:style-name="P9">Examinó el cristal a contraluz.</text:p>
      <text:p text:style-name="P9">Comprobó el estado del soporte.</text:p>
      <text:p text:style-name="P9">Y después sonrió con evidente satisfacción.</text:p>
      <text:p text:style-name="P9">Parecía conocer perfectamente aquella clase de instrumentos.</text:p>
      <text:p text:style-name="P9">Explicó que era escribano.</text:p>
      <text:p text:style-name="P9"><text:soft-page-break/>Procedía de Fogliempilate, una ciudad situada muy al sur, en la región de Me<text:span text:style-name="T7">zzapi</text:span>anta.</text:p>
      <text:p text:style-name="P9">Viajaba por negocios.</text:p>
      <text:p text:style-name="P9">Aquella misma tarde partiría hacia Pomagrande siguiendo la ruta comercial del río.</text:p>
      <text:p text:style-name="P9">Durante varios minutos conversaron sobre mapas, documentos antiguos, rutas mercantiles y métodos de copia.</text:p>
      <text:p text:style-name="P9">Era un hombre culto.</text:p>
      <text:p text:style-name="P9">Educado.</text:p>
      <text:p text:style-name="P9">Y extraordinariamente agradable.</text:p>
      <text:p text:style-name="P9">Dahg disfrutó de la conversación.</text:p>
      <text:p text:style-name="P9">Sin embargo, <text:s/>había algo que lo inquietaba.</text:p>
      <text:p text:style-name="P9">Apenas habían pasado unas horas desde que decidió deshacerse de la esfera.</text:p>
      <text:p text:style-name="P9">Y ahora tenía delante exactamente al comprador que necesitaba.</text:p>
      <text:p text:style-name="P9">Un hombre con dinero.</text:p>
      <text:p text:style-name="P9">Con conocimientos suficientes para apreciar el objeto.</text:p>
      <text:p text:style-name="P9">Con una necesidad real de utilizarlo.</text:p>
      <text:p text:style-name="P9">Y además un viajero que abandonaría la región aquel mismo día.</text:p>
      <text:p text:style-name="P9">Era, en todos los sentidos posibles, el cliente perfecto.</text:p>
      <text:p text:style-name="P9">Aquello debía ser una coincidencia.</text:p>
      <text:p text:style-name="P9">Sin duda lo era.</text:p>
      <text:p text:style-name="P9">Pero resultaba una coincidencia extrañamente oportuna.</text:p>
      <text:p text:style-name="P9">Finalmente el hombre dejó la esfera sobre el mostrador.</text:p>
      <text:p text:style-name="P9">—¿Cuál es su precio? —preguntó.</text:p>
      <text:p text:style-name="P9">Solo entonces Dahg dudó.</text:p>
      <text:p text:style-name="P9">Su mirada descendió hacia el cristal.</text:p>
      <text:p text:style-name="P9"><text:span text:style-name="T7">R</text:span>ecordó el humo blanco.<text:span text:style-name="T7"> </text:span>Las imágenes.<text:span text:style-name="T7"> </text:span>El incendio.<text:span text:style-name="T7"> </text:span>El puente.</text:p>
      <text:p text:style-name="P9">La sensación de estar observando algo que ningún ser humano debería conocer.</text:p>
      <text:p text:style-name="P9">¿Debía venderla?</text:p>
      <text:p text:style-name="P9">Aquella pregunta no tenía una respuesta sencilla.</text:p>
      <text:p text:style-name="P9">No sabía qué era realmente la esfera.</text:p>
      <text:p text:style-name="P9">No sabía cómo funcionaba.</text:p>
      <text:p text:style-name="P9"><text:soft-page-break/>Ni siquiera estaba seguro de que fuese peligrosa.</text:p>
      <text:p text:style-name="P9">Después de todo, la esfera no había provocado el incendio.</text:p>
      <text:p text:style-name="P9">Ni había derribado el puente.</text:p>
      <text:p text:style-name="P9">Solo había mostrado algo.</text:p>
      <text:p text:style-name="P9">Información.</text:p>
      <text:p text:style-name="P9">Nada más.</text:p>
      <text:p text:style-name="P9">Y la información no era buena ni mala por sí misma.</text:p>
      <text:p text:style-name="P9">Todo dependía de lo que cada persona decidiera hacer con ella.</text:p>
      <text:p text:style-name="P9">Quizá, en manos adecuadas, aquel objeto podría resultar útil.</text:p>
      <text:p text:style-name="P9">Quizá incluso beneficioso.</text:p>
      <text:p text:style-name="P9">Dahg apoyó ambas manos sobre el mostrador.</text:p>
      <text:p text:style-name="P9">Miró al escribano.</text:p>
      <text:p text:style-name="P9">Y respondió:</text:p>
      <text:p text:style-name="P9">—¿Cuánto cree usted que vale?</text:p>
      <text:p text:style-name="P8"/>
      <text:p text:style-name="P9"/>
      <text:h text:style-name="P13" text:outline-level="3"><text:span text:style-name="T9">Parte </text:span>5 - Futuro imperfecto<text:span text:style-name="T9">.</text:span></text:h>
      <text:p text:style-name="P14">En los días siguientes la rutina volvió a envolver la almoneda con su ritmo continuo, predecible y confortable.</text:p>
      <text:p text:style-name="P14">La vida recuperó poco a poco su aspecto habitual.</text:p>
      <text:p text:style-name="P14">Las semanas se transformaron en meses.</text:p>
      <text:p text:style-name="P14">El otoño llegó y se marchó.</text:p>
      <text:p text:style-name="P14">Después vino el invierno.</text:p>
      <text:p text:style-name="P14">Y casi sin darse cuenta, Dahg recibió la primavera.</text:p>
      <text:p text:style-name="P14">Había conocido durante el invierno al propietario de la almoneda de Aguasfrías, un pueblo situado dos jornadas al oeste.</text:p>
      <text:p text:style-name="P14">Tras varias conversaciones habían acordado una asociación comercial.</text:p>
      <text:p text:style-name="P14">Cada año intercambiarían las mercancías que no conseguían vender en sus respectivos pueblos, ofreciendo así los productos a nuevos compradores.</text:p>
      <text:p text:style-name="P14">La idea parecía prometedora.</text:p>
      <text:p text:style-name="P14"><text:soft-page-break/>Y Dahg necesitaba nuevas oportunidades.</text:p>
      <text:p text:style-name="P19">Parecía este un buen momento del año para viajar hasta Aguasfrías e intercambiar mercaderías con su nuevo socio. </text:p>
      <text:p text:style-name="P14">Así que una mañana cargó su carreta con varias piezas cuidadosamente seleccionadas, algo de comida para el viaje y abandonó Drywind antes del amanecer.</text:p>
      <text:p text:style-name="P14">El clima era agradable.</text:p>
      <text:p text:style-name="P14">No había nubes en el cielo.</text:p>
      <text:p text:style-name="P14">Y durante varias horas avanzó tranquilamente por los caminos del oeste.</text:p>
      <text:p text:style-name="P14">Al acercarse a la zona montañosa, el bosque comenzó a rodear el camino.</text:p>
      <text:p text:style-name="P14">Los árboles proyectaban una agradable sombra sobre la ruta.</text:p>
      <text:p text:style-name="P14">El viaje estaba resultando mejor de lo esperado.</text:p>
      <text:p text:style-name="P14"><text:span text:style-name="T8">Y p</text:span>oco antes del mediodía llegó al puente viejo.</text:p>
      <text:p text:style-name="P14"><text:span text:style-name="T8">E</text:span>ntonces se detuvo.</text:p>
      <text:p text:style-name="P14">Sobre el puente había una carreta.</text:p>
      <text:p text:style-name="P14">Dahg sintió un escalofrío.</text:p>
      <text:p text:style-name="P14">Reconoció la escena de inmediato.</text:p>
      <text:p text:style-name="P14">La había visto antes.</text:p>
      <text:p text:style-name="P14">En el interior de una esfera de cristal.</text:p>
      <text:p text:style-name="P14">Permaneció inmóvil observando.</text:p>
      <text:p text:style-name="P14">Una de las ruedas había atravesado el entablado.</text:p>
      <text:p text:style-name="P14">La carreta estaba atrapada.</text:p>
      <text:p text:style-name="P14">Al otro lado apareció un hombre desconocido que se acercó apresuradamente.</text:p>
      <text:p text:style-name="P14">El caballo ya había sido liberado.</text:p>
      <text:p text:style-name="P14">Pero la carreta seguía sobre el puente.</text:p>
      <text:p text:style-name="P14">Exactamente igual que en la visión.</text:p>
      <text:p text:style-name="P14">El hombre llegó hasta él.</text:p>
      <text:p text:style-name="P14">Su expresión reflejaba preocupación.</text:p>
      <text:p text:style-name="P14">—¡Por favor! ¡Ayúdame! La rueda ha quedado atrapada entre las tablas. Si no consigo sacarla la perderé.</text:p>
      <text:p text:style-name="P14">Dahg no respondió.</text:p>
      <text:p text:style-name="P14">Miró el puente.</text:p>
      <text:p text:style-name="P14"><text:soft-page-break/>Después miró la carreta del desconocido.</text:p>
      <text:p text:style-name="P14">Y finalmente dirigió la vista hacia la suya.</text:p>
      <text:p text:style-name="P14">La carreta nueva.</text:p>
      <text:p text:style-name="P14">La carreta por la que había trabajado durante años.</text:p>
      <text:p text:style-name="P14">El desconocido volvió a hablar.</text:p>
      <text:p text:style-name="P14">Esta vez con más urgencia.</text:p>
      <text:p text:style-name="P14">—¿Me ayudará?</text:p>
      <text:p text:style-name="P14">Dahg permaneció inmóvil.</text:p>
      <text:p text:style-name="P14">Miró al hombre.</text:p>
      <text:p text:style-name="P14">Miró la carreta atrapada.</text:p>
      <text:p text:style-name="P14">Y después<text:span text:style-name="T8"> </text:span>volvió a mirar la suy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7T14:59:22.135000000</meta:creation-date>
    <dc:date>2026-07-17T17:41:21.269000000</dc:date>
    <meta:editing-duration>PT3H20M</meta:editing-duration>
    <meta:editing-cycles>19</meta:editing-cycles>
    <meta:generator>LibreOffice/7.3.5.2$Windows_X86_64 LibreOffice_project/184fe81b8c8c30d8b5082578aee2fed2ea847c01</meta:generator>
    <meta:document-statistic meta:table-count="0" meta:image-count="0" meta:object-count="0" meta:page-count="10" meta:paragraph-count="246" meta:word-count="1766" meta:character-count="10759" meta:non-whitespace-character-count="9226"/>
  </office:meta>
</office:document-meta>
</file>