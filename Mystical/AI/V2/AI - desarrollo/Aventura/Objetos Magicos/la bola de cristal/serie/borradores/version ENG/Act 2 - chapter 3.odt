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Chapter 3 – Penht</text:h>
      <text:h text:style-name="Heading_20_3" text:outline-level="3">Part 1 – Dahg Leaves His House</text:h>
      <text:p text:style-name="Text_20_body"><text:span text:style-name="Strong_20_Emphasis">Day: Friday. Time: 7 p.m.</text:span></text:p>
      <text:p text:style-name="Text_20_body">Shortly after seven in the evening, Dahg locked the door of the auction house and began walking toward the river dock.</text:p>
      <text:p text:style-name="Text_20_body">He needed to arrive before nine in order to board the riverboat that would take him to Prosperous City.</text:p>
      <text:p text:style-name="Text_20_body">As he passed by Omhp's property, he stopped for a few minutes to greet his friend.</text:p>
      <text:p text:style-name="Text_20_body">They spoke briefly.</text:p>
      <text:p text:style-name="Text_20_body">Then Dahg continued walking.</text:p>
      <text:p text:style-name="Text_20_body">He had left with enough time and with the firm intention of not missing the boat.</text:p>
      <text:p text:style-name="Text_20_body">The clouds were beginning to cover the sky when he reached the bend in the road.</text:p>
      <text:p text:style-name="Text_20_body">A powerful thunderclap echoed across the plains.</text:p>
      <text:p text:style-name="Text_20_body">The sound was so sudden that Dahg instinctively turned toward the open fields.</text:p>
      <text:p text:style-name="Text_20_body">And at that very moment, a runaway wagon appeared behind him.</text:p>
      <text:p text:style-name="Text_20_body">He had no time to move aside.</text:p>
      <text:p text:style-name="Text_20_body">The impact threw him off the road.</text:p>
      <text:p text:style-name="Text_20_body">He fell violently to the ground.</text:p>
      <text:p text:style-name="Text_20_body">The wagon continued forward without stopping.</text:p>
      <text:p text:style-name="Text_20_body">A few seconds later, it disappeared around the bend.</text:p>
      <text:p text:style-name="Text_20_body">A loud crash was heard.</text:p>
      <text:p text:style-name="Text_20_body">The wagon had struck something.</text:p>
      <text:p text:style-name="Text_20_body">Shortly afterward, a column of smoke began rising above the rooftops of Drywind.</text:p>
      <text:p text:style-name="Text_20_body">Dahg tried to stand.</text:p>
      <text:p text:style-name="Text_20_body">A sharp pain in his knee prevented him.</text:p>
      <text:p text:style-name="Text_20_body">From the ground, he watched as the smoke grew larger.</text:p>
      <text:p text:style-name="Text_20_body">Then the first flames appeared.</text:p>
      <text:p text:style-name="Standard"/>
      <text:p text:style-name="Horizontal_20_Line"/>
      <text:p text:style-name="Text_20_body"/>
      <text:p text:style-name="Text_20_body"><text:soft-page-break/></text:p>
      <text:h text:style-name="Heading_20_3" text:outline-level="3">Part 2 – A Column of Smoke</text:h>
      <text:p text:style-name="Text_20_body">Not far from there, beside the riverbank, the same thunder also caught Penht's attention.</text:p>
      <text:p text:style-name="Text_20_body">Penht was a young farmer in his early thirties.</text:p>
      <text:p text:style-name="Text_20_body">He had been born in Drywind and had spent his entire life there.</text:p>
      <text:p text:style-name="Text_20_body">Hardworking, responsible, and always willing to help others, he was the kind of person who seemed to get along with everyone.</text:p>
      <text:p text:style-name="Text_20_body">Many of the villagers appreciated him.</text:p>
      <text:p text:style-name="Text_20_body">And Dahg appreciated him more than anyone.</text:p>
      <text:p text:style-name="Text_20_body">Over the years, he had come to think of him almost as a son.</text:p>
      <text:p text:style-name="Text_20_body">That afternoon, Penht was finishing his work on the farm.</text:p>
      <text:p text:style-name="Text_20_body">The sound of thunder made him look up at the sky.</text:p>
      <text:p text:style-name="Text_20_body">A storm seemed to be forming over the region.</text:p>
      <text:p text:style-name="Text_20_body">The dark clouds continued gathering slowly and were moving in from the plains.</text:p>
      <text:p text:style-name="Text_20_body">Penht grew corn and raised a small group of horses.</text:p>
      <text:p text:style-name="Text_20_body">He thought it would be wise to bring the animals indoors before the rain began.</text:p>
      <text:p text:style-name="Text_20_body">He walked to the stable and started settling them inside.</text:p>
      <text:p text:style-name="Text_20_body">He was closing one of the doors when something caught his attention.</text:p>
      <text:p text:style-name="Text_20_body">In the distance, above the trees, a column of smoke was rising along the horizon.</text:p>
      <text:p text:style-name="Text_20_body">It seemed to be coming directly from the village.</text:p>
      <text:p text:style-name="Text_20_body">What could have happened?</text:p>
      <text:p text:style-name="Text_20_body">Then he heard an explosion.</text:p>
      <text:p text:style-name="Text_20_body">And a moment later, he saw the flames in the distance.</text:p>
      <text:p text:style-name="Text_20_body">A fire in the village.</text:p>
      <text:p text:style-name="Text_20_body"/>
      <text:p text:style-name="Horizontal_20_Line"/>
      <text:p text:style-name="Text_20_body"/>
      <text:h text:style-name="Heading_20_3" text:outline-level="3">Part 3 – Help</text:h>
      <text:p text:style-name="Text_20_body">Penht did not waste any time.</text:p>
      <text:p text:style-name="Text_20_body"><text:soft-page-break/>He left the stable, mounted one of his horses, and rode toward the village at a gallop.</text:p>
      <text:p text:style-name="Text_20_body">The column of smoke grew larger with every passing minute.</text:p>
      <text:p text:style-name="Text_20_body">And the closer he came, the more obvious the scale of the fire became.</text:p>
      <text:p text:style-name="Text_20_body">A few minutes later, he reached the first houses of Drywind.</text:p>
      <text:p text:style-name="Text_20_body">The air smelled of smoke.</text:p>
      <text:p text:style-name="Text_20_body">Small ashes drifted through the wind.</text:p>
      <text:p text:style-name="Text_20_body">The villagers were running from one place to another, carrying buckets of water, tools, and anything that might help fight the flames.</text:p>
      <text:p text:style-name="Text_20_body">Penht continued along the main road.</text:p>
      <text:p text:style-name="Text_20_body">Several houses were already burning.</text:p>
      <text:p text:style-name="Text_20_body">Others were being evacuated as a precaution.</text:p>
      <text:p text:style-name="Text_20_body">The inhabitants were trying to save furniture, tools, animals, and supplies before the fire reached their homes.</text:p>
      <text:p text:style-name="Text_20_body">The fire appeared to have started near the warehouse.</text:p>
      <text:p text:style-name="Text_20_body">From there, it had spread to the nearest buildings.</text:p>
      <text:p text:style-name="Text_20_body">The flames rose above the rooftops, and a thick cloud of smoke covered much of the center of the village.</text:p>
      <text:p text:style-name="Text_20_body">Penht tried to get closer.</text:p>
      <text:p text:style-name="Text_20_body">But the heat was too intense.</text:p>
      <text:p text:style-name="Text_20_body">And the smoke too thick.</text:p>
      <text:p text:style-name="Text_20_body">He understood that reaching the warehouse was impossible.</text:p>
      <text:p text:style-name="Text_20_body">He stopped for a moment to assess the situation.</text:p>
      <text:p text:style-name="Text_20_body">The villagers working near the fire seemed to be focusing their efforts on preventing the flames from reaching new buildings.</text:p>
      <text:p text:style-name="Text_20_body">It made sense.</text:p>
      <text:p text:style-name="Text_20_body">The warehouse and the closest houses appeared to be lost.</text:p>
      <text:p text:style-name="Text_20_body">The priority now was to stop the fire from spreading any further.</text:p>
      <text:p text:style-name="Text_20_body">He dismounted.</text:p>
      <text:p text:style-name="Text_20_body">Tied his horse to a fence.</text:p>
      <text:p text:style-name="Text_20_body">And went to join the others.</text:p>
      <text:p text:style-name="Text_20_body"/>
      <text:p text:style-name="Horizontal_20_Line"><text:soft-page-break/></text:p>
      <text:p text:style-name="Text_20_body"/>
      <text:h text:style-name="Heading_20_3" text:outline-level="3">Part 4 – A Heroic Act</text:h>
      <text:p text:style-name="Text_20_body">He wanted to help.</text:p>
      <text:p text:style-name="Text_20_body">But he understood that it was impossible to save everything.</text:p>
      <text:p text:style-name="Text_20_body">He had to choose where to act.</text:p>
      <text:p text:style-name="Text_20_body">Then he heard the sound of horses.</text:p>
      <text:p text:style-name="Text_20_body">They were coming from a stable across the street.</text:p>
      <text:p text:style-name="Text_20_body">He looked in that direction.</text:p>
      <text:p text:style-name="Text_20_body">The fire had reached one of the outer walls and was beginning to spread across the roof.</text:p>
      <text:p text:style-name="Text_20_body">It was not completely engulfed in flames yet.</text:p>
      <text:p text:style-name="Text_20_body">But there was not much time left.</text:p>
      <text:p text:style-name="Text_20_body">If there were animals inside, they would soon be trapped.</text:p>
      <text:p text:style-name="Text_20_body">Penht ran across the street.</text:p>
      <text:p text:style-name="Text_20_body">He pushed open the door.</text:p>
      <text:p text:style-name="Text_20_body">A wave of hot smoke rushed outside.</text:p>
      <text:p text:style-name="Text_20_body">He covered his mouth and nose with the sleeve of his shirt and entered.</text:p>
      <text:p text:style-name="Text_20_body">The interior was filled with smoke.</text:p>
      <text:p text:style-name="Text_20_body">Visibility was poor.</text:p>
      <text:p text:style-name="Text_20_body">The flames were advancing along one of the walls and beginning to spread through the roof beams.</text:p>
      <text:p text:style-name="Text_20_body">The horses were at the far end.</text:p>
      <text:p text:style-name="Text_20_body">Terrified.</text:p>
      <text:p text:style-name="Text_20_body">Kicking against the doors of their stalls with their hooves.</text:p>
      <text:p text:style-name="Text_20_body">Trying to escape.</text:p>
      <text:p text:style-name="Text_20_body">Penht moved toward them.</text:p>
      <text:p text:style-name="Text_20_body">He freed the first one.</text:p>
      <text:p text:style-name="Text_20_body">The animal bolted toward the exit.</text:p>
      <text:p text:style-name="Text_20_body">Then he released the second.</text:p>
      <text:p text:style-name="Text_20_body">The smoke was growing thicker.</text:p>
      <text:p text:style-name="Text_20_body"><text:soft-page-break/>Breathing was becoming difficult.</text:p>
      <text:p text:style-name="Text_20_body">His eyes burned.</text:p>
      <text:p text:style-name="Text_20_body">He began to feel dizzy and disoriented.</text:p>
      <text:p text:style-name="Text_20_body">He continued toward the last stall.</text:p>
      <text:p text:style-name="Text_20_body">He managed to open the latch.</text:p>
      <text:p text:style-name="Text_20_body">The horse surged forward and ran toward the door.</text:p>
      <text:p text:style-name="Text_20_body">Penht turned to follow it.</text:p>
      <text:p text:style-name="Text_20_body">Then he heard a crack.</text:p>
      <text:p text:style-name="Text_20_body">One of the main beams had given way.</text:p>
      <text:p text:style-name="Text_20_body">He looked up.</text:p>
      <text:p text:style-name="Text_20_body">And barely had time to understand what was happening.</text:p>
      <text:p text:style-name="Text_20_body">Before part of the roof collapsed onto him.</text:p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7-20T10:36:41.955000000</meta:creation-date>
    <dc:date>2026-07-20T10:42:37.768000000</dc:date>
    <meta:editing-duration>PT5M55S</meta:editing-duration>
    <meta:editing-cycles>4</meta:editing-cycles>
    <meta:generator>LibreOffice/7.3.5.2$Windows_X86_64 LibreOffice_project/184fe81b8c8c30d8b5082578aee2fed2ea847c01</meta:generator>
    <meta:document-statistic meta:table-count="0" meta:image-count="0" meta:object-count="0" meta:page-count="5" meta:paragraph-count="114" meta:word-count="978" meta:character-count="5358" meta:non-whitespace-character-count="4489"/>
  </office:meta>
</office:document-meta>
</file>