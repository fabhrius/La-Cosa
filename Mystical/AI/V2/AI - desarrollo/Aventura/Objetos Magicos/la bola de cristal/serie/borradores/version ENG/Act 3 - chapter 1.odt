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2" text:outline-level="2">Act III</text:h>
      <text:p text:style-name="Text_20_body"><text:span text:style-name="Emphasis">"Sometimes, what appears to be a problem<text:line-break/>is actually the solution to another problem we have not yet seen."</text:span><text:line-break/>— Fabhrius</text:p>
      <text:h text:style-name="Heading_20_2" text:outline-level="2">Chapter 1 – The Hidden Truth</text:h>
      <text:h text:style-name="Heading_20_3" text:outline-level="3">Part 1 – Some Time Later</text:h>
      <text:p text:style-name="Text_20_body">Three weeks had passed since the day of the fire.</text:p>
      <text:p text:style-name="Text_20_body">The village was slowly returning to its usual rhythm as reconstruction work began on the damaged buildings.</text:p>
      <text:p text:style-name="Text_20_body">Dahg was still walking with some difficulty because of a knee injury that was finally beginning to heal.</text:p>
      <text:p text:style-name="Text_20_body">Much harder to overcome was the absence of his friends.</text:p>
      <text:p text:style-name="Text_20_body">And especially that of Penht.</text:p>
      <text:p text:style-name="Text_20_body">The sale of the land had been put on hold.</text:p>
      <text:p text:style-name="Text_20_body">He would resume the arrangements, perhaps, the following spring.</text:p>
      <text:p text:style-name="Text_20_body">For now, he needed time and peace of mind.</text:p>
      <text:p text:style-name="Text_20_body">That morning, he felt more energetic.</text:p>
      <text:p text:style-name="Text_20_body">He decided to put the shop in order.</text:p>
      <text:p text:style-name="Text_20_body">Move some furniture.</text:p>
      <text:p text:style-name="Text_20_body">Clean.</text:p>
      <text:p text:style-name="Text_20_body">Give the displayed items a better appearance.</text:p>
      <text:p text:style-name="Text_20_body">He spent several hours reorganizing merchandise and removing the accumulated dust, until his attention fell upon the crystal ball.</text:p>
      <text:p text:style-name="Text_20_body">It remained exactly where he had left it that night.</text:p>
      <text:p text:style-name="Text_20_body">He had not touched it since then.</text:p>
      <text:p text:style-name="Text_20_body">He thought that perhaps he could resume the restoration work he had planned to carry out before putting it up for sale.</text:p>
      <text:p text:style-name="Text_20_body">He picked it up.</text:p>
      <text:p text:style-name="Text_20_body">He examined it carefully.</text:p>
      <text:p text:style-name="Text_20_body">Turned it from side to side.</text:p>
      <text:p text:style-name="Text_20_body"><text:soft-page-break/>It was still an extraordinary object.</text:p>
      <text:p text:style-name="Text_20_body">Beautiful.</text:p>
      <text:p text:style-name="Text_20_body">Intriguing.</text:p>
      <text:p text:style-name="Text_20_body">And deeply unsettling.</text:p>
      <text:p text:style-name="Text_20_body">What he had seen that night still had no explanation.</text:p>
      <text:p text:style-name="Text_20_body">Had it truly shown the future?</text:p>
      <text:p text:style-name="Text_20_body">Or had everything been nothing more than a strange illusion created by his own imagination?</text:p>
      <text:p text:style-name="Text_20_body">And yet, he had missed the riverboat.</text:p>
      <text:p text:style-name="Text_20_body">He had encountered Omhp.</text:p>
      <text:p text:style-name="Text_20_body">And the lightning had struck exactly as he had seen.</text:p>
      <text:p text:style-name="Text_20_body">Coincidences?</text:p>
      <text:p text:style-name="Text_20_body">Perhaps.</text:p>
      <text:p text:style-name="Text_20_body">And if the crystal ball showed the future...</text:p>
      <text:p text:style-name="Text_20_body">Why was it silent now?</text:p>
      <text:p text:style-name="Text_20_body">Dahg carefully placed it back on the table and stepped away.</text:p>
      <text:p text:style-name="Text_20_body">The mystery grew in his mind.</text:p>
      <text:p text:style-name="Text_20_body">He remained there, watching it.</text:p>
      <text:p text:style-name="Text_20_body">Thinking.</text:p>
      <text:p text:style-name="Text_20_body">Trying to understand.</text:p>
      <text:p text:style-name="Text_20_body">And then it happened again.</text:p>
      <text:p text:style-name="Text_20_body">A thin thread of white smoke appeared inside the crystal.</text:p>
      <text:p text:style-name="Text_20_body">It slowly spread.</text:p>
      <text:p text:style-name="Text_20_body">Swirled around itself.</text:p>
      <text:p text:style-name="Text_20_body">And eventually filled the entire sphere, turning it completely opaque.</text:p>
      <text:p text:style-name="Text_20_body">Dahg felt a chill run through him.</text:p>
      <text:p text:style-name="Text_20_body">The sight sent a cold shiver down his spine.</text:p>
      <text:p text:style-name="Text_20_body">Now it no longer seemed like a creation of his imagination.</text:p>
      <text:p text:style-name="Text_20_body">And he was not sure he wanted to see what it would show him this time.</text:p>
      <text:p text:style-name="Text_20_body">But he could not look away.</text:p>
      <text:p text:style-name="Standard"/>
      <text:p text:style-name="Horizontal_20_Line"><text:soft-page-break/></text:p>
      <text:p text:style-name="Text_20_body"/>
      <text:h text:style-name="Heading_20_3" text:outline-level="3">Part 2 – A New Vision</text:h>
      <text:p text:style-name="Text_20_body">The image became clearer.</text:p>
      <text:p text:style-name="Text_20_body">Dahg was moving slowly along the road toward the old bridge.</text:p>
      <text:p text:style-name="Text_20_body">He recognized the place immediately.</text:p>
      <text:p text:style-name="Text_20_body">It was the route leading to Leavebehind, a small village in the western valley that he often visited for business.</text:p>
      <text:p text:style-name="Text_20_body">In the distance, the silhouette of the bridge appeared.</text:p>
      <text:p text:style-name="Text_20_body">And on it, a wagon.</text:p>
      <text:p text:style-name="Text_20_body">Dahg felt an immediate sense of unease.</text:p>
      <text:p text:style-name="Text_20_body">No one had used that bridge for years.</text:p>
      <text:p text:style-name="Text_20_body">The wooden planks were rotten, and several of the beams had already given way. The villagers preferred to travel several additional miles rather than risk crossing it.</text:p>
      <text:p text:style-name="Text_20_body">As he approached, he realized the situation was even worse than it had seemed.</text:p>
      <text:p text:style-name="Text_20_body">One of the wagon wheels had broken through the wooden decking and become trapped between the beams.</text:p>
      <text:p text:style-name="Text_20_body">The horse had already been unhitched.</text:p>
      <text:p text:style-name="Text_20_body">Its owner stood beside the road, watching helplessly.</text:p>
      <text:p text:style-name="Text_20_body">They spoke for a few moments.</text:p>
      <text:p text:style-name="Text_20_body">After that, they tied a thick rope between the two wagons.</text:p>
      <text:p text:style-name="Text_20_body">Dahg moved forward slowly.</text:p>
      <text:p text:style-name="Text_20_body">The rope tightened.</text:p>
      <text:p text:style-name="Text_20_body">The trapped wagon did not move.</text:p>
      <text:p text:style-name="Text_20_body">He tried again.</text:p>
      <text:p text:style-name="Text_20_body">The rope became rigid as an iron bar.</text:p>
      <text:p text:style-name="Text_20_body">And suddenly, the wheel came free.</text:p>
      <text:p text:style-name="Text_20_body">The wagon lurched violently forward.</text:p>
      <text:p text:style-name="Text_20_body">One of the main beams snapped, the entire bridge tilted several inches.</text:p>
      <text:p text:style-name="Text_20_body">And the two wagons were left stranded across the structure.</text:p>
      <text:p text:style-name="Text_20_body"><text:soft-page-break/>Dahg tried to make his horse move backward.</text:p>
      <text:p text:style-name="Text_20_body">Too late.</text:p>
      <text:p text:style-name="Text_20_body">The bridge continued collapsing under the weight.</text:p>
      <text:p text:style-name="Text_20_body">The planks broke one after another.</text:p>
      <text:p text:style-name="Text_20_body">He understood that he could no longer save either wagon.</text:p>
      <text:p text:style-name="Text_20_body">He ran toward the horse and released the harness.</text:p>
      <text:p text:style-name="Text_20_body">The animal backed away in terror onto solid ground.</text:p>
      <text:p text:style-name="Text_20_body">The two men hurried away.</text:p>
      <text:p text:style-name="Text_20_body">A moment later, the bridge collapsed.</text:p>
      <text:p text:style-name="Text_20_body">The two wagons vanished beneath a cloud of dust and splintered wood.</text:p>
      <text:p text:style-name="Text_20_body">Twenty meters below, the Verdastro River swallowed them whole.</text:p>
      <text:p text:style-name="Horizontal_20_Line"/>
      <text:p text:style-name="Text_20_body"/>
      <text:h text:style-name="Heading_20_3" text:outline-level="3">Part 3 – What Now?</text:h>
      <text:p text:style-name="Text_20_body">The vision vanished as suddenly as it had appeared.</text:p>
      <text:p text:style-name="Text_20_body">The white smoke disappeared from inside the sphere.</text:p>
      <text:p text:style-name="Text_20_body">And the crystal became nothing more than a simple reading lens once again.</text:p>
      <text:p text:style-name="Text_20_body">Dahg remained motionless.</text:p>
      <text:p text:style-name="Text_20_body">He could not take his eyes away from it.</text:p>
      <text:p text:style-name="Text_20_body">He had just seen himself lose the wagon.</text:p>
      <text:p text:style-name="Text_20_body">His wagon.</text:p>
      <text:p text:style-name="Text_20_body">The very one he had worked for years to obtain.</text:p>
      <text:p text:style-name="Text_20_body">The one into which he had invested all his savings.</text:p>
      <text:p text:style-name="Text_20_body">Without it, he would not be able to transport goods.</text:p>
      <text:p text:style-name="Text_20_body">He would not be able to expand his business.</text:p>
      <text:p text:style-name="Text_20_body">He would not be able to recover from the losses he had suffered after the fire.</text:p>
      <text:p text:style-name="Text_20_body">That wagon was not a luxury.</text:p>
      <text:p text:style-name="Text_20_body">It was his future.</text:p>
      <text:p text:style-name="Text_20_body">He slowly rose from the chair.</text:p>
      <text:p text:style-name="Text_20_body"><text:soft-page-break/>And began walking around the room.</text:p>
      <text:p text:style-name="Text_20_body">This was serious.</text:p>
      <text:p text:style-name="Text_20_body">A warning.</text:p>
      <text:p text:style-name="Text_20_body">He stepped away from the table and continued working in the shop for the rest of the day.</text:p>
      <text:p text:style-name="Text_20_body">He tried to focus on his customers.</text:p>
      <text:p text:style-name="Text_20_body">He organized merchandise.</text:p>
      <text:p text:style-name="Text_20_body">He tried to think about anything else.</text:p>
      <text:p text:style-name="Text_20_body">But the image of the bridge kept returning again and again.</text:p>
      <text:p text:style-name="Text_20_body">The trapped wagon.</text:p>
      <text:p text:style-name="Text_20_body">The creaking planks.</text:p>
      <text:p text:style-name="Text_20_body">The bridge slowly collapsing.</text:p>
      <text:p text:style-name="Text_20_body">His own wagon disappearing into the river.</text:p>
      <text:p text:style-name="Text_20_body">That night he went to bed earlier than usual.</text:p>
      <text:p text:style-name="Text_20_body">And he slept poorly.</text:p>
      <text:p text:style-name="Text_20_body">He dreamed of roads that divided into different paths.</text:p>
      <text:p text:style-name="Text_20_body">Of impossible choices.</text:p>
      <text:p text:style-name="Text_20_body">He woke suddenly before dawn.</text:p>
      <text:p text:style-name="Text_20_body">The room was dark.</text:p>
      <text:p text:style-name="Text_20_body">He had already made his decision.</text:p>
      <text:p text:style-name="Text_20_body">He had to get rid of that thing.</text:p>
      <text:p text:style-name="Text_20_body">He did not want to see another vision.</text:p>
      <text:p text:style-name="Text_20_body">He did not want to wonder again what he should change.</text:p>
      <text:p text:style-name="Text_20_body">He did not want to continue living at the mercy of futures that did not yet exist.</text:p>
      <text:p text:style-name="Text_20_body">He dressed.</text:p>
      <text:p text:style-name="Text_20_body">Went downstairs to the shop.</text:p>
      <text:p text:style-name="Text_20_body">And even before opening the doors, he placed the crystal sphere in the display window.</text:p>
      <text:p text:style-name="Text_20_body">He was no longer trying to make a large profit.</text:p>
      <text:p text:style-name="Text_20_body">Not even to earn anything from it.</text:p>
      <text:p text:style-name="Text_20_body">It was enough if he could recover the money he had paid for it.</text:p>
      <text:p text:style-name="Text_20_body">He wanted it gone.</text:p>
      <text:p text:style-name="Text_20_body"><text:soft-page-break/>As soon as possible.</text:p>
      <text:p text:style-name="Text_20_body"/>
      <text:p text:style-name="Horizontal_20_Line"/>
      <text:p text:style-name="Text_20_body"/>
      <text:h text:style-name="Heading_20_3" text:outline-level="3">Part 4 – The Sale</text:h>
      <text:p text:style-name="Text_20_body">That morning he opened the shop with the first rays of sunlight.</text:p>
      <text:p text:style-name="Text_20_body">He was still removing the covers that protected the display window when he heard the door open.</text:p>
      <text:p text:style-name="Text_20_body">A man had just entered.</text:p>
      <text:p text:style-name="Text_20_body">He wore high-quality traveling clothes and carried a leather portfolio under one arm.</text:p>
      <text:p text:style-name="Text_20_body">His appearance was distinguished.</text:p>
      <text:p text:style-name="Text_20_body">He did not look like a nobleman, but rather like an educated man.</text:p>
      <text:p text:style-name="Text_20_body">Someone accustomed to working with documents and books.</text:p>
      <text:p text:style-name="Text_20_body">He glanced around the shop and almost immediately stopped in front of the crystal sphere.</text:p>
      <text:p text:style-name="Text_20_body">“May I see it?” he asked.</text:p>
      <text:p text:style-name="Text_20_body">Dahg nodded.</text:p>
      <text:p text:style-name="Text_20_body">The visitor picked up the object carefully.</text:p>
      <text:p text:style-name="Text_20_body">He examined the ivory carvings.</text:p>
      <text:p text:style-name="Text_20_body">Held the crystal up to the light.</text:p>
      <text:p text:style-name="Text_20_body">Checked the condition of the base.</text:p>
      <text:p text:style-name="Text_20_body">Then he smiled with clear satisfaction.</text:p>
      <text:p text:style-name="Text_20_body">He seemed to know this kind of instrument perfectly.</text:p>
      <text:p text:style-name="Text_20_body">He explained that he was a scribe.</text:p>
      <text:p text:style-name="Text_20_body">He came from Fogliempilate, a city far to the south, in the region of Mezzapianta.</text:p>
      <text:p text:style-name="Text_20_body">He was traveling on business.</text:p>
      <text:p text:style-name="Text_20_body">That very afternoon he would continue on to Pomagrande, following the river trade route.</text:p>
      <text:p text:style-name="Text_20_body">For several minutes they spoke about maps, ancient documents, merchant routes, and methods of copying manuscripts.</text:p>
      <text:p text:style-name="Text_20_body">He was a cultured man.</text:p>
      <text:p text:style-name="Text_20_body">Well-mannered.</text:p>
      <text:p text:style-name="Text_20_body">And extraordinarily pleasant.</text:p>
      <text:p text:style-name="Text_20_body"><text:soft-page-break/>Dahg enjoyed the conversation.</text:p>
      <text:p text:style-name="Text_20_body">And yet, something troubled him.</text:p>
      <text:p text:style-name="Text_20_body">Only a few hours had passed since he had decided to get rid of the sphere.</text:p>
      <text:p text:style-name="Text_20_body">And now, standing before him, was exactly the kind of buyer he needed.</text:p>
      <text:p text:style-name="Text_20_body">A man with money.</text:p>
      <text:p text:style-name="Text_20_body">With enough knowledge to appreciate the object.</text:p>
      <text:p text:style-name="Text_20_body">With a genuine reason to use it.</text:p>
      <text:p text:style-name="Text_20_body">And, on top of that, a traveler who would be leaving the region that very day.</text:p>
      <text:p text:style-name="Text_20_body">He was, in every possible sense, the perfect customer.</text:p>
      <text:p text:style-name="Text_20_body">It had to be a coincidence.</text:p>
      <text:p text:style-name="Text_20_body">There was no doubt about that.</text:p>
      <text:p text:style-name="Text_20_body">But it was a strangely convenient coincidence.</text:p>
      <text:p text:style-name="Text_20_body">Finally, the man placed the sphere back on the counter.</text:p>
      <text:p text:style-name="Text_20_body">“What is your price?” he asked.</text:p>
      <text:p text:style-name="Text_20_body">Only then did Dahg hesitate.</text:p>
      <text:p text:style-name="Text_20_body">His gaze fell upon the crystal.</text:p>
      <text:p text:style-name="Text_20_body">He remembered the white smoke.</text:p>
      <text:p text:style-name="Text_20_body">The images.</text:p>
      <text:p text:style-name="Text_20_body">The fire.</text:p>
      <text:p text:style-name="Text_20_body">The bridge.</text:p>
      <text:p text:style-name="Text_20_body">The feeling of witnessing something no human being should ever know.</text:p>
      <text:p text:style-name="Text_20_body">Should he sell it?</text:p>
      <text:p text:style-name="Text_20_body">That question had no simple answer.</text:p>
      <text:p text:style-name="Text_20_body">He did not know what the sphere truly was.</text:p>
      <text:p text:style-name="Text_20_body">He did not know how it worked.</text:p>
      <text:p text:style-name="Text_20_body">He was not even certain that it was dangerous.</text:p>
      <text:p text:style-name="Text_20_body">After all, the sphere had not caused the fire.</text:p>
      <text:p text:style-name="Text_20_body">Nor had it brought down the bridge.</text:p>
      <text:p text:style-name="Text_20_body">It had only shown something.</text:p>
      <text:p text:style-name="Text_20_body">Information.</text:p>
      <text:p text:style-name="Text_20_body"><text:soft-page-break/>Nothing more.</text:p>
      <text:p text:style-name="Text_20_body">And information was neither good nor bad by itself.</text:p>
      <text:p text:style-name="Text_20_body">Everything depended on what each person chose to do with it.</text:p>
      <text:p text:style-name="Text_20_body">Perhaps, in the right hands, the object could be useful.</text:p>
      <text:p text:style-name="Text_20_body">Perhaps even beneficial.</text:p>
      <text:p text:style-name="Text_20_body">Dahg placed both hands on the counter.</text:p>
      <text:p text:style-name="Text_20_body">He looked at the scribe.</text:p>
      <text:p text:style-name="Text_20_body">And answered:</text:p>
      <text:p text:style-name="Text_20_body">“How much do you believe it is worth?”</text:p>
      <text:p text:style-name="Horizontal_20_Line"/>
      <text:p text:style-name="Text_20_body"/>
      <text:h text:style-name="Heading_20_3" text:outline-level="3">Part 5 – An Imperfect Future</text:h>
      <text:p text:style-name="Text_20_body">In the days that followed, routine once again surrounded the auction house with its continuous, predictable, and comforting rhythm.</text:p>
      <text:p text:style-name="Text_20_body">Life slowly returned to its usual appearance.</text:p>
      <text:p text:style-name="Text_20_body">Weeks turned into months.</text:p>
      <text:p text:style-name="Text_20_body">Autumn came and went.</text:p>
      <text:p text:style-name="Text_20_body">Then winter arrived.</text:p>
      <text:p text:style-name="Text_20_body">And almost without realizing it, Dahg welcomed the arrival of spring.</text:p>
      <text:p text:style-name="Text_20_body">During the winter, he had met the owner of the auction house in Aguasfrías, a village located two days’ journey to the west.</text:p>
      <text:p text:style-name="Text_20_body">After several conversations, they had agreed to form a business partnership.</text:p>
      <text:p text:style-name="Text_20_body">Each year, they would exchange the merchandise they were unable to sell in their respective villages, offering those products to new buyers.</text:p>
      <text:p text:style-name="Text_20_body">The idea seemed promising.</text:p>
      <text:p text:style-name="Text_20_body">And Dahg needed new opportunities.</text:p>
      <text:p text:style-name="Text_20_body">It seemed like the right time of year to travel to Aguasfrías and exchange goods with his new partner.</text:p>
      <text:p text:style-name="Text_20_body">So one morning, he loaded his wagon with several carefully selected pieces, packed some food for the journey, and left Drywind before dawn.</text:p>
      <text:p text:style-name="Text_20_body">The weather was pleasant.</text:p>
      <text:p text:style-name="Text_20_body">There were no clouds in the sky.</text:p>
      <text:p text:style-name="Text_20_body"><text:soft-page-break/>And for several hours he traveled peacefully along the western roads.</text:p>
      <text:p text:style-name="Text_20_body">As he approached the mountainous region, the forest began to surround the path.</text:p>
      <text:p text:style-name="Text_20_body">The trees cast a pleasant shade over the road.</text:p>
      <text:p text:style-name="Text_20_body">The journey was turning out better than expected.</text:p>
      <text:p text:style-name="Text_20_body">And shortly before midday, he reached the old bridge.</text:p>
      <text:p text:style-name="Text_20_body">Then he stopped.</text:p>
      <text:p text:style-name="Text_20_body">There was a wagon on the bridge.</text:p>
      <text:p text:style-name="Text_20_body">Dahg felt a chill run through him.</text:p>
      <text:p text:style-name="Text_20_body">He recognized the scene immediately.</text:p>
      <text:p text:style-name="Text_20_body">He had seen it before.</text:p>
      <text:p text:style-name="Text_20_body">Inside a crystal sphere.</text:p>
      <text:p text:style-name="Text_20_body">He remained motionless, watching.</text:p>
      <text:p text:style-name="Text_20_body">One of the wheels had broken through the wooden decking.</text:p>
      <text:p text:style-name="Text_20_body">The wagon was trapped.</text:p>
      <text:p text:style-name="Text_20_body">From the other side, an unknown man appeared and hurried toward him.</text:p>
      <text:p text:style-name="Text_20_body">The horse had already been released.</text:p>
      <text:p text:style-name="Text_20_body">But the wagon remained on the bridge.</text:p>
      <text:p text:style-name="Text_20_body">Exactly as it had appeared in the vision.</text:p>
      <text:p text:style-name="Text_20_body">The man reached him.</text:p>
      <text:p text:style-name="Text_20_body">His expression showed concern.</text:p>
      <text:p text:style-name="Text_20_body">“Please! Help me! The wheel is trapped between the planks. If I cannot get it out, I will lose it.”</text:p>
      <text:p text:style-name="Text_20_body">Dahg did not answer.</text:p>
      <text:p text:style-name="Text_20_body">He looked at the bridge.</text:p>
      <text:p text:style-name="Text_20_body">Then he looked at the stranger’s wagon.</text:p>
      <text:p text:style-name="Text_20_body">And finally, he turned his eyes toward his own.</text:p>
      <text:p text:style-name="Text_20_body">The new wagon.</text:p>
      <text:p text:style-name="Text_20_body">The wagon he had worked for years to obtain.</text:p>
      <text:p text:style-name="Text_20_body">The stranger spoke again.</text:p>
      <text:p text:style-name="Text_20_body">This time with greater urgency.</text:p>
      <text:p text:style-name="Text_20_body">“Will you help me?”</text:p>
      <text:p text:style-name="Text_20_body"><text:soft-page-break/>Dahg remained still.</text:p>
      <text:p text:style-name="Text_20_body">He looked at the man.</text:p>
      <text:p text:style-name="Text_20_body">He looked at the trapped wagon.</text:p>
      <text:p text:style-name="Text_20_body">And then he looked back at his own.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20T10:47:36.522000000</meta:creation-date>
    <dc:date>2026-07-20T10:54:17.123000000</dc:date>
    <meta:editing-duration>PT6M39S</meta:editing-duration>
    <meta:editing-cycles>4</meta:editing-cycles>
    <meta:generator>LibreOffice/7.3.5.2$Windows_X86_64 LibreOffice_project/184fe81b8c8c30d8b5082578aee2fed2ea847c01</meta:generator>
    <meta:document-statistic meta:table-count="0" meta:image-count="0" meta:object-count="0" meta:page-count="10" meta:paragraph-count="250" meta:word-count="1921" meta:character-count="10731" meta:non-whitespace-character-count="9053"/>
  </office:meta>
</office:document-meta>
</file>