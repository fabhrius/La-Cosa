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Cinzel Decorative" fo:font-style="normal" officeooo:paragraph-rsid="001c2e4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 I</text:h>
      <text:p text:style-name="Text_20_body"/>
      <text:p text:style-name="Text_20_body">"Knowledge changes the observer,<text:line-break/>and the observer changes that which is observed." </text:p>
      <text:p text:style-name="P1">— Fabhrius</text:p>
      <text:p text:style-name="P1"/>
      <text:p text:style-name="Horizontal_20_Line"/>
      <text:p text:style-name="Text_20_body"/>
      <text:p text:style-name="Text_20_body"/>
      <text:h text:style-name="Heading_20_2" text:outline-level="2">Chapter 1: Master Dahg's Auction House</text:h>
      <text:h text:style-name="Heading_20_3" text:outline-level="3">Part 1 – The Shop</text:h>
      <text:p text:style-name="Text_20_body">In a small village called Drywind, there once stood an auction house known as <text:span text:style-name="Emphasis">Master Dahg's Auction House</text:span>.</text:p>
      <text:p text:style-name="Text_20_body">The shop stood at the far end of the market road, just where the last houses of the village gave way to the open fields. It was an old building of weathered wood, darkened by the passing years, with a long covered porch that creaked beneath the weight of every visitor.</text:p>
      <text:p text:style-name="Text_20_body">Outside were displayed used tools, worn chests, and all manner of ordinary objects rescued from oblivion.</text:p>
      <text:p text:style-name="Text_20_body">Inside lay a vast hall where sunlight barely managed to penetrate the narrow, dust-covered windows, leaving most of the room shrouded in shadow.</text:p>
      <text:p text:style-name="Text_20_body">The wavering flames of candles and oil lamps gave the place an air of mystery, casting restless shadows across the walls and making the objects seem to move whenever they were not watched directly.</text:p>
      <text:p text:style-name="Text_20_body">The air smelled of aged parchment, damp wood, and melted wax.</text:p>
      <text:p text:style-name="Text_20_body">Antiquities from distant lands and forgotten ages crowded every corner.</text:p>
      <text:p text:style-name="Text_20_body">Stuffed animals watched from the shelves with dull glass eyes. Strange copper instruments rested upon cluttered tables. Old weapons coated in rust hung from the beams overhead. Mirrors framed in ornate carvings returned dim reflections. Furniture engraved with incomprehensible symbols waited silently in the darkest corners.</text:p>
      <text:p text:style-name="Text_20_body">Every object seemed to hold a story.</text:p>
      <text:p text:style-name="Text_20_body">Memories. Misfortunes. Secrets.</text:p>
      <text:p text:style-name="Text_20_body"><text:soft-page-break/>All preserved within the memory of a silent witness.</text:p>
      <text:p text:style-name="Text_20_body">Perhaps they were merely superstitions.</text:p>
      <text:p text:style-name="Text_20_body">Or perhaps they were not.</text:p>
      <text:p text:style-name="Text_20_body">What is certain is that most of the people of Drywind avoided spending too much time inside that shop.</text:p>
      <text:p text:style-name="Text_20_body">Many truly believed that the objects gathered within the auction house were... something more than mere old things.</text:p>
      <text:p text:style-name="Standard"/>
      <text:p text:style-name="Horizontal_20_Line"/>
      <text:p text:style-name="Text_20_body"/>
      <text:h text:style-name="Heading_20_3" text:outline-level="3">Part 2 – Dahg the Shopkeeper</text:h>
      <text:p text:style-name="Text_20_body">The owner of the shop was a fifty-year-old man named Dahg.</text:p>
      <text:p text:style-name="Text_20_body">He lived alone in the rooms above the store.</text:p>
      <text:p text:style-name="Text_20_body">He had no wife, no children, and no other family. Few visitors ever called on him except for matters related to the business.</text:p>
      <text:p text:style-name="Text_20_body">He was a reserved man of few words and simple habits. He attended the village celebrations only when necessary and seldom lingered in long conversations outside the taverns or around the wells. He preferred the quiet company of his ledgers, the order of his shelves, and the silent presence of the objects that filled his shop.</text:p>
      <text:p text:style-name="Text_20_body">Yet those who knew him well understood that beneath his distant manner was an honest man.</text:p>
      <text:p text:style-name="Text_20_body">Dahg remained patient when others lost their temper.</text:p>
      <text:p text:style-name="Text_20_body">He listened before passing judgment.</text:p>
      <text:p text:style-name="Text_20_body">He kept his word even when doing so worked against his own interests.</text:p>
      <text:p text:style-name="Text_20_body">He paid his debts on time and honored every agreement he made, whether great or small.</text:p>
      <text:p text:style-name="Text_20_body">If a widow came to sell an old tool, Dahg offered her a fair price.</text:p>
      <text:p text:style-name="Text_20_body">If a traveler forgot a purse of coins upon the counter, he would find it untouched when he returned to claim it.</text:p>
      <text:p text:style-name="Text_20_body">And when disputes arose between neighbors over the value of some object, it was not uncommon for them to seek the shopkeeper's opinion, trusting that his judgment would be impartial.</text:p>
      <text:p text:style-name="Text_20_body">For that reason, he was respected.</text:p>
      <text:p text:style-name="Text_20_body">But not necessarily understood.</text:p>
      <text:p text:style-name="Text_20_body">For the auction house exerted a strange influence upon the imagination of the villagers.</text:p>
      <text:p text:style-name="Text_20_body"><text:soft-page-break/>Many people in Drywind had crossed the shop's threshold only once or twice in their entire lives. Some avoided it altogether.</text:p>
      <text:p text:style-name="Text_20_body">The place filled them with a discomfort that was difficult to explain.</text:p>
      <text:p text:style-name="Text_20_body">And over time, part of that feeling came to cling to its owner as well.</text:p>
      <text:p text:style-name="Text_20_body">Not because Dahg had ever done anything wrong.</text:p>
      <text:p text:style-name="Text_20_body">Nor because there were any rumors about him.</text:p>
      <text:p text:style-name="Text_20_body">It was simply that people tended to distrust what they did not understand.</text:p>
      <text:p text:style-name="Text_20_body">And for many villagers, it was difficult to separate the man from the collection of strange objects, forgotten relics, and mysterious antiques that filled the auction house.</text:p>
      <text:p text:style-name="Text_20_body">So when they saw Dahg walking through the streets of the village, they greeted him with respect.</text:p>
      <text:p text:style-name="Text_20_body">But more often than not, they waited until he had turned the corner before continuing their conversations.</text:p>
      <text:p text:style-name="Text_20_body"/>
      <text:p text:style-name="Horizontal_20_Line"/>
      <text:p text:style-name="Text_20_body"/>
      <text:h text:style-name="Heading_20_3" text:outline-level="3">Part 3 – Business</text:h>
      <text:p text:style-name="Text_20_body">Life in Drywind moved at a slow pace.</text:p>
      <text:p text:style-name="Text_20_body">The days resembled one another, and the seasons arrived with dependable regularity. Neighbors had known each other for years. Children grew up in the same dirt roads where their parents had once played. Travelers were so rare that the arrival of a stranger could become the subject of conversation for days.</text:p>
      <text:p text:style-name="Text_20_body">For Dahg, that tranquility had its advantages.</text:p>
      <text:p text:style-name="Text_20_body">But it also had its drawbacks.</text:p>
      <text:p text:style-name="Text_20_body">Master Dahg's Auction House was an unusual establishment, and its finest items rarely found buyers among the villagers. Most customers came looking for used tools, simple furniture, or household goods. Yet the most valuable pieces in his collection—ancient relics, ornate furnishings, strange instruments, and objects from distant lands—were beyond the means of nearly everyone in Drywind.</text:p>
      <text:p text:style-name="Text_20_body">His true customers lived in Prosperous City.</text:p>
      <text:p text:style-name="Text_20_body">Nobles, wealthy merchants, scholars, and collectors who appreciated rare curiosities and were willing to pay handsomely for them.</text:p>
      <text:p text:style-name="Text_20_body">As a result, Dahg had become increasingly dependent on trade with the city.</text:p>
      <text:p text:style-name="Text_20_body">Fortunately, over the past few years he had managed to save a considerable amount of money.</text:p>
      <text:p text:style-name="Text_20_body"><text:soft-page-break/>And only a few months earlier, he had made the most important investment of his life.</text:p>
      <text:p text:style-name="Text_20_body">A new wagon.</text:p>
      <text:p text:style-name="Text_20_body">It was a magnificent freight wagon, built by the finest craftsmen in the region. Sturdy, spacious, and far more reliable than the old wagon he had used for years.</text:p>
      <text:p text:style-name="Text_20_body">To anyone else, it might have seemed like nothing more than a tool of the trade.</text:p>
      <text:p text:style-name="Text_20_body">To Dahg, it was something far more important.</text:p>
      <text:p text:style-name="Text_20_body">It represented the future.</text:p>
      <text:p text:style-name="Text_20_body">With it, he would be able to transport more valuable goods, travel to more distant towns, and establish new trade routes. It was the centerpiece of a plan he had spent years carefully preparing.</text:p>
      <text:p text:style-name="Text_20_body">But it was not the only change on the horizon.</text:p>
      <text:p text:style-name="Text_20_body">Long ago, he had inherited a parcel of land south of Drywind. Land he had never used and was now preparing to sell.</text:p>
      <text:p text:style-name="Text_20_body">The transaction was already being handled by a scribe in Prosperous City.</text:p>
      <text:p text:style-name="Text_20_body">Everything seemed to be proceeding exactly as planned.</text:p>
      <text:p text:style-name="Text_20_body">The documents were ready. The agreements were nearly finalized.</text:p>
      <text:p text:style-name="Text_20_body">Dahg had even purchased passage on a riverboat that would carry him downstream to the city in just a few days.</text:p>
      <text:p text:style-name="Text_20_body">If all went well, the sale of the land would provide the capital he needed to expand the business and transform the auction house into something far more profitable.</text:p>
      <text:p text:style-name="Text_20_body">For the first time in many years, the future seemed promising.</text:p>
      <text:p text:style-name="Text_20_body">As he positioned an old suit of armor against one wall of the great hall, he allowed himself a smile.</text:p>
      <text:p text:style-name="Text_20_body">Things were beginning to change.</text:p>
      <text:p text:style-name="Text_20_body">And this time, they would change for the better.</text:p>
      <text:p text:style-name="Text_20_body">That was when the shop door opened.</text:p>
      <text:p text:style-name="Text_20_body">Dahg looked up.</text:p>
      <text:p text:style-name="Text_20_body">An unfamiliar woman had just entered.</text:p>
      <text:p text:style-name="Text_20_body">She did not look like one of his usual customers.</text:p>
      <text:p text:style-name="Text_20_body">Before crossing the threshold, she had lingered for a few moments outside, watching the street. She looked one way, then the other, as though making certain no one had followed her.</text:p>
      <text:p text:style-name="Text_20_body">Only then had she stepped inside.</text:p>
      <text:p text:style-name="Text_20_body">She moved quickly through the shadows of the shop, clutching a bundle wrapped in dark cloth.</text:p>
      <text:p text:style-name="Text_20_body"><text:soft-page-break/>There was something unusual about her.</text:p>
      <text:p text:style-name="Text_20_body">Something difficult to explain.</text:p>
      <text:p text:style-name="Text_20_body">She did not seem frightened.</text:p>
      <text:p text:style-name="Text_20_body">She seemed uneasy.</text:p>
      <text:p text:style-name="Text_20_body">Like someone eager to rid herself of something as quickly as possible.</text:p>
      <text:p text:style-name="Text_20_body">When she reached the counter, she studied Dahg for several seconds.</text:p>
      <text:p text:style-name="Text_20_body">Then she carefully placed the bundle upon the wood and said:</text:p>
      <text:p text:style-name="Text_20_body">"I have something that may interest you."</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inzel Decorative" svg:font-family="'Cinzel 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19T20:30:28.862000000</meta:creation-date>
    <dc:date>2026-07-19T21:05:54.279000000</dc:date>
    <meta:editing-duration>PT10M3S</meta:editing-duration>
    <meta:editing-cycles>4</meta:editing-cycles>
    <meta:generator>LibreOffice/7.3.5.2$Windows_X86_64 LibreOffice_project/184fe81b8c8c30d8b5082578aee2fed2ea847c01</meta:generator>
    <meta:document-statistic meta:table-count="0" meta:image-count="0" meta:object-count="0" meta:page-count="5" meta:paragraph-count="88" meta:word-count="1283" meta:character-count="7497" meta:non-whitespace-character-count="6299"/>
  </office:meta>
</office:document-meta>
</file>