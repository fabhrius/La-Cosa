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apítulo 3</text:h>
      <text:h text:style-name="Heading_20_3" text:outline-level="3">Parte 1 - La visión</text:h>
      <text:p text:style-name="Text_20_body">El cristal ya no mostraba las páginas del libro.</text:p>
      <text:p text:style-name="Text_20_body">Las cifras y las anotaciones habían desaparecido por completo tras aquella extraña niebla blanca que ahora llenaba el interior de la esfera.</text:p>
      <text:p text:style-name="Text_20_body">Dahg se inclinó hacia delante.</text:p>
      <text:p text:style-name="Text_20_body">Intentó descubrir algún defecto en el cristal.</text:p>
      <text:p text:style-name="Text_20_body">Alguna grieta.</text:p>
      <text:p text:style-name="Text_20_body">Alguna impureza.</text:p>
      <text:p text:style-name="Text_20_body">Cualquier explicación razonable para lo que estaba viendo.</text:p>
      <text:p text:style-name="Text_20_body">Pero no encontró ninguna.</text:p>
      <text:p text:style-name="Text_20_body">La niebla continuó moviéndose lentamente.</text:p>
      <text:p text:style-name="Text_20_body">Girando sobre sí misma.</text:p>
      <text:p text:style-name="Text_20_body">Como nubes empujadas por un viento invisible.</text:p>
      <text:p text:style-name="Text_20_body">Y poco a poco comenzó a despejarse.</text:p>
      <text:p text:style-name="Text_20_body">Primero aparecieron sombras.</text:p>
      <text:p text:style-name="Text_20_body">Después formas.</text:p>
      <text:p text:style-name="Text_20_body">Y finalmente una escena completa.</text:p>
      <text:p text:style-name="Text_20_body">Dahg contuvo la respiración.</text:p>
      <text:p text:style-name="Text_20_body">Estaba observando la calle principal de Drywind.</text:p>
      <text:p text:style-name="Text_20_body">La reconoció inmediatamente.</text:p>
      <text:p text:style-name="Text_20_body">La avenida comercial.</text:p>
      <text:p text:style-name="Text_20_body">Las fachadas de las casas.</text:p>
      <text:p text:style-name="Text_20_body">La fuente de piedra situada junto a la plaza.</text:p>
      <text:p text:style-name="Text_20_body">Todo estaba allí.</text:p>
      <text:p text:style-name="Text_20_body">Y entonces se vio a sí mismo.</text:p>
      <text:p text:style-name="Text_20_body">La impresión fue tan intensa que se apartó de golpe de la mesa.</text:p>
      <text:p text:style-name="Text_20_body">Durante unos segundos permaneció inmóvil.</text:p>
      <text:p text:style-name="Text_20_body">Observando.</text:p>
      <text:p text:style-name="Text_20_body"><text:soft-page-break/>Incapaz de comprender.</text:p>
      <text:p text:style-name="Text_20_body">El hombre que aparecía dentro de la esfera era él.</text:p>
      <text:p text:style-name="Text_20_body">No existía ninguna duda.</text:p>
      <text:p text:style-name="Text_20_body">Su misma ropa.</text:p>
      <text:p text:style-name="Text_20_body">Su mismo sombrero.</text:p>
      <text:p text:style-name="Text_20_body">Su misma forma de caminar.</text:p>
      <text:p text:style-name="Text_20_body">La escena mostraba el momento en que cerraba las puertas de la almoneda al final de la jornada.</text:p>
      <text:p text:style-name="Text_20_body">El sol estaba descendiendo sobre el horizonte.</text:p>
      <text:p text:style-name="Text_20_body">Las sombras eran largas.</text:p>
      <text:p text:style-name="Text_20_body">Y la luz tenía ese color rojizo característico de los últimos momentos de la tarde.</text:p>
      <text:p text:style-name="Text_20_body">Dahg volvió a acercarse lentamente.</text:p>
      <text:p text:style-name="Text_20_body">La imagen era imposible.</text:p>
      <text:p text:style-name="Text_20_body">Y sin embargo estaba allí.</text:p>
      <text:p text:style-name="Text_20_body">Frente a sus ojos.</text:p>
      <text:p text:style-name="Text_20_body">Esperándolo.</text:p>
      <text:p text:style-name="Text_20_body">En la calle aparecía también la señora Alhat.</text:p>
      <text:p text:style-name="Text_20_body">La anciana aguardaba sentada sobre el pescante de su carreta, tirada por la vieja mula que utilizaba para transportar mercancías entre Drywind y los pueblos vecinos.</text:p>
      <text:p text:style-name="Text_20_body">Dahg observó cómo su otro yo se acercaba.</text:p>
      <text:p text:style-name="Text_20_body">Intercambiaban algunas palabras.</text:p>
      <text:p text:style-name="Text_20_body">Después subía a la carreta y ambos partían juntos por la avenida principal.</text:p>
      <text:p text:style-name="Text_20_body">La esfera no emitía sonido alguno.</text:p>
      <text:p text:style-name="Text_20_body">Todo ocurría en absoluto silencio.</text:p>
      <text:p text:style-name="Text_20_body">Como si estuviera observando una representación teatral interpretada por fantasmas.</text:p>
      <text:p text:style-name="Text_20_body">La carreta avanzó lentamente hasta el final de la avenida.</text:p>
      <text:p text:style-name="Text_20_body">Allí se detuvo junto a la casa de Omhp.</text:p>
      <text:p text:style-name="Text_20_body">El viejo granjero salió al camino.</text:p>
      <text:p text:style-name="Text_20_body">Parecía estar conversando con ellos.</text:p>
      <text:p text:style-name="Text_20_body">Los tres permanecieron hablando durante varios minutos.</text:p>
      <text:p text:style-name="Text_20_body">Luego la carreta continuó avanzando.</text:p>
      <text:p text:style-name="Text_20_body"><text:soft-page-break/>La imagen cambió.</text:p>
      <text:p text:style-name="Text_20_body">Ahora mostraba el camino que conducía hacia el río.</text:p>
      <text:p text:style-name="Text_20_body">Las sombras se habían alargado todavía más.</text:p>
      <text:p text:style-name="Text_20_body">El viaje parecía desarrollarse con normalidad.</text:p>
      <text:p text:style-name="Text_20_body">Hasta que sucedió algo extraño.</text:p>
      <text:p text:style-name="Text_20_body">Un intenso relámpago cruzó el cielo.</text:p>
      <text:p text:style-name="Text_20_body">Incluso dentro de la esfera el destello resultó impresionante.</text:p>
      <text:p text:style-name="Text_20_body">Y en ese mismo instante la mula se detuvo.</text:p>
      <text:p text:style-name="Text_20_body">Simplemente dejó de caminar.</text:p>
      <text:p text:style-name="Text_20_body">Dahg observó cómo la señora Alhat tiraba de las riendas.</text:p>
      <text:p text:style-name="Text_20_body">Después cómo descendía de la carreta.</text:p>
      <text:p text:style-name="Text_20_body">Su otro yo también bajaba.</text:p>
      <text:p text:style-name="Text_20_body">Ambos parecían intentar convencer al animal para que continuara avanzando.</text:p>
      <text:p text:style-name="Text_20_body">Pero la mula permanecía inmóvil.</text:p>
      <text:p text:style-name="Text_20_body">Como una estatua.</text:p>
      <text:p text:style-name="Text_20_body">La escena continuó durante largo rato.</text:p>
      <text:p text:style-name="Text_20_body">Minutos enteros.</text:p>
      <text:p text:style-name="Text_20_body">Una demora absurda e inexplicable.</text:p>
      <text:p text:style-name="Text_20_body">Finalmente vio cómo se despedía de la señora Alhat.</text:p>
      <text:p text:style-name="Text_20_body">Después reanudaba el viaje a pie.</text:p>
      <text:p text:style-name="Text_20_body">La esfera volvió a cambiar.</text:p>
      <text:p text:style-name="Text_20_body">Ahora mostraba la granja de Penht.</text:p>
      <text:p text:style-name="Text_20_body">El joven apareció saliendo de uno de los establos.</text:p>
      <text:p text:style-name="Text_20_body">Dahg sintió una leve sonrisa al reconocerlo.</text:p>
      <text:p text:style-name="Text_20_body">Apreciaba a Penht como si fuera el hijo que nunca había tenido.</text:p>
      <text:p text:style-name="Text_20_body">Los dos conversaron unos momentos.</text:p>
      <text:p text:style-name="Text_20_body">Luego Penht señaló hacia el camino.</text:p>
      <text:p text:style-name="Text_20_body">Finalmente ambos subieron a la carreta del muchacho y continuaron juntos hacia el río.</text:p>
      <text:p text:style-name="Text_20_body">La visión avanzó una vez más.</text:p>
      <text:p text:style-name="Text_20_body">Y apareció el muelle.</text:p>
      <text:p text:style-name="Text_20_body"><text:soft-page-break/>Dahg sintió un escalofrío.</text:p>
      <text:p text:style-name="Text_20_body">Conocía perfectamente aquel lugar.</text:p>
      <text:p text:style-name="Text_20_body">Allí era donde debía embarcar dentro de unos días para viajar a Cittaprospera.</text:p>
      <text:p text:style-name="Text_20_body">Observó cómo la carreta se acercaba.</text:p>
      <text:p text:style-name="Text_20_body">Cada vez más.</text:p>
      <text:p text:style-name="Text_20_body">Cada vez más.</text:p>
      <text:p text:style-name="Text_20_body">Hasta que el río apareció ante ellos.</text:p>
      <text:p text:style-name="Text_20_body">Y entonces lo vio.</text:p>
      <text:p text:style-name="Text_20_body">El barco.</text:p>
      <text:p text:style-name="Text_20_body">Ya estaba alejándose del embarcadero.</text:p>
      <text:p text:style-name="Text_20_body">Las velas desplegadas.</text:p>
      <text:p text:style-name="Text_20_body">La corriente empujándolo lentamente río abajo.</text:p>
      <text:p text:style-name="Text_20_body">Demasiado lejos.</text:p>
      <text:p text:style-name="Text_20_body">Demasiado tarde.</text:p>
      <text:p text:style-name="Text_20_body">Dentro de la esfera, Dahg permaneció inmóvil contemplando cómo la embarcación se alejaba.</text:p>
      <text:p text:style-name="Text_20_body">Después pareció decir algo a Penht.</text:p>
      <text:p text:style-name="Text_20_body">Algo que la esfera no permitía escuchar.</text:p>
      <text:p text:style-name="Text_20_body">Los dos permanecieron allí durante unos instantes.</text:p>
      <text:p text:style-name="Text_20_body">Y finalmente dieron media vuelta.</text:p>
      <text:p text:style-name="Text_20_body">La carreta se alejó del muelle.</text:p>
      <text:p text:style-name="Text_20_body">La imagen comenzó a desvanecerse.</text:p>
      <text:p text:style-name="Text_20_body">Las formas perdieron nitidez.</text:p>
      <text:p text:style-name="Text_20_body">El río desapareció.</text:p>
      <text:p text:style-name="Text_20_body">El barco se transformó en una sombra.</text:p>
      <text:p text:style-name="Text_20_body">Y poco después la niebla blanca volvió a llenar el interior del cristal.</text:p>
      <text:p text:style-name="Text_20_body">Dahg permaneció inmóvil.</text:p>
      <text:p text:style-name="Text_20_body">Con la mirada fija sobre la esfera.</text:p>
      <text:p text:style-name="Text_20_body">Intentando comprender qué acababa de presenciar.</text:p>
      <text:p text:style-name="Standard"/>
      <text:p text:style-name="Horizontal_20_Line"/>
      <text:p text:style-name="Text_20_body"><text:soft-page-break/></text:p>
      <text:h text:style-name="Heading_20_3" text:outline-level="3">Parte 2 - El significado</text:h>
      <text:p text:style-name="Text_20_body">Durante varios minutos, Dahg permaneció sentado frente a la mesa sin apartar la vista de la esfera.</text:p>
      <text:p text:style-name="Text_20_body">La niebla había desaparecido.</text:p>
      <text:p text:style-name="Text_20_body">El cristal volvía a ser completamente transparente.</text:p>
      <text:p text:style-name="Text_20_body">Como si nada hubiera ocurrido.</text:p>
      <text:p text:style-name="Text_20_body">Como si la extraña visión hubiera sido una simple ilusión provocada por el cansancio.</text:p>
      <text:p text:style-name="Text_20_body">Pero Dahg sabía que no era así.</text:p>
      <text:p text:style-name="Text_20_body">Había reconocido cada lugar.</text:p>
      <text:p text:style-name="Text_20_body">Cada persona.</text:p>
      <text:p text:style-name="Text_20_body">Cada detalle.</text:p>
      <text:p text:style-name="Text_20_body">Aquello no podía ser una casualidad.</text:p>
      <text:p text:style-name="Text_20_body">Y cuanto más pensaba en ello, más evidente le parecía la respuesta.</text:p>
      <text:p text:style-name="Text_20_body">La esfera estaba mostrando el futuro.</text:p>
      <text:p text:style-name="Text_20_body">Sintió un escalofrío.</text:p>
      <text:p text:style-name="Text_20_body">La idea era absurda.</text:p>
      <text:p text:style-name="Text_20_body">Imposible.</text:p>
      <text:p text:style-name="Text_20_body">Y, sin embargo, explicaba perfectamente lo que acababa de ver.</text:p>
      <text:p text:style-name="Text_20_body">No eran recuerdos.</text:p>
      <text:p text:style-name="Text_20_body">No eran sueños.</text:p>
      <text:p text:style-name="Text_20_body">No eran escenas imaginarias.</text:p>
      <text:p text:style-name="Text_20_body">Eran acontecimientos que todavía no habían sucedido.</text:p>
      <text:p text:style-name="Text_20_body">Se levantó de la silla y comenzó a caminar lentamente por la habitación.</text:p>
      <text:p text:style-name="Text_20_body">Intentando ordenar sus pensamientos.</text:p>
      <text:p text:style-name="Text_20_body">Dentro de unos días debía viajar a Cittaprospera.</text:p>
      <text:p text:style-name="Text_20_body">Todo estaba preparado.</text:p>
      <text:p text:style-name="Text_20_body">Había comprado el pasaje.</text:p>
      <text:p text:style-name="Text_20_body">Había organizado el viaje.</text:p>
      <text:p text:style-name="Text_20_body">Y el escribano lo esperaba para redactar los documentos necesarios para la venta de los terrenos heredados.</text:p>
      <text:p text:style-name="Text_20_body"><text:soft-page-break/>Aquella operación era una de las piezas más importantes de sus planes.</text:p>
      <text:p text:style-name="Text_20_body">Con ese dinero ampliaría el negocio.</text:p>
      <text:p text:style-name="Text_20_body">Adquiriría nuevas mercancías.</text:p>
      <text:p text:style-name="Text_20_body">Buscaría clientes en otros lugares.</text:p>
      <text:p text:style-name="Text_20_body">Y aprovecharía al máximo las posibilidades que le ofrecía la nueva carreta.</text:p>
      <text:p text:style-name="Text_20_body">Por primera vez en muchos años sentía que avanzaba hacia algo mejor.</text:p>
      <text:p text:style-name="Text_20_body">Y ahora la esfera le mostraba que perdería el barco.</text:p>
      <text:p text:style-name="Text_20_body">Se detuvo junto a la ventana.</text:p>
      <text:p text:style-name="Text_20_body">Observó la oscuridad que cubría las calles del pueblo.</text:p>
      <text:p text:style-name="Text_20_body">Perder el barco significaría perder el pasaje.</text:p>
      <text:p text:style-name="Text_20_body">Pero eso era lo de menos.</text:p>
      <text:p text:style-name="Text_20_body">Lo verdaderamente grave sería el retraso.</text:p>
      <text:p text:style-name="Text_20_body">Tal vez el escribano no pudiera recibirlo de nuevo hasta semanas más tarde.</text:p>
      <text:p text:style-name="Text_20_body">Tal vez la venta se aplazara durante meses.</text:p>
      <text:p text:style-name="Text_20_body">Quizá incluso hasta el año siguiente.</text:p>
      <text:p text:style-name="Text_20_body">La idea le produjo una profunda inquietud.</text:p>
      <text:p text:style-name="Text_20_body">No era un hombre joven.</text:p>
      <text:p text:style-name="Text_20_body">Había pasado décadas construyendo aquel negocio.</text:p>
      <text:p text:style-name="Text_20_body">Décadas ahorrando moneda tras moneda.</text:p>
      <text:p text:style-name="Text_20_body">Y aunque rara vez lo admitía en voz alta, comenzaba a sentir el peso de los años.</text:p>
      <text:p text:style-name="Text_20_body">No quería seguir esperando.</text:p>
      <text:p text:style-name="Text_20_body">No quería posponer una vez más los cambios que había planeado durante tanto tiempo.</text:p>
      <text:p text:style-name="Text_20_body">Necesitaba que las cosas avanzaran.</text:p>
      <text:p text:style-name="Text_20_body">Necesitaba que el futuro comenzara por fin.</text:p>
      <text:p text:style-name="Text_20_body">Volvió a mirar la esfera.</text:p>
      <text:p text:style-name="Text_20_body">Y entonces algo cambió en su forma de pensar.</text:p>
      <text:p text:style-name="Text_20_body">La preocupación desapareció poco a poco.</text:p>
      <text:p text:style-name="Text_20_body">Sustituida por una sensación completamente distinta.</text:p>
      <text:p text:style-name="Text_20_body">Ventaja.</text:p>
      <text:p text:style-name="Text_20_body">Porque la visión mostraba algo que todavía no había ocurrido.</text:p>
      <text:p text:style-name="Text_20_body"><text:soft-page-break/>Y eso significaba que aún podía actuar.</text:p>
      <text:p text:style-name="Text_20_body">Comprendió de inmediato cuál era el verdadero valor de aquella información.</text:p>
      <text:p text:style-name="Text_20_body">La esfera no le había mostrado una desgracia inevitable.</text:p>
      <text:p text:style-name="Text_20_body">Le había mostrado un problema antes de que sucediera.</text:p>
      <text:p text:style-name="Text_20_body">Una advertencia.</text:p>
      <text:p text:style-name="Text_20_body">Una oportunidad.</text:p>
      <text:p text:style-name="Text_20_body">Una posibilidad de corregir sus errores antes de cometerlos.</text:p>
      <text:p text:style-name="Text_20_body">Una lenta sonrisa apareció en su rostro.</text:p>
      <text:p text:style-name="Text_20_body">Ahora conocía la causa del retraso.</text:p>
      <text:p text:style-name="Text_20_body">La conversación con Omhp.</text:p>
      <text:p text:style-name="Text_20_body">Los problemas con la mula de la señora Alhat.</text:p>
      <text:p text:style-name="Text_20_body">Las demoras durante el trayecto.</text:p>
      <text:p text:style-name="Text_20_body">Todo estaba ahí.</text:p>
      <text:p text:style-name="Text_20_body">Todo podía evitarse.</text:p>
      <text:p text:style-name="Text_20_body">Se acercó a la mesa.</text:p>
      <text:p text:style-name="Text_20_body">Apoyó una mano sobre el cristal.</text:p>
      <text:p text:style-name="Text_20_body">Y por primera vez desde que había comenzado la visión se sintió tranquilo.</text:p>
      <text:p text:style-name="Text_20_body">—No voy a perder ese barco —murmuró.</text:p>
      <text:p text:style-name="Text_20_body">Después observó nuevamente la esfera.</text:p>
      <text:p text:style-name="Text_20_body">Inmóvil.</text:p>
      <text:p text:style-name="Text_20_body">Silenciosa.</text:p>
      <text:p text:style-name="Text_20_body">Inofensiva.</text:p>
      <text:p text:style-name="Text_20_body">Y pensó que quizá acababa de realizar la mejor compra de toda su vida.</text:p>
      <text:p text:style-name="Text_20_body"/>
      <text:p text:style-name="Text_20_body"/>
      <text:p text:style-name="Horizontal_20_Line"/>
      <text:p text:style-name="Text_20_body"/>
      <text:h text:style-name="Heading_20_3" text:outline-level="3">Parte 3 - El plan</text:h>
      <text:p text:style-name="Text_20_body">La respuesta era evidente.</text:p>
      <text:p text:style-name="Text_20_body"><text:soft-page-break/>No necesitaba cambiar grandes cosas.</text:p>
      <text:p text:style-name="Text_20_body">Solo debía evitar los retrasos.</text:p>
      <text:p text:style-name="Text_20_body">Nada más.</text:p>
      <text:p text:style-name="Text_20_body">Volvió a sentarse junto a la mesa y repasó mentalmente la visión una vez más.</text:p>
      <text:p text:style-name="Text_20_body">La conversación con Omhp.</text:p>
      <text:p text:style-name="Text_20_body">La carreta de la señora Alhat.</text:p>
      <text:p text:style-name="Text_20_body">La mula detenida junto al camino.</text:p>
      <text:p text:style-name="Text_20_body">Cada demora había añadido unos minutos al viaje.</text:p>
      <text:p text:style-name="Text_20_body">Minutos que finalmente le habían costado el barco.</text:p>
      <text:p text:style-name="Text_20_body">Pero ahora conocía el problema.</text:p>
      <text:p text:style-name="Text_20_body">Y conocer el problema era el primer paso para resolverlo.</text:p>
      <text:p text:style-name="Text_20_body">La señora Alhat solía ofrecerle transporte hasta el muelle cuando sus viajes coincidían.</text:p>
      <text:p text:style-name="Text_20_body">Era una buena vecina y siempre estaba dispuesta a ayudar.</text:p>
      <text:p text:style-name="Text_20_body">Sin embargo, su vieja mula tenía fama de ser imprevisible.</text:p>
      <text:p text:style-name="Text_20_body">A veces se detenía sin motivo aparente.</text:p>
      <text:p text:style-name="Text_20_body">Otras veces se negaba a cruzar un puente o avanzar por determinados caminos.</text:p>
      <text:p text:style-name="Text_20_body">Dahg debería haber tenido aquello en cuenta desde el principio.</text:p>
      <text:p text:style-name="Text_20_body">Pero aún estaba a tiempo de corregirlo.</text:p>
      <text:p text:style-name="Text_20_body">Hablaría con ella al día siguiente.</text:p>
      <text:p text:style-name="Text_20_body">Le agradecería su ofrecimiento.</text:p>
      <text:p text:style-name="Text_20_body">Y le explicaría que prefería realizar el trayecto caminando.</text:p>
      <text:p text:style-name="Text_20_body">Después de todo, la distancia no era tan grande.</text:p>
      <text:p text:style-name="Text_20_body">Podía recorrerla perfectamente a pie.</text:p>
      <text:p text:style-name="Text_20_body">Y si evitaba perder tiempo durante el trayecto, llegaría al muelle con margen suficiente.</text:p>
      <text:p text:style-name="Text_20_body">Tampoco se detendría a conversar con Omhp.</text:p>
      <text:p text:style-name="Text_20_body">El viejo granjero era un hombre amable, pero disfrutaba de las conversaciones largas.</text:p>
      <text:p text:style-name="Text_20_body">Aquella vez tendría que disculparse y continuar caminando.</text:p>
      <text:p text:style-name="Text_20_body">Así de sencillo.</text:p>
      <text:p text:style-name="Text_20_body">Cuanto más pensaba en ello, más convencido estaba de que funcionaría.</text:p>
      <text:p text:style-name="Text_20_body">La visión le había mostrado exactamente dónde se encontraba el problema.</text:p>
      <text:p text:style-name="Text_20_body"><text:soft-page-break/>Y él acababa de encontrar la solución.</text:p>
      <text:p text:style-name="Text_20_body">Una sensación de alivio comenzó a reemplazar la preocupación que había sentido momentos antes.</text:p>
      <text:p text:style-name="Text_20_body">Después de todo, tampoco era una cuestión de vida o muerte.</text:p>
      <text:p text:style-name="Text_20_body">No estaba intentando evitar una guerra.</text:p>
      <text:p text:style-name="Text_20_body">Ni una epidemia.</text:p>
      <text:p text:style-name="Text_20_body">Ni una inundación.</text:p>
      <text:p text:style-name="Text_20_body">Ni se estaba incendiando el pueblo.</text:p>
      <text:p text:style-name="Text_20_body">Solo se trataba de llegar a tiempo a un barco.</text:p>
      <text:p text:style-name="Text_20_body">Nada más.</text:p>
      <text:p text:style-name="Text_20_body">Y ahora que conocía los obstáculos, no tenía ninguna razón para fracasar.</text:p>
      <text:p text:style-name="Text_20_body">Finalmente apagó la lámpara.</text:p>
      <text:p text:style-name="Text_20_body">Se acostó.</text:p>
      <text:p text:style-name="Text_20_body">Y durmió mejor de lo que habría imaginado.</text:p>
      <text:p text:style-name="Text_20_body">Durante los días siguientes apenas volvió a pensar en la esfera.</text:p>
      <text:p text:style-name="Text_20_body">Cumplió con sus obligaciones habituales.</text:p>
      <text:p text:style-name="Text_20_body">Atendió a los clientes.</text:p>
      <text:p text:style-name="Text_20_body">Ordenó mercancías.</text:p>
      <text:p text:style-name="Text_20_body">Preparó documentos.</text:p>
      <text:p text:style-name="Text_20_body">Y organizó todo lo necesario para el viaje.</text:p>
      <text:p text:style-name="Text_20_body">Tal y como había decidido, habló con la señora Alhat y rechazó amablemente su ayuda.</text:p>
      <text:p text:style-name="Text_20_body">La anciana pareció sorprendida, pero no insistió.</text:p>
      <text:p text:style-name="Text_20_body">Los preparativos continuaron.</text:p>
      <text:p text:style-name="Text_20_body">Y los días pasaron.</text:p>
      <text:p text:style-name="Text_20_body">Hasta que finalmente llegó la fecha señalada.</text:p>
      <text:p text:style-name="Text_20_body">La tarde del viaje transcurrió con aparente normalidad.</text:p>
      <text:p text:style-name="Text_20_body">Dahg revisó por última vez sus documentos.</text:p>
      <text:p text:style-name="Text_20_body">Comprobó que llevaba consigo el dinero necesario.</text:p>
      <text:p text:style-name="Text_20_body">Y se aseguró de que nada quedara pendiente en la tienda.</text:p>
      <text:p text:style-name="Text_20_body">Solo entonces, cuando estaba a punto de marcharse, sintió regresar una pequeña inquietud.</text:p>
      <text:p text:style-name="Text_20_body">No era miedo.</text:p>
      <text:p text:style-name="Text_20_body"><text:soft-page-break/>Ni tampoco duda.</text:p>
      <text:p text:style-name="Text_20_body">Solo una incómoda sensación que no lograba explicar.</text:p>
      <text:p text:style-name="Text_20_body">Permaneció unos segundos inmóvil junto a la puerta.</text:p>
      <text:p text:style-name="Text_20_body">Recordando la visión.</text:p>
      <text:p text:style-name="Text_20_body">Recordando el barco alejándose por el río.</text:p>
      <text:p text:style-name="Text_20_body">Recordando la extraña niebla que había llenado el cristal.</text:p>
      <text:p text:style-name="Text_20_body">Después negó con la cabeza.</text:p>
      <text:p text:style-name="Text_20_body">Todo aquello ya no importaba.</text:p>
      <text:p text:style-name="Text_20_body">Había previsto los retrasos.</text:p>
      <text:p text:style-name="Text_20_body">Había tomado precauciones.</text:p>
      <text:p text:style-name="Text_20_body">Había corregido el problema.</text:p>
      <text:p text:style-name="Text_20_body">Llegaré a tiempo, se dijo.</text:p>
      <text:p text:style-name="Text_20_body">Y por primera vez en varios días sintió que volvía a tener el control de la situación.</text:p>
      <text:p text:style-name="Text_20_body">Fuera, el sol comenzaba a descender hacia el horizonte.</text:p>
      <text:p text:style-name="Text_20_body">Algunas nubes oscuras se acumulaban lentamente en la distancia.</text:p>
      <text:p text:style-name="Text_20_body">Dahg tomó su sombrero.</text:p>
      <text:p text:style-name="Text_20_body">Abrió la puerta.</text:p>
      <text:p text:style-name="Text_20_body">La cerró tras de sí.</text:p>
      <text:p text:style-name="Text_20_body">Y comenzó a caminar hacia el muelle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5T19:33:57.939000000</meta:creation-date>
    <dc:date>2026-07-05T20:05:49.959000000</dc:date>
    <meta:editing-duration>PT31M51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10" meta:paragraph-count="277" meta:word-count="1848" meta:character-count="11212" meta:non-whitespace-character-count="9641"/>
  </office:meta>
</office:document-meta>
</file>