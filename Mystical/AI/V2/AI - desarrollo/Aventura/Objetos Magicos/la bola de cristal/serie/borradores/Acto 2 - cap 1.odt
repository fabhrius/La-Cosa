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h text:style-name="Heading_20_3" text:outline-level="3">Capítulo 1 - Omhp</text:h>
      <text:h text:style-name="Heading_20_4" text:outline-level="4">1. Dahg inicia la marcha</text:h>
      <text:p text:style-name="Text_20_body">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text:soft-page-break/>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2. El encuentro con Omhp</text:h>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text:soft-page-break/>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text:soft-page-break/>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3. Omhp sale con su carreta</text:h>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text:soft-page-break/>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text:soft-page-break/>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Text_20_body"/>
      <text:p text:style-name="Horizontal_20_Line"/>
      <text:p text:style-name="Text_20_body"/>
      <text:h text:style-name="Heading_20_4" text:outline-level="4">4. El trueno</text:h>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text:soft-page-break/>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Text_20_body"/>
      <text:p text:style-name="Text_20_body"/>
      <text:p text:style-name="Horizontal_20_Line"/>
      <text:p text:style-name="Text_20_body"/>
      <text:p text:style-name="Text_20_body"><text:soft-page-break/></text:p>
      <text:h text:style-name="Heading_20_4" text:outline-level="4">5. Fuego</text:h>
      <text:p text:style-name="Text_20_body">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text:soft-page-break/>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text:soft-page-break/>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06T11:45:30.867000000</dc:date>
    <meta:editing-duration>PT33M29S</meta:editing-duration>
    <meta:editing-cycles>4</meta:editing-cycles>
    <meta:generator>LibreOffice/7.3.5.2$Windows_X86_64 LibreOffice_project/184fe81b8c8c30d8b5082578aee2fed2ea847c01</meta:generator>
    <meta:document-statistic meta:table-count="0" meta:image-count="0" meta:object-count="0" meta:page-count="10" meta:paragraph-count="268" meta:word-count="1826" meta:character-count="11239" meta:non-whitespace-character-count="9683"/>
  </office:meta>
</office:document-meta>
</file>