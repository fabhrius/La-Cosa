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inzel Decorative" svg:font-family="'Cinzel 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Text_20_body">
      <style:paragraph-properties fo:text-align="center" style:justify-single-word="false"/>
      <style:text-properties style:font-name="Cinzel Decorative" fo:font-style="normal" style:font-style-asian="normal" style:font-style-complex="normal"/>
    </style:style>
    <style:style style:name="T1" style:family="text">
      <style:text-properties officeooo:rsid="000ac2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cto II</text:h>
      <text:p text:style-name="Text_20_body"/>
      <text:p text:style-name="P1"><text:span text:style-name="T1">"M</text:span>uchas veces no existe una solución perfecta.</text:p>
      <text:p text:style-name="P1">Solo existe la menos mala.<text:span text:style-name="T1">"</text:span></text:p>
      <text:p text:style-name="P2"><text:span text:style-name="T1"><text:tab/><text:tab/><text:tab/><text:tab/><text:tab/></text:span>— Fabhrius</text:p>
      <text:p text:style-name="Text_20_body"/>
      <text:p text:style-name="Horizontal_20_Line"/>
      <text:h text:style-name="Heading_20_3" text:outline-level="3">Capítulo 1 - Omhp</text:h>
      <text:h text:style-name="Heading_20_4" text:outline-level="4">1. Dahg inicia la marcha</text:h>
      <text:p text:style-name="Text_20_body">El viernes, poco antes de las siete de la tarde, Dahg abandonó la almoneda y emprendió el camino hacia el muelle del río.</text:p>
      <text:p text:style-name="Text_20_body">Llevaba consigo una pequeña bolsa con documentos, algunas monedas y todo lo necesario para el viaje.</text:p>
      <text:p text:style-name="Text_20_body">Era un día importante.</text:p>
      <text:p text:style-name="Text_20_body">En Cittaprospera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Por primera vez en mucho tiempo, el futuro parecía abrirse ante él.</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Solo una de esas tormentas pasajeras que aparecían con frecuencia al final del verano.</text:p>
      <text:p text:style-name="Text_20_body">Dahg avanzó a buen ritmo.</text:p>
      <text:p text:style-name="Text_20_body">Conocía perfectamente el camino.</text:p>
      <text:p text:style-name="Text_20_body">Había recorrido aquella ruta decenas de veces a lo largo de los años.</text:p>
      <text:p text:style-name="Text_20_body"><text:soft-page-break/>Y esta vez no tenía intención de cometer los errores que había visto en la esfera.</text:p>
      <text:p text:style-name="Text_20_body">No viajaría con la señora Alhat.</text:p>
      <text:p text:style-name="Text_20_body">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Sonrió para sí.</text:p>
      <text:p text:style-name="Text_20_body">Todo estaba bajo control.</text:p>
      <text:p text:style-name="Text_20_body">Había salido con tiempo de sobra.</text:p>
      <text:p text:style-name="Text_20_body">Y mientras abandonaba las últimas casas del pueblo, estaba convencido de que nada podría impedirle llegar puntualmente al embarcadero.</text:p>
      <text:p text:style-name="Standard"/>
      <text:p text:style-name="Horizontal_20_Line"/>
      <text:p text:style-name="Text_20_body"/>
      <text:h text:style-name="Heading_20_4" text:outline-level="4">2. El encuentro con Omhp</text:h>
      <text:p text:style-name="Text_20_body">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La esfera se lo había mostrado con claridad.</text:p>
      <text:p text:style-name="Text_20_body">Precisamente allí.</text:p>
      <text:p text:style-name="Text_20_body">Precisamente en aquel lugar.</text:p>
      <text:p text:style-name="Text_20_body">Precisamente con Omhp.</text:p>
      <text:p text:style-name="Text_20_body">Durante un instante estuvo tentado de continuar caminando sin detenerse.</text:p>
      <text:p text:style-name="Text_20_body">Pero descartó la idea inmediatamente.</text:p>
      <text:p text:style-name="Text_20_body">Omhp era un buen vecino.</text:p>
      <text:p text:style-name="Text_20_body">Y además parecía preocupado.</text:p>
      <text:p text:style-name="Text_20_body"><text:soft-page-break/>Ignorarlo habría sido una grosería.</text:p>
      <text:p text:style-name="Text_20_body">Así que se acercó unos pasos y esperó.</text:p>
      <text:p text:style-name="Text_20_body">—Buenas tardes, Dahg.</text:p>
      <text:p text:style-name="Text_20_body">—Buenas tardes, Omhp.</text:p>
      <text:p text:style-name="Text_20_body">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Text_20_body">—Me gustaría ayudarte ahora mismo —respondió—, pero debo llegar al muelle antes de las nueve. Esta noche sale el barco hacia Cittaprospera y no puedo perderlo.</text:p>
      <text:p text:style-name="Text_20_body">El granjero pareció decepcionado.</text:p>
      <text:p text:style-name="Text_20_body">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text:soft-page-break/>—No te preocupes. Lo resolveremos.</text:p>
      <text:p text:style-name="Text_20_body">Los dos hombres intercambiaron unas últimas palabras.</text:p>
      <text:p text:style-name="Text_20_body">Después se estrecharon la mano.</text:p>
      <text:p text:style-name="Text_20_body">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Text_20_body"/>
      <text:p text:style-name="Text_20_body"/>
      <text:p text:style-name="Horizontal_20_Line"/>
      <text:p text:style-name="Text_20_body"/>
      <text:h text:style-name="Heading_20_4" text:outline-level="4">3. Omhp sale con su carreta</text:h>
      <text:p text:style-name="Text_20_body">Omhp permaneció junto a la cerca observando cómo Dahg se alejaba por el camino.</text:p>
      <text:p text:style-name="Text_20_body">El comerciante caminaba a buen ritmo.</text:p>
      <text:p text:style-name="Text_20_body">Sin detenerse.</text:p>
      <text:p text:style-name="Text_20_body">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text:soft-page-break/>Permaneció unos minutos reflexionando.</text:p>
      <text:p text:style-name="Text_20_body">Entonces recordó algo.</text:p>
      <text:p text:style-name="Text_20_body">Cumhp.</text:p>
      <text:p text:style-name="Text_20_body">Su vecino del sur.</text:p>
      <text:p text:style-name="Text_20_body">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Poco después salió conduciendo su vieja carreta.</text:p>
      <text:p text:style-name="Text_20_body">El caballo avanzó por el sendero con paso nervioso.</text:p>
      <text:p text:style-name="Text_20_body">Más inquieto de lo habitual.</text:p>
      <text:p text:style-name="Text_20_body">Omhp lo observó durante unos instantes.</text:p>
      <text:p text:style-name="Text_20_body">El animal movía constantemente las orejas.</text:p>
      <text:p text:style-name="Text_20_body">Sacudía la cabeza.</text:p>
      <text:p text:style-name="Text_20_body">Y golpeaba el suelo con los cascos con una impaciencia difícil de explicar.</text:p>
      <text:p text:style-name="Text_20_body">—¿Qué te ocurre hoy? —murmuró el granjero.</text:p>
      <text:p text:style-name="Text_20_body">No obtuvo respuesta, por supuesto.</text:p>
      <text:p text:style-name="Text_20_body">Solo un nuevo resoplido.</text:p>
      <text:p text:style-name="Text_20_body">Omhp levantó entonces la vista hacia el cielo.</text:p>
      <text:p text:style-name="Text_20_body">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Los animales solían percibir ciertas cosas antes que las personas.</text:p>
      <text:p text:style-name="Text_20_body"><text:soft-page-break/>Sacudió la cabeza.</text:p>
      <text:p text:style-name="Text_20_body">Probablemente no fuera nada.</text:p>
      <text:p text:style-name="Text_20_body">Tiró suavemente de las riendas.</text:p>
      <text:p text:style-name="Text_20_body">Y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Text_20_body">Después de todo, podía acercarlo hasta el muelle.</text:p>
      <text:p text:style-name="Text_20_body">La granja de Cumhp quedaba prácticamente en la misma dirección.</text:p>
      <text:p text:style-name="Text_20_body">Y así Dahg llegaría todavía antes a su barco.</text:p>
      <text:p text:style-name="Text_20_body">Le pareció una buena idea.</text:p>
      <text:p text:style-name="Text_20_body"/>
      <text:p text:style-name="Horizontal_20_Line"/>
      <text:p text:style-name="Text_20_body"/>
      <text:h text:style-name="Heading_20_4" text:outline-level="4">4. El trueno</text:h>
      <text:p text:style-name="Text_20_body">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 acercándose a la curva que conducía hacia los molinos.</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Instantánea.</text:p>
      <text:p text:style-name="Text_20_body">El rayo cayó sobre un árbol situado muy cerca del camino.</text:p>
      <text:p text:style-name="Text_20_body"><text:soft-page-break/>La explosión sacudió el aire.</text:p>
      <text:p text:style-name="Text_20_body">El trueno estalló con una violencia tan repentina que pareció desgarrar el cielo sobre sus cabezas.</text:p>
      <text:p text:style-name="Text_20_body">El caballo se encabritó.</text:p>
      <text:p text:style-name="Text_20_body">Lanzó un relincho de terror.</text:p>
      <text:p text:style-name="Text_20_body">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Sintió un dolor agudo atravesarle la pierna.</text:p>
      <text:p text:style-name="Text_20_body">Después otro en la espalda.</text:p>
      <text:p text:style-name="Text_20_body">Y durante unos segundos fue incapaz de respirar.</text:p>
      <text:p text:style-name="Text_20_body">La carreta pasó junto a él como una masa de madera y hierro fuera de control.</text:p>
      <text:p text:style-name="Text_20_body">Las ruedas rebotaban violentamente sobre las irregularidades del terreno.</text:p>
      <text:p text:style-name="Text_20_body">Omhp seguía aferrado a las riendas.</text:p>
      <text:p text:style-name="Text_20_body">Intentando inútilmente recuperar el control.</text:p>
      <text:p text:style-name="Text_20_body">El caballo continuó acelerando.</text:p>
      <text:p text:style-name="Text_20_body">Cada vez más rápido.</text:p>
      <text:p text:style-name="Text_20_body">Cada vez más lejos.</text:p>
      <text:p text:style-name="Text_20_body"><text:soft-page-break/>Arrastrando la carreta desbocada hacia el pueblo.</text:p>
      <text:p text:style-name="Text_20_body">Y entonces desapareció tras la curva.</text:p>
      <text:p text:style-name="Text_20_body"/>
      <text:p text:style-name="Text_20_body"/>
      <text:p text:style-name="Horizontal_20_Line"/>
      <text:p text:style-name="Text_20_body"/>
      <text:p text:style-name="Text_20_body"/>
      <text:h text:style-name="Heading_20_4" text:outline-level="4">5. Fuego</text:h>
      <text:p text:style-name="Text_20_body">Dahg permaneció tendido junto al camino.</text:p>
      <text:p text:style-name="Text_20_body">Aturdido.</text:p>
      <text:p text:style-name="Text_20_body">Con el corazón golpeándole el pecho.</text:p>
      <text:p text:style-name="Text_20_body">Intentó incorporarse.</text:p>
      <text:p text:style-name="Text_20_body">Un dolor agudo atravesó su rodilla.</text:p>
      <text:p text:style-name="Text_20_body">Volvió a caer al suelo.</text:p>
      <text:p text:style-name="Text_20_body">Apenas podía respirar.</text:p>
      <text:p text:style-name="Text_20_body">Apenas podía pensar.</text:p>
      <text:p text:style-name="Text_20_body">A lo lejos, la carreta continuaba fuera de control.</text:p>
      <text:p text:style-name="Text_20_body">La vio desaparecer tras la curva.</text:p>
      <text:p text:style-name="Text_20_body">Y un instante después escuchó el impacto.</text:p>
      <text:p text:style-name="Text_20_body">Un estruendo seco.</text:p>
      <text:p text:style-name="Text_20_body">Violento.</text:p>
      <text:p text:style-name="Text_20_body">El sonido de madera rompiéndose.</text:p>
      <text:p text:style-name="Text_20_body">De algo pesado atravesando una pared.</text:p>
      <text:p text:style-name="Text_20_body">Después llegaron los gritos.</text:p>
      <text:p text:style-name="Text_20_body">Voces lejanas.</text:p>
      <text:p text:style-name="Text_20_body">Confusas.</text:p>
      <text:p text:style-name="Text_20_body">Alarmadas.</text:p>
      <text:p text:style-name="Text_20_body">Dahg levantó la cabeza.</text:p>
      <text:p text:style-name="Text_20_body">Intentó descubrir qué había sucedido.</text:p>
      <text:p text:style-name="Text_20_body">Durante unos segundos no vio nada.</text:p>
      <text:p text:style-name="Text_20_body"><text:soft-page-break/>Solo las casas del extremo del pueblo.</text:p>
      <text:p text:style-name="Text_20_body">La curva del camino.</text:p>
      <text:p text:style-name="Text_20_body">Y las sombras del atardecer.</text:p>
      <text:p text:style-name="Text_20_body">Entonces apareció el humo.</text:p>
      <text:p text:style-name="Text_20_body">Una columna oscura comenzó a elevarse lentamente hacia el cielo.</text:p>
      <text:p text:style-name="Text_20_body">Era gruesa.</text:p>
      <text:p text:style-name="Text_20_body">Demasiado gruesa.</text:p>
      <text:p text:style-name="Text_20_body">Y aumentaba de tamaño a cada instante.</text:p>
      <text:p text:style-name="Text_20_body">El almacén.</text:p>
      <text:p text:style-name="Text_20_body">La columna parecía surgir del almacén situado junto a la avenida principal.</text:p>
      <text:p text:style-name="Text_20_body">Dahg sintió un escalofrío.</text:p>
      <text:p text:style-name="Text_20_body">No podía ser.</text:p>
      <text:p text:style-name="Text_20_body">No podía haber ocurrido algo tan grave.</text:p>
      <text:p text:style-name="Text_20_body">Intentó ponerse en pie una vez más.</text:p>
      <text:p text:style-name="Text_20_body">El dolor volvió a derribarlo.</text:p>
      <text:p text:style-name="Text_20_body">Y entonces aparecieron las llamas.</text:p>
      <text:p text:style-name="Text_20_body">Al principio fueron pequeñas.</text:p>
      <text:p text:style-name="Text_20_body">Un resplandor anaranjado tras los tejados.</text:p>
      <text:p text:style-name="Text_20_body">Pero crecieron con una rapidez aterradora.</text:p>
      <text:p text:style-name="Text_20_body">Como si hubieran estado esperando una oportunidad para escapar.</text:p>
      <text:p text:style-name="Text_20_body">Una lengua de fuego surgió por encima de una de las paredes.</text:p>
      <text:p text:style-name="Text_20_body">Después otra.</text:p>
      <text:p text:style-name="Text_20_body">Y otra más.</text:p>
      <text:p text:style-name="Text_20_body">En cuestión de segundos el edificio entero parecía arder.</text:p>
      <text:p text:style-name="Text_20_body">Los vecinos comenzaron a correr por las calles.</text:p>
      <text:p text:style-name="Text_20_body">Algunos transportaban cubos.</text:p>
      <text:p text:style-name="Text_20_body">Otros gritaban instrucciones.</text:p>
      <text:p text:style-name="Text_20_body">Otros simplemente huían.</text:p>
      <text:p text:style-name="Text_20_body">El viento sopló.</text:p>
      <text:p text:style-name="Text_20_body">Y las llamas respondieron.</text:p>
      <text:p text:style-name="Text_20_body"><text:soft-page-break/>Se elevaron varios metros sobre los tejados.</text:p>
      <text:p text:style-name="Text_20_body">Avanzando de una construcción a la siguiente.</text:p>
      <text:p text:style-name="Text_20_body">Hambrientas.</text:p>
      <text:p text:style-name="Text_20_body">Implacables.</text:p>
      <text:p text:style-name="Text_20_body">Entonces se produjo una explosión.</text:p>
      <text:p text:style-name="Text_20_body">El estallido resonó por todo Drywind.</text:p>
      <text:p text:style-name="Text_20_body">Una bola de fuego surgió del interior del almacén.</text:p>
      <text:p text:style-name="Text_20_body">Fragmentos de madera ardiente salieron despedidos por el aire.</text:p>
      <text:p text:style-name="Text_20_body">Algunos cayeron sobre edificios cercanos.</text:p>
      <text:p text:style-name="Text_20_body">Y nuevos focos de incendio comenzaron a aparecer.</text:p>
      <text:p text:style-name="Text_20_body">Uno.</text:p>
      <text:p text:style-name="Text_20_body">Dos.</text:p>
      <text:p text:style-name="Text_20_body">Tres.</text:p>
      <text:p text:style-name="Text_20_body">Demasiados.</text:p>
      <text:p text:style-name="Text_20_body">El fuego ya no estaba contenido.</text:p>
      <text:p text:style-name="Text_20_body">Se estaba extendiendo.</text:p>
      <text:p text:style-name="Text_20_body">Dahg observó la escena con horror.</text:p>
      <text:p text:style-name="Text_20_body">Conocía aquellas calles.</text:p>
      <text:p text:style-name="Text_20_body">Conocía aquellas casas.</text:p>
      <text:p text:style-name="Text_20_body">Conocía a las personas que vivían en ellas.</text:p>
      <text:p text:style-name="Text_20_body">Y ahora veía cómo las llamas avanzaban sobre el pueblo como una criatura viva.</text:p>
      <text:p text:style-name="Text_20_body">Devorándolo todo a su paso.</text:p>
      <text:p text:style-name="Text_20_body">Intentó arrastrarse.</text:p>
      <text:p text:style-name="Text_20_body">Intentó acercarse.</text:p>
      <text:p text:style-name="Text_20_body">Intentó hacer algo.</text:p>
      <text:p text:style-name="Text_20_body">Cualquier cosa.</text:p>
      <text:p text:style-name="Text_20_body">Pero la pierna no respondió.</text:p>
      <text:p text:style-name="Text_20_body">Solo consiguió avanzar unos pocos centímetros antes de detenerse.</text:p>
      <text:p text:style-name="Text_20_body">Incapaz de continuar.</text:p>
      <text:p text:style-name="Text_20_body">Incapaz de ayudar.</text:p>
      <text:p text:style-name="Text_20_body"><text:soft-page-break/>Incapaz siquiera de acercarse.</text:p>
      <text:p text:style-name="Text_20_body">Y mientras el humo oscurecía el cielo del atardecer, Dahg permaneció inmóvil junto al camino, contemplando cómo Drywind comenzaba a arder.</text:p>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inzel Decorative" svg:font-family="'Cinzel 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6T11:11:59.844000000</meta:creation-date>
    <dc:date>2026-07-08T15:13:14.100000000</dc:date>
    <meta:editing-duration>PT36M35S</meta:editing-duration>
    <meta:editing-cycles>5</meta:editing-cycles>
    <meta:generator>LibreOffice/7.3.5.2$Windows_X86_64 LibreOffice_project/184fe81b8c8c30d8b5082578aee2fed2ea847c01</meta:generator>
    <meta:document-statistic meta:table-count="0" meta:image-count="0" meta:object-count="0" meta:page-count="11" meta:paragraph-count="271" meta:word-count="1839" meta:character-count="11327" meta:non-whitespace-character-count="9755"/>
  </office:meta>
</office:document-meta>
</file>