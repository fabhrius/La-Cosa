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Act II</text:h>
      <text:p text:style-name="Text_20_body"><text:span text:style-name="Emphasis">"Many times, there is no perfect solution.<text:line-break/>There is only the least harmful one."</text:span><text:line-break/>— Fabhrius</text:p>
      <text:h text:style-name="Heading_20_2" text:outline-level="2">Chapter 1 – Omhp</text:h>
      <text:h text:style-name="Heading_20_3" text:outline-level="3">Part 1 – Dahg Begins the Journey</text:h>
      <text:p text:style-name="Text_20_body"><text:span text:style-name="Strong_20_Emphasis">Day: Friday. Time: 7 p.m.</text:span></text:p>
      <text:p text:style-name="Text_20_body">Dahg left the auction house and began walking toward the river dock.</text:p>
      <text:p text:style-name="Text_20_body">He carried with him a small bag containing documents, a few coins, and everything he needed for the journey.</text:p>
      <text:p text:style-name="Text_20_body">It was an important day.</text:p>
      <text:p text:style-name="Text_20_body">In Prosperous City, a scribe was waiting for him to prepare the documents for the sale of some land he had inherited many years before. That transaction represented an exceptional opportunity to expand his business and set in motion the plans he had been preparing for so long.</text:p>
      <text:p text:style-name="Text_20_body">He locked the shop door.</text:p>
      <text:p text:style-name="Text_20_body">Out of habit, he checked that the shutters were securely fastened.</text:p>
      <text:p text:style-name="Text_20_body">Then he began to walk.</text:p>
      <text:p text:style-name="Text_20_body">The sun was slowly descending over the rooftops of Drywind.</text:p>
      <text:p text:style-name="Text_20_body">The long shadows of the houses stretched across the main road while a gentle breeze stirred the branches of the trees.</text:p>
      <text:p text:style-name="Text_20_body">Far away, over the plains, a few gray clouds were beginning to gather along the horizon.</text:p>
      <text:p text:style-name="Text_20_body">Nothing unusual.</text:p>
      <text:p text:style-name="Text_20_body">Probably one of those passing storms that often appeared at the end of summer.</text:p>
      <text:p text:style-name="Text_20_body">Dahg continued at a steady pace. He knew the road perfectly well.</text:p>
      <text:p text:style-name="Text_20_body">He had traveled that path dozens of times over the years.</text:p>
      <text:p text:style-name="Text_20_body">And he intended not to repeat the mistakes he had seen in the sphere.</text:p>
      <text:p text:style-name="Text_20_body">He would not travel with Mrs. Alhat.</text:p>
      <text:p text:style-name="Text_20_body">He would not waste time waiting for a stubborn mule.</text:p>
      <text:p text:style-name="Text_20_body">And he would not stop to speak with anyone.</text:p>
      <text:p text:style-name="Text_20_body"><text:soft-page-break/>That was the difference.</text:p>
      <text:p text:style-name="Text_20_body">That was the advantage the vision had given him.</text:p>
      <text:p text:style-name="Text_20_body">He smiled to himself.</text:p>
      <text:p text:style-name="Text_20_body">Everything was under control.</text:p>
      <text:p text:style-name="Text_20_body">He had left with time to spare.</text:p>
      <text:p text:style-name="Text_20_body">And as he left the last houses of the village behind, he was certain that nothing could prevent him from reaching the dock on time.</text:p>
      <text:p text:style-name="Standard"/>
      <text:p text:style-name="Horizontal_20_Line"/>
      <text:p text:style-name="Text_20_body"/>
      <text:h text:style-name="Heading_20_3" text:outline-level="3">Part 2 – The Encounter with Omhp</text:h>
      <text:p text:style-name="Text_20_body">He had not walked very far when he reached the end of the main road.</text:p>
      <text:p text:style-name="Text_20_body">There, beside a small wooden fence, stood Omhp's property.</text:p>
      <text:p text:style-name="Text_20_body">The old farmer was working near the roadside.</text:p>
      <text:p text:style-name="Text_20_body">When he saw Dahg, he raised a hand in greeting.</text:p>
      <text:p text:style-name="Text_20_body">Then he stopped what he was doing and began walking toward him.</text:p>
      <text:p text:style-name="Text_20_body">Dahg felt an uncomfortable sense of familiarity.</text:p>
      <text:p text:style-name="Text_20_body">He had seen this before.</text:p>
      <text:p text:style-name="Text_20_body">The sphere had shown it to him clearly.</text:p>
      <text:p text:style-name="Text_20_body">Right there, in that exact place.</text:p>
      <text:p text:style-name="Text_20_body">With Omhp.</text:p>
      <text:p text:style-name="Text_20_body">For a moment, he was tempted to keep walking without stopping.</text:p>
      <text:p text:style-name="Text_20_body">But he dismissed the idea immediately.</text:p>
      <text:p text:style-name="Text_20_body">Omp was a good neighbor. And besides, he seemed troubled.</text:p>
      <text:p text:style-name="Text_20_body">So Dahg stepped closer and waited.</text:p>
      <text:p text:style-name="Text_20_body">"Good afternoon, Dahg."</text:p>
      <text:p text:style-name="Text_20_body">"Good afternoon, Omhp."</text:p>
      <text:p text:style-name="Text_20_body">The farmer rested both hands on the fence and sighed.</text:p>
      <text:p text:style-name="Text_20_body">"I was wondering if you could give me your opinion about a problem I've been having."</text:p>
      <text:p text:style-name="Text_20_body">Dahg listened carefully.</text:p>
      <text:p text:style-name="Text_20_body"><text:soft-page-break/>Omp explained that over the past few weeks he had discovered numerous tunnels throughout several of his fields. At first, he believed they were caused by a few moles, but the situation appeared to be getting worse.</text:p>
      <text:p text:style-name="Text_20_body">Now he had also found marmot burrows.</text:p>
      <text:p text:style-name="Text_20_body">The animals were damaging the roots of some crops and were beginning to pose a threat to the harvest.</text:p>
      <text:p text:style-name="Text_20_body">"I remember you had something similar happen last year," Omhp said. "I thought perhaps you might know what to do."</text:p>
      <text:p text:style-name="Text_20_body">Dahg nodded slowly.</text:p>
      <text:p text:style-name="Text_20_body">It was true.</text:p>
      <text:p text:style-name="Text_20_body">He had faced similar problems on some land near the river and had managed to solve them after several weeks of work.</text:p>
      <text:p text:style-name="Text_20_body">He understood the farmer's concern perfectly.</text:p>
      <text:p text:style-name="Text_20_body">And he also understood that the conversation could easily continue much longer than was convenient.</text:p>
      <text:p text:style-name="Text_20_body">He glanced briefly toward the road.</text:p>
      <text:p text:style-name="Text_20_body">Then looked back at Omhp.</text:p>
      <text:p text:style-name="Text_20_body">"I would like to help you right now," he replied, "but I need to reach the dock before nine. The riverboat to Prosperous City leaves tonight, and I cannot afford to miss it."</text:p>
      <text:p text:style-name="Text_20_body">The farmer looked disappointed.</text:p>
      <text:p text:style-name="Text_20_body">Only slightly.</text:p>
      <text:p text:style-name="Text_20_body">"I understand."</text:p>
      <text:p text:style-name="Text_20_body">"I'll come back tomorrow afternoon, and we can look at the problem together. We'll inspect the fields and find a solution."</text:p>
      <text:p text:style-name="Text_20_body">Omp's expression softened.</text:p>
      <text:p text:style-name="Text_20_body">"I would appreciate that."</text:p>
      <text:p text:style-name="Text_20_body">"Don't worry. We'll solve it."</text:p>
      <text:p text:style-name="Text_20_body">The two men exchanged a few final words.</text:p>
      <text:p text:style-name="Text_20_body">Then they shook hands.</text:p>
      <text:p text:style-name="Text_20_body">And finally, Dahg continued on his way.</text:p>
      <text:p text:style-name="Text_20_body">As he walked away, he felt a growing sense of satisfaction.</text:p>
      <text:p text:style-name="Text_20_body">The conversation had been brief.</text:p>
      <text:p text:style-name="Text_20_body">Much shorter than the one he had witnessed inside the sphere.</text:p>
      <text:p text:style-name="Text_20_body"><text:soft-page-break/>He had avoided the delay.</text:p>
      <text:p text:style-name="Text_20_body">He had followed his plan.</text:p>
      <text:p text:style-name="Text_20_body">And at the same time, he had not failed to help a neighbor who needed his advice.</text:p>
      <text:p text:style-name="Text_20_body">He smiled to himself.</text:p>
      <text:p text:style-name="Text_20_body">Things were working exactly as he had predicted.</text:p>
      <text:p text:style-name="Text_20_body">Now he only had to keep walking.</text:p>
      <text:p text:style-name="Text_20_body"/>
      <text:p text:style-name="Horizontal_20_Line"/>
      <text:p text:style-name="Text_20_body"/>
      <text:h text:style-name="Heading_20_3" text:outline-level="3">Part 3 – Omhp Leaves with His Wagon</text:h>
      <text:p text:style-name="Text_20_body">Omp remained beside the fence, watching as Dahg walked away along the road.</text:p>
      <text:p text:style-name="Text_20_body">The merchant was moving at a steady pace.</text:p>
      <text:p text:style-name="Text_20_body">Without stopping.</text:p>
      <text:p text:style-name="Text_20_body">Without looking back.</text:p>
      <text:p text:style-name="Text_20_body">After a few minutes, his figure became a small dark silhouette against the plains.</text:p>
      <text:p text:style-name="Text_20_body">And finally disappeared beyond a gentle rise in the land.</text:p>
      <text:p text:style-name="Text_20_body">The old farmer returned to his work.</text:p>
      <text:p text:style-name="Text_20_body">He tried to focus on his tasks.</text:p>
      <text:p text:style-name="Text_20_body">But the marmots continued to occupy his thoughts.</text:p>
      <text:p text:style-name="Text_20_body">The situation was beginning to worry him more than he was willing to admit.</text:p>
      <text:p text:style-name="Text_20_body">If he did not act soon, the harvest could be seriously affected.</text:p>
      <text:p text:style-name="Text_20_body">He remained there for several minutes, thinking.</text:p>
      <text:p text:style-name="Text_20_body">Then he remembered something.</text:p>
      <text:p text:style-name="Text_20_body">Cumhp.</text:p>
      <text:p text:style-name="Text_20_body">His neighbor to the south.</text:p>
      <text:p text:style-name="Text_20_body">The previous year, he had faced similar problems in several of his fields.</text:p>
      <text:p text:style-name="Text_20_body">Perhaps he had already found a solution.</text:p>
      <text:p text:style-name="Text_20_body">And if anyone could offer him good advice, it was probably him.</text:p>
      <text:p text:style-name="Text_20_body">Omp looked toward the road.</text:p>
      <text:p text:style-name="Text_20_body"><text:soft-page-break/>Cumhp's farm was not very far away.</text:p>
      <text:p text:style-name="Text_20_body">He could go.</text:p>
      <text:p text:style-name="Text_20_body">Speak with him.</text:p>
      <text:p text:style-name="Text_20_body">And return before night had fully fallen.</text:p>
      <text:p text:style-name="Text_20_body">The decision seemed reasonable.</text:p>
      <text:p text:style-name="Text_20_body">So he headed toward the stable.</text:p>
      <text:p text:style-name="Text_20_body">And shortly afterward, he rode out driving his old wagon.</text:p>
      <text:p text:style-name="Text_20_body">The horse moved along the path with a nervous step.</text:p>
      <text:p text:style-name="Text_20_body">More restless than usual.</text:p>
      <text:p text:style-name="Text_20_body">It flicked its ears. Shook its head.</text:p>
      <text:p text:style-name="Text_20_body">And struck the ground impatiently with its hooves.</text:p>
      <text:p text:style-name="Text_20_body">"What is wrong with you today?" the farmer murmured.</text:p>
      <text:p text:style-name="Text_20_body">Omp then looked up at the sky.</text:p>
      <text:p text:style-name="Text_20_body">The clouds continued gathering over the plains.</text:p>
      <text:p text:style-name="Text_20_body">The storm that had once seemed distant was beginning to take shape.</text:p>
      <text:p text:style-name="Text_20_body">A massive dark cloud was slowly advancing from the west.</text:p>
      <text:p text:style-name="Text_20_body">Perhaps the horse was reacting to that.</text:p>
      <text:p text:style-name="Text_20_body">Probably nothing to worry about.</text:p>
      <text:p text:style-name="Text_20_body">He gently pulled on the reins and continued forward.</text:p>
      <text:p text:style-name="Text_20_body">It was not long before he spotted Dahg walking along the main road.</text:p>
      <text:p text:style-name="Text_20_body">The merchant was already near the bend that led toward the mills.</text:p>
      <text:p text:style-name="Text_20_body">The distance between them slowly grew smaller.</text:p>
      <text:p text:style-name="Text_20_body">Omp smiled.</text:p>
      <text:p text:style-name="Text_20_body">He thought he could give him a ride to the dock.</text:p>
      <text:p text:style-name="Text_20_body">Cumhp's farm was practically in the same direction.</text:p>
      <text:p text:style-name="Text_20_body">And this way Dahg would still reach his riverboat even earlier.</text:p>
      <text:p text:style-name="Text_20_body">It seemed like a good idea.</text:p>
      <text:p text:style-name="Text_20_body"/>
      <text:p text:style-name="Horizontal_20_Line"/>
      <text:p text:style-name="Text_20_body"/>
      <text:p text:style-name="Text_20_body"><text:soft-page-break/></text:p>
      <text:h text:style-name="Heading_20_3" text:outline-level="3">Part 4 – The Sound of Thunder</text:h>
      <text:p text:style-name="Text_20_body">Omp gently pulled on the reins.</text:p>
      <text:p text:style-name="Text_20_body">The horse began to trot.</text:p>
      <text:p text:style-name="Text_20_body">The distance separating them from Dahg was now very small.</text:p>
      <text:p text:style-name="Text_20_body">Only a few yards.</text:p>
      <text:p text:style-name="Text_20_body">The merchant was walking calmly along the edge of the road.</text:p>
      <text:p text:style-name="Text_20_body">Omp opened his mouth to call out to him.</text:p>
      <text:p text:style-name="Text_20_body">And then it happened.</text:p>
      <text:p text:style-name="Text_20_body">A bolt of lightning tore across the sky.</text:p>
      <text:p text:style-name="Text_20_body">It was not the distant flash of a faraway storm.</text:p>
      <text:p text:style-name="Text_20_body">It was a blinding discharge.</text:p>
      <text:p text:style-name="Text_20_body">Brutal.</text:p>
      <text:p text:style-name="Text_20_body">Instantaneous.</text:p>
      <text:p text:style-name="Text_20_body">The lightning struck a tree standing very close to the road.</text:p>
      <text:p text:style-name="Text_20_body">The explosion shook the air.</text:p>
      <text:p text:style-name="Text_20_body">The thunder erupted with such sudden violence that it seemed to tear the sky apart above them.</text:p>
      <text:p text:style-name="Text_20_body">The horse reared up.</text:p>
      <text:p text:style-name="Text_20_body">It let out a terrified whinny.</text:p>
      <text:p text:style-name="Text_20_body">And bolted forward.</text:p>
      <text:p text:style-name="Text_20_body">Omp pulled on the reins with all his strength.</text:p>
      <text:p text:style-name="Text_20_body">Too late.</text:p>
      <text:p text:style-name="Text_20_body">The animal no longer obeyed.</text:p>
      <text:p text:style-name="Text_20_body">It had panicked.</text:p>
      <text:p text:style-name="Text_20_body">The wagon lunged forward, bouncing violently along the road.</text:p>
      <text:p text:style-name="Text_20_body">"No!"</text:p>
      <text:p text:style-name="Text_20_body">Omp's cry was lost beneath the thunder.</text:p>
      <text:p text:style-name="Text_20_body">Dahg turned just in time to see the horse charging toward him.</text:p>
      <text:p text:style-name="Text_20_body">There was no time to move aside.</text:p>
      <text:p text:style-name="Text_20_body"><text:soft-page-break/>No time to run.</text:p>
      <text:p text:style-name="Text_20_body">No time for anything.</text:p>
      <text:p text:style-name="Text_20_body">The impact was brutal.</text:p>
      <text:p text:style-name="Text_20_body">The horse struck him directly.</text:p>
      <text:p text:style-name="Text_20_body">Dahg was thrown off the road.</text:p>
      <text:p text:style-name="Text_20_body">He rolled across the ground among stones and weeds.</text:p>
      <text:p text:style-name="Text_20_body">A sharp pain shot through his leg.</text:p>
      <text:p text:style-name="Text_20_body">The wagon passed beside him like a mass of wood and iron gone out of control.</text:p>
      <text:p text:style-name="Text_20_body">Omp remained gripping the reins, desperately trying to regain control.</text:p>
      <text:p text:style-name="Text_20_body">The horse kept accelerating.</text:p>
      <text:p text:style-name="Text_20_body">Faster and faster.</text:p>
      <text:p text:style-name="Text_20_body">Farther and farther away.</text:p>
      <text:p text:style-name="Text_20_body">Dragging the runaway wagon toward the village.</text:p>
      <text:p text:style-name="Text_20_body"/>
      <text:p text:style-name="Horizontal_20_Line"/>
      <text:p text:style-name="Text_20_body"/>
      <text:h text:style-name="Heading_20_3" text:outline-level="3">Part 5 – Fire</text:h>
      <text:p text:style-name="Text_20_body">Dahg remained lying beside the road.</text:p>
      <text:p text:style-name="Text_20_body">He was dazed.</text:p>
      <text:p text:style-name="Text_20_body">He tried to stand, but a sharp pain shot through his knee and he collapsed back onto the ground.</text:p>
      <text:p text:style-name="Text_20_body">A moment later, he heard the impact.</text:p>
      <text:p text:style-name="Text_20_body">A dry sound.</text:p>
      <text:p text:style-name="Text_20_body">Violent.</text:p>
      <text:p text:style-name="Text_20_body">The sound of something heavy striking with tremendous force.</text:p>
      <text:p text:style-name="Text_20_body">Of wood breaking apart.</text:p>
      <text:p text:style-name="Text_20_body">Then came the screams.</text:p>
      <text:p text:style-name="Text_20_body">Distant voices.</text:p>
      <text:p text:style-name="Text_20_body">Confused.</text:p>
      <text:p text:style-name="Text_20_body">Alarmed.</text:p>
      <text:p text:style-name="Text_20_body"><text:soft-page-break/>He lifted his head, trying to understand what had happened.</text:p>
      <text:p text:style-name="Text_20_body">For the first few seconds, everything seemed normal.</text:p>
      <text:p text:style-name="Text_20_body">But then the smoke appeared.</text:p>
      <text:p text:style-name="Text_20_body">A dark column began slowly rising into the sky.</text:p>
      <text:p text:style-name="Text_20_body">It seemed to be coming from the warehouse beside the main road.</text:p>
      <text:p text:style-name="Text_20_body">Then he saw the flames.</text:p>
      <text:p text:style-name="Text_20_body">An orange glow flickering behind the rooftops.</text:p>
      <text:p text:style-name="Text_20_body">The building appeared to be burning.</text:p>
      <text:p text:style-name="Text_20_body">The fire quickly became impossible to ignore.</text:p>
      <text:p text:style-name="Text_20_body">It was growing.</text:p>
      <text:p text:style-name="Text_20_body">Shortly afterward, there was an explosion.</text:p>
      <text:p text:style-name="Text_20_body">The blast echoed through the air.</text:p>
      <text:p text:style-name="Text_20_body">He felt the impact in his chest.</text:p>
      <text:p text:style-name="Text_20_body">And as the smoke darkened the evening sky, Dahg remained on the ground beside the road, motionless and helpless.</text:p>
      <text:p text:style-name="Text_20_body">Watching in horror from a distance as Drywind began to bur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20T10:19:22.687000000</meta:creation-date>
    <dc:date>2026-07-20T10:31:45.990000000</dc:date>
    <meta:editing-duration>PT12M22S</meta:editing-duration>
    <meta:editing-cycles>5</meta:editing-cycles>
    <meta:generator>LibreOffice/7.3.5.2$Windows_X86_64 LibreOffice_project/184fe81b8c8c30d8b5082578aee2fed2ea847c01</meta:generator>
    <meta:document-statistic meta:table-count="0" meta:image-count="0" meta:object-count="0" meta:page-count="8" meta:paragraph-count="196" meta:word-count="1592" meta:character-count="8838" meta:non-whitespace-character-count="7435"/>
  </office:meta>
</office:document-meta>
</file>