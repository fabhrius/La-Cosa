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lara había llegado al pueblo durante la noche anterior.</text:p>
      <text:p text:style-name="Text_20_body">La lluvia ya había cesado para entonces, pero el barro seguía cubriendo los caminos y una niebla espesa descendía desde las montañas envolviendo las casas de piedra y madera. Apenas había podido distinguir las calles mientras seguía al posadero hasta una pequeña habitación iluminada por una vela temblorosa.</text:p>
      <text:p text:style-name="Text_20_body">Ahora, sin embargo, todo parecía diferente.</text:p>
      <text:p text:style-name="Text_20_body">La mañana había traído consigo una calma luminosa y extrañamente agradable. El cielo estaba despejado y una suave brisa de primavera recorría el valle haciendo danzar las telas colgadas entre las viviendas. El olor a pan recién hecho flotaba desde el mercado junto a la plaza principal.</text:p>
      <text:p text:style-name="Text_20_body">Elara descendió de la posada con energía renovada.</text:p>
      <text:p text:style-name="Text_20_body">Llevaba semanas viajando por los antiguos territorios de Lluviara siguiendo fragmentos de relatos incompletos acerca de los Acquahrkai, un pueblo desaparecido hacía siglos y rodeado de leyendas imposibles de verificar. Algunos hablaban de templos ocultos bajo las montañas. Otros de conocimientos prohibidos enterrados junto con sus ciudades.</text:p>
      <text:p text:style-name="Text_20_body">Y según los rumores escuchados en el camino, las ruinas de la vieja iglesia del pueblo conservaban símbolos relacionados con ellos.</text:p>
      <text:p text:style-name="Text_20_body">Atravesó lentamente el mercado mientras observaba a los comerciantes instalar sus puestos bajo el sol de la mañana. Algunos aldeanos la miraban con curiosidad; los viajeros eran poco comunes en aquella región olvidada.</text:p>
      <text:p text:style-name="Text_20_body">Al fondo de la calle principal, la iglesia apareció finalmente ante ella.</text:p>
      <text:p text:style-name="Text_20_body">Era mucho más antigua de lo que había imaginado.</text:p>
      <text:p text:style-name="Text_20_body">El campanario estaba parcialmente derrumbado y enormes grietas recorrían los muros laterales. Parte del techo había cedido hacía décadas, permitiendo que la luz y las raíces de algunas plantas invadieran el interior.</text:p>
      <text:p text:style-name="Text_20_body">Aun así, la estructura permanecía en pie.</text:p>
      <text:p text:style-name="Text_20_body">Como un cadáver demasiado obstinado para desaparecer.</text:p>
      <text:p text:style-name="Text_20_body">Elara ascendió los escalones de piedra y empujó cuidadosamente la pesada puerta de madera.</text:p>
      <text:p text:style-name="Text_20_body">El interior estaba frío.</text:p>
      <text:p text:style-name="Text_20_body">La luz atravesaba las aberturas del techo formando columnas doradas entre el polvo suspendido en el aire. Bancos rotos descansaban dispersos entre charcos secos y fragmentos de roca.</text:p>
      <text:p text:style-name="Text_20_body">El silencio era absoluto.</text:p>
      <text:p text:style-name="Text_20_body">Elara comenzó a recorrer las paredes lentamente.</text:p>
      <text:p text:style-name="Text_20_body">Y entonces los vio.</text:p>
      <text:p text:style-name="Text_20_body"><text:soft-page-break/>Grabados.</text:p>
      <text:p text:style-name="Text_20_body">Símbolos antiguos tallados directamente sobre la piedra.</text:p>
      <text:p text:style-name="Text_20_body">Se acercó inmediatamente, sacando su cuaderno y una pequeña barra de carbón para copiar algunos fragmentos todavía legibles. Las formas eran extrañas. Líneas geométricas entrelazadas con figuras circulares y caracteres que no reconocía.</text:p>
      <text:p text:style-name="Text_20_body">No pertenecían a ningún idioma moderno.</text:p>
      <text:p text:style-name="Text_20_body">Aquello despertó su interés de inmediato.</text:p>
      <text:p text:style-name="Text_20_body">Pasó horas examinando cada rincón de la iglesia, limpiando cuidadosamente el polvo de algunas paredes para revelar fragmentos adicionales de escritura.</text:p>
      <text:p text:style-name="Text_20_body">Pero cuanto más exploraba, más evidente resultaba una decepción silenciosa.</text:p>
      <text:p text:style-name="Text_20_body">No había mapas.</text:p>
      <text:p text:style-name="Text_20_body">Ni referencias claras.</text:p>
      <text:p text:style-name="Text_20_body">Ni pistas acerca del antiguo templo de los Acquahrkai.</text:p>
      <text:p text:style-name="Text_20_body">Si aquella información había existido alguna vez, probablemente el tiempo la había destruido siglos atrás.</text:p>
      <text:p text:style-name="Text_20_body">Finalmente, resignada, guardó sus notas y se dirigió hacia la salida.</text:p>
      <text:p text:style-name="Text_20_body">Fue entonces cuando algo llamó su atención.</text:p>
      <text:p text:style-name="Text_20_body">Cerca del altar derrumbado, parcialmente oculto entre piedras y restos de madera, había un pequeño paquete envuelto en lona gris.</text:p>
      <text:p text:style-name="Text_20_body">Elara se detuvo.</text:p>
      <text:p text:style-name="Text_20_body">Aquello no pertenecía al lugar.</text:p>
      <text:p text:style-name="Text_20_body">La tela estaba cubierta de polvo, pero no parecía tan antigua como el resto de la iglesia.</text:p>
      <text:p text:style-name="Text_20_body">La curiosidad pudo más que la prudencia.</text:p>
      <text:p text:style-name="Text_20_body">Se acercó lentamente y se arrodilló junto al paquete. Al desenvolver la lona apareció un objeto cuidadosamente protegido en su interior.</text:p>
      <text:p text:style-name="Text_20_body">Era una esfera de cristal montada sobre una base de madera oscura.</text:p>
      <text:p text:style-name="Text_20_body">La superficie del cristal era perfectamente lisa y transparente.</text:p>
      <text:p text:style-name="Text_20_body">Pero fue la base lo que captó inmediatamente su atención.</text:p>
      <text:p text:style-name="Text_20_body">Extrañas inscripciones habían sido talladas alrededor de la madera formando pequeños símbolos cuneiformes que no había visto jamás.</text:p>
      <text:p text:style-name="Text_20_body">Elara pasó los dedos sobre ellos lentamente.</text:p>
      <text:p text:style-name="Text_20_body">Aquello sí parecía antiguo.</text:p>
      <text:p text:style-name="Text_20_body"><text:soft-page-break/>Muy antiguo.</text:p>
      <text:p text:style-name="Text_20_body">Y valioso.</text:p>
      <text:p text:style-name="Text_20_body">Frunció ligeramente el ceño.</text:p>
      <text:p text:style-name="Text_20_body">¿Qué hacía un objeto así oculto dentro de una iglesia abandonada?</text:p>
      <text:p text:style-name="Text_20_body">Durante unos segundos permaneció observándolo en silencio, como si esperara encontrar alguna explicación en las inscripciones.</text:p>
      <text:p text:style-name="Text_20_body">Pero el objeto permaneció inmóvil.</text:p>
      <text:p text:style-name="Text_20_body">Silencioso.</text:p>
      <text:p text:style-name="Text_20_body">Finalmente volvió a envolverlo cuidadosamente con la lona y lo guardó dentro de su bolso junto a sus herramientas de estudio.</text:p>
      <text:p text:style-name="Text_20_body">Tal vez en otro lugar, con tiempo y luz suficiente, podría descifrar aquellas marcas.</text:p>
      <text:p text:style-name="Text_20_body">Se levantó y abandonó la iglesia.</text:p>
      <text:p text:style-name="Text_20_body">Afuera, el mercado continuaba lleno de vida bajo la luz cálida del mediodía.</text:p>
      <text:p text:style-name="Text_20_body">Pero apenas descendió los escalones de piedra, Elara se detuvo.</text:p>
      <text:p text:style-name="Text_20_body">Al otro lado de la calle había una mujer observándola.</text:p>
      <text:p text:style-name="Text_20_body">Permanecía inmóvil junto a una pared de piedra, parcialmente cubierta por una capa oscura.</text:p>
      <text:p text:style-name="Text_20_body">Y la miraba fijamente.</text:p>
      <text:p text:style-name="Text_20_body">No con curiosidad.</text:p>
      <text:p text:style-name="Text_20_body">Con algo mucho más difícil de definir.</text:p>
      <text:p text:style-name="Text_20_body">Elara dudó unos segundos antes de hablar.</text:p>
      <text:p text:style-name="Text_20_body">—¿Te conozco? —preguntó—. ¿Puedo ayudarte?</text:p>
      <text:p text:style-name="Text_20_body">La mujer se sobresaltó.</text:p>
      <text:p text:style-name="Text_20_body">Como si no esperara que la hubieran descubierto.</text:p>
      <text:p text:style-name="Text_20_body">Desvió rápidamente la mirada, giró sobre sí misma y comenzó a alejarse apresuradamente entre la gente del mercado.</text:p>
      <text:p text:style-name="Text_20_body">—¡Hey! ¡Espera! —gritó Elara casi por impulso.</text:p>
      <text:p text:style-name="Text_20_body">Pero la desconocida dobló la primera esquina de la calle y desapareció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6T12:10:27.876000000</meta:creation-date>
    <dc:date>2026-05-26T12:19:55.938000000</dc:date>
    <meta:editing-duration>PT9M28S</meta:editing-duration>
    <meta:editing-cycles>1</meta:editing-cycles>
    <meta:document-statistic meta:table-count="0" meta:image-count="0" meta:object-count="0" meta:page-count="3" meta:paragraph-count="68" meta:word-count="817" meta:character-count="5275" meta:non-whitespace-character-count="4527"/>
    <meta:generator>LibreOffice/7.3.5.2$Windows_X86_64 LibreOffice_project/184fe81b8c8c30d8b5082578aee2fed2ea847c01</meta:generator>
  </office:meta>
</office:document-meta>
</file>