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La tormenta había desaparecido hacía días.</text:p>
      <text:p text:style-name="Text_20_body">Ahora el cielo sobre la aldea era claro y luminoso, y la lluvia parecía un recuerdo lejano atrapado en el barro seco de las calles. Algunas personas caminaban entre los puestos del mercado improvisado junto a la plaza central. El humo de las chimeneas ascendía lentamente hacia las montañas que rodeaban el valle.</text:p>
      <text:p text:style-name="Text_20_body">La antigua iglesia permanecía en silencio al extremo del pueblo.</text:p>
      <text:p text:style-name="Text_20_body">Olvidada.</text:p>
      <text:p text:style-name="Text_20_body">Como una ruina demasiado vieja para despertar interés.</text:p>
      <text:p text:style-name="Text_20_body">Excepto para Elara.</text:p>
      <text:p text:style-name="Text_20_body">La joven ascendió los escalones de piedra con una pequeña libreta de viaje bajo el brazo. Llevaba ropa sencilla de exploradora y el cabello recogido para evitar que el viento lo arrojara constantemente sobre su rostro.</text:p>
      <text:p text:style-name="Text_20_body">Había llegado aquella mañana desde el norte de Lluviara tras escuchar rumores acerca de antiguos grabados conservados en las paredes de la iglesia abandonada. Según algunos viajeros, pertenecían a los primeros habitantes de la isla.</text:p>
      <text:p text:style-name="Text_20_body">Y Elara llevaba años persiguiendo fragmentos de aquel pasado perdido.</text:p>
      <text:p text:style-name="Text_20_body">Empujó la pesada puerta de madera y entró.</text:p>
      <text:p text:style-name="Text_20_body">La luz del sol atravesaba las grietas del techo derrumbado formando haces dorados sobre el polvo suspendido en el aire.</text:p>
      <text:p text:style-name="Text_20_body">El lugar olía a piedra húmeda y madera antigua.</text:p>
      <text:p text:style-name="Text_20_body">Elara avanzó lentamente observando las paredes.</text:p>
      <text:p text:style-name="Text_20_body">Allí estaban.</text:p>
      <text:p text:style-name="Text_20_body">Símbolos erosionados por el tiempo, apenas visibles bajo capas de suciedad y musgo.</text:p>
      <text:p text:style-name="Text_20_body">Se acercó con interés inmediato.</text:p>
      <text:p text:style-name="Text_20_body">Pasó los dedos cuidadosamente sobre los grabados mientras tomaba notas rápidas en su cuaderno. Algunas formas parecían representar constelaciones. Otras recordaban figuras humanas rodeadas de líneas circulares imposibles de interpretar.</text:p>
      <text:p text:style-name="Text_20_body">Cuanto más observaba aquellos restos, más intrigada parecía.</text:p>
      <text:p text:style-name="Text_20_body">Recorrió la iglesia durante largo rato, deteniéndose aquí y allá para copiar símbolos o examinar fragmentos derrumbados del muro.</text:p>
      <text:p text:style-name="Text_20_body">Finalmente llegó hasta el antiguo altar.</text:p>
      <text:p text:style-name="Text_20_body">Parte del suelo se había hundido bajo las piedras caídas del techo.</text:p>
      <text:p text:style-name="Text_20_body"><text:soft-page-break/>Elara apartó algunos fragmentos de roca para observar mejor una inscripción casi enterrada.</text:p>
      <text:p text:style-name="Text_20_body">Entonces algo llamó su atención.</text:p>
      <text:p text:style-name="Text_20_body">Había un hueco entre las piedras.</text:p>
      <text:p text:style-name="Text_20_body">Frunció ligeramente el ceño.</text:p>
      <text:p text:style-name="Text_20_body">Se arrodilló y comenzó a retirar con cuidado parte de los escombros hasta descubrir un pequeño objeto envuelto en una tela oscura cubierta de polvo.</text:p>
      <text:p text:style-name="Text_20_body">Elara lo observó con curiosidad.</text:p>
      <text:p text:style-name="Text_20_body">No parecía reciente.</text:p>
      <text:p text:style-name="Text_20_body">Desató lentamente la tela.</text:p>
      <text:p text:style-name="Text_20_body">En su interior apareció una esfera de cristal perfectamente lisa, del tamaño de una manzana pequeña.</text:p>
      <text:p text:style-name="Text_20_body">La sostuvo frente a la luz del sol.</text:p>
      <text:p text:style-name="Text_20_body">El cristal era extraño. Demasiado limpio para haber permanecido oculto allí durante años.</text:p>
      <text:p text:style-name="Text_20_body">Pero no ocurrió nada.</text:p>
      <text:p text:style-name="Text_20_body">No había inscripciones.</text:p>
      <text:p text:style-name="Text_20_body">Ni símbolos.</text:p>
      <text:p text:style-name="Text_20_body">Ni mecanismo alguno.</text:p>
      <text:p text:style-name="Text_20_body">Solo una silenciosa esfera transparente.</text:p>
      <text:p text:style-name="Text_20_body">Elara sonrió levemente, intrigada.</text:p>
      <text:p text:style-name="Text_20_body">—Tal vez perteneció a algún sacerdote —murmuró para sí misma.</text:p>
      <text:p text:style-name="Text_20_body">Volvió a envolverla cuidadosamente y la guardó dentro de su bolso junto a sus notas y herramientas de viaje.</text:p>
      <text:p text:style-name="Text_20_body">Después continuó examinando las paredes de la iglesia como si nada hubiera ocurrido.</text:p>
      <text:p text:style-name="Text_20_body">El tiempo pasó.</text:p>
      <text:p text:style-name="Text_20_body">Finalmente el sol comenzó a descender.</text:p>
      <text:p text:style-name="Text_20_body">Elara cerró su cuaderno y caminó hacia la salida.</text:p>
      <text:p text:style-name="Text_20_body">Pero justo antes de cruzar la puerta de la iglesia se detuvo.</text:p>
      <text:p text:style-name="Text_20_body">Algo había cambiado.</text:p>
      <text:p text:style-name="Text_20_body">El pueblo estaba demasiado silencioso.</text:p>
      <text:p text:style-name="Text_20_body">El viento había desaparecido.</text:p>
      <text:p text:style-name="Text_20_body">Y entonces escuchó un sonido.</text:p>
      <text:p text:style-name="Text_20_body"><text:soft-page-break/>Pasos.</text:p>
      <text:p text:style-name="Text_20_body">Lentos.</text:p>
      <text:p text:style-name="Text_20_body">Arriba.</text:p>
      <text:p text:style-name="Text_20_body">Sobre las vigas oscuras del techo derrumbado.</text:p>
      <text:p text:style-name="Text_20_body">Elara levantó la mirada.</text:p>
      <text:p text:style-name="Text_20_body">Pero no vio a nadi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5T19:12:50.201000000</meta:creation-date>
    <dc:date>2026-05-25T19:13:35.832000000</dc:date>
    <meta:editing-duration>PT45S</meta:editing-duration>
    <meta:editing-cycles>1</meta:editing-cycles>
    <meta:document-statistic meta:table-count="0" meta:image-count="0" meta:object-count="0" meta:page-count="3" meta:paragraph-count="55" meta:word-count="531" meta:character-count="3360" meta:non-whitespace-character-count="2884"/>
    <meta:generator>LibreOffice/7.3.5.2$Windows_X86_64 LibreOffice_project/184fe81b8c8c30d8b5082578aee2fed2ea847c01</meta:generator>
  </office:meta>
</office:document-meta>
</file>