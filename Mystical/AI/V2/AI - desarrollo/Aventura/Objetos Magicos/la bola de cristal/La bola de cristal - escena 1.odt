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6e8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La tormenta había caído sobre la aldea antes del anochecer.</text:p>
      <text:p text:style-name="Text_20_body">Ahora, entrada ya la noche, las calles permanecían vacías. El viento silbaba entre los tejados de madera y hacía crujir las viejas estructuras como si todo el pueblo respirara lentamente bajo la lluvia.</text:p>
      <text:p text:style-name="Text_20_body">Un relámpago atravesó el cielo.</text:p>
      <text:p text:style-name="Text_20_body">Por un instante, una figura apareció al fondo de la calle principal.</text:p>
      <text:p text:style-name="Text_20_body">Era una mujer cubierta con una capa oscura empapada por el agua. Caminaba deprisa, casi tropezando sobre el barro y las piedras mojadas. Sus brazos protegían algo oculto bajo la tela, pegado contra su pecho.</text:p>
      <text:p text:style-name="Text_20_body">Miraba constantemente detrás de ella.</text:p>
      <text:p text:style-name="Text_20_body">No como alguien que teme ser visto.</text:p>
      <text:p text:style-name="Text_20_body">Como alguien que teme ser seguido.</text:p>
      <text:p text:style-name="Text_20_body">Las ventanas cerradas de las casas pasaban a ambos lados mientras avanzaba bajo la tormenta. Ninguna luz permanecía encendida. Ninguna voz rompía el sonido de la lluvia.</text:p>
      <text:p text:style-name="Text_20_body">Otro trueno sacudió el cielo.</text:p>
      <text:p text:style-name="Text_20_body">La mujer giró bruscamente hacia un callejón estrecho y desapareció entre las sombras.</text:p>
      <text:p text:style-name="Text_20_body">Descendió unas escaleras de piedra cubiertas de musgo hasta llegar a los restos abandonados de una antigua iglesia. Parte del campanario se había derrumbado hacía años, y una enorme grieta atravesaba uno de los muros laterales.</text:p>
      <text:p text:style-name="Text_20_body">Empujó la puerta de madera.</text:p>
      <text:p text:style-name="Text_20_body">El interior estaba oscuro.</text:p>
      <text:p text:style-name="Text_20_body">El agua caía desde el techo roto formando pequeños charcos sobre el suelo de piedra. Bancos destruidos permanecían apilados contra las paredes como esqueletos olvidados.</text:p>
      <text:p text:style-name="Text_20_body">La mujer avanzó rápidamente entre ellos.</text:p>
      <text:p text:style-name="Text_20_body">Parecía conocer el lugar.</text:p>
      <text:p text:style-name="Text_20_body">Llegó hasta el antiguo altar y se arrodilló junto a una sección derrumbada del suelo. Comenzó a apartar varias piedras sueltas con movimientos apresurados, mirando una y otra vez hacia la entrada.</text:p>
      <text:p text:style-name="Text_20_body">El viento atravesó la iglesia haciendo vibrar las vigas de madera.</text:p>
      <text:p text:style-name="Text_20_body">Por un instante, la mujer se quedó inmóvil.</text:p>
      <text:p text:style-name="Text_20_body">Escuchando.</text:p>
      <text:p text:style-name="Text_20_body">Nada.</text:p>
      <text:p text:style-name="Text_20_body">Solo la tormenta.</text:p>
      <text:p text:style-name="Text_20_body"><text:soft-page-break/>Entonces introdujo aquello que llevaba oculto dentro del hueco bajo las piedras.</text:p>
      <text:p text:style-name="Text_20_body">No llegó a verse qué era.</text:p>
      <text:p text:style-name="Text_20_body">Sus manos temblaban.</text:p>
      <text:p text:style-name="Text_20_body">Volvió a cubrir el escondite cuidadosamente y permaneció allí unos segundos, inmóvil, respirando con dificultad.</text:p>
      <text:p text:style-name="Text_20_body">Un relámpago iluminó el interior de la iglesia.</text:p>
      <text:p text:style-name="Text_20_body">La sombra de la mujer se proyectó gigantesca sobre los muros agrietados.</text:p>
      <text:p text:style-name="Text_20_body">Después se levantó de golpe.</text:p>
      <text:p text:style-name="Text_20_body">Y huyó.</text:p>
      <text:p text:style-name="Text_20_body">Sus pasos resonaron rápidamente sobre la piedra mojada mientras desaparecía por la puerta bajo la lluvia.</text:p>
      <text:p text:style-name="Text_20_body">Afuera, la tormenta continuaba devorando las calles vacías de la aldea.</text:p>
      <text:p text:style-name="Text_20_body">En pocos segundos, la oscuridad volvió a tragarse su figura.</text:p>
      <text:p text:style-name="Standard"/>
      <text:p text:style-name="Standard"/>
      <text:p text:style-name="Standard"/>
      <text:p text:style-name="Standard"/>
      <text:p text:style-name="Standard"/>
      <text:p text:style-name="Standard"/>
      <text:p text:style-name="Horizontal_20_Line"/>
      <text:p text:style-name="Standard"/>
      <text:p text:style-name="Standard"/>
      <text:p text:style-name="Text_20_body">La lluvia caía sobre los tejados de la aldea como si el cielo intentara borrar el mundo.</text:p>
      <text:p text:style-name="P1">Las estrechas calles de piedra estaban vacías. Las ventanas permanecían cerradas, protegidas con tablones y telas gruesas para contener el frío de la tormenta. </text:p>
      <text:p text:style-name="P1">Solo el sonido del viento y el golpeteo del agua rompían el silencio de la noche.</text:p>
      <text:p text:style-name="Text_20_body">Entonces apareció una figura.</text:p>
      <text:p text:style-name="Text_20_body">Una mujer avanzaba deprisa entre las sombras, cubierta con una capa oscura empapada por la lluvia. Sus pasos eran torpes, nerviosos. Miraba constantemente detrás de ella, como si esperara encontrar algo siguiéndola entre la niebla.</text:p>
      <text:p text:style-name="Text_20_body">Apretaba contra su pecho un pequeño envoltorio cubierto por tela negra.</text:p>
      <text:p text:style-name="Text_20_body">Un trueno iluminó la calle durante un instante.</text:p>
      <text:p text:style-name="Text_20_body">Su rostro quedó al descubierto.</text:p>
      <text:p text:style-name="Text_20_body">Tenía los ojos hundidos por el cansancio y el miedo. No parecía una criminal ni una hechicera. Parecía alguien perseguido por algo que ya no comprendía.</text:p>
      <text:p text:style-name="Text_20_body"><text:soft-page-break/>La mujer giró en un callejón estrecho y descendió unas escaleras de piedra que conducían a los restos abandonados de una antigua capilla. Hacía décadas que nadie rezaba allí. El techo estaba parcialmente derrumbado y el interior olía a humedad y ceniza mojada.</text:p>
      <text:p text:style-name="Text_20_body">Entró rápidamente.</text:p>
      <text:p text:style-name="Text_20_body">El viento hizo crujir la puerta de madera a su espalda.</text:p>
      <text:p text:style-name="Text_20_body">Durante unos segundos permaneció inmóvil, escuchando.</text:p>
      <text:p text:style-name="Text_20_body">Nada.</text:p>
      <text:p text:style-name="Text_20_body">Solo la tormenta.</text:p>
      <text:p text:style-name="Text_20_body">Entonces caminó hacia el altar destruido del fondo de la capilla y apartó varias piedras sueltas con manos temblorosas. Debajo había un hueco oculto.</text:p>
      <text:p text:style-name="Text_20_body">La mujer dudó.</text:p>
      <text:p text:style-name="Text_20_body">Sus dedos se cerraron con fuerza alrededor del objeto envuelto.</text:p>
      <text:p text:style-name="Text_20_body">—No… —susurró—. No volveré a escucharte.</text:p>
      <text:p text:style-name="Text_20_body">Desató lentamente la tela.</text:p>
      <text:p text:style-name="Text_20_body">En el interior apareció una pequeña bola de cristal perfectamente transparente.</text:p>
      <text:p text:style-name="Text_20_body">Pero algo en ella resultaba incorrecto.</text:p>
      <text:p text:style-name="Text_20_body">No reflejaba la luz de los relámpagos.</text:p>
      <text:p text:style-name="Text_20_body">La absorbía.</text:p>
      <text:p text:style-name="Text_20_body">En las profundidades del cristal parecían moverse sombras líquidas, apenas visibles, como humo atrapado bajo el hielo.</text:p>
      <text:p text:style-name="Text_20_body">La mujer evitó mirarla directamente.</text:p>
      <text:p text:style-name="Text_20_body">Sus labios comenzaron a temblar.</text:p>
      <text:p text:style-name="Text_20_body">—Solo quería evitarlo… —murmuró con la voz quebrada—. Solo quería que las cosas salieran bien…</text:p>
      <text:p text:style-name="Text_20_body">Cerró los ojos con fuerza.</text:p>
      <text:p text:style-name="Text_20_body">Y entonces ocurrió.</text:p>
      <text:p text:style-name="Text_20_body">La superficie de la esfera se iluminó débilmente.</text:p>
      <text:p text:style-name="Text_20_body">La mujer lanzó un pequeño jadeo de horror.</text:p>
      <text:p text:style-name="Text_20_body">Dentro del cristal apareció una imagen borrosa.</text:p>
      <text:p text:style-name="Text_20_body">Un carruaje volcado.</text:p>
      <text:p text:style-name="Text_20_body">Caballos muertos.</text:p>
      <text:p text:style-name="Text_20_body">Fuego.</text:p>
      <text:p text:style-name="Text_20_body"><text:soft-page-break/>Gritos.</text:p>
      <text:p text:style-name="Text_20_body">La visión cambió.</text:p>
      <text:p text:style-name="Text_20_body">Un niño llorando bajo la lluvia.</text:p>
      <text:p text:style-name="Text_20_body">Después… oscuridad.</text:p>
      <text:p text:style-name="Text_20_body">La mujer dejó escapar un sollozo ahogado y cubrió la esfera con la tela de inmediato.</text:p>
      <text:p text:style-name="Text_20_body">—¡No! ¡Basta!</text:p>
      <text:p text:style-name="Text_20_body">Retrocedió varios pasos, respirando con dificultad.</text:p>
      <text:p text:style-name="Text_20_body">Parecía conocer demasiado bien lo que aquello significaba.</text:p>
      <text:p text:style-name="Text_20_body">Porque no era la visión lo que la aterraba.</text:p>
      <text:p text:style-name="Text_20_body">Era la posibilidad de intentar cambiarla.</text:p>
      <text:p text:style-name="Text_20_body">Miró hacia la puerta de la capilla.</text:p>
      <text:p text:style-name="Text_20_body">Por un instante pareció considerar destruir la esfera.</text:p>
      <text:p text:style-name="Text_20_body">Pero algo la detuvo.</text:p>
      <text:p text:style-name="Text_20_body">Tal vez miedo.</text:p>
      <text:p text:style-name="Text_20_body">Tal vez la sospecha de que no podía destruirse.</text:p>
      <text:p text:style-name="Text_20_body">Con movimientos desesperados, colocó la bola dentro del hueco bajo las piedras y volvió a cubrirla cuidadosamente hasta ocultarla por completo.</text:p>
      <text:p text:style-name="Text_20_body">Luego se levantó.</text:p>
      <text:p text:style-name="Text_20_body">Y huyó.</text:p>
      <text:p text:style-name="Text_20_body">Salió de la capilla casi tropezando, perdiéndose entre la tormenta sin mirar atrás.</text:p>
      <text:p text:style-name="Text_20_body">La lluvia continuó cayendo sobre la vieja construcción abandonada.</text:p>
      <text:p text:style-name="Text_20_body">Los minutos pasaron.</text:p>
      <text:p text:style-name="Text_20_body">El viento silbó entre las grietas de las paredes.</text:p>
      <text:p text:style-name="Text_20_body">Y en la oscuridad, bajo las piedras del altar derrumbado, la bola de cristal volvió a iluminarse lentamente.</text:p>
      <text:p text:style-name="Text_20_body">Como si estuviera esperando a alguien.</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5T18:37:12.821000000</meta:creation-date>
    <dc:date>2026-05-25T18:56:41.756000000</dc:date>
    <meta:editing-duration>PT9M19S</meta:editing-duration>
    <meta:editing-cycles>2</meta:editing-cycles>
    <meta:generator>LibreOffice/7.3.5.2$Windows_X86_64 LibreOffice_project/184fe81b8c8c30d8b5082578aee2fed2ea847c01</meta:generator>
    <meta:document-statistic meta:table-count="0" meta:image-count="0" meta:object-count="0" meta:page-count="4" meta:paragraph-count="94" meta:word-count="934" meta:character-count="5766" meta:non-whitespace-character-count="4927"/>
  </office:meta>
</office:document-meta>
</file>