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nse 1</text:p>
      <text:h text:style-name="Heading_20_3" text:outline-level="3">Capítulo 1</text:h>
      <text:h text:style-name="Heading_20_3" text:outline-level="3">Parte 1 - Financiación</text:h>
      <text:p text:style-name="Text_20_body">Durante horas los tres hombres permanecieron sentados en el interior de la cueva estudiando el nuevo mapa.</text:p>
      <text:p text:style-name="Text_20_body">La emoción del descubrimiento seguía viva, pero poco a poco una realidad incómoda comenzó a imponerse sobre el entusiasmo.</text:p>
      <text:p text:style-name="Text_20_body">El lugar señalado por la cruz no estaba al otro lado del mundo.</text:p>
      <text:p text:style-name="Text_20_body">No se trataba de una travesía imposible.</text:p>
      <text:p text:style-name="Text_20_body">Pero tampoco era un destino que pudieran alcanzar en las condiciones en las que se encontraban.</text:p>
      <text:p text:style-name="Text_20_body">El mapa indicaba una región situada más allá de las montañas, al borde de una vasta extensión pedregosa que ninguno de ellos había visitado jamás.</text:p>
      <text:p text:style-name="Text_20_body">Con un carro y buenos caballos podrían llegar allí en una semana.</text:p>
      <text:p text:style-name="Text_20_body">Tal vez menos.</text:p>
      <text:p text:style-name="Text_20_body">A pie era otra historia.</text:p>
      <text:p text:style-name="Text_20_body">Las distancias se multiplicaban.</text:p>
      <text:p text:style-name="Text_20_body">Las provisiones se agotaban.</text:p>
      <text:p text:style-name="Text_20_body">El agua se convertía en un problema.</text:p>
      <text:p text:style-name="Text_20_body">Y una vez alcanzado el destino todavía necesitarían tiempo para explorar la zona.</text:p>
      <text:p text:style-name="Text_20_body">La conclusión era evidente.</text:p>
      <text:p text:style-name="Text_20_body">Necesitaban recursos.</text:p>
      <text:p text:style-name="Text_20_body">Muchos recursos.</text:p>
      <text:p text:style-name="Text_20_body">Durante un momento nadie dijo nada.</text:p>
      <text:p text:style-name="Text_20_body">Los tres comprendían perfectamente lo que aquello significaba.</text:p>
      <text:p text:style-name="Text_20_body">La expedición anterior los había dejado prácticamente sin nada.</text:p>
      <text:p text:style-name="Text_20_body">La tormenta había destruido buena parte del equipo.</text:p>
      <text:p text:style-name="Text_20_body">Los caballos habían desaparecido.</text:p>
      <text:p text:style-name="Text_20_body">Las provisiones se habían consumido.</text:p>
      <text:p text:style-name="Text_20_body">Las herramientas se habían perdido o roto.</text:p>
      <text:p text:style-name="Text_20_body">Y el dinero que habían reunido para comprar el libro había desaparecido hacía mucho tiempo.</text:p>
      <text:p text:style-name="Text_20_body"><text:soft-page-break/>La búsqueda había devorado todo lo que poseían.</text:p>
      <text:p text:style-name="Text_20_body">Sin embargo, el tesoro parecía ahora más cercano que nunca.</text:p>
      <text:p text:style-name="Text_20_body">Nohk observó la cruz dibujada en el pergamino.</text:p>
      <text:p text:style-name="Text_20_body">Podía sentirla.</text:p>
      <text:p text:style-name="Text_20_body">Como si aquella marca negra estuviera tirando de él.</text:p>
      <text:p text:style-name="Text_20_body">Como si una fuerza invisible lo llamara desde la distancia.</text:p>
      <text:p text:style-name="Text_20_body">Ya no dudaba.</text:p>
      <text:p text:style-name="Text_20_body">Ni siquiera se planteaba la posibilidad de abandonar.</text:p>
      <text:p text:style-name="Text_20_body">Aquella idea había dejado de existir para él.</text:p>
      <text:p text:style-name="Text_20_body">—Necesitamos un carro —dijo finalmente.</text:p>
      <text:p text:style-name="Text_20_body">—Y caballos —añadió Kempht.</text:p>
      <text:p text:style-name="Text_20_body">—Y provisiones para varias semanas —concluyó Johf.</text:p>
      <text:p text:style-name="Text_20_body">Nohk asintió.</text:p>
      <text:p text:style-name="Text_20_body">Su respuesta llegó sin vacilación.</text:p>
      <text:p text:style-name="Text_20_body">—Entonces los conseguiremos.</text:p>
      <text:p text:style-name="Text_20_body">Johf levantó la vista.</text:p>
      <text:p text:style-name="Text_20_body">—¿Con qué dinero?</text:p>
      <text:p text:style-name="Text_20_body">Nohk tardó unos segundos en responder.</text:p>
      <text:p text:style-name="Text_20_body">La respuesta era tan evidente que casi resultaba absurda.</text:p>
      <text:p text:style-name="Text_20_body">—Todavía me quedan las tierras.</text:p>
      <text:p text:style-name="Text_20_body">Nadie habló.</text:p>
      <text:p text:style-name="Text_20_body">Aquellas palabras tenían un peso especial.</text:p>
      <text:p text:style-name="Text_20_body">Las tierras no eran una posesión cualquiera.</text:p>
      <text:p text:style-name="Text_20_body">Eran toda su vida.</text:p>
      <text:p text:style-name="Text_20_body">La pequeña casa junto al río.</text:p>
      <text:p text:style-name="Text_20_body">Los campos.</text:p>
      <text:p text:style-name="Text_20_body">Los animales.</text:p>
      <text:p text:style-name="Text_20_body">Los árboles que había visto crecer desde niño.</text:p>
      <text:p text:style-name="Text_20_body">Todo aquello que había construido con años de trabajo.</text:p>
      <text:p text:style-name="Text_20_body">Todo aquello que una vez había considerado importante.</text:p>
      <text:p text:style-name="Text_20_body"><text:soft-page-break/>Pero Nohk ya no veía ninguna de esas cosas.</text:p>
      <text:p text:style-name="Text_20_body">En su mente sólo existía el tesoro.</text:p>
      <text:p text:style-name="Text_20_body">Sólo existía el objetivo.</text:p>
      <text:p text:style-name="Text_20_body">—Con eso será suficiente —continuó.</text:p>
      <text:p text:style-name="Text_20_body">—Podremos comprar todo lo necesario.</text:p>
      <text:p text:style-name="Text_20_body">Johf intercambió una mirada silenciosa con Kempht.</text:p>
      <text:p text:style-name="Text_20_body">Por primera vez desde que habían iniciado la búsqueda, ambos sintieron algo parecido al miedo.</text:p>
      <text:p text:style-name="Text_20_body">No miedo a la expedición.</text:p>
      <text:p text:style-name="Text_20_body">No miedo al viaje.</text:p>
      <text:p text:style-name="Text_20_body">Miedo a Nohk.</text:p>
      <text:p text:style-name="Text_20_body">Había algo extraño en su forma de hablar.</text:p>
      <text:p text:style-name="Text_20_body">Algo rígido.</text:p>
      <text:p text:style-name="Text_20_body">Obsesivo.</text:p>
      <text:p text:style-name="Text_20_body">Como si el hombre que había encontrado la llave en el bosque hubiera quedado atrás hacía mucho tiempo.</text:p>
      <text:p text:style-name="Text_20_body">Pero ninguno dijo nada.</text:p>
      <text:p text:style-name="Text_20_body">Tal vez porque en el fondo ellos tampoco podían abandonar.</text:p>
      <text:p text:style-name="Text_20_body">Habían llegado demasiado lejos.</text:p>
      <text:p text:style-name="Text_20_body">Habían perdido demasiado.</text:p>
      <text:p text:style-name="Text_20_body">Ghim había muerto.</text:p>
      <text:p text:style-name="Text_20_body">Habían cruzado montañas.</text:p>
      <text:p text:style-name="Text_20_body">Habían arriesgado la vida.</text:p>
      <text:p text:style-name="Text_20_body">Habían soportado hambre, frío y miedo.</text:p>
      <text:p text:style-name="Text_20_body">¿Y para qué?</text:p>
      <text:p text:style-name="Text_20_body">¿Para regresar ahora con las manos vacías?</text:p>
      <text:p text:style-name="Text_20_body">La idea resultaba insoportable.</text:p>
      <text:p text:style-name="Text_20_body">Abandonar significaba aceptar que todo había sido un error.</text:p>
      <text:p text:style-name="Text_20_body">Y ninguno estaba preparado para hacerlo.</text:p>
      <text:p text:style-name="Text_20_body">Regresaron a Oldwood pocos días después.</text:p>
      <text:p text:style-name="Text_20_body">El viaje de vuelta fue rápido.</text:p>
      <text:p text:style-name="Text_20_body"><text:soft-page-break/>Silencioso.</text:p>
      <text:p text:style-name="Text_20_body">Ninguno prestó demasiada atención a los paisajes que meses atrás les habían parecido hermosos.</text:p>
      <text:p text:style-name="Text_20_body">Los bosques.</text:p>
      <text:p text:style-name="Text_20_body">Los senderos.</text:p>
      <text:p text:style-name="Text_20_body">Los campos.</text:p>
      <text:p text:style-name="Text_20_body">Todo había perdido importancia.</text:p>
      <text:p text:style-name="Text_20_body">Ahora eran simples obstáculos entre ellos y el tesoro.</text:p>
      <text:p text:style-name="Text_20_body">Cuando finalmente divisaron las primeras casas del pueblo, Nohk no sintió ninguna alegría.</text:p>
      <text:p text:style-name="Text_20_body">Aquél había sido su hogar.</text:p>
      <text:p text:style-name="Text_20_body">Debería haber sentido alivio.</text:p>
      <text:p text:style-name="Text_20_body">Felicidad.</text:p>
      <text:p text:style-name="Text_20_body">Nostalgia.</text:p>
      <text:p text:style-name="Text_20_body">No sintió nada.</text:p>
      <text:p text:style-name="Text_20_body">Oldwood era sólo una parada.</text:p>
      <text:p text:style-name="Text_20_body">Un lugar donde obtener dinero antes de continuar el viaje.</text:p>
      <text:p text:style-name="Text_20_body">Nada más.</text:p>
      <text:p text:style-name="Text_20_body">Apenas cruzó la entrada del pueblo comenzó a buscar compradores.</text:p>
      <text:p text:style-name="Text_20_body">No descansó.</text:p>
      <text:p text:style-name="Text_20_body">No visitó amigos.</text:p>
      <text:p text:style-name="Text_20_body">No se acercó a la taberna.</text:p>
      <text:p text:style-name="Text_20_body">No caminó hasta el río.</text:p>
      <text:p text:style-name="Text_20_body">Durante días enteros negoció sin descanso.</text:p>
      <text:p text:style-name="Text_20_body">Vendió las tierras.</text:p>
      <text:p text:style-name="Text_20_body">Vendió la casa.</text:p>
      <text:p text:style-name="Text_20_body">Vendió los animales que aún le pertenecían.</text:p>
      <text:p text:style-name="Text_20_body">Vendió herramientas.</text:p>
      <text:p text:style-name="Text_20_body">Vendió muebles.</text:p>
      <text:p text:style-name="Text_20_body">Vendió todo aquello que había formado parte de su vida.</text:p>
      <text:p text:style-name="Text_20_body">Y cada vez que entregaba algo a cambio de monedas experimentaba una extraña sensación de alivio.</text:p>
      <text:p text:style-name="Text_20_body">Como si estuviera desprendiéndose de un peso.</text:p>
      <text:p text:style-name="Text_20_body"><text:soft-page-break/>Como si todas aquellas cosas pertenecieran a otra persona.</text:p>
      <text:p text:style-name="Text_20_body">A un hombre diferente.</text:p>
      <text:p text:style-name="Text_20_body">Un hombre que ya no existía.</text:p>
      <text:p text:style-name="Text_20_body">Johf y Kempht observaron el proceso con creciente inquietud.</text:p>
      <text:p text:style-name="Text_20_body">Al principio intentaron convencerse de que Nohk estaba exagerando.</text:p>
      <text:p text:style-name="Text_20_body">De que aquello era temporal.</text:p>
      <text:p text:style-name="Text_20_body">De que todavía conservaba algo de sentido común.</text:p>
      <text:p text:style-name="Text_20_body">Pero día tras día vieron desaparecer todo lo que poseía.</text:p>
      <text:p text:style-name="Text_20_body">Y comprendieron que hablaba completamente en serio.</text:p>
      <text:p text:style-name="Text_20_body">Entonces comenzaron a hacer cuentas.</text:p>
      <text:p text:style-name="Text_20_body">Y descubrieron algo preocupante.</text:p>
      <text:p text:style-name="Text_20_body">Ellos tampoco tenían demasiado.</text:p>
      <text:p text:style-name="Text_20_body">La primera expedición había consumido casi todos sus recursos.</text:p>
      <text:p text:style-name="Text_20_body">Si querían continuar, también debían arriesgar lo que les quedaba.</text:p>
      <text:p text:style-name="Text_20_body">Durante una noche discutieron largamente.</text:p>
      <text:p text:style-name="Text_20_body">Las dudas aparecieron una vez más.</text:p>
      <text:p text:style-name="Text_20_body">Las mismas preguntas.</text:p>
      <text:p text:style-name="Text_20_body">Los mismos miedos.</text:p>
      <text:p text:style-name="Text_20_body">Y finalmente llegaron a la misma conclusión.</text:p>
      <text:p text:style-name="Text_20_body">Si el tesoro existía, estaban demasiado cerca para detenerse.</text:p>
      <text:p text:style-name="Text_20_body">Al día siguiente vendieron también sus últimas propiedades.</text:p>
      <text:p text:style-name="Text_20_body">Cuando terminaron, los tres hombres contemplaron el resultado de sus decisiones.</text:p>
      <text:p text:style-name="Text_20_body">Un nuevo carro.</text:p>
      <text:p text:style-name="Text_20_body">Dos buenos caballos.</text:p>
      <text:p text:style-name="Text_20_body">Provisiones.</text:p>
      <text:p text:style-name="Text_20_body">Herramientas.</text:p>
      <text:p text:style-name="Text_20_body">Equipo de viaje.</text:p>
      <text:p text:style-name="Text_20_body">Todo listo para partir.</text:p>
      <text:p text:style-name="Text_20_body">Pero algo había cambiado.</text:p>
      <text:p text:style-name="Text_20_body">La primera expedición había comenzado entre risas, sueños y promesas.</text:p>
      <text:p text:style-name="Text_20_body"><text:soft-page-break/>Aquella no.</text:p>
      <text:p text:style-name="Text_20_body">Aquella parecía distinta.</text:p>
      <text:p text:style-name="Text_20_body">Más oscura.</text:p>
      <text:p text:style-name="Text_20_body">Más pesada.</text:p>
      <text:p text:style-name="Text_20_body">Ya no era una aventura.</text:p>
      <text:p text:style-name="Text_20_body">Ya no era una posibilidad emocionante.</text:p>
      <text:p text:style-name="Text_20_body">Era una necesidad.</text:p>
      <text:p text:style-name="Text_20_body">Una obligación.</text:p>
      <text:p text:style-name="Text_20_body">Un camino del que ninguno de ellos sabía cómo regresar.</text:p>
      <text:p text:style-name="Text_20_body">Y mientras observaba el carro preparado para partir, Nohk sintió una satisfacción inquietante.</text:p>
      <text:p text:style-name="Text_20_body">Había apostado todo cuanto poseía.</text:p>
      <text:p text:style-name="Text_20_body">Ya no quedaba nada detrás de él.</text:p>
      <text:p text:style-name="Text_20_body">Sólo el camino hacia adelante.</text:p>
      <text:p text:style-name="Text_20_body">Todo o nada.</text:p>
      <text:p text:style-name="P2">I prefer this response</text:p>
      <text:p text:style-name="P2"/>
      <text:p text:style-name="P2"/>
      <text:p text:style-name="Horizontal_20_Line"/>
      <text:p text:style-name="Text_20_body"/>
      <text:p text:style-name="P2">ChatGPT</text:p>
      <text:p text:style-name="Text_20_body">Response 2</text:p>
      <text:h text:style-name="Heading_20_3" text:outline-level="3">Capítulo 1</text:h>
      <text:h text:style-name="Heading_20_3" text:outline-level="3">Parte 1 - Financiación</text:h>
      <text:p text:style-name="Text_20_body">Durante el camino de regreso, los tres hombres hablaron poco.</text:p>
      <text:p text:style-name="Text_20_body">El nuevo mapa viajaba cuidadosamente protegido entre varias capas de tela, guardado en el interior de la mochila de Nohk. A veces, durante los descansos, lo sacaban y lo examinaban una vez más. Lo extendían sobre una roca, seguían las líneas con el dedo y trataban de imaginar el lugar al que conducía.</text:p>
      <text:p text:style-name="Text_20_body">La cruz marcada en el extremo del pergamino parecía encontrarse en una región lejana pero accesible.</text:p>
      <text:p text:style-name="Text_20_body">No era como el primer destino.</text:p>
      <text:p text:style-name="Text_20_body">No exigía atravesar montañas imposibles ni explorar cavernas interminables.</text:p>
      <text:p text:style-name="Text_20_body"><text:soft-page-break/>Parecía un objetivo concreto.</text:p>
      <text:p text:style-name="Text_20_body">Definido.</text:p>
      <text:p text:style-name="Text_20_body">Alcanzable.</text:p>
      <text:p text:style-name="Text_20_body">Y precisamente por eso resultaba tan peligroso.</text:p>
      <text:p text:style-name="Text_20_body">Porque por primera vez podían imaginar claramente el final de la búsqueda.</text:p>
      <text:p text:style-name="Text_20_body">Con un carro.</text:p>
      <text:p text:style-name="Text_20_body">Con buenos caballos.</text:p>
      <text:p text:style-name="Text_20_body">Con provisiones suficientes.</text:p>
      <text:p text:style-name="Text_20_body">Podían llegar allí en poco más de una semana.</text:p>
      <text:p text:style-name="Text_20_body">Sin ellos, en cambio, la expedición era impensable.</text:p>
      <text:p text:style-name="Text_20_body">Las regiones señaladas en el mapa atravesaban territorios áridos y escasamente habitados. Caminar aquella distancia cargando equipo, herramientas y agua sería una locura.</text:p>
      <text:p text:style-name="Text_20_body">Necesitaban transporte.</text:p>
      <text:p text:style-name="Text_20_body">Necesitaban provisiones.</text:p>
      <text:p text:style-name="Text_20_body">Necesitaban dinero.</text:p>
      <text:p text:style-name="Text_20_body">Mucho dinero.</text:p>
      <text:p text:style-name="Text_20_body">Aquella realidad se volvió más evidente a medida que descendían de las montañas y se acercaban nuevamente a Oldwood.</text:p>
      <text:p text:style-name="Text_20_body">Pero mientras Johf y Kempht discutían sobre costes, rutas y equipamiento, Nohk parecía pensar en otra cosa.</text:p>
      <text:p text:style-name="Text_20_body">Su mente ya no estaba en el camino.</text:p>
      <text:p text:style-name="Text_20_body">Ni en el pueblo.</text:p>
      <text:p text:style-name="Text_20_body">Ni siquiera en sus compañeros.</text:p>
      <text:p text:style-name="Text_20_body">Estaba allí.</text:p>
      <text:p text:style-name="Text_20_body">En algún lugar al otro lado de Lluviara.</text:p>
      <text:p text:style-name="Text_20_body">Junto al tesoro.</text:p>
      <text:p text:style-name="Text_20_body">Durante los últimos días apenas había hablado de otra cosa.</text:p>
      <text:p text:style-name="Text_20_body">Cada nueva conversación terminaba regresando al mismo punto.</text:p>
      <text:p text:style-name="Text_20_body">La cámara.</text:p>
      <text:p text:style-name="Text_20_body">La puerta.</text:p>
      <text:p text:style-name="Text_20_body">La llave.</text:p>
      <text:p text:style-name="Text_20_body"><text:soft-page-break/>El tesoro.</text:p>
      <text:p text:style-name="Text_20_body">A veces Johf observaba a su amigo con inquietud.</text:p>
      <text:p text:style-name="Text_20_body">Había algo extraño en él.</text:p>
      <text:p text:style-name="Text_20_body">Algo que había cambiado.</text:p>
      <text:p text:style-name="Text_20_body">Antes de encontrar la llave, Nohk era un hombre sencillo. Hablaba de cosechas, de caballos, de lluvias y mercados. Disfrutaba de las tardes tranquilas junto al río Bager.</text:p>
      <text:p text:style-name="Text_20_body">Ahora parecía incapaz de pensar en cualquier otra cosa.</text:p>
      <text:p text:style-name="Text_20_body">Como si todo lo demás hubiera perdido significado.</text:p>
      <text:p text:style-name="Text_20_body">Como si el resto del mundo hubiera quedado atrás.</text:p>
      <text:p text:style-name="Text_20_body">Cuando finalmente divisaron las primeras casas de Oldwood, una sensación extraña se apoderó del grupo.</text:p>
      <text:p text:style-name="Text_20_body">Apenas habían pasado unas semanas.</text:p>
      <text:p text:style-name="Text_20_body">Y sin embargo el pueblo parecía pertenecer a otra vida.</text:p>
      <text:p text:style-name="Text_20_body">Las chimeneas humeaban pacíficamente.</text:p>
      <text:p text:style-name="Text_20_body">Los agricultores trabajaban en los campos.</text:p>
      <text:p text:style-name="Text_20_body">Los niños corrían por las calles de tierra.</text:p>
      <text:p text:style-name="Text_20_body">Todo seguía exactamente igual.</text:p>
      <text:p text:style-name="Text_20_body">Pero ellos ya no.</text:p>
      <text:p text:style-name="Text_20_body">Johf sintió una inesperada nostalgia.</text:p>
      <text:p text:style-name="Text_20_body">Por primera vez comprendió cuánto echaba de menos la normalidad.</text:p>
      <text:p text:style-name="Text_20_body">La seguridad.</text:p>
      <text:p text:style-name="Text_20_body">La rutina.</text:p>
      <text:p text:style-name="Text_20_body">Incluso el recuerdo de Ghim regresó a su memoria.</text:p>
      <text:p text:style-name="Text_20_body">Aquella vida tranquila que habían abandonado parecía ahora extraordinariamente valiosa.</text:p>
      <text:p text:style-name="Text_20_body">Nohk no compartía aquel sentimiento.</text:p>
      <text:p text:style-name="Text_20_body">Ni siquiera redujo el paso al entrar en el pueblo.</text:p>
      <text:p text:style-name="Text_20_body">No visitó la cantina.</text:p>
      <text:p text:style-name="Text_20_body">No saludó a los vecinos.</text:p>
      <text:p text:style-name="Text_20_body">No se detuvo frente a su casa.</text:p>
      <text:p text:style-name="Text_20_body">Cruzó las calles con determinación y comenzó inmediatamente a visitar comerciantes, propietarios y compradores.</text:p>
      <text:p text:style-name="Text_20_body"><text:soft-page-break/>Necesitaba dinero.</text:p>
      <text:p text:style-name="Text_20_body">Y lo necesitaba cuanto antes.</text:p>
      <text:p text:style-name="Text_20_body">Aquella misma tarde comenzaron las negociaciones.</text:p>
      <text:p text:style-name="Text_20_body">Primero vendió los animales que aún le pertenecían.</text:p>
      <text:p text:style-name="Text_20_body">Después los aperos de labranza.</text:p>
      <text:p text:style-name="Text_20_body">Las herramientas.</text:p>
      <text:p text:style-name="Text_20_body">Los almacenes.</text:p>
      <text:p text:style-name="Text_20_body">Finalmente las tierras.</text:p>
      <text:p text:style-name="Text_20_body">Durante años había trabajado aquella franja fértil junto al río.</text:p>
      <text:p text:style-name="Text_20_body">Era el esfuerzo de toda una vida.</text:p>
      <text:p text:style-name="Text_20_body">Y sin embargo se desprendió de ella con una facilidad que sorprendió incluso a quienes realizaban la compra.</text:p>
      <text:p text:style-name="Text_20_body">No discutió los precios.</text:p>
      <text:p text:style-name="Text_20_body">No intentó negociar.</text:p>
      <text:p text:style-name="Text_20_body">Aceptaba casi cualquier oferta razonable.</text:p>
      <text:p text:style-name="Text_20_body">Solo quería convertirlo todo en monedas.</text:p>
      <text:p text:style-name="Text_20_body">Rápidamente.</text:p>
      <text:p text:style-name="Text_20_body">Mientras observaban el proceso, Johf y Kempht comenzaron a sentirse incómodos.</text:p>
      <text:p text:style-name="Text_20_body">Aquello ya no parecía una inversión.</text:p>
      <text:p text:style-name="Text_20_body">Parecía una apuesta.</text:p>
      <text:p text:style-name="Text_20_body">Una apuesta gigantesca.</text:p>
      <text:p text:style-name="Text_20_body">Y peligrosa.</text:p>
      <text:p text:style-name="Text_20_body">Una tarde, mientras revisaban las cuentas, Kempht habló finalmente.</text:p>
      <text:p text:style-name="Text_20_body">—¿Y si estamos cometiendo un error?</text:p>
      <text:p text:style-name="Text_20_body">Nohk ni siquiera levantó la vista.</text:p>
      <text:p text:style-name="Text_20_body">—No lo estamos.</text:p>
      <text:p text:style-name="Text_20_body">—Estamos vendiéndolo todo.</text:p>
      <text:p text:style-name="Text_20_body">—Porque estamos cerca.</text:p>
      <text:p text:style-name="Text_20_body">—Eso también creíamos antes de encontrar la cueva.</text:p>
      <text:p text:style-name="Text_20_body">Nohk guardó silencio unos segundos.</text:p>
      <text:p text:style-name="Text_20_body"><text:soft-page-break/>Después respondió con una serenidad que resultó inquietante.</text:p>
      <text:p text:style-name="Text_20_body">—La cueva nos llevó al segundo mapa.</text:p>
      <text:p text:style-name="Text_20_body">El segundo mapa nos llevará al tesoro.</text:p>
      <text:p text:style-name="Text_20_body">No hemos llegado hasta aquí para detenernos ahora.</text:p>
      <text:p text:style-name="Text_20_body">Kempht no insistió.</text:p>
      <text:p text:style-name="Text_20_body">Pero las dudas permanecieron.</text:p>
      <text:p text:style-name="Text_20_body">Johf también las sentía.</text:p>
      <text:p text:style-name="Text_20_body">Ambos podían verlo.</text:p>
      <text:p text:style-name="Text_20_body">Podían ver el precipicio hacia el que avanzaban.</text:p>
      <text:p text:style-name="Text_20_body">Y sin embargo también podían ver la cruz dibujada en el pergamino.</text:p>
      <text:p text:style-name="Text_20_body">Aquella pequeña marca que prometía riqueza.</text:p>
      <text:p text:style-name="Text_20_body">Aquella posibilidad que parecía tan cercana.</text:p>
      <text:p text:style-name="Text_20_body">Tan real.</text:p>
      <text:p text:style-name="Text_20_body">Poco a poco, las dudas fueron cediendo.</text:p>
      <text:p text:style-name="Text_20_body">Si Nohk estaba dispuesto a arriesgarlo todo...</text:p>
      <text:p text:style-name="Text_20_body">Quizá ellos también debían hacerlo.</text:p>
      <text:p text:style-name="Text_20_body">Después de todo, ya habían perdido demasiado.</text:p>
      <text:p text:style-name="Text_20_body">La idea apareció primero como un pensamiento incómodo.</text:p>
      <text:p text:style-name="Text_20_body">Y luego como una conclusión inevitable.</text:p>
      <text:p text:style-name="Text_20_body">Durante los días siguientes hicieron exactamente lo mismo que Nohk.</text:p>
      <text:p text:style-name="Text_20_body">Vendieron cuanto poseían.</text:p>
      <text:p text:style-name="Text_20_body">Animales.</text:p>
      <text:p text:style-name="Text_20_body">Herramientas.</text:p>
      <text:p text:style-name="Text_20_body">Propiedades.</text:p>
      <text:p text:style-name="Text_20_body">Todo aquello que pudiera transformarse en dinero.</text:p>
      <text:p text:style-name="Text_20_body">Cuando terminaron, los tres hombres contemplaron el resultado de sus decisiones.</text:p>
      <text:p text:style-name="Text_20_body">Las bolsas de monedas.</text:p>
      <text:p text:style-name="Text_20_body">El nuevo carro.</text:p>
      <text:p text:style-name="Text_20_body">Los caballos.</text:p>
      <text:p text:style-name="Text_20_body">Las provisiones.</text:p>
      <text:p text:style-name="Text_20_body"><text:soft-page-break/>Las herramientas.</text:p>
      <text:p text:style-name="Text_20_body">Todo estaba preparado.</text:p>
      <text:p text:style-name="Text_20_body">Todo listo para partir.</text:p>
      <text:p text:style-name="Text_20_body">Y sin embargo, por primera vez desde que comenzó la búsqueda, ninguno de ellos experimentó verdadera alegría.</text:p>
      <text:p text:style-name="Text_20_body">No había entusiasmo.</text:p>
      <text:p text:style-name="Text_20_body">No había emoción.</text:p>
      <text:p text:style-name="Text_20_body">Solo una sensación extraña.</text:p>
      <text:p text:style-name="Text_20_body">Pesada.</text:p>
      <text:p text:style-name="Text_20_body">Difícil de describir.</text:p>
      <text:p text:style-name="Text_20_body">Como si acabaran de cruzar una frontera invisible.</text:p>
      <text:p text:style-name="Text_20_body">Detrás de ellos ya no quedaba nada.</text:p>
      <text:p text:style-name="Text_20_body">Ni casas.</text:p>
      <text:p text:style-name="Text_20_body">Ni tierras.</text:p>
      <text:p text:style-name="Text_20_body">Ni negocios.</text:p>
      <text:p text:style-name="Text_20_body">Ni una vida a la que regresar.</text:p>
      <text:p text:style-name="Text_20_body">Todo lo que poseían estaba ahora concentrado en aquella expedición.</text:p>
      <text:p text:style-name="Text_20_body">Todo o nada.</text:p>
      <text:p text:style-name="Text_20_body">Y aunque ninguno quiso admitirlo en voz alta, los tres comprendieron la misma verdad.</text:p>
      <text:p text:style-name="Text_20_body">Ya no estaban persiguiendo un tesoro.</text:p>
      <text:p text:style-name="Text_20_body">Estaban persiguiendo la única posibilidad que les quedaba.</text:p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6T17:31:11.588000000</meta:creation-date>
    <dc:date>2026-06-26T17:32:55.978000000</dc:date>
    <meta:editing-duration>PT1M44S</meta:editing-duration>
    <meta:editing-cycles>1</meta:editing-cycles>
    <meta:document-statistic meta:table-count="0" meta:image-count="0" meta:object-count="0" meta:page-count="11" meta:paragraph-count="305" meta:word-count="1894" meta:character-count="11889" meta:non-whitespace-character-count="10300"/>
    <meta:generator>LibreOffice/7.3.5.2$Windows_X86_64 LibreOffice_project/184fe81b8c8c30d8b5082578aee2fed2ea847c01</meta:generator>
  </office:meta>
</office:document-meta>
</file>