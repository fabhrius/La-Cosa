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Sí. Creo que si buscamos los principios profundos que operan en el Acto I, aparecen varias capas más interesantes que "costes hundidos", y además ninguna revela el final.</text:p>
      <text:p text:style-name="Text_20_body">De hecho, el Acto I es casi un estudio sobre cómo nace una creencia.</text:p>
      <text:p text:style-name="Horizontal_20_Line"/>
      <text:h text:style-name="Heading_20_2" text:outline-level="2">1. La información incompleta se convierte en certeza</text:h>
      <text:p text:style-name="Text_20_body">Los hechos reales son muy pocos:</text:p>
      <text:list xml:id="list2165861618" text:style-name="L1">
        <text:list-item>
          <text:p text:style-name="P1">Existe una llave.</text:p>
        </text:list-item>
        <text:list-item>
          <text:p text:style-name="P1">Existe un dibujo similar en un libro.</text:p>
        </text:list-item>
        <text:list-item>
          <text:p text:style-name="P1">Existe una leyenda.</text:p>
        </text:list-item>
        <text:list-item>
          <text:p text:style-name="P1">Existe un mapa.</text:p>
        </text:list-item>
      </text:list>
      <text:p text:style-name="Text_20_body">Nada de eso demuestra que exista un tesoro.</text:p>
      <text:p text:style-name="Text_20_body">Sin embargo, los personajes pasan rápidamente de:</text:p>
      <text:p text:style-name="Quotations">"podría existir"</text:p>
      <text:p text:style-name="Text_20_body">a</text:p>
      <text:p text:style-name="Quotations">"debe existir".</text:p>
      <text:p text:style-name="Text_20_body">Es un fenómeno muy humano.</text:p>
      <text:p text:style-name="Text_20_body">Con muy poca evidencia construimos historias completas.</text:p>
      <text:p text:style-name="Text_20_body">Principio universal:</text:p>
      <text:p text:style-name="Quotations">Los seres humanos completamos los vacíos de información con imaginación.</text:p>
      <text:p text:style-name="Horizontal_20_Line"/>
      <text:h text:style-name="Heading_20_2" text:outline-level="2">2. La evidencia no se evalúa de forma neutral</text:h>
      <text:p text:style-name="Text_20_body">Esto me parece todavía más importante.</text:p>
      <text:p text:style-name="Text_20_body">La llave podría significar muchas cosas:</text:p>
      <text:list xml:id="list550972015" text:style-name="L2">
        <text:list-item>
          <text:p text:style-name="P2">una reliquia</text:p>
        </text:list-item>
        <text:list-item>
          <text:p text:style-name="P2">un objeto ceremonial</text:p>
        </text:list-item>
        <text:list-item>
          <text:p text:style-name="P2">una falsificación</text:p>
        </text:list-item>
        <text:list-item>
          <text:p text:style-name="P2">una pieza histórica</text:p>
        </text:list-item>
      </text:list>
      <text:p text:style-name="Text_20_body"><text:soft-page-break/>Pero ellos sólo consideran la interpretación que desean que sea cierta.</text:p>
      <text:p text:style-name="Text_20_body">No están buscando la verdad.</text:p>
      <text:p text:style-name="Text_20_body">Están buscando confirmación.</text:p>
      <text:p text:style-name="Text_20_body">Principio universal:</text:p>
      <text:p text:style-name="Quotations">El deseo modifica la interpretación de los datos.</text:p>
      <text:p text:style-name="Text_20_body">O más científicamente:</text:p>
      <text:p text:style-name="Quotations">Observamos la realidad a través de nuestras expectativas.</text:p>
      <text:p text:style-name="Horizontal_20_Line"/>
      <text:h text:style-name="Heading_20_2" text:outline-level="2">3. La promesa de una recompensa altera el juicio</text:h>
      <text:p text:style-name="Text_20_body">En cuanto aparece la posibilidad del tesoro, su comportamiento cambia.</text:p>
      <text:p text:style-name="Text_20_body">La expectativa de una ganancia futura empieza a influir en las decisiones presentes.</text:p>
      <text:p text:style-name="Text_20_body">Todavía no han obtenido nada.</text:p>
      <text:p text:style-name="Text_20_body">Pero ya están actuando como si fueran ricos.</text:p>
      <text:p text:style-name="Text_20_body">Esto es muy interesante.</text:p>
      <text:p text:style-name="Text_20_body">Principio universal:</text:p>
      <text:p text:style-name="Quotations">Las recompensas imaginadas producen efectos reales.</text:p>
      <text:p text:style-name="Horizontal_20_Line"/>
      <text:h text:style-name="Heading_20_2" text:outline-level="2">4. La incertidumbre desaparece psicológicamente</text:h>
      <text:p text:style-name="Text_20_body">Objetivamente siguen sin saber nada.</text:p>
      <text:p text:style-name="Text_20_body">Pero subjetivamente sienten que saben mucho.</text:p>
      <text:p text:style-name="Text_20_body">Esto ocurre constantemente en la vida real.</text:p>
      <text:p text:style-name="Text_20_body">Cuanto más pensamos sobre una hipótesis, más familiar se vuelve.</text:p>
      <text:p text:style-name="Text_20_body">Y la familiaridad suele confundirse con certeza.</text:p>
      <text:p text:style-name="Text_20_body">Principio universal:</text:p>
      <text:p text:style-name="Quotations">La repetición de una idea aumenta su credibilidad.</text:p>
      <text:p text:style-name="Horizontal_20_Line"/>
      <text:h text:style-name="Heading_20_2" text:outline-level="2"><text:soft-page-break/>5. El primer compromiso</text:h>
      <text:p text:style-name="Text_20_body">Aquí aparece algo relacionado con los costes hundidos, pero todavía sin revelar nada.</text:p>
      <text:p text:style-name="Text_20_body">Antes de vender tierras.</text:p>
      <text:p text:style-name="Text_20_body">Antes de morir nadie.</text:p>
      <text:p text:style-name="Text_20_body">Antes de la obsesión.</text:p>
      <text:p text:style-name="Text_20_body">Existe una primera decisión.</text:p>
      <text:p text:style-name="Text_20_body">Deciden iniciar la búsqueda.</text:p>
      <text:p text:style-name="Text_20_body">Y toda la historia nace de ella.</text:p>
      <text:p text:style-name="Text_20_body">Principio universal:</text:p>
      <text:p text:style-name="Quotations">Las grandes consecuencias suelen nacer de decisiones aparentemente pequeñas.</text:p>
      <text:p text:style-name="Horizontal_20_Line"/>
      <text:h text:style-name="Heading_20_2" text:outline-level="2">6. La ilusión de control</text:h>
      <text:p text:style-name="Text_20_body">Este me gusta mucho para Omniscientis.</text:p>
      <text:p text:style-name="Text_20_body">Los personajes creen que están tomando una decisión racional.</text:p>
      <text:p text:style-name="Text_20_body">Pero en realidad desconocen casi todo.</text:p>
      <text:p text:style-name="Text_20_body">No saben:</text:p>
      <text:list xml:id="list2029840698" text:style-name="L3">
        <text:list-item>
          <text:p text:style-name="P3">quién creó el mapa</text:p>
        </text:list-item>
        <text:list-item>
          <text:p text:style-name="P3">qué ocurrió después</text:p>
        </text:list-item>
        <text:list-item>
          <text:p text:style-name="P3">qué hay al final</text:p>
        </text:list-item>
        <text:list-item>
          <text:p text:style-name="P3">si la leyenda es cierta</text:p>
        </text:list-item>
      </text:list>
      <text:p text:style-name="Text_20_body">Sin embargo actúan como si comprendieran la situación.</text:p>
      <text:p text:style-name="Text_20_body">Principio universal:</text:p>
      <text:p text:style-name="Quotations">La cantidad de información que poseemos suele ser mucho menor de lo que creemos.</text:p>
      <text:p text:style-name="Horizontal_20_Line"/>
      <text:h text:style-name="Heading_20_2" text:outline-level="2">7. La transformación de una posibilidad en un objetivo</text:h>
      <text:p text:style-name="Text_20_body">Este punto es muy interesante narrativamente.</text:p>
      <text:p text:style-name="Text_20_body">Al principio el tesoro es una curiosidad.</text:p>
      <text:p text:style-name="Text_20_body">Después una posibilidad.</text:p>
      <text:p text:style-name="Text_20_body"><text:soft-page-break/>Después un proyecto.</text:p>
      <text:p text:style-name="Text_20_body">Después una obsesión.</text:p>
      <text:p text:style-name="Text_20_body">La historia empieza justo cuando una simple idea deja de ser una idea.</text:p>
      <text:p text:style-name="Text_20_body">Principio universal:</text:p>
      <text:p text:style-name="Quotations">Las ideas cambian a las personas cuando dejan de ser hipótesis y se convierten en objetivos.</text:p>
      <text:p text:style-name="Horizontal_20_Line"/>
      <text:h text:style-name="Heading_20_2" text:outline-level="2">Lo que yo destacaría para el Acto I</text:h>
      <text:p text:style-name="Text_20_body">Si estuviera buscando la materia prima para una frase de Fabhrius, me centraría en estos tres principios:</text:p>
      <text:h text:style-name="Heading_20_3" text:outline-level="3">A)</text:h>
      <text:p text:style-name="Quotations">El deseo altera la interpretación de la realidad.</text:p>
      <text:p text:style-name="Text_20_body">Porque es exactamente lo que ocurre cuando ven la llave.</text:p>
      <text:p text:style-name="Horizontal_20_Line"/>
      <text:h text:style-name="Heading_20_3" text:outline-level="3">B)</text:h>
      <text:p text:style-name="Quotations">Los seres humanos construyen certezas a partir de información incompleta.</text:p>
      <text:p text:style-name="Text_20_body">Porque toda la expedición nace de eso.</text:p>
      <text:p text:style-name="Horizontal_20_Line"/>
      <text:h text:style-name="Heading_20_3" text:outline-level="3">C)</text:h>
      <text:p text:style-name="Quotations">Las recompensas imaginadas pueden modificar el comportamiento tanto como las reales.</text:p>
      <text:p text:style-name="Text_20_body">Porque todavía no existe ningún tesoro.<text:line-break/>Sólo existe la idea del tesoro.</text:p>
      <text:p text:style-name="Text_20_body">Y sin embargo esa idea ya está cambiando sus vidas.</text:p>
      <text:p text:style-name="Horizontal_20_Line"/>
      <text:p text:style-name="Text_20_body">Lo interesante es que ninguno de estos principios revela el final. Funcionan igual si el tesoro existe o si no existe. Son observaciones sobre la mente humana, no sobre el desenlace de la historia. Ahí creo que está la dirección correcta para las frases de Fabhriu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09:51:47.976000000</meta:creation-date>
    <dc:date>2026-07-22T09:57:17.219000000</dc:date>
    <meta:editing-duration>PT5M29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1" meta:word-count="633" meta:character-count="3886" meta:non-whitespace-character-count="3356"/>
  </office:meta>
</office:document-meta>
</file>