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el Acto III debería hacer algo más que simplemente avanzar la búsqueda. Debe transformar la naturaleza del conflicto.</text:p>
      <text:p text:style-name="Text_20_body">Hasta ahora el enemigo ha sido el mundo:</text:p>
      <text:list xml:id="list674999621" text:style-name="L1">
        <text:list-item>
          <text:p text:style-name="P1">la tormenta,</text:p>
        </text:list-item>
        <text:list-item>
          <text:p text:style-name="P1">la montaña,</text:p>
        </text:list-item>
        <text:list-item>
          <text:p text:style-name="P1">el accidente,</text:p>
        </text:list-item>
        <text:list-item>
          <text:p text:style-name="P1">la cueva equivocada.</text:p>
        </text:list-item>
      </text:list>
      <text:p text:style-name="Text_20_body">A partir de ahora el enemigo debe empezar a ser la propia búsqueda.</text:p>
      <text:p text:style-name="Text_20_body">Es el momento en que la expedición deja de ser una aventura y se convierte en una obsesión.</text:p>
      <text:p text:style-name="Text_20_body">Yo lo estructuraría así:</text:p>
      <text:h text:style-name="Heading_20_2" text:outline-level="2">Acto III - El punto de no retorno</text:h>
      <text:h text:style-name="Heading_20_3" text:outline-level="3">Capítulo 1 - El largo camino</text:h>
      <text:p text:style-name="Text_20_body"><text:span text:style-name="Strong_20_Emphasis">Objetivo dramático:</text:span> mostrar que el segundo mapa exige un sacrificio mucho mayor de lo esperado.</text:p>
      <text:p text:style-name="Text_20_body"><text:span text:style-name="Strong_20_Emphasis">Acontecimientos principales:</text:span></text:p>
      <text:list xml:id="list432477844" text:style-name="L2">
        <text:list-item>
          <text:p text:style-name="P2">El nuevo mapa señala una región muy lejana.</text:p>
        </text:list-item>
        <text:list-item>
          <text:p text:style-name="P2">Los tres supervivientes abandonan definitivamente la zona de las montañas.</text:p>
        </text:list-item>
        <text:list-item>
          <text:p text:style-name="P2">Descubren que el viaje puede durar meses.</text:p>
        </text:list-item>
        <text:list-item>
          <text:p text:style-name="P2">Se enfrentan a la realidad de que deberán regresar a Oldwood para conseguir recursos.</text:p>
        </text:list-item>
      </text:list>
      <text:p text:style-name="Text_20_body">Aquí aparece una revelación importante:</text:p>
      <text:p text:style-name="Text_20_body">El dinero reunido para comprar el libro ya se ha agotado.</text:p>
      <text:p text:style-name="Text_20_body">Necesitan más.</text:p>
      <text:p text:style-name="Text_20_body">Por primera vez el tesoro deja de parecer una recompensa cercana.</text:p>
      <text:p text:style-name="Text_20_body"><text:span text:style-name="Strong_20_Emphasis">Escena clave</text:span></text:p>
      <text:p text:style-name="Text_20_body">Nohk vende:</text:p>
      <text:list xml:id="list1318072032" text:style-name="L3">
        <text:list-item>
          <text:p text:style-name="P3">sus tierras,</text:p>
        </text:list-item>
        <text:list-item>
          <text:p text:style-name="P3">su casa,</text:p>
        </text:list-item>
        <text:list-item>
          <text:p text:style-name="P3">los animales que aún conserva.</text:p>
        </text:list-item>
      </text:list>
      <text:p text:style-name="Text_20_body">Sus amigos lo observan con inquietud.</text:p>
      <text:p text:style-name="Text_20_body">La decisión parece extrema.</text:p>
      <text:p text:style-name="Text_20_body"><text:soft-page-break/>Pero la aparición del segundo mapa parece justificarla.</text:p>
      <text:p text:style-name="Text_20_body"><text:span text:style-name="Strong_20_Emphasis">Final del capítulo</text:span></text:p>
      <text:p text:style-name="Text_20_body">Inician una nueva expedición.</text:p>
      <text:p text:style-name="Text_20_body">Mucho más ambiciosa.</text:p>
      <text:p text:style-name="Text_20_body">Mucho más peligrosa.</text:p>
      <text:p text:style-name="Text_20_body">Ahora ya no buscan una cueva.</text:p>
      <text:p text:style-name="Text_20_body">Buscan un destino desconocido al otro lado de Lluviara.</text:p>
      <text:p text:style-name="Horizontal_20_Line"/>
      <text:h text:style-name="Heading_20_3" text:outline-level="3">Capítulo 2 - Las señales</text:h>
      <text:p text:style-name="Text_20_body"><text:span text:style-name="Strong_20_Emphasis">Objetivo dramático:</text:span> recompensar la obsesión.</text:p>
      <text:p text:style-name="Text_20_body">Este capítulo es muy importante.</text:p>
      <text:p text:style-name="Text_20_body">La búsqueda debe parecer correcta.</text:p>
      <text:p text:style-name="Text_20_body"><text:span text:style-name="Strong_20_Emphasis">Acontecimientos principales:</text:span></text:p>
      <text:p text:style-name="Text_20_body">Durante el viaje encuentran evidencias cada vez más convincentes:</text:p>
      <text:list xml:id="list3382962333" text:style-name="L4">
        <text:list-item>
          <text:p text:style-name="P4">símbolos de la llave grabados en ruinas antiguas,</text:p>
        </text:list-item>
        <text:list-item>
          <text:p text:style-name="P4">referencias al rey en manuscritos olvidados,</text:p>
        </text:list-item>
        <text:list-item>
          <text:p text:style-name="P4">historias locales sobre viajeros desaparecidos.</text:p>
        </text:list-item>
      </text:list>
      <text:p text:style-name="Text_20_body">Cada nueva pista parece confirmar la existencia del tesoro.</text:p>
      <text:p text:style-name="Text_20_body">Cada vez que aparecen dudas, surge una nueva confirmación.</text:p>
      <text:p text:style-name="Text_20_body">Eso mantiene viva la búsqueda.</text:p>
      <text:p text:style-name="Text_20_body"><text:span text:style-name="Strong_20_Emphasis">Tema oculto</text:span></text:p>
      <text:p text:style-name="Text_20_body">La realidad está reforzando el error.</text:p>
      <text:p text:style-name="Text_20_body">El lector debe pensar:</text:p>
      <text:p text:style-name="Text_20_body">"Quizá Nohk tenga razón."</text:p>
      <text:p text:style-name="Text_20_body"><text:span text:style-name="Strong_20_Emphasis">Escena central</text:span></text:p>
      <text:p text:style-name="Text_20_body">Johf pregunta:</text:p>
      <text:p text:style-name="Text_20_body">—¿Y si sólo estamos siguiendo rastros de otros buscadores?</text:p>
      <text:p text:style-name="Text_20_body">La idea resulta inquietante.</text:p>
      <text:p text:style-name="Text_20_body">Pero nadie quiere pensar en ella.</text:p>
      <text:p text:style-name="Text_20_body"><text:soft-page-break/><text:span text:style-name="Strong_20_Emphasis">Final del capítulo</text:span></text:p>
      <text:p text:style-name="Text_20_body">Encuentran una pista extraordinaria.</text:p>
      <text:p text:style-name="Text_20_body">Una inscripción reciente.</text:p>
      <text:p text:style-name="Text_20_body">No tiene siglos.</text:p>
      <text:p text:style-name="Text_20_body">Parece haber sido realizada hace pocos años.</text:p>
      <text:p text:style-name="Text_20_body">Alguien estuvo allí antes.</text:p>
      <text:p text:style-name="Horizontal_20_Line"/>
      <text:h text:style-name="Heading_20_3" text:outline-level="3">Capítulo 3 - El punto de no retorno</text:h>
      <text:p text:style-name="Text_20_body"><text:span text:style-name="Strong_20_Emphasis">Objetivo dramático:</text:span> romper definitivamente el grupo.</text:p>
      <text:p text:style-name="Text_20_body"><text:span text:style-name="Strong_20_Emphasis">Acontecimientos principales:</text:span></text:p>
      <text:p text:style-name="Text_20_body">La expedición continúa.</text:p>
      <text:p text:style-name="Text_20_body">Los hombres están agotados.</text:p>
      <text:p text:style-name="Text_20_body">Han pasado muchos meses.</text:p>
      <text:p text:style-name="Text_20_body">Tal vez más de un año.</text:p>
      <text:p text:style-name="Text_20_body">Comienzan a hablar de todo lo que han perdido:</text:p>
      <text:list xml:id="list3142961255" text:style-name="L5">
        <text:list-item>
          <text:p text:style-name="P5">familias,</text:p>
        </text:list-item>
        <text:list-item>
          <text:p text:style-name="P5">tierras,</text:p>
        </text:list-item>
        <text:list-item>
          <text:p text:style-name="P5">negocios,</text:p>
        </text:list-item>
        <text:list-item>
          <text:p text:style-name="P5">oportunidades,</text:p>
        </text:list-item>
        <text:list-item>
          <text:p text:style-name="P5">juventud.</text:p>
        </text:list-item>
      </text:list>
      <text:p text:style-name="Text_20_body">Por primera vez cuestionan abiertamente la búsqueda.</text:p>
      <text:p text:style-name="Text_20_body">Aquí debe aparecer la escena central del relato.</text:p>
      <text:p text:style-name="Text_20_body">La discusión sobre los costes hundidos.</text:p>
      <text:p text:style-name="Text_20_body">No de forma teórica.</text:p>
      <text:p text:style-name="Text_20_body">Emocional.</text:p>
      <text:p text:style-name="Text_20_body">Nohk expone claramente su error:</text:p>
      <text:p text:style-name="Quotations">"No puedo volver ahora.<text:line-break/>¿Volver para qué?<text:line-break/>¿Para ver las tierras que vendí?<text:line-break/>¿Para recuperar a Ghim?<text:line-break/>¿Para recuperar los años perdidos?<text:line-break/><text:soft-page-break/>Todo lo que tenía está aquí delante.<text:line-break/>Si abandono ahora, entonces todo habrá sido inútil."</text:p>
      <text:p text:style-name="Text_20_body">Es una frase poderosa porque parece razonable.</text:p>
      <text:p text:style-name="Text_20_body">Y sin embargo es exactamente la trampa.</text:p>
      <text:p text:style-name="Text_20_body"><text:span text:style-name="Strong_20_Emphasis">Clímax del capítulo</text:span></text:p>
      <text:p text:style-name="Text_20_body">La discusión termina rompiendo la confianza entre los tres.</text:p>
      <text:p text:style-name="Text_20_body">No llegan a separarse todavía.</text:p>
      <text:p text:style-name="Text_20_body">Pero la amistad queda dañada.</text:p>
      <text:p text:style-name="Text_20_body">Ya no son amigos que buscan un tesoro.</text:p>
      <text:p text:style-name="Text_20_body">Son hombres atrapados dentro de una decisión.</text:p>
      <text:p text:style-name="Text_20_body"><text:span text:style-name="Strong_20_Emphasis">Final del acto</text:span></text:p>
      <text:p text:style-name="Text_20_body">Al final encuentran una nueva referencia del mapa.</text:p>
      <text:p text:style-name="Text_20_body">Una indicación que señala el oeste.</text:p>
      <text:p text:style-name="Text_20_body">Hacia una región inexplorada.</text:p>
      <text:p text:style-name="Text_20_body">La prueba definitiva de que están cerca.</text:p>
      <text:p text:style-name="Text_20_body">El acto termina con esperanza.</text:p>
      <text:p text:style-name="Text_20_body">Pero el lector ya comprende algo que los personajes todavía no ven:</text:p>
      <text:p text:style-name="Text_20_body">la búsqueda está destruyéndolos mucho más rápido de lo que los acerca al tesoro.</text:p>
      <text:p text:style-name="Horizontal_20_Line"/>
      <text:p text:style-name="Text_20_body">Creo que esta versión tiene una ventaja importante: el Acto III no sólo mueve a los personajes físicamente por el mundo, sino que destruye poco a poco las razones que tenían para seguir juntos. Cuando empiece el Acto IV, la tragedia ya no vendrá de la montaña o del bosque. Vendrá de los propios supervivientes. Y eso prepara muy bien las traiciones y muertes final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0:02:24.144000000</meta:creation-date>
    <dc:date>2026-06-26T11:36:56.459000000</dc:date>
    <meta:editing-duration>PT1H23M52S</meta:editing-duration>
    <meta:editing-cycles>1</meta:editing-cycles>
    <meta:document-statistic meta:table-count="0" meta:image-count="0" meta:object-count="0" meta:page-count="4" meta:paragraph-count="99" meta:word-count="675" meta:character-count="4057" meta:non-whitespace-character-count="3500"/>
    <meta:generator>LibreOffice/7.3.5.2$Windows_X86_64 LibreOffice_project/184fe81b8c8c30d8b5082578aee2fed2ea847c01</meta:generator>
  </office:meta>
</office:document-meta>
</file>