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arte 4 - Un nuevo día</text:h>
      <text:p text:style-name="Text_20_body">Después de la noche llegó un nuevo día.</text:p>
      <text:p text:style-name="Text_20_body">El sol apareció sobre el horizonte e iluminó el mar.</text:p>
      <text:p text:style-name="Text_20_body">Las olas continuaron golpeando los acantilados.</text:p>
      <text:p text:style-name="Text_20_body">Las aves continuaron surcando el cielo.</text:p>
      <text:p text:style-name="Text_20_body">Y el mundo siguió adelante.</text:p>
      <text:p text:style-name="Text_20_body">Como siempre.</text:p>
      <text:p text:style-name="Text_20_body">Como si nada hubiera ocurrido.</text:p>
      <text:p text:style-name="Text_20_body">Poco después, un cuervo entró en la cueva.</text:p>
      <text:p text:style-name="Text_20_body">La luz de la mañana se filtraba por la entrada e iluminaba la antigua puerta de hierro.</text:p>
      <text:p text:style-name="Text_20_body">Todo permanecía inmóvil.</text:p>
      <text:p text:style-name="Text_20_body">Silencioso.</text:p>
      <text:p text:style-name="Text_20_body">Abandonado.</text:p>
      <text:p text:style-name="Text_20_body">Entonces un destello verde llamó la atención del ave.</text:p>
      <text:p text:style-name="Text_20_body">La piedra incrustada en la llave reflejaba la luz del sol.</text:p>
      <text:p text:style-name="Text_20_body">El cuervo se aproximó dando pequeños saltos.</text:p>
      <text:p text:style-name="Text_20_body">Inclinó la cabeza.</text:p>
      <text:p text:style-name="Text_20_body">Observó el objeto durante unos segundos.</text:p>
      <text:p text:style-name="Text_20_body">Y finalmente lo tomó con el pico.</text:p>
      <text:p text:style-name="Text_20_body">Después levantó el vuelo.</text:p>
      <text:p text:style-name="Text_20_body">Salió de la cueva.</text:p>
      <text:p text:style-name="Text_20_body">Atravesó los acantilados.</text:p>
      <text:p text:style-name="Text_20_body">Sobrevoló las montañas.</text:p>
      <text:p text:style-name="Text_20_body">Los bosques.</text:p>
      <text:p text:style-name="Text_20_body">Los ríos.</text:p>
      <text:p text:style-name="Text_20_body">Voló durante horas impulsado por las corrientes de aire que ascendían desde los valles.</text:p>
      <text:p text:style-name="Text_20_body">Hasta que, en algún lugar lejano, dejó caer la llave.</text:p>
      <text:p text:style-name="Text_20_body">El objeto giró varias veces en el aire.</text:p>
      <text:p text:style-name="Text_20_body">Y desapareció entre la hierba.</text:p>
      <text:p text:style-name="Text_20_body"><text:soft-page-break/>El cuervo continuó su camino.</text:p>
      <text:p text:style-name="Text_20_body">No volvió la vista atrás.</text:p>
      <text:p text:style-name="Text_20_body">Era una tranquila mañana de primavera.</text:p>
      <text:p text:style-name="Text_20_body">En una pequeña granja cerca del pueblo de Wetwood, un campesino llamado Jahnk caminaba por un sendero de tierra rumbo al mercado.</text:p>
      <text:p text:style-name="Text_20_body">El día era agradable.</text:p>
      <text:p text:style-name="Text_20_body">El cielo estaba despejado.</text:p>
      <text:p text:style-name="Text_20_body">Y sus pensamientos estaban ocupados por asuntos sencillos.</text:p>
      <text:p text:style-name="Text_20_body">La cosecha.</text:p>
      <text:p text:style-name="Text_20_body">Los animales.</text:p>
      <text:p text:style-name="Text_20_body">El precio del trigo.</text:p>
      <text:p text:style-name="Text_20_body">Entonces vio algo brillar entre la hierba.</text:p>
      <text:p text:style-name="Text_20_body">Se agachó.</text:p>
      <text:p text:style-name="Text_20_body">Apartó unas ramas.</text:p>
      <text:p text:style-name="Text_20_body">Y lo recogió.</text:p>
      <text:p text:style-name="Text_20_body">Era una vieja llave de hierro.</text:p>
      <text:p text:style-name="Text_20_body">Pesada.</text:p>
      <text:p text:style-name="Text_20_body">Extrañamente hermosa.</text:p>
      <text:p text:style-name="Text_20_body">Una piedra verde resplandecía en su empuñadura.</text:p>
      <text:p text:style-name="Text_20_body">Jahnk la observó con curiosidad.</text:p>
      <text:p text:style-name="Text_20_body">Le dio la vuelta entre las manos.</text:p>
      <text:p text:style-name="Text_20_body">Había un escudo grabado en el metal.</text:p>
      <text:p text:style-name="Text_20_body">Un símbolo que no reconoció.</text:p>
      <text:p text:style-name="Text_20_body">Sonrió.</text:p>
      <text:p text:style-name="Text_20_body">—Hoy es mi día de suerte.</text:p>
      <text:p text:style-name="Text_20_body">Guardó la llave en el bolsillo y continuó caminando hacia el pueblo.</text:p>
      <text:p text:style-name="Text_20_body">Sobre su cabeza, unas pocas nubes blancas avanzaban lentamente por el cielo.</text:p>
      <text:p text:style-name="Text_20_body">A sus espaldas, el viento agitaba la hierba.</text:p>
      <text:p text:style-name="Text_20_body">Y muy lejos de allí, oculto en la oscuridad de una montaña olvidada, un hombre esperaba una ayuda que nunca llegaría.</text:p>
      <text:p text:style-name="Text_20_body"><text:soft-page-break/>Pero el mundo no se detuvo.</text:p>
      <text:p text:style-name="Text_20_body">Nunca se detenía.</text:p>
      <text:p text:style-name="Text_20_body">Continuó girando.</text:p>
      <text:p text:style-name="Text_20_body">Lento.</text:p>
      <text:p text:style-name="Text_20_body">Silencioso.</text:p>
      <text:p text:style-name="Text_20_body">Inevitabl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6-30T20:56:39.707000000</meta:creation-date>
    <dc:date>2026-06-30T20:59:25.386000000</dc:date>
    <meta:editing-duration>PT2M46S</meta:editing-duration>
    <meta:editing-cycles>1</meta:editing-cycles>
    <meta:document-statistic meta:table-count="0" meta:image-count="0" meta:object-count="0" meta:page-count="3" meta:paragraph-count="63" meta:word-count="367" meta:character-count="2124" meta:non-whitespace-character-count="1820"/>
    <meta:generator>LibreOffice/7.3.5.2$Windows_X86_64 LibreOffice_project/184fe81b8c8c30d8b5082578aee2fed2ea847c01</meta:generator>
  </office:meta>
</office:document-meta>
</file>