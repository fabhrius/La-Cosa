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El vecino y el libro</text:h>
      <text:p text:style-name="Text_20_body">La casa de Jorhm se encontraba en el extremo norte del pueblo, junto a un pequeño viñedo que descendía suavemente hacia el río.</text:p>
      <text:p text:style-name="Text_20_body">Los seis amigos recorrieron el camino casi sin hablar.</text:p>
      <text:p text:style-name="Text_20_body">La emoción había sustituido a las bromas de la cantina.</text:p>
      <text:p text:style-name="Text_20_body">Todos sentían la misma curiosidad.</text:p>
      <text:p text:style-name="Text_20_body">Si el anciano reconocía la llave, tal vez pudieran descubrir cuánto valía realmente.</text:p>
      <text:p text:style-name="Text_20_body">O quizá averiguar quién la había perdido.</text:p>
      <text:p text:style-name="Text_20_body">Cuando llegaron, encontraron a Jorhm sentado bajo una parra cubierta de hojas verdes.</text:p>
      <text:p text:style-name="Text_20_body">El anciano descansaba en una silla de madera observando el atardecer.</text:p>
      <text:p text:style-name="Text_20_body">Los últimos rayos del sol iluminaban las vides y teñían de oro los muros de piedra de la casa.</text:p>
      <text:p text:style-name="Text_20_body">Parecía completamente ajeno a la agitación que se acercaba por el camino.</text:p>
      <text:p text:style-name="Text_20_body">—¡Jorhm! —llamó Kempht mientras se aproximaban.</text:p>
      <text:p text:style-name="Text_20_body">El anciano levantó la vista.</text:p>
      <text:p text:style-name="Text_20_body">—¿Qué ocurre? ¿Se está quemando el pueblo?</text:p>
      <text:p text:style-name="Text_20_body">Los jóvenes rieron.</text:p>
      <text:p text:style-name="Text_20_body">—No exactamente.</text:p>
      <text:p text:style-name="Text_20_body">Kempht sacó la llave y se la mostró.</text:p>
      <text:p text:style-name="Text_20_body">—Mira esto.</text:p>
      <text:p text:style-name="Text_20_body">Jorhm extendió la mano sin demasiado interés.</text:p>
      <text:p text:style-name="Text_20_body">Pero en cuanto sus dedos tocaron el metal, su expresión cambió.</text:p>
      <text:p text:style-name="Text_20_body">La sonrisa desapareció.</text:p>
      <text:p text:style-name="Text_20_body">Acercó la llave a sus ojos.</text:p>
      <text:p text:style-name="Text_20_body">La giró lentamente.</text:p>
      <text:p text:style-name="Text_20_body">Observó la piedra verde.</text:p>
      <text:p text:style-name="Text_20_body">Luego el escudo grabado.</text:p>
      <text:p text:style-name="Text_20_body">Y finalmente volvió a examinar la piedra.</text:p>
      <text:p text:style-name="Text_20_body">Durante varios segundos nadie dijo nada.</text:p>
      <text:p text:style-name="Text_20_body">El anciano parecía incapaz de apartar la vista del objeto.</text:p>
      <text:p text:style-name="Text_20_body"><text:soft-page-break/>—No es posible... —murmuró.</text:p>
      <text:p text:style-name="Text_20_body">Los jóvenes intercambiaron miradas.</text:p>
      <text:p text:style-name="Text_20_body">Era exactamente la reacción que esperaban.</text:p>
      <text:p text:style-name="Text_20_body">Y también mucho más intensa.</text:p>
      <text:p text:style-name="Text_20_body">—¿Qué sucede? —preguntó Nohk.</text:p>
      <text:p text:style-name="Text_20_body">Jorhm no respondió.</text:p>
      <text:p text:style-name="Text_20_body">Se puso de pie con una rapidez sorprendente para alguien de su edad.</text:p>
      <text:p text:style-name="Text_20_body">Todavía sujetando la llave, caminó hacia la casa.</text:p>
      <text:p text:style-name="Text_20_body">—Venid.</text:p>
      <text:p text:style-name="Text_20_body">Los seis amigos lo siguieron.</text:p>
      <text:p text:style-name="Text_20_body">Atravesaron un estrecho pasillo y llegaron al salón principal.</text:p>
      <text:p text:style-name="P1">Como siempre, Nohk quedó impresionado.</text:p>
      <text:p text:style-name="Text_20_body">La habitación estaba rodeada de estanterías desde el suelo hasta el techo.</text:p>
      <text:p text:style-name="Text_20_body">Decenas.</text:p>
      <text:p text:style-name="Text_20_body">Tal vez cientos de libros.</text:p>
      <text:p text:style-name="Text_20_body">Algunos estaban cuidadosamente encuadernados.</text:p>
      <text:p text:style-name="Text_20_body">Otros parecían tan antiguos que amenazaban con deshacerse al tocarlos.</text:p>
      <text:p text:style-name="Text_20_body">Había mapas enrollados, pergaminos, cajas repletas de documentos y pequeños objetos procedentes de lugares remotos.</text:p>
      <text:p text:style-name="Text_20_body">Aquella colección era el orgullo de Jorhm.</text:p>
      <text:p text:style-name="Text_20_body">Y también el motivo por el que muchos habitantes del pueblo lo consideraban un hombre extraño.</text:p>
      <text:p text:style-name="Text_20_body">Mientras otros dedicaban su vida a cultivar la tierra o comerciar, él la dedicaba a conservar historias.</text:p>
      <text:p text:style-name="Text_20_body">A recopilar fragmentos olvidados del pasado.</text:p>
      <text:p text:style-name="Text_20_body">A estudiar los antiguos pueblos de Lluviara.</text:p>
      <text:p text:style-name="Text_20_body">Los libros eran su verdadera riqueza.</text:p>
      <text:p text:style-name="Text_20_body">Jorhm se dirigió directamente hacia una de las estanterías del fondo.</text:p>
      <text:p text:style-name="Text_20_body">No dudó ni un instante.</text:p>
      <text:p text:style-name="Text_20_body">Como si supiera exactamente dónde buscar.</text:p>
      <text:p text:style-name="Text_20_body">Extrajo un volumen grueso cubierto de polvo.</text:p>
      <text:p text:style-name="Text_20_body">La encuadernación estaba desgastada por los años.</text:p>
      <text:p text:style-name="Text_20_body"><text:soft-page-break/>El cuero había adquirido un color oscuro y agrietado.</text:p>
      <text:p text:style-name="Text_20_body">Con sumo cuidado llevó el libro hasta una mesa.</text:p>
      <text:p text:style-name="Text_20_body">Lo abrió.</text:p>
      <text:p text:style-name="Text_20_body">Las páginas crujieron suavemente.</text:p>
      <text:p text:style-name="Text_20_body">Pasó varias hojas con rapidez.</text:p>
      <text:p text:style-name="Text_20_body">Después otras más despacio.</text:p>
      <text:p text:style-name="Text_20_body">Hasta que finalmente se detuvo.</text:p>
      <text:p text:style-name="Text_20_body">Sus ojos brillaron.</text:p>
      <text:p text:style-name="Text_20_body">Había encontrado lo que buscaba.</text:p>
      <text:p text:style-name="Text_20_body">Colocó la llave sobre la página abierta.</text:p>
      <text:p text:style-name="Text_20_body">Durante unos segundos permaneció inmóvil.</text:p>
      <text:p text:style-name="Text_20_body">Comparando ambos objetos.</text:p>
      <text:p text:style-name="Text_20_body">Luego levantó lentamente la mirada.</text:p>
      <text:p text:style-name="Text_20_body">—Observad.</text:p>
      <text:p text:style-name="Text_20_body">Los jóvenes se inclinaron sobre la mesa.</text:p>
      <text:p text:style-name="Text_20_body">Y todos contuvieron la respiración.</text:p>
      <text:p text:style-name="Text_20_body">En la página había un dibujo.</text:p>
      <text:p text:style-name="Text_20_body">Una llave.</text:p>
      <text:p text:style-name="Text_20_body">Exactamente igual.</text:p>
      <text:p text:style-name="Text_20_body">La misma forma.</text:p>
      <text:p text:style-name="Text_20_body">La misma piedra verde.</text:p>
      <text:p text:style-name="Text_20_body">El mismo escudo real grabado en el metal.</text:p>
      <text:p text:style-name="Text_20_body">Incluso las pequeñas marcas decorativas coincidían perfectamente.</text:p>
      <text:p text:style-name="Text_20_body">No era parecida.</text:p>
      <text:p text:style-name="Text_20_body">Era la misma llave.</text:p>
      <text:p text:style-name="Text_20_body">Nadie habló.</text:p>
      <text:p text:style-name="Text_20_body">La sorpresa había silenciado la habitación.</text:p>
      <text:p text:style-name="Text_20_body">Finalmente Jorhm rompió el silencio.</text:p>
      <text:p text:style-name="Text_20_body">—No hay duda.</text:p>
      <text:p text:style-name="Text_20_body">Su voz sonó más grave que antes.</text:p>
      <text:p text:style-name="Text_20_body"><text:soft-page-break/>—Es ella.</text:p>
      <text:p text:style-name="Text_20_body">—¿Ella? —preguntó Nohk.</text:p>
      <text:p text:style-name="Text_20_body">El anciano apoyó lentamente una mano sobre el libro.</text:p>
      <text:p text:style-name="Text_20_body">—La llave del tesoro del rey.</text:p>
      <text:p text:style-name="Text_20_body">Los jóvenes se miraron entre sí.</text:p>
      <text:p text:style-name="Text_20_body">La frase parecía absurda.</text:p>
      <text:p text:style-name="Text_20_body">Una leyenda para niños.</text:p>
      <text:p text:style-name="Text_20_body">Una historia de taberna.</text:p>
      <text:p text:style-name="Text_20_body">Y sin embargo el dibujo estaba allí.</text:p>
      <text:p text:style-name="Text_20_body">Ante sus propios ojos.</text:p>
      <text:p text:style-name="Text_20_body">—Entonces... —dijo Kempht con cautela— ¿la historia podría ser cierta?</text:p>
      <text:p text:style-name="Text_20_body">Jorhm observó nuevamente la llave.</text:p>
      <text:p text:style-name="Text_20_body">Por primera vez parecía tan intrigado como ellos.</text:p>
      <text:p text:style-name="Text_20_body">—Si esta llave es auténtica...</text:p>
      <text:p text:style-name="Text_20_body">Guardó silencio unos segundos.</text:p>
      <text:p text:style-name="Text_20_body">—Entonces quizá la leyenda también lo sea.</text:p>
      <text:p text:style-name="Text_20_body">Nohk sintió un escalofrío recorrerle la espalda.</text:p>
      <text:p text:style-name="Text_20_body">—¿Qué leyenda? —preguntó.</text:p>
      <text:p text:style-name="Horizontal_20_Line"/>
      <text:p text:style-name="Text_20_body"/>
      <text:h text:style-name="Heading_20_2" text:outline-level="2">La leyenda del tesoro del rey</text:h>
      <text:p text:style-name="Text_20_body">Durante unos instantes nadie dijo nada.</text:p>
      <text:p text:style-name="Text_20_body">Los seis jóvenes permanecían inclinados sobre la mesa observando alternativamente la llave y el dibujo del libro.</text:p>
      <text:p text:style-name="Text_20_body">La semejanza era tan perfecta que resultaba inquietante.</text:p>
      <text:p text:style-name="Text_20_body">Finalmente fue Nohk quien rompió el silencio.</text:p>
      <text:p text:style-name="Text_20_body">—¿Qué leyenda es esa?</text:p>
      <text:p text:style-name="Text_20_body">Jorhm cerró parcialmente el volumen y apoyó ambas manos sobre la cubierta.</text:p>
      <text:p text:style-name="Text_20_body">Parecía estar ordenando sus pensamientos.</text:p>
      <text:p text:style-name="Text_20_body"><text:soft-page-break/>Luego se acomodó en una silla junto a la mesa.</text:p>
      <text:p text:style-name="Text_20_body">—Es una historia muy antigua —comenzó—. Tan antigua que la mayoría de la gente ya no la recuerda. Según este libro, ocurrió hace unos trescientos años, durante el reinado de Jumphrestebar.</text:p>
      <text:p text:style-name="Text_20_body">El nombre no significaba nada para los jóvenes.</text:p>
      <text:p text:style-name="Text_20_body">Jorhm continuó.</text:p>
      <text:p text:style-name="Text_20_body">—En aquella época una terrible guerra dividió Lluviara. Las regiones del este permanecieron leales al rey. Las del oeste intentaron derrocarlo. Durante años ambos bandos se enfrentaron sin descanso. Ciudades enteras fueron destruidas. Los caminos se volvieron peligrosos. El comercio desapareció. Nadie estaba seguro de quién vencería.</text:p>
      <text:p text:style-name="Text_20_body">El anciano hizo una pausa.</text:p>
      <text:p text:style-name="Text_20_body">Las llamas de una lámpara temblaron suavemente en la habitación.</text:p>
      <text:p text:style-name="Text_20_body">—Con el paso del tiempo la situación empeoró. Finalmente el rey se vio obligado a abandonar la capital y huir. Sus enemigos avanzaban desde todos los frentes. Temía que, si era derrotado, todo cuanto poseía cayera en manos de sus adversarios.</text:p>
      <text:p text:style-name="Text_20_body">Jorhm abrió nuevamente el libro y pasó varias páginas.</text:p>
      <text:p text:style-name="Text_20_body">Aparecieron dibujos de fortalezas, símbolos antiguos y textos escritos con una caligrafía difícil de descifrar.</text:p>
      <text:p text:style-name="Text_20_body">—Fue entonces cuando tomó una decisión extraordinaria. Ordenó construir una cámara secreta. Una bóveda oculta en algún lugar de Lluviara.</text:p>
      <text:p text:style-name="Text_20_body">Los jóvenes escuchaban atentamente.</text:p>
      <text:p text:style-name="Text_20_body">—Según la leyenda, aquella cámara fue diseñada para resistir cualquier ataque. Sus muros eran impenetrables. Su entrada estaba protegida por una puerta de hierro imposible de destruir. Ningún ejército podía atravesarla. Ninguna herramienta podía abrirla.</text:p>
      <text:p text:style-name="Text_20_body">El anciano señaló el dibujo de la llave.</text:p>
      <text:p text:style-name="Text_20_body">—Sólo existía una forma de entrar.</text:p>
      <text:p text:style-name="Text_20_body">La llave.</text:p>
      <text:p text:style-name="Text_20_body">Los ojos de los muchachos se dirigieron inmediatamente hacia el objeto que descansaba sobre la mesa.</text:p>
      <text:p text:style-name="Text_20_body">La piedra verde parecía brillar aún más bajo la luz de las lámparas.</text:p>
      <text:p text:style-name="Text_20_body">—Cuando el rey comprendió que iba a morir —continuó Jorhm— decidió preservar el secreto. Llamó a uno de sus sirvientes más fieles y le describió con exactitud la ubicación de la cámara. El hombre dibujó un mapa. Un único mapa.</text:p>
      <text:p text:style-name="Text_20_body">Jorhm volvió algunas páginas más.</text:p>
      <text:p text:style-name="Text_20_body">Y allí apareció.</text:p>
      <text:p text:style-name="Text_20_body"><text:soft-page-break/>Un conjunto de líneas, marcas y símbolos trazados a mano siglos atrás.</text:p>
      <text:p text:style-name="Text_20_body">Parecía poco más que un garabato.</text:p>
      <text:p text:style-name="Text_20_body">Y sin embargo todos comprendieron inmediatamente lo que estaban viendo.</text:p>
      <text:p text:style-name="Text_20_body">Era un mapa.</text:p>
      <text:p text:style-name="Text_20_body">El mapa del tesoro.</text:p>
      <text:p text:style-name="Text_20_body">Los jóvenes se acercaron todavía más.</text:p>
      <text:p text:style-name="Text_20_body">Aquellas líneas antiguas despertaban la imaginación de forma irresistible.</text:p>
      <text:p text:style-name="Text_20_body">Montañas.</text:p>
      <text:p text:style-name="Text_20_body">Ríos.</text:p>
      <text:p text:style-name="Text_20_body">Senderos.</text:p>
      <text:p text:style-name="Text_20_body">Lugares desconocidos.</text:p>
      <text:p text:style-name="Text_20_body">Algún punto oculto donde, según la leyenda, descansaba la fortuna de un rey.</text:p>
      <text:p text:style-name="Text_20_body">Jorhm observó las expresiones de los muchachos y soltó una breve carcajada.</text:p>
      <text:p text:style-name="Text_20_body">—No pongáis esas caras.</text:p>
      <text:p text:style-name="Text_20_body">Todos levantaron la vista.</text:p>
      <text:p text:style-name="Text_20_body">—Yo no creo una sola palabra de esta historia.</text:p>
      <text:p text:style-name="Text_20_body">Los jóvenes parecieron decepcionados.</text:p>
      <text:p text:style-name="Text_20_body">—¿No? —preguntó Kempht.</text:p>
      <text:p text:style-name="Text_20_body">—Por supuesto que no.</text:p>
      <text:p text:style-name="Text_20_body">Jorhm cerró el libro con suavidad.</text:p>
      <text:p text:style-name="Text_20_body">—Es un cuento para niños. Una leyenda. Nada más.</text:p>
      <text:p text:style-name="Text_20_body">Se reclinó en la silla.</text:p>
      <text:p text:style-name="Text_20_body">—Si esa bóveda existiera, alguien la habría encontrado hace siglos. Mucha gente buscó el tesoro. Algunos utilizaron copias de este mismo mapa. Otros siguieron pistas distintas. Ninguno encontró nada.</text:p>
      <text:p text:style-name="Text_20_body">El anciano golpeó la cubierta del libro con los dedos.</text:p>
      <text:p text:style-name="Text_20_body">—Ni la cámara apareció jamás. Ni la llave fue encontrada nunca.</text:p>
      <text:p text:style-name="Text_20_body">Miró de nuevo el dibujo.</text:p>
      <text:p text:style-name="Text_20_body">Después observó la llave.</text:p>
      <text:p text:style-name="Text_20_body">Luego volvió a mirar el dibujo.</text:p>
      <text:p text:style-name="Text_20_body"><text:soft-page-break/>Su expresión cambió ligeramente.</text:p>
      <text:p text:style-name="Text_20_body">La seguridad de sus palabras parecía haberse debilitado.</text:p>
      <text:p text:style-name="Text_20_body">—Y sin embargo...</text:p>
      <text:p text:style-name="Text_20_body">La habitación quedó en silencio.</text:p>
      <text:p text:style-name="Text_20_body">Jorhm tomó la llave entre sus manos.</text:p>
      <text:p text:style-name="Text_20_body">La giró lentamente.</text:p>
      <text:p text:style-name="Text_20_body">Examinó el escudo grabado.</text:p>
      <text:p text:style-name="Text_20_body">La piedra verde.</text:p>
      <text:p text:style-name="Text_20_body">Las formas del metal.</text:p>
      <text:p text:style-name="Text_20_body">Después volvió a compararla con la ilustración.</text:p>
      <text:p text:style-name="Text_20_body">Una vez más.</text:p>
      <text:p text:style-name="Text_20_body">Y otra.</text:p>
      <text:p text:style-name="Text_20_body">Como si esperara descubrir alguna diferencia.</text:p>
      <text:p text:style-name="Text_20_body">Pero no la encontró.</text:p>
      <text:p text:style-name="Text_20_body">Finalmente dejó escapar un largo suspiro.</text:p>
      <text:p text:style-name="Text_20_body">—Juraría que esto es imposible.</text:p>
      <text:p text:style-name="Text_20_body">Nadie habló.</text:p>
      <text:p text:style-name="Text_20_body">El anciano seguía observando la llave con una mezcla de fascinación y desconcierto.</text:p>
      <text:p text:style-name="Text_20_body">Por primera vez parecía dudar de sus propias convicciones.</text:p>
      <text:p text:style-name="Text_20_body">Y aquello resultaba mucho más inquietante que la leyenda misma.</text:p>
      <text:p text:style-name="Text_20_body"/>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4T18:23:26.540000000</meta:creation-date>
    <dc:date>2026-06-25T19:42:53.217000000</dc:date>
    <meta:editing-duration>PT52M21S</meta:editing-duration>
    <meta:editing-cycles>6</meta:editing-cycles>
    <meta:generator>LibreOffice/7.3.5.2$Windows_X86_64 LibreOffice_project/184fe81b8c8c30d8b5082578aee2fed2ea847c01</meta:generator>
    <meta:document-statistic meta:table-count="0" meta:image-count="0" meta:object-count="0" meta:page-count="7" meta:paragraph-count="182" meta:word-count="1366" meta:character-count="8502" meta:non-whitespace-character-count="7319"/>
  </office:meta>
</office:document-meta>
</file>