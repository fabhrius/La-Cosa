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1</text:h>
      <text:h text:style-name="Heading_20_3" text:outline-level="3">Parte 2 - La expedición</text:h>
      <text:p text:style-name="Text_20_body">Durante los días siguientes apenas descansaron.</text:p>
      <text:p text:style-name="Text_20_body">La compra de los caballos, las provisiones y el equipo había ocupado cada hora de luz. Cuando no estaban negociando con comerciantes, estaban revisando herramientas, reforzando cuerdas o calculando la cantidad de comida necesaria para el viaje.</text:p>
      <text:p text:style-name="Text_20_body">Todo debía estar preparado.</text:p>
      <text:p text:style-name="Text_20_body">Todo debía funcionar.</text:p>
      <text:p text:style-name="Text_20_body">La nueva expedición no podía fracasar.</text:p>
      <text:p text:style-name="Text_20_body">No después de todo lo que habían sacrificado.</text:p>
      <text:p text:style-name="Text_20_body">La tarde anterior a la partida, los tres hombres se reunieron en el patio de una vieja posada situada junto al camino principal.</text:p>
      <text:p text:style-name="Text_20_body">La carreta estaba lista.</text:p>
      <text:p text:style-name="Text_20_body">Dos caballos fuertes tiraban de ella.</text:p>
      <text:p text:style-name="Text_20_body">Los sacos de grano estaban bien sujetos.</text:p>
      <text:p text:style-name="Text_20_body">Las herramientas ocupaban varios cajones de madera.</text:p>
      <text:p text:style-name="Text_20_body">Las cuerdas habían sido enrolladas cuidadosamente.</text:p>
      <text:p text:style-name="Text_20_body">Incluso habían comprado algunas mantas nuevas para reemplazar las que perdieron durante la tormenta.</text:p>
      <text:p text:style-name="Text_20_body">Por primera vez en mucho tiempo parecía que las cosas volvían a estar bajo control.</text:p>
      <text:p text:style-name="Text_20_body">Kempht inspeccionó el equipo una última vez.</text:p>
      <text:p text:style-name="Text_20_body">—Debería ser suficiente.</text:p>
      <text:p text:style-name="Text_20_body">Nohk asintió.</text:p>
      <text:p text:style-name="Text_20_body">Johf no respondió.</text:p>
      <text:p text:style-name="Text_20_body">Observaba la llave.</text:p>
      <text:p text:style-name="Text_20_body">La sostenía entre los dedos mientras contemplaba el reflejo verdoso de la piedra.</text:p>
      <text:p text:style-name="Text_20_body">Nadie comentó nada.</text:p>
      <text:p text:style-name="Text_20_body">Pero Nohk lo vio.</text:p>
      <text:p text:style-name="Text_20_body">Y por primera vez sintió una leve inquietud.</text:p>
      <text:p text:style-name="Text_20_body">Algo había cambiado en Johf.</text:p>
      <text:p text:style-name="Text_20_body"><text:soft-page-break/>No era una sospecha concreta.</text:p>
      <text:p text:style-name="Text_20_body">Sólo una sensación.</text:p>
      <text:p text:style-name="Text_20_body">Un detalle difícil de explicar.</text:p>
      <text:p text:style-name="Text_20_body">Tal vez cansancio.</text:p>
      <text:p text:style-name="Text_20_body">Tal vez nervios.</text:p>
      <text:p text:style-name="Text_20_body">Tal vez algo peor.</text:p>
      <text:p text:style-name="Text_20_body">Sin embargo, la idea desapareció rápidamente.</text:p>
      <text:p text:style-name="Text_20_body">Todos estaban agotados.</text:p>
      <text:p text:style-name="Text_20_body">Todos habían cambiado.</text:p>
      <text:p text:style-name="Text_20_body">La búsqueda había dejado marcas en cada uno de ellos.</text:p>
      <text:p text:style-name="Text_20_body">Al caer la noche guardaron la llave junto al resto de los suministros.</text:p>
      <text:p text:style-name="Text_20_body">Partirían al amanecer.</text:p>
      <text:p text:style-name="Text_20_body">Una semana más.</text:p>
      <text:p text:style-name="Text_20_body">Quizá menos.</text:p>
      <text:p text:style-name="Text_20_body">Y todo terminaría.</text:p>
      <text:p text:style-name="Text_20_body">Aquella idea los acompañó mientras se retiraban a descansar.</text:p>
      <text:p text:style-name="Text_20_body">Pero ninguno durmió bien.</text:p>
      <text:p text:style-name="Text_20_body">El sueño llegaba y desaparecía.</text:p>
      <text:p text:style-name="Text_20_body">Interrumpido por pensamientos.</text:p>
      <text:p text:style-name="Text_20_body">Por recuerdos.</text:p>
      <text:p text:style-name="Text_20_body">Por cálculos.</text:p>
      <text:p text:style-name="Text_20_body">Por la imagen constante del tesoro.</text:p>
      <text:p text:style-name="Text_20_body">Nohk despertó sobresaltado.</text:p>
      <text:p text:style-name="Text_20_body">Durante unos segundos permaneció inmóvil.</text:p>
      <text:p text:style-name="Text_20_body">No sabía qué lo había despertado.</text:p>
      <text:p text:style-name="Text_20_body">La habitación estaba oscura.</text:p>
      <text:p text:style-name="Text_20_body">El amanecer todavía parecía lejano.</text:p>
      <text:p text:style-name="Text_20_body">Entonces volvió a escucharlo.</text:p>
      <text:p text:style-name="Text_20_body">Caballos.</text:p>
      <text:p text:style-name="Text_20_body">El sonido de cascos golpeando el suelo.</text:p>
      <text:p text:style-name="Text_20_body"><text:soft-page-break/>Lejos.</text:p>
      <text:p text:style-name="Text_20_body">Alejándose.</text:p>
      <text:p text:style-name="Text_20_body">Se incorporó de inmediato.</text:p>
      <text:p text:style-name="Text_20_body">Una sensación desagradable recorrió su espalda.</text:p>
      <text:p text:style-name="Text_20_body">Salió al exterior.</text:p>
      <text:p text:style-name="Text_20_body">Y se quedó paralizado.</text:p>
      <text:p text:style-name="Text_20_body">La carreta había desaparecido.</text:p>
      <text:p text:style-name="Text_20_body">Los caballos también.</text:p>
      <text:p text:style-name="Text_20_body">El espacio donde habían pasado la noche estaba vacío.</text:p>
      <text:p text:style-name="Text_20_body">Nohk sintió un golpe de frío en el estómago.</text:p>
      <text:p text:style-name="Text_20_body">Corrió hacia los suministros.</text:p>
      <text:p text:style-name="Text_20_body">Abrió las cajas.</text:p>
      <text:p text:style-name="Text_20_body">Revisó los paquetes.</text:p>
      <text:p text:style-name="Text_20_body">La llave no estaba.</text:p>
      <text:p text:style-name="Text_20_body">Durante unos segundos fue incapaz de pensar.</text:p>
      <text:p text:style-name="Text_20_body">Simplemente observó el vacío.</text:p>
      <text:p text:style-name="Text_20_body">Intentando comprender.</text:p>
      <text:p text:style-name="Text_20_body">Intentando negar lo evidente.</text:p>
      <text:p text:style-name="Text_20_body">Entonces una realidad brutal se abrió paso.</text:p>
      <text:p text:style-name="Text_20_body">Johf.</text:p>
      <text:p text:style-name="Text_20_body">Johf había desaparecido.</text:p>
      <text:p text:style-name="Text_20_body">Despertó a Kempht de un tirón.</text:p>
      <text:p text:style-name="Text_20_body">—¡Levántate!</text:p>
      <text:p text:style-name="Text_20_body">Kempht abrió los ojos sobresaltado.</text:p>
      <text:p text:style-name="Text_20_body">—¿Qué ocurre?</text:p>
      <text:p text:style-name="Text_20_body">—Johf.</text:p>
      <text:p text:style-name="Text_20_body">—¿Qué pasa con Johf?</text:p>
      <text:p text:style-name="Text_20_body">—Se ha llevado la llave.</text:p>
      <text:p text:style-name="Text_20_body">El joven tardó unos segundos en comprender.</text:p>
      <text:p text:style-name="Text_20_body">Luego salió al exterior.</text:p>
      <text:p text:style-name="Text_20_body"><text:soft-page-break/>Miró el lugar vacío.</text:p>
      <text:p text:style-name="Text_20_body">Y palideció.</text:p>
      <text:p text:style-name="Text_20_body">—No...</text:p>
      <text:p text:style-name="Text_20_body">—También se ha llevado la carreta.</text:p>
      <text:p text:style-name="Text_20_body">—No...</text:p>
      <text:p text:style-name="Text_20_body">—Y los caballos.</text:p>
      <text:p text:style-name="Text_20_body">El silencio que siguió fue terrible.</text:p>
      <text:p text:style-name="Text_20_body">Ambos comprendieron inmediatamente las consecuencias.</text:p>
      <text:p text:style-name="Text_20_body">Johf no sólo había robado la llave.</text:p>
      <text:p text:style-name="Text_20_body">Había robado toda la expedición.</text:p>
      <text:p text:style-name="Text_20_body">Todo lo que poseían.</text:p>
      <text:p text:style-name="Text_20_body">Todo aquello por lo que habían vendido sus hogares.</text:p>
      <text:p text:style-name="Text_20_body">Todo aquello por lo que habían sacrificado sus vidas.</text:p>
      <text:p text:style-name="Text_20_body">No quedaba nada.</text:p>
      <text:p text:style-name="Text_20_body">Absolutamente nada.</text:p>
      <text:p text:style-name="Text_20_body">Durante un instante Kempht pareció incapaz de reaccionar.</text:p>
      <text:p text:style-name="Text_20_body">—¿Qué hacemos?</text:p>
      <text:p text:style-name="Text_20_body">Nohk ya conocía la respuesta.</text:p>
      <text:p text:style-name="Text_20_body">No porque fuera la correcta.</text:p>
      <text:p text:style-name="Text_20_body">Sino porque no existía ninguna otra.</text:p>
      <text:p text:style-name="Text_20_body">—Lo perseguimos.</text:p>
      <text:p text:style-name="Text_20_body">—¿Cómo?</text:p>
      <text:p text:style-name="Text_20_body">Aquella pregunta lo cambió todo.</text:p>
      <text:p text:style-name="Text_20_body">No tenían dinero.</text:p>
      <text:p text:style-name="Text_20_body">No tenían caballos.</text:p>
      <text:p text:style-name="Text_20_body">No tenían equipo.</text:p>
      <text:p text:style-name="Text_20_body">No podían correr detrás de una carreta a pie.</text:p>
      <text:p text:style-name="Text_20_body">Era imposible.</text:p>
      <text:p text:style-name="Text_20_body">Kempht comprendió lo mismo.</text:p>
      <text:p text:style-name="Text_20_body">Y por primera vez apareció la desesperación.</text:p>
      <text:p text:style-name="Text_20_body"><text:soft-page-break/>No la decepción.</text:p>
      <text:p text:style-name="Text_20_body">No el miedo.</text:p>
      <text:p text:style-name="Text_20_body">La desesperación.</text:p>
      <text:p text:style-name="Text_20_body">Habían apostado todo.</text:p>
      <text:p text:style-name="Text_20_body">Y acababan de perderlo.</text:p>
      <text:p text:style-name="Text_20_body">Nohk observó las primeras sombras del amanecer apareciendo en el horizonte.</text:p>
      <text:p text:style-name="Text_20_body">Pensó en Johf alejándose.</text:p>
      <text:p text:style-name="Text_20_body">Pensó en la llave.</text:p>
      <text:p text:style-name="Text_20_body">Pensó en el tesoro.</text:p>
      <text:p text:style-name="Text_20_body">Pensó en la casa que ya no existía.</text:p>
      <text:p text:style-name="Text_20_body">En las tierras que había vendido.</text:p>
      <text:p text:style-name="Text_20_body">En Ghim.</text:p>
      <text:p text:style-name="Text_20_body">En los meses perdidos.</text:p>
      <text:p text:style-name="Text_20_body">Y entonces tomó una decisión.</text:p>
      <text:p text:style-name="Text_20_body">Una decisión que meses atrás le habría parecido impensable.</text:p>
      <text:p text:style-name="Text_20_body">—Necesitamos caballos.</text:p>
      <text:p text:style-name="Text_20_body">Kempht comprendió inmediatamente.</text:p>
      <text:p text:style-name="Text_20_body">—¿De quién?</text:p>
      <text:p text:style-name="Text_20_body">Nohk señaló hacia el extremo norte del pueblo.</text:p>
      <text:p text:style-name="Text_20_body">—Hompt tiene dos.</text:p>
      <text:p text:style-name="Text_20_body">Kempht permaneció inmóvil.</text:p>
      <text:p text:style-name="Text_20_body">El viejo Hompt.</text:p>
      <text:p text:style-name="Text_20_body">Lo conocían desde niños.</text:p>
      <text:p text:style-name="Text_20_body">Había compartido comidas con ellos.</text:p>
      <text:p text:style-name="Text_20_body">Los había ayudado muchas veces.</text:p>
      <text:p text:style-name="Text_20_body">Durante un instante todavía existió la posibilidad de detenerse.</text:p>
      <text:p text:style-name="Text_20_body">De reflexionar.</text:p>
      <text:p text:style-name="Text_20_body">De pensar.</text:p>
      <text:p text:style-name="Text_20_body">Pero sólo duró un instante.</text:p>
      <text:p text:style-name="Text_20_body">Porque en sus mentes la situación ya había sido resuelta.</text:p>
      <text:p text:style-name="Text_20_body"><text:soft-page-break/>Johf les había robado.</text:p>
      <text:p text:style-name="Text_20_body">Y ellos tenían derecho a recuperar lo que era suyo.</text:p>
      <text:p text:style-name="Text_20_body">Todo lo demás era secundario.</text:p>
      <text:p text:style-name="Text_20_body">—Se los devolveremos —dijo Kempht finalmente.</text:p>
      <text:p text:style-name="Text_20_body">—Claro que sí.</text:p>
      <text:p text:style-name="Text_20_body">—Cuando recuperemos la carreta.</text:p>
      <text:p text:style-name="Text_20_body">—Y la llave.</text:p>
      <text:p text:style-name="Text_20_body">—Hompt lo entenderá.</text:p>
      <text:p text:style-name="Text_20_body">Nohk asintió.</text:p>
      <text:p text:style-name="Text_20_body">—Sí. Lo entenderá.</text:p>
      <text:p text:style-name="Text_20_body">Ninguno de los dos pareció advertir la facilidad con la que acababan de justificar un robo.</text:p>
      <text:p text:style-name="Text_20_body">Ni siquiera se consideraban ladrones.</text:p>
      <text:p text:style-name="Text_20_body">Al contrario.</text:p>
      <text:p text:style-name="Text_20_body">Se sentían víctimas.</text:p>
      <text:p text:style-name="Text_20_body">Hombres obligados por las circunstancias.</text:p>
      <text:p text:style-name="Text_20_body">Hombres que simplemente recuperaban lo que les pertenecía.</text:p>
      <text:p text:style-name="Text_20_body">La decisión quedó tomada.</text:p>
      <text:p text:style-name="Text_20_body">Minutos después abandonaban el establo con los dos caballos.</text:p>
      <text:p text:style-name="Text_20_body">El pueblo continuaba dormido.</text:p>
      <text:p text:style-name="Text_20_body">Las casas permanecían oscuras.</text:p>
      <text:p text:style-name="Text_20_body">Nadie vio partir a los dos jinetes.</text:p>
      <text:p text:style-name="Text_20_body">Nadie escuchó sus explicaciones.</text:p>
      <text:p text:style-name="Text_20_body">Nadie tuvo oportunidad de detenerlos.</text:p>
      <text:p text:style-name="Text_20_body">A todo galope atravesaron las calles vacías y dejaron atrás Oldwood.</text:p>
      <text:p text:style-name="Text_20_body">Meses atrás habían abandonado aquel mismo lugar como exploradores.</text:p>
      <text:p text:style-name="Text_20_body">Como amigos.</text:p>
      <text:p text:style-name="Text_20_body">Como soñadores.</text:p>
      <text:p text:style-name="Text_20_body">Ahora era diferente.</text:p>
      <text:p text:style-name="Text_20_body">Muy diferente.</text:p>
      <text:p text:style-name="Text_20_body">Cabalgaban impulsados por la ira.</text:p>
      <text:p text:style-name="Text_20_body"><text:soft-page-break/>Por la obsesión.</text:p>
      <text:p text:style-name="Text_20_body">Por el miedo a perder aquello que creían suyo.</text:p>
      <text:p text:style-name="Text_20_body">Detrás de ellos quedaba el pueblo.</text:p>
      <text:p text:style-name="Text_20_body">La vida que habían conocido.</text:p>
      <text:p text:style-name="Text_20_body">Las personas que alguna vez fueron.</text:p>
      <text:p text:style-name="Text_20_body">Frente a ellos sólo existía una dirección.</text:p>
      <text:p text:style-name="Text_20_body">Una única dirección.</text:p>
      <text:p text:style-name="Text_20_body">Johf.</text:p>
      <text:p text:style-name="Text_20_body">Sabían exactamente adónde se dirigía.</text:p>
      <text:p text:style-name="P1">Y estaban decididos a alcanzarlo antes de que fuera demasiado tard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7:46:07.051000000</meta:creation-date>
    <dc:date>2026-06-26T17:51:48.128000000</dc:date>
    <meta:editing-duration>PT5M41S</meta:editing-duration>
    <meta:editing-cycles>1</meta:editing-cycles>
    <meta:document-statistic meta:table-count="0" meta:image-count="0" meta:object-count="0" meta:page-count="7" meta:paragraph-count="186" meta:word-count="939" meta:character-count="5878" meta:non-whitespace-character-count="5125"/>
    <meta:generator>LibreOffice/7.3.5.2$Windows_X86_64 LibreOffice_project/184fe81b8c8c30d8b5082578aee2fed2ea847c01</meta:generator>
  </office:meta>
</office:document-meta>
</file>