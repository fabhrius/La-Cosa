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  <style:style style:name="P2" style:family="paragraph" style:parent-style-name="Text_20_body">
      <style:text-properties fo:color="#c9211e" loext:opacity="100%" officeooo:rsid="001b055b" officeooo:paragraph-rsid="001b055b"/>
    </style:style>
    <style:style style:name="P3" style:family="paragraph" style:parent-style-name="Text_20_body">
      <style:text-properties officeooo:rsid="001b055b" officeooo:paragraph-rsid="001b055b"/>
    </style:style>
    <style:style style:name="P4" style:family="paragraph" style:parent-style-name="Text_20_body">
      <style:text-properties officeooo:rsid="001b055b" officeooo:paragraph-rsid="001b332b"/>
    </style:style>
    <style:style style:name="T1" style:family="text">
      <style:text-properties fo:color="#c9211e" loext:opacity="100%"/>
    </style:style>
    <style:style style:name="T2" style:family="text">
      <style:text-properties officeooo:rsid="001b055b"/>
    </style:style>
    <style:style style:name="T3" style:family="text">
      <style:text-properties officeooo:rsid="001b33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3</text:h>
      <text:h text:style-name="Heading_20_3" text:outline-level="3">Parte 3 - El desierto de piedra</text:h>
      <text:p text:style-name="Text_20_body">Dos días después encontraron el Desierto de Piedra.</text:p>
      <text:p text:style-name="Text_20_body">Ninguno de los dos estaba preparado para aquella visión.</text:p>
      <text:p text:style-name="Text_20_body">Hasta entonces ambos habían imaginado un terreno árido, difícil de atravesar, pero el paisaje que apareció ante ellos superaba cualquier expectativa.</text:p>
      <text:p text:style-name="Text_20_body">El mundo parecía haber muerto allí.</text:p>
      <text:p text:style-name="Text_20_body">Hasta donde alcanzaba la vista no existía ni un árbol.</text:p>
      <text:p text:style-name="Text_20_body">Ni una sombra.</text:p>
      <text:p text:style-name="Text_20_body">Ni una sola brizna de hierba.</text:p>
      <text:p text:style-name="Text_20_body">Sólo roca.</text:p>
      <text:p text:style-name="Text_20_body">Un océano interminable de piedra agrietada que se extendía en todas direcciones bajo un cielo blanco y abrasador.</text:p>
      <text:p text:style-name="Text_20_body">Grandes murallas de roca rojiza emergían del suelo formando cañones profundos y laberintos naturales.</text:p>
      <text:p text:style-name="Text_20_body">Algunas alcanzaban alturas imposibles.</text:p>
      <text:p text:style-name="Text_20_body">Otras aparecían erosionadas por siglos de viento y calor.</text:p>
      <text:p text:style-name="Text_20_body">Todo parecía inmóvil.</text:p>
      <text:p text:style-name="Text_20_body">Antiguo.</text:p>
      <text:p text:style-name="Text_20_body">Hostil.</text:p>
      <text:p text:style-name="Text_20_body">Como si la propia tierra rechazara la presencia de los hombres.</text:p>
      <text:p text:style-name="Text_20_body">El sol golpeaba con una violencia insoportable.</text:p>
      <text:p text:style-name="Text_20_body">La luz rebotaba sobre las piedras y ascendía nuevamente desde el suelo.</text:p>
      <text:p text:style-name="Text_20_body">El calor llegaba desde arriba y desde abajo al mismo tiempo.</text:p>
      <text:p text:style-name="Text_20_body">Cada respiración parecía secar un poco más la garganta.</text:p>
      <text:p text:style-name="Text_20_body">Cada paso levantaba polvo caliente.</text:p>
      <text:p text:style-name="Text_20_body">Cada hora consumía las fuerzas que les quedaban.</text:p>
      <text:p text:style-name="Text_20_body">Nohk y Kempht habían cabalgado sin descanso desde que abandonaron Oldwood.</text:p>
      <text:p text:style-name="Text_20_body">Apenas habían dormido.</text:p>
      <text:p text:style-name="Text_20_body">Apenas habían comido.</text:p>
      <text:p text:style-name="Text_20_body"><text:soft-page-break/>No llevaban provisiones.</text:p>
      <text:p text:style-name="Text_20_body">No llevaban agua.</text:p>
      <text:p text:style-name="Text_20_body">No llevaban nada.</text:p>
      <text:p text:style-name="Text_20_body">Sólo la desesperación de quienes lo habían perdido todo.</text:p>
      <text:p text:style-name="Text_20_body">Sus labios estaban agrietados.</text:p>
      <text:p text:style-name="Text_20_body">Sus rostros cubiertos de polvo.</text:p>
      <text:p text:style-name="Text_20_body">Los ojos hundidos por el cansancio.</text:p>
      <text:p text:style-name="Text_20_body">Varias veces durante el trayecto estuvieron a punto de detenerse.</text:p>
      <text:p text:style-name="Text_20_body">Pero cada vez que la idea aparecía, recordaban a Johf.</text:p>
      <text:p text:style-name="Text_20_body">Recordaban la llave.</text:p>
      <text:p text:style-name="Text_20_body">Recordaban el carro.</text:p>
      <text:p text:style-name="Text_20_body">Recordaban las tierras vendidas.</text:p>
      <text:p text:style-name="Text_20_body">Las monedas gastadas.</text:p>
      <text:p text:style-name="Text_20_body">La casa perdida.</text:p>
      <text:p text:style-name="Text_20_body">Y continuaban avanzando.</text:p>
      <text:p text:style-name="Text_20_body">No podían detenerse.</text:p>
      <text:p text:style-name="Text_20_body">No después de todo aquello.</text:p>
      <text:p text:style-name="Text_20_body">La tarde del segundo día, cuando el calor comenzaba a disminuir ligeramente, Kempht divisó algo en la distancia.</text:p>
      <text:p text:style-name="Text_20_body">Al principio creyó que era un espejismo.</text:p>
      <text:p text:style-name="Text_20_body">Las ondas de aire caliente deformaban el horizonte.</text:p>
      <text:p text:style-name="Text_20_body">Pero poco a poco la imagen se volvió más clara.</text:p>
      <text:p text:style-name="Text_20_body">Una carreta.</text:p>
      <text:p text:style-name="Text_20_body">Dos caballos.</text:p>
      <text:p text:style-name="Text_20_body">Un pequeño refugio improvisado junto a una pared rocosa.</text:p>
      <text:p text:style-name="Text_20_body">—Allí —murmuró.</text:p>
      <text:p text:style-name="Text_20_body">Nohk levantó la vista.</text:p>
      <text:p text:style-name="Text_20_body">Y la vio.</text:p>
      <text:p text:style-name="Text_20_body">Incluso desde aquella distancia reconoció inmediatamente el carro.</text:p>
      <text:p text:style-name="Text_20_body">Una extraña mezcla de alivio y rabia recorrió su cuerpo.</text:p>
      <text:p text:style-name="Text_20_body"><text:soft-page-break/>Lo habían encontrado.</text:p>
      <text:p text:style-name="Text_20_body">Johf estaba allí.</text:p>
      <text:p text:style-name="Text_20_body">Después de dos días de persecución.</text:p>
      <text:p text:style-name="Text_20_body">Después de dos días de hambre y sed.</text:p>
      <text:p text:style-name="Text_20_body">Después de dos días cabalgando casi sin descanso.</text:p>
      <text:p text:style-name="Text_20_body">Por fin lo habían alcanzado.</text:p>
      <text:p text:style-name="Text_20_body">Descendieron de los caballos y buscaron refugio entre las rocas.</text:p>
      <text:p text:style-name="Text_20_body">Desde allí podían observar el campamento sin ser vistos.</text:p>
      <text:p text:style-name="Text_20_body">Johf parecía cómodo.</text:p>
      <text:p text:style-name="Text_20_body">Había colocado una lona para protegerse del sol.</text:p>
      <text:p text:style-name="Text_20_body">Los caballos descansaban.</text:p>
      <text:p text:style-name="Text_20_body">Las provisiones permanecían apiladas junto a la carreta.</text:p>
      <text:p text:style-name="Text_20_body">Incluso desde lejos podían distinguir los barriles de agua.</text:p>
      <text:p text:style-name="Text_20_body">Aquella visión despertó una ira silenciosa.</text:p>
      <text:p text:style-name="Text_20_body">Mientras ellos atravesaban el desierto con la garganta ardiendo, Johf viajaba protegido.</text:p>
      <text:p text:style-name="Text_20_body">Mientras ellos sufrían, él descansaba.</text:p>
      <text:p text:style-name="Text_20_body">Mientras ellos arriesgaban la vida, él disfrutaba de todo aquello que les había robado.</text:p>
      <text:p text:style-name="Text_20_body">Esperaron.</text:p>
      <text:p text:style-name="Text_20_body">No hablaron demasiado.</text:p>
      <text:p text:style-name="Text_20_body">No era necesario.</text:p>
      <text:p text:style-name="Text_20_body">La decisión parecía evidente.</text:p>
      <text:p text:style-name="Text_20_body">No podían enfrentarse a él durante el día.</text:p>
      <text:p text:style-name="Text_20_body">Estaban agotados.</text:p>
      <text:p text:style-name="Text_20_body">Y Johf todavía conservaba todas las ventajas.</text:p>
      <text:p text:style-name="Text_20_body">Así que aguardaron.</text:p>
      <text:p text:style-name="Text_20_body">Horas interminables.</text:p>
      <text:p text:style-name="Text_20_body">Ocultos entre las piedras.</text:p>
      <text:p text:style-name="Text_20_body">Observando.</text:p>
      <text:p text:style-name="Text_20_body">El sol descendió lentamente.</text:p>
      <text:p text:style-name="Text_20_body">Las sombras comenzaron a crecer.</text:p>
      <text:p text:style-name="Text_20_body"><text:soft-page-break/>El calor se transformó en un frío desagradable.</text:p>
      <text:p text:style-name="Text_20_body">Y finalmente llegó la noche.</text:p>
      <text:p text:style-name="Text_20_body">La oscuridad envolvió el desierto.</text:p>
      <text:p text:style-name="Text_20_body">El silencio se volvió absoluto.</text:p>
      <text:p text:style-name="Text_20_body">Sólo permanecía el viento recorriendo los cañones.</text:p>
      <text:p text:style-name="Text_20_body">Esperaron todavía un poco más.</text:p>
      <text:p text:style-name="Text_20_body">Hasta que estuvieron seguros.</text:p>
      <text:p text:style-name="Text_20_body">Hasta que las últimas luces del campamento desaparecieron.</text:p>
      <text:p text:style-name="Text_20_body">Hasta que Johf quedó profundamente dormido.</text:p>
      <text:p text:style-name="Text_20_body">Entonces avanzaron.</text:p>
      <text:p text:style-name="Text_20_body">Lentamente.</text:p>
      <text:p text:style-name="Text_20_body">Sin hacer ruido.</text:p>
      <text:p text:style-name="P1"/>
      <text:p text:style-name="P1"/>
      <text:p text:style-name="Text_20_body">Todo estaba allí.</text:p>
      <text:p text:style-name="Text_20_body">Las provisiones.</text:p>
      <text:p text:style-name="Text_20_body">Las herramientas.</text:p>
      <text:p text:style-name="Text_20_body">Las cuerdas.</text:p>
      <text:p text:style-name="Text_20_body">Los barriles de agua.</text:p>
      <text:p text:style-name="Text_20_body">Y la llave.</text:p>
      <text:p text:style-name="P1"/>
      <text:p text:style-name="Text_20_body">Nohk la tomó inmediatamente.</text:p>
      <text:p text:style-name="Text_20_body">La sostuvo durante un instante.</text:p>
      <text:p text:style-name="Text_20_body">Y sintió una satisfacción oscura.</text:p>
      <text:p text:style-name="P1"/>
      <text:p text:style-name="Text_20_body">Desataron los caballos.</text:p>
      <text:p text:style-name="Text_20_body">Tomaron las riendas.</text:p>
      <text:p text:style-name="Text_20_body">Y comenzaron a alejarse.</text:p>
      <text:p text:style-name="Text_20_body">Sin ruido.</text:p>
      <text:p text:style-name="Text_20_body">Sin prisas.</text:p>
      <text:p text:style-name="Text_20_body"><text:soft-page-break/><text:span text:style-name="T1"/></text:p>
      <text:p text:style-name="Text_20_body"><text:s/>una voz rompió el silencio.</text:p>
      <text:p text:style-name="Text_20_body">—¡No!</text:p>
      <text:p text:style-name="Text_20_body">Johf.</text:p>
      <text:p text:style-name="Text_20_body">Había despertado.</text:p>
      <text:p text:style-name="Text_20_body">—¡Esperad!</text:p>
      <text:p text:style-name="Text_20_body">Su voz resonó en la oscuridad.</text:p>
      <text:p text:style-name="Text_20_body"><text:span text:style-name="T2">C</text:span>orría detrás de ellos.</text:p>
      <text:p text:style-name="Text_20_body">—¡No me dejéis aquí!</text:p>
      <text:p text:style-name="Text_20_body">Poco a poco la distancia aumentó.</text:p>
      <text:p text:style-name="P4">Johf <text:span text:style-name="T3">ya no pudo perseguirlos.</text:span></text:p>
      <text:p text:style-name="P4"><text:span text:style-name="T3">Y </text:span>vio como la carreta se alejaba dejandolo a merced del desierto.</text:p>
      <text:p text:style-name="P3">Sin consideracion, sin discusiones, sin perdon, sin piedad.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18:12:36.205000000</meta:creation-date>
    <dc:date>2026-06-26T18:39:27.351000000</dc:date>
    <meta:editing-duration>PT16M31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24" meta:word-count="692" meta:character-count="4370" meta:non-whitespace-character-count="3801"/>
  </office:meta>
</office:document-meta>
</file>