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31dea"/>
    </style:style>
    <style:style style:name="P2" style:family="paragraph" style:parent-style-name="Text_20_body">
      <style:text-properties officeooo:paragraph-rsid="00131dea"/>
    </style:style>
    <style:style style:name="P3" style:family="paragraph" style:parent-style-name="Text_20_body">
      <style:text-properties officeooo:rsid="000b13a4" officeooo:paragraph-rsid="000b13a4"/>
    </style:style>
    <style:style style:name="P4" style:family="paragraph" style:parent-style-name="Text_20_body">
      <style:text-properties fo:color="#c9211e" loext:opacity="100%"/>
    </style:style>
    <style:style style:name="P5" style:family="paragraph" style:parent-style-name="Text_20_body">
      <style:text-properties officeooo:paragraph-rsid="0011fd8a"/>
    </style:style>
    <style:style style:name="P6" style:family="paragraph" style:parent-style-name="Text_20_body">
      <style:text-properties officeooo:rsid="000d0314" officeooo:paragraph-rsid="000d0314"/>
    </style:style>
    <style:style style:name="P7" style:family="paragraph" style:parent-style-name="Text_20_body">
      <style:text-properties officeooo:rsid="00131dea" officeooo:paragraph-rsid="00131dea"/>
    </style:style>
    <style:style style:name="T1" style:family="text">
      <style:text-properties officeooo:rsid="000d0314"/>
    </style:style>
    <style:style style:name="T2" style:family="text">
      <style:text-properties officeooo:rsid="000eaf09"/>
    </style:style>
    <style:style style:name="T3" style:family="text">
      <style:text-properties officeooo:rsid="000f039e"/>
    </style:style>
    <style:style style:name="T4" style:family="text">
      <style:text-properties officeooo:rsid="000f195a"/>
    </style:style>
    <style:style style:name="T5" style:family="text">
      <style:text-properties officeooo:rsid="000f32ae"/>
    </style:style>
    <style:style style:name="T6" style:family="text">
      <style:text-properties officeooo:rsid="000f5bd4"/>
    </style:style>
    <style:style style:name="T7" style:family="text">
      <style:text-properties officeooo:rsid="0010de22"/>
    </style:style>
    <style:style style:name="T8" style:family="text">
      <style:text-properties officeooo:rsid="0011fd8a"/>
    </style:style>
    <style:style style:name="T9" style:family="text">
      <style:text-properties officeooo:rsid="00131dea"/>
    </style:style>
    <style:style style:name="T10" style:family="text">
      <style:text-properties officeooo:rsid="001685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Capítulo 1 - La llave de hierro</text:h>
      <text:h text:style-name="Heading_20_2" text:outline-level="2"/>
      <text:h text:style-name="Heading_20_2" text:outline-level="2"><text:span text:style-name="T5">Parte 1 - </text:span>El valle</text:h>
      <text:p text:style-name="Text_20_body"/>
      <text:p text:style-name="P3">Sucedio durante el reinado de Aldouseadhrickan<text:span text:style-name="T1">.</text:span></text:p>
      <text:p text:style-name="P6">En algun lugar del valle al este de las montañas. Allí, donde el río Bager desciende de las tierras altas atravesando los bosques de Oldwood, vivía un joven campesino llamado Nohk.</text:p>
      <text:p text:style-name="Text_20_body">Poseía una pequeña casa de madera construida junto al río, en una estrecha franja de terreno fértil donde cultivaba granos y criaba algunos animales<text:span text:style-name="T10">. G</text:span>allinas, cabras<text:span text:style-name="T1">,</text:span> <text:span text:style-name="T10">y</text:span> caballos.</text:p>
      <text:p text:style-name="Text_20_body">No era rico.</text:p>
      <text:p text:style-name="Text_20_body">Pero tampoco era pobre.</text:p>
      <text:p text:style-name="Text_20_body">Tenía suficiente para vivir.</text:p>
      <text:p text:style-name="Text_20_body">Y en aquellos tiempos, aquello era una fortuna.</text:p>
      <text:p text:style-name="Text_20_body">Las mañanas comenzaban con la luz dorada del amanecer reflejándose sobre el agua.</text:p>
      <text:p text:style-name="Text_20_body">Las tardes transcurrían entre el trabajo de los campos y el sonido constante del río golpeando suavemente contra las raíces de los árboles.</text:p>
      <text:p text:style-name="Text_20_body">Y por las noches, cuando el viento descendía desde las montañas, el valle quedaba envuelto en un silencio tan profundo que podía escucharse el canto lejano de los búhos en el bosque.</text:p>
      <text:p text:style-name="Text_20_body">Nohk amaba aquel lugar.</text:p>
      <text:p text:style-name="Text_20_body">Conocía cada curva del río.<text:span text:style-name="T1"> </text:span>Cada árbol.<text:span text:style-name="T1"> </text:span>Cada sendero.</text:p>
      <text:p text:style-name="Text_20_body">Sabía dónde crecían las flores en primavera y dónde aparecían los primeros hongos después de la lluvia.</text:p>
      <text:p text:style-name="Text_20_body">Aquella parte del mundo parecía existir fuera del tiempo.</text:p>
      <text:p text:style-name="Text_20_body">Todo encontraba allí un equilibrio perfecto.</text:p>
      <text:p text:style-name="Text_20_body">La lluvia llegaba cuando era necesaria.<text:span text:style-name="T2"> </text:span>El sol calentaba sin quemar.<text:span text:style-name="T2"> </text:span>Las cosechas crecían.<text:span text:style-name="T2"> </text:span>Los animales prosperaban.<text:span text:style-name="T2"> </text:span>Y los años pasaban con una serenidad que hacía difícil imaginar que algo pudiera cambiar.</text:p>
      <text:p text:style-name="Text_20_body">Algunas tardes caminaba hasta el pueblo.</text:p>
      <text:p text:style-name="Text_20_body">No estaba lejos.<text:span text:style-name="T3"> </text:span>Media hora siguiendo el sendero que atravesaba el bosque.</text:p>
      <text:p text:style-name="Text_20_body"><text:soft-page-break/>Allí compraba herramientas, vendía parte de sus productos o simplemente se reunía con los amigos en la cantina.</text:p>
      <text:p text:style-name="Text_20_body">Aquellos encuentros eran una de las pocas diversiones disponibles en la región.</text:p>
      <text:p text:style-name="Text_20_body">Los jóvenes discutían negocios, hablaban de cosechas, intercambiaban noticias y soñaban con proyectos que casi nunca llegaban a realizar.</text:p>
      <text:p text:style-name="Text_20_body">Y aunque todos se quejaban ocasionalmente de la monotonía de la vida rural, en el fondo ninguno deseaba realmente cambiarla.</text:p>
      <text:p text:style-name="Text_20_body">Eran felices.</text:p>
      <text:p text:style-name="Text_20_body">Tal vez sin saberlo.</text:p>
      <text:p text:style-name="Text_20_body"/>
      <text:p text:style-name="Text_20_body">Aquella tarde parecía una más entre tantas otras.</text:p>
      <text:p text:style-name="Text_20_body">El sol descendía lentamente detrás de las montañas.<text:span text:style-name="T4"> </text:span>Una brisa suave agitaba las hojas de los árboles.</text:p>
      <text:p text:style-name="Text_20_body">Y Nohk caminaba hacia el pueblo siguiendo el sendero habitual.</text:p>
      <text:p text:style-name="Text_20_body"/>
      <text:p text:style-name="Text_20_body">Entonces vio algo extraño.</text:p>
      <text:p text:style-name="Text_20_body">Un destello.<text:span text:style-name="T5"> </text:span>Algo brillaba entre la hierba.</text:p>
      <text:p text:style-name="P4"/>
      <text:p text:style-name="Text_20_body">Nohk abandonó el sendero y se acercó.</text:p>
      <text:p text:style-name="Text_20_body"/>
      <text:p text:style-name="Horizontal_20_Line"/>
      <text:h text:style-name="Heading_20_2" text:outline-level="2"/>
      <text:h text:style-name="Heading_20_2" text:outline-level="2"><text:span text:style-name="T6">Parte 2 - </text:span>La llave</text:h>
      <text:p text:style-name="Text_20_body"/>
      <text:p text:style-name="Text_20_body">El brillo procedía de la base de un viejo roble.</text:p>
      <text:p text:style-name="Text_20_body">Entre la maleza sobresalía parcialmente un objeto metálico.</text:p>
      <text:p text:style-name="Text_20_body">Nohk apartó algunas ramas<text:span text:style-name="T7"> y </text:span>lo recogió.</text:p>
      <text:p text:style-name="Text_20_body">Era una llave<text:span text:style-name="T7"> </text:span>de hierro.</text:p>
      <text:p text:style-name="Text_20_body"><text:span text:style-name="T7">Aunque</text:span> no se parecía a ninguna que hubiera visto antes.</text:p>
      <text:p text:style-name="Text_20_body">Era más grande que las <text:span text:style-name="T7">de las </text:span>cerraduras habituales.</text:p>
      <text:p text:style-name="Text_20_body"><text:soft-page-break/>El metal estaba trabajado con una precisión poco común.</text:p>
      <text:p text:style-name="Text_20_body">El mango formaba un diseño elegante compuesto por líneas curvas y figuras geométricas entrelazadas.</text:p>
      <text:p text:style-name="Text_20_body">Y en el centro destacaba una piedra verde del tamaño de una nuez.</text:p>
      <text:p text:style-name="Text_20_body">La gema capturaba la luz del sol y la devolvía en destellos esmeralda.</text:p>
      <text:p text:style-name="Text_20_body">Aquello era lo que había llamado su atención desde el sendero.</text:p>
      <text:p text:style-name="Text_20_body"/>
      <text:p text:style-name="Text_20_body">Nohk giró la pieza entre los dedos.</text:p>
      <text:p text:style-name="Text_20_body">Pesaba más de lo esperado.</text:p>
      <text:p text:style-name="Text_20_body">En uno de los lados descubrió un símbolo grabado en el metal.</text:p>
      <text:p text:style-name="Text_20_body">Parecía un escudo.<text:span text:style-name="T7"> </text:span>O tal vez un emblema real.</text:p>
      <text:p text:style-name="Text_20_body">Era un objeto demasiado valioso para pertenecer a un campesino.</text:p>
      <text:p text:style-name="Text_20_body">Tal vez algún noble la había perdido durante un viaje.<text:span text:style-name="T7"> </text:span>Tal vez había caído de un carruaje.</text:p>
      <text:p text:style-name="Text_20_body"/>
      <text:p text:style-name="Text_20_body">Aquella piedra por sí sola podía valer una pequeña fortuna.</text:p>
      <text:p text:style-name="Text_20_body">Quizá podría venderla en el pueblo.</text:p>
      <text:p text:style-name="Text_20_body">Con un buen comprador tal vez conseguiría dinero suficiente para comprar un carro nuevo.</text:p>
      <text:p text:style-name="Text_20_body">O reparar el tejado antes del invierno.</text:p>
      <text:p text:style-name="Text_20_body">Guardó la llave en una bolsa de cuero y retomó el camino.</text:p>
      <text:p text:style-name="Text_20_body"/>
      <text:h text:style-name="Heading_20_2" text:outline-level="2"><text:span text:style-name="T9">Parte 3 - </text:span>La leyenda</text:h>
      <text:p text:style-name="Text_20_body"/>
      <text:p text:style-name="Text_20_body">Como siempre que llegaba al pueblo, su primera parada fue la cantina.</text:p>
      <text:p text:style-name="Text_20_body">Era un edificio grande de madera oscura situado junto a la plaza principal.</text:p>
      <text:p text:style-name="Text_20_body">A aquella hora estaba bastante concurrido.</text:p>
      <text:p text:style-name="Text_20_body">Campesinos.<text:span text:style-name="T8"> </text:span>Mercaderes.<text:span text:style-name="T8"> </text:span>Artesanos.</text:p>
      <text:p text:style-name="Text_20_body">La mayoría conversaba animadamente alrededor de largas mesas comunales.</text:p>
      <text:p text:style-name="Text_20_body">Nohk localizó enseguida a sus amigos.</text:p>
      <text:p text:style-name="Text_20_body">Cinco jóvenes del pueblo discutían sobre intercambios de mercancías y precios de las cosechas.</text:p>
      <text:p text:style-name="Text_20_body">Gran parte de los acuerdos comerciales de la región comenzaban precisamente allí.</text:p>
      <text:p text:style-name="Text_20_body"><text:soft-page-break/>Entre jarras de cerveza y discusiones interminables.</text:p>
      <text:p text:style-name="Text_20_body">Nohk tomó asiento.</text:p>
      <text:p text:style-name="Text_20_body">—¿Qué os parece esto? —preguntó.</text:p>
      <text:p text:style-name="Text_20_body">Y dejó la llave sobre la mesa.</text:p>
      <text:p text:style-name="Text_20_body">La conversación se detuvo inmediatamente.</text:p>
      <text:p text:style-name="Text_20_body">Todos miraron el objeto.</text:p>
      <text:p text:style-name="Text_20_body">La piedra verde brilló bajo la luz de las lámparas.</text:p>
      <text:p text:style-name="Text_20_body"/>
      <text:p text:style-name="Text_20_body">Uno de ellos la tomó entre las manos.<text:span text:style-name="T8"> </text:span>Otro examinó el símbolo grabado.<text:span text:style-name="T8"> </text:span>Un tercero comprobó el peso.</text:p>
      <text:p text:style-name="Text_20_body">Durante varios minutos intercambiaron opiniones.</text:p>
      <text:p text:style-name="Text_20_body">—No es una llave corriente.</text:p>
      <text:p text:style-name="Text_20_body">Aquello confirmaba sus sospechas.</text:p>
      <text:p text:style-name="Text_20_body">Quizá realmente había encontrado algo valioso.</text:p>
      <text:p text:style-name="Text_20_body">Los comentarios comenzaron a volverse cada vez más entusiastas.<text:span text:style-name="T8"> </text:span>Discutieron posibles compradores.</text:p>
      <text:p text:style-name="Text_20_body">Calcularon precios.<text:span text:style-name="T8"> </text:span>Imaginaron distintas maneras de venderla.</text:p>
      <text:p text:style-name="Text_20_body"/>
      <text:p text:style-name="Text_20_body">Hasta que una voz interrumpió la conversación.</text:p>
      <text:p text:style-name="P5">—Esperad.<text:span text:style-name="T8"> He visto esta llave antes.</text:span></text:p>
      <text:p text:style-name="P5">Quien había hablado<text:span text:style-name="T8">, Ghim</text:span><text:span text:style-name="T9">, </text:span><text:span text:style-name="T8">el ma</text:span><text:span text:style-name="T9">s joven del grupo,</text:span> <text:span text:style-name="T8">t</text:span>enía la llave entre las manos y la observaba con expresión extraña.</text:p>
      <text:p text:style-name="P2">—En un libro antiguo.<text:span text:style-name="T9"> En casa de Jorhm.</text:span></text:p>
      <text:p text:style-name="P7">­Aquello llamó inmediatamente la atención de todos.</text:p>
      <text:p text:style-name="P2">Jorhm era un anciano conocido por conservar una colección de manuscritos heredados de generaciones anteriores.</text:p>
      <text:p text:style-name="P2">Libros extraños.<text:span text:style-name="T9"> </text:span>Viejas leyendas.<text:span text:style-name="T9"> </text:span>Historias olvidadas.<text:span text:style-name="T9"> </text:span>Nadie les prestaba demasiada atención.</text:p>
      <text:p text:style-name="P2">—Estoy seguro —continuó el joven—. Es exactamente la misma llave.</text:p>
      <text:p text:style-name="P1">Nohk dejó de verla como un simple objeto valioso.<text:span text:style-name="T9"> </text:span>Quizá aquella pieza de hierro escondía una historia.</text:p>
      <text:p text:style-name="P1"/>
      <text:p text:style-name="P2">—Si yo fuera tú —añadió finalmente—, averiguaría más antes de venderla.</text:p>
      <text:p text:style-name="P2">Podría valer más de lo que <text:span text:style-name="T9">piensas</text:span>.</text:p>
      <text:p text:style-name="Text_20_body"/>
      <text:p text:style-name="Text_20_body"><text:soft-page-break/></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24T15:13:39.593000000</meta:creation-date>
    <dc:date>2026-07-23T10:44:09.274000000</dc:date>
    <meta:editing-duration>PT40M4S</meta:editing-duration>
    <meta:editing-cycles>9</meta:editing-cycles>
    <meta:generator>LibreOffice/7.3.5.2$Windows_X86_64 LibreOffice_project/184fe81b8c8c30d8b5082578aee2fed2ea847c01</meta:generator>
    <meta:document-statistic meta:table-count="0" meta:image-count="0" meta:object-count="0" meta:page-count="5" meta:paragraph-count="89" meta:word-count="911" meta:character-count="5562" meta:non-whitespace-character-count="4743"/>
  </office:meta>
</office:document-meta>
</file>