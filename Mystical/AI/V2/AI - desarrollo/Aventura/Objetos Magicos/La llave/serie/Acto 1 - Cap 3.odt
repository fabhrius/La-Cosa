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22dc2"/>
    </style:style>
    <style:style style:name="P2" style:family="paragraph" style:parent-style-name="Text_20_body">
      <style:text-properties officeooo:paragraph-rsid="00022dc2"/>
    </style:style>
    <style:style style:name="P3" style:family="paragraph" style:parent-style-name="Heading_20_2">
      <style:text-properties officeooo:paragraph-rsid="00022dc2"/>
    </style:style>
    <style:style style:name="P4" style:family="paragraph" style:parent-style-name="Heading_20_2">
      <style:text-properties officeooo:rsid="0005b2ec" officeooo:paragraph-rsid="0005b2ec"/>
    </style:style>
    <style:style style:name="P5" style:family="paragraph" style:parent-style-name="Text_20_body">
      <style:text-properties officeooo:paragraph-rsid="0005b2ec"/>
    </style:style>
    <style:style style:name="P6" style:family="paragraph" style:parent-style-name="Text_20_body">
      <style:text-properties officeooo:paragraph-rsid="00091e4f"/>
    </style:style>
    <style:style style:name="T1" style:family="text">
      <style:text-properties officeooo:rsid="00024e08"/>
    </style:style>
    <style:style style:name="T2" style:family="text">
      <style:text-properties officeooo:rsid="0004062b"/>
    </style:style>
    <style:style style:name="T3" style:family="text">
      <style:text-properties officeooo:rsid="0005b2ec"/>
    </style:style>
    <style:style style:name="T4" style:family="text">
      <style:text-properties officeooo:rsid="00091e4f"/>
    </style:style>
    <style:style style:name="T5" style:family="text">
      <style:text-properties officeooo:rsid="000b12ad"/>
    </style:style>
    <style:style style:name="T6" style:family="text">
      <style:text-properties officeooo:rsid="000eac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3" text:outline-level="2"><text:span text:style-name="T1">Parte 1 - </text:span>La compra</text:h>
      <text:p text:style-name="P2"/>
      <text:p text:style-name="P2">Durante los días siguientes, la llave se convirtió en el tema principal de todas las conversaciones.</text:p>
      <text:p text:style-name="P2">Al principio sólo era una curiosidad.<text:span text:style-name="T1"> </text:span>Un objeto extraño encontrado en el bosque.</text:p>
      <text:p text:style-name="P2">Pero la mente humana rara vez se conforma con una explicación sencilla cuando existe otra más emocionante.</text:p>
      <text:p text:style-name="P2">Cada tarde los jóvenes se reunían en la cantina.<text:span text:style-name="T1"> </text:span>Y cada tarde la conversación regresaba inevitablemente al mismo asunto.</text:p>
      <text:p text:style-name="P2">La llave.<text:span text:style-name="T1"> </text:span>El rey.<text:span text:style-name="T1"> </text:span>El tesoro.<text:span text:style-name="T1"> </text:span>El mapa.</text:p>
      <text:p text:style-name="P2">Al principio discutían posibilidades.<text:span text:style-name="T1"> </text:span>Después empezaron a discutir certezas.</text:p>
      <text:p text:style-name="P2">¿Qué ocurriría si la leyenda fuera cierta?</text:p>
      <text:p text:style-name="P2">¿Y si aquella llave era realmente la llave del rey?</text:p>
      <text:p text:style-name="P2">¿Y si nadie había encontrado el tesoro porque nadie había encontrado la llave?</text:p>
      <text:p text:style-name="P2">Aquella última idea resultaba especialmente poderosa.</text:p>
      <text:p text:style-name="P2">Ellos tenían la llave.<text:span text:style-name="T1"> </text:span>La auténtica.<text:span text:style-name="T1"> </text:span>La misma que aparecía dibujada en el libro.</text:p>
      <text:p text:style-name="P2">Cuanto más hablaban de ello, más razonable parecía.</text:p>
      <text:p text:style-name="P2">Y más difícil resultaba pensar en otra cosa.</text:p>
      <text:p text:style-name="P2">Nohk comenzó a imaginar cofres repletos de monedas.<text:span text:style-name="T1"> </text:span>Kempht hablaba de comprar tierras.</text:p>
      <text:p text:style-name="P2">Otros soñaban con abrir negocios, construir casas más grandes o viajar a lugares que jamás habían visto.</text:p>
      <text:p text:style-name="P2">La fortuna del rey empezó a adquirir forma en sus pensamientos.<text:span text:style-name="T1"> </text:span>Ya no era una leyenda.</text:p>
      <text:p text:style-name="P2">Era una oportunidad.</text:p>
      <text:p text:style-name="P2"><text:span text:style-name="T4">E</text:span>xtraordinaria.<text:span text:style-name="T4"> Única.</text:span></text:p>
      <text:p text:style-name="P2">Finalmente decidieron regresar a la casa de Jorhm.<text:span text:style-name="T1"> </text:span>Necesitaban volver a ver el libro.</text:p>
      <text:p text:style-name="P6"><text:span text:style-name="T4">Querían</text:span> estudiar el mapa<text:span text:style-name="T4"> detenidamente</text:span>.</text:p>
      <text:p text:style-name="P2">Tal vez la respuesta hubiera estado allí todo el tiempo.<text:span text:style-name="T1"> </text:span>Tal vez aquellas líneas aparentemente caóticas escondieran indicaciones precisas.</text:p>
      <text:p text:style-name="P2">Pero cuando llegaron, el anciano se negó.</text:p>
      <text:p text:style-name="P2">—No.</text:p>
      <text:p text:style-name="P2"><text:soft-page-break/>La respuesta fue inmediata.</text:p>
      <text:p text:style-name="P2">Ni siquiera permitió que terminaran de hablar.</text:p>
      <text:p text:style-name="P2">—Ya habéis visto suficiente.</text:p>
      <text:p text:style-name="P2">Los jóvenes insistieron.<text:span text:style-name="T1"> </text:span>Intentaron razonar con él.<text:span text:style-name="T1"> </text:span>Le explicaron sus teorías.<text:span text:style-name="T1"> </text:span>Le mostraron nuevamente la llave.</text:p>
      <text:p text:style-name="P2">Pero Jorhm permaneció firme.</text:p>
      <text:p text:style-name="P2">—Escuchadme bien —dijo con seriedad—. Estáis convirtiendo una historia en una obsesión.</text:p>
      <text:p text:style-name="P2">Aquellas palabras les molestaron.</text:p>
      <text:p text:style-name="P2">Porque en el fondo todos sabían que tenía razón.</text:p>
      <text:p text:style-name="P2">El anciano observó sus rostros.<text:span text:style-name="T1"> </text:span>Vio la ansiedad.<text:span text:style-name="T1"> </text:span>La esperanza.<text:span text:style-name="T1"> </text:span>La ambición.<text:span text:style-name="T1"> </text:span>Y algo más.</text:p>
      <text:p text:style-name="P2">Algo que empezaba a preocuparle.</text:p>
      <text:p text:style-name="P2">—Es una leyenda —continuó—. Un cuento inventado hace siglos. Nadie encontró jamás el tesoro. Nadie encontró jamás la bóveda. Y nadie encontró jamás la llave.</text:p>
      <text:p text:style-name="P2">Levantó la mirada hacia Nohk.</text:p>
      <text:p text:style-name="P2">—No dejéis que un<text:span text:style-name="T5">a vieja historia</text:span> os haga olvidar la realidad.</text:p>
      <text:p text:style-name="P2">Pero sus advertencias llegaron demasiado tarde.</text:p>
      <text:p text:style-name="P2">Durante los días siguientes la imaginación hizo el resto.</text:p>
      <text:p text:style-name="P2">Cada conversación reforzaba la anterior.<text:span text:style-name="T1"> </text:span>Cada duda era respondida por una nueva posibilidad.<text:span text:style-name="T1"> </text:span>Cada objeción encontraba una explicación.</text:p>
      <text:p text:style-name="P2">Poco a poco la existencia del tesoro dejó de ser una hipótesis.</text:p>
      <text:p text:style-name="P2">Se convirtió en una convicción.</text:p>
      <text:p text:style-name="P2">Los jóvenes comenzaron a sentirse como hombres que ya poseían una fortuna, aunque todavía no hubieran puesto una sola moneda en sus manos.</text:p>
      <text:p text:style-name="P2">La riqueza parecía estar esperándolos.<text:span text:style-name="T1"> </text:span>Oculta.<text:span text:style-name="T1"> </text:span>Pacientemente.</text:p>
      <text:p text:style-name="P2">Al final surgió una idea.</text:p>
      <text:p text:style-name="P2">Simple.<text:span text:style-name="T1"> </text:span>Directa.<text:span text:style-name="T1"> </text:span>Inevitable.</text:p>
      <text:p text:style-name="P2">—¿Y si compramos el libro?</text:p>
      <text:p text:style-name="P2">La propuesta cayó sobre la mesa como una revelación.</text:p>
      <text:p text:style-name="P2">Durante unos segundos nadie habló.</text:p>
      <text:p text:style-name="P2">Luego comenzaron a asentir.<text:span text:style-name="T1"> </text:span>Por supuesto.<text:span text:style-name="T1"> </text:span>Era la solución.</text:p>
      <text:p text:style-name="P2"><text:soft-page-break/>Si Jorhm no quería prestarlo, podían adquirirlo.<text:span text:style-name="T1"> </text:span>Todo tenía un precio.<text:span text:style-name="T1"> </text:span>Sólo debían ofrecer una cantidad lo bastante alta.<text:span text:style-name="T1"> </text:span>Una cantidad imposible de rechazar.</text:p>
      <text:p text:style-name="P2">Y así comenzaron a reunir dinero.</text:p>
      <text:p text:style-name="P2">Vendieron animales.<text:span text:style-name="T1"> </text:span>Herramientas.<text:span text:style-name="T1"> </text:span>Mercancías.<text:span text:style-name="T1"> </text:span>Carros.<text:span text:style-name="T1"> </text:span></text:p>
      <text:p text:style-name="P2">Todo aquello de lo que podían prescindir.</text:p>
      <text:p text:style-name="P2">Cuando terminaron, habían reunido más dinero del que ninguno había tenido jamás entre las manos.</text:p>
      <text:p text:style-name="P2">Una pequeña fortuna.</text:p>
      <text:p text:style-name="P2">Quizá la mayor inversión que harían en toda su vida.</text:p>
      <text:p text:style-name="P2">Y una mañana, llevando consigo una pesada bolsa repleta de monedas, los seis amigos volvieron a recorrer el camino que conducía a la casa de Jorhm.</text:p>
      <text:p text:style-name="P2">Estaban convencidos de que aquella vez regresarían con el libro.</text:p>
      <text:p text:style-name="P2">Y con él, con el primer paso hacia el tesoro del rey.</text:p>
      <text:p text:style-name="P2"/>
      <text:p text:style-name="P1"/>
      <text:p text:style-name="P2"/>
      <text:h text:style-name="P3" text:outline-level="2"><text:span text:style-name="T2">Parte 2 - </text:span>Inicia la aventura</text:h>
      <text:p text:style-name="P2"/>
      <text:p text:style-name="P2"/>
      <text:p text:style-name="P2">Jorhm los vio llegar mucho antes de que alcanzaran la casa.</text:p>
      <text:p text:style-name="P2">Estaba sentado bajo las vides, en el mismo lugar donde acostumbraba pasar las tardes observando el valle.</text:p>
      <text:p text:style-name="P2">Desde allí podía ver el camino que ascendía desde el pueblo.<text:span text:style-name="T2"> </text:span>Y aquel día los reconoció enseguida.</text:p>
      <text:p text:style-name="P2">Los seis caminaban juntos.</text:p>
      <text:p text:style-name="P2">Decididos.<text:span text:style-name="T2"> </text:span>Con un propósito claro.</text:p>
      <text:p text:style-name="P2">El anciano suspiró.</text:p>
      <text:p text:style-name="P2">Había esperado que el entusiasmo desapareciera con el paso de los días.<text:span text:style-name="T2"> </text:span>Que la emoción inicial se desvaneciera.<text:span text:style-name="T2"> </text:span>Que la razón terminara imponiéndose.</text:p>
      <text:p text:style-name="P2">Pero no había ocurrido.</text:p>
      <text:p text:style-name="P2">Al contrario.</text:p>
      <text:p text:style-name="P2">Algo había cambiado en ellos.</text:p>
      <text:p text:style-name="P2"><text:soft-page-break/>Lo percibió incluso antes de escuchar una sola palabra.</text:p>
      <text:p text:style-name="P2">Aquella mezcla de ilusión y ansiedad que brillaba en sus ojos le resultaba inquietante.</text:p>
      <text:p text:style-name="P2">Había visto esa expresión otras veces.</text:p>
      <text:p text:style-name="P2">En comerciantes arruinados.<text:span text:style-name="T2"> </text:span>En jugadores.<text:span text:style-name="T2"> </text:span>En hombres convencidos de que estaban a punto de encontrar una fortuna.</text:p>
      <text:p text:style-name="P2">Y rara vez terminaba bien.</text:p>
      <text:p text:style-name="P2">Los jóvenes llegaron hasta la mesa.<text:span text:style-name="T2"> </text:span>Nohk fue el primero en hablar.</text:p>
      <text:p text:style-name="P2">—Jorhm, queremos el libro.</text:p>
      <text:p text:style-name="P2">El anciano levantó la vista.</text:p>
      <text:p text:style-name="P2">—Ya os dije lo que pienso sobre esa historia.</text:p>
      <text:p text:style-name="P2">—Venimos a hacerte una oferta.</text:p>
      <text:p text:style-name="P2">Por un instante nadie habló.</text:p>
      <text:p text:style-name="P2">Entonces uno de los muchachos depositó sobre la mesa una pesada bolsa de cuero.</text:p>
      <text:p text:style-name="P2">Las monedas tintinearon al golpear la madera.</text:p>
      <text:p text:style-name="P2">Jorhm observó la bolsa.<text:span text:style-name="T2"> </text:span>Después observó a los jóvenes.<text:span text:style-name="T2"> </text:span>Y finalmente volvió a mirar la bolsa.</text:p>
      <text:p text:style-name="P2">Su expresión cambió.</text:p>
      <text:p text:style-name="P2">—¿Qué es esto?</text:p>
      <text:p text:style-name="P2">—Doscientas monedas.</text:p>
      <text:p text:style-name="P2">El anciano abrió los ojos con sorpresa.</text:p>
      <text:p text:style-name="P2">—¿Doscientas?</text:p>
      <text:p text:style-name="P2">Nohk asintió.</text:p>
      <text:p text:style-name="P2">—Doscientas monedas por el libro.</text:p>
      <text:p text:style-name="P2">Jorhm permaneció en silencio.</text:p>
      <text:p text:style-name="P2">Aquella cantidad era absurda.<text:span text:style-name="T2"> </text:span>Con ese dinero podía vivir cómodamente durante años.<text:span text:style-name="T2"> </text:span>Era mucho más de lo que valía cualquier libro que poseyera.</text:p>
      <text:p text:style-name="P2">Incluso aquel.</text:p>
      <text:p text:style-name="P2">Sacudió lentamente la cabeza.</text:p>
      <text:p text:style-name="P2">—Muchachos... la bóveda no existe.</text:p>
      <text:p text:style-name="P2">Nadie respondió.</text:p>
      <text:p text:style-name="P2">—Es una leyenda.<text:span text:style-name="T2"> </text:span>Una historia inventada.<text:span text:style-name="T2"> </text:span>Nada más.</text:p>
      <text:p text:style-name="P2"><text:soft-page-break/>Los seis permanecieron inmóviles.</text:p>
      <text:p text:style-name="P2">Nohk sostuvo la mirada del anciano.</text:p>
      <text:p text:style-name="P2">—Doscientas monedas por el libro.</text:p>
      <text:p text:style-name="P2">Jorhm comprendió entonces que la discusión había terminado antes de empezar.</text:p>
      <text:p text:style-name="P2">Aquellos jóvenes ya no estaban buscando consejo.<text:span text:style-name="T2"> </text:span>Habían tomado una decisión.</text:p>
      <text:p text:style-name="P2">El dinero era sólo una formalidad.</text:p>
      <text:p text:style-name="P2">Observó nuevamente la bolsa.<text:span text:style-name="T2"> </text:span>Después miró el libro que había conservado durante tantos años.</text:p>
      <text:p text:style-name="P2">Y finalmente volvió a mirar a los muchachos.</text:p>
      <text:p text:style-name="P2"><text:span text:style-name="T2">S</text:span>intió una vaga sensación de preocupación.<text:span text:style-name="T2"> </text:span>Como si estuviera entregándoles algo más peligroso que un simple volumen antiguo.</text:p>
      <text:p text:style-name="P2">—Veo que habéis tomado una decisión —dijo finalmente.</text:p>
      <text:p text:style-name="P2">Nadie respondió.<text:span text:style-name="T2"> </text:span>No hacía falta.</text:p>
      <text:p text:style-name="P2"/>
      <text:p text:style-name="P2"/>
      <text:p text:style-name="P1"/>
      <text:p text:style-name="P2"/>
      <text:h text:style-name="P4" text:outline-level="2"><text:span text:style-name="T2">Parte</text:span> 3 - El pacto.</text:h>
      <text:p text:style-name="P2"/>
      <text:p text:style-name="P2"/>
      <text:p text:style-name="P2">Aquella misma noche se reunieron en la casa de Nohk.</text:p>
      <text:p text:style-name="P2">El libro ocupó el centro de la mesa.</text:p>
      <text:p text:style-name="P2">Las lámparas permanecieron encendidas hasta altas horas.</text:p>
      <text:p text:style-name="P2">Una y otra vez estudiaron las páginas.<text:span text:style-name="T3"> </text:span>Compararon símbolos.<text:span text:style-name="T3"> </text:span>Examinaron anotaciones.</text:p>
      <text:p text:style-name="P2">Y sobre todo analizaron el mapa.</text:p>
      <text:p text:style-name="P2">Para sorpresa de todos, resultó mucho más comprensible de lo que habían imaginado.</text:p>
      <text:p text:style-name="P2">No era una colección de garabatos sin sentido.</text:p>
      <text:p text:style-name="P2">Los accidentes geográficos coincidían con lugares conocidos.<text:span text:style-name="T3"> </text:span>Las referencias parecían reales.</text:p>
      <text:p text:style-name="P2">Y lo más importante de todo:</text:p>
      <text:p text:style-name="P2">el destino señalado por el mapa no estaba al otro lado del mundo.</text:p>
      <text:p text:style-name="P2"><text:soft-page-break/>Se encontraba relativamente cerca.<text:span text:style-name="T3"> </text:span>Hacia el oeste.<text:span text:style-name="T3"> </text:span>En las montañas.<text:span text:style-name="T3"> </text:span>Apenas unos días de viaje.<text:span text:style-name="T6"> Tal vez tres.</text:span></text:p>
      <text:p text:style-name="P2">La revelación llenó la habitación de entusiasmo.</text:p>
      <text:p text:style-name="P2"><text:span text:style-name="T3">E</text:span>l tesoro dejó de parecer una leyenda lejana.<text:span text:style-name="T3"> </text:span>Ahora tenía una ubicación.<text:span text:style-name="T3"> </text:span>Un lugar concreto.</text:p>
      <text:p text:style-name="P2">Un destino.</text:p>
      <text:p text:style-name="P2">Algo que podían alcanzar.<text:span text:style-name="T3"> </text:span>Algo que podían encontrar.</text:p>
      <text:p text:style-name="P2">La fortuna del rey parecía estar esperándolos.<text:span text:style-name="T3"> </text:span>Oculta durante siglos.<text:span text:style-name="T3"> </text:span>A sólo unos días de distancia.</text:p>
      <text:p text:style-name="P2">Las conversaciones se hicieron más animadas.<text:span text:style-name="T3"> </text:span>Las risas más frecuentes.</text:p>
      <text:p text:style-name="P2">Cada uno imaginaba ya el futuro que le aguardaba.<text:span text:style-name="T3"> </text:span>Tierras.<text:span text:style-name="T3"> </text:span>Casas.<text:span text:style-name="T3"> </text:span>Negocios.<text:span text:style-name="T3"> </text:span>Animales.</text:p>
      <text:p text:style-name="P2">Libertad.</text:p>
      <text:p text:style-name="P2">Riquezas imposibles para un campesino común.</text:p>
      <text:p text:style-name="P2">Finalmente Nohk levantó una copa.</text:p>
      <text:p text:style-name="P2">Los demás hicieron lo mismo.</text:p>
      <text:p text:style-name="P2">—Cuando encontremos el tesoro —dijo— lo dividiremos en partes iguales.</text:p>
      <text:p text:style-name="P2">Los cinco asintieron inmediatamente.<text:span text:style-name="T3"> </text:span>Era justo.<text:span text:style-name="T3"> </text:span>Habían comenzado juntos.</text:p>
      <text:p text:style-name="P2">Terminarían juntos.</text:p>
      <text:p text:style-name="P2">—Socios —afirmó Kempht.</text:p>
      <text:p text:style-name="P2">—Socios —repitieron los demás.</text:p>
      <text:p text:style-name="P2">Las copas chocaron.</text:p>
      <text:p text:style-name="P2">El pacto quedó sellado.</text:p>
      <text:p text:style-name="P2">El tesoro de un rey dividido entre seis hombres.</text:p>
      <text:p text:style-name="P2">Había más que suficiente para todos.</text:p>
      <text:p text:style-name="P2">Aquella noche ninguno dudó.<text:span text:style-name="T3"> </text:span>Ninguno sintió miedo.</text:p>
      <text:p text:style-name="P5">Ninguno imaginó <text:span text:style-name="T3">lo que aquellas palabras significaban en realidad.</text:span></text:p>
      <text:p text:style-name="P2"/>
      <text:p text:style-name="P5"><text:span text:style-name="T3">Mientras que, </text:span>la llave de hierro, silenciosa sobre la mesa, parecía observarlo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9:05:55.780000000</meta:creation-date>
    <dc:date>2026-07-23T13:06:28.140000000</dc:date>
    <meta:editing-duration>PT38M40S</meta:editing-duration>
    <meta:editing-cycles>13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45" meta:word-count="1281" meta:character-count="8052" meta:non-whitespace-character-count="6917"/>
  </office:meta>
</office:document-meta>
</file>