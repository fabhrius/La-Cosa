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officeooo:paragraph-rsid="00218e77"/>
    </style:style>
    <style:style style:name="P2" style:family="paragraph" style:parent-style-name="Standard">
      <style:text-properties officeooo:paragraph-rsid="0022d41b"/>
    </style:style>
    <style:style style:name="P3" style:family="paragraph" style:parent-style-name="Text_20_body">
      <style:text-properties officeooo:paragraph-rsid="001accc7"/>
    </style:style>
    <style:style style:name="P4" style:family="paragraph" style:parent-style-name="Text_20_body">
      <style:text-properties officeooo:paragraph-rsid="001ce67c"/>
    </style:style>
    <style:style style:name="P5" style:family="paragraph" style:parent-style-name="Text_20_body">
      <style:text-properties officeooo:paragraph-rsid="001e2531"/>
    </style:style>
    <style:style style:name="P6" style:family="paragraph" style:parent-style-name="Text_20_body">
      <style:text-properties officeooo:rsid="001f3503" officeooo:paragraph-rsid="0022d41b"/>
    </style:style>
    <style:style style:name="P7" style:family="paragraph" style:parent-style-name="Text_20_body">
      <style:text-properties officeooo:rsid="001f3503" officeooo:paragraph-rsid="0022f96c"/>
    </style:style>
    <style:style style:name="P8" style:family="paragraph" style:parent-style-name="Text_20_body">
      <style:text-properties officeooo:paragraph-rsid="0022d41b"/>
    </style:style>
    <style:style style:name="P9" style:family="paragraph" style:parent-style-name="Text_20_body">
      <style:text-properties officeooo:paragraph-rsid="0022f96c"/>
    </style:style>
    <style:style style:name="T1" style:family="text">
      <style:text-properties officeooo:rsid="001accc7"/>
    </style:style>
    <style:style style:name="T2" style:family="text">
      <style:text-properties officeooo:rsid="001bfbd9"/>
    </style:style>
    <style:style style:name="T3" style:family="text">
      <style:text-properties officeooo:rsid="001ce67c"/>
    </style:style>
    <style:style style:name="T4" style:family="text">
      <style:text-properties officeooo:rsid="00218e77"/>
    </style:style>
    <style:style style:name="T5" style:family="text">
      <style:text-properties officeooo:rsid="00396b7a"/>
    </style:style>
    <style:style style:name="T6" style:family="text">
      <style:text-properties officeooo:rsid="001f357e"/>
    </style:style>
    <style:style style:name="T7" style:family="text">
      <style:text-properties officeooo:rsid="0022d41b"/>
    </style:style>
    <style:style style:name="T8" style:family="text">
      <style:text-properties officeooo:rsid="001f3503"/>
    </style:style>
    <style:style style:name="T9" style:family="text">
      <style:text-properties officeooo:rsid="0022f9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
      <text:h text:style-name="P1" text:outline-level="2"><text:span text:style-name="T4">Capitulo 2 -</text:span></text:h>
      <text:h text:style-name="P1" text:outline-level="2">Parte 1 - El ascenso imposible</text:h>
      <text:p text:style-name="Text_20_body"/>
      <text:p text:style-name="Text_20_body">El descenso por la pared occidental resultó mucho más difícil de lo que habían previsto.</text:p>
      <text:p text:style-name="Text_20_body">La altura imponía vértigo. La roca apenas ofrecía grietas donde apoyar la punta de una bota o introducir los dedos. Cada metro exigía buscar un nuevo punto de apoyo, comprobarlo y confiar en que resistiera el peso del cuerpo.</text:p>
      <text:p text:style-name="Text_20_body">No siempre lo hacía.</text:p>
      <text:p text:style-name="Text_20_body">Fragmentos de piedra se desprendían bajo sus pies y desaparecían en el vacío. Pasaban varios segundos antes de que el eco de los impactos ascendiera desde el fondo del barranco.</text:p>
      <text:p text:style-name="Text_20_body">Nadie hablaba. Sólo se oía el silbido del viento, el roce áspero de las cuerdas contra la pared y, muy abajo, el rugido del río.</text:p>
      <text:p text:style-name="Text_20_body">Cuando por fin alcanzaron la base del acantilado, el sol ya comenzaba a caer.</text:p>
      <text:p text:style-name="Text_20_body">El río corría encajonado entre dos murallas de roca. No era ancho, apenas veinte metros, pero la corriente era brutal. El agua golpeaba las piedras con una fuerza capaz de romper huesos.</text:p>
      <text:p text:style-name="Text_20_body">Un viejo árbol derribado permitía avanzar hasta casi la mitad del cauce. Después no había más camino.</text:p>
      <text:p text:style-name="Text_20_body">Había que lanzarse.</text:p>
      <text:p text:style-name="Text_20_body">Johf se ofreció sin vacilar.</text:p>
      <text:p text:style-name="Text_20_body">Se ató una cuerda a la cintura, comprobó el nudo dos veces y esperó. Observó la corriente, respiró hondo y se dejó caer.</text:p>
      <text:p text:style-name="Text_20_body">El río lo golpeó como un martillo.</text:p>
      <text:p text:style-name="Text_20_body">La corriente lo arrancó de inmediato de su trayectoria y lo arrastró varios metros aguas abajo. Intentó nadar hacia la otra orilla, pero el agua lo empujó contra una roca. Desapareció un instante entre la espuma.</text:p>
      <text:p text:style-name="Text_20_body">La cuerda se tensó.</text:p>
      <text:p text:style-name="Text_20_body">Desde la orilla, los demás sólo podían sujetarla y esperar.</text:p>
      <text:p text:style-name="Text_20_body">Johf volvió a emerger tosiendo. Se aferró a una roca, perdió el agarre y la corriente volvió a llevárselo.</text:p>
      <text:p text:style-name="Text_20_body">Lo intentó otra vez.</text:p>
      <text:p text:style-name="Text_20_body">Y otra.</text:p>
      <text:p text:style-name="Text_20_body"><text:soft-page-break/>Cuando sus fuerzas parecían agotarse, logró alcanzar un saliente junto a la orilla opuesta. Trepó a él con los últimos restos de energía, avanzó entre las rocas resbaladizas y aseguró la cuerda alrededor del tronco de un árbol.</text:p>
      <text:p text:style-name="Text_20_body">Sólo entonces los demás soltaron el aire que llevaban conteniendo.</text:p>
      <text:p text:style-name="Text_20_body">Uno por uno comenzaron el cruce, aferrados a la cuerda mientras la corriente trataba de arrancarlos de ella.</text:p>
      <text:p text:style-name="Text_20_body"/>
      <text:p text:style-name="Text_20_body"/>
      <text:p text:style-name="Horizontal_20_Line"/>
      <text:p text:style-name="P5">Cuando alcanzaron la base de la pared oriental, el sol comenzaba a ocultarse tras las montañas.</text:p>
      <text:p text:style-name="P5">Entonces comprendieron la magnitud del obstáculo.</text:p>
      <text:p text:style-name="P5">La roca se elevaba frente a ellos como una inmensa muralla de granito gris. Trescientos metros de pared casi vertical ascendían hasta perderse en el resplandor anaranjado del atardecer.</text:p>
      <text:p text:style-name="P5">Nadie dijo una palabra.</text:p>
      <text:p text:style-name="P5">Durante varios minutos permanecieron inmóviles, recorriendo la montaña con la mirada, buscando una debilidad que no existía.</text:p>
      <text:p text:style-name="P5">No había senderos.</text:p>
      <text:p text:style-name="P5">No había cornisas.</text:p>
      <text:p text:style-name="P5">No había una ruta evidente.</text:p>
      <text:p text:style-name="P5">Sólo una inmensa superficie de piedra levantándose hacia el cielo.</text:p>
      <text:p text:style-name="P5">Johf fue el primero en romper el silencio.</text:p>
      <text:p text:style-name="P5">—Es imposible.</text:p>
      <text:p text:style-name="P5">Nadie respondió.</text:p>
      <text:p text:style-name="P5">Aquella única palabra resumía cuanto todos pensaban.</text:p>
      <text:p text:style-name="P5">La montaña había vencido.</text:p>
      <text:p text:style-name="P5">Bastaba con dar media vuelta, seguir el río y regresar a Oldwood. Aún conservaban la vida.</text:p>
      <text:p text:style-name="P5">Pero ninguno se movió.</text:p>
      <text:p text:style-name="P5">Habían cruzado bosques.</text:p>
      <text:p text:style-name="P5">Habían atravesado el gran pantano.</text:p>
      <text:p text:style-name="P5">Habían perdido la carreta, los caballos y la mayor parte de las provisiones.</text:p>
      <text:p text:style-name="P5">Habían descendido por un acantilado que ningún hombre sensato habría intentado cruzar.</text:p>
      <text:p text:style-name="P5"><text:soft-page-break/>Y el tesoro estaba, según el mapa, al otro lado de aquella pared.</text:p>
      <text:p text:style-name="P5">Tan cerca.</text:p>
      <text:p text:style-name="P5">Nohk dio unos pasos hacia la roca.</text:p>
      <text:p text:style-name="P5">Apoyó la mano sobre el granito frío y comenzó a recorrer la pared con la vista.</text:p>
      <text:p text:style-name="P5">—Tiene que existir un paso.</text:p>
      <text:p text:style-name="P5">Nadie discutió aquellas palabras.</text:p>
      <text:p text:style-name="P5">Durante el resto de la tarde examinaron la montaña desde distintos ángulos. Buscaron grietas, salientes, pequeñas cornisas, cualquier irregularidad que pudiera servir para iniciar la escalada.</text:p>
      <text:p text:style-name="P5">Encontraron muy poco.</text:p>
      <text:p text:style-name="P5">Al caer la noche levantaron un pequeño campamento junto al río.</text:p>
      <text:p text:style-name="P5">Las llamas de la hoguera apenas lograban romper la oscuridad que descendía sobre el valle. Cenaron en silencio, compartiendo las escasas provisiones que les quedaban.</text:p>
      <text:p text:style-name="P5">Después volvieron a mirar la montaña.</text:p>
      <text:p text:style-name="P5">Seguía allí.</text:p>
      <text:p text:style-name="P5">Inmóvil.</text:p>
      <text:p text:style-name="P5">Indiferente.</text:p>
      <text:p text:style-name="P5">Como si esperara pacientemente a que tomaran una decisión.</text:p>
      <text:p text:style-name="P5">Nadie consiguió dormir.</text:p>
      <text:p text:style-name="P5">Cada uno permanecía despierto, contemplando la enorme pared de roca iluminada por la luna.</text:p>
      <text:p text:style-name="P5">Sabían que intentar escalarla era una imprudencia.</text:p>
      <text:p text:style-name="P5">También sabían que al amanecer lo intentarían.</text:p>
      <text:p text:style-name="P5">Porque cuanto más cerca creían estar del tesoro, más insoportable se volvía la idea de regresar con las manos vacías.</text:p>
      <text:p text:style-name="P5"/>
      <text:p text:style-name="Horizontal_20_Line"/>
      <text:p text:style-name="P5">Al amanecer, en cuanto la luz permitió distinguir las grietas de la roca, prepararon las cuerdas, repartieron el equipo y comenzaron la ascensión.</text:p>
      <text:p text:style-name="Text_20_body">Los primeros metros fueron casi fáciles.</text:p>
      <text:p text:style-name="Text_20_body">La pared ofrecía buenas presas para manos y pies. Había grietas profundas, pequeñas cornisas y salientes suficientes para avanzar con confianza. La cima parecía cercana. El tesoro, al alcance de la mano.</text:p>
      <text:p text:style-name="Text_20_body">Siguieron subiendo.</text:p>
      <text:p text:style-name="Text_20_body"><text:soft-page-break/>Diez metros más.</text:p>
      <text:p text:style-name="Text_20_body">Veinte.</text:p>
      <text:p text:style-name="Text_20_body">Cincuenta.</text:p>
      <text:p text:style-name="Text_20_body">El río fue quedando abajo. Los árboles se encogieron hasta parecer un manto verde. El viento empezó a soplar con más fuerza.</text:p>
      <text:p text:style-name="Text_20_body">Después llegaron los primeros problemas.</text:p>
      <text:p text:style-name="Text_20_body">Las grietas comenzaron a desaparecer. Las cornisas se hicieron estrechas. Cada nuevo movimiento exigía estirar un poco más el cuerpo, buscar a ciegas un apoyo que, a menudo, no existía.</text:p>
      <text:p text:style-name="Text_20_body">El avance se volvió desesperadamente lento.</text:p>
      <text:p text:style-name="Text_20_body">Un hombre permanecía inmóvil mientras examinaba la roca durante largos minutos. Cuando por fin encontraba un paso, ascendía apenas unos centímetros y el siguiente ocupaba su lugar.</text:p>
      <text:p text:style-name="Text_20_body">Nadie hablaba ya.</text:p>
      <text:p text:style-name="Text_20_body">Sólo se escuchaba la respiración agitada, el roce de las botas sobre la piedra y el leve chirrido de las cuerdas tensándose.</text:p>
      <text:p text:style-name="Text_20_body">Habían superado el primer centenar de metros cuando comprendieron el alcance de su error.</text:p>
      <text:p text:style-name="Text_20_body">No era que el camino hacia arriba fuese difícil.</text:p>
      <text:p text:style-name="Text_20_body">Era que había dejado de existir.</text:p>
      <text:p text:style-name="Text_20_body">El primero quedó detenido frente a un tramo de roca lisa. Buscó una grieta. Tanteó con los dedos. Probó una pequeña protuberancia. Se desmoronó al tocarla.</text:p>
      <text:p text:style-name="Text_20_body">No había dónde sujetarse.</text:p>
      <text:p text:style-name="Text_20_body">Intentó retroceder.</text:p>
      <text:p text:style-name="Text_20_body">Entonces descubrió que tampoco podía.</text:p>
      <text:p text:style-name="Text_20_body">Bajar significaba volver a buscar, a ciegas, apoyos que ya no podía ver bajo sus botas. Bastaba un movimiento equivocado para perder el equilibrio.</text:p>
      <text:p text:style-name="Text_20_body">Uno tras otro dejaron de avanzar.</text:p>
      <text:p text:style-name="Text_20_body">La columna entera quedó inmóvil.</text:p>
      <text:p text:style-name="Text_20_body">Suspendidos a más de cien metros del suelo.</text:p>
      <text:p text:style-name="Text_20_body">Sin espacio para descansar.</text:p>
      <text:p text:style-name="Text_20_body">Sin fuerza para permanecer allí durante mucho tiempo.</text:p>
      <text:p text:style-name="Text_20_body">Sin un camino para continuar.</text:p>
      <text:p text:style-name="P7">Y de pronto, </text:p>
      <text:p text:style-name="P9"><text:soft-page-break/><text:span text:style-name="T5">a</text:span>ferrados a la roca<text:span text:style-name="T9">, s</text:span>uspendidos sobre el vacío<text:span text:style-name="T9">, p</text:span><text:span text:style-name="T6">aralizados por el vertigo</text:span>, </text:p>
      <text:p text:style-name="P9">nadie pensó en el tesoro.</text:p>
      <text:p text:style-name="Text_20_body">Sólo existía la pared.</text:p>
      <text:p text:style-name="Text_20_body">Y el vacío.</text:p>
      <text:p text:style-name="P9"><text:span text:style-name="T9">C</text:span>omprendieron<text:span text:style-name="T9"> entonces</text:span> una verdad insoportable.</text:p>
      <text:p text:style-name="Text_20_body"><text:span text:style-name="T9">Ya n</text:span>o estaban escalando la montaña.</text:p>
      <text:p text:style-name="Text_20_body">La montaña los había atrapado.</text:p>
      <text:p text:style-name="P5"/>
      <text:p text:style-name="P5"/>
      <text:p text:style-name="P5"/>
      <text:p text:style-name="P5"/>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7-24T17:14:43.821000000</meta:creation-date>
    <dc:date>2026-07-24T18:23:18.330000000</dc:date>
    <meta:editing-duration>PT19M12S</meta:editing-duration>
    <meta:editing-cycles>4</meta:editing-cycles>
    <meta:generator>LibreOffice/7.3.5.2$Windows_X86_64 LibreOffice_project/184fe81b8c8c30d8b5082578aee2fed2ea847c01</meta:generator>
    <meta:document-statistic meta:table-count="0" meta:image-count="0" meta:object-count="0" meta:page-count="5" meta:paragraph-count="99" meta:word-count="1067" meta:character-count="6480" meta:non-whitespace-character-count="5510"/>
  </office:meta>
</office:document-meta>
</file>