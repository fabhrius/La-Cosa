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paragraph-rsid="0017bbf0"/>
    </style:style>
    <style:style style:name="P2" style:family="paragraph" style:parent-style-name="Heading_20_2">
      <style:text-properties officeooo:paragraph-rsid="0017bbf0"/>
    </style:style>
    <style:style style:name="P3" style:family="paragraph" style:parent-style-name="Heading_20_2">
      <style:text-properties officeooo:rsid="0017bbf0" officeooo:paragraph-rsid="0017bbf0"/>
    </style:style>
    <style:style style:name="P4" style:family="paragraph" style:parent-style-name="Heading_20_2">
      <style:text-properties officeooo:rsid="001984f0" officeooo:paragraph-rsid="001984f0"/>
    </style:style>
    <style:style style:name="P5" style:family="paragraph" style:parent-style-name="Text_20_body">
      <style:text-properties officeooo:rsid="001984f0" officeooo:paragraph-rsid="001984f0"/>
    </style:style>
    <style:style style:name="P6" style:family="paragraph" style:parent-style-name="Text_20_body">
      <style:text-properties officeooo:rsid="0019b460" officeooo:paragraph-rsid="0019b460"/>
    </style:style>
    <style:style style:name="P7" style:family="paragraph" style:parent-style-name="Heading_20_2">
      <style:text-properties officeooo:paragraph-rsid="0019e9e4"/>
    </style:style>
    <style:style style:name="P8" style:family="paragraph" style:parent-style-name="Text_20_body">
      <style:text-properties officeooo:paragraph-rsid="0019e9e4"/>
    </style:style>
    <style:style style:name="P9" style:family="paragraph" style:parent-style-name="Heading_20_3">
      <style:text-properties officeooo:paragraph-rsid="001e3cd3"/>
    </style:style>
    <style:style style:name="P10" style:family="paragraph" style:parent-style-name="Text_20_body">
      <style:text-properties officeooo:paragraph-rsid="001f79ad"/>
    </style:style>
    <style:style style:name="P11" style:family="paragraph" style:parent-style-name="Text_20_body">
      <style:text-properties officeooo:paragraph-rsid="0020300b"/>
    </style:style>
    <style:style style:name="T1" style:family="text">
      <style:text-properties officeooo:rsid="001984f0"/>
    </style:style>
    <style:style style:name="T2" style:family="text">
      <style:text-properties officeooo:rsid="00102bf8"/>
    </style:style>
    <style:style style:name="T3" style:family="text">
      <style:text-properties officeooo:rsid="00190291"/>
    </style:style>
    <style:style style:name="T4" style:family="text">
      <style:text-properties officeooo:rsid="001f79ad"/>
    </style:style>
    <style:style style:name="T5" style:family="text">
      <style:text-properties officeooo:rsid="0020300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2">Acto 2 - </text:h>
      <text:p text:style-name="P5">"El mundo que imaginamos y el mundo que habitamos rara vez son el mismo."</text:p>
      <text:p text:style-name="P6">- Fabhrius</text:p>
      <text:p text:style-name="P6"/>
      <text:p text:style-name="Horizontal_20_Line"/>
      <text:p text:style-name="Text_20_body"/>
      <text:h text:style-name="P3" text:outline-level="2">Capitulo <text:span text:style-name="T1">1</text:span> -</text:h>
      <text:h text:style-name="P2" text:outline-level="2">Parte 1 - La expedición</text:h>
      <text:p text:style-name="P1"/>
      <text:p text:style-name="Text_20_body">Durante varios días estudiaron el mapa con atención.</text:p>
      <text:p text:style-name="Text_20_body">Compararon los antiguos dibujos con mapas modernos de la región y confeccionaron una nueva copia, más grande y mucho más precisa. Sobre ella fueron añadiendo anotaciones, distancias aproximadas y referencias del terreno. Extendían el mapa cada tarde sobre la mesa de la casa de Nohk y pasaban horas recorriendo con el dedo aquellas líneas trazadas siglos atrás.</text:p>
      <text:p text:style-name="Text_20_body">Identificaron montañas, ríos, bosques y caminos conocidos. Debatieron distintas rutas, calcularon jornadas de viaje y señalaron los lugares más adecuados para acampar. Estimaron el tiempo necesario para cada tramo y planificaron cómo superar los obstáculos que esperaban encontrar.</text:p>
      <text:p text:style-name="Text_20_body">Poco a poco dejaron de hablar de una leyenda.</text:p>
      <text:p text:style-name="Text_20_body">Empezaron a hablar de una expedición.</text:p>
      <text:p text:style-name="Text_20_body">Según sus cálculos alcanzarían las montañas en dos días. Después deberían abandonar los caminos conocidos e internarse en una región prácticamente inexplorada. Si el mapa era correcto, la bóveda no podía encontrarse mucho más lejos.</text:p>
      <text:p text:style-name="Text_20_body">Aquella búsqueda dejó de parecer una fantasía. Se había convertido en un proyecto. Un desafío que podían preparar. Un objetivo que podían alcanzar.</text:p>
      <text:p text:style-name="Text_20_body">El entusiasmo convirtió la espera en una carga difícil de soportar. Cada día que permanecían en Oldwood era un día durante el cual el tesoro seguía oculto bajo las montañas. Cada conversación terminaba hablando de la bóveda, de la llave o del rey Jumphrestebar. La fortuna perdida parecía cada vez más cercana.</text:p>
      <text:p text:style-name="Text_20_body">Preparar la expedición resultó mucho más costoso de lo que habían imaginado.</text:p>
      <text:p text:style-name="Text_20_body">Compraron una carreta capaz de transportar a los seis hombres y todo el equipo necesario para una semana de viaje. Dos caballos fuertes, barriles de agua, sacos de harina, carne salada, herramientas, <text:soft-page-break/>cuerdas de escalada, mantas, tiendas de campaña, lámparas de aceite y cuanto pudiera resultarles útil en una travesía de la que apenas conocían el destino.</text:p>
      <text:p text:style-name="Text_20_body">Los ahorros reunidos durante años de trabajo comenzaron a desaparecer uno tras otro. Pero ninguno dudó. Todos estaban convencidos de que aquella inversión sería insignificante comparada con la riqueza que los esperaba al final del camino.</text:p>
      <text:p text:style-name="Text_20_body">Los preparativos ocuparon casi una semana.</text:p>
      <text:p text:style-name="Text_20_body">Mientras unos revisaban el equipo, otros reforzaban la carreta, compraban provisiones o resolvían los asuntos que dejarían pendientes en el pueblo. Cuando todo estuvo listo, no quedaba nada más que esperar al amanecer.</text:p>
      <text:p text:style-name="Text_20_body">El alba llegó limpia y luminosa.</text:p>
      <text:p text:style-name="Text_20_body">Las lluvias de los días anteriores habían dejado el aire fresco y transparente. Desde el valle podían distinguir con extraordinaria claridad las montañas que se alzaban en el horizonte occidental.</text:p>
      <text:p text:style-name="Text_20_body">Cargaron la carreta.</text:p>
      <text:p text:style-name="Text_20_body">Ajustaron las riendas.</text:p>
      <text:p text:style-name="Text_20_body">Los caballos comenzaron a avanzar mientras las ruedas crujían sobre el camino de tierra.</text:p>
      <text:p text:style-name="Text_20_body">Los seis amigos abandonaron Oldwood convencidos de que se dirigían hacia la mayor fortuna jamás escondida en Lluviara.</text:p>
      <text:p text:style-name="Text_20_body">Ninguno imaginaba lo diferente que era el camino que habían dibujado sobre el mapa del camino que estaban a punto de recorrer.</text:p>
      <text:p text:style-name="Horizontal_20_Line"/>
      <text:p text:style-name="Text_20_body"/>
      <text:h text:style-name="P7" text:outline-level="2">Parte 2 - La tormenta</text:h>
      <text:p text:style-name="P8">Al segundo día de viaje alcanzaron la extensa zona pantanosa que rodeaba el río Straripante. Habían recorrido ya casi la mitad del trayecto.</text:p>
      <text:p text:style-name="P8">El paisaje cambió por completo.</text:p>
      <text:p text:style-name="P8">Los bosques desaparecieron. La tierra firme se volvió escasa. El río se dividía una y otra vez formando incontables brazos que serpenteaban entre el barro. Pequeñas islas de hierba sobresalían entre extensiones de agua oscura que parecían no tener fin.</text:p>
      <text:p text:style-name="P8">El camino se estrechó hasta convertirse en una franja de tierra apenas más alta que el propio pantano.</text:p>
      <text:p text:style-name="P8">Poco a poco quedaron rodeados por agua y juncos en todas direcciones. Desde cualquier punto el paisaje parecía idéntico. Sin conocer el sendero resultaba fácil caminar durante horas sin acercarse a ninguna parte. El gran pantano era un inmenso laberinto del que pocos viajeros salían sin dificultad.</text:p>
      <text:p text:style-name="P8">El suelo tampoco inspiraba confianza.</text:p>
      <text:p text:style-name="P8"><text:soft-page-break/>Una mezcla de agua y arcilla formaba un barro espeso y pegajoso que atrapaba las botas a cada paso. Avanzar exigía un esfuerzo constante. Los caballos hundían lentamente sus patas y la carreta crujía mientras sus ruedas luchaban por no quedar atrapadas.</text:p>
      <text:p text:style-name="P8">Aun así continuaron.</text:p>
      <text:p text:style-name="P8">Durante toda la mañana el cielo permaneció despejado. El sol brillaba sobre las aguas inmóviles del pantano y el aire era cálido y húmedo.</text:p>
      <text:p text:style-name="P8">Pero al avanzar la tarde las primeras nubes comenzaron a aparecer por el oeste.</text:p>
      <text:p text:style-name="P8">Al principio fueron unas pocas manchas oscuras.</text:p>
      <text:p text:style-name="P8">Después una gran masa negra que fue cubriendo lentamente el horizonte.</text:p>
      <text:p text:style-name="P8">El viento cambió de dirección.</text:p>
      <text:p text:style-name="P8">El aire se volvió pesado.</text:p>
      <text:p text:style-name="P8">Silencioso.</text:p>
      <text:p text:style-name="P8">Inquietante.</text:p>
      <text:p text:style-name="P8">Kempht levantó la vista hacia el cielo.</text:p>
      <text:p text:style-name="P8">—No me gusta esto.</text:p>
      <text:p text:style-name="P8">Nadie respondió.</text:p>
      <text:p text:style-name="P8">Aquel no era un lugar donde pasar la noche. Debían atravesar el pantano antes de que oscureciera.</text:p>
      <text:p text:style-name="P8">Las primeras gotas comenzaron a caer pocos minutos después.</text:p>
      <text:p text:style-name="P8">Eran pequeñas.</text:p>
      <text:p text:style-name="P8">Dispersas.</text:p>
      <text:p text:style-name="P8">Inofensivas.</text:p>
      <text:p text:style-name="P8">Luego llegaron más.</text:p>
      <text:p text:style-name="P8">Y más.</text:p>
      <text:p text:style-name="P8">El viento empezó a soplar con fuerza.</text:p>
      <text:p text:style-name="P8">Los caballos se agitaron.</text:p>
      <text:p text:style-name="P8">Un trueno retumbó a lo lejos.</text:p>
      <text:p text:style-name="P8">Y entonces llegó la tormenta.</text:p>
      <text:p text:style-name="P8">Fue tan repentina que ninguno tuvo tiempo de reaccionar.</text:p>
      <text:p text:style-name="P8">El cielo desapareció tras una inmensa cortina de nubes negras. Los relámpagos comenzaron a desgarrar la oscuridad mientras los truenos hacían temblar el aire.</text:p>
      <text:p text:style-name="P8">Un instante después el agua empezó a desplomarse sobre ellos con una violencia inimaginable.</text:p>
      <text:p text:style-name="P8"><text:soft-page-break/>La lluvia era tan intensa que resultaba difícil mantener los ojos abiertos.</text:p>
      <text:p text:style-name="P8">La visibilidad desapareció.</text:p>
      <text:p text:style-name="P8">Los hombres apenas distinguían las siluetas de sus propios compañeros.</text:p>
      <text:p text:style-name="P8">—¡Seguid avanzando! —gritó Nohk.</text:p>
      <text:p text:style-name="P8">Pero cada paso resultaba más difícil que el anterior.</text:p>
      <text:p text:style-name="P8">El río Straripante había comenzado a desbordarse.</text:p>
      <text:p text:style-name="P8">El agua cubrió primero el camino.</text:p>
      <text:p text:style-name="P8">Después los tobillos.</text:p>
      <text:p text:style-name="P8">Las rodillas.</text:p>
      <text:p text:style-name="P8">Y poco después les llegaba ya a la cintura.</text:p>
      <text:p text:style-name="P8">Nadie podía distinguir dónde terminaba el sendero y dónde comenzaba el río.</text:p>
      <text:p text:style-name="P8">Tal vez se habían desviado.</text:p>
      <text:p text:style-name="P8">Tal vez el río había invadido todo el pantano.</text:p>
      <text:p text:style-name="P8">Tal vez ambas cosas.</text:p>
      <text:p text:style-name="P8">El barro desaparecía bajo el agua.</text:p>
      <text:p text:style-name="P11">Los caballos avanzaban con enorme dificultad, luchan<text:span text:style-name="T5">do en cada paso</text:span> por <text:span text:style-name="T5">liberarse del barro que los sujetaba con fuerza</text:span>.</text:p>
      <text:p text:style-name="P8">Entonces ocurrió.</text:p>
      <text:p text:style-name="P8">La rueda delantera de la carreta se hundió bruscamente hasta el eje.</text:p>
      <text:p text:style-name="P8">Los caballos relincharon y tiraron con todas sus fuerzas.</text:p>
      <text:p text:style-name="P8">Las correas se tensaron.</text:p>
      <text:p text:style-name="P8">La madera crujió.</text:p>
      <text:p text:style-name="P8">Durante unos segundos pareció que lograrían liberarla.</text:p>
      <text:p text:style-name="P8">Pero el terreno cedió bajo el enorme peso de la carga.</text:p>
      <text:p text:style-name="P8">La segunda rueda comenzó a hundirse también.</text:p>
      <text:p text:style-name="P8">El barro empezó a tragarse lentamente la carreta.</text:p>
      <text:p text:style-name="P8">Como si el pantano hubiera esperado pacientemente aquel instante.</text:p>
      <text:p text:style-name="P8">Los seis hombres empujaron.</text:p>
      <text:p text:style-name="P8">Cavaron con las manos.</text:p>
      <text:p text:style-name="P8">Intentaron colocar ramas bajo las ruedas.</text:p>
      <text:p text:style-name="P8"><text:soft-page-break/>Fue inútil.</text:p>
      <text:p text:style-name="P8">Cada esfuerzo conseguía únicamente hundirla un poco más.</text:p>
      <text:p text:style-name="P8">Entonces comprendieron que la habían perdido.</text:p>
      <text:p text:style-name="P8">Descargaron apresuradamente cuanto pudieron rescatar.</text:p>
      <text:p text:style-name="P8">Cada hombre cargó sobre sus hombros lo que fue capaz de transportar.</text:p>
      <text:p text:style-name="P8">El resto quedó atrás.</text:p>
      <text:p text:style-name="P8">Nohk se volvió una última vez.</text:p>
      <text:p text:style-name="P8">Apenas podía distinguir la carreta entre la lluvia.</text:p>
      <text:p text:style-name="P8">Un relámpago iluminó fugazmente el pantano.</text:p>
      <text:p text:style-name="P8">Durante un instante contempló cómo el barro terminaba de tragarse la carreta, junto con las provisiones, las herramientas y buena parte de todo aquello que habían reunido durante semanas de trabajo.</text:p>
      <text:p text:style-name="P8">Después volvió la oscuridad.</text:p>
      <text:p text:style-name="P8">La lluvia caía sobre ellos con una fuerza implacable.</text:p>
      <text:p text:style-name="P8">El barro intentaba arrancarles las botas.</text:p>
      <text:p text:style-name="P8">Caminaron<text:span text:style-name="T2"> durante un rato</text:span> lucha<text:span text:style-name="T2">ndo</text:span> por escapar del pantano.</text:p>
      <text:p text:style-name="P8">Finalmente alcanzaron una elevación rocosa que sobresalía entre las aguas.</text:p>
      <text:p text:style-name="P8">Permanecieron allí, en silencio, esperando.</text:p>
      <text:p text:style-name="P8">Cuando la noche llegó, la lluvia había cesado.</text:p>
      <text:p text:style-name="P8">Frente a ellos se extendía una inmensa laguna oscura.</text:p>
      <text:p text:style-name="P8">El paisaje había cambiado por completo.</text:p>
      <text:p text:style-name="P8">Donde unas horas antes existía un camino ahora sólo quedaba agua.</text:p>
      <text:p text:style-name="P8">Nadie podía señalar dónde había quedado la carreta.</text:p>
      <text:p text:style-name="P8">Ni los caballos.</text:p>
      <text:p text:style-name="P8">Ni el sendero que los había conducido hasta allí.</text:p>
      <text:p text:style-name="P8">El pantano había borrado toda huella de su paso.</text:p>
      <text:p text:style-name="Horizontal_20_Line"/>
      <text:p text:style-name="Text_20_body"/>
      <text:p text:style-name="Text_20_body"/>
      <text:h text:style-name="P9" text:outline-level="3"><text:soft-page-break/><text:span text:style-name="T3">Parte 3 - </text:span>El puente</text:h>
      <text:p text:style-name="Text_20_body"/>
      <text:p text:style-name="Text_20_body">Los días siguientes fueron mucho más difíciles.</text:p>
      <text:p text:style-name="Text_20_body">Sin la carreta, cada hombre debía transportar sobre la espalda todo cuanto había conseguido salvar de la tormenta. Las provisiones se habían reducido considerablemente. El avance era lento y agotador. Al caer la noche apenas les quedaban fuerzas para levantar el campamento.</text:p>
      <text:p text:style-name="Text_20_body">El entusiasmo con el que habían abandonado Oldwood comenzaba a desvanecerse.</text:p>
      <text:p text:style-name="Text_20_body">Finalmente alcanzaron la región montañosa.</text:p>
      <text:p text:style-name="Text_20_body">Según sus cálculos, el lugar señalado por el mapa ya no podía encontrarse muy lejos. Quizá cincuenta millas. Tal vez menos. Después de todo lo ocurrido, el final del viaje parecía al alcance de la mano.</text:p>
      <text:p text:style-name="Text_20_body">Fue entonces cuando llegaron al borde del acantilado.</text:p>
      <text:p text:style-name="Text_20_body">El camino terminaba allí.</text:p>
      <text:p text:style-name="Text_20_body">Ante ellos se abría una inmensa garganta de roca que descendía cientos de metros hasta el cauce del río. Las paredes caían casi en vertical, lisas y oscuras. Muy abajo, el agua golpeaba las rocas con un estruendo continuo que ascendía hasta ellos convertido en un eco lejano.</text:p>
      <text:p text:style-name="Text_20_body">Todos buscaron con la vista el puente.</text:p>
      <text:p text:style-name="Text_20_body">No estaba.</text:p>
      <text:p text:style-name="Text_20_body">Sólo permanecían los restos de los antiguos pilares de piedra, aferrados a ambos extremos del precipicio. El puente colgante que aparecía dibujado en el mapa había desaparecido hacía mucho tiempo. Quizá había cedido durante una tormenta. Quizá había sido destruido en alguna guerra olvidada. Ya no importaba.</text:p>
      <text:p text:style-name="Text_20_body">La ruta había dejado de existir.</text:p>
      <text:p text:style-name="Text_20_body">Nadie habló.</text:p>
      <text:p text:style-name="Text_20_body">Cada uno permanecía inmóvil contemplando el vacío, como si esperara descubrir una solución oculta entre las paredes del acantilado.</text:p>
      <text:p text:style-name="Text_20_body">Durante varios minutos sólo se escuchó el rugido del río.</text:p>
      <text:p text:style-name="Text_20_body">Johf fue el primero en romper el silencio.</text:p>
      <text:p text:style-name="Text_20_body">—Se acabó.</text:p>
      <text:p text:style-name="Text_20_body">Nadie discutió aquellas palabras.</text:p>
      <text:p text:style-name="Text_20_body">Habían perdido la carreta.</text:p>
      <text:p text:style-name="Text_20_body">Los caballos.</text:p>
      <text:p text:style-name="Text_20_body">Gran parte de las provisiones.</text:p>
      <text:p text:style-name="Text_20_body"><text:soft-page-break/>Y ahora el propio camino.</text:p>
      <text:p text:style-name="Text_20_body">Regresar a Oldwood significaba aceptar que todo aquel esfuerzo no había servido para nada.</text:p>
      <text:p text:style-name="Text_20_body">Nohk continuaba observando el precipicio.</text:p>
      <text:p text:style-name="Text_20_body">Después habló.</text:p>
      <text:p text:style-name="Text_20_body">—Yo no voy a volver.</text:p>
      <text:p text:style-name="Text_20_body">Su voz sonó extrañamente serena.</text:p>
      <text:p text:style-name="Text_20_body">—Hemos llegado demasiado lejos para detenernos ahora.</text:p>
      <text:p text:style-name="Text_20_body">Nadie respondió de inmediato.</text:p>
      <text:p text:style-name="Text_20_body">La frase quedó suspendida en el aire.</text:p>
      <text:p text:style-name="Text_20_body">Todos comprendían el peligro.</text:p>
      <text:p text:style-name="Text_20_body">Pero también comprendían el peso de cuanto habían perdido para llegar hasta allí.</text:p>
      <text:p text:style-name="Text_20_body">Fue Kempht quien señaló la pared del acantilado.</text:p>
      <text:p text:style-name="Text_20_body">—Si logramos bajar hasta el río... quizá podamos subir por la otra ladera.</text:p>
      <text:p text:style-name="Text_20_body">Todos miraron hacia donde apuntaba.</text:p>
      <text:p text:style-name="Text_20_body">La pared era casi vertical.</text:p>
      <text:p text:style-name="Text_20_body">La roca apenas ofrecía lugares donde apoyar los pies.</text:p>
      <text:p text:style-name="Text_20_body">Un error significaría una caída de cientos de metros.</text:p>
      <text:p text:style-name="Text_20_body">Era una locura.</text:p>
      <text:p text:style-name="Text_20_body">Y, sin embargo, comenzaron a estudiarla como si fuera una posibilidad razonable.</text:p>
      <text:p text:style-name="Text_20_body">Al cabo de un rato tomaron la decisión.</text:p>
      <text:p text:style-name="Text_20_body">Descenderían por el acantilado.</text:p>
      <text:p text:style-name="Text_20_body">Cruzarían el río.</text:p>
      <text:p text:style-name="Text_20_body">Y tratarían de escalar la pared opuesta.</text:p>
      <text:p text:style-name="Text_20_body">Ninguno habría aceptado un riesgo semejante antes de iniciar la expedición.</text:p>
      <text:p text:style-name="Text_20_body">Ahora les parecía la única alternativa posible.</text:p>
      <text:p text:style-name="P10"><text:span text:style-name="Strong_20_Emphasis"><text:span text:style-name="T4">E</text:span></text:span><text:span text:style-name="Strong_20_Emphasis">l umbral de lo aceptable se ha</text:span><text:span text:style-name="Strong_20_Emphasis"><text:span text:style-name="T4">bía</text:span></text:span><text:span text:style-name="Strong_20_Emphasis"> desplazado</text:span>. </text:p>
      <text:p text:style-name="Text_20_body">Una hora más tarde, mientras las sombras del atardecer comenzaban a extenderse sobre las montañas de Terroja, los seis hombres se colocaron las cuerdas sobre los hombros y comenzaron el descenso.</text:p>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7-23T18:19:11.875000000</meta:creation-date>
    <dc:date>2026-07-24T11:18:43.582000000</dc:date>
    <meta:editing-duration>PT10M8S</meta:editing-duration>
    <meta:editing-cycles>13</meta:editing-cycles>
    <meta:generator>LibreOffice/7.3.5.2$Windows_X86_64 LibreOffice_project/184fe81b8c8c30d8b5082578aee2fed2ea847c01</meta:generator>
    <meta:document-statistic meta:table-count="0" meta:image-count="0" meta:object-count="0" meta:page-count="7" meta:paragraph-count="161" meta:word-count="1766" meta:character-count="11006" meta:non-whitespace-character-count="9399"/>
  </office:meta>
</office:document-meta>
</file>