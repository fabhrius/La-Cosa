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8b28e"/>
    </style:style>
    <style:style style:name="P2" style:family="paragraph" style:parent-style-name="Heading_20_2">
      <style:text-properties officeooo:paragraph-rsid="001c04e2"/>
    </style:style>
    <style:style style:name="P3" style:family="paragraph" style:parent-style-name="Text_20_body">
      <style:text-properties officeooo:paragraph-rsid="001ca037"/>
    </style:style>
    <style:style style:name="P4" style:family="paragraph" style:parent-style-name="Text_20_body">
      <style:text-properties officeooo:paragraph-rsid="00210eea"/>
    </style:style>
    <style:style style:name="P5" style:family="paragraph" style:parent-style-name="Text_20_body">
      <style:text-properties officeooo:paragraph-rsid="0022bb57"/>
    </style:style>
    <style:style style:name="T1" style:family="text">
      <style:text-properties officeooo:rsid="00182e09"/>
    </style:style>
    <style:style style:name="T2" style:family="text">
      <style:text-properties officeooo:rsid="0018619c"/>
    </style:style>
    <style:style style:name="T3" style:family="text">
      <style:text-properties officeooo:rsid="00187959"/>
    </style:style>
    <style:style style:name="T4" style:family="text">
      <style:text-properties officeooo:rsid="001a2166"/>
    </style:style>
    <style:style style:name="T5" style:family="text">
      <style:text-properties officeooo:rsid="001c04e2"/>
    </style:style>
    <style:style style:name="T6" style:family="text">
      <style:text-properties officeooo:rsid="001ca037"/>
    </style:style>
    <style:style style:name="T7" style:family="text">
      <style:text-properties officeooo:rsid="001cd9d0"/>
    </style:style>
    <style:style style:name="T8" style:family="text">
      <style:text-properties officeooo:rsid="001e5f8a"/>
    </style:style>
    <style:style style:name="T9" style:family="text">
      <style:text-properties officeooo:rsid="001f64db"/>
    </style:style>
    <style:style style:name="T10" style:family="text">
      <style:text-properties officeooo:rsid="0022bb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2" text:outline-level="2"><text:span text:style-name="T1"><text:s/></text:span><text:span text:style-name="T5">Capitulo 2 - </text:span></text:h>
      <text:h text:style-name="P2" text:outline-level="2"><text:span text:style-name="T1">Parte 1 - </text:span>El libro</text:h>
      <text:p text:style-name="Text_20_body"/>
      <text:p text:style-name="Text_20_body">La casa de Jorhm se encontraba en el extremo norte del pueblo, junto a un pequeño viñedo que descendía suavemente hacia el río.</text:p>
      <text:p text:style-name="Text_20_body">Los seis amigos recorrieron el camino casi sin hablar.<text:span text:style-name="T1"> </text:span>La emoción había sustituido a las bromas de la cantina.<text:span text:style-name="T1"> </text:span>Todos sentían la misma curiosidad.</text:p>
      <text:p text:style-name="Text_20_body">Si el anciano reconocía la llave, tal vez pudieran descubrir cuánto valía realmente.</text:p>
      <text:p text:style-name="Text_20_body">O quizá averiguar quién la había perdido.</text:p>
      <text:p text:style-name="Text_20_body">Cuando llegaron, encontraron a Jorhm sentado bajo una parra cubierta de hojas verdes.</text:p>
      <text:p text:style-name="Text_20_body">El anciano descansaba en una silla de madera observando el atardecer.</text:p>
      <text:p text:style-name="Text_20_body">Los últimos rayos del sol iluminaban las vides y teñían de oro los muros de piedra de la casa.</text:p>
      <text:p text:style-name="Text_20_body">Parecía completamente ajeno a la agitación que se acercaba por el camino.</text:p>
      <text:p text:style-name="Text_20_body">—¡Jorhm! —llamó Kempht mientras se aproximaban.</text:p>
      <text:p text:style-name="Text_20_body">El anciano levantó la vista.</text:p>
      <text:p text:style-name="Text_20_body">—¿Qué ocurre? ¿Se está quemando el pueblo?</text:p>
      <text:p text:style-name="Text_20_body">Los jóvenes rieron.</text:p>
      <text:p text:style-name="Text_20_body">—No exactamente.</text:p>
      <text:p text:style-name="Text_20_body">Kempht sacó la llave y se la mostró.</text:p>
      <text:p text:style-name="Text_20_body">—Mira esto.</text:p>
      <text:p text:style-name="Text_20_body">Jorhm extendió la mano sin demasiado interés.</text:p>
      <text:p text:style-name="Text_20_body">Pero en cuanto sus dedos tocaron el metal, su expresión cambió.</text:p>
      <text:p text:style-name="Text_20_body">La sonrisa desapareció.<text:span text:style-name="T2"> </text:span>Acercó la llave a sus ojos.<text:span text:style-name="T2"> </text:span>La giró lentamente.<text:span text:style-name="T2"> </text:span>Observó la piedra verde.</text:p>
      <text:p text:style-name="Text_20_body">Luego el escudo grabado.<text:span text:style-name="T3"> </text:span>Y finalmente volvió a examinar la piedra.</text:p>
      <text:p text:style-name="Text_20_body">Durante varios segundos nadie dijo nada.</text:p>
      <text:p text:style-name="Text_20_body">El anciano parecía incapaz de apartar la vista del objeto.</text:p>
      <text:p text:style-name="Text_20_body">—No es posible... —murmuró.</text:p>
      <text:p text:style-name="Text_20_body">Se puso de pie con una rapidez sorprendente para alguien de su edad.</text:p>
      <text:p text:style-name="Text_20_body"><text:soft-page-break/>Todavía sujetando la llave, caminó hacia la casa.</text:p>
      <text:p text:style-name="Text_20_body">—Venid.</text:p>
      <text:p text:style-name="Text_20_body">Los seis amigos lo siguieron.<text:span text:style-name="T3"> </text:span>Atravesaron un estrecho pasillo y llegaron al salón principal.</text:p>
      <text:p text:style-name="Text_20_body">La habitación estaba rodeada de estanterías desde el suelo hasta el techo.</text:p>
      <text:p text:style-name="Text_20_body">Decenas.<text:span text:style-name="T3"> </text:span>Tal vez cientos de libros.</text:p>
      <text:p text:style-name="Text_20_body">Algunos estaban cuidadosamente encuadernados.<text:span text:style-name="T3"> </text:span>Otros parecían tan antiguos que amenazaban con deshacerse al tocarlos.</text:p>
      <text:p text:style-name="Text_20_body">Había mapas enrollados, pergaminos, cajas repletas de documentos y pequeños objetos procedentes de lugares remotos.<text:span text:style-name="T3"> </text:span></text:p>
      <text:p text:style-name="P5">Aquella colección era el orgullo de Jorhm. </text:p>
      <text:p text:style-name="P5">Entre sus páginas sobrevivían historias y fragmentos olvidados del pasado. </text:p>
      <text:p text:style-name="P5"><text:span text:style-name="T10">L</text:span>os últimos vestigios de la vida en los antiguos pueblos de Lluviara. </text:p>
      <text:p text:style-name="P5"><text:span text:style-name="T10">Y p</text:span>ara él, aquellos libros constituían su verdadera riqueza.</text:p>
      <text:p text:style-name="Text_20_body">Jorhm se dirigió directamente hacia una de las estanterías del fondo.</text:p>
      <text:p text:style-name="Text_20_body">No dudó ni un instante.<text:span text:style-name="T3"> Sabia</text:span> exactamente dónde buscar.<text:span text:style-name="T3"> </text:span>Extrajo un volumen grueso cubierto de polvo.</text:p>
      <text:p text:style-name="Text_20_body">La encuadernación estaba desgastada por los años.<text:span text:style-name="T3"> </text:span>El cuero había adquirido un color oscuro y agrietado.</text:p>
      <text:p text:style-name="Text_20_body">Con sumo cuidado llevó el libro hasta una mesa.<text:span text:style-name="T3"> </text:span>Lo abrió.</text:p>
      <text:p text:style-name="Text_20_body">Las páginas crujieron suavemente.</text:p>
      <text:p text:style-name="Text_20_body">Pasó varias hojas con rapidez.</text:p>
      <text:p text:style-name="Text_20_body">Después otras más despacio.<text:span text:style-name="T3"> </text:span>Hasta que finalmente se detuvo.</text:p>
      <text:p text:style-name="Text_20_body">Sus ojos brillaron.</text:p>
      <text:p text:style-name="Text_20_body">Colocó la llave sobre la página abierta.</text:p>
      <text:p text:style-name="Text_20_body">—Observad.</text:p>
      <text:p text:style-name="Text_20_body">Los jóvenes se inclinaron sobre la mesa.</text:p>
      <text:p text:style-name="Text_20_body">En la página había un dibujo.<text:span text:style-name="T3"> </text:span>Una llave.<text:span text:style-name="T3"> </text:span>Exactamente igual.</text:p>
      <text:p text:style-name="Text_20_body">La misma forma.<text:span text:style-name="T3"> </text:span>La misma piedra verde.<text:span text:style-name="T3"> </text:span>El mismo escudo real grabado en el metal.</text:p>
      <text:p text:style-name="Text_20_body">Incluso las pequeñas marcas decorativas coincidían perfectamente.</text:p>
      <text:p text:style-name="Text_20_body">No era parecida.<text:span text:style-name="T3"> </text:span>Era la misma llave.</text:p>
      <text:p text:style-name="Text_20_body">Nadie habló.</text:p>
      <text:p text:style-name="Text_20_body">La sorpresa había silenciado la habitación.</text:p>
      <text:p text:style-name="Text_20_body"><text:soft-page-break/>Finalmente Jorhm rompió el silencio.</text:p>
      <text:p text:style-name="Text_20_body">—No hay duda.</text:p>
      <text:p text:style-name="Text_20_body">Su voz sonó más grave que antes.</text:p>
      <text:p text:style-name="Text_20_body">—Es ella.</text:p>
      <text:p text:style-name="Text_20_body">—¿Ella? —preguntó Nohk.</text:p>
      <text:p text:style-name="Text_20_body">El anciano apoyó lentamente una mano sobre el libro.</text:p>
      <text:p text:style-name="Text_20_body">—La llave del tesoro del rey.</text:p>
      <text:p text:style-name="Text_20_body">Jorhm observó nuevamente la llave.</text:p>
      <text:p text:style-name="P1">—<text:span text:style-name="T3">Y s</text:span>i esta llave es auténtica...</text:p>
      <text:p text:style-name="P1"><text:span text:style-name="T3">e</text:span>ntonces quizá la leyenda también lo sea.</text:p>
      <text:p text:style-name="Text_20_body"/>
      <text:p text:style-name="Text_20_body"/>
      <text:p text:style-name="Horizontal_20_Line"/>
      <text:p text:style-name="Text_20_body"/>
      <text:h text:style-name="Heading_20_2" text:outline-level="2"><text:span text:style-name="T4">Parte 2 - </text:span>La leyenda del tesoro del rey</text:h>
      <text:p text:style-name="Text_20_body"/>
      <text:p text:style-name="Text_20_body">Durante unos instantes nadie dijo nada.</text:p>
      <text:p text:style-name="Text_20_body">Los seis jóvenes permanecían inclinados sobre la mesa observando alternativamente la llave y el dibujo del libro.</text:p>
      <text:p text:style-name="Text_20_body">La semejanza era tan perfecta que resultaba inquietante.</text:p>
      <text:p text:style-name="Text_20_body">Finalmente fue Nohk quien rompió el silencio.</text:p>
      <text:p text:style-name="Text_20_body">—¿Qué leyenda es esa?</text:p>
      <text:p text:style-name="Text_20_body">Jorhm cerró parcialmente el volumen y apoyó ambas manos sobre la cubierta.</text:p>
      <text:p text:style-name="Text_20_body">Parecía estar ordenando sus pensamientos.</text:p>
      <text:p text:style-name="Text_20_body">Luego se acomodó en una silla junto a la mesa.</text:p>
      <text:p text:style-name="Text_20_body">—Es una historia muy antigua —comenzó—. Tan antigua que la mayoría de la gente ya no la recuerda. Según este libro, ocurrió hace unos trescientos años, durante el reinado de Jumphrestebar.</text:p>
      <text:p text:style-name="Text_20_body">El nombre no significaba nada para los jóvenes.</text:p>
      <text:p text:style-name="Text_20_body">Jorhm continuó.</text:p>
      <text:p text:style-name="Text_20_body"><text:soft-page-break/>—En aquella época una terrible guerra dividió Lluviara. Las regiones del este permanecieron leales al rey. Las del oeste intentaron derrocarlo. Durante años ambos bandos se enfrentaron sin descanso. Ciudades enteras fueron destruidas. Los caminos se volvieron peligrosos. El comercio desapareció. Nadie estaba seguro de quién vencería.</text:p>
      <text:p text:style-name="Text_20_body">El anciano hizo una pausa.</text:p>
      <text:p text:style-name="Text_20_body">Las llamas de una lámpara temblaron suavemente en la habitación.</text:p>
      <text:p text:style-name="Text_20_body">—Con el paso del tiempo la situación empeoró. Finalmente el rey se vio obligado a abandonar la capital y huir. Sus enemigos avanzaban desde todos los frentes. Temía que, si era derrotado, todo cuanto poseía cayera en manos de sus adversarios.</text:p>
      <text:p text:style-name="Text_20_body">Jorhm abrió nuevamente el libro y pasó varias páginas.</text:p>
      <text:p text:style-name="Text_20_body">Aparecieron dibujos de fortalezas, símbolos antiguos y textos escritos con una caligrafía difícil de descifrar.</text:p>
      <text:p text:style-name="P4">—Fue entonces cuando <text:span text:style-name="T8">el rey </text:span>tomó una decisión extraordinaria. Ordenó construir una cámara secreta. Una bóveda oculta en algún lugar de Lluviara.<text:span text:style-name="T8"> Para guardar allí el tesoro de la Corona. </text:span></text:p>
      <text:p text:style-name="P4"><text:span text:style-name="T8">Oro. Piedras preciosas. Joyas dignas de emperadores. Reliquias, obras de arte y objetos de valor incalculable. Un tesoro tan deslumbrante que la imaginación apenas podía abarcarlo. Tal vez el más extraordinario que jamás haya existido.</text:span></text:p>
      <text:p text:style-name="Text_20_body">Los jóvenes escuchaban atentamente.</text:p>
      <text:p text:style-name="Text_20_body">—Según la leyenda, aquella cámara fue diseñada para resistir cualquier ataque. Sus muros eran impenetrables. Su entrada estaba protegida por una puerta de hierro imposible de destruir. Ningún ejército podía atravesarla. Ninguna herramienta podía abrirla.</text:p>
      <text:p text:style-name="Text_20_body">El anciano señaló el dibujo de la llave.</text:p>
      <text:p text:style-name="Text_20_body">—Sólo existía una forma de entrar.</text:p>
      <text:p text:style-name="Text_20_body">La llave.</text:p>
      <text:p text:style-name="Text_20_body">Los ojos de los muchachos se dirigieron inmediatamente hacia el objeto que descansaba sobre la mesa.</text:p>
      <text:p text:style-name="Text_20_body">La piedra verde parecía brillar aún más bajo la luz de las lámparas.</text:p>
      <text:p text:style-name="Text_20_body">—Cuando el rey comprendió que iba a morir —continuó Jorhm— decidió preservar el secreto. Llamó a uno de sus sirvientes más fieles y le describió con exactitud la ubicación de la cámara. El hombre dibujó un mapa. Un único mapa.</text:p>
      <text:p text:style-name="Text_20_body">Jorhm volvió algunas páginas más.</text:p>
      <text:p text:style-name="Text_20_body">Y allí apareció.</text:p>
      <text:p text:style-name="Text_20_body">Un conjunto de líneas, marcas y símbolos trazados a mano siglos atrás.</text:p>
      <text:p text:style-name="Text_20_body">Parecía poco más que un garabato.</text:p>
      <text:p text:style-name="Text_20_body">Y sin embargo todos comprendieron inmediatamente lo que estaban viendo.</text:p>
      <text:p text:style-name="Text_20_body"><text:soft-page-break/>Era un mapa.</text:p>
      <text:p text:style-name="Text_20_body">El mapa del tesoro.</text:p>
      <text:p text:style-name="Text_20_body">Los jóvenes se acercaron todavía más.</text:p>
      <text:p text:style-name="Text_20_body">Aquellas líneas antiguas despertaban la imaginación de forma irresistible.</text:p>
      <text:p text:style-name="Text_20_body">Montañas.<text:span text:style-name="T4"> </text:span>Ríos.<text:span text:style-name="T4"> </text:span>Senderos.<text:span text:style-name="T4"> </text:span>Lugares desconocidos.</text:p>
      <text:p text:style-name="Text_20_body">Algún punto oculto donde, según la leyenda, descansaba la fortuna de un rey.</text:p>
      <text:p text:style-name="Text_20_body">Jorhm observó las expresiones de los muchachos y soltó una breve carcajada.</text:p>
      <text:p text:style-name="Text_20_body">—No pongáis esas caras.</text:p>
      <text:p text:style-name="Text_20_body">Todos levantaron la vista.</text:p>
      <text:p text:style-name="Text_20_body">—Yo no creo una sola palabra de esta historia.</text:p>
      <text:p text:style-name="Text_20_body">Los jóvenes parecieron decepcionados.</text:p>
      <text:p text:style-name="Text_20_body">—¿No? —preguntó Kempht.</text:p>
      <text:p text:style-name="Text_20_body">—Por supuesto que no.</text:p>
      <text:p text:style-name="Text_20_body">Jorhm cerró el libro con suavidad.</text:p>
      <text:p text:style-name="Text_20_body">—Es un cuento para niños. Una leyenda. Nada más.</text:p>
      <text:p text:style-name="Text_20_body">Se reclinó en la silla.</text:p>
      <text:p text:style-name="Text_20_body">—Si esa bóveda existiera, alguien la habría encontrado hace siglos. Mucha gente buscó el tesoro. Algunos utilizaron copias de este mismo mapa. Otros siguieron pistas distintas. Ninguno encontró nada<text:span text:style-name="T4">, nunca</text:span>.</text:p>
      <text:p text:style-name="Text_20_body">El anciano golpeó la cubierta del libro con los dedos.</text:p>
      <text:p text:style-name="Text_20_body">—Ni la cámara apareció jamás. Ni la llave fue encontrada nunca.</text:p>
      <text:p text:style-name="Text_20_body">Miró de nuevo el dibujo.<text:span text:style-name="T4"> </text:span>Después observó la llave.<text:span text:style-name="T4"> </text:span>Luego volvió a mirar el dibujo.</text:p>
      <text:p text:style-name="Text_20_body">Su expresión cambió ligeramente.</text:p>
      <text:p text:style-name="Text_20_body">La seguridad de sus palabras parecía haberse debilitado.</text:p>
      <text:p text:style-name="Text_20_body">—Y sin embargo...</text:p>
      <text:p text:style-name="Text_20_body">La habitación quedó en silencio.</text:p>
      <text:p text:style-name="Text_20_body">Jorhm tomó la llave entre sus manos.<text:span text:style-name="T4"> </text:span>La giró lentamente.<text:span text:style-name="T4"> </text:span>Examinó el escudo grabado.<text:span text:style-name="T4"> </text:span>La piedra verde.</text:p>
      <text:p text:style-name="Text_20_body">Las formas del metal.</text:p>
      <text:p text:style-name="Text_20_body">Después volvió a compararla con la ilustración.<text:span text:style-name="T4"> </text:span>Una vez más.</text:p>
      <text:p text:style-name="Text_20_body">Y otra.</text:p>
      <text:p text:style-name="Text_20_body"><text:soft-page-break/>Como si esperara descubrir alguna diferencia.<text:span text:style-name="T4"> </text:span>Pero no la encontró.</text:p>
      <text:p text:style-name="Text_20_body">Finalmente dejó escapar un largo suspiro.</text:p>
      <text:p text:style-name="Text_20_body">—Juraría que esto es imposible.</text:p>
      <text:p text:style-name="Text_20_body">Nadie habló.</text:p>
      <text:p text:style-name="Text_20_body">El anciano seguía observando la llave con una mezcla de fascinación y desconcierto.</text:p>
      <text:p text:style-name="Text_20_body">Por primera vez parecía dudar de sus propias convicciones.</text:p>
      <text:p text:style-name="Text_20_body">Y aquello resultaba mucho más inquietante que la leyenda misma.</text:p>
      <text:p text:style-name="Text_20_body"/>
      <text:p text:style-name="Horizontal_20_Lin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24T18:23:26.540000000</meta:creation-date>
    <dc:date>2026-07-23T11:28:47.496000000</dc:date>
    <meta:editing-duration>PT1H43M51S</meta:editing-duration>
    <meta:editing-cycles>17</meta:editing-cycles>
    <meta:generator>LibreOffice/7.3.5.2$Windows_X86_64 LibreOffice_project/184fe81b8c8c30d8b5082578aee2fed2ea847c01</meta:generator>
    <meta:document-statistic meta:table-count="0" meta:image-count="0" meta:object-count="0" meta:page-count="6" meta:paragraph-count="131" meta:word-count="1285" meta:character-count="7977" meta:non-whitespace-character-count="6817"/>
  </office:meta>
</office:document-meta>
</file>