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Parte 1 - El ascenso imposible</text:h>
      <text:p text:style-name="Text_20_body">El descenso por la pared occidental resultó mucho más sencillo de lo esperado.</text:p>
      <text:p text:style-name="Text_20_body">La roca estaba surcada por numerosas grietas y repisas naturales que ofrecían puntos de apoyo relativamente seguros.</text:p>
      <text:p text:style-name="Text_20_body">Uno a uno, los seis hombres fueron descendiendo hasta alcanzar el fondo del valle.</text:p>
      <text:p text:style-name="Text_20_body">Desde allí cruzaron el río ayudándose con las cuerdas que habían conseguido salvar de la tormenta.</text:p>
      <text:p text:style-name="Text_20_body">El agua era rápida y helada, pero la corriente no representó un problema serio.</text:p>
      <text:p text:style-name="Text_20_body">Al caer la tarde todos se encontraban ya al otro lado.</text:p>
      <text:p text:style-name="Text_20_body">Y fue entonces cuando comprendieron la magnitud del desafío que les esperaba.</text:p>
      <text:p text:style-name="Text_20_body">La pared oriental se alzaba frente a ellos como una muralla construida por gigantes.</text:p>
      <text:p text:style-name="Text_20_body">Era mucho más alta.</text:p>
      <text:p text:style-name="Text_20_body">Mucho más lisa.</text:p>
      <text:p text:style-name="Text_20_body">Mucho más intimidante.</text:p>
      <text:p text:style-name="Text_20_body">Trescientos metros de granito gris ascendían casi verticalmente hacia el cielo.</text:p>
      <text:p text:style-name="Text_20_body">Durante varios minutos permanecieron observándola en silencio.</text:p>
      <text:p text:style-name="Text_20_body">El acantilado parecía imposible.</text:p>
      <text:p text:style-name="Text_20_body">No había senderos.</text:p>
      <text:p text:style-name="Text_20_body">No había caminos.</text:p>
      <text:p text:style-name="Text_20_body">No existía ninguna ruta evidente.</text:p>
      <text:p text:style-name="Text_20_body">Sólo roca desnuda elevándose sobre sus cabezas.</text:p>
      <text:p text:style-name="Text_20_body">—Tiene que haber algún paso —dijo uno de ellos finalmente.</text:p>
      <text:p text:style-name="Text_20_body">Nadie respondió.</text:p>
      <text:p text:style-name="Text_20_body">Todos estaban pensando lo mismo.</text:p>
      <text:p text:style-name="Text_20_body">Si existía, no era fácil de encontrar.</text:p>
      <text:p text:style-name="Text_20_body">Decidieron acampar junto al río.</text:p>
      <text:p text:style-name="Text_20_body">Necesitaban descansar.</text:p>
      <text:p text:style-name="Text_20_body">Y también estudiar la montaña.</text:p>
      <text:p text:style-name="Text_20_body">Aquel error ya lo habían cometido una vez.</text:p>
      <text:p text:style-name="Text_20_body">Habían confiado demasiado en los mapas.</text:p>
      <text:p text:style-name="Text_20_body"><text:soft-page-break/>Demasiado en sus propias expectativas.</text:p>
      <text:p text:style-name="Text_20_body">Ahora debían actuar con cautela.</text:p>
      <text:p text:style-name="Text_20_body">Pasaron el resto de la tarde examinando la pared desde distintos ángulos.</text:p>
      <text:p text:style-name="Text_20_body">Buscando grietas.</text:p>
      <text:p text:style-name="Text_20_body">Cornisas.</text:p>
      <text:p text:style-name="Text_20_body">Posibles rutas.</text:p>
      <text:p text:style-name="Text_20_body">El río les proporcionó agua.</text:p>
      <text:p text:style-name="Text_20_body">La pesca les permitió conseguir algo de comida.</text:p>
      <text:p text:style-name="Text_20_body">Y un conjunto de árboles inclinados junto a unas rocas salientes les ofreció refugio suficiente para pasar la noche.</text:p>
      <text:p text:style-name="Text_20_body">Sin embargo, ninguno durmió especialmente bien.</text:p>
      <text:p text:style-name="Text_20_body">La montaña permanecía allí.</text:p>
      <text:p text:style-name="Text_20_body">Oscura.</text:p>
      <text:p text:style-name="Text_20_body">Inmóvil.</text:p>
      <text:p text:style-name="Text_20_body">Observándolos.</text:p>
      <text:p text:style-name="Text_20_body">Como una amenaza silenciosa.</text:p>
      <text:p text:style-name="Text_20_body">Al amanecer el tiempo era excelente.</text:p>
      <text:p text:style-name="Text_20_body">El cielo estaba despejado.</text:p>
      <text:p text:style-name="Text_20_body">El aire fresco.</text:p>
      <text:p text:style-name="Text_20_body">No existía ninguna excusa para retrasar la ascensión.</text:p>
      <text:p text:style-name="Text_20_body">Prepararon las cuerdas.</text:p>
      <text:p text:style-name="Text_20_body">Repartieron el equipo.</text:p>
      <text:p text:style-name="Text_20_body">Y comenzaron a subir.</text:p>
      <text:p text:style-name="Text_20_body">Los primeros metros resultaron relativamente sencillos.</text:p>
      <text:p text:style-name="Text_20_body">La roca ofrecía numerosos apoyos.</text:p>
      <text:p text:style-name="Text_20_body">Las grietas permitían avanzar con cierta comodidad.</text:p>
      <text:p text:style-name="Text_20_body">Incluso comenzaron a bromear.</text:p>
      <text:p text:style-name="Text_20_body">Tal vez el desafío no fuera tan terrible después de todo.</text:p>
      <text:p text:style-name="Text_20_body">Pero la montaña sólo estaba permitiéndoles entrar.</text:p>
      <text:p text:style-name="Text_20_body">Una hora más tarde el panorama cambió.</text:p>
      <text:p text:style-name="Text_20_body"><text:soft-page-break/>El suelo había desaparecido muy por debajo de ellos.</text:p>
      <text:p text:style-name="Text_20_body">El río se había convertido en una cinta plateada.</text:p>
      <text:p text:style-name="Text_20_body">Los árboles parecían arbustos diminutos.</text:p>
      <text:p text:style-name="Text_20_body">Y los apoyos empezaban a escasear.</text:p>
      <text:p text:style-name="Text_20_body">Ahora cada movimiento exigía reflexión.</text:p>
      <text:p text:style-name="Text_20_body">Cada paso debía estudiarse cuidadosamente.</text:p>
      <text:p text:style-name="Text_20_body">Cada agarre era una apuesta.</text:p>
      <text:p text:style-name="Text_20_body">Los hombres avanzaban despacio.</text:p>
      <text:p text:style-name="Text_20_body">Uno detrás de otro.</text:p>
      <text:p text:style-name="Text_20_body">Separados apenas por unos metros.</text:p>
      <text:p text:style-name="Text_20_body">Buscando con las manos pequeñas irregularidades en la roca.</text:p>
      <text:p text:style-name="Text_20_body">Comprobando varias veces cada apoyo antes de confiar su peso a él.</text:p>
      <text:p text:style-name="Text_20_body">El esfuerzo comenzó a hacerse notar.</text:p>
      <text:p text:style-name="Text_20_body">Los músculos ardían.</text:p>
      <text:p text:style-name="Text_20_body">Los dedos se entumecían.</text:p>
      <text:p text:style-name="Text_20_body">Los antebrazos temblaban por el esfuerzo constante.</text:p>
      <text:p text:style-name="Text_20_body">Y cuanto más cansados estaban, más difícil resultaba mantener la concentración.</text:p>
      <text:p text:style-name="Text_20_body">Nohk descubrió algo inquietante.</text:p>
      <text:p text:style-name="Text_20_body">La montaña parecía cambiar a medida que ascendían.</text:p>
      <text:p text:style-name="Text_20_body">Desde abajo todo parecía simple.</text:p>
      <text:p text:style-name="Text_20_body">Ahora cada metro revelaba nuevas dificultades.</text:p>
      <text:p text:style-name="Text_20_body">Nuevos obstáculos.</text:p>
      <text:p text:style-name="Text_20_body">Nuevos riesgos.</text:p>
      <text:p text:style-name="Text_20_body">Varias veces alguno de ellos quedó bloqueado.</text:p>
      <text:p text:style-name="Text_20_body">Atrapado.</text:p>
      <text:p text:style-name="Text_20_body">Sin encontrar un camino evidente para continuar.</text:p>
      <text:p text:style-name="Text_20_body">Ni hacia arriba.</text:p>
      <text:p text:style-name="Text_20_body">Ni hacia abajo.</text:p>
      <text:p text:style-name="Text_20_body">En una ocasión Kempht permaneció inmóvil durante casi diez minutos aferrado a una estrecha grieta.</text:p>
      <text:p text:style-name="Text_20_body">Su respiración se volvió agitada.</text:p>
      <text:p text:style-name="Text_20_body"><text:soft-page-break/>El sudor le corría por la frente.</text:p>
      <text:p text:style-name="Text_20_body">Por más que observaba a su alrededor no encontraba ninguna salida.</text:p>
      <text:p text:style-name="Text_20_body">Finalmente otro miembro del grupo localizó un pequeño apoyo oculto unos centímetros más arriba.</text:p>
      <text:p text:style-name="Text_20_body">Lo alcanzó.</text:p>
      <text:p text:style-name="Text_20_body">Y consiguió continuar.</text:p>
      <text:p text:style-name="Text_20_body">Pero aquel episodio dejó algo detrás.</text:p>
      <text:p text:style-name="Text_20_body">Una sensación desagradable.</text:p>
      <text:p text:style-name="Text_20_body">La sensación de que podían quedarse atrapados.</text:p>
      <text:p text:style-name="Text_20_body">La sensación de que la montaña podía vencerlos.</text:p>
      <text:p text:style-name="Text_20_body">Poco a poco el silencio sustituyó a las conversaciones.</text:p>
      <text:p text:style-name="Text_20_body">Nadie tenía energía para hablar.</text:p>
      <text:p text:style-name="Text_20_body">Toda la atención estaba concentrada en sobrevivir al siguiente movimiento.</text:p>
      <text:p text:style-name="Text_20_body">Y entonces apareció el vértigo.</text:p>
      <text:p text:style-name="Text_20_body">No de golpe.</text:p>
      <text:p text:style-name="Text_20_body">Sino lentamente.</text:p>
      <text:p text:style-name="Text_20_body">Como una sombra.</text:p>
      <text:p text:style-name="Text_20_body">Bastaba una mirada accidental hacia abajo.</text:p>
      <text:p text:style-name="Text_20_body">Un instante de distracción.</text:p>
      <text:p text:style-name="Text_20_body">Y el vacío regresaba.</text:p>
      <text:p text:style-name="Text_20_body">Inmenso.</text:p>
      <text:p text:style-name="Text_20_body">Amenazador.</text:p>
      <text:p text:style-name="Text_20_body">Esperando.</text:p>
      <text:p text:style-name="Text_20_body">Los corazones comenzaban a acelerarse.</text:p>
      <text:p text:style-name="Text_20_body">Las manos se aferraban con más fuerza a la roca.</text:p>
      <text:p text:style-name="Text_20_body">Algunos evitaban deliberadamente mirar hacia el suelo.</text:p>
      <text:p text:style-name="Text_20_body">Otros respiraban con dificultad.</text:p>
      <text:p text:style-name="Text_20_body">La altura comenzaba a infiltrarse en sus pensamientos.</text:p>
      <text:p text:style-name="Text_20_body">Y con ella llegaban nuevas dudas.</text:p>
      <text:p text:style-name="Text_20_body">¿Habían calculado bien?</text:p>
      <text:p text:style-name="Text_20_body">¿Realmente existía un tesoro?</text:p>
      <text:p text:style-name="Text_20_body"><text:soft-page-break/>¿Merecía la pena todo aquello?</text:p>
      <text:p text:style-name="Text_20_body">Nadie formuló las preguntas en voz alta.</text:p>
      <text:p text:style-name="Text_20_body">Todavía no.</text:p>
      <text:p text:style-name="Text_20_body">Pero estaban allí.</text:p>
      <text:p text:style-name="Text_20_body">Suspendidas entre ellos.</text:p>
      <text:p text:style-name="Text_20_body">Tan presentes como el precipicio.</text:p>
      <text:p text:style-name="Text_20_body">El cansancio también comenzó a alterar el ánimo del grupo.</text:p>
      <text:p text:style-name="Text_20_body">Pequeños errores provocaban respuestas desproporcionadas.</text:p>
      <text:p text:style-name="Text_20_body">Una piedra desprendida generaba reproches.</text:p>
      <text:p text:style-name="Text_20_body">Una cuerda mal colocada producía discusiones.</text:p>
      <text:p text:style-name="Text_20_body">La paciencia se reducía a medida que aumentaba el esfuerzo.</text:p>
      <text:p text:style-name="Text_20_body">—Ten más cuidado.</text:p>
      <text:p text:style-name="Text_20_body">—Yo no he sido.</text:p>
      <text:p text:style-name="Text_20_body">—Pues alguien ha movido esa piedra.</text:p>
      <text:p text:style-name="Text_20_body">—Entonces mira dónde pones las manos.</text:p>
      <text:p text:style-name="Text_20_body">Las conversaciones eran breves.</text:p>
      <text:p text:style-name="Text_20_body">Secas.</text:p>
      <text:p text:style-name="Text_20_body">Cortantes.</text:p>
      <text:p text:style-name="Text_20_body">Nada grave.</text:p>
      <text:p text:style-name="Text_20_body">Todavía.</text:p>
      <text:p text:style-name="Text_20_body">Pero por primera vez desde que abandonaron Oldwood empezaban a aparecer grietas invisibles entre ellos.</text:p>
      <text:p text:style-name="Text_20_body">La montaña estaba haciendo algo más que agotarlos.</text:p>
      <text:p text:style-name="Text_20_body">Estaba poniendo a prueba la amistad que los había llevado hasta allí.</text:p>
      <text:p text:style-name="Text_20_body">Y cuanto más alto ascendían, más evidente resultaba una realidad incómoda.</text:p>
      <text:p text:style-name="Text_20_body">Ya no estaban participando en una aventura.</text:p>
      <text:p text:style-name="Text_20_body">Estaban luchando por sus vidas.</text:p>
      <text:p text:style-name="Text_20_body">Nohk levantó la vista.</text:p>
      <text:p text:style-name="Text_20_body">La cima seguía pareciendo lejana.</text:p>
      <text:p text:style-name="Text_20_body">Desesperadamente lejana.</text:p>
      <text:p text:style-name="Text_20_body"><text:soft-page-break/>Y por primera vez desde que comenzó la expedición sintió una punzada de miedo.</text:p>
      <text:p text:style-name="Text_20_body">Un miedo frío.</text:p>
      <text:p text:style-name="Text_20_body">Silencioso.</text:p>
      <text:p text:style-name="Text_20_body">Difícil de ignorar.</text:p>
      <text:p text:style-name="Text_20_body">Porque si algo salía mal allí arriba, nadie podría ayudarlos.</text:p>
      <text:p text:style-name="Text_20_body">Y cada metro que avanzaban hacía más difícil regresar.</text:p>
      <text:p text:style-name="Text_20_body">Aun así continuaron ascendiendo.</text:p>
      <text:p text:style-name="Text_20_body">Aferrados a la roca.</text:p>
      <text:p text:style-name="Text_20_body">Suspendidos sobre el vacío.</text:p>
      <text:p text:style-name="P1"/>
      <text:p text:style-name="Standard"/>
      <text:p text:style-name="Horizontal_20_Line"/>
      <text:p text:style-name="Text_20_body"/>
      <text:h text:style-name="Heading_20_2" text:outline-level="2">Parte 2 - El accidente</text:h>
      <text:p text:style-name="Text_20_body">La montaña seguía empeorando.</text:p>
      <text:p text:style-name="Text_20_body">Cada metro ganado parecía costar más que el anterior.</text:p>
      <text:p text:style-name="Text_20_body">Las grietas eran más estrechas.</text:p>
      <text:p text:style-name="Text_20_body">Los apoyos más escasos.</text:p>
      <text:p text:style-name="Text_20_body">La roca más lisa.</text:p>
      <text:p text:style-name="Text_20_body">Los seis hombres avanzaban lentamente, aferrados al granito con manos agotadas y músculos que comenzaban a temblar por el esfuerzo.</text:p>
      <text:p text:style-name="Text_20_body">Hacía horas que habían dejado de hablar.</text:p>
      <text:p text:style-name="Text_20_body">Toda su atención estaba concentrada en sobrevivir al siguiente movimiento.</text:p>
      <text:p text:style-name="Text_20_body">En encontrar el siguiente apoyo.</text:p>
      <text:p text:style-name="Text_20_body">En no mirar hacia abajo.</text:p>
      <text:p text:style-name="Text_20_body">El viento soplaba ahora con mayor fuerza.</text:p>
      <text:p text:style-name="Text_20_body">No era especialmente intenso, pero a aquella altura cualquier ráfaga parecía una amenaza.</text:p>
      <text:p text:style-name="Text_20_body">Nohk respiró profundamente.</text:p>
      <text:p text:style-name="Text_20_body">Intentó controlar el temblor de sus brazos.</text:p>
      <text:p text:style-name="Text_20_body">Le dolían los dedos.</text:p>
      <text:p text:style-name="Text_20_body"><text:soft-page-break/>Le dolían los hombros.</text:p>
      <text:p text:style-name="Text_20_body">Le dolía la espalda.</text:p>
      <text:p text:style-name="Text_20_body">Y lo peor era que la cima seguía pareciendo lejana.</text:p>
      <text:p text:style-name="Text_20_body">Demasiado lejana.</text:p>
      <text:p text:style-name="Text_20_body">Entonces escuchó una voz.</text:p>
      <text:p text:style-name="Text_20_body">—¡Eh!</text:p>
      <text:p text:style-name="Text_20_body">Todos levantaron la cabeza.</text:p>
      <text:p text:style-name="Text_20_body">Ghim se encontraba varios metros a la derecha del grupo.</text:p>
      <text:p text:style-name="Text_20_body">El más joven de todos había comenzado a desviarse poco a poco durante la ascensión.</text:p>
      <text:p text:style-name="Text_20_body">Al principio nadie le prestó demasiada atención.</text:p>
      <text:p text:style-name="Text_20_body">Cada escalador buscaba constantemente rutas alternativas.</text:p>
      <text:p text:style-name="Text_20_body">Era normal.</text:p>
      <text:p text:style-name="Text_20_body">Pero ahora parecía diferente.</text:p>
      <text:p text:style-name="Text_20_body">Ghim sonreía.</text:p>
      <text:p text:style-name="Text_20_body">Por primera vez en horas alguien sonreía.</text:p>
      <text:p text:style-name="Text_20_body">—¡Creo que encontré un paso!</text:p>
      <text:p text:style-name="Text_20_body">La noticia recorrió el grupo como una descarga eléctrica.</text:p>
      <text:p text:style-name="Text_20_body">Todos se volvieron hacia él.</text:p>
      <text:p text:style-name="Text_20_body">Ghim señaló una serie de grietas diagonales que ascendían por la pared.</text:p>
      <text:p text:style-name="Text_20_body">Desde la distancia parecían formar una ruta mucho más accesible.</text:p>
      <text:p text:style-name="Text_20_body">Durante unos segundos nadie dijo nada.</text:p>
      <text:p text:style-name="Text_20_body">Simplemente observaron.</text:p>
      <text:p text:style-name="Text_20_body">Y entonces ocurrió algo extraordinario.</text:p>
      <text:p text:style-name="Text_20_body">Ghim empezó a avanzar.</text:p>
      <text:p text:style-name="Text_20_body">Y avanzó rápido.</text:p>
      <text:p text:style-name="Text_20_body">Mucho más rápido que cualquiera de ellos.</text:p>
      <text:p text:style-name="Text_20_body">Sus manos encontraban apoyos.</text:p>
      <text:p text:style-name="Text_20_body">Sus pies descubrían pequeñas repisas invisibles para los demás.</text:p>
      <text:p text:style-name="Text_20_body">Subía con agilidad.</text:p>
      <text:p text:style-name="Text_20_body">Con confianza.</text:p>
      <text:p text:style-name="Text_20_body"><text:soft-page-break/>Como si de repente la montaña hubiera decidido dejarlo pasar.</text:p>
      <text:p text:style-name="Text_20_body">—¡Por aquí! —gritó.</text:p>
      <text:p text:style-name="Text_20_body">Su voz transmitía entusiasmo.</text:p>
      <text:p text:style-name="Text_20_body">Esperanza.</text:p>
      <text:p text:style-name="Text_20_body">Aquello era exactamente lo que todos necesitaban.</text:p>
      <text:p text:style-name="Text_20_body">Una salida.</text:p>
      <text:p text:style-name="Text_20_body">Una solución.</text:p>
      <text:p text:style-name="Text_20_body">La promesa de que aquella pesadilla estaba llegando a su fin.</text:p>
      <text:p text:style-name="Text_20_body">Nohk sintió una oleada de alivio.</text:p>
      <text:p text:style-name="Text_20_body">Por primera vez en toda la jornada imaginó el final del ascenso.</text:p>
      <text:p text:style-name="Text_20_body">El campamento.</text:p>
      <text:p text:style-name="Text_20_body">El fuego.</text:p>
      <text:p text:style-name="Text_20_body">La comida.</text:p>
      <text:p text:style-name="Text_20_body">El descanso.</text:p>
      <text:p text:style-name="Text_20_body">Todo volvería a estar bien.</text:p>
      <text:p text:style-name="Text_20_body">Sólo tenían que seguir a Ghim.</text:p>
      <text:p text:style-name="Text_20_body">Los demás parecían pensar lo mismo.</text:p>
      <text:p text:style-name="Text_20_body">Incluso los más pesimistas observaban ahora con atención renovada.</text:p>
      <text:p text:style-name="Text_20_body">Durante unos instantes, suspendidos a más de doscientos metros sobre el vacío, volvieron a sentirse optimistas.</text:p>
      <text:p text:style-name="Text_20_body">Volvieron a creer.</text:p>
      <text:p text:style-name="Text_20_body">Ghim continuó subiendo.</text:p>
      <text:p text:style-name="Text_20_body">Un metro.</text:p>
      <text:p text:style-name="Text_20_body">Dos.</text:p>
      <text:p text:style-name="Text_20_body">Tres.</text:p>
      <text:p text:style-name="Text_20_body">Se desplazaba cada vez más deprisa.</text:p>
      <text:p text:style-name="Text_20_body">Y entonces sucedió.</text:p>
      <text:p text:style-name="Text_20_body">Nadie comprendió exactamente qué ocurrió.</text:p>
      <text:p text:style-name="Text_20_body">Más tarde todos intentarían reconstruir aquel instante.</text:p>
      <text:p text:style-name="Text_20_body">Lo analizarían una y otra vez.</text:p>
      <text:p text:style-name="Text_20_body"><text:soft-page-break/>Durante años.</text:p>
      <text:p text:style-name="Text_20_body">Sin éxito.</text:p>
      <text:p text:style-name="Text_20_body">Algunos recordarían una piedra desprendiéndose.</text:p>
      <text:p text:style-name="Text_20_body">Otros jurarían que una de sus manos resbaló.</text:p>
      <text:p text:style-name="Text_20_body">Uno aseguraría haber escuchado el crujido de la roca.</text:p>
      <text:p text:style-name="Text_20_body">Otro afirmaría que perdió el equilibrio al girarse.</text:p>
      <text:p text:style-name="Text_20_body">Pero ninguno estaba seguro.</text:p>
      <text:p text:style-name="Text_20_body">Todo ocurrió demasiado rápido.</text:p>
      <text:p text:style-name="Text_20_body">Un instante Ghim estaba allí.</text:p>
      <text:p text:style-name="Text_20_body">Moviéndose con confianza.</text:p>
      <text:p text:style-name="Text_20_body">Sonriendo.</text:p>
      <text:p text:style-name="Text_20_body">Buscando el siguiente apoyo.</text:p>
      <text:p text:style-name="Text_20_body">Y al instante siguiente sus manos se separaron de la pared.</text:p>
      <text:p text:style-name="Text_20_body">Simplemente se separaron.</text:p>
      <text:p text:style-name="Text_20_body">Como si alguien hubiera cortado los hilos que lo sostenían.</text:p>
      <text:p text:style-name="Text_20_body">Los ojos de Ghim se abrieron.</text:p>
      <text:p text:style-name="Text_20_body">Una expresión de sorpresa absoluta apareció en su rostro.</text:p>
      <text:p text:style-name="Text_20_body">No de miedo.</text:p>
      <text:p text:style-name="Text_20_body">No al principio.</text:p>
      <text:p text:style-name="Text_20_body">Sólo sorpresa.</text:p>
      <text:p text:style-name="Text_20_body">La misma expresión que tendría cualquier hombre al descubrir que el suelo desaparece bajo sus pies.</text:p>
      <text:p text:style-name="Text_20_body">Después comenzó a caer.</text:p>
      <text:p text:style-name="Text_20_body">—¡GHIM!</text:p>
      <text:p text:style-name="Text_20_body">El grito surgió de varias gargantas al mismo tiempo.</text:p>
      <text:p text:style-name="Text_20_body">La montaña devolvió el eco.</text:p>
      <text:p text:style-name="Text_20_body">Ghim golpeó una roca.</text:p>
      <text:p text:style-name="Text_20_body">Luego otra.</text:p>
      <text:p text:style-name="Text_20_body">Y otra más.</text:p>
      <text:p text:style-name="Text_20_body">Su cuerpo rebotó contra la pared de granito mientras descendía.</text:p>
      <text:p text:style-name="Text_20_body">Cada impacto producía un sonido horrible.</text:p>
      <text:p text:style-name="Text_20_body"><text:soft-page-break/>Seco.</text:p>
      <text:p text:style-name="Text_20_body">Antinatural.</text:p>
      <text:p text:style-name="Text_20_body">Los demás observaban paralizados.</text:p>
      <text:p text:style-name="Text_20_body">Nadie podía moverse.</text:p>
      <text:p text:style-name="Text_20_body">Nadie podía apartar la vista.</text:p>
      <text:p text:style-name="Text_20_body">Nadie podía ayudar.</text:p>
      <text:p text:style-name="Text_20_body">Ghim desapareció rápidamente hacia el vacío.</text:p>
      <text:p text:style-name="Text_20_body">Su figura se volvió cada vez más pequeña.</text:p>
      <text:p text:style-name="Text_20_body">Más pequeña.</text:p>
      <text:p text:style-name="Text_20_body">Hasta que finalmente dejó de verse.</text:p>
      <text:p text:style-name="Text_20_body">Entonces llegó el silencio.</text:p>
      <text:p text:style-name="Text_20_body">Un silencio terrible.</text:p>
      <text:p text:style-name="Text_20_body">Inmenso.</text:p>
      <text:p text:style-name="Text_20_body">Sólo roto por el viento.</text:p>
      <text:p text:style-name="Text_20_body">Durante varios segundos ninguno de ellos fue capaz de pensar.</text:p>
      <text:p text:style-name="Text_20_body">Simplemente permanecieron inmóviles.</text:p>
      <text:p text:style-name="Text_20_body">Aferrados a la roca.</text:p>
      <text:p text:style-name="Text_20_body">Intentando comprender lo que acababan de presenciar.</text:p>
      <text:p text:style-name="Text_20_body">Nohk sintió que el corazón golpeaba violentamente contra su pecho.</text:p>
      <text:p text:style-name="Text_20_body">Le costaba respirar.</text:p>
      <text:p text:style-name="Text_20_body">Le temblaban las manos.</text:p>
      <text:p text:style-name="Text_20_body">Acababa de ver morir a un amigo.</text:p>
      <text:p text:style-name="Text_20_body">Y lo peor era que había ocurrido delante de él.</text:p>
      <text:p text:style-name="Text_20_body">A pocos metros.</text:p>
      <text:p text:style-name="Text_20_body">Tan cerca que aún podía recordar la sonrisa de Ghim segundos antes de caer.</text:p>
      <text:p text:style-name="Text_20_body">Su mente comenzó inmediatamente a buscar explicaciones.</text:p>
      <text:p text:style-name="Text_20_body">Quizá podría haber dicho algo.</text:p>
      <text:p text:style-name="Text_20_body">Quizá debería haberle advertido.</text:p>
      <text:p text:style-name="Text_20_body">Quizá debió pedirle que esperara.</text:p>
      <text:p text:style-name="Text_20_body">Quizá debió obligarlo a regresar.</text:p>
      <text:p text:style-name="Text_20_body"><text:soft-page-break/>Quizá...</text:p>
      <text:p text:style-name="Text_20_body">Quizá...</text:p>
      <text:p text:style-name="Text_20_body">Quizá...</text:p>
      <text:p text:style-name="Text_20_body">Pero aquellas ideas eran inútiles.</text:p>
      <text:p text:style-name="Text_20_body">Porque la verdad era mucho más simple.</text:p>
      <text:p text:style-name="Text_20_body">No había podido hacer nada.</text:p>
      <text:p text:style-name="Text_20_body">Ninguno había podido hacer nada.</text:p>
      <text:p text:style-name="Text_20_body">Y esa realidad resultaba insoportable.</text:p>
      <text:p text:style-name="Text_20_body">Algunos intentaron mirar hacia abajo.</text:p>
      <text:p text:style-name="Text_20_body">Buscarlo.</text:p>
      <text:p text:style-name="Text_20_body">Ver dónde había caído.</text:p>
      <text:p text:style-name="Text_20_body">Pero el precipicio era inmenso.</text:p>
      <text:p text:style-name="Text_20_body">La distancia demasiado grande.</text:p>
      <text:p text:style-name="Text_20_body">Y ellos seguían atrapados en mitad de la pared.</text:p>
      <text:p text:style-name="Text_20_body">Suspendidos sobre el vacío.</text:p>
      <text:p text:style-name="Text_20_body">Tan vulnerables como él había estado unos segundos antes.</text:p>
      <text:p text:style-name="Text_20_body">Fue entonces cuando comprendieron algo mucho más aterrador.</text:p>
      <text:p text:style-name="Text_20_body">Ghim no había muerto porque fuera imprudente.</text:p>
      <text:p text:style-name="Text_20_body">No había muerto porque fuera incompetente.</text:p>
      <text:p text:style-name="Text_20_body">No había muerto porque cometiera un error evidente.</text:p>
      <text:p text:style-name="Text_20_body">Había muerto porque la montaña podía matar a cualquiera.</text:p>
      <text:p text:style-name="Text_20_body">A cualquiera.</text:p>
      <text:p text:style-name="Text_20_body">El accidente había destruido una ilusión que todos conservaban en secreto.</text:p>
      <text:p text:style-name="Text_20_body">La ilusión de que aquello les estaba ocurriendo a otros.</text:p>
      <text:p text:style-name="Text_20_body">La ilusión de que el peligro era controlable.</text:p>
      <text:p text:style-name="Text_20_body">La ilusión de que los hombres inteligentes siempre encuentran una salida.</text:p>
      <text:p text:style-name="Text_20_body">Ahora sabían la verdad.</text:p>
      <text:p text:style-name="Text_20_body">Ninguno estaba a salvo.</text:p>
      <text:p text:style-name="Text_20_body">Ninguno dominaba la situación.</text:p>
      <text:p text:style-name="Text_20_body">Y ninguno tenía garantía alguna de alcanzar la cima.</text:p>
      <text:p text:style-name="Text_20_body"><text:soft-page-break/>Nohk observó a sus compañeros.</text:p>
      <text:p text:style-name="Text_20_body">Vio el miedo en sus rostros.</text:p>
      <text:p text:style-name="Text_20_body">El mismo miedo que sentía él.</text:p>
      <text:p text:style-name="Text_20_body">Un miedo profundo.</text:p>
      <text:p text:style-name="Text_20_body">Primitivo.</text:p>
      <text:p text:style-name="Text_20_body">El miedo de quien descubre que la muerte está mucho más cerca de lo que imaginaba.</text:p>
      <text:p text:style-name="Text_20_body">Durante varios minutos permanecieron inmóviles.</text:p>
      <text:p text:style-name="Text_20_body">Aferrados a la pared.</text:p>
      <text:p text:style-name="Text_20_body">Sin hablar.</text:p>
      <text:p text:style-name="Text_20_body">Sin moverse.</text:p>
      <text:p text:style-name="Text_20_body">Sin saber qué hacer.</text:p>
      <text:p text:style-name="Text_20_body">Porque bajar parecía tan peligroso como subir.</text:p>
      <text:p text:style-name="Text_20_body">Y quedarse allí significaba morir lentamente de agotamiento.</text:p>
      <text:p text:style-name="Text_20_body">La montaña había cerrado todas las salidas.</text:p>
      <text:p text:style-name="Text_20_body">Sólo quedaba una opción.</text:p>
      <text:p text:style-name="Text_20_body">Continuar.</text:p>
      <text:p text:style-name="Text_20_body">Continuar sabiendo que Ghim había caído.</text:p>
      <text:p text:style-name="Text_20_body">Continuar sabiendo que cualquiera de ellos podía ser el siguiente.</text:p>
      <text:p text:style-name="Text_20_body">Continuar sabiendo que, si la montaña decidía reclamar otra vida, los demás no podrían hacer absolutamente nada para impedirlo.</text:p>
      <text:p text:style-name="Text_20_body">Y con esa certeza clavada en el corazón, los cinco supervivientes reanudaron lentamente el ascenso.</text:p>
      <text:p text:style-name="Text_20_body"/>
      <text:p text:style-name="Text_20_body"/>
      <text:p text:style-name="Horizontal_20_Line"/>
      <text:p text:style-name="Text_20_body"/>
      <text:h text:style-name="Heading_20_2" text:outline-level="2">Parte 3 - La cueva</text:h>
      <text:p text:style-name="Text_20_body">Alcanzaron la cima poco antes del anochecer.</text:p>
      <text:p text:style-name="Text_20_body">Ninguno celebró la victoria.</text:p>
      <text:p text:style-name="Text_20_body">Ninguno levantó los brazos.</text:p>
      <text:p text:style-name="Text_20_body"><text:soft-page-break/>Ninguno sonrió.</text:p>
      <text:p text:style-name="Text_20_body">Cuando los cinco supervivientes llegaron finalmente a terreno firme, simplemente se dejaron caer sobre la roca.</text:p>
      <text:p text:style-name="Text_20_body">Agotados.</text:p>
      <text:p text:style-name="Text_20_body">Temblando.</text:p>
      <text:p text:style-name="Text_20_body">Incapaces de pensar en nada excepto en descansar.</text:p>
      <text:p text:style-name="Text_20_body">Durante varios minutos nadie habló.</text:p>
      <text:p text:style-name="Text_20_body">El viento recorría las alturas de la montaña produciendo un silbido constante entre las rocas.</text:p>
      <text:p text:style-name="Text_20_body">Muy lejos, cientos de metros más abajo, el río continuaba su camino ajeno a la tragedia.</text:p>
      <text:p text:style-name="Text_20_body">Ghim había desaparecido allí.</text:p>
      <text:p text:style-name="Text_20_body">En algún lugar del valle.</text:p>
      <text:p text:style-name="Text_20_body">Quizá entre las piedras.</text:p>
      <text:p text:style-name="Text_20_body">Quizá arrastrado por la corriente.</text:p>
      <text:p text:style-name="Text_20_body">Nunca lo sabrían.</text:p>
      <text:p text:style-name="Text_20_body">La idea pesaba sobre todos ellos.</text:p>
      <text:p text:style-name="Text_20_body">La muerte había transformado la expedición.</text:p>
      <text:p text:style-name="Text_20_body">Hasta aquel momento el tesoro había sido una aventura.</text:p>
      <text:p text:style-name="Text_20_body">Ahora era algo distinto.</text:p>
      <text:p text:style-name="Text_20_body">Algo más oscuro.</text:p>
      <text:p text:style-name="Text_20_body">Más serio.</text:p>
      <text:p text:style-name="Text_20_body">Más peligroso.</text:p>
      <text:p text:style-name="Text_20_body">Aquella noche encendieron una pequeña hoguera protegida entre unas rocas.</text:p>
      <text:p text:style-name="Text_20_body">Compartieron las últimas provisiones.</text:p>
      <text:p text:style-name="Text_20_body">Hablaron poco.</text:p>
      <text:p text:style-name="Text_20_body">Cada uno parecía encerrado en sus propios pensamientos.</text:p>
      <text:p text:style-name="Text_20_body">Algunas veces alguien mencionaba el nombre de Ghim.</text:p>
      <text:p text:style-name="Text_20_body">Recordaban alguna historia del pueblo.</text:p>
      <text:p text:style-name="Text_20_body">Alguna broma.</text:p>
      <text:p text:style-name="Text_20_body">Alguna conversación.</text:p>
      <text:p text:style-name="Text_20_body">Después volvía el silencio.</text:p>
      <text:p text:style-name="Text_20_body"><text:soft-page-break/>Nadie quería formular la pregunta que todos se hacían.</text:p>
      <text:p text:style-name="Text_20_body">¿Había valido la pena?</text:p>
      <text:p text:style-name="Text_20_body">La oscuridad terminó envolviendo la montaña.</text:p>
      <text:p text:style-name="Text_20_body">Uno a uno se quedaron dormidos.</text:p>
      <text:p text:style-name="Text_20_body">Y por primera vez desde el inicio de la expedición nadie habló del tesoro antes de cerrar los ojos.</text:p>
      <text:p text:style-name="Horizontal_20_Line"/>
      <text:p text:style-name="Text_20_body">Nohk despertó antes del amanecer.</text:p>
      <text:p text:style-name="Text_20_body">Durante unos segundos permaneció inmóvil observando el cielo.</text:p>
      <text:p text:style-name="Text_20_body">Las estrellas comenzaban a desaparecer lentamente.</text:p>
      <text:p text:style-name="Text_20_body">A su alrededor los demás seguían dormidos.</text:p>
      <text:p text:style-name="Text_20_body">El fuego se había reducido a un pequeño montón de cenizas rojizas.</text:p>
      <text:p text:style-name="Text_20_body">El aire era frío.</text:p>
      <text:p text:style-name="Text_20_body">Silencioso.</text:p>
      <text:p text:style-name="Text_20_body">Nohk se incorporó lentamente.</text:p>
      <text:p text:style-name="Text_20_body">Sacó el libro y el mapa.</text:p>
      <text:p text:style-name="Text_20_body">Los extendió sobre una roca plana.</text:p>
      <text:p text:style-name="Text_20_body">Los estudió una vez más.</text:p>
      <text:p text:style-name="Text_20_body">Con calma.</text:p>
      <text:p text:style-name="Text_20_body">Intentando apartar de su mente el recuerdo de la caída.</text:p>
      <text:p text:style-name="Text_20_body">La ruta parecía clara.</text:p>
      <text:p text:style-name="Text_20_body">Según el manuscrito se encontraban muy cerca.</text:p>
      <text:p text:style-name="Text_20_body">Sorprendentemente cerca.</text:p>
      <text:p text:style-name="Text_20_body">El punto señalado por el mapa estaba apenas unas millas más al oeste.</text:p>
      <text:p text:style-name="Text_20_body">Quizá menos de medio día de marcha.</text:p>
      <text:p text:style-name="Text_20_body">Cuando los demás despertaron, Nohk ya tenía una decisión tomada.</text:p>
      <text:p text:style-name="Text_20_body">Continuarían.</text:p>
      <text:p text:style-name="Text_20_body">Nadie se opuso.</text:p>
      <text:p text:style-name="Text_20_body">Tal vez porque todos pensaban lo mismo.</text:p>
      <text:p text:style-name="Text_20_body">Tal vez porque nadie quería admitir que habían llegado demasiado lejos para regresar con las manos vacías.</text:p>
      <text:p text:style-name="Text_20_body"><text:soft-page-break/>Prepararon el campamento.</text:p>
      <text:p text:style-name="Text_20_body">Y reanudaron la marcha.</text:p>
      <text:p text:style-name="Text_20_body">El sendero desapareció pronto.</text:p>
      <text:p text:style-name="Text_20_body">Las indicaciones del mapa los alejaban de las rutas conocidas.</text:p>
      <text:p text:style-name="Text_20_body">Se internaron en una región salvaje de la montaña donde parecía que nadie había puesto un pie en generaciones.</text:p>
      <text:p text:style-name="Text_20_body">Los árboles crecían densos y retorcidos.</text:p>
      <text:p text:style-name="Text_20_body">Las ramas bloqueaban la luz del sol.</text:p>
      <text:p text:style-name="Text_20_body">Grandes rocas cubiertas de musgo emergían entre la vegetación.</text:p>
      <text:p text:style-name="Text_20_body">Varias veces tuvieron que abrirse paso utilizando cuchillos y hachas.</text:p>
      <text:p text:style-name="Text_20_body">El terreno se volvió incómodo.</text:p>
      <text:p text:style-name="Text_20_body">Irregular.</text:p>
      <text:p text:style-name="Text_20_body">Lento.</text:p>
      <text:p text:style-name="Text_20_body">Sin embargo, aquello también resultaba prometedor.</text:p>
      <text:p text:style-name="Text_20_body">Un tesoro oculto durante siglos no podía encontrarse junto a un camino transitado.</text:p>
      <text:p text:style-name="Text_20_body">Debía estar escondido.</text:p>
      <text:p text:style-name="Text_20_body">Protegido.</text:p>
      <text:p text:style-name="Text_20_body">Olvidado.</text:p>
      <text:p text:style-name="Text_20_body">Y aquel lugar parecía cumplir perfectamente esas condiciones.</text:p>
      <text:p text:style-name="Text_20_body">Las horas fueron pasando.</text:p>
      <text:p text:style-name="Text_20_body">El bosque se volvió cada vez más espeso.</text:p>
      <text:p text:style-name="Text_20_body">La montaña más abrupta.</text:p>
      <text:p text:style-name="Text_20_body">Hasta que finalmente llegaron al punto exacto que indicaba el mapa.</text:p>
      <text:p text:style-name="Text_20_body">Se detuvieron.</text:p>
      <text:p text:style-name="Text_20_body">Miraron alrededor.</text:p>
      <text:p text:style-name="Text_20_body">Y sintieron una punzada de decepción.</text:p>
      <text:p text:style-name="Text_20_body">No había nada.</text:p>
      <text:p text:style-name="Text_20_body">Sólo árboles.</text:p>
      <text:p text:style-name="Text_20_body">Rocas.</text:p>
      <text:p text:style-name="Text_20_body">Montaña.</text:p>
      <text:p text:style-name="Text_20_body"><text:soft-page-break/>Bosque.</text:p>
      <text:p text:style-name="Text_20_body">El mismo paisaje que habían contemplado durante toda la jornada.</text:p>
      <text:p text:style-name="Text_20_body">Durante unos minutos exploraron la zona en silencio.</text:p>
      <text:p text:style-name="Text_20_body">Buscando cualquier detalle extraño.</text:p>
      <text:p text:style-name="Text_20_body">Cualquier indicio.</text:p>
      <text:p text:style-name="Text_20_body">Cualquier señal.</text:p>
      <text:p text:style-name="Text_20_body">Nada.</text:p>
      <text:p text:style-name="Text_20_body">Las dudas comenzaron a regresar.</text:p>
      <text:p text:style-name="Text_20_body">Quizá el mapa era incorrecto.</text:p>
      <text:p text:style-name="Text_20_body">Quizá habían interpretado mal las indicaciones.</text:p>
      <text:p text:style-name="Text_20_body">Quizá...</text:p>
      <text:p text:style-name="Text_20_body">—¡Aquí!</text:p>
      <text:p text:style-name="Text_20_body">El grito resonó entre los árboles.</text:p>
      <text:p text:style-name="Text_20_body">Todos se volvieron inmediatamente.</text:p>
      <text:p text:style-name="Text_20_body">Uno de los hombres señalaba una pared rocosa parcialmente oculta por la vegetación.</text:p>
      <text:p text:style-name="Text_20_body">Corrieron hacia él.</text:p>
      <text:p text:style-name="Text_20_body">Y entonces la vieron.</text:p>
      <text:p text:style-name="Text_20_body">Una grieta.</text:p>
      <text:p text:style-name="Text_20_body">Estrecha.</text:p>
      <text:p text:style-name="Text_20_body">Oscura.</text:p>
      <text:p text:style-name="Text_20_body">Casi invisible.</text:p>
      <text:p text:style-name="Text_20_body">La entrada estaba escondida detrás de un conjunto de arbustos y raíces.</text:p>
      <text:p text:style-name="Text_20_body">Desde apenas unos metros de distancia resultaba imposible distinguirla.</text:p>
      <text:p text:style-name="Text_20_body">Nohk apartó unas ramas.</text:p>
      <text:p text:style-name="Text_20_body">La abertura continuaba hacia el interior de la montaña.</text:p>
      <text:p text:style-name="Text_20_body">No era una simple grieta.</text:p>
      <text:p text:style-name="Text_20_body">Era un pasaje.</text:p>
      <text:p text:style-name="Text_20_body">Encendieron una lámpara.</text:p>
      <text:p text:style-name="Text_20_body">Y avanzaron.</text:p>
      <text:p text:style-name="Text_20_body">La entrada era angosta, obligándolos a caminar de lado durante varios metros.</text:p>
      <text:p text:style-name="Text_20_body"><text:soft-page-break/>Pero poco a poco el corredor comenzó a ensancharse.</text:p>
      <text:p text:style-name="Text_20_body">Las paredes se alejaron.</text:p>
      <text:p text:style-name="Text_20_body">El techo se elevó.</text:p>
      <text:p text:style-name="Text_20_body">Y finalmente desembocaron en una enorme cámara natural.</text:p>
      <text:p text:style-name="Text_20_body">Todos se quedaron inmóviles.</text:p>
      <text:p text:style-name="Text_20_body">La luz de las lámparas apenas alcanzaba a revelar la amplitud de la cueva.</text:p>
      <text:p text:style-name="Text_20_body">La oscuridad continuaba mucho más allá.</text:p>
      <text:p text:style-name="Text_20_body">Silenciosa.</text:p>
      <text:p text:style-name="Text_20_body">Profunda.</text:p>
      <text:p text:style-name="Text_20_body">Misteriosa.</text:p>
      <text:p text:style-name="Text_20_body">Nadie habló durante varios segundos.</text:p>
      <text:p text:style-name="Text_20_body">No hacía falta.</text:p>
      <text:p text:style-name="Text_20_body">Todos estaban pensando exactamente lo mismo.</text:p>
      <text:p text:style-name="Text_20_body">Aquello no podía ser una coincidencia.</text:p>
      <text:p text:style-name="Text_20_body">El mapa los había llevado hasta allí.</text:p>
      <text:p text:style-name="Text_20_body">Hasta una cueva oculta que nadie habría encontrado por casualidad.</text:p>
      <text:p text:style-name="Text_20_body">Una cueva escondida en el corazón de la montaña.</text:p>
      <text:p text:style-name="Text_20_body">Una cueva invisible para cualquiera que no conociera su existencia.</text:p>
      <text:p text:style-name="Text_20_body">Nohk sintió algo que no había sentido desde la muerte de Ghim.</text:p>
      <text:p text:style-name="Text_20_body">Esperanza.</text:p>
      <text:p text:style-name="Text_20_body">Una esperanza intensa.</text:p>
      <text:p text:style-name="Text_20_body">Casi dolorosa.</text:p>
      <text:p text:style-name="Text_20_body">Quizá no habían estado equivocados.</text:p>
      <text:p text:style-name="Text_20_body">Quizá el mapa era auténtico.</text:p>
      <text:p text:style-name="Text_20_body">Quizá la leyenda era cierta.</text:p>
      <text:p text:style-name="Text_20_body">Quizá el tesoro del rey los había estado esperando allí durante tres siglos.</text:p>
      <text:p text:style-name="Text_20_body">Poco a poco los demás comenzaron a sonreír.</text:p>
      <text:p text:style-name="Text_20_body">El cansancio parecía desaparecer.</text:p>
      <text:p text:style-name="Text_20_body">Las heridas parecían menos importantes.</text:p>
      <text:p text:style-name="Text_20_body">Incluso el miedo retrocedió por un momento.</text:p>
      <text:p text:style-name="Text_20_body"><text:soft-page-break/>Habían encontrado el lugar.</text:p>
      <text:p text:style-name="Text_20_body">Todos lo sentían.</text:p>
      <text:p text:style-name="Text_20_body">Todos lo sabían.</text:p>
      <text:p text:style-name="Text_20_body">La búsqueda parecía haber terminado.</text:p>
      <text:p text:style-name="Text_20_body">Y mientras las lámparas iluminaban la inmensa oscuridad de la cueva, los cinco hombres avanzaron lentamente hacia el interior convencidos de que, al fin, estaban a punto de contemplar el tesoro del rey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5T15:34:27.961000000</meta:creation-date>
    <dc:date>2026-06-25T18:30:12.545000000</dc:date>
    <meta:editing-duration>PT44M45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18" meta:paragraph-count="495" meta:word-count="2858" meta:character-count="18100" meta:non-whitespace-character-count="15737"/>
  </office:meta>
</office:document-meta>
</file>