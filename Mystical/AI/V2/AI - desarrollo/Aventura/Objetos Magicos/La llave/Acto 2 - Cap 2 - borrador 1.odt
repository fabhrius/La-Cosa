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3503"/>
    </style:style>
    <style:style style:name="P2" style:family="paragraph" style:parent-style-name="Standard">
      <style:text-properties officeooo:paragraph-rsid="0020edb9"/>
    </style:style>
    <style:style style:name="P3" style:family="paragraph" style:parent-style-name="Standard">
      <style:text-properties officeooo:paragraph-rsid="0023b558"/>
    </style:style>
    <style:style style:name="P4" style:family="paragraph" style:parent-style-name="Text_20_body">
      <style:text-properties officeooo:paragraph-rsid="001d5d84"/>
    </style:style>
    <style:style style:name="P5" style:family="paragraph" style:parent-style-name="Text_20_body">
      <style:text-properties officeooo:rsid="001d5d84" officeooo:paragraph-rsid="001d5d84"/>
    </style:style>
    <style:style style:name="P6" style:family="paragraph" style:parent-style-name="Text_20_body">
      <style:text-properties officeooo:rsid="001f3503" officeooo:paragraph-rsid="001f3503"/>
    </style:style>
    <style:style style:name="P7" style:family="paragraph" style:parent-style-name="Text_20_body">
      <style:text-properties officeooo:paragraph-rsid="001f3503"/>
    </style:style>
    <style:style style:name="P8" style:family="paragraph" style:parent-style-name="Text_20_body">
      <style:text-properties fo:color="#c9211e" loext:opacity="100%" officeooo:paragraph-rsid="001f3503"/>
    </style:style>
    <style:style style:name="P9" style:family="paragraph" style:parent-style-name="Text_20_body">
      <style:text-properties officeooo:paragraph-rsid="0020edb9"/>
    </style:style>
    <style:style style:name="P10" style:family="paragraph" style:parent-style-name="Text_20_body">
      <style:text-properties officeooo:rsid="0020edb9" officeooo:paragraph-rsid="0020edb9"/>
    </style:style>
    <style:style style:name="P11" style:family="paragraph" style:parent-style-name="Text_20_body">
      <style:text-properties officeooo:paragraph-rsid="0022aab3"/>
    </style:style>
    <style:style style:name="P12" style:family="paragraph" style:parent-style-name="Text_20_body">
      <style:text-properties officeooo:paragraph-rsid="0023b558"/>
    </style:style>
    <style:style style:name="T1" style:family="text">
      <style:text-properties officeooo:rsid="001d5d84"/>
    </style:style>
    <style:style style:name="T2" style:family="text">
      <style:text-properties officeooo:rsid="001f3503"/>
    </style:style>
    <style:style style:name="T3" style:family="text">
      <style:text-properties officeooo:rsid="001f357e"/>
    </style:style>
    <style:style style:name="T4" style:family="text">
      <style:text-properties officeooo:rsid="002010f6"/>
    </style:style>
    <style:style style:name="T5" style:family="text">
      <style:text-properties officeooo:rsid="0020edb9"/>
    </style:style>
    <style:style style:name="T6" style:family="text">
      <style:text-properties officeooo:rsid="0022aab3"/>
    </style:style>
    <style:style style:name="T7" style:family="text">
      <style:text-properties officeooo:rsid="0023b5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Parte 1 - El ascenso imposible</text:h>
      <text:p text:style-name="Text_20_body"/>
      <text:p text:style-name="Text_20_body">El descenso por la pared occidental resultó más sencillo de lo esperado.</text:p>
      <text:p text:style-name="Text_20_body">La roca estaba surcada por numerosas grietas y repisas naturales que ofrecían puntos de apoyo relativamente seguros.</text:p>
      <text:p text:style-name="Text_20_body">Uno a uno, los seis hombres fueron descendiendo hasta alcanzar el fondo del valle.</text:p>
      <text:p text:style-name="Text_20_body">Desde allí cruzaron el río ayudándose con las cuerdas que habían conseguido salvar de la tormenta.</text:p>
      <text:p text:style-name="Text_20_body">El agua era rápida y helada, pero la corriente no representó un problema serio.</text:p>
      <text:p text:style-name="Text_20_body">Al caer la tarde todos se encontraban ya al otro lado.</text:p>
      <text:p text:style-name="Text_20_body">Y fue entonces cuando comprendieron la magnitud del desafío que les esperaba.</text:p>
      <text:p text:style-name="Text_20_body">La pared oriental se alzaba frente a ellos como una muralla construida por gigantes.</text:p>
      <text:p text:style-name="Text_20_body">Era más lisa.<text:span text:style-name="T1"> </text:span>Más intimidante.</text:p>
      <text:p text:style-name="Text_20_body">Trescientos metros de granito gris ascendían casi verticalmente hacia el cielo.</text:p>
      <text:p text:style-name="Text_20_body">Durante varios minutos permanecieron observándola en silencio.</text:p>
      <text:p text:style-name="Text_20_body">El acantilado parecía imposible.</text:p>
      <text:p text:style-name="Text_20_body">No había senderos.<text:span text:style-name="T1"> </text:span>No existía ninguna ruta evidente.</text:p>
      <text:p text:style-name="Text_20_body">Sólo roca desnuda elevándose sobre sus cabezas.</text:p>
      <text:p text:style-name="Text_20_body">—Tiene que haber algún paso —dijo uno de ellos finalmente.</text:p>
      <text:p text:style-name="Text_20_body">Decidieron acampar junto al río.<text:span text:style-name="T1"> </text:span>Necesitaban descansar.<text:span text:style-name="T1"> </text:span>Y también estudiar la montaña.</text:p>
      <text:p text:style-name="Text_20_body">Pasaron el resto de la tarde examinando la pared desde distintos ángulos.<text:span text:style-name="T1"> </text:span>Buscando grietas.</text:p>
      <text:p text:style-name="Text_20_body">Cornisas.<text:span text:style-name="T1"> </text:span>Posibles rutas.</text:p>
      <text:p text:style-name="Text_20_body">El río les proporcionó agua.<text:span text:style-name="T1"> </text:span>La pesca les permitió conseguir algo de comida.</text:p>
      <text:p text:style-name="Text_20_body">Y un conjunto de árboles inclinados junto a unas rocas salientes les ofreció refugio suficiente para pasar la noche.</text:p>
      <text:p text:style-name="Text_20_body">Sin embargo, ninguno durmió especialmente bien.</text:p>
      <text:p text:style-name="Text_20_body">La montaña permanecía allí.</text:p>
      <text:p text:style-name="Text_20_body">Oscura.</text:p>
      <text:p text:style-name="Text_20_body">Inmóvil.</text:p>
      <text:p text:style-name="Text_20_body">Observándolos.</text:p>
      <text:p text:style-name="Text_20_body"><text:soft-page-break/>Como una amenaza silenciosa.</text:p>
      <text:p text:style-name="Text_20_body">Al amanecer el tiempo era excelente.<text:span text:style-name="T1"> </text:span>El cielo estaba despejado.<text:span text:style-name="T1"> </text:span>El aire fresco.</text:p>
      <text:p text:style-name="Text_20_body">Prepararon las cuerdas.<text:span text:style-name="T1"> </text:span>Repartieron el equipo.<text:span text:style-name="T1"> </text:span>Y comenzaron a subir.</text:p>
      <text:p text:style-name="Text_20_body">Los primeros metros resultaron relativamente sencillos.<text:span text:style-name="T1"> </text:span>La roca ofrecía numerosos apoyos.</text:p>
      <text:p text:style-name="P4">Las grietas permitían avanzar con cierta comodidad.<text:span text:style-name="T1"> </text:span></text:p>
      <text:p text:style-name="P4">Tal vez el desafío no fuera tan terrible después de todo.</text:p>
      <text:p text:style-name="Text_20_body">Pero la montaña sólo estaba permitiéndoles entrar.</text:p>
      <text:p text:style-name="Text_20_body">Una hora más tarde el panorama cambió.</text:p>
      <text:p text:style-name="Text_20_body">El suelo había desaparecido muy por debajo de ellos.<text:span text:style-name="T1"> </text:span>El río se había convertido en una cinta plateada.</text:p>
      <text:p text:style-name="Text_20_body">Los árboles parecían arbustos diminutos.<text:span text:style-name="T1"> </text:span>Y los apoyos empezaban a escasear.</text:p>
      <text:p text:style-name="Text_20_body">Cada paso debía estudiarse cuidadosamente.</text:p>
      <text:p text:style-name="Text_20_body">Los hombres avanzaban despacio.<text:span text:style-name="T1"> </text:span>Uno detrás de otro.<text:span text:style-name="T1"> </text:span>Separados apenas por unos metros.</text:p>
      <text:p text:style-name="Text_20_body"><text:span text:style-name="T1">Y e</text:span>l esfuerzo comenzó a hacerse notar.</text:p>
      <text:p text:style-name="P4">La montaña parecía cambiar a medida que ascendían.</text:p>
      <text:p text:style-name="P5">Ya no ofrecía tantas oportunidades como en la base.</text:p>
      <text:p text:style-name="P7"><text:span text:style-name="T2">Y comenzaron uno a uno a quedar bloqueados en el ascenso. </text:span>Atrapado<text:span text:style-name="T2">s</text:span>.</text:p>
      <text:p text:style-name="P6">En mitad de la pared.</text:p>
      <text:p text:style-name="P7">Sin encontrar un camino evidente para continuar.</text:p>
      <text:p text:style-name="P7">Ni hacia arriba.<text:span text:style-name="T2"> Ni hacia abajo.</text:span></text:p>
      <text:p text:style-name="P1"><text:span text:style-name="T2">Comprendieron entonces </text:span>que la montaña podía vencerlos.</text:p>
      <text:p text:style-name="P6">Y de pronto, se encontraron luchando por sus vidas.</text:p>
      <text:p text:style-name="P7">Aferrados a la roca.</text:p>
      <text:p text:style-name="P7">Suspendidos sobre el vacío.</text:p>
      <text:p text:style-name="P6"><text:span text:style-name="T3">Paralizados por el vertigo</text:span>.</text:p>
      <text:p text:style-name="P6"/>
      <text:p text:style-name="P8"/>
      <text:p text:style-name="Standard"/>
      <text:p text:style-name="Horizontal_20_Line"/>
      <text:p text:style-name="Text_20_body"/>
      <text:h text:style-name="Heading_20_2" text:outline-level="2"><text:soft-page-break/>Parte 2 - El accidente</text:h>
      <text:p text:style-name="Text_20_body"/>
      <text:p text:style-name="Text_20_body">El viento <text:span text:style-name="T5">comenzo a </text:span>sopla<text:span text:style-name="T5">r</text:span> con mayor fuerza.<text:span text:style-name="T4"> Y</text:span> la cima seguía pareciendo lejana.</text:p>
      <text:p text:style-name="P9">El más joven de todos<text:span text:style-name="T5">, Ghim, </text:span><text:s/><text:span text:style-name="T5">comenzo</text:span> a desviarse<text:span text:style-name="T5"> por </text:span>una serie de grietas diagonales que ascendían por la pared forma<text:span text:style-name="T5">ndo</text:span> una ruta mucho más accesible.</text:p>
      <text:p text:style-name="P10">Comenzo a avanzar rapidamente.</text:p>
      <text:p text:style-name="P10">—¡Por aquí! —gritó.</text:p>
      <text:p text:style-name="P9">Aquello era exactamente lo que todos necesitaban.<text:span text:style-name="T5"> Una salida.</text:span></text:p>
      <text:p text:style-name="P2"><text:span text:style-name="T5">S</text:span>uspendidos a más de doscientos metros sobre el vacío, Ghim continuó subiendo.</text:p>
      <text:p text:style-name="P9"/>
      <text:p text:style-name="P9">Y entonces sucedió.</text:p>
      <text:p text:style-name="P9">Nadie comprendió exactamente qué ocurrió.</text:p>
      <text:p text:style-name="P9">Todo ocurrió demasiado rápido.</text:p>
      <text:p text:style-name="P2"><text:span text:style-name="T5">S</text:span>us manos se separaron de la pared.</text:p>
      <text:p text:style-name="P9">Simplemente se separaron.</text:p>
      <text:p text:style-name="P10">Y cayo.</text:p>
      <text:p text:style-name="P10"/>
      <text:p text:style-name="P11">Su cuerpo rebotó contra la pared de granito mientras descendía.</text:p>
      <text:p text:style-name="P11"><text:span text:style-name="T6">El</text:span> impacto produ<text:span text:style-name="T6">jo</text:span> un sonido horrible.</text:p>
      <text:p text:style-name="P11">Seco.</text:p>
      <text:p text:style-name="P9"/>
      <text:p text:style-name="P11">Los demás observa<text:span text:style-name="T6">ron</text:span> paralizados.</text:p>
      <text:p text:style-name="P11">Nadie podía moverse.</text:p>
      <text:p text:style-name="P12">Durante varios segundos ninguno de ellos fue capaz de pensar.</text:p>
      <text:p text:style-name="P12">Simplemente permanecieron inmóviles.</text:p>
      <text:p text:style-name="P12">Aferrados a la roca.</text:p>
      <text:p text:style-name="P12">Intentando comprender.</text:p>
      <text:p text:style-name="P12">Ninguno había podido hacer nada.</text:p>
      <text:p text:style-name="P3"/>
      <text:p text:style-name="P12">Fue entonces cuando comprendieron algo aterrador.<text:span text:style-name="T7"> <text:s/></text:span></text:p>
      <text:p text:style-name="P12"><text:span text:style-name="T7">La muerte estaba mucho más cerca de lo que imaginaban</text:span></text:p>
      <text:p text:style-name="P12"><text:soft-page-break/>Ahora sabían la verdad.</text:p>
      <text:p text:style-name="P3"><text:span text:style-name="T7">A</text:span>trapados en mitad de la pared.<text:span text:style-name="T7"> </text:span>Suspendidos sobre el vacío.</text:p>
      <text:p text:style-name="P12">Ninguno estaba a salvo.<text:span text:style-name="T7"> </text:span>Ninguno dominaba la situación.</text:p>
      <text:p text:style-name="P12"><text:span text:style-name="T7">N</text:span>inguno tenía garantía alguna de alcanzar la cima.</text:p>
      <text:p text:style-name="P12"/>
      <text:p text:style-name="P12"/>
      <text:p text:style-name="P12"/>
      <text:p text:style-name="P12"/>
      <text:p text:style-name="P12"/>
      <text:p text:style-name="P11"/>
      <text:p text:style-name="P11"/>
      <text:p text:style-name="P9"/>
      <text:p text:style-name="P9"/>
      <text:p text:style-name="Text_20_body">Al principio nadie le prestó demasiada atención.</text:p>
      <text:p text:style-name="Text_20_body">Cada escalador buscaba constantemente rutas alternativas.</text:p>
      <text:p text:style-name="Text_20_body">Era normal.</text:p>
      <text:p text:style-name="Text_20_body">Pero ahora parecía diferente.</text:p>
      <text:p text:style-name="Text_20_body">Ghim sonreía.</text:p>
      <text:p text:style-name="Text_20_body">Por primera vez en horas alguien sonreía.</text:p>
      <text:p text:style-name="Text_20_body">—¡Creo que encontré un paso!</text:p>
      <text:p text:style-name="Text_20_body">La noticia recorrió el grupo como una descarga eléctrica.</text:p>
      <text:p text:style-name="Text_20_body">Todos se volvieron hacia él.</text:p>
      <text:p text:style-name="Text_20_body">Ghim señaló una serie de grietas diagonales que ascendían por la pared.</text:p>
      <text:p text:style-name="Text_20_body">Desde la distancia parecían formar una ruta mucho más accesible.</text:p>
      <text:p text:style-name="Text_20_body">Durante unos segundos nadie dijo nada.</text:p>
      <text:p text:style-name="Text_20_body">Simplemente observaron.</text:p>
      <text:p text:style-name="Text_20_body">Y entonces ocurrió algo extraordinario.</text:p>
      <text:p text:style-name="Text_20_body">Ghim empezó a avanzar.</text:p>
      <text:p text:style-name="Text_20_body">Y avanzó rápido.</text:p>
      <text:p text:style-name="Text_20_body">Mucho más rápido que cualquiera de ellos.</text:p>
      <text:p text:style-name="Text_20_body"><text:soft-page-break/>Sus manos encontraban apoyos.</text:p>
      <text:p text:style-name="Text_20_body">Sus pies descubrían pequeñas repisas invisibles para los demás.</text:p>
      <text:p text:style-name="Text_20_body">Subía con agilidad.</text:p>
      <text:p text:style-name="Text_20_body">Con confianza.</text:p>
      <text:p text:style-name="Text_20_body">Como si de repente la montaña hubiera decidido dejarlo pasar.</text:p>
      <text:p text:style-name="Text_20_body">—¡Por aquí! —gritó.</text:p>
      <text:p text:style-name="Text_20_body">Su voz transmitía entusiasmo.</text:p>
      <text:p text:style-name="Text_20_body">Esperanza.</text:p>
      <text:p text:style-name="Text_20_body">Aquello era exactamente lo que todos necesitaban.</text:p>
      <text:p text:style-name="Text_20_body">Una salida.</text:p>
      <text:p text:style-name="Text_20_body">Una solución.</text:p>
      <text:p text:style-name="Text_20_body">La promesa de que aquella pesadilla estaba llegando a su fin.</text:p>
      <text:p text:style-name="Text_20_body">Nohk sintió una oleada de alivio.</text:p>
      <text:p text:style-name="Text_20_body">Por primera vez en toda la jornada imaginó el final del ascenso.</text:p>
      <text:p text:style-name="Text_20_body">El campamento.</text:p>
      <text:p text:style-name="Text_20_body">El fuego.</text:p>
      <text:p text:style-name="Text_20_body">La comida.</text:p>
      <text:p text:style-name="Text_20_body">El descanso.</text:p>
      <text:p text:style-name="Text_20_body">Todo volvería a estar bien.</text:p>
      <text:p text:style-name="Text_20_body">Sólo tenían que seguir a Ghim.</text:p>
      <text:p text:style-name="Text_20_body">Los demás parecían pensar lo mismo.</text:p>
      <text:p text:style-name="Text_20_body">Incluso los más pesimistas observaban ahora con atención renovada.</text:p>
      <text:p text:style-name="Text_20_body">Durante unos instantes, suspendidos a más de doscientos metros sobre el vacío, volvieron a sentirse optimistas.</text:p>
      <text:p text:style-name="Text_20_body">Volvieron a creer.</text:p>
      <text:p text:style-name="Text_20_body">Ghim continuó subiendo.</text:p>
      <text:p text:style-name="Text_20_body">Un metro.</text:p>
      <text:p text:style-name="Text_20_body">Dos.</text:p>
      <text:p text:style-name="Text_20_body">Tres.</text:p>
      <text:p text:style-name="Text_20_body">Se desplazaba cada vez más deprisa.</text:p>
      <text:p text:style-name="Text_20_body"><text:soft-page-break/>Y entonces sucedió.</text:p>
      <text:p text:style-name="Text_20_body">Nadie comprendió exactamente qué ocurrió.</text:p>
      <text:p text:style-name="Text_20_body">Más tarde todos intentarían reconstruir aquel instante.</text:p>
      <text:p text:style-name="Text_20_body">Lo analizarían una y otra vez.</text:p>
      <text:p text:style-name="Text_20_body">Durante años.</text:p>
      <text:p text:style-name="Text_20_body">Sin éxito.</text:p>
      <text:p text:style-name="Text_20_body">Algunos recordarían una piedra desprendiéndose.</text:p>
      <text:p text:style-name="Text_20_body">Otros jurarían que una de sus manos resbaló.</text:p>
      <text:p text:style-name="Text_20_body">Uno aseguraría haber escuchado el crujido de la roca.</text:p>
      <text:p text:style-name="Text_20_body">Otro afirmaría que perdió el equilibrio al girarse.</text:p>
      <text:p text:style-name="Text_20_body">Pero ninguno estaba seguro.</text:p>
      <text:p text:style-name="Text_20_body">Todo ocurrió demasiado rápido.</text:p>
      <text:p text:style-name="Text_20_body">Un instante Ghim estaba allí.</text:p>
      <text:p text:style-name="Text_20_body">Moviéndose con confianza.</text:p>
      <text:p text:style-name="Text_20_body">Sonriendo.</text:p>
      <text:p text:style-name="Text_20_body">Buscando el siguiente apoyo.</text:p>
      <text:p text:style-name="Text_20_body">Y al instante siguiente sus manos se separaron de la pared.</text:p>
      <text:p text:style-name="Text_20_body">Simplemente se separaron.</text:p>
      <text:p text:style-name="Text_20_body">Como si alguien hubiera cortado los hilos que lo sostenían.</text:p>
      <text:p text:style-name="Text_20_body">Los ojos de Ghim se abrieron.</text:p>
      <text:p text:style-name="Text_20_body">Una expresión de sorpresa absoluta apareció en su rostro.</text:p>
      <text:p text:style-name="Text_20_body">No de miedo.</text:p>
      <text:p text:style-name="Text_20_body">No al principio.</text:p>
      <text:p text:style-name="Text_20_body">Sólo sorpresa.</text:p>
      <text:p text:style-name="Text_20_body">La misma expresión que tendría cualquier hombre al descubrir que el suelo desaparece bajo sus pies.</text:p>
      <text:p text:style-name="Text_20_body">Después comenzó a caer.</text:p>
      <text:p text:style-name="Text_20_body">—¡GHIM!</text:p>
      <text:p text:style-name="Text_20_body">El grito surgió de varias gargantas al mismo tiempo.</text:p>
      <text:p text:style-name="Text_20_body">La montaña devolvió el eco.</text:p>
      <text:p text:style-name="Text_20_body">Ghim golpeó una roca.</text:p>
      <text:p text:style-name="Text_20_body"><text:soft-page-break/>Luego otra.</text:p>
      <text:p text:style-name="Text_20_body">Y otra más.</text:p>
      <text:p text:style-name="Text_20_body">Su cuerpo rebotó contra la pared de granito mientras descendía.</text:p>
      <text:p text:style-name="Text_20_body">Cada impacto producía un sonido horrible.</text:p>
      <text:p text:style-name="Text_20_body">Seco.</text:p>
      <text:p text:style-name="Text_20_body">Antinatural.</text:p>
      <text:p text:style-name="Text_20_body">Los demás observaban paralizados.</text:p>
      <text:p text:style-name="Text_20_body">Nadie podía moverse.</text:p>
      <text:p text:style-name="Text_20_body">Nadie podía apartar la vista.</text:p>
      <text:p text:style-name="Text_20_body">Nadie podía ayudar.</text:p>
      <text:p text:style-name="Text_20_body">Ghim desapareció rápidamente hacia el vacío.</text:p>
      <text:p text:style-name="Text_20_body">Su figura se volvió cada vez más pequeña.</text:p>
      <text:p text:style-name="Text_20_body">Más pequeña.</text:p>
      <text:p text:style-name="Text_20_body">Hasta que finalmente dejó de verse.</text:p>
      <text:p text:style-name="Text_20_body">Entonces llegó el silencio.</text:p>
      <text:p text:style-name="Text_20_body">Un silencio terrible.</text:p>
      <text:p text:style-name="Text_20_body">Inmenso.</text:p>
      <text:p text:style-name="Text_20_body">Sólo roto por el viento.</text:p>
      <text:p text:style-name="Text_20_body">Durante varios segundos ninguno de ellos fue capaz de pensar.</text:p>
      <text:p text:style-name="Text_20_body">Simplemente permanecieron inmóviles.</text:p>
      <text:p text:style-name="Text_20_body">Aferrados a la roca.</text:p>
      <text:p text:style-name="Text_20_body">Intentando comprender lo que acababan de presenciar.</text:p>
      <text:p text:style-name="Text_20_body">Nohk sintió que el corazón golpeaba violentamente contra su pecho.</text:p>
      <text:p text:style-name="Text_20_body">Le costaba respirar.</text:p>
      <text:p text:style-name="Text_20_body">Le temblaban las manos.</text:p>
      <text:p text:style-name="Text_20_body">Acababa de ver morir a un amigo.</text:p>
      <text:p text:style-name="Text_20_body">Y lo peor era que había ocurrido delante de él.</text:p>
      <text:p text:style-name="Text_20_body">A pocos metros.</text:p>
      <text:p text:style-name="Text_20_body">Tan cerca que aún podía recordar la sonrisa de Ghim segundos antes de caer.</text:p>
      <text:p text:style-name="Text_20_body">Su mente comenzó inmediatamente a buscar explicaciones.</text:p>
      <text:p text:style-name="Text_20_body"><text:soft-page-break/>Quizá podría haber dicho algo.</text:p>
      <text:p text:style-name="Text_20_body">Quizá debería haberle advertido.</text:p>
      <text:p text:style-name="Text_20_body">Quizá debió pedirle que esperara.</text:p>
      <text:p text:style-name="Text_20_body">Quizá debió obligarlo a regresar.</text:p>
      <text:p text:style-name="Text_20_body">Quizá...</text:p>
      <text:p text:style-name="Text_20_body">Quizá...</text:p>
      <text:p text:style-name="Text_20_body">Quizá...</text:p>
      <text:p text:style-name="Text_20_body">Pero aquellas ideas eran inútiles.</text:p>
      <text:p text:style-name="Text_20_body">Porque la verdad era mucho más simple.</text:p>
      <text:p text:style-name="Text_20_body">No había podido hacer nada.</text:p>
      <text:p text:style-name="Text_20_body">Ninguno había podido hacer nada.</text:p>
      <text:p text:style-name="Text_20_body">Y esa realidad resultaba insoportable.</text:p>
      <text:p text:style-name="Text_20_body">Algunos intentaron mirar hacia abajo.</text:p>
      <text:p text:style-name="Text_20_body">Buscarlo.</text:p>
      <text:p text:style-name="Text_20_body">Ver dónde había caído.</text:p>
      <text:p text:style-name="Text_20_body">Pero el precipicio era inmenso.</text:p>
      <text:p text:style-name="Text_20_body">La distancia demasiado grande.</text:p>
      <text:p text:style-name="Text_20_body">Y ellos seguían atrapados en mitad de la pared.</text:p>
      <text:p text:style-name="Text_20_body">Suspendidos sobre el vacío.</text:p>
      <text:p text:style-name="Text_20_body">Tan vulnerables como él había estado unos segundos antes.</text:p>
      <text:p text:style-name="Text_20_body">Fue entonces cuando comprendieron algo mucho más aterrador.</text:p>
      <text:p text:style-name="Text_20_body">Ghim no había muerto porque fuera imprudente.</text:p>
      <text:p text:style-name="Text_20_body">No había muerto porque fuera incompetente.</text:p>
      <text:p text:style-name="Text_20_body">No había muerto porque cometiera un error evidente.</text:p>
      <text:p text:style-name="Text_20_body">Había muerto porque la montaña podía matar a cualquiera.</text:p>
      <text:p text:style-name="Text_20_body">A cualquiera.</text:p>
      <text:p text:style-name="Text_20_body">El accidente había destruido una ilusión que todos conservaban en secreto.</text:p>
      <text:p text:style-name="Text_20_body">La ilusión de que aquello les estaba ocurriendo a otros.</text:p>
      <text:p text:style-name="Text_20_body">La ilusión de que el peligro era controlable.</text:p>
      <text:p text:style-name="Text_20_body">La ilusión de que los hombres inteligentes siempre encuentran una salida.</text:p>
      <text:p text:style-name="Text_20_body"><text:soft-page-break/>Ahora sabían la verdad.</text:p>
      <text:p text:style-name="Text_20_body">Ninguno estaba a salvo.</text:p>
      <text:p text:style-name="Text_20_body">Ninguno dominaba la situación.</text:p>
      <text:p text:style-name="Text_20_body">Y ninguno tenía garantía alguna de alcanzar la cima.</text:p>
      <text:p text:style-name="Text_20_body">Nohk observó a sus compañeros.</text:p>
      <text:p text:style-name="Text_20_body">Vio el miedo en sus rostros.</text:p>
      <text:p text:style-name="Text_20_body">El mismo miedo que sentía él.</text:p>
      <text:p text:style-name="Text_20_body">Un miedo profundo.</text:p>
      <text:p text:style-name="Text_20_body">Primitivo.</text:p>
      <text:p text:style-name="Text_20_body">El miedo de quien descubre que la muerte está mucho más cerca de lo que imaginaba.</text:p>
      <text:p text:style-name="Text_20_body">Durante varios minutos permanecieron inmóviles.</text:p>
      <text:p text:style-name="Text_20_body">Aferrados a la pared.</text:p>
      <text:p text:style-name="Text_20_body">Sin hablar.</text:p>
      <text:p text:style-name="Text_20_body">Sin moverse.</text:p>
      <text:p text:style-name="Text_20_body">Sin saber qué hacer.</text:p>
      <text:p text:style-name="Text_20_body">Porque bajar parecía tan peligroso como subir.</text:p>
      <text:p text:style-name="Text_20_body">Y quedarse allí significaba morir lentamente de agotamiento.</text:p>
      <text:p text:style-name="Text_20_body">La montaña había cerrado todas las salidas.</text:p>
      <text:p text:style-name="Text_20_body">Sólo quedaba una opción.</text:p>
      <text:p text:style-name="Text_20_body">Continuar.</text:p>
      <text:p text:style-name="Text_20_body">Continuar sabiendo que Ghim había caído.</text:p>
      <text:p text:style-name="Text_20_body">Continuar sabiendo que cualquiera de ellos podía ser el siguiente.</text:p>
      <text:p text:style-name="Text_20_body">Continuar sabiendo que, si la montaña decidía reclamar otra vida, los demás no podrían hacer absolutamente nada para impedirlo.</text:p>
      <text:p text:style-name="Text_20_body">Y con esa certeza clavada en el corazón, los cinco supervivientes reanudaron lentamente el ascenso.</text:p>
      <text:p text:style-name="Text_20_body"/>
      <text:p text:style-name="Text_20_body"/>
      <text:p text:style-name="Horizontal_20_Line"/>
      <text:p text:style-name="Text_20_body"/>
      <text:h text:style-name="Heading_20_2" text:outline-level="2"><text:soft-page-break/>Parte 3 - La cueva</text:h>
      <text:p text:style-name="Text_20_body">Alcanzaron la cima poco antes del anochecer.</text:p>
      <text:p text:style-name="Text_20_body">Ninguno celebró la victoria.</text:p>
      <text:p text:style-name="Text_20_body">Ninguno levantó los brazos.</text:p>
      <text:p text:style-name="Text_20_body">Ninguno sonrió.</text:p>
      <text:p text:style-name="Text_20_body">Cuando los cinco supervivientes llegaron finalmente a terreno firme, simplemente se dejaron caer sobre la roca.</text:p>
      <text:p text:style-name="Text_20_body">Agotados.</text:p>
      <text:p text:style-name="Text_20_body">Temblando.</text:p>
      <text:p text:style-name="Text_20_body">Incapaces de pensar en nada excepto en descansar.</text:p>
      <text:p text:style-name="Text_20_body">Durante varios minutos nadie habló.</text:p>
      <text:p text:style-name="Text_20_body">El viento recorría las alturas de la montaña produciendo un silbido constante entre las rocas.</text:p>
      <text:p text:style-name="Text_20_body">Muy lejos, cientos de metros más abajo, el río continuaba su camino ajeno a la tragedia.</text:p>
      <text:p text:style-name="Text_20_body">Ghim había desaparecido allí.</text:p>
      <text:p text:style-name="Text_20_body">En algún lugar del valle.</text:p>
      <text:p text:style-name="Text_20_body">Quizá entre las piedras.</text:p>
      <text:p text:style-name="Text_20_body">Quizá arrastrado por la corriente.</text:p>
      <text:p text:style-name="Text_20_body">Nunca lo sabrían.</text:p>
      <text:p text:style-name="Text_20_body">La idea pesaba sobre todos ellos.</text:p>
      <text:p text:style-name="Text_20_body">La muerte había transformado la expedición.</text:p>
      <text:p text:style-name="Text_20_body">Hasta aquel momento el tesoro había sido una aventura.</text:p>
      <text:p text:style-name="Text_20_body">Ahora era algo distinto.</text:p>
      <text:p text:style-name="Text_20_body">Algo más oscuro.</text:p>
      <text:p text:style-name="Text_20_body">Más serio.</text:p>
      <text:p text:style-name="Text_20_body">Más peligroso.</text:p>
      <text:p text:style-name="Text_20_body">Aquella noche encendieron una pequeña hoguera protegida entre unas rocas.</text:p>
      <text:p text:style-name="Text_20_body">Compartieron las últimas provisiones.</text:p>
      <text:p text:style-name="Text_20_body">Hablaron poco.</text:p>
      <text:p text:style-name="Text_20_body">Cada uno parecía encerrado en sus propios pensamientos.</text:p>
      <text:p text:style-name="Text_20_body">Algunas veces alguien mencionaba el nombre de Ghim.</text:p>
      <text:p text:style-name="Text_20_body"><text:soft-page-break/>Recordaban alguna historia del pueblo.</text:p>
      <text:p text:style-name="Text_20_body">Alguna broma.</text:p>
      <text:p text:style-name="Text_20_body">Alguna conversación.</text:p>
      <text:p text:style-name="Text_20_body">Después volvía el silencio.</text:p>
      <text:p text:style-name="Text_20_body">Nadie quería formular la pregunta que todos se hacían.</text:p>
      <text:p text:style-name="Text_20_body">¿Había valido la pena?</text:p>
      <text:p text:style-name="Text_20_body">La oscuridad terminó envolviendo la montaña.</text:p>
      <text:p text:style-name="Text_20_body">Uno a uno se quedaron dormidos.</text:p>
      <text:p text:style-name="Text_20_body">Y por primera vez desde el inicio de la expedición nadie habló del tesoro antes de cerrar los ojos.</text:p>
      <text:p text:style-name="Horizontal_20_Line"/>
      <text:p text:style-name="Text_20_body">Nohk despertó antes del amanecer.</text:p>
      <text:p text:style-name="Text_20_body">Durante unos segundos permaneció inmóvil observando el cielo.</text:p>
      <text:p text:style-name="Text_20_body">Las estrellas comenzaban a desaparecer lentamente.</text:p>
      <text:p text:style-name="Text_20_body">A su alrededor los demás seguían dormidos.</text:p>
      <text:p text:style-name="Text_20_body">El fuego se había reducido a un pequeño montón de cenizas rojizas.</text:p>
      <text:p text:style-name="Text_20_body">El aire era frío.</text:p>
      <text:p text:style-name="Text_20_body">Silencioso.</text:p>
      <text:p text:style-name="Text_20_body">Nohk se incorporó lentamente.</text:p>
      <text:p text:style-name="Text_20_body">Sacó el libro y el mapa.</text:p>
      <text:p text:style-name="Text_20_body">Los extendió sobre una roca plana.</text:p>
      <text:p text:style-name="Text_20_body">Los estudió una vez más.</text:p>
      <text:p text:style-name="Text_20_body">Con calma.</text:p>
      <text:p text:style-name="Text_20_body">Intentando apartar de su mente el recuerdo de la caída.</text:p>
      <text:p text:style-name="Text_20_body">La ruta parecía clara.</text:p>
      <text:p text:style-name="Text_20_body">Según el manuscrito se encontraban muy cerca.</text:p>
      <text:p text:style-name="Text_20_body">Sorprendentemente cerca.</text:p>
      <text:p text:style-name="Text_20_body">El punto señalado por el mapa estaba apenas unas millas más al oeste.</text:p>
      <text:p text:style-name="Text_20_body">Quizá menos de medio día de marcha.</text:p>
      <text:p text:style-name="Text_20_body">Cuando los demás despertaron, Nohk ya tenía una decisión tomada.</text:p>
      <text:p text:style-name="Text_20_body">Continuarían.</text:p>
      <text:p text:style-name="Text_20_body"><text:soft-page-break/>Nadie se opuso.</text:p>
      <text:p text:style-name="Text_20_body">Tal vez porque todos pensaban lo mismo.</text:p>
      <text:p text:style-name="Text_20_body">Tal vez porque nadie quería admitir que habían llegado demasiado lejos para regresar con las manos vacías.</text:p>
      <text:p text:style-name="Text_20_body">Prepararon el campamento.</text:p>
      <text:p text:style-name="Text_20_body">Y reanudaron la marcha.</text:p>
      <text:p text:style-name="Text_20_body">El sendero desapareció pronto.</text:p>
      <text:p text:style-name="Text_20_body">Las indicaciones del mapa los alejaban de las rutas conocidas.</text:p>
      <text:p text:style-name="Text_20_body">Se internaron en una región salvaje de la montaña donde parecía que nadie había puesto un pie en generaciones.</text:p>
      <text:p text:style-name="Text_20_body">Los árboles crecían densos y retorcidos.</text:p>
      <text:p text:style-name="Text_20_body">Las ramas bloqueaban la luz del sol.</text:p>
      <text:p text:style-name="Text_20_body">Grandes rocas cubiertas de musgo emergían entre la vegetación.</text:p>
      <text:p text:style-name="Text_20_body">Varias veces tuvieron que abrirse paso utilizando cuchillos y hachas.</text:p>
      <text:p text:style-name="Text_20_body">El terreno se volvió incómodo.</text:p>
      <text:p text:style-name="Text_20_body">Irregular.</text:p>
      <text:p text:style-name="Text_20_body">Lento.</text:p>
      <text:p text:style-name="Text_20_body">Sin embargo, aquello también resultaba prometedor.</text:p>
      <text:p text:style-name="Text_20_body">Un tesoro oculto durante siglos no podía encontrarse junto a un camino transitado.</text:p>
      <text:p text:style-name="Text_20_body">Debía estar escondido.</text:p>
      <text:p text:style-name="Text_20_body">Protegido.</text:p>
      <text:p text:style-name="Text_20_body">Olvidado.</text:p>
      <text:p text:style-name="Text_20_body">Y aquel lugar parecía cumplir perfectamente esas condiciones.</text:p>
      <text:p text:style-name="Text_20_body">Las horas fueron pasando.</text:p>
      <text:p text:style-name="Text_20_body">El bosque se volvió cada vez más espeso.</text:p>
      <text:p text:style-name="Text_20_body">La montaña más abrupta.</text:p>
      <text:p text:style-name="Text_20_body">Hasta que finalmente llegaron al punto exacto que indicaba el mapa.</text:p>
      <text:p text:style-name="Text_20_body">Se detuvieron.</text:p>
      <text:p text:style-name="Text_20_body">Miraron alrededor.</text:p>
      <text:p text:style-name="Text_20_body">Y sintieron una punzada de decepción.</text:p>
      <text:p text:style-name="Text_20_body"><text:soft-page-break/>No había nada.</text:p>
      <text:p text:style-name="Text_20_body">Sólo árboles.</text:p>
      <text:p text:style-name="Text_20_body">Rocas.</text:p>
      <text:p text:style-name="Text_20_body">Montaña.</text:p>
      <text:p text:style-name="Text_20_body">Bosque.</text:p>
      <text:p text:style-name="Text_20_body">El mismo paisaje que habían contemplado durante toda la jornada.</text:p>
      <text:p text:style-name="Text_20_body">Durante unos minutos exploraron la zona en silencio.</text:p>
      <text:p text:style-name="Text_20_body">Buscando cualquier detalle extraño.</text:p>
      <text:p text:style-name="Text_20_body">Cualquier indicio.</text:p>
      <text:p text:style-name="Text_20_body">Cualquier señal.</text:p>
      <text:p text:style-name="Text_20_body">Nada.</text:p>
      <text:p text:style-name="Text_20_body">Las dudas comenzaron a regresar.</text:p>
      <text:p text:style-name="Text_20_body">Quizá el mapa era incorrecto.</text:p>
      <text:p text:style-name="Text_20_body">Quizá habían interpretado mal las indicaciones.</text:p>
      <text:p text:style-name="Text_20_body">Quizá...</text:p>
      <text:p text:style-name="Text_20_body">—¡Aquí!</text:p>
      <text:p text:style-name="Text_20_body">El grito resonó entre los árboles.</text:p>
      <text:p text:style-name="Text_20_body">Todos se volvieron inmediatamente.</text:p>
      <text:p text:style-name="Text_20_body">Uno de los hombres señalaba una pared rocosa parcialmente oculta por la vegetación.</text:p>
      <text:p text:style-name="Text_20_body">Corrieron hacia él.</text:p>
      <text:p text:style-name="Text_20_body">Y entonces la vieron.</text:p>
      <text:p text:style-name="Text_20_body">Una grieta.</text:p>
      <text:p text:style-name="Text_20_body">Estrecha.</text:p>
      <text:p text:style-name="Text_20_body">Oscura.</text:p>
      <text:p text:style-name="Text_20_body">Casi invisible.</text:p>
      <text:p text:style-name="Text_20_body">La entrada estaba escondida detrás de un conjunto de arbustos y raíces.</text:p>
      <text:p text:style-name="Text_20_body">Desde apenas unos metros de distancia resultaba imposible distinguirla.</text:p>
      <text:p text:style-name="Text_20_body">Nohk apartó unas ramas.</text:p>
      <text:p text:style-name="Text_20_body">La abertura continuaba hacia el interior de la montaña.</text:p>
      <text:p text:style-name="Text_20_body">No era una simple grieta.</text:p>
      <text:p text:style-name="Text_20_body"><text:soft-page-break/>Era un pasaje.</text:p>
      <text:p text:style-name="Text_20_body">Encendieron una lámpara.</text:p>
      <text:p text:style-name="Text_20_body">Y avanzaron.</text:p>
      <text:p text:style-name="Text_20_body">La entrada era angosta, obligándolos a caminar de lado durante varios metros.</text:p>
      <text:p text:style-name="Text_20_body">Pero poco a poco el corredor comenzó a ensancharse.</text:p>
      <text:p text:style-name="Text_20_body">Las paredes se alejaron.</text:p>
      <text:p text:style-name="Text_20_body">El techo se elevó.</text:p>
      <text:p text:style-name="Text_20_body">Y finalmente desembocaron en una enorme cámara natural.</text:p>
      <text:p text:style-name="Text_20_body">Todos se quedaron inmóviles.</text:p>
      <text:p text:style-name="Text_20_body">La luz de las lámparas apenas alcanzaba a revelar la amplitud de la cueva.</text:p>
      <text:p text:style-name="Text_20_body">La oscuridad continuaba mucho más allá.</text:p>
      <text:p text:style-name="Text_20_body">Silenciosa.</text:p>
      <text:p text:style-name="Text_20_body">Profunda.</text:p>
      <text:p text:style-name="Text_20_body">Misteriosa.</text:p>
      <text:p text:style-name="Text_20_body">Nadie habló durante varios segundos.</text:p>
      <text:p text:style-name="Text_20_body">No hacía falta.</text:p>
      <text:p text:style-name="Text_20_body">Todos estaban pensando exactamente lo mismo.</text:p>
      <text:p text:style-name="Text_20_body">Aquello no podía ser una coincidencia.</text:p>
      <text:p text:style-name="Text_20_body">El mapa los había llevado hasta allí.</text:p>
      <text:p text:style-name="Text_20_body">Hasta una cueva oculta que nadie habría encontrado por casualidad.</text:p>
      <text:p text:style-name="Text_20_body">Una cueva escondida en el corazón de la montaña.</text:p>
      <text:p text:style-name="Text_20_body">Una cueva invisible para cualquiera que no conociera su existencia.</text:p>
      <text:p text:style-name="Text_20_body">Nohk sintió algo que no había sentido desde la muerte de Ghim.</text:p>
      <text:p text:style-name="Text_20_body">Esperanza.</text:p>
      <text:p text:style-name="Text_20_body">Una esperanza intensa.</text:p>
      <text:p text:style-name="Text_20_body">Casi dolorosa.</text:p>
      <text:p text:style-name="Text_20_body">Quizá no habían estado equivocados.</text:p>
      <text:p text:style-name="Text_20_body">Quizá el mapa era auténtico.</text:p>
      <text:p text:style-name="Text_20_body">Quizá la leyenda era cierta.</text:p>
      <text:p text:style-name="Text_20_body">Quizá el tesoro del rey los había estado esperando allí durante tres siglos.</text:p>
      <text:p text:style-name="Text_20_body"><text:soft-page-break/>Poco a poco los demás comenzaron a sonreír.</text:p>
      <text:p text:style-name="Text_20_body">El cansancio parecía desaparecer.</text:p>
      <text:p text:style-name="Text_20_body">Las heridas parecían menos importantes.</text:p>
      <text:p text:style-name="Text_20_body">Incluso el miedo retrocedió por un momento.</text:p>
      <text:p text:style-name="Text_20_body">Habían encontrado el lugar.</text:p>
      <text:p text:style-name="Text_20_body">Todos lo sentían.</text:p>
      <text:p text:style-name="Text_20_body">Todos lo sabían.</text:p>
      <text:p text:style-name="Text_20_body">La búsqueda parecía haber terminado.</text:p>
      <text:p text:style-name="Text_20_body">Y mientras las lámparas iluminaban la inmensa oscuridad de la cueva, los cinco hombres avanzaron lentamente hacia el interior convencidos de que, al fin, estaban a punto de contemplar el tesoro del rey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5T15:34:27.961000000</meta:creation-date>
    <dc:date>2026-06-28T21:40:53.850000000</dc:date>
    <meta:editing-duration>PT58M14S</meta:editing-duration>
    <meta:editing-cycles>7</meta:editing-cycles>
    <meta:generator>LibreOffice/7.3.5.2$Windows_X86_64 LibreOffice_project/184fe81b8c8c30d8b5082578aee2fed2ea847c01</meta:generator>
    <meta:document-statistic meta:table-count="0" meta:image-count="0" meta:object-count="0" meta:page-count="15" meta:paragraph-count="394" meta:word-count="2404" meta:character-count="15190" meta:non-whitespace-character-count="13176"/>
  </office:meta>
</office:document-meta>
</file>