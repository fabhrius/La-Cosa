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text-properties officeooo:paragraph-rsid="0012e00d"/>
    </style:style>
    <style:style style:name="P2" style:family="paragraph" style:parent-style-name="Text_20_body" style:list-style-name="L1"/>
    <style:style style:name="T1" style:family="text">
      <style:text-properties officeooo:rsid="001195c7"/>
    </style:style>
    <style:style style:name="T2" style:family="text">
      <style:text-properties officeooo:rsid="0012e00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Imagen 1</text:h>
      <text:h text:style-name="Heading_20_2" text:outline-level="2">Acto 1 - Capítulo 1</text:h>
      <text:h text:style-name="Heading_20_3" text:outline-level="3">Nohk encuentra algo extraño en el bosque</text:h>
      <text:p text:style-name="Text_20_body"><text:span text:style-name="Strong_20_Emphasis">Prompt</text:span></text:p>
      <text:p text:style-name="Quotations">Medieval mystery adventure illustration, realistic historical fantasy, adult audience.</text:p>
      <text:p text:style-name="Quotations">A peaceful spring afternoon in the valley east of Oldwood, Lluviara. A narrow forest path winds through ancient trees beside a quiet river. Warm sunlight filters through the leaves.</text:p>
      <text:p text:style-name="Quotations">Nohk, a 25-year-old farmer with dark shoulder-length hair, light beard, simple medieval clothing, and a weathered but intelligent face, has stopped in the middle of the path.</text:p>
      <text:p text:style-name="Quotations">He is looking toward the base of a large old tree where a mysterious green reflection shines from the grass and undergrowth.</text:p>
      <text:p text:style-name="Quotations">The object producing the light is mostly hidden among the vegetation and cannot be clearly seen.</text:p>
      <text:p text:style-name="Quotations">Nohk's expression shows curiosity and fascination.</text:p>
      <text:p text:style-name="Quotations">The surrounding landscape is beautiful and tranquil: green hills, distant mountains, sunlight, birds, and the peaceful atmosphere of an ideal medieval countryside.</text:p>
      <text:p text:style-name="Quotations">Cinematic composition, highly detailed realism, natural colors, subtle mystery, atmospheric storytelling, no fantasy creatures.</text:p>
      <text:p text:style-name="Horizontal_20_Line"/>
      <text:h text:style-name="Heading_20_1" text:outline-level="1">Imagen 2</text:h>
      <text:h text:style-name="Heading_20_2" text:outline-level="2">Acto 1 - Capítulo 2</text:h>
      <text:h text:style-name="Heading_20_3" text:outline-level="3">Jorhm demuestra que la llave es real</text:h>
      <text:p text:style-name="Text_20_body"><text:span text:style-name="Strong_20_Emphasis">Prompt</text:span></text:p>
      <text:p text:style-name="Quotations">Medieval mystery adventure illustration, realistic historical fantasy, adult audience.</text:p>
      <text:p text:style-name="Quotations">Interior of an old scholar's house in medieval Lluviara. Warm candlelight illuminates a large wooden table surrounded by bookshelves filled with ancient manuscripts.</text:p>
      <text:p text:style-name="Quotations"><text:soft-page-break/>An open ancient book lies on the table displaying a detailed drawing of a unique iron key.</text:p>
      <text:p text:style-name="P1">Beside the book rests the real key, <text:span text:style-name="T2">an iron key </text:span>with a royal shield and a large oval green gemstone<text:span text:style-name="T2">, </text:span>perfectly matching the drawing in every visible detail.</text:p>
      <text:p text:style-name="P1">The elderly historian Jorhm stands beside the table<text:span text:style-name="T2"> and </text:span>points at both objects while explaining the legend.</text:p>
      <text:p text:style-name="Quotations">Rich medieval atmosphere, realistic faces, detailed books, candlelit shadows, cinematic composition, strong sense of mystery and revelation.</text:p>
      <text:p text:style-name="Quotations">Adult novel illustration, highly detailed realism.</text:p>
      <text:p text:style-name="Horizontal_20_Line"/>
      <text:h text:style-name="Heading_20_1" text:outline-level="1">Imagen 3</text:h>
      <text:h text:style-name="Heading_20_2" text:outline-level="2">Acto 3 - Capítulo 2</text:h>
      <text:h text:style-name="Heading_20_3" text:outline-level="3">El ciclo comienza de nuevo</text:h>
      <text:p text:style-name="Text_20_body"><text:span text:style-name="Strong_20_Emphasis">Prompt</text:span></text:p>
      <text:p text:style-name="Quotations">Medieval mystery horror illustration, realistic historical fantasy, adult audience.</text:p>
      <text:p text:style-name="Quotations">Early spring morning near the village of Wetwood. Soft mist covers a lonely countryside path surrounded by grass and scattered trees.</text:p>
      <text:p text:style-name="Quotations">A simple medieval farmer<text:span text:style-name="T1">, back to the camera,</text:span> walks peacefully toward the village carrying a small basket.</text:p>
      <text:p text:style-name="Quotations">Ahead of him, near the roots of an old tree, a strange green reflection shines from the grass and bushes.</text:p>
      <text:p text:style-name="Quotations">The source of the light is hidden and cannot be clearly identified.</text:p>
      <text:p text:style-name="Quotations">The farmer has just noticed the glow and is beginning to approach it with curiosity.</text:p>
      <text:p text:style-name="Quotations">The atmosphere should suggest destiny, repetition, and an unsettling sense that an old story is about to begin again.</text:p>
      <text:p text:style-name="Quotations">Quiet countryside, realistic medieval landscape, subtle horror undertone, cinematic composition, highly detailed realism, mysterious ending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9T10:30:32.965000000</meta:creation-date>
    <dc:date>2026-06-29T10:55:24.818000000</dc:date>
    <meta:editing-duration>PT4M31S</meta:editing-duration>
    <meta:editing-cycles>1</meta:editing-cycles>
    <meta:document-statistic meta:table-count="0" meta:image-count="0" meta:object-count="0" meta:page-count="2" meta:paragraph-count="35" meta:word-count="433" meta:character-count="2831" meta:non-whitespace-character-count="2433"/>
    <meta:generator>LibreOffice/7.3.5.2$Windows_X86_64 LibreOffice_project/184fe81b8c8c30d8b5082578aee2fed2ea847c01</meta:generator>
  </office:meta>
</office:document-meta>
</file>