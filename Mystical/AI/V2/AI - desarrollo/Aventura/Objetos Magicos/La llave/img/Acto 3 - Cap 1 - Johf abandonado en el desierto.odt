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T1" style:family="text">
      <style:text-properties officeooo:rsid="00006b5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í. Creo que esa es una elección muy fuerte narrativamente.</text:p>
      <text:p text:style-name="Text_20_body">Además resuelve varios problemas a la vez:</text:p>
      <text:list xml:id="list1354633357" text:style-name="L1">
        <text:list-item>
          <text:p text:style-name="P1">No necesitas mostrar claramente a Nohk ni mantener consistencia física.</text:p>
        </text:list-item>
        <text:list-item>
          <text:p text:style-name="P1">No necesitas mostrar la llave.</text:p>
        </text:list-item>
        <text:list-item>
          <text:p text:style-name="P1">No necesitas explicar la escena.</text:p>
        </text:list-item>
        <text:list-item>
          <text:p text:style-name="P1">La imagen transmite inmediatamente traición, desesperación y abandono.</text:p>
        </text:list-item>
        <text:list-item>
          <text:p text:style-name="P1">Funciona incluso para alguien que no ha leído el capítulo.</text:p>
        </text:list-item>
      </text:list>
      <text:p text:style-name="Text_20_body">La clave sería que el foco emocional no esté en la carreta, sino en Johf.</text:p>
      <text:p text:style-name="Text_20_body">La imagen debe hacer sentir que ya ha perdido.</text:p>
      <text:p text:style-name="Horizontal_20_Line"/>
      <text:h text:style-name="Heading_20_3" text:outline-level="3">Acto 3 – Capítulo 3</text:h>
      <text:h text:style-name="Heading_20_3" text:outline-level="3">El desierto de piedra</text:h>
      <text:p text:style-name="Text_20_body"><text:span text:style-name="Strong_20_Emphasis">Prompt</text:span></text:p>
      <text:p text:style-name="Quotations">Medieval mystery adventure illustration, realistic historical fantasy, adult audience.</text:p>
      <text:p text:style-name="Quotations">The Stone Desert of Lluviara at <text:span text:style-name="T1">dawn</text:span>. A vast hostile wilderness of red rock formations, cliffs, canyons, cracked stone plains and endless barren terrain stretching to the horizon. The landscape combines the scale of the Grand Canyon with the harsh emptiness of a desert.</text:p>
      <text:p text:style-name="Quotations">In the foreground, seen from behind, a lone medieval traveler runs desperately across the rocky ground.</text:p>
      <text:p text:style-name="Quotations">His clothes are dusty and worn from a long journey. One arm is extended toward the distance as if pleading for someone to stop.</text:p>
      <text:p text:style-name="Quotations">Far ahead, a horse-drawn cart races away through the desert, raising a long cloud of dust behind it.</text:p>
      <text:p text:style-name="Quotations">The distance between the man and the cart makes it clear that he cannot catch it.</text:p>
      <text:p text:style-name="Quotations">The traveler has been abandoned.</text:p>
      <text:p text:style-name="Quotations">The scene should communicate betrayal, despair, exhaustion and hopelessness.</text:p>
      <text:p text:style-name="Quotations">Dramatic light, long shadows, realistic proportions, cinematic composition, highly detailed environment, emotional storytelling, no fantasy creatures.</text:p>
      <text:p text:style-name="Quotations">Adult dark adventure novel illustration.</text:p>
      <text:p text:style-name="Horizontal_20_Line"><text:soft-page-break/></text:p>
      <text:p text:style-name="Text_20_body">Yo añadiría una indicación visual más:</text:p>
      <text:p text:style-name="Quotations">The abandoned traveler appears small and vulnerable compared to the immense landscape surrounding him.</text:p>
      <text:p text:style-name="Text_20_body">Porque uno de los temas centrales del cuento es que Johf comprende demasiado tarde que está solo y que el desierto es mucho más grande que él.</text:p>
      <text:p text:style-name="Text_20_body">La imagen deja de ser simplemente "un hombre corriendo detrás de una carreta" y se convierte en "un hombre condenado". Eso encaja muy bien con el tono que toma la historia a partir de ese momen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30T10:12:37.620000000</meta:creation-date>
    <dc:date>2026-06-30T10:24:38.112000000</dc:date>
    <meta:editing-duration>PT1M50S</meta:editing-duration>
    <meta:editing-cycles>1</meta:editing-cycles>
    <meta:document-statistic meta:table-count="0" meta:image-count="0" meta:object-count="0" meta:page-count="2" meta:paragraph-count="26" meta:word-count="338" meta:character-count="2075" meta:non-whitespace-character-count="1767"/>
    <meta:generator>LibreOffice/7.3.5.2$Windows_X86_64 LibreOffice_project/184fe81b8c8c30d8b5082578aee2fed2ea847c01</meta:generator>
  </office:meta>
</office:document-meta>
</file>