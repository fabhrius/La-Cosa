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T1" style:family="text">
      <style:text-properties officeooo:rsid="0000e5b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sta puede convertirse fácilmente en una de las imágenes más espectaculares del relato porque representa el momento en que la expedición deja de ser una aventura emocionante y se convierte en una lucha por la supervivencia.</text:p>
      <text:p text:style-name="Text_20_body">Además tiene una ventaja importante: no necesitas identificar personajes concretos. La protagonista visual es la tormenta.</text:p>
      <text:p text:style-name="Text_20_body">Yo intentaría que la escala de la naturaleza eclipse completamente a los hombres.</text:p>
      <text:p text:style-name="Horizontal_20_Line"/>
      <text:h text:style-name="Heading_20_3" text:outline-level="3">Acto 2 – Capítulo 1</text:h>
      <text:h text:style-name="Heading_20_3" text:outline-level="3">La tormenta del pantano</text:h>
      <text:p text:style-name="Text_20_body"><text:span text:style-name="Strong_20_Emphasis">Prompt</text:span></text:p>
      <text:p text:style-name="Quotations">Medieval mystery adventure illustration, realistic historical fantasy, adult audience.</text:p>
      <text:p text:style-name="Quotations">A catastrophic thunderstorm over a vast flooded marshland in medieval Lluviara.</text:p>
      <text:p text:style-name="Quotations">Six <text:span text:style-name="T1">young men</text:span> struggle desperately against the storm while attempting to save a wooden cart pulled by horses.</text:p>
      <text:p text:style-name="Quotations">Torrential rain falls with overwhelming force, creating a dense curtain of water that obscures the landscape and limits visibility to only a few meters.</text:p>
      <text:p text:style-name="Quotations">The winding river has overflowed its banks and merged with the surrounding swamp, transforming the entire region into a chaotic expanse of deep water, mud and flooding.</text:p>
      <text:p text:style-name="Quotations">The cart is sinking into thick black mud. The horses are trapped and fighting to free themselves as water surges around them.</text:p>
      <text:p text:style-name="Quotations">The men pull on ropes and push against the cart with all their strength, shouting to one another through the storm.</text:p>
      <text:p text:style-name="Quotations">Above them, enormous storm clouds dominate the sky.</text:p>
      <text:p text:style-name="Quotations">Multiple lightning bolts illuminate the darkness, revealing sheets of rain, violent wind and crashing water.</text:p>
      <text:p text:style-name="Quotations">The scale of the storm should make the travelers appear small and powerless against nature.</text:p>
      <text:p text:style-name="Quotations">Atmosphere of disaster, survival and overwhelming natural force.</text:p>
      <text:p text:style-name="Quotations">Cinematic composition, dramatic lighting, realistic medieval equipment and clothing, highly detailed environment, dark adventure novel illustration, no fantasy creatures.</text:p>
      <text:p text:style-name="Horizontal_20_Line"/>
      <text:p text:style-name="Text_20_body"><text:soft-page-break/>Si buscas una imagen todavía más poderosa, añadiría una instrucción de composición:</text:p>
      <text:p text:style-name="Quotations">One lightning strike illuminates the entire scene, freezing the moment like a terrifying vision.</text:p>
      <text:p text:style-name="Text_20_body">Porque visualmente produce algo muy cinematográfico:</text:p>
      <text:list xml:id="list873818811" text:style-name="L1">
        <text:list-item>
          <text:p text:style-name="P1">cielo negro,</text:p>
        </text:list-item>
        <text:list-item>
          <text:p text:style-name="P1">lluvia horizontal,</text:p>
        </text:list-item>
        <text:list-item>
          <text:p text:style-name="P1">río desbordado,</text:p>
        </text:list-item>
        <text:list-item>
          <text:p text:style-name="P1">carreta hundiéndose,</text:p>
        </text:list-item>
        <text:list-item>
          <text:p text:style-name="P1">caballos aterrados,</text:p>
        </text:list-item>
        <text:list-item>
          <text:p text:style-name="P1">seis hombres luchando inútilmente,</text:p>
        </text:list-item>
        <text:list-item>
          <text:p text:style-name="P1">un relámpago iluminándolo todo.</text:p>
        </text:list-item>
      </text:list>
      <text:p text:style-name="Text_20_body">Esa imagen transmite perfectamente la idea de que <text:span text:style-name="Strong_20_Emphasis">la naturaleza acaba de reclamar el control de la expedición</text:span>. Antes perseguían un tesoro. Ahora simplemente intentan sobrevivir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30T10:42:04.737000000</meta:creation-date>
    <dc:date>2026-06-30T10:50:43.398000000</dc:date>
    <meta:editing-duration>PT8M38S</meta:editing-duration>
    <meta:editing-cycles>1</meta:editing-cycles>
    <meta:document-statistic meta:table-count="0" meta:image-count="0" meta:object-count="0" meta:page-count="2" meta:paragraph-count="29" meta:word-count="354" meta:character-count="2356" meta:non-whitespace-character-count="2037"/>
    <meta:generator>LibreOffice/7.3.5.2$Windows_X86_64 LibreOffice_project/184fe81b8c8c30d8b5082578aee2fed2ea847c01</meta:generator>
  </office:meta>
</office:document-meta>
</file>