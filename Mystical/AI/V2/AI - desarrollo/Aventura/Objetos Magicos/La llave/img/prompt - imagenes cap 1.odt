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356" officeooo:paragraph-rsid="001f2356"/>
    </style:style>
    <style:style style:name="P2" style:family="paragraph" style:parent-style-name="Text_20_body">
      <style:text-properties officeooo:rsid="001f2356" officeooo:paragraph-rsid="001f23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n 1:</text:p>
      <text:p text:style-name="Standard"/>
      <text:p text:style-name="Standard"/>
      <text:p text:style-name="Standard"/>
      <text:p text:style-name="Standard"/>
      <text:p text:style-name="Text_20_body">Medieval fantasy realism, adult novel illustration, cinematic landscape.</text:p>
      <text:p text:style-name="Text_20_body">A peaceful spring morning in the valley of Lluviara. The Bager River flows gently through green fields surrounded by forests and distant mountains. A small medieval farmhouse stands near the riverbank, with cultivated grain fields, four goats grazing, several chickens wandering freely, and two horses resting near a wooden fence.</text:p>
      <text:p text:style-name="Text_20_body">Nohk, a 25-year-old farmer with shoulder-length dark hair, short beard, simple brown tunic, wool cloak and worn leather boots, works quietly near the fields.</text:p>
      <text:p text:style-name="Text_20_body">The atmosphere is serene, harmonious and idyllic. Golden sunlight illuminates the valley. The scene should evoke peace, prosperity, simplicity and the beauty of an ordinary life.</text:p>
      <text:p text:style-name="Text_20_body">Highly detailed environment, realistic medieval architecture, natural colors, cinematic lighting, realistic proportions, adult fantasy novel artwork, sense of tranquility before tragedy.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/>
      <text:p text:style-name="P2">imagen 2:</text:p>
      <text:p text:style-name="P2"/>
      <text:p text:style-name="Text_20_body"/>
      <text:p text:style-name="Text_20_body">Medieval fantasy realism, adult novel illustration, mystery atmosphere.</text:p>
      <text:p text:style-name="Text_20_body">A narrow forest path during late afternoon. Sunlight filters through ancient trees and tall grass. Nohk, a young farmer with shoulder-length dark hair, short beard, brown tunic and wool cloak, kneels beside the path after noticing something unusual.</text:p>
      <text:p text:style-name="Text_20_body">In the foreground lies an ancient iron key partially hidden in the grass. The key is large, elegant and mysterious, with a royal shield engraved on its head and a large oval green gemstone embedded in the metal. The gemstone reflects sunlight with an unnatural green glow.</text:p>
      <text:p text:style-name="Text_20_body">Nohk stares at the key with curiosity and fascination.</text:p>
      <text:p text:style-name="Text_20_body">The key must be the visual focus of the image. The atmosphere should suggest destiny, temptation and mystery. The viewer should feel that this object was waiting to be discovered.</text:p>
      <text:p text:style-name="Text_20_body">Highly detailed forest, realistic textures, cinematic lighting, realistic medieval setting, subtle dark fantasy undertones, adult fantasy novel illustration, no cartoon, no anime.</text:p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8T15:28:14.296000000</meta:creation-date>
    <dc:date>2026-06-28T15:29:50.638000000</dc:date>
    <meta:editing-duration>PT1M36S</meta:editing-duration>
    <meta:editing-cycles>1</meta:editing-cycles>
    <meta:document-statistic meta:table-count="0" meta:image-count="0" meta:object-count="0" meta:page-count="2" meta:paragraph-count="13" meta:word-count="287" meta:character-count="1945" meta:non-whitespace-character-count="1671"/>
    <meta:generator>LibreOffice/7.3.5.2$Windows_X86_64 LibreOffice_project/184fe81b8c8c30d8b5082578aee2fed2ea847c01</meta:generator>
  </office:meta>
</office:document-meta>
</file>