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ec11" officeooo:paragraph-rsid="0003ec11"/>
    </style:style>
    <style:style style:name="P2" style:family="paragraph" style:parent-style-name="Text_20_body">
      <style:text-properties officeooo:rsid="0003ec11" officeooo:paragraph-rsid="0003ec11"/>
    </style:style>
    <style:style style:name="P3" style:family="paragraph" style:parent-style-name="Text_20_body">
      <style:text-properties officeooo:paragraph-rsid="00044d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agen 3:</text:p>
      <text:p text:style-name="Standard"/>
      <text:p text:style-name="Standard"/>
      <text:p text:style-name="Text_20_body">Medieval fantasy realism, adult novel illustration, cinematic interior scene.</text:p>
      <text:p text:style-name="Text_20_body">Inside the home of Jorhm, an elderly scholar and historian of ancient Lluviara. A large medieval library fills the room, with wooden bookshelves packed with old books, scrolls, maps and manuscripts accumulated over decades. Warm afternoon sunlight enters through a small window, illuminating floating dust particles in the air.</text:p>
      <text:p text:style-name="P3">At the center of the room stands a heavy wooden table. Jorhm, a thin elderly man with long gray hair, weathered face and simple dark robes, carefully opens an ancient leather-bound book. </text:p>
      <text:p text:style-name="P3">Around him stand six young men from the village, including Nohk. All are male farmers and laborers in their twenties, wearing simple medieval rural clothing. They watch with curiosity and anticipation. </text:p>
      <text:p text:style-name="Text_20_body">The atmosphere is quiet and reverent, almost sacred. The room should feel like a place where forgotten knowledge has survived for centuries.</text:p>
      <text:p text:style-name="Text_20_body">Highly detailed medieval library, realistic books and manuscripts, cinematic lighting, realistic proportions, adult fantasy novel illustration, subtle mystery atmosphere, no cartoon, no anime.</text:p>
      <text:p text:style-name="Standard"/>
      <text:p text:style-name="Standard"/>
      <text:p text:style-name="Standard"/>
      <text:p text:style-name="Horizontal_20_Line"/>
      <text:p text:style-name="Text_20_body"/>
      <text:p text:style-name="P2">imagen 4:</text:p>
      <text:p text:style-name="Text_20_body"/>
      <text:p text:style-name="Text_20_body">Medieval fantasy realism, adult novel illustration, mystery discovery scene.</text:p>
      <text:p text:style-name="Text_20_body">Close view of an ancient wooden table inside a medieval scholar's library. An old leather-bound book lies open to a yellowed page containing a detailed drawing of a mysterious iron key. Resting directly above the illustration is the real key itself.</text:p>
      <text:p text:style-name="Text_20_body">The two keys are identical: same elegant shape, same royal shield engraved in the metal, same large oval green gemstone embedded in the head of the key.</text:p>
      <text:p text:style-name="Text_20_body">Jorhm points toward the drawing with one hand while the young villagers stare in amazement. Their faces reveal disbelief, fascination and growing excitement.</text:p>
      <text:p text:style-name="Text_20_body">The focus of the image is the perfect match between the illustration and the real object. The viewer should immediately understand that the key belongs to an ancient legend.</text:p>
      <text:p text:style-name="Text_20_body">Highly detailed book pages, medieval ink drawings, realistic textures, cinematic lighting, subtle dark fantasy undertones, adult fantasy novel illustration, realistic proportions, no cartoon, no ani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8T15:51:21.356000000</meta:creation-date>
    <dc:date>2026-06-28T16:02:12.016000000</dc:date>
    <meta:editing-duration>PT10M50S</meta:editing-duration>
    <meta:editing-cycles>2</meta:editing-cycles>
    <meta:generator>LibreOffice/7.3.5.2$Windows_X86_64 LibreOffice_project/184fe81b8c8c30d8b5082578aee2fed2ea847c01</meta:generator>
    <meta:document-statistic meta:table-count="0" meta:image-count="0" meta:object-count="0" meta:page-count="1" meta:paragraph-count="14" meta:word-count="324" meta:character-count="2151" meta:non-whitespace-character-count="1839"/>
  </office:meta>
</office:document-meta>
</file>