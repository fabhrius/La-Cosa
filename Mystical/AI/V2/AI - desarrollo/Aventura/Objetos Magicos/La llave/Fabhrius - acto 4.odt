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. Y creo que aquí ocurre algo distinto a los actos anteriores.</text:p>
      <text:p text:style-name="Text_20_body">En el Acto I estudiamos cómo nace una creencia.</text:p>
      <text:p text:style-name="Text_20_body">En el Acto II cómo la realidad destruye las expectativas.</text:p>
      <text:p text:style-name="Text_20_body">En el Acto III cómo las personas deciden continuar a pesar de ello.</text:p>
      <text:p text:style-name="Text_20_body">Pero el Acto IV trata sobre <text:span text:style-name="Strong_20_Emphasis">la transformación producida por la búsqueda</text:span>.</text:p>
      <text:p text:style-name="Text_20_body">Ya casi no importa el tesoro.</text:p>
      <text:p text:style-name="Text_20_body">Lo importante es lo que la persecución del tesoro ha hecho con ellos.</text:p>
      <text:p text:style-name="Horizontal_20_Line"/>
      <text:h text:style-name="Heading_20_2" text:outline-level="2">1. Los objetivos transforman a quienes los persiguen</text:h>
      <text:p text:style-name="Text_20_body">Sin duda es el principio más evidente.</text:p>
      <text:p text:style-name="Text_20_body">Si los personajes del inicio vieran a los personajes del Acto IV probablemente no los reconocerían.</text:p>
      <text:p text:style-name="Text_20_body">Han cambiado.</text:p>
      <text:p text:style-name="Text_20_body">Y no necesariamente porque fueran malas personas.</text:p>
      <text:p text:style-name="Text_20_body">Han cambiado porque años de presión, pérdidas y obsesión terminan alterando el comportamiento.</text:p>
      <text:p text:style-name="Text_20_body">Principio universal:</text:p>
      <text:p text:style-name="Quotations">Toda interacción prolongada modifica a los sistemas que participan en ella.</text:p>
      <text:p text:style-name="Text_20_body">Esto además tiene una formulación muy científica.</text:p>
      <text:p text:style-name="Horizontal_20_Line"/>
      <text:h text:style-name="Heading_20_2" text:outline-level="2">2. La adaptación puede convertirse en corrupción</text:h>
      <text:p text:style-name="Text_20_body">Esto me parece muy interesante.</text:p>
      <text:p text:style-name="Text_20_body">Cada decisión individual parece justificable.</text:p>
      <text:list xml:id="list2187620205" text:style-name="L1">
        <text:list-item>
          <text:p text:style-name="P1">robar comida para sobrevivir</text:p>
        </text:list-item>
        <text:list-item>
          <text:p text:style-name="P1">mentir para continuar</text:p>
        </text:list-item>
        <text:list-item>
          <text:p text:style-name="P1">abandonar a alguien</text:p>
        </text:list-item>
        <text:list-item>
          <text:p text:style-name="P1">actuar con dureza</text:p>
        </text:list-item>
      </text:list>
      <text:p text:style-name="Text_20_body">Pero la acumulación transforma a la persona.</text:p>
      <text:p text:style-name="Text_20_body">Principio universal:</text:p>
      <text:p text:style-name="Quotations">Los grandes cambios suelen construirse mediante pequeños cambios sucesivos.</text:p>
      <text:p text:style-name="Horizontal_20_Line"><text:soft-page-break/></text:p>
      <text:h text:style-name="Heading_20_2" text:outline-level="2">3. Los incentivos modifican el comportamiento</text:h>
      <text:p text:style-name="Text_20_body">Muy propio de economía y teoría de sistemas.</text:p>
      <text:p text:style-name="Text_20_body">Cuando el tesoro parecía cercano, la cooperación desaparece.</text:p>
      <text:p text:style-name="Text_20_body">Surge la traición.</text:p>
      <text:p text:style-name="Text_20_body">La competencia sustituye a la amistad.</text:p>
      <text:p text:style-name="Text_20_body">Principio universal:</text:p>
      <text:p text:style-name="Quotations">Cambiar las recompensas cambia el comportamiento.</text:p>
      <text:p text:style-name="Text_20_body">o</text:p>
      <text:p text:style-name="Quotations">Los sistemas producen aquello que recompensan.</text:p>
      <text:p text:style-name="Horizontal_20_Line"/>
      <text:h text:style-name="Heading_20_2" text:outline-level="2">4. La escasez degrada la cooperación</text:h>
      <text:p text:style-name="Text_20_body">Otra observación muy fuerte.</text:p>
      <text:p text:style-name="Text_20_body">Al principio son amigos.</text:p>
      <text:p text:style-name="Text_20_body">Cuando los recursos desaparecen:</text:p>
      <text:list xml:id="list2822534702" text:style-name="L2">
        <text:list-item>
          <text:p text:style-name="P2">aparece la desconfianza</text:p>
        </text:list-item>
        <text:list-item>
          <text:p text:style-name="P2">aparece el egoísmo</text:p>
        </text:list-item>
        <text:list-item>
          <text:p text:style-name="P2">aparece la traición</text:p>
        </text:list-item>
      </text:list>
      <text:p text:style-name="Text_20_body">Principio universal:</text:p>
      <text:p text:style-name="Quotations">La escasez revela aspectos del comportamiento que la abundancia mantiene ocultos.</text:p>
      <text:p text:style-name="Horizontal_20_Line"/>
      <text:h text:style-name="Heading_20_2" text:outline-level="2">5. El objetivo termina reemplazando al propósito original</text:h>
      <text:p text:style-name="Text_20_body">Esto me gusta mucho para Nohk.</text:p>
      <text:p text:style-name="Text_20_body">Al principio quiere mejorar su vida.</text:p>
      <text:p text:style-name="Text_20_body">Al final ya no.</text:p>
      <text:p text:style-name="Text_20_body">Su vida está destruida.</text:p>
      <text:p text:style-name="Text_20_body">Ya no persigue el tesoro para vivir mejor.</text:p>
      <text:p text:style-name="Text_20_body"><text:soft-page-break/>Persigue el tesoro porque lleva demasiado tiempo persiguiéndolo.</text:p>
      <text:p text:style-name="Text_20_body">El objetivo se ha independizado de su utilidad.</text:p>
      <text:p text:style-name="Text_20_body">Principio universal:</text:p>
      <text:p text:style-name="Quotations">Algunos objetivos sobreviven incluso después de haber perdido su propósito.</text:p>
      <text:p text:style-name="Horizontal_20_Line"/>
      <text:h text:style-name="Heading_20_2" text:outline-level="2">6. La proximidad modifica el juicio</text:h>
      <text:p text:style-name="Text_20_body">Psicológicamente es muy real.</text:p>
      <text:p text:style-name="Text_20_body">Cuanto más cerca creemos estar de una recompensa, más riesgos aceptamos.</text:p>
      <text:p text:style-name="Text_20_body">Principio universal:</text:p>
      <text:p text:style-name="Quotations">La percepción de cercanía altera la evaluación del riesgo.</text:p>
      <text:p text:style-name="Horizontal_20_Line"/>
      <text:h text:style-name="Heading_20_2" text:outline-level="2">7. La decepción final</text:h>
      <text:p text:style-name="Text_20_body">Esto es importante.</text:p>
      <text:p text:style-name="Text_20_body">Llegan al final del mapa.</text:p>
      <text:p text:style-name="Text_20_body">No encuentran nada.</text:p>
      <text:p text:style-name="Text_20_body">Y aun así continúan.</text:p>
      <text:p text:style-name="Text_20_body">La evidencia ya no controla sus decisiones.</text:p>
      <text:p text:style-name="Text_20_body">Principio universal:</text:p>
      <text:p text:style-name="Quotations">Las convicciones profundas pueden sobrevivir a la ausencia de pruebas.</text:p>
      <text:p text:style-name="Horizontal_20_Line"/>
      <text:h text:style-name="Heading_20_2" text:outline-level="2">8. La erosión moral</text:h>
      <text:p text:style-name="Text_20_body">Quizás el tema central del acto.</text:p>
      <text:p text:style-name="Text_20_body">Nadie se transforma de golpe.</text:p>
      <text:p text:style-name="Text_20_body">Nadie despierta una mañana convertido en traidor.</text:p>
      <text:p text:style-name="Text_20_body">El cambio ocurre lentamente.</text:p>
      <text:p text:style-name="Text_20_body">Principio universal:</text:p>
      <text:p text:style-name="Quotations">La erosión suele ser invisible mientras ocurre.</text:p>
      <text:p text:style-name="Text_20_body"><text:soft-page-break/>o</text:p>
      <text:p text:style-name="Quotations">La transformación más profunda suele ser gradual.</text:p>
      <text:p text:style-name="Horizontal_20_Line"/>
      <text:h text:style-name="Heading_20_2" text:outline-level="2">9. La irreversibilidad</text:h>
      <text:p text:style-name="Text_20_body">A estas alturas ya no pueden volver atrás.</text:p>
      <text:p text:style-name="Text_20_body">No porque físicamente sea imposible.</text:p>
      <text:p text:style-name="Text_20_body">Sino porque ya no son quienes eran.</text:p>
      <text:p text:style-name="Text_20_body">Esto me parece muy Fabhrius.</text:p>
      <text:p text:style-name="Text_20_body">Principio universal:</text:p>
      <text:p text:style-name="Quotations">Algunos caminos modifican al viajero de forma irreversible.</text:p>
      <text:p text:style-name="Horizontal_20_Line"/>
      <text:h text:style-name="Heading_20_2" text:outline-level="2">Las frases que más me gustan para Fabhrius</text:h>
      <text:p text:style-name="Text_20_body">Si buscamos frases que no revelen el desenlace y que adquieran significado después, destacaría estas:</text:p>
      <text:h text:style-name="Heading_20_3" text:outline-level="3">Opción A</text:h>
      <text:p text:style-name="Quotations">"Los objetivos prolongados terminan modificando a quien los persigue."</text:p>
      <text:p text:style-name="Text_20_body">La más directamente relacionada con el acto.</text:p>
      <text:p text:style-name="Horizontal_20_Line"/>
      <text:h text:style-name="Heading_20_3" text:outline-level="3">Opción B</text:h>
      <text:p text:style-name="Quotations">"La transformación más profunda suele ser gradual."</text:p>
      <text:p text:style-name="Text_20_body">Muy sutil.</text:p>
      <text:p text:style-name="Text_20_body">El lector no sabe todavía qué transformación.</text:p>
      <text:p text:style-name="Horizontal_20_Line"/>
      <text:h text:style-name="Heading_20_3" text:outline-level="3">Opción C</text:h>
      <text:p text:style-name="Quotations">"La escasez revela aspectos del comportamiento que la abundancia mantiene ocultos."</text:p>
      <text:p text:style-name="Text_20_body">Excelente para la traición.</text:p>
      <text:p text:style-name="Horizontal_20_Line"/>
      <text:h text:style-name="Heading_20_3" text:outline-level="3"><text:soft-page-break/>Opción D</text:h>
      <text:p text:style-name="Quotations">"Algunos objetivos sobreviven incluso después de haber perdido su propósito."</text:p>
      <text:p text:style-name="Text_20_body">Esta me parece extraordinariamente apropiada para Nohk.</text:p>
      <text:p text:style-name="Text_20_body">Porque al final ya no busca riqueza.</text:p>
      <text:p text:style-name="Text_20_body">Busca terminar la búsqueda.</text:p>
      <text:p text:style-name="Horizontal_20_Line"/>
      <text:h text:style-name="Heading_20_3" text:outline-level="3">Opción E</text:h>
      <text:p text:style-name="Quotations">"Algunos caminos modifican al viajero de forma irreversible."</text:p>
      <text:p text:style-name="Text_20_body">Tiene un tono casi mítico.</text:p>
      <text:p text:style-name="Text_20_body">Y encaja perfectamente con una expedición.</text:p>
      <text:p text:style-name="Horizontal_20_Line"/>
      <text:h text:style-name="Heading_20_3" text:outline-level="3">Opción F</text:h>
      <text:p text:style-name="Quotations">"Toda interacción prolongada modifica a los sistemas que participan en ella."</text:p>
      <text:p text:style-name="Text_20_body">Muy Omniscientis.</text:p>
      <text:p text:style-name="Text_20_body">Muy científica.</text:p>
      <text:p text:style-name="Text_20_body">Muy Fabhrius.</text:p>
      <text:p text:style-name="Horizontal_20_Line"/>
      <text:p text:style-name="Text_20_body">Si tuviera que elegir dos para abrir el Acto IV, probablemente escogería:</text:p>
      <text:p text:style-name="Quotations"><text:span text:style-name="Strong_20_Emphasis">"Algunos objetivos sobreviven incluso después de haber perdido su propósito."</text:span></text:p>
      <text:p text:style-name="Text_20_body">y</text:p>
      <text:p text:style-name="Quotations"><text:span text:style-name="Strong_20_Emphasis">"La transformación más profunda suele ser gradual."</text:span></text:p>
      <text:p text:style-name="Text_20_body">Porque ambas describen exactamente lo que está ocurriendo sin revelar nada sobre la puerta, la bóveda o el destino de Nohk. El lector sólo comprenderá plenamente su significado cuando mire hacia atrás y compare al campesino del comienzo con el hombre que observa caer a su último amigo sin sentir nad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2T18:28:11.873000000</meta:creation-date>
    <dc:date>2026-07-22T18:38:41.337000000</dc:date>
    <meta:editing-duration>PT10M30S</meta:editing-duration>
    <meta:editing-cycles>1</meta:editing-cycles>
    <meta:document-statistic meta:table-count="0" meta:image-count="0" meta:object-count="0" meta:page-count="5" meta:paragraph-count="114" meta:word-count="731" meta:character-count="4698" meta:non-whitespace-character-count="4088"/>
    <meta:generator>LibreOffice/7.3.5.2$Windows_X86_64 LibreOffice_project/184fe81b8c8c30d8b5082578aee2fed2ea847c01</meta:generator>
  </office:meta>
</office:document-meta>
</file>