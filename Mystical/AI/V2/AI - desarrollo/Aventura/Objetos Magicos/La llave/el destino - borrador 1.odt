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arte 3 - El destino</text:h>
      <text:p text:style-name="Text_20_body">Nohk corrió hacia la puerta.</text:p>
      <text:p text:style-name="Text_20_body">La lámpara temblaba en su mano.</text:p>
      <text:p text:style-name="Text_20_body">Lo sabía.</text:p>
      <text:p text:style-name="Text_20_body">Siempre lo había sabido.</text:p>
      <text:p text:style-name="Text_20_body">La bóveda existía.</text:p>
      <text:p text:style-name="Text_20_body">Todos estaban equivocados.</text:p>
      <text:p text:style-name="Text_20_body">Jorhm estaba equivocado.</text:p>
      <text:p text:style-name="Text_20_body">Kempht estaba equivocado.</text:p>
      <text:p text:style-name="Text_20_body">Incluso él mismo había estado a punto de rendirse.</text:p>
      <text:p text:style-name="Text_20_body">Pero la bóveda existía.</text:p>
      <text:p text:style-name="Text_20_body">Estaba allí.</text:p>
      <text:p text:style-name="Text_20_body">Esperándolo.</text:p>
      <text:p text:style-name="Text_20_body">Sin embargo, al acercarse sintió una extraña decepción.</text:p>
      <text:p text:style-name="Text_20_body">La puerta era simple.</text:p>
      <text:p text:style-name="Text_20_body">No había símbolos.</text:p>
      <text:p text:style-name="Text_20_body">No había escudos reales.</text:p>
      <text:p text:style-name="Text_20_body">No había inscripciones antiguas.</text:p>
      <text:p text:style-name="Text_20_body">Nada.</text:p>
      <text:p text:style-name="Text_20_body">Sólo hierro.</text:p>
      <text:p text:style-name="Text_20_body">Hierro oscuro y envejecido.</text:p>
      <text:p text:style-name="Text_20_body">Y una cerradura.</text:p>
      <text:p text:style-name="Text_20_body">Nada más.</text:p>
      <text:p text:style-name="Text_20_body">Introdujo la llave.</text:p>
      <text:p text:style-name="Text_20_body">Encajó perfectamente.</text:p>
      <text:p text:style-name="Text_20_body">Como si hubiera sido fabricada para aquella puerta.</text:p>
      <text:p text:style-name="Text_20_body">Como si hubiera permanecido siglos esperando ese instante.</text:p>
      <text:p text:style-name="Text_20_body">Nohk giró la llave.</text:p>
      <text:p text:style-name="Text_20_body">Un sonido seco resonó en el interior de la roca.</text:p>
      <text:p text:style-name="Text_20_body"><text:soft-page-break/>Un golpe profundo.</text:p>
      <text:p text:style-name="Text_20_body">Lejano.</text:p>
      <text:p text:style-name="Text_20_body">La cerradura cedió.</text:p>
      <text:p text:style-name="Text_20_body">La puerta se abrió lentamente.</text:p>
      <text:p text:style-name="Text_20_body">No encontró oro.</text:p>
      <text:p text:style-name="Text_20_body">Ni joyas.</text:p>
      <text:p text:style-name="Text_20_body">Ni riquezas.</text:p>
      <text:p text:style-name="Text_20_body">Sólo oscuridad.</text:p>
      <text:p text:style-name="Text_20_body">Levantó la lámpara.</text:p>
      <text:p text:style-name="Text_20_body">Y entró.</text:p>
      <text:p text:style-name="Text_20_body">La estancia era pequeña.</text:p>
      <text:p text:style-name="Text_20_body">Mucho más pequeña de lo que había imaginado.</text:p>
      <text:p text:style-name="Text_20_body">Una simple cámara excavada en la roca.</text:p>
      <text:p text:style-name="Text_20_body">Vacía.</text:p>
      <text:p text:style-name="Text_20_body">Al principio creyó que se equivocaba.</text:p>
      <text:p text:style-name="Text_20_body">Que la oscuridad ocultaba el tesoro.</text:p>
      <text:p text:style-name="Text_20_body">Que debía estar más adentro.</text:p>
      <text:p text:style-name="Text_20_body">Entonces vio los esqueletos.</text:p>
      <text:p text:style-name="Text_20_body">Tres.</text:p>
      <text:p text:style-name="Text_20_body">Tal vez cuatro.</text:p>
      <text:p text:style-name="Text_20_body">Resultaba difícil saberlo.</text:p>
      <text:p text:style-name="Text_20_body">Yacían cerca de la entrada.</text:p>
      <text:p text:style-name="Text_20_body">Desordenados.</text:p>
      <text:p text:style-name="Text_20_body">Cubiertos por jirones de ropa podrida.</text:p>
      <text:p text:style-name="Text_20_body">Algunos conservaban fragmentos de cuero.</text:p>
      <text:p text:style-name="Text_20_body">Otros restos de cinturones.</text:p>
      <text:p text:style-name="Text_20_body">Uno de ellos todavía sujetaba algo entre los dedos.</text:p>
      <text:p text:style-name="Text_20_body">Una piedra.</text:p>
      <text:p text:style-name="Text_20_body">Nada más.</text:p>
      <text:p text:style-name="Text_20_body">Nohk se detuvo.</text:p>
      <text:p text:style-name="Text_20_body"><text:soft-page-break/>La visión le produjo una sensación incómoda.</text:p>
      <text:p text:style-name="Text_20_body">Aquellos hombres no parecían enterrados allí.</text:p>
      <text:p text:style-name="Text_20_body">Parecían haber muerto donde habían caído.</text:p>
      <text:p text:style-name="Text_20_body">Como si hubieran intentado alcanzar la puerta.</text:p>
      <text:p text:style-name="Text_20_body">O escapar de ella.</text:p>
      <text:p text:style-name="Text_20_body">Apartó la idea.</text:p>
      <text:p text:style-name="Text_20_body">Continuó avanzando.</text:p>
      <text:p text:style-name="Text_20_body">La bóveda no podía terminar allí.</text:p>
      <text:p text:style-name="Text_20_body">Tenía que existir algo más.</text:p>
      <text:p text:style-name="Text_20_body">Una sala interior.</text:p>
      <text:p text:style-name="Text_20_body">Un compartimento oculto.</text:p>
      <text:p text:style-name="Text_20_body">Un pasadizo secreto.</text:p>
      <text:p text:style-name="Text_20_body">Algo.</text:p>
      <text:p text:style-name="Text_20_body">Cualquier cosa.</text:p>
      <text:p text:style-name="Text_20_body">Pero cuanto más observaba, más evidente resultaba la verdad.</text:p>
      <text:p text:style-name="Text_20_body">La cámara estaba vacía.</text:p>
      <text:p text:style-name="Text_20_body">Completamente vacía.</text:p>
      <text:p text:style-name="Text_20_body">No había cofres.</text:p>
      <text:p text:style-name="Text_20_body">No había tesoro.</text:p>
      <text:p text:style-name="Text_20_body">No había pasillos.</text:p>
      <text:p text:style-name="Text_20_body">No había salidas.</text:p>
      <text:p text:style-name="Text_20_body">Sólo roca.</text:p>
      <text:p text:style-name="Text_20_body">Roca desnuda.</text:p>
      <text:p text:style-name="Text_20_body">Una habitación cerrada.</text:p>
      <text:p text:style-name="Text_20_body">Nada más.</text:p>
      <text:p text:style-name="Text_20_body">Llegó hasta la pared del fondo.</text:p>
      <text:p text:style-name="Text_20_body">La tocó.</text:p>
      <text:p text:style-name="Text_20_body">Sólida.</text:p>
      <text:p text:style-name="Text_20_body">Fría.</text:p>
      <text:p text:style-name="Text_20_body">Sin grietas.</text:p>
      <text:p text:style-name="Text_20_body"><text:soft-page-break/>Sin mecanismos.</text:p>
      <text:p text:style-name="Text_20_body">Sin secretos.</text:p>
      <text:p text:style-name="Text_20_body">Se volvió lentamente.</text:p>
      <text:p text:style-name="Text_20_body">La luz de la lámpara iluminó toda la estancia.</text:p>
      <text:p text:style-name="Text_20_body">Y entonces lo comprendió.</text:p>
      <text:p text:style-name="Text_20_body">Aquellos esqueletos.</text:p>
      <text:p text:style-name="Text_20_body">La habitación vacía.</text:p>
      <text:p text:style-name="Text_20_body">La ausencia de tesoro.</text:p>
      <text:p text:style-name="Text_20_body">Todo encajaba.</text:p>
      <text:p text:style-name="Text_20_body">Aquellos hombres habían venido buscando exactamente lo mismo que él.</text:p>
      <text:p text:style-name="Text_20_body">Habían encontrado la puerta.</text:p>
      <text:p text:style-name="Text_20_body">Habían abierto la cerradura.</text:p>
      <text:p text:style-name="Text_20_body">Habían entrado.</text:p>
      <text:p text:style-name="Text_20_body">Y jamás habían salido.</text:p>
      <text:p text:style-name="Text_20_body">Un ruido metálico interrumpió sus pensamientos.</text:p>
      <text:p text:style-name="Text_20_body">La puerta se movió.</text:p>
      <text:p text:style-name="Text_20_body">Nohk giró la cabeza.</text:p>
      <text:p text:style-name="Text_20_body">Durante una fracción de segundo observó cómo comenzaba a cerrarse.</text:p>
      <text:p text:style-name="Text_20_body">Después todo ocurrió demasiado rápido.</text:p>
      <text:p text:style-name="Text_20_body">La pesada hoja de hierro golpeó el marco con un estruendo ensordecedor.</text:p>
      <text:p text:style-name="Text_20_body">La roca entera pareció temblar.</text:p>
      <text:p text:style-name="Text_20_body">La llave salió despedida de la cerradura.</text:p>
      <text:p text:style-name="Text_20_body">Rebotó sobre la piedra.</text:p>
      <text:p text:style-name="Text_20_body">Y desapareció al otro lado de la puerta.</text:p>
      <text:p text:style-name="Text_20_body">Nohk corrió.</text:p>
      <text:p text:style-name="Text_20_body">Golpeó el hierro.</text:p>
      <text:p text:style-name="Text_20_body">Empujó.</text:p>
      <text:p text:style-name="Text_20_body">Intentó abrirla.</text:p>
      <text:p text:style-name="Text_20_body">Nada.</text:p>
      <text:p text:style-name="Text_20_body">La puerta no se movió.</text:p>
      <text:p text:style-name="Text_20_body"><text:soft-page-break/>Ni un milímetro.</text:p>
      <text:p text:style-name="Text_20_body">Empujó otra vez.</text:p>
      <text:p text:style-name="Text_20_body">Con más fuerza.</text:p>
      <text:p text:style-name="Text_20_body">Después golpeó.</text:p>
      <text:p text:style-name="Text_20_body">Después gritó.</text:p>
      <text:p text:style-name="Text_20_body">Nada.</text:p>
      <text:p text:style-name="Text_20_body">Sólo silencio.</text:p>
      <text:p text:style-name="Text_20_body">Un silencio absoluto.</text:p>
      <text:p text:style-name="Text_20_body">La lámpara temblaba en su mano.</text:p>
      <text:p text:style-name="Text_20_body">Respiraba agitadamente.</text:p>
      <text:p text:style-name="Text_20_body">Entonces observó la cerradura.</text:p>
      <text:p text:style-name="Text_20_body">No tenía mecanismo interior.</text:p>
      <text:p text:style-name="Text_20_body">No había manilla.</text:p>
      <text:p text:style-name="Text_20_body">No había pestillo.</text:p>
      <text:p text:style-name="Text_20_body">No había forma de abrirla desde dentro.</text:p>
      <text:p text:style-name="Text_20_body">Nohk permaneció inmóvil.</text:p>
      <text:p text:style-name="Text_20_body">Mirando el hierro.</text:p>
      <text:p text:style-name="Text_20_body">Sin respirar.</text:p>
      <text:p text:style-name="Text_20_body">Y por primera vez desde que encontró la llave comprendió la verdad.</text:p>
      <text:p text:style-name="Text_20_body">La bóveda nunca había protegido un tesoro.</text:p>
      <text:p text:style-name="Text_20_body">La bóveda era el tesoro.</text:p>
      <text:p text:style-name="Text_20_body">La llave no abría una cámara.</text:p>
      <text:p text:style-name="Text_20_body">La llave elegía a su próximo ocupante.</text:p>
      <text:p text:style-name="Text_20_body">Lentamente volvió la vista hacia los esqueletos.</text:p>
      <text:p text:style-name="Text_20_body">La lámpara iluminó los rostros vacíos.</text:p>
      <text:p text:style-name="Text_20_body">Las mandíbulas abiertas.</text:p>
      <text:p text:style-name="Text_20_body">Las cuencas oscuras.</text:p>
      <text:p text:style-name="Text_20_body">Y por primera vez no vio desconocidos.</text:p>
      <text:p text:style-name="Text_20_body">Vio compañeros.</text:p>
      <text:p text:style-name="Text_20_body">Vio hombres que habían recorrido el mismo camino.</text:p>
      <text:p text:style-name="Text_20_body"><text:soft-page-break/>Que habían seguido las mismas pistas.</text:p>
      <text:p text:style-name="Text_20_body">Que habían tomado las mismas decisiones.</text:p>
      <text:p text:style-name="Text_20_body">Que habían sacrificado las mismas cosas.</text:p>
      <text:p text:style-name="Text_20_body">Y que finalmente habían llegado exactamente al mismo lugar.</text:p>
      <text:p text:style-name="Text_20_body">La lámpara comenzó a temblar.</text:p>
      <text:p text:style-name="Text_20_body">No por el viento.</text:p>
      <text:p text:style-name="Text_20_body">No había viento allí dentro.</text:p>
      <text:p text:style-name="Text_20_body">Temblaba porque sus manos temblaban.</text:p>
      <text:p text:style-name="Text_20_body">Porque al fin comprendía lo que le esperaba.</text:p>
      <text:p text:style-name="Text_20_body">Y porque ya era demasiado tard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8T10:09:05.253000000</meta:creation-date>
    <dc:date>2026-06-28T10:13:48.895000000</dc:date>
    <meta:editing-duration>PT4M44S</meta:editing-duration>
    <meta:editing-cycles>1</meta:editing-cycles>
    <meta:document-statistic meta:table-count="0" meta:image-count="0" meta:object-count="0" meta:page-count="6" meta:paragraph-count="159" meta:word-count="660" meta:character-count="4049" meta:non-whitespace-character-count="3548"/>
    <meta:generator>LibreOffice/7.3.5.2$Windows_X86_64 LibreOffice_project/184fe81b8c8c30d8b5082578aee2fed2ea847c01</meta:generator>
  </office:meta>
</office:document-meta>
</file>