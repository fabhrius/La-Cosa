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451df"/>
    </style:style>
    <style:style style:name="P2" style:family="paragraph" style:parent-style-name="Text_20_body">
      <style:text-properties officeooo:paragraph-rsid="001451df"/>
    </style:style>
    <style:style style:name="P3" style:family="paragraph" style:parent-style-name="Standard">
      <style:text-properties officeooo:paragraph-rsid="00167e59"/>
    </style:style>
    <style:style style:name="P4" style:family="paragraph" style:parent-style-name="Text_20_body">
      <style:text-properties officeooo:paragraph-rsid="00167e59"/>
    </style:style>
    <style:style style:name="P5" style:family="paragraph" style:parent-style-name="Text_20_body">
      <style:text-properties officeooo:paragraph-rsid="001646b6"/>
    </style:style>
    <style:style style:name="P6" style:family="paragraph" style:parent-style-name="Text_20_body">
      <style:text-properties officeooo:paragraph-rsid="001753db"/>
    </style:style>
    <style:style style:name="T1" style:family="text">
      <style:text-properties officeooo:rsid="001451df"/>
    </style:style>
    <style:style style:name="T2" style:family="text">
      <style:text-properties officeooo:rsid="001646b6"/>
    </style:style>
    <style:style style:name="T3" style:family="text">
      <style:text-properties officeooo:rsid="00167e59"/>
    </style:style>
    <style:style style:name="T4" style:family="text">
      <style:text-properties officeooo:rsid="001753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3">Parte 1 - U</text:span>n nuevo día</text:h>
      <text:p text:style-name="Text_20_body"/>
      <text:p text:style-name="P2">Después de la noche llegó un nuevo día.</text:p>
      <text:p text:style-name="Text_20_body"><text:span text:style-name="T1">E</text:span>l sol brillaba sobre el mar<text:span text:style-name="T1"> </text:span>cuando un cuervo entró en la cueva.</text:p>
      <text:p text:style-name="P2">La luz de la mañana se filtraba por la entrada e iluminaba la puerta de hierro.</text:p>
      <text:p text:style-name="P2">Y sobre el suelo, un destello verde llamó la atención del ave.</text:p>
      <text:p text:style-name="P2">El cuervo se aproximó dando pequeños saltos.<text:span text:style-name="T1"> Observó el objeto durante unos segundos.</text:span></text:p>
      <text:p text:style-name="P6"><text:span text:style-name="T1">C</text:span>ogió la llave<text:span text:style-name="T1"> con sus patas y <text:s/>levantó el vuelo.</text:span></text:p>
      <text:p text:style-name="P6"><text:span text:style-name="T1">S</text:span>e alejó de la cueva en un instante.<text:span text:style-name="T1"> C</text:span>omo un ladrón que huye<text:span text:style-name="T1"> con el botín.</text:span></text:p>
      <text:p text:style-name="Text_20_body"/>
      <text:p text:style-name="P2">Atravesó los acantilados<text:span text:style-name="T4"> planeando entre las nubes</text:span><text:span text:style-name="T1">, y se elevó más y más en el aire.</text:span></text:p>
      <text:p text:style-name="P5">Sobrevoló las montañas.</text:p>
      <text:p text:style-name="P5">Los bosques.</text:p>
      <text:p text:style-name="P5">Los ríos.</text:p>
      <text:p text:style-name="P5">Voló durante horas impulsado por las corrientes de aire que ascendían desde los valles.</text:p>
      <text:p text:style-name="P5">Hasta que, en algún lugar lejano, dejó caer la llave<text:span text:style-name="T2"> a tierra, y se alejó</text:span>.</text:p>
      <text:p text:style-name="P5">El objeto giró varias veces en el aire.</text:p>
      <text:p text:style-name="P5">Y desapareció entre la hierba.</text:p>
      <text:p text:style-name="P5"/>
      <text:p text:style-name="P5">Era una tranquila mañana de primavera.</text:p>
      <text:p text:style-name="P5"><text:span text:style-name="T2">Y e</text:span>n una pequeña granja cerca del pueblo de Wetwood, un campesino llamado Jahnk caminaba por un sendero de tierra rumbo al mercado.</text:p>
      <text:p text:style-name="P5">El día era agradable.</text:p>
      <text:p text:style-name="P5">El cielo estaba despejado.</text:p>
      <text:p text:style-name="P5">Y sus pensamientos estaban ocupados por asuntos sencillos.</text:p>
      <text:p text:style-name="P5">La cosecha.</text:p>
      <text:p text:style-name="P5">Los animales.</text:p>
      <text:p text:style-name="P5">El precio del trigo.</text:p>
      <text:p text:style-name="P5">Entonces vio algo brillar entre la hierba.</text:p>
      <text:p text:style-name="P5">Se agachó.</text:p>
      <text:p text:style-name="P5"><text:soft-page-break/>Apartó unas ramas.</text:p>
      <text:p text:style-name="P5">Y lo recogió.</text:p>
      <text:p text:style-name="P5"/>
      <text:p text:style-name="P5">Era una vieja llave de hierro.</text:p>
      <text:p text:style-name="P5">Pesada.</text:p>
      <text:p text:style-name="P5">Extrañamente hermosa.</text:p>
      <text:p text:style-name="P5">Una piedra verde resplandecía en su empuñadura.</text:p>
      <text:p text:style-name="P5">Jahnk la observó con curiosidad.</text:p>
      <text:p text:style-name="P5">Le dio la vuelta entre las manos.</text:p>
      <text:p text:style-name="P5">Había un escudo grabado en el metal.</text:p>
      <text:p text:style-name="P5">Un símbolo que no reconoció.</text:p>
      <text:p text:style-name="P5">Sonrió.</text:p>
      <text:p text:style-name="P5">—Hoy es mi día de suerte.</text:p>
      <text:p text:style-name="P5">Guardó la llave en el bolsillo y continuó caminando hacia el pueblo.</text:p>
      <text:p text:style-name="P5">Sobre su cabeza, unas pocas nubes blancas avanzaban lentamente por el cielo.</text:p>
      <text:p text:style-name="P5">A sus espaldas, el viento agitaba la hierba.</text:p>
      <text:p text:style-name="P3"><text:span text:style-name="T3">Y</text:span> bajo sus pies<text:span text:style-name="T3">, el mundo</text:span> continuaba girando<text:span text:style-name="T3">.</text:span></text:p>
      <text:p text:style-name="P3"/>
      <text:p text:style-name="P4">Lento.</text:p>
      <text:p text:style-name="P4">Silencioso.</text:p>
      <text:p text:style-name="P4"><text:span text:style-name="T3">I</text:span>mperceptible<text:span text:style-name="T3">.</text:span></text:p>
      <text:p text:style-name="P4">Inevitab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7T11:32:13.069000000</meta:creation-date>
    <dc:date>2026-07-01T10:59:59.020000000</dc:date>
    <meta:editing-duration>PT20M37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46" meta:word-count="318" meta:character-count="1774" meta:non-whitespace-character-count="1501"/>
  </office:meta>
</office:document-meta>
</file>