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1dea"/>
    </style:style>
    <style:style style:name="P2" style:family="paragraph" style:parent-style-name="Text_20_body">
      <style:text-properties officeooo:paragraph-rsid="00131dea"/>
    </style:style>
    <style:style style:name="P3" style:family="paragraph" style:parent-style-name="Text_20_body">
      <style:text-properties officeooo:rsid="000b13a4" officeooo:paragraph-rsid="000b13a4"/>
    </style:style>
    <style:style style:name="P4" style:family="paragraph" style:parent-style-name="Text_20_body">
      <style:text-properties fo:color="#c9211e" loext:opacity="100%"/>
    </style:style>
    <style:style style:name="P5" style:family="paragraph" style:parent-style-name="Text_20_body">
      <style:text-properties officeooo:paragraph-rsid="0011fd8a"/>
    </style:style>
    <style:style style:name="P6" style:family="paragraph" style:parent-style-name="Heading_20_1">
      <style:text-properties officeooo:paragraph-rsid="00182f02"/>
    </style:style>
    <style:style style:name="P7" style:family="paragraph" style:parent-style-name="Heading_20_1">
      <style:text-properties officeooo:paragraph-rsid="0019e5ce"/>
    </style:style>
    <style:style style:name="P8" style:family="paragraph" style:parent-style-name="Heading_20_1">
      <style:text-properties officeooo:rsid="001bded6" officeooo:paragraph-rsid="001bded6"/>
    </style:style>
    <style:style style:name="P9" style:family="paragraph" style:parent-style-name="Heading_20_1">
      <style:text-properties officeooo:rsid="001bded6" officeooo:paragraph-rsid="001dbeda"/>
    </style:style>
    <style:style style:name="P10" style:family="paragraph" style:parent-style-name="Heading_20_1">
      <style:text-properties officeooo:rsid="001bded6" officeooo:paragraph-rsid="0020d45c"/>
    </style:style>
    <style:style style:name="P11" style:family="paragraph" style:parent-style-name="Heading_20_1">
      <style:text-properties officeooo:rsid="001bded6" officeooo:paragraph-rsid="00214ed6"/>
    </style:style>
    <style:style style:name="P12" style:family="paragraph" style:parent-style-name="Heading_20_1">
      <style:text-properties officeooo:rsid="001bded6" officeooo:paragraph-rsid="0022172f"/>
    </style:style>
    <style:style style:name="P13" style:family="paragraph" style:parent-style-name="Heading_20_1">
      <style:text-properties officeooo:paragraph-rsid="001bded6"/>
    </style:style>
    <style:style style:name="P14" style:family="paragraph" style:parent-style-name="Heading_20_1">
      <style:text-properties officeooo:paragraph-rsid="0020d45c"/>
    </style:style>
    <style:style style:name="P15" style:family="paragraph" style:parent-style-name="Heading_20_2">
      <style:text-properties officeooo:paragraph-rsid="00182f02"/>
    </style:style>
    <style:style style:name="P16" style:family="paragraph" style:parent-style-name="Heading_20_2">
      <style:text-properties officeooo:rsid="0005b2ec" officeooo:paragraph-rsid="0019e5ce"/>
    </style:style>
    <style:style style:name="P17" style:family="paragraph" style:parent-style-name="Heading_20_2">
      <style:text-properties officeooo:paragraph-rsid="0019e5ce"/>
    </style:style>
    <style:style style:name="P18" style:family="paragraph" style:parent-style-name="Heading_20_2">
      <style:text-properties officeooo:paragraph-rsid="001bded6"/>
    </style:style>
    <style:style style:name="P19" style:family="paragraph" style:parent-style-name="Heading_20_2">
      <style:text-properties officeooo:paragraph-rsid="001c7888"/>
    </style:style>
    <style:style style:name="P20" style:family="paragraph" style:parent-style-name="Heading_20_2">
      <style:text-properties officeooo:paragraph-rsid="001f2a26"/>
    </style:style>
    <style:style style:name="P21" style:family="paragraph" style:parent-style-name="Heading_20_2">
      <style:text-properties officeooo:paragraph-rsid="00211297"/>
    </style:style>
    <style:style style:name="P22" style:family="paragraph" style:parent-style-name="Heading_20_3">
      <style:text-properties officeooo:paragraph-rsid="001bded6"/>
    </style:style>
    <style:style style:name="P23" style:family="paragraph" style:parent-style-name="Heading_20_3">
      <style:text-properties fo:font-size="18pt" officeooo:paragraph-rsid="001bded6" style:font-size-asian="18pt" style:font-size-complex="18pt"/>
    </style:style>
    <style:style style:name="P24" style:family="paragraph" style:parent-style-name="Heading_20_3">
      <style:text-properties officeooo:rsid="00201e35" officeooo:paragraph-rsid="00211297"/>
    </style:style>
    <style:style style:name="P25" style:family="paragraph" style:parent-style-name="Heading_20_3">
      <style:text-properties officeooo:paragraph-rsid="00211297"/>
    </style:style>
    <style:style style:name="P26" style:family="paragraph" style:parent-style-name="Heading_20_3">
      <style:text-properties officeooo:paragraph-rsid="00214ed6"/>
    </style:style>
    <style:style style:name="P27" style:family="paragraph" style:parent-style-name="Heading_20_3">
      <style:text-properties officeooo:paragraph-rsid="0022172f"/>
    </style:style>
    <style:style style:name="P28" style:family="paragraph" style:parent-style-name="Horizontal_20_Line">
      <style:text-properties officeooo:paragraph-rsid="00182f02"/>
    </style:style>
    <style:style style:name="P29" style:family="paragraph" style:parent-style-name="Horizontal_20_Line">
      <style:text-properties officeooo:paragraph-rsid="0019e5ce"/>
    </style:style>
    <style:style style:name="P30" style:family="paragraph" style:parent-style-name="Horizontal_20_Line">
      <style:text-properties officeooo:paragraph-rsid="001bded6"/>
    </style:style>
    <style:style style:name="P31" style:family="paragraph" style:parent-style-name="Horizontal_20_Line">
      <style:text-properties officeooo:paragraph-rsid="001c7888"/>
    </style:style>
    <style:style style:name="P32" style:family="paragraph" style:parent-style-name="Horizontal_20_Line">
      <style:text-properties officeooo:paragraph-rsid="00211297"/>
    </style:style>
    <style:style style:name="P33" style:family="paragraph" style:parent-style-name="Horizontal_20_Line">
      <style:text-properties officeooo:paragraph-rsid="00214ed6"/>
    </style:style>
    <style:style style:name="P34" style:family="paragraph" style:parent-style-name="Standard">
      <style:text-properties officeooo:paragraph-rsid="00182f02"/>
    </style:style>
    <style:style style:name="P35" style:family="paragraph" style:parent-style-name="Standard">
      <style:text-properties officeooo:paragraph-rsid="001bded6"/>
    </style:style>
    <style:style style:name="P36" style:family="paragraph" style:parent-style-name="Standard">
      <style:text-properties officeooo:rsid="003d1c74" officeooo:paragraph-rsid="001c7888"/>
    </style:style>
    <style:style style:name="P37" style:family="paragraph" style:parent-style-name="Standard">
      <style:text-properties officeooo:rsid="001f3503" officeooo:paragraph-rsid="001c7888"/>
    </style:style>
    <style:style style:name="P38" style:family="paragraph" style:parent-style-name="Standard">
      <style:text-properties officeooo:rsid="002a7f37" officeooo:paragraph-rsid="001c7888"/>
    </style:style>
    <style:style style:name="P39" style:family="paragraph" style:parent-style-name="Standard">
      <style:text-properties officeooo:paragraph-rsid="001c7888"/>
    </style:style>
    <style:style style:name="P40" style:family="paragraph" style:parent-style-name="Standard">
      <style:text-properties officeooo:paragraph-rsid="00211297"/>
    </style:style>
    <style:style style:name="P41" style:family="paragraph" style:parent-style-name="Standard">
      <style:text-properties officeooo:paragraph-rsid="00214ed6"/>
    </style:style>
    <style:style style:name="P42" style:family="paragraph" style:parent-style-name="Standard">
      <style:text-properties officeooo:paragraph-rsid="0022172f"/>
    </style:style>
    <style:style style:name="P43" style:family="paragraph" style:parent-style-name="Text_20_body">
      <style:text-properties officeooo:rsid="000d0314" officeooo:paragraph-rsid="000d0314"/>
    </style:style>
    <style:style style:name="P44" style:family="paragraph" style:parent-style-name="Text_20_body">
      <style:text-properties officeooo:rsid="00131dea" officeooo:paragraph-rsid="00131dea"/>
    </style:style>
    <style:style style:name="P45" style:family="paragraph" style:parent-style-name="Text_20_body">
      <style:text-properties officeooo:paragraph-rsid="00182f02"/>
    </style:style>
    <style:style style:name="P46" style:family="paragraph" style:parent-style-name="Text_20_body">
      <style:text-properties officeooo:paragraph-rsid="0019e5ce"/>
    </style:style>
    <style:style style:name="P47" style:family="paragraph" style:parent-style-name="Text_20_body">
      <style:text-properties officeooo:rsid="001bded6" officeooo:paragraph-rsid="001bded6"/>
    </style:style>
    <style:style style:name="P48" style:family="paragraph" style:parent-style-name="Text_20_body">
      <style:text-properties officeooo:rsid="001bded6" officeooo:paragraph-rsid="001c7520"/>
    </style:style>
    <style:style style:name="P49" style:family="paragraph" style:parent-style-name="Text_20_body">
      <style:text-properties officeooo:rsid="001bded6" officeooo:paragraph-rsid="001c7888"/>
    </style:style>
    <style:style style:name="P50" style:family="paragraph" style:parent-style-name="Text_20_body">
      <style:text-properties officeooo:rsid="001bded6" officeooo:paragraph-rsid="0020d45c"/>
    </style:style>
    <style:style style:name="P51" style:family="paragraph" style:parent-style-name="Text_20_body">
      <style:text-properties officeooo:rsid="001bded6" officeooo:paragraph-rsid="00214ed6"/>
    </style:style>
    <style:style style:name="P52" style:family="paragraph" style:parent-style-name="Text_20_body">
      <style:text-properties officeooo:rsid="001bded6" officeooo:paragraph-rsid="0022172f"/>
    </style:style>
    <style:style style:name="P53" style:family="paragraph" style:parent-style-name="Text_20_body">
      <style:text-properties officeooo:rsid="00191a97" officeooo:paragraph-rsid="001bded6"/>
    </style:style>
    <style:style style:name="P54" style:family="paragraph" style:parent-style-name="Text_20_body">
      <style:text-properties officeooo:rsid="00190291" officeooo:paragraph-rsid="001bded6"/>
    </style:style>
    <style:style style:name="P55" style:family="paragraph" style:parent-style-name="Text_20_body">
      <style:text-properties officeooo:paragraph-rsid="001bded6"/>
    </style:style>
    <style:style style:name="P56" style:family="paragraph" style:parent-style-name="Text_20_body">
      <style:text-properties officeooo:rsid="00290660" officeooo:paragraph-rsid="001c7888"/>
    </style:style>
    <style:style style:name="P57" style:family="paragraph" style:parent-style-name="Text_20_body">
      <style:text-properties officeooo:rsid="001f3503" officeooo:paragraph-rsid="001c7888"/>
    </style:style>
    <style:style style:name="P58" style:family="paragraph" style:parent-style-name="Text_20_body">
      <style:text-properties fo:color="#c9211e" loext:opacity="100%" officeooo:paragraph-rsid="001c7888"/>
    </style:style>
    <style:style style:name="P59" style:family="paragraph" style:parent-style-name="Text_20_body">
      <style:text-properties fo:color="#c9211e" loext:opacity="100%" officeooo:rsid="001b055b" officeooo:paragraph-rsid="00211297"/>
    </style:style>
    <style:style style:name="P60" style:family="paragraph" style:parent-style-name="Text_20_body">
      <style:text-properties fo:color="#c9211e" loext:opacity="100%" officeooo:paragraph-rsid="00211297"/>
    </style:style>
    <style:style style:name="P61" style:family="paragraph" style:parent-style-name="Text_20_body">
      <style:text-properties officeooo:rsid="0020edb9" officeooo:paragraph-rsid="001c7888"/>
    </style:style>
    <style:style style:name="P62" style:family="paragraph" style:parent-style-name="Text_20_body">
      <style:text-properties officeooo:rsid="0023b558" officeooo:paragraph-rsid="001c7888"/>
    </style:style>
    <style:style style:name="P63" style:family="paragraph" style:parent-style-name="Text_20_body">
      <style:text-properties officeooo:rsid="001b98dd" officeooo:paragraph-rsid="001c7888"/>
    </style:style>
    <style:style style:name="P64" style:family="paragraph" style:parent-style-name="Text_20_body">
      <style:text-properties officeooo:paragraph-rsid="001c7888"/>
    </style:style>
    <style:style style:name="P65" style:family="paragraph" style:parent-style-name="Text_20_body">
      <style:text-properties officeooo:rsid="001b055b" officeooo:paragraph-rsid="00211297"/>
    </style:style>
    <style:style style:name="P66" style:family="paragraph" style:parent-style-name="Text_20_body">
      <style:text-properties officeooo:paragraph-rsid="00211297"/>
    </style:style>
    <style:style style:name="P67" style:family="paragraph" style:parent-style-name="Text_20_body">
      <style:text-properties officeooo:rsid="0011458c" officeooo:paragraph-rsid="00214ed6"/>
    </style:style>
    <style:style style:name="P68" style:family="paragraph" style:parent-style-name="Text_20_body">
      <style:text-properties officeooo:rsid="000cf993" officeooo:paragraph-rsid="00214ed6"/>
    </style:style>
    <style:style style:name="P69" style:family="paragraph" style:parent-style-name="Text_20_body">
      <style:text-properties officeooo:rsid="000dde6b" officeooo:paragraph-rsid="00214ed6"/>
    </style:style>
    <style:style style:name="P70" style:family="paragraph" style:parent-style-name="Text_20_body">
      <style:text-properties officeooo:rsid="000f2d7c" officeooo:paragraph-rsid="00214ed6"/>
    </style:style>
    <style:style style:name="P71" style:family="paragraph" style:parent-style-name="Text_20_body">
      <style:text-properties officeooo:rsid="0014d8ee" officeooo:paragraph-rsid="00214ed6"/>
    </style:style>
    <style:style style:name="P72" style:family="paragraph" style:parent-style-name="Text_20_body">
      <style:text-properties officeooo:rsid="001100a6" officeooo:paragraph-rsid="00214ed6"/>
    </style:style>
    <style:style style:name="P73" style:family="paragraph" style:parent-style-name="Text_20_body">
      <style:text-properties officeooo:rsid="0017e81f" officeooo:paragraph-rsid="00214ed6"/>
    </style:style>
    <style:style style:name="P74" style:family="paragraph" style:parent-style-name="Text_20_body">
      <style:text-properties officeooo:rsid="0019e633" officeooo:paragraph-rsid="00214ed6"/>
    </style:style>
    <style:style style:name="P75" style:family="paragraph" style:parent-style-name="Text_20_body">
      <style:text-properties officeooo:rsid="00226cf7" officeooo:paragraph-rsid="00214ed6"/>
    </style:style>
    <style:style style:name="P76" style:family="paragraph" style:parent-style-name="Text_20_body">
      <style:text-properties officeooo:rsid="00232f81" officeooo:paragraph-rsid="00214ed6"/>
    </style:style>
    <style:style style:name="P77" style:family="paragraph" style:parent-style-name="Text_20_body">
      <style:text-properties officeooo:rsid="0024d3a6" officeooo:paragraph-rsid="00214ed6"/>
    </style:style>
    <style:style style:name="P78" style:family="paragraph" style:parent-style-name="Text_20_body">
      <style:text-properties officeooo:paragraph-rsid="00214ed6"/>
    </style:style>
    <style:style style:name="P79" style:family="paragraph" style:parent-style-name="Text_20_body">
      <style:text-properties officeooo:paragraph-rsid="0022172f"/>
    </style:style>
    <style:style style:name="T1" style:family="text">
      <style:text-properties officeooo:rsid="000d0314"/>
    </style:style>
    <style:style style:name="T2" style:family="text">
      <style:text-properties officeooo:rsid="000eaf09"/>
    </style:style>
    <style:style style:name="T3" style:family="text">
      <style:text-properties officeooo:rsid="000f039e"/>
    </style:style>
    <style:style style:name="T4" style:family="text">
      <style:text-properties officeooo:rsid="000f195a"/>
    </style:style>
    <style:style style:name="T5" style:family="text">
      <style:text-properties officeooo:rsid="000f32ae"/>
    </style:style>
    <style:style style:name="T6" style:family="text">
      <style:text-properties officeooo:rsid="000f5bd4"/>
    </style:style>
    <style:style style:name="T7" style:family="text">
      <style:text-properties officeooo:rsid="0010de22"/>
    </style:style>
    <style:style style:name="T8" style:family="text">
      <style:text-properties officeooo:rsid="0011fd8a"/>
    </style:style>
    <style:style style:name="T9" style:family="text">
      <style:text-properties officeooo:rsid="00131dea"/>
    </style:style>
    <style:style style:name="T10" style:family="text">
      <style:text-properties officeooo:rsid="00182e09"/>
    </style:style>
    <style:style style:name="T11" style:family="text">
      <style:text-properties officeooo:rsid="0018619c"/>
    </style:style>
    <style:style style:name="T12" style:family="text">
      <style:text-properties officeooo:rsid="00187959"/>
    </style:style>
    <style:style style:name="T13" style:family="text">
      <style:text-properties officeooo:rsid="001a2166"/>
    </style:style>
    <style:style style:name="T14" style:family="text">
      <style:text-properties officeooo:rsid="00182f02"/>
    </style:style>
    <style:style style:name="T15" style:family="text">
      <style:text-properties officeooo:rsid="00024e08"/>
    </style:style>
    <style:style style:name="T16" style:family="text">
      <style:text-properties officeooo:rsid="0004062b"/>
    </style:style>
    <style:style style:name="T17" style:family="text">
      <style:text-properties officeooo:rsid="0005b2ec"/>
    </style:style>
    <style:style style:name="T18" style:family="text">
      <style:text-properties officeooo:rsid="0019e5ce"/>
    </style:style>
    <style:style style:name="T19" style:family="text">
      <style:text-properties officeooo:rsid="001a492d"/>
    </style:style>
    <style:style style:name="T20" style:family="text">
      <style:text-properties officeooo:rsid="001bded6"/>
    </style:style>
    <style:style style:name="T21" style:family="text">
      <style:text-properties officeooo:rsid="0015cf2a"/>
    </style:style>
    <style:style style:name="T22" style:family="text">
      <style:text-properties officeooo:rsid="00160733"/>
    </style:style>
    <style:style style:name="T23" style:family="text">
      <style:text-properties officeooo:rsid="001669ff"/>
    </style:style>
    <style:style style:name="T24" style:family="text">
      <style:text-properties officeooo:rsid="0017ce8d"/>
    </style:style>
    <style:style style:name="T25" style:family="text">
      <style:text-properties officeooo:rsid="00183fba"/>
    </style:style>
    <style:style style:name="T26" style:family="text">
      <style:text-properties officeooo:rsid="00190291"/>
    </style:style>
    <style:style style:name="T27" style:family="text">
      <style:text-properties officeooo:rsid="00191a97"/>
    </style:style>
    <style:style style:name="T28" style:family="text">
      <style:text-properties officeooo:rsid="001a9649"/>
    </style:style>
    <style:style style:name="T29" style:family="text">
      <style:text-properties officeooo:rsid="001c7520"/>
    </style:style>
    <style:style style:name="T30" style:family="text">
      <style:text-properties officeooo:rsid="001cad6f"/>
    </style:style>
    <style:style style:name="T31" style:family="text">
      <style:text-properties officeooo:rsid="001b98dd"/>
    </style:style>
    <style:style style:name="T32" style:family="text">
      <style:text-properties officeooo:rsid="00268109"/>
    </style:style>
    <style:style style:name="T33" style:family="text">
      <style:text-properties officeooo:rsid="001d5d84"/>
    </style:style>
    <style:style style:name="T34" style:family="text">
      <style:text-properties officeooo:rsid="00274f7d"/>
    </style:style>
    <style:style style:name="T35" style:family="text">
      <style:text-properties officeooo:rsid="00290660"/>
    </style:style>
    <style:style style:name="T36" style:family="text">
      <style:text-properties officeooo:rsid="001f3503"/>
    </style:style>
    <style:style style:name="T37" style:family="text">
      <style:text-properties officeooo:rsid="00396b7a"/>
    </style:style>
    <style:style style:name="T38" style:family="text">
      <style:text-properties officeooo:rsid="001f357e"/>
    </style:style>
    <style:style style:name="T39" style:family="text">
      <style:text-properties officeooo:rsid="0020edb9"/>
    </style:style>
    <style:style style:name="T40" style:family="text">
      <style:text-properties officeooo:rsid="002010f6"/>
    </style:style>
    <style:style style:name="T41" style:family="text">
      <style:text-properties officeooo:rsid="00399472"/>
    </style:style>
    <style:style style:name="T42" style:family="text">
      <style:text-properties officeooo:rsid="0029d198"/>
    </style:style>
    <style:style style:name="T43" style:family="text">
      <style:text-properties officeooo:rsid="0022aab3"/>
    </style:style>
    <style:style style:name="T44" style:family="text">
      <style:text-properties officeooo:rsid="002e473b"/>
    </style:style>
    <style:style style:name="T45" style:family="text">
      <style:text-properties officeooo:rsid="002a7f37"/>
    </style:style>
    <style:style style:name="T46" style:family="text">
      <style:text-properties officeooo:rsid="0023b558"/>
    </style:style>
    <style:style style:name="T47" style:family="text">
      <style:text-properties officeooo:rsid="00377a64"/>
    </style:style>
    <style:style style:name="T48" style:family="text">
      <style:text-properties officeooo:rsid="003ae9b0"/>
    </style:style>
    <style:style style:name="T49" style:family="text">
      <style:text-properties officeooo:rsid="0037e646"/>
    </style:style>
    <style:style style:name="T50" style:family="text">
      <style:text-properties officeooo:rsid="001dbeda"/>
    </style:style>
    <style:style style:name="T51" style:family="text">
      <style:text-properties officeooo:rsid="0020d45c"/>
    </style:style>
    <style:style style:name="T52" style:family="text">
      <style:text-properties officeooo:rsid="00211297"/>
    </style:style>
    <style:style style:name="T53" style:family="text">
      <style:text-properties officeooo:rsid="001ca8dd"/>
    </style:style>
    <style:style style:name="T54" style:family="text">
      <style:text-properties officeooo:rsid="00201e35"/>
    </style:style>
    <style:style style:name="T55" style:family="text">
      <style:text-properties officeooo:rsid="0021653f"/>
    </style:style>
    <style:style style:name="T56" style:family="text">
      <style:text-properties officeooo:rsid="001d67f1"/>
    </style:style>
    <style:style style:name="T57" style:family="text">
      <style:text-properties officeooo:rsid="001eb40a"/>
    </style:style>
    <style:style style:name="T58" style:family="text">
      <style:text-properties officeooo:rsid="001f49b2"/>
    </style:style>
    <style:style style:name="T59" style:family="text">
      <style:text-properties officeooo:rsid="001b055b"/>
    </style:style>
    <style:style style:name="T60" style:family="text">
      <style:text-properties officeooo:rsid="001b332b"/>
    </style:style>
    <style:style style:name="T61" style:family="text">
      <style:text-properties officeooo:rsid="00214ed6"/>
    </style:style>
    <style:style style:name="T62" style:family="text">
      <style:text-properties officeooo:rsid="000cf993"/>
    </style:style>
    <style:style style:name="T63" style:family="text">
      <style:text-properties officeooo:rsid="0011458c"/>
    </style:style>
    <style:style style:name="T64" style:family="text">
      <style:text-properties officeooo:rsid="0014d8ee"/>
    </style:style>
    <style:style style:name="T65" style:family="text">
      <style:text-properties officeooo:rsid="000dde6b"/>
    </style:style>
    <style:style style:name="T66" style:family="text">
      <style:text-properties officeooo:rsid="00128437"/>
    </style:style>
    <style:style style:name="T67" style:family="text">
      <style:text-properties officeooo:rsid="000f2d7c"/>
    </style:style>
    <style:style style:name="T68" style:family="text">
      <style:text-properties officeooo:rsid="001100a6"/>
    </style:style>
    <style:style style:name="T69" style:family="text">
      <style:text-properties officeooo:rsid="0015eb07"/>
    </style:style>
    <style:style style:name="T70" style:family="text">
      <style:text-properties officeooo:rsid="001681a1"/>
    </style:style>
    <style:style style:name="T71" style:family="text">
      <style:text-properties officeooo:rsid="0017e81f"/>
    </style:style>
    <style:style style:name="T72" style:family="text">
      <style:text-properties officeooo:rsid="00284ec2"/>
    </style:style>
    <style:style style:name="T73" style:family="text">
      <style:text-properties officeooo:rsid="0019e633"/>
    </style:style>
    <style:style style:name="T74" style:family="text">
      <style:text-properties officeooo:rsid="001b9214"/>
    </style:style>
    <style:style style:name="T75" style:family="text">
      <style:text-properties officeooo:rsid="001d830f"/>
    </style:style>
    <style:style style:name="T76" style:family="text">
      <style:text-properties officeooo:rsid="00294fac"/>
    </style:style>
    <style:style style:name="T77" style:family="text">
      <style:text-properties officeooo:rsid="00226cf7"/>
    </style:style>
    <style:style style:name="T78" style:family="text">
      <style:text-properties officeooo:rsid="00232f81"/>
    </style:style>
    <style:style style:name="T79" style:family="text">
      <style:text-properties officeooo:rsid="002a1e45"/>
    </style:style>
    <style:style style:name="T80" style:family="text">
      <style:text-properties officeooo:rsid="0024d3a6"/>
    </style:style>
    <style:style style:name="T81" style:family="text">
      <style:text-properties officeooo:rsid="0025c5f2"/>
    </style:style>
    <style:style style:name="T82" style:family="text">
      <style:text-properties officeooo:rsid="0022172f"/>
    </style:style>
    <style:style style:name="T83" style:family="text">
      <style:text-properties officeooo:rsid="00167e59"/>
    </style:style>
    <style:style style:name="T84" style:family="text">
      <style:text-properties officeooo:rsid="001451df"/>
    </style:style>
    <style:style style:name="T85" style:family="text">
      <style:text-properties officeooo:rsid="001753db"/>
    </style:style>
    <style:style style:name="T86" style:family="text">
      <style:text-properties officeooo:rsid="00164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P13" text:outline-level="1"><text:span text:style-name="T20">Acto 1</text:span> - <text:span text:style-name="T20">Un día de suerte</text:span></text:h>
      <text:p text:style-name="P55"/>
      <text:h text:style-name="Heading_20_1" text:outline-level="1">Capítulo 1 - La llave de hierro</text:h>
      <text:h text:style-name="Heading_20_2" text:outline-level="2"/>
      <text:h text:style-name="Heading_20_2" text:outline-level="2"><text:span text:style-name="T5">Parte 1 - </text:span>El valle</text:h>
      <text:p text:style-name="Text_20_body"/>
      <text:p text:style-name="P3">Sucedio durante el reinado de Aldouseadhrickan<text:span text:style-name="T1">.</text:span></text:p>
      <text:p text:style-name="P43">En algun lugar del valle al este de las montañas. Allí, donde el río Bager desciende de las tierras altas atravesando los bosques de Oldwood, vivía un joven campesino llamado Nohk.</text:p>
      <text:p text:style-name="Text_20_body">Poseía una pequeña casa de madera construida junto al río, en una estrecha franja de terreno fértil donde cultivaba granos y criaba algunos animales: cuatro gallinas, cuatro cabras<text:span text:style-name="T1">,</text:span> dos caballos.</text:p>
      <text:p text:style-name="Text_20_body">No era rico.</text:p>
      <text:p text:style-name="Text_20_body">Pero tampoco era pobre.</text:p>
      <text:p text:style-name="Text_20_body">Tenía suficiente para vivir.</text:p>
      <text:p text:style-name="Text_20_body">Y en aquellos tiempos, aquello era una fortuna.</text:p>
      <text:p text:style-name="Text_20_body">Las mañanas comenzaban con la luz dorada del amanecer reflejándose sobre el agua.</text:p>
      <text:p text:style-name="Text_20_body">Las tardes transcurrían entre el trabajo de los campos y el sonido constante del río golpeando suavemente contra las raíces de los árboles.</text:p>
      <text:p text:style-name="Text_20_body">Y por las noches, cuando el viento descendía desde las montañas, el valle quedaba envuelto en un silencio tan profundo que podía escucharse el canto lejano de los búhos en el bosque.</text:p>
      <text:p text:style-name="Text_20_body">Nohk amaba aquel lugar.</text:p>
      <text:p text:style-name="Text_20_body">Conocía cada curva del río.<text:span text:style-name="T1"> </text:span>Cada árbol.<text:span text:style-name="T1"> </text:span>Cada sendero.</text:p>
      <text:p text:style-name="Text_20_body">Sabía dónde crecían las flores en primavera y dónde aparecían los primeros hongos después de la lluvia.</text:p>
      <text:p text:style-name="Text_20_body">Aquella parte del mundo parecía existir fuera del tiempo.</text:p>
      <text:p text:style-name="Text_20_body">Todo encontraba allí un equilibrio perfecto.</text:p>
      <text:p text:style-name="Text_20_body"><text:soft-page-break/>La lluvia llegaba cuando era necesaria.<text:span text:style-name="T2"> </text:span>El sol calentaba sin quemar.<text:span text:style-name="T2"> </text:span>Las cosechas crecían.<text:span text:style-name="T2"> </text:span>Los animales prosperaban.<text:span text:style-name="T2"> </text:span>Y los años pasaban con una serenidad que hacía difícil imaginar que algo pudiera cambiar.</text:p>
      <text:p text:style-name="Text_20_body">Algunas tardes caminaba hasta el pueblo.</text:p>
      <text:p text:style-name="Text_20_body">No estaba lejos.<text:span text:style-name="T3"> </text:span>Media hora siguiendo el sendero que atravesaba el bosque.</text:p>
      <text:p text:style-name="Text_20_body">Allí compraba herramientas, vendía parte de sus productos o simplemente se reunía con los amigos en la cantina.</text:p>
      <text:p text:style-name="Text_20_body">Aquellos encuentros eran una de las pocas diversiones disponibles en la región.</text:p>
      <text:p text:style-name="Text_20_body">Los jóvenes discutían negocios, hablaban de cosechas, intercambiaban noticias y soñaban con proyectos que casi nunca llegaban a realizar.</text:p>
      <text:p text:style-name="Text_20_body">Y aunque todos se quejaban ocasionalmente de la monotonía de la vida rural, en el fondo ninguno deseaba realmente cambiarla.</text:p>
      <text:p text:style-name="Text_20_body">Eran felices.</text:p>
      <text:p text:style-name="Text_20_body">Tal vez sin saberlo.</text:p>
      <text:p text:style-name="Text_20_body"/>
      <text:p text:style-name="Text_20_body">Aquella tarde parecía una más entre tantas otras.</text:p>
      <text:p text:style-name="Text_20_body">El sol descendía lentamente detrás de las montañas.<text:span text:style-name="T4"> </text:span>Una brisa suave agitaba las hojas de los árboles.</text:p>
      <text:p text:style-name="Text_20_body">Y Nohk caminaba hacia el pueblo siguiendo el sendero habitual.</text:p>
      <text:p text:style-name="Text_20_body"/>
      <text:p text:style-name="Text_20_body">Entonces vio algo extraño.</text:p>
      <text:p text:style-name="Text_20_body">Un destello.<text:span text:style-name="T5"> </text:span>Algo brillaba entre la hierba.</text:p>
      <text:p text:style-name="P4"/>
      <text:p text:style-name="Text_20_body">Nohk abandonó el sendero y se acercó.</text:p>
      <text:p text:style-name="Text_20_body"/>
      <text:p text:style-name="Horizontal_20_Line"/>
      <text:h text:style-name="Heading_20_2" text:outline-level="2"/>
      <text:h text:style-name="Heading_20_2" text:outline-level="2"><text:span text:style-name="T6">Parte 2 - </text:span>La llave</text:h>
      <text:p text:style-name="Text_20_body"/>
      <text:p text:style-name="Text_20_body">El brillo procedía de la base de un viejo roble.</text:p>
      <text:p text:style-name="Text_20_body">Entre la maleza sobresalía parcialmente un objeto metálico.</text:p>
      <text:p text:style-name="Text_20_body">Nohk apartó algunas ramas<text:span text:style-name="T7"> y </text:span>lo recogió.</text:p>
      <text:p text:style-name="Text_20_body"><text:soft-page-break/>Era una llave<text:span text:style-name="T7"> </text:span>de hierro.</text:p>
      <text:p text:style-name="Text_20_body"><text:span text:style-name="T7">Aunque</text:span> no se parecía a ninguna que hubiera visto antes.</text:p>
      <text:p text:style-name="Text_20_body">Era más grande que las <text:span text:style-name="T7">de las </text:span>cerraduras habituales.</text:p>
      <text:p text:style-name="Text_20_body">El metal estaba trabajado con una precisión poco común.</text:p>
      <text:p text:style-name="Text_20_body">El mango formaba un diseño elegante compuesto por líneas curvas y figuras geométricas entrelazadas.</text:p>
      <text:p text:style-name="Text_20_body">Y en el centro destacaba una piedra verde del tamaño de una nuez.</text:p>
      <text:p text:style-name="Text_20_body">La gema capturaba la luz del sol y la devolvía en destellos esmeralda.</text:p>
      <text:p text:style-name="Text_20_body">Aquello era lo que había llamado su atención desde el sendero.</text:p>
      <text:p text:style-name="Text_20_body"/>
      <text:p text:style-name="Text_20_body">Nohk giró la pieza entre los dedos.</text:p>
      <text:p text:style-name="Text_20_body">Pesaba más de lo esperado.</text:p>
      <text:p text:style-name="Text_20_body">En uno de los lados descubrió un símbolo grabado en el metal.</text:p>
      <text:p text:style-name="Text_20_body">Parecía un escudo.<text:span text:style-name="T7"> </text:span>O tal vez un emblema real.</text:p>
      <text:p text:style-name="Text_20_body">Era un objeto demasiado valioso para pertenecer a un campesino.</text:p>
      <text:p text:style-name="Text_20_body">Tal vez algún noble la había perdido durante un viaje.<text:span text:style-name="T7"> </text:span>Tal vez había caído de un carruaje.</text:p>
      <text:p text:style-name="Text_20_body"/>
      <text:p text:style-name="Text_20_body">Aquella piedra por sí sola podía valer una pequeña fortuna.</text:p>
      <text:p text:style-name="Text_20_body">Quizá podría venderla en el pueblo.</text:p>
      <text:p text:style-name="Text_20_body">Con un buen comprador tal vez conseguiría dinero suficiente para comprar un carro nuevo.</text:p>
      <text:p text:style-name="Text_20_body">O reparar el tejado antes del invierno.</text:p>
      <text:p text:style-name="Text_20_body">Guardó la llave en una bolsa de cuero y retomó el camino.</text:p>
      <text:p text:style-name="Text_20_body"/>
      <text:h text:style-name="Heading_20_2" text:outline-level="2"><text:span text:style-name="T9">Parte 3 - </text:span>La leyenda</text:h>
      <text:p text:style-name="Text_20_body"/>
      <text:p text:style-name="Text_20_body">Como siempre que llegaba al pueblo, su primera parada fue la cantina.</text:p>
      <text:p text:style-name="Text_20_body">Era un edificio grande de madera oscura situado junto a la plaza principal.</text:p>
      <text:p text:style-name="Text_20_body">A aquella hora estaba bastante concurrido.</text:p>
      <text:p text:style-name="Text_20_body">Campesinos.<text:span text:style-name="T8"> </text:span>Mercaderes.<text:span text:style-name="T8"> </text:span>Artesanos.</text:p>
      <text:p text:style-name="Text_20_body">La mayoría conversaba animadamente alrededor de largas mesas comunales.</text:p>
      <text:p text:style-name="Text_20_body"><text:soft-page-break/>Nohk localizó enseguida a sus amigos.</text:p>
      <text:p text:style-name="Text_20_body">Cinco jóvenes del pueblo discutían sobre intercambios de mercancías y precios de las cosechas.</text:p>
      <text:p text:style-name="Text_20_body">Gran parte de los acuerdos comerciales de la región comenzaban precisamente allí.</text:p>
      <text:p text:style-name="Text_20_body">Entre jarras de cerveza y discusiones interminables.</text:p>
      <text:p text:style-name="Text_20_body">Nohk tomó asiento.</text:p>
      <text:p text:style-name="Text_20_body">—¿Qué os parece esto? —preguntó.</text:p>
      <text:p text:style-name="Text_20_body">Y dejó la llave sobre la mesa.</text:p>
      <text:p text:style-name="Text_20_body">La conversación se detuvo inmediatamente.</text:p>
      <text:p text:style-name="Text_20_body">Todos miraron el objeto.</text:p>
      <text:p text:style-name="Text_20_body">La piedra verde brilló bajo la luz de las lámparas.</text:p>
      <text:p text:style-name="Text_20_body"/>
      <text:p text:style-name="Text_20_body">Uno de ellos la tomó entre las manos.<text:span text:style-name="T8"> </text:span>Otro examinó el símbolo grabado.<text:span text:style-name="T8"> </text:span>Un tercero comprobó el peso.</text:p>
      <text:p text:style-name="Text_20_body">Durante varios minutos intercambiaron opiniones.</text:p>
      <text:p text:style-name="Text_20_body">—No es una llave corriente.</text:p>
      <text:p text:style-name="Text_20_body">Aquello confirmaba sus sospechas.</text:p>
      <text:p text:style-name="Text_20_body">Quizá realmente había encontrado algo valioso.</text:p>
      <text:p text:style-name="Text_20_body">Los comentarios comenzaron a volverse cada vez más entusiastas.<text:span text:style-name="T8"> </text:span>Discutieron posibles compradores.</text:p>
      <text:p text:style-name="Text_20_body">Calcularon precios.<text:span text:style-name="T8"> </text:span>Imaginaron distintas maneras de venderla.</text:p>
      <text:p text:style-name="Text_20_body"/>
      <text:p text:style-name="Text_20_body">Hasta que una voz interrumpió la conversación.</text:p>
      <text:p text:style-name="P5">—Esperad.<text:span text:style-name="T8"> He visto esta llave antes.</text:span></text:p>
      <text:p text:style-name="P5">Quien había hablado<text:span text:style-name="T8">, Ghim</text:span><text:span text:style-name="T9">, </text:span><text:span text:style-name="T8">el ma</text:span><text:span text:style-name="T9">s joven del grupo,</text:span> <text:span text:style-name="T8">t</text:span>enía la llave entre las manos y la observaba con expresión extraña.</text:p>
      <text:p text:style-name="P2">—En un libro antiguo.<text:span text:style-name="T9"> En casa de Jorhm.</text:span></text:p>
      <text:p text:style-name="P44">­Aquello llamó inmediatamente la atención de todos.</text:p>
      <text:p text:style-name="P2">Jorhm era un anciano conocido por conservar una colección de manuscritos heredados de generaciones anteriores.</text:p>
      <text:p text:style-name="P2">Libros extraños.<text:span text:style-name="T9"> </text:span>Viejas leyendas.<text:span text:style-name="T9"> </text:span>Historias olvidadas.<text:span text:style-name="T9"> </text:span>Nadie les prestaba demasiada atención.</text:p>
      <text:p text:style-name="P2">—Estoy seguro —continuó el joven—. Es exactamente la misma llave.</text:p>
      <text:p text:style-name="P1">Nohk dejó de verla como un simple objeto valioso.<text:span text:style-name="T9"> </text:span>Quizá aquella pieza de hierro escondía una historia.</text:p>
      <text:p text:style-name="P1"/>
      <text:p text:style-name="P2"><text:soft-page-break/>—Si yo fuera tú —añadió finalmente—, averiguaría más antes de venderla.</text:p>
      <text:p text:style-name="P2">Podría valer más de lo que <text:span text:style-name="T9">piensas</text:span>.</text:p>
      <text:p text:style-name="Text_20_body"/>
      <text:p text:style-name="Text_20_body"/>
      <text:p text:style-name="Horizontal_20_Line"/>
      <text:p text:style-name="Text_20_body"/>
      <text:h text:style-name="P6" text:outline-level="1">Capítulo <text:span text:style-name="T14">2</text:span> - <text:span text:style-name="T14">El tesoro del rey</text:span></text:h>
      <text:p text:style-name="P34"/>
      <text:h text:style-name="P15" text:outline-level="2"><text:span text:style-name="T10"><text:s/>Parte 1 - </text:span>El libro</text:h>
      <text:p text:style-name="P45"/>
      <text:p text:style-name="P45">La casa de Jorhm se encontraba en el extremo norte del pueblo, junto a un pequeño viñedo que descendía suavemente hacia el río.</text:p>
      <text:p text:style-name="P45">Los seis amigos recorrieron el camino casi sin hablar.<text:span text:style-name="T10"> </text:span>La emoción había sustituido a las bromas de la cantina.<text:span text:style-name="T10"> </text:span>Todos sentían la misma curiosidad.</text:p>
      <text:p text:style-name="P45">Si el anciano reconocía la llave, tal vez pudieran descubrir cuánto valía realmente.</text:p>
      <text:p text:style-name="P45">O quizá averiguar quién la había perdido.</text:p>
      <text:p text:style-name="P45">Cuando llegaron, encontraron a Jorhm sentado bajo una parra cubierta de hojas verdes.</text:p>
      <text:p text:style-name="P45">El anciano descansaba en una silla de madera observando el atardecer.</text:p>
      <text:p text:style-name="P45">Los últimos rayos del sol iluminaban las vides y teñían de oro los muros de piedra de la casa.</text:p>
      <text:p text:style-name="P45">Parecía completamente ajeno a la agitación que se acercaba por el camino.</text:p>
      <text:p text:style-name="P45">—¡Jorhm! —llamó Kempht mientras se aproximaban.</text:p>
      <text:p text:style-name="P45">El anciano levantó la vista.</text:p>
      <text:p text:style-name="P45">—¿Qué ocurre? ¿Se está quemando el pueblo?</text:p>
      <text:p text:style-name="P45">Los jóvenes rieron.</text:p>
      <text:p text:style-name="P45">—No exactamente.</text:p>
      <text:p text:style-name="P45">Kempht sacó la llave y se la mostró.</text:p>
      <text:p text:style-name="P45">—Mira esto.</text:p>
      <text:p text:style-name="P45">Jorhm extendió la mano sin demasiado interés.</text:p>
      <text:p text:style-name="P45">Pero en cuanto sus dedos tocaron el metal, su expresión cambió.</text:p>
      <text:p text:style-name="P45"><text:soft-page-break/>La sonrisa desapareció.<text:span text:style-name="T11"> </text:span>Acercó la llave a sus ojos.<text:span text:style-name="T11"> </text:span>La giró lentamente.<text:span text:style-name="T11"> </text:span>Observó la piedra verde.</text:p>
      <text:p text:style-name="P45">Luego el escudo grabado.<text:span text:style-name="T12"> </text:span>Y finalmente volvió a examinar la piedra.</text:p>
      <text:p text:style-name="P45">Durante varios segundos nadie dijo nada.</text:p>
      <text:p text:style-name="P45">El anciano parecía incapaz de apartar la vista del objeto.</text:p>
      <text:p text:style-name="P45">—No es posible... —murmuró.</text:p>
      <text:p text:style-name="P45">Se puso de pie con una rapidez sorprendente para alguien de su edad.</text:p>
      <text:p text:style-name="P45">Todavía sujetando la llave, caminó hacia la casa.</text:p>
      <text:p text:style-name="P45">—Venid.</text:p>
      <text:p text:style-name="P45">Los seis amigos lo siguieron.<text:span text:style-name="T12"> </text:span>Atravesaron un estrecho pasillo y llegaron al salón principal.</text:p>
      <text:p text:style-name="P45">La habitación estaba rodeada de estanterías desde el suelo hasta el techo.</text:p>
      <text:p text:style-name="P45">Decenas.<text:span text:style-name="T12"> </text:span>Tal vez cientos de libros.</text:p>
      <text:p text:style-name="P45">Algunos estaban cuidadosamente encuadernados.<text:span text:style-name="T12"> </text:span>Otros parecían tan antiguos que amenazaban con deshacerse al tocarlos.</text:p>
      <text:p text:style-name="P45">Había mapas enrollados, pergaminos, cajas repletas de documentos y pequeños objetos procedentes de lugares remotos.<text:span text:style-name="T12"> </text:span>Aquella colección era el orgullo de Jorhm.</text:p>
      <text:p text:style-name="P45">Y también el motivo por el que muchos habitantes del pueblo lo consideraban un hombre extraño.</text:p>
      <text:p text:style-name="P45">Mientras otros dedicaban su vida a cultivar la tierra o comerciar, él la dedicaba a conservar historias.</text:p>
      <text:p text:style-name="P45">A recopilar fragmentos olvidados del pasado.<text:span text:style-name="T12"> </text:span>A estudiar los antiguos pueblos de Lluviara.</text:p>
      <text:p text:style-name="P45">Los libros eran su verdadera riqueza.</text:p>
      <text:p text:style-name="P45">Jorhm se dirigió directamente hacia una de las estanterías del fondo.</text:p>
      <text:p text:style-name="P45">No dudó ni un instante.<text:span text:style-name="T12"> Sabia</text:span> exactamente dónde buscar.<text:span text:style-name="T12"> </text:span>Extrajo un volumen grueso cubierto de polvo.</text:p>
      <text:p text:style-name="P45">La encuadernación estaba desgastada por los años.<text:span text:style-name="T12"> </text:span>El cuero había adquirido un color oscuro y agrietado.</text:p>
      <text:p text:style-name="P45">Con sumo cuidado llevó el libro hasta una mesa.<text:span text:style-name="T12"> </text:span>Lo abrió.</text:p>
      <text:p text:style-name="P45">Las páginas crujieron suavemente.</text:p>
      <text:p text:style-name="P45">Pasó varias hojas con rapidez.</text:p>
      <text:p text:style-name="P45">Después otras más despacio.<text:span text:style-name="T12"> </text:span>Hasta que finalmente se detuvo.</text:p>
      <text:p text:style-name="P45">Sus ojos brillaron.</text:p>
      <text:p text:style-name="P45">Colocó la llave sobre la página abierta.</text:p>
      <text:p text:style-name="P45">—Observad.</text:p>
      <text:p text:style-name="P45">Los jóvenes se inclinaron sobre la mesa.</text:p>
      <text:p text:style-name="P45"><text:soft-page-break/>En la página había un dibujo.<text:span text:style-name="T12"> </text:span>Una llave.<text:span text:style-name="T12"> </text:span>Exactamente igual.</text:p>
      <text:p text:style-name="P45">La misma forma.<text:span text:style-name="T12"> </text:span>La misma piedra verde.<text:span text:style-name="T12"> </text:span>El mismo escudo real grabado en el metal.</text:p>
      <text:p text:style-name="P45">Incluso las pequeñas marcas decorativas coincidían perfectamente.</text:p>
      <text:p text:style-name="P45">No era parecida.<text:span text:style-name="T12"> </text:span>Era la misma llave.</text:p>
      <text:p text:style-name="P45">Nadie habló.</text:p>
      <text:p text:style-name="P45">La sorpresa había silenciado la habitación.</text:p>
      <text:p text:style-name="P45">Finalmente Jorhm rompió el silencio.</text:p>
      <text:p text:style-name="P45">—No hay duda.</text:p>
      <text:p text:style-name="P45">Su voz sonó más grave que antes.</text:p>
      <text:p text:style-name="P45">—Es ella.</text:p>
      <text:p text:style-name="P45">—¿Ella? —preguntó Nohk.</text:p>
      <text:p text:style-name="P45">El anciano apoyó lentamente una mano sobre el libro.</text:p>
      <text:p text:style-name="P45">—La llave del tesoro del rey.</text:p>
      <text:p text:style-name="P45">Jorhm observó nuevamente la llave.</text:p>
      <text:p text:style-name="P45">—<text:span text:style-name="T12">Y s</text:span>i esta llave es auténtica...</text:p>
      <text:p text:style-name="P45"><text:span text:style-name="T12">e</text:span>ntonces quizá la leyenda también lo sea.</text:p>
      <text:p text:style-name="P45"/>
      <text:p text:style-name="P45"/>
      <text:p text:style-name="P28"/>
      <text:p text:style-name="P45"/>
      <text:h text:style-name="P15" text:outline-level="2"><text:span text:style-name="T13">Parte 2 - </text:span>La leyenda del tesoro del rey</text:h>
      <text:p text:style-name="P45"/>
      <text:p text:style-name="P45">Durante unos instantes nadie dijo nada.</text:p>
      <text:p text:style-name="P45">Los seis jóvenes permanecían inclinados sobre la mesa observando alternativamente la llave y el dibujo del libro.</text:p>
      <text:p text:style-name="P45">La semejanza era tan perfecta que resultaba inquietante.</text:p>
      <text:p text:style-name="P45">Finalmente fue Nohk quien rompió el silencio.</text:p>
      <text:p text:style-name="P45">—¿Qué leyenda es esa?</text:p>
      <text:p text:style-name="P45">Jorhm cerró parcialmente el volumen y apoyó ambas manos sobre la cubierta.</text:p>
      <text:p text:style-name="P45"><text:soft-page-break/>Parecía estar ordenando sus pensamientos.</text:p>
      <text:p text:style-name="P45">Luego se acomodó en una silla junto a la mesa.</text:p>
      <text:p text:style-name="P45">—Es una historia muy antigua —comenzó—. Tan antigua que la mayoría de la gente ya no la recuerda. Según este libro, ocurrió hace unos trescientos años, durante el reinado de Jumphrestebar.</text:p>
      <text:p text:style-name="P45">El nombre no significaba nada para los jóvenes.</text:p>
      <text:p text:style-name="P45">Jorhm continuó.</text:p>
      <text:p text:style-name="P45">—En aquella época una terrible guerra dividió Lluviara. Las regiones del este permanecieron leales al rey. Las del oeste intentaron derrocarlo. Durante años ambos bandos se enfrentaron sin descanso. Ciudades enteras fueron destruidas. Los caminos se volvieron peligrosos. El comercio desapareció. Nadie estaba seguro de quién vencería.</text:p>
      <text:p text:style-name="P45">El anciano hizo una pausa.</text:p>
      <text:p text:style-name="P45">Las llamas de una lámpara temblaron suavemente en la habitación.</text:p>
      <text:p text:style-name="P45">—Con el paso del tiempo la situación empeoró. Finalmente el rey se vio obligado a abandonar la capital y huir. Sus enemigos avanzaban desde todos los frentes. Temía que, si era derrotado, todo cuanto poseía cayera en manos de sus adversarios.</text:p>
      <text:p text:style-name="P45">Jorhm abrió nuevamente el libro y pasó varias páginas.</text:p>
      <text:p text:style-name="P45">Aparecieron dibujos de fortalezas, símbolos antiguos y textos escritos con una caligrafía difícil de descifrar.</text:p>
      <text:p text:style-name="P45">—Fue entonces cuando tomó una decisión extraordinaria. Ordenó construir una cámara secreta. Una bóveda oculta en algún lugar de Lluviara.</text:p>
      <text:p text:style-name="P45">Los jóvenes escuchaban atentamente.</text:p>
      <text:p text:style-name="P45">—Según la leyenda, aquella cámara fue diseñada para resistir cualquier ataque. Sus muros eran impenetrables. Su entrada estaba protegida por una puerta de hierro imposible de destruir. Ningún ejército podía atravesarla. Ninguna herramienta podía abrirla.</text:p>
      <text:p text:style-name="P45">El anciano señaló el dibujo de la llave.</text:p>
      <text:p text:style-name="P45">—Sólo existía una forma de entrar.</text:p>
      <text:p text:style-name="P45">La llave.</text:p>
      <text:p text:style-name="P45">Los ojos de los muchachos se dirigieron inmediatamente hacia el objeto que descansaba sobre la mesa.</text:p>
      <text:p text:style-name="P45">La piedra verde parecía brillar aún más bajo la luz de las lámparas.</text:p>
      <text:p text:style-name="P45">—Cuando el rey comprendió que iba a morir —continuó Jorhm— decidió preservar el secreto. Llamó a uno de sus sirvientes más fieles y le describió con exactitud la ubicación de la cámara. El hombre dibujó un mapa. Un único mapa.</text:p>
      <text:p text:style-name="P45">Jorhm volvió algunas páginas más.</text:p>
      <text:p text:style-name="P45"><text:soft-page-break/>Y allí apareció.</text:p>
      <text:p text:style-name="P45">Un conjunto de líneas, marcas y símbolos trazados a mano siglos atrás.</text:p>
      <text:p text:style-name="P45">Parecía poco más que un garabato.</text:p>
      <text:p text:style-name="P45">Y sin embargo todos comprendieron inmediatamente lo que estaban viendo.</text:p>
      <text:p text:style-name="P45">Era un mapa.</text:p>
      <text:p text:style-name="P45">El mapa del tesoro.</text:p>
      <text:p text:style-name="P45">Los jóvenes se acercaron todavía más.</text:p>
      <text:p text:style-name="P45">Aquellas líneas antiguas despertaban la imaginación de forma irresistible.</text:p>
      <text:p text:style-name="P45">Montañas.<text:span text:style-name="T13"> </text:span>Ríos.<text:span text:style-name="T13"> </text:span>Senderos.<text:span text:style-name="T13"> </text:span>Lugares desconocidos.</text:p>
      <text:p text:style-name="P45">Algún punto oculto donde, según la leyenda, descansaba la fortuna de un rey.</text:p>
      <text:p text:style-name="P45">Jorhm observó las expresiones de los muchachos y soltó una breve carcajada.</text:p>
      <text:p text:style-name="P45">—No pongáis esas caras.</text:p>
      <text:p text:style-name="P45">Todos levantaron la vista.</text:p>
      <text:p text:style-name="P45">—Yo no creo una sola palabra de esta historia.</text:p>
      <text:p text:style-name="P45">Los jóvenes parecieron decepcionados.</text:p>
      <text:p text:style-name="P45">—¿No? —preguntó Kempht.</text:p>
      <text:p text:style-name="P45">—Por supuesto que no.</text:p>
      <text:p text:style-name="P45">Jorhm cerró el libro con suavidad.</text:p>
      <text:p text:style-name="P45">—Es un cuento para niños. Una leyenda. Nada más.</text:p>
      <text:p text:style-name="P45">Se reclinó en la silla.</text:p>
      <text:p text:style-name="P45">—Si esa bóveda existiera, alguien la habría encontrado hace siglos. Mucha gente buscó el tesoro. Algunos utilizaron copias de este mismo mapa. Otros siguieron pistas distintas. Ninguno encontró nada<text:span text:style-name="T13">, nunca</text:span>.</text:p>
      <text:p text:style-name="P45">El anciano golpeó la cubierta del libro con los dedos.</text:p>
      <text:p text:style-name="P45">—Ni la cámara apareció jamás. Ni la llave fue encontrada nunca.</text:p>
      <text:p text:style-name="P45">Miró de nuevo el dibujo.<text:span text:style-name="T13"> </text:span>Después observó la llave.<text:span text:style-name="T13"> </text:span>Luego volvió a mirar el dibujo.</text:p>
      <text:p text:style-name="P45">Su expresión cambió ligeramente.</text:p>
      <text:p text:style-name="P45">La seguridad de sus palabras parecía haberse debilitado.</text:p>
      <text:p text:style-name="P45">—Y sin embargo...</text:p>
      <text:p text:style-name="P45">La habitación quedó en silencio.</text:p>
      <text:p text:style-name="P45"><text:soft-page-break/>Jorhm tomó la llave entre sus manos.<text:span text:style-name="T13"> </text:span>La giró lentamente.<text:span text:style-name="T13"> </text:span>Examinó el escudo grabado.<text:span text:style-name="T13"> </text:span>La piedra verde.</text:p>
      <text:p text:style-name="P45">Las formas del metal.</text:p>
      <text:p text:style-name="P45">Después volvió a compararla con la ilustración.<text:span text:style-name="T13"> </text:span>Una vez más.</text:p>
      <text:p text:style-name="P45">Y otra.</text:p>
      <text:p text:style-name="P45">Como si esperara descubrir alguna diferencia.<text:span text:style-name="T13"> </text:span>Pero no la encontró.</text:p>
      <text:p text:style-name="P45">Finalmente dejó escapar un largo suspiro.</text:p>
      <text:p text:style-name="P45">—Juraría que esto es imposible.</text:p>
      <text:p text:style-name="P45">Nadie habló.</text:p>
      <text:p text:style-name="P45">El anciano seguía observando la llave con una mezcla de fascinación y desconcierto.</text:p>
      <text:p text:style-name="P45">Por primera vez parecía dudar de sus propias convicciones.</text:p>
      <text:p text:style-name="P45">Y aquello resultaba mucho más inquietante que la leyenda misma.</text:p>
      <text:p text:style-name="P45"/>
      <text:p text:style-name="P28"/>
      <text:p text:style-name="P45"/>
      <text:h text:style-name="P7" text:outline-level="1">Capítulo <text:span text:style-name="T19">3</text:span> - <text:span text:style-name="T14">El </text:span><text:span text:style-name="T18">Pacto</text:span></text:h>
      <text:p text:style-name="P46"/>
      <text:h text:style-name="P17" text:outline-level="2"><text:span text:style-name="T15">Parte 1 - </text:span>La compra</text:h>
      <text:p text:style-name="P46"/>
      <text:p text:style-name="P46">Durante los días siguientes, la llave se convirtió en el tema principal de todas las conversaciones.</text:p>
      <text:p text:style-name="P46">Al principio sólo era una curiosidad.<text:span text:style-name="T15"> </text:span>Un objeto extraño encontrado en el bosque.</text:p>
      <text:p text:style-name="P46">Una coincidencia llamativa.<text:span text:style-name="T15"> </text:span>Nada más.</text:p>
      <text:p text:style-name="P46">Pero la mente humana rara vez se conforma con una explicación sencilla cuando existe otra más emocionante.</text:p>
      <text:p text:style-name="P46">Cada tarde los jóvenes se reunían en la cantina.<text:span text:style-name="T15"> </text:span>Y cada tarde la conversación regresaba inevitablemente al mismo asunto.</text:p>
      <text:p text:style-name="P46">La llave.<text:span text:style-name="T15"> </text:span>El rey.<text:span text:style-name="T15"> </text:span>El tesoro.<text:span text:style-name="T15"> </text:span>El mapa.</text:p>
      <text:p text:style-name="P46">Al principio discutían posibilidades.<text:span text:style-name="T15"> </text:span>Después empezaron a discutir certezas.</text:p>
      <text:p text:style-name="P46">¿Qué ocurriría si la leyenda fuera cierta?</text:p>
      <text:p text:style-name="P46">¿Y si aquella llave era realmente la llave del rey?</text:p>
      <text:p text:style-name="P46"><text:soft-page-break/>¿Y si nadie había encontrado el tesoro porque nadie había encontrado la llave?</text:p>
      <text:p text:style-name="P46">Aquella última idea resultaba especialmente poderosa.</text:p>
      <text:p text:style-name="P46">La leyenda hablaba de dos elementos.<text:span text:style-name="T15"> </text:span>La bóveda.<text:span text:style-name="T15"> </text:span>Y la llave.</text:p>
      <text:p text:style-name="P46">Quizá otros habían buscado la bóveda.<text:span text:style-name="T15"> </text:span>Quizá incluso habían encontrado pistas.<text:span text:style-name="T15"> </text:span>Pero sin la llave nunca habrían podido entrar.</text:p>
      <text:p text:style-name="P46">Ahora la situación era diferente.</text:p>
      <text:p text:style-name="P46">Ellos tenían la llave.<text:span text:style-name="T15"> </text:span>La auténtica.<text:span text:style-name="T15"> </text:span>La misma que aparecía dibujada en el libro.</text:p>
      <text:p text:style-name="P46">Cuanto más hablaban de ello, más razonable parecía.</text:p>
      <text:p text:style-name="P46">Y cuanto más razonable parecía, más difícil resultaba pensar en otra cosa.</text:p>
      <text:p text:style-name="P46">Nohk comenzó a imaginar cofres repletos de monedas.<text:span text:style-name="T15"> </text:span>Kempht hablaba de comprar tierras.</text:p>
      <text:p text:style-name="P46">Otros soñaban con abrir negocios, construir casas más grandes o viajar a lugares que jamás habían visto.</text:p>
      <text:p text:style-name="P46">La fortuna del rey empezó a adquirir forma en sus pensamientos.<text:span text:style-name="T15"> </text:span>Ya no era una leyenda.</text:p>
      <text:p text:style-name="P46">Era una oportunidad.</text:p>
      <text:p text:style-name="P46">Una oportunidad extraordinaria.</text:p>
      <text:p text:style-name="P46">Una oportunidad única.</text:p>
      <text:p text:style-name="P46">Finalmente decidieron regresar a la casa de Jorhm.<text:span text:style-name="T15"> </text:span>Necesitaban volver a ver el libro.</text:p>
      <text:p text:style-name="P46">Necesitaban estudiar el mapa.</text:p>
      <text:p text:style-name="P46">Tal vez la respuesta hubiera estado allí todo el tiempo.<text:span text:style-name="T15"> </text:span>Tal vez aquellas líneas aparentemente caóticas escondieran indicaciones precisas.</text:p>
      <text:p text:style-name="P46">Pero cuando llegaron, el anciano se negó.</text:p>
      <text:p text:style-name="P46">—No.</text:p>
      <text:p text:style-name="P46">La respuesta fue inmediata.</text:p>
      <text:p text:style-name="P46">Ni siquiera permitió que terminaran de hablar.</text:p>
      <text:p text:style-name="P46">—Ya habéis visto suficiente.</text:p>
      <text:p text:style-name="P46">Los jóvenes insistieron.<text:span text:style-name="T15"> </text:span>Intentaron razonar con él.<text:span text:style-name="T15"> </text:span>Le explicaron sus teorías.<text:span text:style-name="T15"> </text:span>Le mostraron nuevamente la llave.</text:p>
      <text:p text:style-name="P46">Pero Jorhm permaneció firme.</text:p>
      <text:p text:style-name="P46">—Escuchadme bien —dijo con seriedad—. Estáis convirtiendo una historia en una obsesión.</text:p>
      <text:p text:style-name="P46">Aquellas palabras les molestaron.</text:p>
      <text:p text:style-name="P46">Porque en el fondo todos sabían que tenía razón.</text:p>
      <text:p text:style-name="P46"><text:soft-page-break/>El anciano observó sus rostros.<text:span text:style-name="T15"> </text:span>Vio la ansiedad.<text:span text:style-name="T15"> </text:span>La esperanza.<text:span text:style-name="T15"> </text:span>La ambición.<text:span text:style-name="T15"> </text:span>Y algo más.</text:p>
      <text:p text:style-name="P46">Algo que empezaba a preocuparle.</text:p>
      <text:p text:style-name="P46">—Es una leyenda —continuó—. Un cuento inventado hace siglos. Nadie encontró jamás el tesoro. Nadie encontró jamás la bóveda. Y nadie encontró jamás la llave.</text:p>
      <text:p text:style-name="P46">Levantó la mirada hacia Nohk.</text:p>
      <text:p text:style-name="P46">—No dejéis que un hallazgo afortunado os haga olvidar la realidad.</text:p>
      <text:p text:style-name="P46">Pero sus advertencias llegaron demasiado tarde.</text:p>
      <text:p text:style-name="P46">Durante los días siguientes la imaginación hizo el resto.</text:p>
      <text:p text:style-name="P46">Cada conversación reforzaba la anterior.<text:span text:style-name="T15"> </text:span>Cada duda era respondida por una nueva posibilidad.<text:span text:style-name="T15"> </text:span>Cada objeción encontraba una explicación.</text:p>
      <text:p text:style-name="P46">Poco a poco la existencia del tesoro dejó de ser una hipótesis.</text:p>
      <text:p text:style-name="P46">Se convirtió en una convicción.</text:p>
      <text:p text:style-name="P46">Los jóvenes comenzaron a sentirse como hombres que ya poseían una fortuna, aunque todavía no hubieran puesto una sola moneda en sus manos.</text:p>
      <text:p text:style-name="P46">La riqueza parecía estar esperándolos.<text:span text:style-name="T15"> </text:span>Oculta.<text:span text:style-name="T15"> </text:span>Pacientemente.</text:p>
      <text:p text:style-name="P46">Al final surgió una idea.</text:p>
      <text:p text:style-name="P46">Simple.<text:span text:style-name="T15"> </text:span>Directa.<text:span text:style-name="T15"> </text:span>Inevitable.</text:p>
      <text:p text:style-name="P46">—¿Y si compramos el libro?</text:p>
      <text:p text:style-name="P46">La propuesta cayó sobre la mesa como una revelación.</text:p>
      <text:p text:style-name="P46">Durante unos segundos nadie habló.</text:p>
      <text:p text:style-name="P46">Luego comenzaron a asentir.<text:span text:style-name="T15"> </text:span>Por supuesto.<text:span text:style-name="T15"> </text:span>Era la solución.</text:p>
      <text:p text:style-name="P46">Si Jorhm no quería prestarlo, podían adquirirlo.<text:span text:style-name="T15"> </text:span>Todo tenía un precio.<text:span text:style-name="T15"> </text:span>Sólo debían ofrecer una cantidad lo bastante alta.<text:span text:style-name="T15"> </text:span>Una cantidad imposible de rechazar.</text:p>
      <text:p text:style-name="P46">Y así comenzaron a reunir dinero.</text:p>
      <text:p text:style-name="P46">Vendieron animales.<text:span text:style-name="T15"> </text:span>Herramientas.<text:span text:style-name="T15"> </text:span>Mercancías.<text:span text:style-name="T15"> </text:span>Carros.<text:span text:style-name="T15"> </text:span></text:p>
      <text:p text:style-name="P46">Todo aquello de lo que podían prescindir.</text:p>
      <text:p text:style-name="P46">Conservaron únicamente las tierras.<text:span text:style-name="T15"> </text:span>Lo indispensable para seguir viviendo.</text:p>
      <text:p text:style-name="P46">Cuando terminaron, habían reunido más dinero del que ninguno había tenido jamás entre las manos.</text:p>
      <text:p text:style-name="P46">Una pequeña fortuna.</text:p>
      <text:p text:style-name="P46">Quizá la mayor inversión que harían en toda su vida.</text:p>
      <text:p text:style-name="P46"><text:soft-page-break/>Y una mañana, llevando consigo una pesada bolsa repleta de monedas, los seis amigos volvieron a recorrer el camino que conducía a la casa de Jorhm.</text:p>
      <text:p text:style-name="P46">Estaban convencidos de que aquella vez regresarían con el libro.</text:p>
      <text:p text:style-name="P46">Y con él, con el primer paso hacia el tesoro del rey.</text:p>
      <text:p text:style-name="P46"/>
      <text:p text:style-name="P29"/>
      <text:p text:style-name="P46"/>
      <text:h text:style-name="P17" text:outline-level="2"><text:span text:style-name="T16">Parte 2 - </text:span>Inicia la aventura</text:h>
      <text:p text:style-name="P46"/>
      <text:p text:style-name="P46"/>
      <text:p text:style-name="P46">Jorhm los vio llegar mucho antes de que alcanzaran la casa.</text:p>
      <text:p text:style-name="P46">Estaba sentado bajo las vides, en el mismo lugar donde acostumbraba pasar las tardes observando el valle.</text:p>
      <text:p text:style-name="P46">Desde allí podía ver el camino que ascendía desde el pueblo.<text:span text:style-name="T16"> </text:span>Y aquel día los reconoció enseguida.</text:p>
      <text:p text:style-name="P46">Los seis caminaban juntos.</text:p>
      <text:p text:style-name="P46">Decididos.<text:span text:style-name="T16"> </text:span>Con un propósito claro.</text:p>
      <text:p text:style-name="P46">El anciano suspiró.</text:p>
      <text:p text:style-name="P46">Había esperado que el entusiasmo desapareciera con el paso de los días.<text:span text:style-name="T16"> </text:span>Que la emoción inicial se desvaneciera.<text:span text:style-name="T16"> </text:span>Que la razón terminara imponiéndose.</text:p>
      <text:p text:style-name="P46">Pero no había ocurrido.</text:p>
      <text:p text:style-name="P46">Al contrario.</text:p>
      <text:p text:style-name="P46">Algo había cambiado en ellos.</text:p>
      <text:p text:style-name="P46">Lo percibió incluso antes de escuchar una sola palabra.</text:p>
      <text:p text:style-name="P46">Aquella mezcla de ilusión y ansiedad que brillaba en sus ojos le resultaba inquietante.</text:p>
      <text:p text:style-name="P46">Había visto esa expresión otras veces.</text:p>
      <text:p text:style-name="P46">En comerciantes arruinados.<text:span text:style-name="T16"> </text:span>En jugadores.<text:span text:style-name="T16"> </text:span>En hombres convencidos de que estaban a punto de encontrar una fortuna.</text:p>
      <text:p text:style-name="P46">Y rara vez terminaba bien.</text:p>
      <text:p text:style-name="P46">Los jóvenes llegaron hasta la mesa.<text:span text:style-name="T16"> </text:span>Nohk fue el primero en hablar.</text:p>
      <text:p text:style-name="P46">—Jorhm, queremos el libro.</text:p>
      <text:p text:style-name="P46"><text:soft-page-break/>El anciano levantó la vista.</text:p>
      <text:p text:style-name="P46">—Ya os dije lo que pienso sobre esa historia.</text:p>
      <text:p text:style-name="P46">—Venimos a hacerte una oferta.</text:p>
      <text:p text:style-name="P46">Por un instante nadie habló.</text:p>
      <text:p text:style-name="P46">Entonces uno de los muchachos depositó sobre la mesa una pesada bolsa de cuero.</text:p>
      <text:p text:style-name="P46">Las monedas tintinearon al golpear la madera.</text:p>
      <text:p text:style-name="P46">Jorhm observó la bolsa.<text:span text:style-name="T16"> </text:span>Después observó a los jóvenes.<text:span text:style-name="T16"> </text:span>Y finalmente volvió a mirar la bolsa.</text:p>
      <text:p text:style-name="P46">Su expresión cambió.</text:p>
      <text:p text:style-name="P46">—¿Qué es esto?</text:p>
      <text:p text:style-name="P46">—Doscientas monedas.</text:p>
      <text:p text:style-name="P46">El anciano abrió los ojos con sorpresa.</text:p>
      <text:p text:style-name="P46">—¿Doscientas?</text:p>
      <text:p text:style-name="P46">Nohk asintió.</text:p>
      <text:p text:style-name="P46">—Doscientas monedas por el libro.</text:p>
      <text:p text:style-name="P46">Jorhm permaneció en silencio.</text:p>
      <text:p text:style-name="P46">Aquella cantidad era absurda.<text:span text:style-name="T16"> </text:span>Con ese dinero podía vivir cómodamente durante años.<text:span text:style-name="T16"> </text:span>Era mucho más de lo que valía cualquier libro que poseyera.</text:p>
      <text:p text:style-name="P46">Incluso aquel.</text:p>
      <text:p text:style-name="P46">Sacudió lentamente la cabeza.</text:p>
      <text:p text:style-name="P46">—Muchachos... la bóveda no existe.</text:p>
      <text:p text:style-name="P46">Nadie respondió.</text:p>
      <text:p text:style-name="P46">—Es una leyenda.<text:span text:style-name="T16"> </text:span>Una historia inventada.<text:span text:style-name="T16"> </text:span>Nada más.</text:p>
      <text:p text:style-name="P46">Los seis permanecieron inmóviles.</text:p>
      <text:p text:style-name="P46">Nohk sostuvo la mirada del anciano.</text:p>
      <text:p text:style-name="P46">—Doscientas monedas por el libro.</text:p>
      <text:p text:style-name="P46">Jorhm comprendió entonces que la discusión había terminado antes de empezar.</text:p>
      <text:p text:style-name="P46">Aquellos jóvenes ya no estaban buscando consejo.<text:span text:style-name="T16"> </text:span>Habían tomado una decisión.</text:p>
      <text:p text:style-name="P46">El dinero era sólo una formalidad.</text:p>
      <text:p text:style-name="P46">Observó nuevamente la bolsa.<text:span text:style-name="T16"> </text:span>Después miró el libro que había conservado durante tantos años.</text:p>
      <text:p text:style-name="P46">Y finalmente volvió a mirar a los muchachos.</text:p>
      <text:p text:style-name="P46"><text:soft-page-break/><text:span text:style-name="T16">S</text:span>intió una vaga sensación de preocupación.<text:span text:style-name="T16"> </text:span>Como si estuviera entregándoles algo más peligroso que un simple volumen antiguo.</text:p>
      <text:p text:style-name="P46">—Veo que habéis tomado una decisión —dijo finalmente.</text:p>
      <text:p text:style-name="P46">Nadie respondió.<text:span text:style-name="T16"> </text:span>No hacía falta.</text:p>
      <text:p text:style-name="P46">Minutos después abandonaban la casa llevando el libro entre las manos.</text:p>
      <text:p text:style-name="P46">La primera etapa había terminado.</text:p>
      <text:p text:style-name="P46">La aventura acababa de comenzar.</text:p>
      <text:p text:style-name="P46"/>
      <text:p text:style-name="P29"/>
      <text:p text:style-name="P46"/>
      <text:h text:style-name="P16" text:outline-level="2"><text:span text:style-name="T16">Parte</text:span> 3 - El pacto.</text:h>
      <text:p text:style-name="P46"/>
      <text:p text:style-name="P46"/>
      <text:p text:style-name="P46">Aquella misma noche se reunieron en la casa de Nohk.</text:p>
      <text:p text:style-name="P46">El libro ocupó el centro de la mesa.</text:p>
      <text:p text:style-name="P46">Las lámparas permanecieron encendidas hasta altas horas.</text:p>
      <text:p text:style-name="P46">Una y otra vez estudiaron las páginas.<text:span text:style-name="T17"> </text:span>Compararon símbolos.<text:span text:style-name="T17"> </text:span>Examinaron anotaciones.</text:p>
      <text:p text:style-name="P46">Y sobre todo analizaron el mapa.</text:p>
      <text:p text:style-name="P46">Para sorpresa de todos, resultó mucho más comprensible de lo que habían imaginado.</text:p>
      <text:p text:style-name="P46">No era una colección de garabatos sin sentido.</text:p>
      <text:p text:style-name="P46">Los accidentes geográficos coincidían con lugares conocidos.<text:span text:style-name="T17"> </text:span>Las referencias parecían reales.</text:p>
      <text:p text:style-name="P46">Y lo más importante de todo:</text:p>
      <text:p text:style-name="P46">el destino señalado por el mapa no estaba al otro lado del mundo.</text:p>
      <text:p text:style-name="P46">Se encontraba relativamente cerca.<text:span text:style-name="T17"> </text:span>Hacia el oeste.<text:span text:style-name="T17"> </text:span>En las montañas.<text:span text:style-name="T17"> </text:span>Apenas unos días de viaje.</text:p>
      <text:p text:style-name="P46">La revelación llenó la habitación de entusiasmo.</text:p>
      <text:p text:style-name="P46"><text:span text:style-name="T17">E</text:span>l tesoro dejó de parecer una leyenda lejana.<text:span text:style-name="T17"> </text:span>Ahora tenía una ubicación.<text:span text:style-name="T17"> </text:span>Un lugar concreto.</text:p>
      <text:p text:style-name="P46">Un destino.</text:p>
      <text:p text:style-name="P46">Algo que podían alcanzar.<text:span text:style-name="T17"> </text:span>Algo que podían encontrar.</text:p>
      <text:p text:style-name="P46">La fortuna del rey parecía estar esperándolos.<text:span text:style-name="T17"> </text:span>Oculta durante siglos.<text:span text:style-name="T17"> </text:span>A sólo unos días de distancia.</text:p>
      <text:p text:style-name="P46"><text:soft-page-break/>El vino comenzó a correr.</text:p>
      <text:p text:style-name="P46">Las conversaciones se hicieron más animadas.<text:span text:style-name="T17"> </text:span>Las risas más frecuentes.</text:p>
      <text:p text:style-name="P46">Cada uno imaginaba ya el futuro que le aguardaba.<text:span text:style-name="T17"> </text:span>Tierras.<text:span text:style-name="T17"> </text:span>Casas.<text:span text:style-name="T17"> </text:span>Negocios.<text:span text:style-name="T17"> </text:span>Animales.</text:p>
      <text:p text:style-name="P46">Libertad.</text:p>
      <text:p text:style-name="P46">Riquezas imposibles para un campesino común.</text:p>
      <text:p text:style-name="P46">Finalmente Nohk levantó una copa.</text:p>
      <text:p text:style-name="P46">Los demás hicieron lo mismo.</text:p>
      <text:p text:style-name="P46">—Cuando encontremos el tesoro —dijo— lo dividiremos en partes iguales.</text:p>
      <text:p text:style-name="P46">Los cinco asintieron inmediatamente.<text:span text:style-name="T17"> </text:span>Era justo.<text:span text:style-name="T17"> </text:span>Habían comenzado juntos.</text:p>
      <text:p text:style-name="P46">Terminarían juntos.</text:p>
      <text:p text:style-name="P46">—Socios —afirmó Kempht.</text:p>
      <text:p text:style-name="P46">—Socios —repitieron los demás.</text:p>
      <text:p text:style-name="P46">Las copas chocaron.</text:p>
      <text:p text:style-name="P46">El pacto quedó sellado.</text:p>
      <text:p text:style-name="P46">El tesoro de un rey dividido entre seis hombres.</text:p>
      <text:p text:style-name="P46">Había más que suficiente para todos.</text:p>
      <text:p text:style-name="P46">Aquella noche ninguno dudó.<text:span text:style-name="T17"> </text:span>Ninguno sintió miedo.</text:p>
      <text:p text:style-name="P46">Ninguno imaginó <text:span text:style-name="T17">lo que aquellas palabras significaban en realidad.</text:span></text:p>
      <text:p text:style-name="P46"/>
      <text:p text:style-name="P46"><text:span text:style-name="T17">Mientras que, </text:span>la llave de hierro, silenciosa sobre la mesa, parecía observarlos.</text:p>
      <text:p text:style-name="P46"/>
      <text:p text:style-name="P46"/>
      <text:p text:style-name="Horizontal_20_Line"/>
      <text:p text:style-name="Text_20_body"/>
      <text:h text:style-name="P13" text:outline-level="1"><text:span text:style-name="T20">Acto 2</text:span> - <text:span text:style-name="T20">Lo Imprevisto</text:span></text:h>
      <text:p text:style-name="P47"/>
      <text:h text:style-name="P8" text:outline-level="1">Capítulo 1 - XXXX</text:h>
      <text:p text:style-name="P47"/>
      <text:h text:style-name="P18" text:outline-level="2"><text:soft-page-break/>Parte 1 - La expedición</text:h>
      <text:p text:style-name="P55"/>
      <text:p text:style-name="P55">No tardaron mucho en organizar la expedición.</text:p>
      <text:p text:style-name="P55">Desde el momento en que el libro llegó a sus manos, la espera comenzó a parecer insoportable.</text:p>
      <text:p text:style-name="P55">Cada día que pasaba era un día más durante el cual el tesoro continuaba oculto en algún lugar de las montañas.<text:span text:style-name="T21"> </text:span>Cada amanecer parecía un retraso innecesario.</text:p>
      <text:p text:style-name="P55">Cada conversación terminaba inevitablemente hablando de lo mismo.<text:span text:style-name="T21"> </text:span>La bóveda.<text:span text:style-name="T21"> </text:span>La llave.<text:span text:style-name="T21"> </text:span>El mapa.</text:p>
      <text:p text:style-name="P55">La fortuna del rey.</text:p>
      <text:p text:style-name="P55">El entusiasmo se había transformado en un poderoso sentimiento de urgencia.<text:span text:style-name="T21"> </text:span>Si el tesoro existía, debían encontrarlo.<text:span text:style-name="T21"> </text:span>Y debían hacerlo cuanto antes.</text:p>
      <text:p text:style-name="P55">Durante varios días estudiaron el mapa con atención.<text:span text:style-name="T22"> </text:span>Lo extendían sobre la mesa de la casa de Nohk y pasaban horas siguiendo con el dedo las líneas dibujadas siglos atrás.<text:span text:style-name="T21"> </text:span></text:p>
      <text:p text:style-name="P55">Comparaban las marcas con mapas modernos.<text:span text:style-name="T21"> </text:span>Identificaban montañas, ríos y caminos conocidos.<text:span text:style-name="T21"> </text:span>Debatían posibles rutas.<text:span text:style-name="T21"> </text:span>Calculaban distancias.<text:span text:style-name="T21"> </text:span>Discutían lugares adecuados para acampar.<text:span text:style-name="T21"> </text:span></text:p>
      <text:p text:style-name="P55">Aquello no parecía una fantasía.<text:span text:style-name="T21"> </text:span>Era un proyecto.</text:p>
      <text:p text:style-name="P55">Un desafío que podían planificar.<text:span text:style-name="T21"> </text:span>Un objetivo que podían alcanzar.</text:p>
      <text:p text:style-name="P55">Cada uno asumió responsabilidades concretas.</text:p>
      <text:p text:style-name="P55">Uno se ocupó de reunir provisiones.<text:span text:style-name="T21"> </text:span>Otro revisó los caballos.<text:span text:style-name="T21"> </text:span>Algunos consiguieron herramientas.<text:span text:style-name="T21"> </text:span>Otros prepararon tiendas, mantas, cuerdas y recipientes para transportar agua.</text:p>
      <text:p text:style-name="P55">Los seis amigos parecían poseídos por una energía inagotable.<text:span text:style-name="T21"> </text:span>Trabajaban desde el amanecer hasta el anochecer.</text:p>
      <text:p text:style-name="P55">A medida que los preparativos avanzaban, la aventura comenzaba a parecer cada vez más real.</text:p>
      <text:p text:style-name="P55">Según sus cálculos, alcanzarían las montañas en pocos días.<text:span text:style-name="T21"> </text:span>Después tendrían que internarse en las tierras altas siguiendo las indicaciones del mapa.</text:p>
      <text:p text:style-name="P55">Si todo salía bien, en <text:span text:style-name="T21">poco mas</text:span> de una semana llegarían a la zona señalada por el antiguo manuscrito.</text:p>
      <text:p text:style-name="P55">A partir de allí, el tiempo dependería de la suerte.</text:p>
      <text:p text:style-name="P55">La ubicación exacta de la bóveda seguía siendo un misterio.<text:span text:style-name="T21"> </text:span></text:p>
      <text:p text:style-name="P55"/>
      <text:p text:style-name="P55">Finalmente llegó el día de partir.</text:p>
      <text:p text:style-name="P55">El amanecer apareció limpio y brillante sobre el valle.</text:p>
      <text:p text:style-name="P55">Las lluvias de la semana anterior habían dejado el aire fresco y transparente.</text:p>
      <text:p text:style-name="P55">Las montañas se dibujaban con extraordinaria claridad en el horizonte occidental.</text:p>
      <text:p text:style-name="P55"><text:soft-page-break/>Los caballos comenzaron a avanzar.<text:span text:style-name="T22"> </text:span>Las ruedas de la carreta crujieron sobre el camino de tierra.</text:p>
      <text:p text:style-name="P55">Y mientras los primeros rayos del sol iluminaban el valle de Oldwood, los seis amigos abandonaron el pueblo.</text:p>
      <text:p text:style-name="P55">Ante ellos se extendían los bosques, las montañas y la promesa de una riqueza inimaginable.</text:p>
      <text:p text:style-name="P55"/>
      <text:p text:style-name="P55"/>
      <text:p text:style-name="P30"/>
      <text:p text:style-name="P55"/>
      <text:h text:style-name="P18" text:outline-level="2">Parte 2 - <text:span text:style-name="T23">La tormenta</text:span></text:h>
      <text:p text:style-name="P55"/>
      <text:p text:style-name="P55">Los primeros días transcurrieron mejor de lo esperado.</text:p>
      <text:p text:style-name="P55">El camino era largo, pero agradable.<text:span text:style-name="T23"> </text:span>Atravesaron bosques de robles y abedules, cruzaron pequeñas aldeas y siguieron antiguos senderos comerciales que serpenteaban entre colinas cubiertas de hierba.</text:p>
      <text:p text:style-name="P55">Las noches terminaban alrededor del fuego.<text:span text:style-name="T23"> </text:span>Comían juntos.<text:span text:style-name="T23"> </text:span>Hablaban del tesoro.</text:p>
      <text:p text:style-name="P55">Discutían qué harían cuando regresaran convertidos en hombres ricos.</text:p>
      <text:p text:style-name="P55">La aventura parecía exactamente aquello que habían imaginado.<text:span text:style-name="T23"> </text:span>Pero las montañas todavía estaban lejos.</text:p>
      <text:p text:style-name="P55">Y las montañas no compartían su entusiasmo.</text:p>
      <text:h text:style-name="P22" text:outline-level="3"/>
      <text:p text:style-name="P55">Al quinto día de viaje alcanzaron la extensa zona pantanosa que rodeaba el río Sigsagueante.</text:p>
      <text:p text:style-name="P55">El paisaje cambió por completo.</text:p>
      <text:p text:style-name="P55">Los bosques desaparecieron.<text:span text:style-name="T24"> </text:span>La tierra firme se volvió escasa.<text:span text:style-name="T24"> </text:span>Pequeñas islas de hierba sobresalían entre enormes extensiones de agua oscura.</text:p>
      <text:p text:style-name="P55">El camino se estrechó hasta convertirse en una franja de terreno apenas más elevada que el propio pantano.</text:p>
      <text:p text:style-name="P55">Durante la mañana el cielo permaneció despejado.<text:span text:style-name="T24"> </text:span>El sol brillaba.</text:p>
      <text:p text:style-name="P55">Nada hacía presagiar problemas.</text:p>
      <text:p text:style-name="P55">Sin embargo, al avanzar la tarde, las nubes comenzaron a aparecer por el oeste.</text:p>
      <text:p text:style-name="P55">Primero fueron unas pocas manchas oscuras.<text:span text:style-name="T24"> </text:span>Después una masa compacta que cubrió rápidamente el horizonte.</text:p>
      <text:p text:style-name="P55">El viento cambió.<text:span text:style-name="T24"> </text:span>El aire se volvió húmedo.<text:span text:style-name="T24"> </text:span>Pesado.<text:span text:style-name="T24"> </text:span>Inquietante.</text:p>
      <text:p text:style-name="P55"><text:soft-page-break/>—No me gusta esto —murmuró Kempht observando el cielo.</text:p>
      <text:p text:style-name="P55">Pero continuaron avanzando.<text:span text:style-name="T24"> </text:span>La zona pantanosa era un lugar terrible para detenerse.<text:span text:style-name="T24"> </text:span>Debían alcanzar terreno elevado.</text:p>
      <text:p text:style-name="P55">Las primeras gotas comenzaron a caer pocos minutos después.</text:p>
      <text:p text:style-name="P55">Pequeñas.<text:span text:style-name="T24"> </text:span>Dispersas.<text:span text:style-name="T24"> </text:span>Inofensivas.</text:p>
      <text:p text:style-name="P55">Luego llegaron más.</text:p>
      <text:p text:style-name="P55">Y más.</text:p>
      <text:p text:style-name="P55">El grupo aceleró el paso.<text:span text:style-name="T24"> </text:span>Los caballos comenzaron a ponerse nerviosos.<text:span text:style-name="T24"> </text:span>El viento aumentó.</text:p>
      <text:p text:style-name="P55">Los árboles cercanos se inclinaron.<text:span text:style-name="T24"> </text:span>Un trueno retumbó en la distancia.<text:span text:style-name="T24"> </text:span>Y entonces llegó la tormenta.</text:p>
      <text:p text:style-name="P55">Fue tan repentina que ninguno tuvo tiempo de reaccionar.</text:p>
      <text:p text:style-name="P55">El cielo se oscureció por completo.<text:span text:style-name="T24"> </text:span>Los relámpagos comenzaron a desgarrar las nubes.<text:span text:style-name="T24"> </text:span>Los truenos sacudieron el aire.</text:p>
      <text:p text:style-name="P55">Y un instante después el agua cayó sobre ellos como si el propio cielo se hubiera roto.</text:p>
      <text:p text:style-name="P55">La lluvia era tan intensa que resultaba difícil respirar.</text:p>
      <text:p text:style-name="P55">La visibilidad desapareció.</text:p>
      <text:p text:style-name="P55">El paisaje quedó oculto tras una cortina gris.</text:p>
      <text:p text:style-name="P55">Los hombres apenas podían distinguir las siluetas de sus compañeros.</text:p>
      <text:p text:style-name="P55">—¡Seguid avanzando! —gritó Nohk<text:span text:style-name="T25">, </text:span>entre el ruido de la tormenta.</text:p>
      <text:p text:style-name="P55">Tiraban de la carreta.<text:span text:style-name="T25"> </text:span>Empujaban los caballos.<text:span text:style-name="T25"> </text:span>Intentaban mantenerse juntos.<text:span text:style-name="T25"> </text:span>Cada paso era una lucha.</text:p>
      <text:p text:style-name="P55"><text:span text:style-name="T25">Y s</text:span>intieron<text:span text:style-name="T25"> el miedo,</text:span> auténtico miedo.</text:p>
      <text:p text:style-name="P55">No al fracaso.<text:span text:style-name="T25"> </text:span>A no sobrevivir.</text:p>
      <text:p text:style-name="P55">El agua comenzó a acumularse rápidamente.</text:p>
      <text:p text:style-name="P55">Al principio cubría los tobillos.<text:span text:style-name="T25"> </text:span>Luego las rodillas.<text:span text:style-name="T25"> </text:span>Después la cintura.</text:p>
      <text:p text:style-name="P55"><text:span text:style-name="T25">Ya n</text:span>adie sabía exactamente dónde terminaba el camino y dónde comenzaba el río.</text:p>
      <text:p text:style-name="P55">Tal vez se habían desviado.<text:span text:style-name="T25"> </text:span>Tal vez el río se estaba desbordando.<text:span text:style-name="T25"> </text:span></text:p>
      <text:p text:style-name="P55">Tal vez ambas cosas.</text:p>
      <text:p text:style-name="P55">El suelo desaparecía bajo sus pies.</text:p>
      <text:p text:style-name="P55"><text:span text:style-name="T25">Con c</text:span>ada paso <text:span text:style-name="T25">los pies se hundian</text:span> profundamente en el barro.<text:span text:style-name="T25"> </text:span>Los caballos avanzaban con enorme dificultad.<text:span text:style-name="T25"> </text:span>Luchaban por mantenerse erguidos.</text:p>
      <text:p text:style-name="P55">Un relámpago iluminó brevemente el paisaje.<text:span text:style-name="T25"> </text:span>Y todos comprendieron la magnitud del problema.</text:p>
      <text:p text:style-name="P55">Ya no existía camino.</text:p>
      <text:p text:style-name="P55"><text:soft-page-break/>Todo era agua<text:span text:style-name="T25">, </text:span><text:s/>barro.<text:span text:style-name="T25"> </text:span>Todo era pantano.</text:p>
      <text:p text:style-name="P55">La carreta avanzó unos metros más.<text:span text:style-name="T25"> </text:span>Entonces se detuvo.</text:p>
      <text:p text:style-name="P55">Una de las ruedas se hundió.</text:p>
      <text:p text:style-name="P55">Los caballos tiraron.<text:span text:style-name="T25"> </text:span>La madera crujió.<text:span text:style-name="T25"> Y l</text:span>a rueda desapareció todavía más profundamente.</text:p>
      <text:p text:style-name="P55">Intentaron empujar<text:span text:style-name="T25">, </text:span>cavar.<text:span text:style-name="T25"> </text:span>Intentaron liberar el vehículo.</text:p>
      <text:p text:style-name="P55">Fue inútil.</text:p>
      <text:p text:style-name="P55">La tormenta estaba ganando.</text:p>
      <text:p text:style-name="P55">—¡Dejadla! —gritó uno de los hombres.</text:p>
      <text:p text:style-name="P55">Las herramientas<text:span text:style-name="T25">, l</text:span>as provisiones.<text:span text:style-name="T25"> </text:span>Todo estaba allí.</text:p>
      <text:p text:style-name="P55">Cargaron sobre los hombros todo lo que pudieron rescatar.</text:p>
      <text:p text:style-name="P55">Y comenzaron a avanzar.</text:p>
      <text:p text:style-name="P55">La marcha se convirtió en una pesadilla.<text:span text:style-name="T25"> </text:span>El agua les llegaba al pecho.<text:span text:style-name="T25"> </text:span>El barro intentaba arrancarles las botas.<text:span text:style-name="T25"> </text:span>La lluvia golpeaba sus rostros con violencia.</text:p>
      <text:p text:style-name="P54">Avanzaron luchando contra la cortina de agua que caia como una ola gigantesca, durante una hora, tal vez mas.</text:p>
      <text:p text:style-name="P54">La tormenta no cesaba.</text:p>
      <text:p text:style-name="P35"><text:span text:style-name="T26">Consiguieron llegar a un </text:span>terreno rocoso.<text:span text:style-name="T26"> </text:span>Una elevación que sobresalía del pantano.</text:p>
      <text:p text:style-name="P54">La alcanzaron exhaustos.</text:p>
      <text:p text:style-name="P55">Y allí permanecieron durante horas esperando que la tormenta terminara.</text:p>
      <text:p text:style-name="P55">Cuando la noche llegó, la lluvia había cesado.<text:span text:style-name="T26"> </text:span></text:p>
      <text:p text:style-name="P55"><text:span text:style-name="T26">Y a</text:span>nte ellos se extendía una enorme laguna oscura.</text:p>
      <text:p text:style-name="P55">El paisaje había cambiado por completo.</text:p>
      <text:p text:style-name="P55">Nadie podía identificar dónde había estado el camino.<text:span text:style-name="T26"> </text:span>Ni dónde había quedado la carreta.<text:span text:style-name="T26"> </text:span>Ni dónde estaban los caballos.</text:p>
      <text:p text:style-name="P55">Todo había desaparecido.</text:p>
      <text:p text:style-name="P55"/>
      <text:p text:style-name="P30"/>
      <text:p text:style-name="P55"/>
      <text:p text:style-name="P55"/>
      <text:h text:style-name="P23" text:outline-level="3"><text:span text:style-name="T26">Parte 3 - </text:span>El puente</text:h>
      <text:p text:style-name="P55"/>
      <text:p text:style-name="P55"><text:soft-page-break/></text:p>
      <text:p text:style-name="P55">Los días siguientes fueron mucho más difíciles.</text:p>
      <text:p text:style-name="P55">Ahora transportaban el equipo a la espalda.<text:span text:style-name="T27"> </text:span>Las provisiones eran escasas.<text:span text:style-name="T27"> </text:span>El cansancio se acumulaba.</text:p>
      <text:p text:style-name="P55">Y el entusiasmo inicial comenzaba a mezclarse con preocupación.</text:p>
      <text:p text:style-name="P55"/>
      <text:p text:style-name="P55">Finalmente alcanzaron la región montañosa.</text:p>
      <text:p text:style-name="P55">Según sus cálculos, ya no se encontraban lejos del destino.<text:span text:style-name="T27"> </text:span>Quizá diez millas.<text:span text:style-name="T27"> </text:span>Tal vez menos.</text:p>
      <text:p text:style-name="P55">Un día de marcha.<text:span text:style-name="T27"> </text:span>Dos como mucho.</text:p>
      <text:p text:style-name="P55">Después de todas las dificultades, el tesoro parecía estar al alcance de la mano.</text:p>
      <text:p text:style-name="P55">Pero entonces llegaron al acantilado.<text:span text:style-name="T27"> </text:span>Y descubrieron el problema.</text:p>
      <text:p text:style-name="P55">El mapa mostraba un antiguo puente <text:span text:style-name="T27">colgante</text:span> que conectaba ambas regiones de Terroja.</text:p>
      <text:p text:style-name="P55">Sin embargo el puente ya no existía.<text:span text:style-name="T27"> H</text:span>abía desaparecido.<text:span text:style-name="T27"> </text:span>Probablemente siglos atrás.</text:p>
      <text:p text:style-name="P55">Abajo rugía <text:span text:style-name="T27">el</text:span> río.<text:span text:style-name="T27"> </text:span>Muy por debajo de ellos.</text:p>
      <text:p text:style-name="P55">El silencio se apoderó del grupo.</text:p>
      <text:p text:style-name="P55">Todos observaban el vacío.<text:span text:style-name="T27"> </text:span>Todos comprendían lo mismo.<text:span text:style-name="T27"> </text:span>La ruta había desaparecido.</text:p>
      <text:p text:style-name="P55">Durante varios minutos nadie habló.</text:p>
      <text:p text:style-name="P55"/>
      <text:p text:style-name="P55">—Yo no voy a abandonar —dijo finalmente.</text:p>
      <text:p text:style-name="P55">Su voz sonó más dura de lo habitual.</text:p>
      <text:p text:style-name="P55">Algunos lo miraron con sorpresa.</text:p>
      <text:p text:style-name="P55">—De algún modo cruzaremos.</text:p>
      <text:p text:style-name="P55">Nadie respondió inmediatamente.</text:p>
      <text:p text:style-name="P55">Ninguno quería rendirse.<text:span text:style-name="T27"> </text:span>No tan cerca del objetivo.</text:p>
      <text:p text:style-name="P35"><text:span text:style-name="T27">T</text:span>omaron una decisión.<text:span text:style-name="T27"> </text:span>Descenderían por la pared del acantilado.<text:span text:style-name="T27"> </text:span>Cruzarían el río.</text:p>
      <text:p text:style-name="P55">Y tratarían de escalar por el lado opuesto.</text:p>
      <text:p text:style-name="P55">La idea era peligrosa.<text:span text:style-name="T27"> </text:span>Tal vez imposible.<text:span text:style-name="T27"> </text:span>Pero ya era la única opción.</text:p>
      <text:p text:style-name="P55">Debajo de ellos se abría el abismo.</text:p>
      <text:p text:style-name="P55">Una hora más tarde<text:span text:style-name="T28">, mientras las sombras del atardecer comenzaban a extenderse sobre las montañas,</text:span> comenzaron el descenso.</text:p>
      <text:p text:style-name="P53"><text:s/></text:p>
      <text:p text:style-name="Text_20_body"><text:soft-page-break/></text:p>
      <text:p text:style-name="Horizontal_20_Line"/>
      <text:p text:style-name="Text_20_body"/>
      <text:h text:style-name="P9" text:outline-level="1">Capítulo <text:span text:style-name="T29">2</text:span> - <text:span text:style-name="T50">El l</text:span>í<text:span text:style-name="T50">mite</text:span></text:h>
      <text:p text:style-name="P48"/>
      <text:p text:style-name="P48"/>
      <text:p text:style-name="P36"><text:tab/></text:p>
      <text:h text:style-name="P19" text:outline-level="2">Parte 1 - El ascenso imposible</text:h>
      <text:p text:style-name="P64"/>
      <text:p text:style-name="P64">El descenso por la pared occidental resultó más sencillo de lo esperado.</text:p>
      <text:p text:style-name="P64">La roca estaba surcada por numerosas grietas y repisas naturales que ofrecían puntos de apoyo relativamente seguros.</text:p>
      <text:p text:style-name="P64">Uno a uno, los seis hombres fueron descendiendo hasta alcanzar el fondo del valle.</text:p>
      <text:p text:style-name="P64">Desde allí cruzaron el río ayudándose con las cuerdas que habían conseguido salvar de la tormenta.</text:p>
      <text:p text:style-name="P64">El agua era rápida y helada, pero la corriente no representó un problema serio.</text:p>
      <text:p text:style-name="P64">Al caer la tarde todos se encontraban ya al otro lado.</text:p>
      <text:p text:style-name="P64">Y fue entonces cuando comprendieron la magnitud del desafío que les esperaba.</text:p>
      <text:p text:style-name="P64">La pared oriental se alzaba frente a ellos como una muralla construida por gigantes.</text:p>
      <text:p text:style-name="P64"><text:span text:style-name="T32">L</text:span>isa.<text:span text:style-name="T33"> </text:span><text:span text:style-name="T32">I</text:span>ntimidante.</text:p>
      <text:p text:style-name="P64">Trescientos metros de granito gris ascendían casi verticalmente hacia el cielo.</text:p>
      <text:p text:style-name="P64">Durante varios minutos permanecieron observándola en silencio.</text:p>
      <text:p text:style-name="P64"><text:span text:style-name="T34">El ascenso</text:span> parecía imposible.</text:p>
      <text:p text:style-name="P64">No había senderos.<text:span text:style-name="T33"> </text:span>No existía ninguna ruta evidente.</text:p>
      <text:p text:style-name="P64">Sólo roca desnuda elevándose sobre sus cabezas.</text:p>
      <text:p text:style-name="P64">—Tiene que haber algún paso —dijo uno de ellos finalmente.</text:p>
      <text:p text:style-name="P64">Decidieron acampar junto al río.<text:span text:style-name="T33"> </text:span>Necesitaban descansar<text:span text:style-name="T34"> y</text:span> estudiar la montaña.</text:p>
      <text:p text:style-name="P64">Pasaron el resto de la tarde examinando la pared desde distintos ángulos.<text:span text:style-name="T33"> </text:span>Buscando grietas<text:span text:style-name="T34">, c</text:span>ornisas<text:span text:style-name="T34">, p</text:span>osibles rutas.</text:p>
      <text:p text:style-name="P64"><text:soft-page-break/>El río les proporcionó agua<text:span text:style-name="T34">, l</text:span>a pesca les permitió conseguir algo de comida<text:span text:style-name="T34">, y </text:span>un conjunto de árboles inclinados junto a unas rocas salientes les ofreció refugio suficiente para pasar la noche.</text:p>
      <text:p text:style-name="P64">Sin embargo, ninguno durmió especialmente bien.</text:p>
      <text:p text:style-name="P64">La montaña permanecía allí.<text:span text:style-name="T34"> </text:span>Observándolos.<text:span text:style-name="T34"> Esperando. </text:span>Como una amenaza silenciosa.</text:p>
      <text:p text:style-name="P64"/>
      <text:p text:style-name="P64">Al amanecer el tiempo era excelente.<text:span text:style-name="T33"> </text:span>El cielo estaba despejado.<text:span text:style-name="T33"> </text:span>El aire fresco.</text:p>
      <text:p text:style-name="P64">Prepararon las cuerdas.<text:span text:style-name="T33"> </text:span>Repartieron el equipo.<text:span text:style-name="T33"> </text:span>Y comenzaron a subir.</text:p>
      <text:p text:style-name="P64">Los primeros metros resultaron relativamente sencillos.<text:span text:style-name="T33"> </text:span>La roca ofrecía numerosos <text:span text:style-name="T34">puntos de </text:span>apoyo.</text:p>
      <text:p text:style-name="P64">Las grietas permitían avanzar con cierta comodidad.<text:span text:style-name="T33"> </text:span></text:p>
      <text:p text:style-name="P56">Pero poco a poco, a medida que ganaban altura, el cansancio comenzo a notarse. </text:p>
      <text:p text:style-name="P64"><text:span text:style-name="T35">Y entonces todo</text:span> cambió.</text:p>
      <text:p text:style-name="P64">El suelo había desaparecido muy por debajo de ellos<text:span text:style-name="T35">, e</text:span>l río se había convertido en una cinta plateada<text:span text:style-name="T35">, y l</text:span>os árboles parecían arbustos diminutos<text:span text:style-name="T35">, cuando</text:span> los apoyos empeza<text:span text:style-name="T35">ron </text:span>a escasear.</text:p>
      <text:p text:style-name="P64"/>
      <text:p text:style-name="P64">Los hombres avanzaban despacio.<text:span text:style-name="T33"> </text:span>Uno detrás de otro.<text:span text:style-name="T33"> </text:span>Separados apenas por unos metros.</text:p>
      <text:p text:style-name="P64">Cada paso debía estudiarse cuidadosamente.</text:p>
      <text:p text:style-name="P64">La montaña parecía cambiar a medida que ascendían.<text:span text:style-name="T35"> </text:span><text:span text:style-name="T33">Ya no ofrecía tantas oportunidades como en la base.</text:span></text:p>
      <text:p text:style-name="P64"><text:span text:style-name="T36">Y comenzaron uno a uno a quedar bloqueados en el ascenso. </text:span>Atrapado<text:span text:style-name="T36">s</text:span>.</text:p>
      <text:p text:style-name="P57">En mitad de la pared.</text:p>
      <text:p text:style-name="P64">Sin encontrar un camino evidente para continuar.<text:span text:style-name="T35"> </text:span>Ni hacia arriba.<text:span text:style-name="T36"> Ni hacia abajo.</text:span></text:p>
      <text:p text:style-name="P39"/>
      <text:p text:style-name="P57">Y de pronto, </text:p>
      <text:p text:style-name="P64"><text:span text:style-name="T37">a</text:span>ferrados a la roca.</text:p>
      <text:p text:style-name="P64">Suspendidos sobre el vacío.</text:p>
      <text:p text:style-name="P57"><text:span text:style-name="T38">Paralizados por el vertigo</text:span>.</text:p>
      <text:p text:style-name="P37">Comprendieron que la montaña podía vencerlos.</text:p>
      <text:p text:style-name="P58"/>
      <text:p text:style-name="P39"/>
      <text:p text:style-name="P31"/>
      <text:p text:style-name="P64"/>
      <text:h text:style-name="P20" text:outline-level="2"><text:soft-page-break/>Parte 2 - <text:s/><text:span text:style-name="T39">Ghim</text:span></text:h>
      <text:p text:style-name="P64"/>
      <text:p text:style-name="P64">El viento <text:span text:style-name="T39">comenzo a </text:span>sopla<text:span text:style-name="T39">r</text:span> con mayor fuerza.<text:span text:style-name="T40"> Y</text:span> la cima seguía pareciendo lejana.</text:p>
      <text:p text:style-name="P64">El más joven de todos<text:span text:style-name="T39">, Ghim, </text:span><text:s/><text:span text:style-name="T39">comenzo</text:span> a desviarse<text:span text:style-name="T39"> por </text:span>una serie de grietas diagonales que ascendían por la pared forma<text:span text:style-name="T39">ndo</text:span> una ruta mucho más accesible.</text:p>
      <text:p text:style-name="P61">Comenzo a avanzar rapidamente.</text:p>
      <text:p text:style-name="P61">—¡Por aquí! —gritó.</text:p>
      <text:p text:style-name="P64">Aquello era exactamente lo que todos necesitaban.<text:span text:style-name="T39"> Una salida.</text:span></text:p>
      <text:p text:style-name="P39"><text:span text:style-name="T39">S</text:span>uspendido a más de doscientos metros sobre el vacío, Ghim continuó subiendo.</text:p>
      <text:p text:style-name="P64"/>
      <text:p text:style-name="P64">Y entonces sucedió.</text:p>
      <text:p text:style-name="P64">Nadie comprendió exactamente qué ocurrió.</text:p>
      <text:p text:style-name="P64"><text:span text:style-name="T41">P</text:span><text:span text:style-name="T42">asó</text:span> demasiado rápido.</text:p>
      <text:p text:style-name="P39"><text:span text:style-name="T39">S</text:span>us manos se separaron de la pared.</text:p>
      <text:p text:style-name="P64">Simplemente se separaron.</text:p>
      <text:p text:style-name="P61">Y cayó.</text:p>
      <text:p text:style-name="P61"/>
      <text:p text:style-name="P64">Su cuerpo rebotó contra la pared de granito mientras descendía.</text:p>
      <text:p text:style-name="P64"><text:span text:style-name="T43">El</text:span> impacto produ<text:span text:style-name="T43">jo</text:span> un sonido horrible.</text:p>
      <text:p text:style-name="P64">Seco.</text:p>
      <text:p text:style-name="P64"/>
      <text:p text:style-name="P64">Los demás <text:span text:style-name="T41">lo </text:span>observa<text:span text:style-name="T43">ron</text:span> paralizados.<text:span text:style-name="T44"> </text:span>Nadie podía moverse.</text:p>
      <text:p text:style-name="P64"><text:span text:style-name="T41">P</text:span>ermanecieron inmóviles.</text:p>
      <text:p text:style-name="P64">Aferrados a la roca.</text:p>
      <text:p text:style-name="P64">Intentando comprender.</text:p>
      <text:p text:style-name="P64">Ninguno había podido hacer nada<text:span text:style-name="T45"> para evitarlo</text:span>.</text:p>
      <text:p text:style-name="P38"/>
      <text:p text:style-name="P64">Fue entonces cuando comprendieron algo aterrador.<text:span text:style-name="T46"> <text:s/></text:span></text:p>
      <text:p text:style-name="P62">La muerte estaba mucho más cerca de lo que imaginaban<text:span text:style-name="T45">.</text:span></text:p>
      <text:p text:style-name="P38">Y al instante, el profundo dolor por la muerte repentina de un amigo se confundio con el horror de sentirse esperando, de forma inminente, la misma suerte.</text:p>
      <text:p text:style-name="P38"/>
      <text:p text:style-name="P64"><text:soft-page-break/>Ahora sabían la verdad.</text:p>
      <text:p text:style-name="P39"><text:span text:style-name="T46">A</text:span>trapados en mitad de la pared.<text:span text:style-name="T46"> </text:span>Suspendidos sobre el vacío.</text:p>
      <text:p text:style-name="P64">Ninguno estaba a salvo.<text:span text:style-name="T46"> </text:span></text:p>
      <text:p text:style-name="P64"><text:span text:style-name="T46">N</text:span>inguno tenía garantía alguna de alcanzar la cima.</text:p>
      <text:p text:style-name="P64"/>
      <text:p text:style-name="P64"/>
      <text:p text:style-name="P31"/>
      <text:p text:style-name="P64"/>
      <text:h text:style-name="P19" text:outline-level="2"/>
      <text:h text:style-name="P19" text:outline-level="2">Parte 3 -<text:span text:style-name="T47"> Derrota</text:span></text:h>
      <text:p text:style-name="P64"/>
      <text:p text:style-name="P64">La caída de Ghim conmocionó al grupo.</text:p>
      <text:p text:style-name="P64">Durante varios minutos permanecieron inmóviles sobre la pared de roca, incapaces de aceptar lo que acababan de ver.</text:p>
      <text:p text:style-name="P64"><text:span text:style-name="T47">D</text:span>ecidieron descender.<text:span text:style-name="T30"> </text:span>No podían marcharse sin encontrarlo.<text:span text:style-name="T47"> </text:span></text:p>
      <text:p text:style-name="P64">Ayudados por las cuerdas, el descenso fue relativamente rápido. </text:p>
      <text:p text:style-name="P64">Una vez en la base del acantilado comenzaron la búsqueda.</text:p>
      <text:p text:style-name="P64">Recorrieron las rocas.<text:span text:style-name="T31"> </text:span>Registraron las grietas.<text:span text:style-name="T31"> </text:span>Examinaron la orilla.</text:p>
      <text:p text:style-name="P64">Llamaron su nombre una y otra vez.</text:p>
      <text:p text:style-name="P64"><text:span text:style-name="T48">Pero n</text:span>o <text:span text:style-name="T48">consiguieron </text:span>encontrar<text:span text:style-name="T48">lo</text:span>.</text:p>
      <text:p text:style-name="P64">Cuando el sol comenzó a ocultarse comprendieron que era inútil.</text:p>
      <text:p text:style-name="P64"/>
      <text:p text:style-name="P64">Entonces aceptaron otra verdad.</text:p>
      <text:p text:style-name="P64">La montaña había <text:span text:style-name="T31">vencido</text:span>.</text:p>
      <text:p text:style-name="P64"><text:span text:style-name="T31">S</text:span>i querian alcanzar el objetivo<text:span text:style-name="T31"> d</text:span>ebían buscar otra forma de llegar.</text:p>
      <text:p text:style-name="P64"><text:span text:style-name="T31">Sin</text:span> caballos<text:span text:style-name="T31">, sin</text:span> el equipo necesario<text:span text:style-name="T31"> l</text:span>a expedición había terminado.</text:p>
      <text:p text:style-name="P64">Regresarían a Oldwood al amanecer.<text:span text:style-name="T47"> </text:span><text:span text:style-name="T31">No había otra opción.</text:span></text:p>
      <text:p text:style-name="P63"/>
      <text:p text:style-name="P63">La oscuridad envolvió<text:span text:style-name="T30"> poco a poco</text:span> la montaña.</text:p>
      <text:p text:style-name="P64"><text:soft-page-break/><text:span text:style-name="T30">E</text:span>ncendieron una hoguera<text:span text:style-name="T30">,</text:span> compartieron las últimas provisiones.<text:span text:style-name="T30"> Hablaron poco.</text:span></text:p>
      <text:p text:style-name="P64">La muerte<text:span text:style-name="T30"> lo</text:span> había<text:span text:style-name="T30"> cambiado</text:span> <text:span text:style-name="T30">todo</text:span>.</text:p>
      <text:p text:style-name="P64">La silueta negra del acantilado se elevaba sobre ellos ocultando las estrellas.</text:p>
      <text:p text:style-name="P64">El viento descendía desde las alturas arrastrando sonidos extraños entre las rocas.</text:p>
      <text:p text:style-name="P64"><text:span text:style-name="T30">L</text:span>a montaña <text:span text:style-name="T49">se habia transformado ahora en,</text:span></text:p>
      <text:p text:style-name="P64"><text:s/>una presencia.<text:span text:style-name="T47"> </text:span></text:p>
      <text:p text:style-name="P64">Oscura.<text:span text:style-name="T47"> </text:span>Inmensa.<text:span text:style-name="T47"> </text:span></text:p>
      <text:p text:style-name="P64">Indiferente.</text:p>
      <text:p text:style-name="P64"/>
      <text:p text:style-name="P49"><text:span text:style-name="T30">Y la noche lleg</text:span><text:span text:style-name="T31">ó</text:span><text:span text:style-name="T30">.</text:span></text:p>
      <text:p text:style-name="P49"/>
      <text:p text:style-name="Horizontal_20_Line"/>
      <text:p text:style-name="Text_20_body"/>
      <text:h text:style-name="P14" text:outline-level="1"><text:span text:style-name="T20">Acto </text:span><text:span text:style-name="T51">3</text:span> - <text:span text:style-name="T51">El Destino</text:span></text:h>
      <text:p text:style-name="P50"/>
      <text:h text:style-name="P10" text:outline-level="1">Capítulo 1 - <text:span text:style-name="T52">Impulso</text:span></text:h>
      <text:p text:style-name="P50"/>
      <text:h text:style-name="P21" text:outline-level="2">Capítulo 1</text:h>
      <text:h text:style-name="P24" text:outline-level="3">Parte 1 - Financiación</text:h>
      <text:p text:style-name="P40"/>
      <text:p text:style-name="P66">El regreso a Oldwood fue muy distinto a la partida.</text:p>
      <text:p text:style-name="P66"><text:span text:style-name="T53">R</text:span>egresaban en silencio.<text:span text:style-name="T54"> </text:span>Sin caballos.<text:span text:style-name="T53"> </text:span>Sin provisiones.<text:span text:style-name="T54"> </text:span>Sin Ghim.</text:p>
      <text:p text:style-name="P66">Durante las semanas siguientes cada uno intentó reconstruir su vida.</text:p>
      <text:p text:style-name="P66">Pero Nohk no podía dejar de pensar en el tesoro.</text:p>
      <text:p text:style-name="P66">Estudiaba el mapa una y otra vez.<text:span text:style-name="T53"> </text:span>Repasaba cada tramo del viaje.<text:span text:style-name="T53"> </text:span>Cada decisión.<text:span text:style-name="T53"> </text:span>Cada error.</text:p>
      <text:p text:style-name="P66">Y poco a poco llegó a una conclusión.</text:p>
      <text:p text:style-name="P66">La pared del puente no era la única forma de alcanzar las tierras altas.</text:p>
      <text:p text:style-name="P66"><text:soft-page-break/>Existía otra ruta.<text:span text:style-name="T53"> </text:span>Más larga.<text:span text:style-name="T53"> </text:span>Más dura.<text:span text:style-name="T53"> </text:span>Un rodeo por el Desierto de Piedra.</text:p>
      <text:p text:style-name="P66">Si conseguían atravesarlo, podrían llegar a la misma región sin necesidad de escalar el acantilado.</text:p>
      <text:p text:style-name="P66">Cuando estuvo convencido, reunió a sus compañeros en la posada.</text:p>
      <text:p text:style-name="P66">Extendió el mapa sobre la mesa.</text:p>
      <text:p text:style-name="P66">—Voy a volver —dijo—. En cuanto consiga el equipo necesario.</text:p>
      <text:p text:style-name="P66">Nadie respondió de inmediato.</text:p>
      <text:p text:style-name="P66">Las llamas de la chimenea crepitaban en el silencio.</text:p>
      <text:p text:style-name="P66">Finalmente habló Tarhk.</text:p>
      <text:p text:style-name="P66">—Yo no iré.<text:span text:style-name="T53"> </text:span>Ya he perdido bastante.</text:p>
      <text:p text:style-name="P66">Pohval asintió.</text:p>
      <text:p text:style-name="P66">—Yo tampoco volveré.</text:p>
      <text:p text:style-name="P66">Nohk observó a sus dos amigos.</text:p>
      <text:p text:style-name="P66">Le resultaba imposible entenderlos.<text:span text:style-name="T53"> </text:span>¿Cómo podían abandonar ahora?</text:p>
      <text:p text:style-name="P66">Pero Tarhk y Pohval ya habían tomado su decisión.</text:p>
      <text:p text:style-name="P66">Todavía conservaban sus tierras.<text:span text:style-name="T53"> </text:span>Todavía tenían una vida a la que regresar.</text:p>
      <text:p text:style-name="P66">Y, por primera vez desde que comenzó la expedición, se permitieron considerar una posibilidad que antes habían rechazado.</text:p>
      <text:p text:style-name="P66">Tal vez no existía ningún tesoro.<text:span text:style-name="T53"> </text:span>Tal vez la leyenda era sólo una leyenda.</text:p>
      <text:p text:style-name="P66">No estaban dispuestos a sacrificarlo todo por una promesa.</text:p>
      <text:p text:style-name="P66">Cuando se marcharon de la posada, no volvieron a hablar del tesoro.</text:p>
      <text:p text:style-name="P66">Nohk permaneció sentado junto a Kempht y Johf.</text:p>
      <text:p text:style-name="P66">Los tres guardaron silencio durante un rato.</text:p>
      <text:p text:style-name="P66">Finalmente fue Kempht quien habló.</text:p>
      <text:p text:style-name="P66">—Yo iré.</text:p>
      <text:p text:style-name="P66">Johf asintió.</text:p>
      <text:p text:style-name="P66">—Yo también.</text:p>
      <text:p text:style-name="P66">Ninguno habló de los riesgos.<text:span text:style-name="T53"> </text:span>En sus mentes sólo existía una idea.<text:span text:style-name="T53"> </text:span>El tesoro tenía que ser real.</text:p>
      <text:p text:style-name="P66">Tenía que serlo.</text:p>
      <text:p text:style-name="P66">De lo contrario, ¿qué sentido habría tenido todo aquello?</text:p>
      <text:p text:style-name="P66"><text:span text:style-name="T54">En l</text:span>as semanas siguientes vendieron cuanto poseían.</text:p>
      <text:p text:style-name="P66"><text:soft-page-break/>Las tierras.<text:span text:style-name="T53"> </text:span>Las casas.<text:span text:style-name="T53"> </text:span>Los animales.<text:span text:style-name="T53"> </text:span>Las herramientas.</text:p>
      <text:p text:style-name="P66">Todo.</text:p>
      <text:p text:style-name="P66">Convirtieron sus vidas enteras en provisiones, cuerdas y equipo de viaje.</text:p>
      <text:p text:style-name="P66">Cuando terminaron, ya no les quedaba nada en Oldwood.</text:p>
      <text:p text:style-name="P66">Nada a lo que regresar.<text:span text:style-name="T53"> </text:span>Nada que los esperara si fracasaban.</text:p>
      <text:p text:style-name="P66">Sus destinos habían quedado unidos al tesoro.</text:p>
      <text:p text:style-name="P66">Lo encontrarían.</text:p>
      <text:p text:style-name="P66">O lo perderían todo.</text:p>
      <text:p text:style-name="P40"/>
      <text:p text:style-name="P40"/>
      <text:p text:style-name="P32"/>
      <text:p text:style-name="P66"/>
      <text:h text:style-name="P25" text:outline-level="3">Parte 2 - <text:span text:style-name="T55">El robo</text:span></text:h>
      <text:p text:style-name="P66"/>
      <text:p text:style-name="P66">Durante los días siguientes apenas descansaron.</text:p>
      <text:p text:style-name="P66">La compra de los caballos, las provisiones y el equipo había ocupado cada hora de luz. Cuando no estaban negociando con comerciantes, estaban revisando herramientas, reforzando cuerdas o calculando la cantidad de comida necesaria para el viaje.</text:p>
      <text:p text:style-name="P66">Todo debía estar preparado.</text:p>
      <text:p text:style-name="P66">Todo debía funcionar.</text:p>
      <text:p text:style-name="P66">La nueva expedición no podía fracasar.</text:p>
      <text:p text:style-name="P66">No después de todo lo que habían sacrificado.</text:p>
      <text:p text:style-name="P66">La tarde anterior a la partida, los tres hombres se reunieron en el patio de una vieja posada situada junto al camino principal.</text:p>
      <text:p text:style-name="P66">La carreta estaba lista.<text:span text:style-name="T56"> </text:span>Dos caballos fuertes tiraban de ella.</text:p>
      <text:p text:style-name="P66">Los sacos de grano estaban bien sujetos.<text:span text:style-name="T56"> </text:span>Las herramientas ocupaban varios cajones de madera.</text:p>
      <text:p text:style-name="P66">Las cuerdas habían sido enrolladas cuidadosamente.</text:p>
      <text:p text:style-name="P66">Al caer la noche guardaron la llave junto al resto de los suministros.</text:p>
      <text:p text:style-name="P66">Partirían al amanecer.</text:p>
      <text:p text:style-name="P66"/>
      <text:p text:style-name="P66"><text:span text:style-name="T56">A mitad de la noche </text:span>Nohk despertó sobresaltado.</text:p>
      <text:p text:style-name="P66"><text:soft-page-break/>La habitación estaba oscura.<text:span text:style-name="T56"> </text:span>El amanecer todavía parecía lejano.</text:p>
      <text:p text:style-name="P66">Entonces volvió a escucharlo.</text:p>
      <text:p text:style-name="P66">Caballos.<text:span text:style-name="T56"> </text:span>El sonido de cascos golpeando el suelo.</text:p>
      <text:p text:style-name="P66">Lejos.<text:span text:style-name="T56"> </text:span>Alejándose.</text:p>
      <text:p text:style-name="P66">Se incorporó de inmediato.<text:span text:style-name="T56"> </text:span>Una sensación desagradable recorrió su espalda.<text:span text:style-name="T56"> </text:span></text:p>
      <text:p text:style-name="P66">Salió al exterior.</text:p>
      <text:p text:style-name="P66">Y se quedó paralizado.</text:p>
      <text:p text:style-name="P66">La carreta había desaparecido.<text:span text:style-name="T56"> </text:span>Los caballos también.</text:p>
      <text:p text:style-name="P66">El espacio donde habían pasado la noche estaba vacío.</text:p>
      <text:p text:style-name="P66"><text:span text:style-name="T56">S</text:span>intió un golpe de frío en el estómago.</text:p>
      <text:p text:style-name="P66"/>
      <text:p text:style-name="P66">La llave no estaba.</text:p>
      <text:p text:style-name="P66">Entonces una realidad brutal se abrió paso.</text:p>
      <text:p text:style-name="P66">Johf.</text:p>
      <text:p text:style-name="P66">Johf había desaparecido.</text:p>
      <text:p text:style-name="P66">Despertó a Kempht de un tirón.</text:p>
      <text:p text:style-name="P66">—¡Levántate!</text:p>
      <text:p text:style-name="P66">Johf había robado la llave<text:span text:style-name="T57">, </text:span>la expedición<text:span text:style-name="T57">, t</text:span>odo lo que poseían.</text:p>
      <text:p text:style-name="P66">No podían correr detrás de una carreta a pie.</text:p>
      <text:p text:style-name="P66">—Necesitamos caballos.</text:p>
      <text:p text:style-name="P66">Kempht comprendió inmediatamente.</text:p>
      <text:p text:style-name="P66">—El viejo Hompt tiene dos.<text:span text:style-name="T57"> El lo comprendera. <text:s/>Se los devolveremos.</text:span></text:p>
      <text:p text:style-name="P66"><text:span text:style-name="T57">E</text:span>n sus mentes la situación ya había sido resuelta.</text:p>
      <text:p text:style-name="P66">Johf les había robado.<text:span text:style-name="T57"> </text:span>Y ellos tenían derecho a recuperar lo que era suyo.</text:p>
      <text:p text:style-name="P66">Todo lo demás era secundario.</text:p>
      <text:p text:style-name="P66">—<text:span text:style-name="T57">Se los devolveremos c</text:span>uando recuperemos la carreta<text:span text:style-name="T57">. </text:span>Hompt lo entenderá.</text:p>
      <text:p text:style-name="P66">Ninguno de los dos pareció advertir la facilidad con la que acababan de justificar un robo.</text:p>
      <text:p text:style-name="P66">Ni siquiera se consideraban ladrones.</text:p>
      <text:p text:style-name="P66">Al contrario.<text:span text:style-name="T58"> </text:span>Se sentían víctimas.<text:span text:style-name="T58"> </text:span>Hombres obligados por las circunstancias.</text:p>
      <text:p text:style-name="P66">Hombres que simplemente recuperaban lo que les pertenecía.</text:p>
      <text:p text:style-name="P66"><text:soft-page-break/>La decisión quedó tomada.</text:p>
      <text:p text:style-name="P66">Minutos después abandonaban el establo con los dos caballos.</text:p>
      <text:p text:style-name="P66">El pueblo continuaba dormido.<text:span text:style-name="T58"> </text:span>Las casas permanecían oscuras.<text:span text:style-name="T58"> </text:span></text:p>
      <text:p text:style-name="P66">Nadie vio partir a los dos jinetes.</text:p>
      <text:p text:style-name="P66">A todo galope atravesaron las calles vacías y dejaron atrás Oldwood.</text:p>
      <text:p text:style-name="P66">Cabalgaban impulsados por la ira.</text:p>
      <text:p text:style-name="P66">Frente a ellos sólo existía una única dirección.</text:p>
      <text:p text:style-name="P66">Johf.</text:p>
      <text:p text:style-name="P66">Sabían exactamente adónde se dirigía.</text:p>
      <text:p text:style-name="P66"/>
      <text:p text:style-name="P32"/>
      <text:p text:style-name="P66"/>
      <text:h text:style-name="P25" text:outline-level="3">Parte 3 - El desierto de piedra</text:h>
      <text:p text:style-name="P66"/>
      <text:p text:style-name="P66"/>
      <text:p text:style-name="P66">Dos días después encontraron el Desierto de Piedra.</text:p>
      <text:p text:style-name="P66">Ninguno de los dos estaba preparado para aquella visión.</text:p>
      <text:p text:style-name="P66">Hasta entonces ambos habían imaginado un terreno árido, difícil de atravesar, pero el paisaje que apareció ante ellos superaba cualquier expectativa.</text:p>
      <text:p text:style-name="P66">El mundo parecía haber muerto allí.</text:p>
      <text:p text:style-name="P66">Hasta donde alcanzaba la vista no existía ni un árbol.</text:p>
      <text:p text:style-name="P66">Ni una sombra.</text:p>
      <text:p text:style-name="P66">Ni una sola brizna de hierba.</text:p>
      <text:p text:style-name="P66">Sólo roca.</text:p>
      <text:p text:style-name="P66">Un océano interminable de piedra agrietada que se extendía en todas direcciones bajo un cielo blanco y abrasador.</text:p>
      <text:p text:style-name="P66">Grandes murallas de roca rojiza emergían del suelo formando cañones profundos y laberintos naturales.</text:p>
      <text:p text:style-name="P66">Algunas alcanzaban alturas imposibles.</text:p>
      <text:p text:style-name="P66">Otras aparecían erosionadas por siglos de viento y calor.</text:p>
      <text:p text:style-name="P66">Todo parecía inmóvil.</text:p>
      <text:p text:style-name="P66"><text:soft-page-break/>Antiguo.</text:p>
      <text:p text:style-name="P66">Hostil.</text:p>
      <text:p text:style-name="P66">Como si la propia tierra rechazara la presencia de los hombres.</text:p>
      <text:p text:style-name="P66">El sol golpeaba con una violencia insoportable.</text:p>
      <text:p text:style-name="P66">La luz rebotaba sobre las piedras y ascendía nuevamente desde el suelo.</text:p>
      <text:p text:style-name="P66">El calor llegaba desde arriba y desde abajo al mismo tiempo.</text:p>
      <text:p text:style-name="P66">Cada respiración parecía secar un poco más la garganta.</text:p>
      <text:p text:style-name="P66">Cada paso levantaba polvo caliente.</text:p>
      <text:p text:style-name="P66">Cada hora consumía las fuerzas que les quedaban.</text:p>
      <text:p text:style-name="P66">Nohk y Kempht habían cabalgado sin descanso desde que abandonaron Oldwood.</text:p>
      <text:p text:style-name="P66">Apenas habían dormido.</text:p>
      <text:p text:style-name="P66">Apenas habían comido.</text:p>
      <text:p text:style-name="P66">No llevaban provisiones.</text:p>
      <text:p text:style-name="P66">No llevaban agua.</text:p>
      <text:p text:style-name="P66">No llevaban nada.</text:p>
      <text:p text:style-name="P66">Sólo la desesperación de quienes lo habían perdido todo.</text:p>
      <text:p text:style-name="P66">Sus labios estaban agrietados.</text:p>
      <text:p text:style-name="P66">Sus rostros cubiertos de polvo.</text:p>
      <text:p text:style-name="P66">Los ojos hundidos por el cansancio.</text:p>
      <text:p text:style-name="P66">Varias veces durante el trayecto estuvieron a punto de detenerse.</text:p>
      <text:p text:style-name="P66">Pero cada vez que la idea aparecía, recordaban a Johf.</text:p>
      <text:p text:style-name="P66">Recordaban la llave.</text:p>
      <text:p text:style-name="P66">Recordaban el carro.</text:p>
      <text:p text:style-name="P66">Recordaban las tierras vendidas.</text:p>
      <text:p text:style-name="P66">Las monedas gastadas.</text:p>
      <text:p text:style-name="P66">La casa perdida.</text:p>
      <text:p text:style-name="P66">Y continuaban avanzando.</text:p>
      <text:p text:style-name="P66">No podían detenerse.</text:p>
      <text:p text:style-name="P66">No después de todo aquello.</text:p>
      <text:p text:style-name="P66"><text:soft-page-break/>La tarde del segundo día, cuando el calor comenzaba a disminuir ligeramente, Kempht divisó algo en la distancia.</text:p>
      <text:p text:style-name="P66">Al principio creyó que era un espejismo.</text:p>
      <text:p text:style-name="P66">Las ondas de aire caliente deformaban el horizonte.</text:p>
      <text:p text:style-name="P66">Pero poco a poco la imagen se volvió más clara.</text:p>
      <text:p text:style-name="P66">Una carreta.</text:p>
      <text:p text:style-name="P66">Dos caballos.</text:p>
      <text:p text:style-name="P66">Un pequeño refugio improvisado junto a una pared rocosa.</text:p>
      <text:p text:style-name="P66">—Allí —murmuró.</text:p>
      <text:p text:style-name="P66">Nohk levantó la vista.</text:p>
      <text:p text:style-name="P66">Y la vio.</text:p>
      <text:p text:style-name="P66">Incluso desde aquella distancia reconoció inmediatamente el carro.</text:p>
      <text:p text:style-name="P66">Una extraña mezcla de alivio y rabia recorrió su cuerpo.</text:p>
      <text:p text:style-name="P66">Lo habían encontrado.</text:p>
      <text:p text:style-name="P66">Johf estaba allí.</text:p>
      <text:p text:style-name="P66">Después de dos días de persecución.</text:p>
      <text:p text:style-name="P66">Después de dos días de hambre y sed.</text:p>
      <text:p text:style-name="P66">Después de dos días cabalgando casi sin descanso.</text:p>
      <text:p text:style-name="P66">Por fin lo habían alcanzado.</text:p>
      <text:p text:style-name="P66">Descendieron de los caballos y buscaron refugio entre las rocas.</text:p>
      <text:p text:style-name="P66">Desde allí podían observar el campamento sin ser vistos.</text:p>
      <text:p text:style-name="P66">Johf parecía cómodo.</text:p>
      <text:p text:style-name="P66">Había colocado una lona para protegerse del sol.</text:p>
      <text:p text:style-name="P66">Los caballos descansaban.</text:p>
      <text:p text:style-name="P66">Las provisiones permanecían apiladas junto a la carreta.</text:p>
      <text:p text:style-name="P66">Incluso desde lejos podían distinguir los barriles de agua.</text:p>
      <text:p text:style-name="P66">Aquella visión despertó una ira silenciosa.</text:p>
      <text:p text:style-name="P66">Mientras ellos atravesaban el desierto con la garganta ardiendo, Johf viajaba protegido.</text:p>
      <text:p text:style-name="P66">Mientras ellos sufrían, él descansaba.</text:p>
      <text:p text:style-name="P66">Mientras ellos arriesgaban la vida, él disfrutaba de todo aquello que les había robado.</text:p>
      <text:p text:style-name="P66"><text:soft-page-break/>Esperaron.</text:p>
      <text:p text:style-name="P66">No hablaron demasiado.</text:p>
      <text:p text:style-name="P66">No era necesario.</text:p>
      <text:p text:style-name="P66">La decisión parecía evidente.</text:p>
      <text:p text:style-name="P66">No podían enfrentarse a él durante el día.</text:p>
      <text:p text:style-name="P66">Estaban agotados.</text:p>
      <text:p text:style-name="P66">Y Johf todavía conservaba todas las ventajas.</text:p>
      <text:p text:style-name="P66">Así que aguardaron.</text:p>
      <text:p text:style-name="P66">Horas interminables.</text:p>
      <text:p text:style-name="P66">Ocultos entre las piedras.</text:p>
      <text:p text:style-name="P66">Observando.</text:p>
      <text:p text:style-name="P66">El sol descendió lentamente.</text:p>
      <text:p text:style-name="P66">Las sombras comenzaron a crecer.</text:p>
      <text:p text:style-name="P66">El calor se transformó en un frío desagradable.</text:p>
      <text:p text:style-name="P66">Y finalmente llegó la noche.</text:p>
      <text:p text:style-name="P66">La oscuridad envolvió el desierto.</text:p>
      <text:p text:style-name="P66">El silencio se volvió absoluto.</text:p>
      <text:p text:style-name="P66">Sólo permanecía el viento recorriendo los cañones.</text:p>
      <text:p text:style-name="P66">Esperaron todavía un poco más.</text:p>
      <text:p text:style-name="P66">Hasta que estuvieron seguros.</text:p>
      <text:p text:style-name="P66">Hasta que Johf quedó profundamente dormido.</text:p>
      <text:p text:style-name="P66">Entonces avanzaron.</text:p>
      <text:p text:style-name="P66">Lentamente.</text:p>
      <text:p text:style-name="P66">Sin hacer ruido.</text:p>
      <text:p text:style-name="P60"/>
      <text:p text:style-name="P60"/>
      <text:p text:style-name="P66">Todo estaba allí.</text:p>
      <text:p text:style-name="P66">Las provisiones.</text:p>
      <text:p text:style-name="P66">Las herramientas.</text:p>
      <text:p text:style-name="P66">Las cuerdas.</text:p>
      <text:p text:style-name="P66"><text:soft-page-break/>Los barriles de agua.</text:p>
      <text:p text:style-name="P66">Y la llave.</text:p>
      <text:p text:style-name="P60"/>
      <text:p text:style-name="P66">Nohk la tomó inmediatamente.</text:p>
      <text:p text:style-name="P66">La sostuvo durante un instante.</text:p>
      <text:p text:style-name="P66">Y sintió una satisfacción oscura.</text:p>
      <text:p text:style-name="P60"/>
      <text:p text:style-name="P66">Desataron los caballos.</text:p>
      <text:p text:style-name="P66">Tomaron las riendas.</text:p>
      <text:p text:style-name="P66">Y comenzaron a alejarse.</text:p>
      <text:p text:style-name="P66">Sin ruido.</text:p>
      <text:p text:style-name="P66">Sin prisas.</text:p>
      <text:p text:style-name="P60"/>
      <text:p text:style-name="P66"><text:s/>una voz rompió el silencio.</text:p>
      <text:p text:style-name="P66">—¡No!</text:p>
      <text:p text:style-name="P66">Johf.</text:p>
      <text:p text:style-name="P66">Había despertado.</text:p>
      <text:p text:style-name="P66">—¡Esperad!</text:p>
      <text:p text:style-name="P66">Su voz resonó en la oscuridad.</text:p>
      <text:p text:style-name="P66"><text:span text:style-name="T59">C</text:span>orría detrás de ellos.</text:p>
      <text:p text:style-name="P66">—¡No me dejéis aquí!</text:p>
      <text:p text:style-name="P66">Poco a poco la distancia aumentó.</text:p>
      <text:p text:style-name="P65">Johf <text:span text:style-name="T60">ya no pudo perseguirlos.</text:span></text:p>
      <text:p text:style-name="P65"><text:span text:style-name="T60">Y </text:span>vio como la carreta se alejaba dejandolo a merced del desierto.</text:p>
      <text:p text:style-name="P65">Sin consideracion, sin discusiones, sin perdon, sin piedad.</text:p>
      <text:p text:style-name="P59"/>
      <text:p text:style-name="P59"/>
      <text:p text:style-name="Horizontal_20_Line"/>
      <text:p text:style-name="Text_20_body"/>
      <text:p text:style-name="Text_20_body"/>
      <text:h text:style-name="P11" text:outline-level="1"><text:soft-page-break/>Capítulo <text:span text:style-name="T61">2</text:span> - <text:span text:style-name="T61">XXXXX</text:span></text:h>
      <text:p text:style-name="P51"/>
      <text:h text:style-name="P26" text:outline-level="3">Parte 1 - El acantilado</text:h>
      <text:p text:style-name="P78"><text:span text:style-name="T62">Tras varios</text:span> días <text:span text:style-name="T62">de viaje, finalmente</text:span> alcanzaron el lugar señalado en el mapa.</text:p>
      <text:p text:style-name="P67">Una vasta llanura desierta terminaba abruptamente en un acantilado.</text:p>
      <text:p text:style-name="P78"><text:span text:style-name="T62">N</text:span>o había nada<text:span text:style-name="T63"> mas</text:span><text:span text:style-name="T62"> allí</text:span>.<text:span text:style-name="T63"> </text:span>Sólo un acantilado.</text:p>
      <text:p text:style-name="P78">Una inmensa pared de roca que <text:span text:style-name="T62">ca</text:span>ía<text:span text:style-name="T62"> en vertical</text:span> cientos de metros hasta el mar.</text:p>
      <text:p text:style-name="P78"><text:span text:style-name="T63">Y m</text:span>ás allá no existía ninguna otra tierra.</text:p>
      <text:p text:style-name="P78">Sólo <text:span text:style-name="T62">e</text:span>l <text:span text:style-name="T62">mar y el </text:span>horizonte<text:span text:style-name="T62">.</text:span><text:span text:style-name="T63"> </text:span><text:span text:style-name="T62">E</text:span>l borde mismo del mundo.</text:p>
      <text:p text:style-name="P78"/>
      <text:p text:style-name="P68"><text:span text:style-name="T63">A</text:span> sus espaldas, la llanura se extendía en todas direcciones.<text:span text:style-name="T63"> </text:span></text:p>
      <text:p text:style-name="P68">No había nada mas que explorar. Todo estaba a la vista.</text:p>
      <text:p text:style-name="P78">Ambos comprendieron inmediatamente lo que significaba aquel lugar.</text:p>
      <text:p text:style-name="P68">El camino terminaba allí.</text:p>
      <text:p text:style-name="P78">El mapa los había conducido al fin del continente.</text:p>
      <text:p text:style-name="P68">Y nada más.</text:p>
      <text:p text:style-name="P68"/>
      <text:p text:style-name="P78"><text:span text:style-name="T64">Y</text:span>a no les quedaba energía para seguir luchando.<text:span text:style-name="T65"> </text:span></text:p>
      <text:p text:style-name="P69">La realidad les había alcanzado. Era el momento de aceptar la derrota.</text:p>
      <text:p text:style-name="P69"/>
      <text:p text:style-name="P78"><text:span text:style-name="T63">Permanecieron</text:span> largo rato observ<text:span text:style-name="T66">a</text:span>ndo<text:span text:style-name="T62"> el mar</text:span> en silencio.</text:p>
      <text:p text:style-name="P78">Ninguno habló.<text:span text:style-name="T63"> </text:span>No era necesario.</text:p>
      <text:p text:style-name="P78"><text:span text:style-name="T63">El tesoro hab</text:span><text:span text:style-name="T65">ía</text:span><text:span text:style-name="T63"> sido siempre una fantas</text:span><text:span text:style-name="T65">ía</text:span><text:span text:style-name="T66">. Ahora estaba claro. El viejo tenia razón.</text:span></text:p>
      <text:p text:style-name="P69">Nohk se tumbo en la hierva mirando el cielo<text:span text:style-name="T64">.</text:span></text:p>
      <text:p text:style-name="P69"><text:span text:style-name="T64">V</text:span>io pasar la nubes, lentas.</text:p>
      <text:p text:style-name="P69">La brisa del mar olía a hierva y sal. Fresca, suave.</text:p>
      <text:p text:style-name="P78"><text:span text:style-name="T67">C</text:span>erró los ojos<text:span text:style-name="T67"> un momento, y</text:span> escuchó.</text:p>
      <text:p text:style-name="P78">El sonido del viento.<text:span text:style-name="T67"> Y l</text:span>os gritos lejanos de las aves marinas.</text:p>
      <text:p text:style-name="P70">Las vió volar<text:span text:style-name="T64">. L</text:span>ibres.</text:p>
      <text:p text:style-name="P71"><text:soft-page-break/>Una de ellas cruzo el cielo justo sobre el. </text:p>
      <text:p text:style-name="P70"><text:span text:style-name="T64">La </text:span><text:span text:style-name="T68">S</text:span>iguió<text:span text:style-name="T68"> </text:span>con la vista <text:span text:style-name="T64">hasta que</text:span> desapareció detras de la pared del acantilado.</text:p>
      <text:p text:style-name="P78">Kempht también lo <text:span text:style-name="T67">vió</text:span>.</text:p>
      <text:p text:style-name="P78"><text:span text:style-name="T68">E</text:span>star<text:span text:style-name="T65">ía</text:span><text:span text:style-name="T68"> posiblemente</text:span> anidando <text:span text:style-name="T66">all</text:span><text:span text:style-name="T65">í</text:span><text:span text:style-name="T68">.</text:span></text:p>
      <text:p text:style-name="P72">Se acercó despacio al borde y miró hacia abajo.</text:p>
      <text:p text:style-name="P78"><text:span text:style-name="T68">S</text:span>intió el vertigo de la altura.<text:span text:style-name="T68"> La caída era enorme. A</text:span>bajo el mar golpeaba <text:span text:style-name="T68">con fuerza </text:span>contra las rocas.</text:p>
      <text:p text:style-name="P78"><text:span text:style-name="T68">E</text:span>ntonces lo vió.</text:p>
      <text:p text:style-name="P78">A unos cincuenta metros de distancia.<text:span text:style-name="T68"> </text:span>Pegada a la pared del acantilado.</text:p>
      <text:p text:style-name="P78">Una estrecha cornisa descendía en diagonal hacia algún lugar oculto bajo la roca.</text:p>
      <text:p text:style-name="P72">Dijo:</text:p>
      <text:p text:style-name="P78">—Eh, Nohk...es eso un camino?</text:p>
      <text:p text:style-name="P78"/>
      <text:p text:style-name="P33"/>
      <text:p text:style-name="P78"/>
      <text:h text:style-name="P26" text:outline-level="3">Parte <text:span text:style-name="T69">2</text:span><text:span text:style-name="T70"> - El camino</text:span></text:h>
      <text:p text:style-name="P78"/>
      <text:p text:style-name="P78">No estaba claro que aquella estrecha cornisa condujera a ninguna parte.</text:p>
      <text:p text:style-name="P78">Podía terminar unos metros más adelante.</text:p>
      <text:p text:style-name="P78">Podía derrumbarse.</text:p>
      <text:p text:style-name="P78">Podía no ser más que una irregularidad de la roca.</text:p>
      <text:p text:style-name="P78">Pero después de todo lo que habían perdido, cualquier posibilidad merecía ser examinada.</text:p>
      <text:p text:style-name="P78">—Tenemos que investigarlo —dijo Nohk.</text:p>
      <text:p text:style-name="P78">Kempht no dudó.</text:p>
      <text:p text:style-name="P78">La esperanza seguía viva en él.</text:p>
      <text:p text:style-name="P78">Descendió por la pared del acantilado hasta alcanzar la cornisa y apoyó ambos pies sobre la estrecha franja de piedra.</text:p>
      <text:p text:style-name="P78">El mar rugía cientos de metros más abajo.</text:p>
      <text:p text:style-name="P78">El viento golpeaba la roca.</text:p>
      <text:p text:style-name="P78">La cornisa avanzaba bordeando la montaña y desaparecía tras un saliente.</text:p>
      <text:p text:style-name="P78">—Puede que sea el camino —gritó.</text:p>
      <text:p text:style-name="P78"><text:soft-page-break/>Nohk no respondió.</text:p>
      <text:p text:style-name="P73">El no lo creia realmente.</text:p>
      <text:p text:style-name="P78">Observaba desde arriba.<text:span text:style-name="T71"> </text:span>Lejos del borde.<text:span text:style-name="T71"> </text:span>Lejos del peligro.</text:p>
      <text:p text:style-name="P78"><text:span text:style-name="T71">M</text:span>anteniendose prudentemente apartado. <text:span text:style-name="T71">E</text:span>n un lugar seguro.</text:p>
      <text:p text:style-name="P78"><text:span text:style-name="T71">N</text:span>o estaba ayudando. <text:span text:style-name="T71">S</text:span>olo queria ver lo que sucedia.</text:p>
      <text:p text:style-name="P78"/>
      <text:p text:style-name="P78">Kempht avanzó lentamente.</text:p>
      <text:p text:style-name="P78">Un paso.<text:span text:style-name="T71"> </text:span>Después otro.<text:span text:style-name="T71"> </text:span>No parecía asustado.<text:span text:style-name="T71"> </text:span>Al contrario.<text:span text:style-name="T71"> Estaba</text:span> emocionado.</text:p>
      <text:p text:style-name="P78">C<text:span text:style-name="T71">reyendo</text:span> ver el final de la búsqueda.<text:span text:style-name="T71"> Imaginando que el tesoro estaba</text:span> esperándolo al otro lado.</text:p>
      <text:p text:style-name="P78">Nohk lo observó alejarse.</text:p>
      <text:p text:style-name="P78"><text:span text:style-name="T71">Poco tiempo</text:span> atrás habría descendido junto a él.</text:p>
      <text:p text:style-name="P78">Habría compartido el riesgo.</text:p>
      <text:p text:style-name="P78">Habría protegido a su amigo.</text:p>
      <text:p text:style-name="P78">Pero aquellos hombres ya no existían.</text:p>
      <text:p text:style-name="P78">La montaña los había cambiado.<text:span text:style-name="T71"> </text:span></text:p>
      <text:p text:style-name="P78"><text:span text:style-name="T71">Y e</text:span>l hambre<text:span text:style-name="T71">, l</text:span>a codicia<text:span text:style-name="T71">, la traicion, la muerte</text:span>.</text:p>
      <text:p text:style-name="P78"/>
      <text:p text:style-name="P78">Kempht avanzó otro paso<text:span text:style-name="T71">, y otro, entonces...</text:span></text:p>
      <text:p text:style-name="P78">una piedra se desprendió.</text:p>
      <text:p text:style-name="P73"><text:span text:style-name="T72">Y s</text:span>u pie se hundio en el vacio. Perdio el equilibrio<text:span text:style-name="T73">.</text:span></text:p>
      <text:p text:style-name="P78"><text:span text:style-name="T73">Y</text:span><text:span text:style-name="T71"> c</text:span>ayó.</text:p>
      <text:p text:style-name="P78"/>
      <text:p text:style-name="P74">Cientos de metros.</text:p>
      <text:p text:style-name="P78">Nohk caminó hasta el borde.</text:p>
      <text:p text:style-name="P78">Miró hacia abajo.<text:span text:style-name="T73"> </text:span>Muy abajo, donde el mar golpeaba las rocas negras.</text:p>
      <text:p text:style-name="P78"><text:span text:style-name="T73">Lo b</text:span>uscó <text:span text:style-name="T73">con la mirada </text:span>durante unos segundos.</text:p>
      <text:p text:style-name="P78">No sintió pena.</text:p>
      <text:p text:style-name="P78"/>
      <text:p text:style-name="P78">Se alejó del borde.</text:p>
      <text:p text:style-name="P78">Se sentó sobre la hierba.<text:span text:style-name="T73"> </text:span><text:span text:style-name="T74">Y un rato d</text:span>espués se tumbó boca arriba.</text:p>
      <text:p text:style-name="P78"><text:soft-page-break/>El cielo comenzaba a teñirse de rojo.</text:p>
      <text:p text:style-name="P78">Permaneció inmóvil mientras <text:span text:style-name="T72">el tiempo</text:span> pasaba lentamente.</text:p>
      <text:p text:style-name="P78"><text:span text:style-name="T74">N</text:span>o tenia adonde ir.</text:p>
      <text:p text:style-name="P78">Cuando cayó la noche encendió una hoguera.</text:p>
      <text:p text:style-name="P78">Observó las llamas durante largo rato.</text:p>
      <text:p text:style-name="P78"><text:span text:style-name="T72">C</text:span>uando una idea comenzó a abrirse paso entre sus pensamientos.</text:p>
      <text:p text:style-name="P78">¿Y si realmente <text:span text:style-name="T72">ese </text:span>era el camino?</text:p>
      <text:p text:style-name="P41"><text:span text:style-name="T75">Encendi</text:span>ó una lámpara<text:span text:style-name="T72">.</text:span></text:p>
      <text:p text:style-name="P41"><text:span text:style-name="T72">Caminó hasta el borde. D</text:span>escendió por la pared<text:span text:style-name="T74"> hasta la cornisa</text:span>.</text:p>
      <text:p text:style-name="P78">No sentía miedo<text:span text:style-name="T75">.</text:span></text:p>
      <text:p text:style-name="P78">La montaña era ya una masa negra contra el cielo.</text:p>
      <text:p text:style-name="P78"><text:span text:style-name="T75">A</text:span>vanzo sin pensar<text:span text:style-name="T75">.</text:span></text:p>
      <text:p text:style-name="P41"><text:span text:style-name="T72">Consiguió recorrer la cornisa hasta el final. </text:span><text:span text:style-name="T75">R</text:span>odeó el saliente de la montaña.</text:p>
      <text:p text:style-name="P78">Y entonces la vio.</text:p>
      <text:p text:style-name="P78">Una abertura oscura.</text:p>
      <text:p text:style-name="P78">La entrada de una cueva.<text:span text:style-name="T75"> Un túnel que se internaba en las entrañas de la montaña.</text:span></text:p>
      <text:p text:style-name="P78">Levantó la lámpara.</text:p>
      <text:p text:style-name="P78">La luz penetró unos metros en la oscuridad.</text:p>
      <text:p text:style-name="P78">Y reveló<text:span text:style-name="T75">,</text:span> unos pocos pasos mas adelante<text:span text:style-name="T75">,</text:span> una puerta de hierro incrustada en la pared de roca.</text:p>
      <text:p text:style-name="P78"/>
      <text:p text:style-name="P33"/>
      <text:p text:style-name="P78"/>
      <text:h text:style-name="P26" text:outline-level="3">Parte 3 - El destino</text:h>
      <text:p text:style-name="P78"/>
      <text:p text:style-name="P78">Nohk corrió hacia la puerta.</text:p>
      <text:p text:style-name="P78"><text:span text:style-name="T76">Ahora ya no tenía ninguna duda. </text:span>La bóveda existía.</text:p>
      <text:p text:style-name="P78">Todos estaban equivocados.</text:p>
      <text:p text:style-name="P78"><text:span text:style-name="T76">Aunque...</text:span> <text:span text:style-name="T77">n</text:span>o había símbolos<text:span text:style-name="T77">, ni </text:span>escudos reales<text:span text:style-name="T76">, ni </text:span>inscripciones antiguas.</text:p>
      <text:p text:style-name="P78">Sólo <text:span text:style-name="T77">la puerta de </text:span>hierro.</text:p>
      <text:p text:style-name="P78">Y una cerradura.</text:p>
      <text:p text:style-name="P78"/>
      <text:p text:style-name="P78"><text:soft-page-break/>Introdujo la llave.</text:p>
      <text:p text:style-name="P78">Encajó perfectamente.</text:p>
      <text:p text:style-name="P78"><text:span text:style-name="T77">La</text:span> giró <text:span text:style-name="T77">con fuerza</text:span>.</text:p>
      <text:p text:style-name="P78">Un sonido seco<text:span text:style-name="T77">, como un golpe,</text:span> resonó en el interior de la <text:span text:style-name="T77">cueva</text:span>.</text:p>
      <text:p text:style-name="P78"><text:span text:style-name="T76">Y l</text:span>a cerradura cedió.</text:p>
      <text:p text:style-name="P78"><text:span text:style-name="T76">Empujo con fuerza, y la pesada</text:span> puerta <text:span text:style-name="T76">de hierro </text:span>se abrió.</text:p>
      <text:p text:style-name="P78"/>
      <text:p text:style-name="P75">Creia estar preparado para este momento, pero ahora dudaba.</text:p>
      <text:p text:style-name="P76">La profunda oscuridad dentro de la boveda ocultaba <text:span text:style-name="T76">cualquier peligro</text:span> que pudiera estar acechando en su interior.</text:p>
      <text:p text:style-name="P76">Pero, </text:p>
      <text:p text:style-name="P76">que amenaza podria sobrevivir en una boveda cerrada durante siglos?</text:p>
      <text:p text:style-name="P78"/>
      <text:p text:style-name="P78">Levantó la lámpara.</text:p>
      <text:p text:style-name="P78">Y entró<text:span text:style-name="T77">, abriendose paso en la oscuridad.</text:span></text:p>
      <text:p text:style-name="P41"><text:span text:style-name="T78">L</text:span>os esqueletos<text:span text:style-name="T78"> de algunos hombres, cubiertos por jirones de ropa podrida, yacían cerca de la entrada</text:span><text:span text:style-name="T79">.</text:span></text:p>
      <text:p text:style-name="P78">Tres.<text:span text:style-name="T78"> </text:span>Tal vez cuatro.</text:p>
      <text:p text:style-name="P78">La visión le produjo una sensación incómoda.</text:p>
      <text:p text:style-name="P78">Continuó avanzando.</text:p>
      <text:p text:style-name="P76">Unos pasos mas adelante, la luz de la lámpara reveló el muro posterior.</text:p>
      <text:p text:style-name="P76">Parecia el final de la boveda.</text:p>
      <text:p text:style-name="P78">Llegó hasta la pared del fondo.<text:span text:style-name="T80"> </text:span>La tocó.<text:span text:style-name="T80"> </text:span>Sólida.<text:span text:style-name="T80"> </text:span><text:span text:style-name="T78">Fría.</text:span></text:p>
      <text:p text:style-name="P78">Se volvió lentamente.</text:p>
      <text:p text:style-name="P76"><text:span text:style-name="T81">Y desde alli pudo ver</text:span> toda la estancia.</text:p>
      <text:p text:style-name="P76"/>
      <text:p text:style-name="P76">Era una construccion circular, sin ventanas, sin otras puertas, sin otras camaras.</text:p>
      <text:p text:style-name="P77">Excavada en la roca. Sin inscripciones, ni simbolos. </text:p>
      <text:p text:style-name="P77">Solo contenia los esqueletos de aquellos hombres.</text:p>
      <text:p text:style-name="P77">Estaba vacia.</text:p>
      <text:p text:style-name="P77"/>
      <text:p text:style-name="P77"><text:soft-page-break/>Un ruido metálico interrumpió sus pensamientos.</text:p>
      <text:p text:style-name="P77"><text:span text:style-name="T81">L</text:span>a puerta se movio.</text:p>
      <text:p text:style-name="P78">Durante una fracción de segundo observó cómo comenzaba a cerrarse.</text:p>
      <text:p text:style-name="P78">Después <text:span text:style-name="T81">l</text:span>a pesada hoja de hierro golpeó el marco con un estruendo ensordecedor.</text:p>
      <text:p text:style-name="P78">La roca entera pareció temblar.</text:p>
      <text:p text:style-name="P78">La llave salió despedida de la cerradura.</text:p>
      <text:p text:style-name="P78">Rebotó sobre la piedra.</text:p>
      <text:p text:style-name="P78">Y desapareció al otro lado de la puerta.</text:p>
      <text:p text:style-name="P78"/>
      <text:p text:style-name="P77">Corrio hacia la puerta. </text:p>
      <text:p text:style-name="P78">Golpeó el hierro.</text:p>
      <text:p text:style-name="P78">Empujó.</text:p>
      <text:p text:style-name="P77">Intentó abrirla.</text:p>
      <text:p text:style-name="P77">La puerta no se movió.</text:p>
      <text:p text:style-name="P77">Estaba cerrada. Y no era posible abrirla desde dentro.</text:p>
      <text:p text:style-name="P77"/>
      <text:p text:style-name="P77">Entonces lo comprendio.</text:p>
      <text:p text:style-name="P51"/>
      <text:p text:style-name="P51"/>
      <text:p text:style-name="Horizontal_20_Line"/>
      <text:p text:style-name="Text_20_body"/>
      <text:h text:style-name="P12" text:outline-level="1">Capítulo <text:span text:style-name="T82">3</text:span> - <text:span text:style-name="T61">XXXXX</text:span></text:h>
      <text:p text:style-name="P51"/>
      <text:h text:style-name="P27" text:outline-level="3"><text:span text:style-name="T83">Parte 1 - U</text:span>n nuevo día</text:h>
      <text:p text:style-name="P79"/>
      <text:p text:style-name="P79">Después de la noche llegó un nuevo día.</text:p>
      <text:p text:style-name="P79"><text:span text:style-name="T84">E</text:span>l sol brillaba sobre el mar<text:span text:style-name="T84"> </text:span>cuando un cuervo entró en la cueva.</text:p>
      <text:p text:style-name="P79">La luz de la mañana se filtraba por la entrada e iluminaba la puerta de hierro.</text:p>
      <text:p text:style-name="P79"><text:soft-page-break/>Y sobre el suelo, un destello verde llamó la atención del ave.</text:p>
      <text:p text:style-name="P79">El cuervo se aproximó dando pequeños saltos.<text:span text:style-name="T84"> Observó el objeto durante unos segundos.</text:span></text:p>
      <text:p text:style-name="P79"><text:span text:style-name="T84">C</text:span>ogió la llave<text:span text:style-name="T84"> con sus patas y <text:s/>levantó el vuelo.</text:span></text:p>
      <text:p text:style-name="P79"><text:span text:style-name="T84">S</text:span>e alejó de la cueva en un instante.<text:span text:style-name="T84"> C</text:span>omo un ladrón que huye<text:span text:style-name="T84"> con el botín.</text:span></text:p>
      <text:p text:style-name="P79"/>
      <text:p text:style-name="P79">Atravesó los acantilados<text:span text:style-name="T85"> planeando entre las nubes</text:span><text:span text:style-name="T84">, y se elevó más y más en el aire.</text:span></text:p>
      <text:p text:style-name="P79">Sobrevoló las montañas.</text:p>
      <text:p text:style-name="P79">Los bosques.</text:p>
      <text:p text:style-name="P79">Los ríos.</text:p>
      <text:p text:style-name="P79">Voló durante horas impulsado por las corrientes de aire que ascendían desde los valles.</text:p>
      <text:p text:style-name="P79">Hasta que, en algún lugar lejano, dejó caer la llave<text:span text:style-name="T86"> a tierra, y se alejó</text:span>.</text:p>
      <text:p text:style-name="P79">El objeto giró varias veces en el aire.</text:p>
      <text:p text:style-name="P79">Y desapareció entre la hierba.</text:p>
      <text:p text:style-name="P79"/>
      <text:p text:style-name="P79">Era una tranquila mañana de primavera.</text:p>
      <text:p text:style-name="P79"><text:span text:style-name="T86">Y e</text:span>n una pequeña granja cerca del pueblo de Wetwood, un campesino llamado Jahnk caminaba por un sendero de tierra rumbo al mercado.</text:p>
      <text:p text:style-name="P79">El día era agradable.</text:p>
      <text:p text:style-name="P79">El cielo estaba despejado.</text:p>
      <text:p text:style-name="P79">Y sus pensamientos estaban ocupados por asuntos sencillos.</text:p>
      <text:p text:style-name="P79">La cosecha.</text:p>
      <text:p text:style-name="P79">Los animales.</text:p>
      <text:p text:style-name="P79">El precio del trigo.</text:p>
      <text:p text:style-name="P79">Entonces vio algo brillar entre la hierba.</text:p>
      <text:p text:style-name="P79">Se agachó.</text:p>
      <text:p text:style-name="P79">Apartó unas ramas.</text:p>
      <text:p text:style-name="P79">Y lo recogió.</text:p>
      <text:p text:style-name="P79"/>
      <text:p text:style-name="P79">Era una vieja llave de hierro.</text:p>
      <text:p text:style-name="P79">Pesada.</text:p>
      <text:p text:style-name="P79"><text:soft-page-break/>Extrañamente hermosa.</text:p>
      <text:p text:style-name="P79">Una piedra verde resplandecía en su empuñadura.</text:p>
      <text:p text:style-name="P79">Jahnk la observó con curiosidad.</text:p>
      <text:p text:style-name="P79">Le dio la vuelta entre las manos.</text:p>
      <text:p text:style-name="P79">Había un escudo grabado en el metal.</text:p>
      <text:p text:style-name="P79">Un símbolo que no reconoció.</text:p>
      <text:p text:style-name="P79">Sonrió.</text:p>
      <text:p text:style-name="P79">—Hoy es mi día de suerte.</text:p>
      <text:p text:style-name="P79">Guardó la llave en el bolsillo y continuó caminando hacia el pueblo.</text:p>
      <text:p text:style-name="P79">Sobre su cabeza, unas pocas nubes blancas avanzaban lentamente por el cielo.</text:p>
      <text:p text:style-name="P79">A sus espaldas, el viento agitaba la hierba.</text:p>
      <text:p text:style-name="P42"><text:span text:style-name="T83">Y</text:span> bajo sus pies<text:span text:style-name="T83">, el mundo</text:span> continuaba girando<text:span text:style-name="T83">.</text:span></text:p>
      <text:p text:style-name="P42"/>
      <text:p text:style-name="P79">Lento.</text:p>
      <text:p text:style-name="P79">Silencioso.</text:p>
      <text:p text:style-name="P79"><text:span text:style-name="T83">I</text:span>mperceptible<text:span text:style-name="T83">.</text:span></text:p>
      <text:p text:style-name="P52">Inevitable.</text:p>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5:13:39.593000000</meta:creation-date>
    <dc:date>2026-07-01T18:52:29.364000000</dc:date>
    <meta:editing-duration>PT1H8M</meta:editing-duration>
    <meta:editing-cycles>20</meta:editing-cycles>
    <meta:generator>LibreOffice/7.3.5.2$Windows_X86_64 LibreOffice_project/184fe81b8c8c30d8b5082578aee2fed2ea847c01</meta:generator>
    <meta:document-statistic meta:table-count="0" meta:image-count="0" meta:object-count="0" meta:page-count="42" meta:paragraph-count="1002" meta:word-count="8469" meta:character-count="52304" meta:non-whitespace-character-count="44807"/>
  </office:meta>
</office:document-meta>
</file>