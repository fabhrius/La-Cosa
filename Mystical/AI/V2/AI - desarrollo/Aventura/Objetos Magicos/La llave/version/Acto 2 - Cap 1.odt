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/>
    </style:style>
    <style:style style:name="P2" style:family="paragraph" style:parent-style-name="Standard">
      <style:text-properties officeooo:paragraph-rsid="00190291"/>
    </style:style>
    <style:style style:name="P3" style:family="paragraph" style:parent-style-name="Standard">
      <style:text-properties officeooo:paragraph-rsid="00191a97"/>
    </style:style>
    <style:style style:name="P4" style:family="paragraph" style:parent-style-name="Text_20_body">
      <style:text-properties officeooo:paragraph-rsid="00160733"/>
    </style:style>
    <style:style style:name="P5" style:family="paragraph" style:parent-style-name="Text_20_body">
      <style:text-properties officeooo:paragraph-rsid="00183fba"/>
    </style:style>
    <style:style style:name="P6" style:family="paragraph" style:parent-style-name="Text_20_body">
      <style:text-properties officeooo:rsid="00190291" officeooo:paragraph-rsid="00190291"/>
    </style:style>
    <style:style style:name="P7" style:family="paragraph" style:parent-style-name="Text_20_body">
      <style:text-properties officeooo:paragraph-rsid="00190291"/>
    </style:style>
    <style:style style:name="P8" style:family="paragraph" style:parent-style-name="Text_20_body">
      <style:text-properties officeooo:paragraph-rsid="00191a97"/>
    </style:style>
    <style:style style:name="P9" style:family="paragraph" style:parent-style-name="Text_20_body">
      <style:text-properties officeooo:paragraph-rsid="00192c2f"/>
    </style:style>
    <style:style style:name="P10" style:family="paragraph" style:parent-style-name="Text_20_body">
      <style:text-properties officeooo:paragraph-rsid="001a9649"/>
    </style:style>
    <style:style style:name="T1" style:family="text">
      <style:text-properties officeooo:rsid="0015cf2a"/>
    </style:style>
    <style:style style:name="T2" style:family="text">
      <style:text-properties officeooo:rsid="00160733"/>
    </style:style>
    <style:style style:name="T3" style:family="text">
      <style:text-properties officeooo:rsid="001669ff"/>
    </style:style>
    <style:style style:name="T4" style:family="text">
      <style:text-properties officeooo:rsid="0017ce8d"/>
    </style:style>
    <style:style style:name="T5" style:family="text">
      <style:text-properties officeooo:rsid="00183fba"/>
    </style:style>
    <style:style style:name="T6" style:family="text">
      <style:text-properties officeooo:rsid="00190291"/>
    </style:style>
    <style:style style:name="T7" style:family="text">
      <style:text-properties officeooo:rsid="00191a97"/>
    </style:style>
    <style:style style:name="T8" style:family="text">
      <style:text-properties officeooo:rsid="001a96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arte 1 - La expedición</text:h>
      <text:p text:style-name="Text_20_body"/>
      <text:p text:style-name="Text_20_body">No tardaron mucho en organizar la expedición.</text:p>
      <text:p text:style-name="Text_20_body">Desde el momento en que el libro llegó a sus manos, la espera comenzó a parecer insoportable.</text:p>
      <text:p text:style-name="Text_20_body">Cada día que pasaba era un día más durante el cual el tesoro continuaba oculto en algún lugar de las montañas.<text:span text:style-name="T1"> </text:span>Cada amanecer parecía un retraso innecesario.</text:p>
      <text:p text:style-name="Text_20_body">Cada conversación terminaba inevitablemente hablando de lo mismo.<text:span text:style-name="T1"> </text:span>La bóveda.<text:span text:style-name="T1"> </text:span>La llave.<text:span text:style-name="T1"> </text:span>El mapa.</text:p>
      <text:p text:style-name="Text_20_body">La fortuna del rey.</text:p>
      <text:p text:style-name="Text_20_body">El entusiasmo se había transformado en un poderoso sentimiento de urgencia.<text:span text:style-name="T1"> </text:span>Si el tesoro existía, debían encontrarlo.<text:span text:style-name="T1"> </text:span>Y debían hacerlo cuanto antes.</text:p>
      <text:p text:style-name="Text_20_body">Durante varios días estudiaron el mapa con atención.<text:span text:style-name="T2"> </text:span>Lo extendían sobre la mesa de la casa de Nohk y pasaban horas siguiendo con el dedo las líneas dibujadas siglos atrás.<text:span text:style-name="T1"> </text:span></text:p>
      <text:p text:style-name="P4">Comparaban las marcas con mapas modernos.<text:span text:style-name="T1"> </text:span>Identificaban montañas, ríos y caminos conocidos.<text:span text:style-name="T1"> </text:span>Debatían posibles rutas.<text:span text:style-name="T1"> </text:span>Calculaban distancias.<text:span text:style-name="T1"> </text:span>Discutían lugares adecuados para acampar.<text:span text:style-name="T1"> </text:span></text:p>
      <text:p text:style-name="P4">Aquello no parecía una fantasía.<text:span text:style-name="T1"> </text:span>Era un proyecto.</text:p>
      <text:p text:style-name="Text_20_body">Un desafío que podían planificar.<text:span text:style-name="T1"> </text:span>Un objetivo que podían alcanzar.</text:p>
      <text:p text:style-name="Text_20_body">Cada uno asumió responsabilidades concretas.</text:p>
      <text:p text:style-name="Text_20_body">Uno se ocupó de reunir provisiones.<text:span text:style-name="T1"> </text:span>Otro revisó los caballos.<text:span text:style-name="T1"> </text:span>Algunos consiguieron herramientas.<text:span text:style-name="T1"> </text:span>Otros prepararon tiendas, mantas, cuerdas y recipientes para transportar agua.</text:p>
      <text:p text:style-name="Text_20_body">Los seis amigos parecían poseídos por una energía inagotable.<text:span text:style-name="T1"> </text:span>Trabajaban desde el amanecer hasta el anochecer.</text:p>
      <text:p text:style-name="Text_20_body">A medida que los preparativos avanzaban, la aventura comenzaba a parecer cada vez más real.</text:p>
      <text:p text:style-name="Text_20_body">Según sus cálculos, alcanzarían las montañas en pocos días.<text:span text:style-name="T1"> </text:span>Después tendrían que internarse en las tierras altas siguiendo las indicaciones del mapa.</text:p>
      <text:p text:style-name="Text_20_body">Si todo salía bien, en <text:span text:style-name="T1">poco mas</text:span> de una semana llegarían a la zona señalada por el antiguo manuscrito.</text:p>
      <text:p text:style-name="Text_20_body">A partir de allí, el tiempo dependería de la suerte.</text:p>
      <text:p text:style-name="P4">La ubicación exacta de la bóveda seguía siendo un misterio.<text:span text:style-name="T1"> </text:span></text:p>
      <text:p text:style-name="P4"/>
      <text:p text:style-name="P4">Finalmente llegó el día de partir.</text:p>
      <text:p text:style-name="P4">El amanecer apareció limpio y brillante sobre el valle.</text:p>
      <text:p text:style-name="P4">Las lluvias de la semana anterior habían dejado el aire fresco y transparente.</text:p>
      <text:p text:style-name="P4"><text:soft-page-break/>Las montañas se dibujaban con extraordinaria claridad en el horizonte occidental.</text:p>
      <text:p text:style-name="P4">Los caballos comenzaron a avanzar.<text:span text:style-name="T2"> </text:span>Las ruedas de la carreta crujieron sobre el camino de tierra.</text:p>
      <text:p text:style-name="P4">Y mientras los primeros rayos del sol iluminaban el valle de Oldwood, los seis amigos abandonaron el pueblo.</text:p>
      <text:p text:style-name="P4">Ante ellos se extendían los bosques, las montañas y la promesa de una riqueza inimaginable.</text:p>
      <text:p text:style-name="P4"/>
      <text:p text:style-name="P4"/>
      <text:p text:style-name="Horizontal_20_Line"/>
      <text:p text:style-name="Text_20_body"/>
      <text:h text:style-name="Heading_20_2" text:outline-level="2">Parte 2 - <text:span text:style-name="T3">La tormenta</text:span></text:h>
      <text:p text:style-name="Text_20_body"/>
      <text:p text:style-name="Text_20_body">Los primeros días transcurrieron mejor de lo esperado.</text:p>
      <text:p text:style-name="Text_20_body">El camino era largo, pero agradable.<text:span text:style-name="T3"> </text:span>Atravesaron bosques de robles y abedules, cruzaron pequeñas aldeas y siguieron antiguos senderos comerciales que serpenteaban entre colinas cubiertas de hierba.</text:p>
      <text:p text:style-name="Text_20_body">Las noches terminaban alrededor del fuego.<text:span text:style-name="T3"> </text:span>Comían juntos.<text:span text:style-name="T3"> </text:span>Hablaban del tesoro.</text:p>
      <text:p text:style-name="Text_20_body">Discutían qué harían cuando regresaran convertidos en hombres ricos.</text:p>
      <text:p text:style-name="Text_20_body">La aventura parecía exactamente aquello que habían imaginado.<text:span text:style-name="T3"> </text:span>Pero las montañas todavía estaban lejos.</text:p>
      <text:p text:style-name="Text_20_body">Y las montañas no compartían su entusiasmo.</text:p>
      <text:h text:style-name="Heading_20_3" text:outline-level="3"/>
      <text:p text:style-name="Text_20_body">Al quinto día de viaje alcanzaron la extensa zona pantanosa que rodeaba el río Sigsagueante.</text:p>
      <text:p text:style-name="Text_20_body">El paisaje cambió por completo.</text:p>
      <text:p text:style-name="Text_20_body">Los bosques desaparecieron.<text:span text:style-name="T4"> </text:span>La tierra firme se volvió escasa.<text:span text:style-name="T4"> </text:span>Pequeñas islas de hierba sobresalían entre enormes extensiones de agua oscura.</text:p>
      <text:p text:style-name="Text_20_body">El camino se estrechó hasta convertirse en una franja de terreno apenas más elevada que el propio pantano.</text:p>
      <text:p text:style-name="Text_20_body">Durante la mañana el cielo permaneció despejado.<text:span text:style-name="T4"> </text:span>El sol brillaba.</text:p>
      <text:p text:style-name="Text_20_body">Nada hacía presagiar problemas.</text:p>
      <text:p text:style-name="Text_20_body">Sin embargo, al avanzar la tarde, las nubes comenzaron a aparecer por el oeste.</text:p>
      <text:p text:style-name="Text_20_body">Primero fueron unas pocas manchas oscuras.<text:span text:style-name="T4"> </text:span>Después una masa compacta que cubrió rápidamente el horizonte.</text:p>
      <text:p text:style-name="Text_20_body"><text:soft-page-break/>El viento cambió.<text:span text:style-name="T4"> </text:span>El aire se volvió húmedo.<text:span text:style-name="T4"> </text:span>Pesado.<text:span text:style-name="T4"> </text:span>Inquietante.</text:p>
      <text:p text:style-name="Text_20_body">—No me gusta esto —murmuró Kempht observando el cielo.</text:p>
      <text:p text:style-name="Text_20_body">Pero continuaron avanzando.<text:span text:style-name="T4"> </text:span>La zona pantanosa era un lugar terrible para detenerse.<text:span text:style-name="T4"> </text:span>Debían alcanzar terreno elevado.</text:p>
      <text:p text:style-name="Text_20_body">Las primeras gotas comenzaron a caer pocos minutos después.</text:p>
      <text:p text:style-name="Text_20_body">Pequeñas.<text:span text:style-name="T4"> </text:span>Dispersas.<text:span text:style-name="T4"> </text:span>Inofensivas.</text:p>
      <text:p text:style-name="Text_20_body">Luego llegaron más.</text:p>
      <text:p text:style-name="Text_20_body">Y más.</text:p>
      <text:p text:style-name="Text_20_body">El grupo aceleró el paso.<text:span text:style-name="T4"> </text:span>Los caballos comenzaron a ponerse nerviosos.<text:span text:style-name="T4"> </text:span>El viento aumentó.</text:p>
      <text:p text:style-name="Text_20_body">Los árboles cercanos se inclinaron.<text:span text:style-name="T4"> </text:span>Un trueno retumbó en la distancia.<text:span text:style-name="T4"> </text:span>Y entonces llegó la tormenta.</text:p>
      <text:p text:style-name="Text_20_body">Fue tan repentina que ninguno tuvo tiempo de reaccionar.</text:p>
      <text:p text:style-name="Text_20_body">El cielo se oscureció por completo.<text:span text:style-name="T4"> </text:span>Los relámpagos comenzaron a desgarrar las nubes.<text:span text:style-name="T4"> </text:span>Los truenos sacudieron el aire.</text:p>
      <text:p text:style-name="Text_20_body">Y un instante después el agua cayó sobre ellos como si el propio cielo se hubiera roto.</text:p>
      <text:p text:style-name="Text_20_body">La lluvia era tan intensa que resultaba difícil respirar.</text:p>
      <text:p text:style-name="Text_20_body">La visibilidad desapareció.</text:p>
      <text:p text:style-name="Text_20_body">El paisaje quedó oculto tras una cortina gris.</text:p>
      <text:p text:style-name="Text_20_body">Los hombres apenas podían distinguir las siluetas de sus compañeros.</text:p>
      <text:p text:style-name="Text_20_body">—¡Seguid avanzando! —gritó Nohk<text:span text:style-name="T5">, </text:span>entre el ruido de la tormenta.</text:p>
      <text:p text:style-name="Text_20_body">Tiraban de la carreta.<text:span text:style-name="T5"> </text:span>Empujaban los caballos.<text:span text:style-name="T5"> </text:span>Intentaban mantenerse juntos.<text:span text:style-name="T5"> </text:span>Cada paso era una lucha.</text:p>
      <text:p text:style-name="Text_20_body"><text:span text:style-name="T5">Y s</text:span>intieron<text:span text:style-name="T5"> el miedo,</text:span> auténtico miedo.</text:p>
      <text:p text:style-name="Text_20_body">No al fracaso.<text:span text:style-name="T5"> </text:span>A no sobrevivir.</text:p>
      <text:p text:style-name="Text_20_body">El agua comenzó a acumularse rápidamente.</text:p>
      <text:p text:style-name="Text_20_body">Al principio cubría los tobillos.<text:span text:style-name="T5"> </text:span>Luego las rodillas.<text:span text:style-name="T5"> </text:span>Después la cintura.</text:p>
      <text:p text:style-name="Text_20_body"><text:span text:style-name="T5">Ya n</text:span>adie sabía exactamente dónde terminaba el camino y dónde comenzaba el río.</text:p>
      <text:p text:style-name="Text_20_body">Tal vez se habían desviado.<text:span text:style-name="T5"> </text:span>Tal vez el río se estaba desbordando.<text:span text:style-name="T5"> </text:span></text:p>
      <text:p text:style-name="Text_20_body">Tal vez ambas cosas.</text:p>
      <text:p text:style-name="Text_20_body">El suelo desaparecía bajo sus pies.</text:p>
      <text:p text:style-name="Text_20_body"><text:span text:style-name="T5">Con c</text:span>ada paso <text:span text:style-name="T5">los pies se hundian</text:span> profundamente en el barro.<text:span text:style-name="T5"> </text:span>Los caballos avanzaban con enorme dificultad.<text:span text:style-name="T5"> </text:span>Luchaban por mantenerse erguidos.</text:p>
      <text:p text:style-name="Text_20_body">Un relámpago iluminó brevemente el paisaje.<text:span text:style-name="T5"> </text:span>Y todos comprendieron la magnitud del problema.</text:p>
      <text:p text:style-name="Text_20_body"><text:soft-page-break/>Ya no existía camino.</text:p>
      <text:p text:style-name="P5">Todo era agua<text:span text:style-name="T5">, </text:span><text:s/>barro.<text:span text:style-name="T5"> </text:span>Todo era pantano.</text:p>
      <text:p text:style-name="Text_20_body">La carreta avanzó unos metros más.<text:span text:style-name="T5"> </text:span>Entonces se detuvo.</text:p>
      <text:p text:style-name="Text_20_body">Una de las ruedas se hundió.</text:p>
      <text:p text:style-name="Text_20_body">Los caballos tiraron.<text:span text:style-name="T5"> </text:span>La madera crujió.<text:span text:style-name="T5"> Y l</text:span>a rueda desapareció todavía más profundamente.</text:p>
      <text:p text:style-name="Text_20_body">Intentaron empujar<text:span text:style-name="T5">, </text:span>cavar.<text:span text:style-name="T5"> </text:span>Intentaron liberar el vehículo.</text:p>
      <text:p text:style-name="Text_20_body">Fue inútil.</text:p>
      <text:p text:style-name="Text_20_body">La tormenta estaba ganando.</text:p>
      <text:p text:style-name="Text_20_body">—¡Dejadla! —gritó uno de los hombres.</text:p>
      <text:p text:style-name="Text_20_body">Las herramientas<text:span text:style-name="T5">, l</text:span>as provisiones.<text:span text:style-name="T5"> </text:span>Todo estaba allí.</text:p>
      <text:p text:style-name="Text_20_body">Cargaron sobre los hombros todo lo que pudieron rescatar.</text:p>
      <text:p text:style-name="Text_20_body">Y comenzaron a avanzar.</text:p>
      <text:p text:style-name="Text_20_body">La marcha se convirtió en una pesadilla.<text:span text:style-name="T5"> </text:span>El agua les llegaba al pecho.<text:span text:style-name="T5"> </text:span>El barro intentaba arrancarles las botas.<text:span text:style-name="T5"> </text:span>La lluvia golpeaba sus rostros con violencia.</text:p>
      <text:p text:style-name="P6">Avanzaron luchando contra la cortina de agua que caia como una ola gigantesca, durante una hora, tal vez mas.</text:p>
      <text:p text:style-name="P6">La tormenta no cesaba.</text:p>
      <text:p text:style-name="P2"><text:span text:style-name="T6">Consiguieron llegar a un </text:span>terreno rocoso.<text:span text:style-name="T6"> </text:span>Una elevación que sobresalía del pantano.</text:p>
      <text:p text:style-name="P7"><text:span text:style-name="T6">La alcanzaron exhaustos.</text:span></text:p>
      <text:p text:style-name="Text_20_body">Y allí permanecieron durante horas esperando que la tormenta terminara.</text:p>
      <text:p text:style-name="Text_20_body">Cuando la noche llegó, la lluvia había cesado.<text:span text:style-name="T6"> </text:span></text:p>
      <text:p text:style-name="Text_20_body"><text:span text:style-name="T6">Y a</text:span>nte ellos se extendía una enorme laguna oscura.</text:p>
      <text:p text:style-name="Text_20_body">El paisaje había cambiado por completo.</text:p>
      <text:p text:style-name="Text_20_body">Nadie podía identificar dónde había estado el camino.<text:span text:style-name="T6"> </text:span>Ni dónde había quedado la carreta.<text:span text:style-name="T6"> </text:span>Ni dónde estaban los caballos.</text:p>
      <text:p text:style-name="Text_20_body">Todo había desaparecido.</text:p>
      <text:p text:style-name="Text_20_body"/>
      <text:p text:style-name="Horizontal_20_Line"/>
      <text:p text:style-name="Text_20_body"/>
      <text:p text:style-name="Text_20_body"/>
      <text:h text:style-name="Heading_20_3" text:outline-level="3"><text:soft-page-break/><text:span text:style-name="T6">Parte 3 - </text:span>El puente</text:h>
      <text:p text:style-name="Text_20_body"/>
      <text:p text:style-name="Text_20_body"/>
      <text:p text:style-name="Text_20_body">Los días siguientes fueron mucho más difíciles.</text:p>
      <text:p text:style-name="Text_20_body">Ahora transportaban el equipo a la espalda.<text:span text:style-name="T7"> </text:span>Las provisiones eran escasas.<text:span text:style-name="T7"> </text:span>El cansancio se acumulaba.</text:p>
      <text:p text:style-name="Text_20_body">Y el entusiasmo inicial comenzaba a mezclarse con preocupación.</text:p>
      <text:p text:style-name="Text_20_body"/>
      <text:p text:style-name="Text_20_body">Finalmente alcanzaron la región montañosa.</text:p>
      <text:p text:style-name="Text_20_body">Según sus cálculos, ya no se encontraban lejos del destino.<text:span text:style-name="T7"> </text:span>Quizá diez millas.<text:span text:style-name="T7"> </text:span>Tal vez menos.</text:p>
      <text:p text:style-name="Text_20_body">Un día de marcha.<text:span text:style-name="T7"> </text:span>Dos como mucho.</text:p>
      <text:p text:style-name="Text_20_body">Después de todas las dificultades, el tesoro parecía estar al alcance de la mano.</text:p>
      <text:p text:style-name="Text_20_body">Pero entonces llegaron al acantilado.<text:span text:style-name="T7"> </text:span>Y descubrieron el problema.</text:p>
      <text:p text:style-name="Text_20_body">El mapa mostraba un antiguo puente <text:span text:style-name="T7">colgante</text:span> que conectaba ambas regiones de Terroja.</text:p>
      <text:p text:style-name="Text_20_body">Sin embargo el puente ya no existía.<text:span text:style-name="T7"> H</text:span>abía desaparecido.<text:span text:style-name="T7"> </text:span>Probablemente siglos atrás.</text:p>
      <text:p text:style-name="Text_20_body">Abajo rugía <text:span text:style-name="T7">el</text:span> río.<text:span text:style-name="T7"> </text:span>Muy por debajo de ellos.</text:p>
      <text:p text:style-name="Text_20_body">El silencio se apoderó del grupo.</text:p>
      <text:p text:style-name="Text_20_body">Todos observaban el vacío.<text:span text:style-name="T7"> </text:span>Todos comprendían lo mismo.<text:span text:style-name="T7"> </text:span>La ruta había desaparecido.</text:p>
      <text:p text:style-name="Text_20_body">Durante varios minutos nadie habló.</text:p>
      <text:p text:style-name="Text_20_body"/>
      <text:p text:style-name="P8">—Yo no voy a abandonar —dijo finalmente.</text:p>
      <text:p text:style-name="P8">Su voz sonó más dura de lo habitual.</text:p>
      <text:p text:style-name="P8">Algunos lo miraron con sorpresa.</text:p>
      <text:p text:style-name="P8">—De algún modo cruzaremos.</text:p>
      <text:p text:style-name="P8">Nadie respondió inmediatamente.</text:p>
      <text:p text:style-name="P8">Ninguno quería rendirse.<text:span text:style-name="T7"> </text:span>No tan cerca del objetivo.</text:p>
      <text:p text:style-name="P3"><text:span text:style-name="T7">T</text:span>omaron una decisión.<text:span text:style-name="T7"> </text:span>Descenderían por la pared del acantilado.<text:span text:style-name="T7"> </text:span>Cruzarían el río.</text:p>
      <text:p text:style-name="P8">Y tratarían de escalar por el lado opuesto.</text:p>
      <text:p text:style-name="P8">La idea era peligrosa.<text:span text:style-name="T7"> </text:span>Tal vez imposible.<text:span text:style-name="T7"> </text:span>Pero ya era la única opción.</text:p>
      <text:p text:style-name="P10">Debajo de ellos se abría el abismo.</text:p>
      <text:p text:style-name="P10"><text:soft-page-break/>Una hora más tarde<text:span text:style-name="T8">, mientras las sombras del atardecer comenzaban a extenderse sobre las montañas,</text:span> comenzaron el descenso.</text:p>
      <text:p text:style-name="P9"><text:span text:style-name="T7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5T10:56:39.456000000</meta:creation-date>
    <dc:date>2026-06-28T20:31:31.055000000</dc:date>
    <meta:editing-duration>PT45M37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19" meta:word-count="1269" meta:character-count="8074" meta:non-whitespace-character-count="6916"/>
  </office:meta>
</office:document-meta>
</file>