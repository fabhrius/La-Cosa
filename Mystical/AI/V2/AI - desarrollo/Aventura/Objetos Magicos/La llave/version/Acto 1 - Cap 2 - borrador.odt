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b28e"/>
    </style:style>
    <style:style style:name="T1" style:family="text">
      <style:text-properties officeooo:rsid="00182e09"/>
    </style:style>
    <style:style style:name="T2" style:family="text">
      <style:text-properties officeooo:rsid="0018619c"/>
    </style:style>
    <style:style style:name="T3" style:family="text">
      <style:text-properties officeooo:rsid="00187959"/>
    </style:style>
    <style:style style:name="T4" style:family="text">
      <style:text-properties officeooo:rsid="001a21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span text:style-name="T1"><text:s/>Parte 1 - </text:span>El libro</text:h>
      <text:p text:style-name="Text_20_body"/>
      <text:p text:style-name="Text_20_body">La casa de Jorhm se encontraba en el extremo norte del pueblo, junto a un pequeño viñedo que descendía suavemente hacia el río.</text:p>
      <text:p text:style-name="Text_20_body">Los seis amigos recorrieron el camino casi sin hablar.<text:span text:style-name="T1"> </text:span>La emoción había sustituido a las bromas de la cantina.<text:span text:style-name="T1"> </text:span>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span text:style-name="T2"> </text:span>Acercó la llave a sus ojos.<text:span text:style-name="T2"> </text:span>La giró lentamente.<text:span text:style-name="T2"> </text:span>Observó la piedra verde.</text:p>
      <text:p text:style-name="Text_20_body">Luego el escudo grabado.<text:span text:style-name="T3"> </text:span>Y finalmente volvió a examinar la piedra.</text:p>
      <text:p text:style-name="Text_20_body">Durante varios segundos nadie dijo nada.</text:p>
      <text:p text:style-name="Text_20_body">El anciano parecía incapaz de apartar la vista del objeto.</text:p>
      <text:p text:style-name="Text_20_body">—No es posible... —murmuró.</text:p>
      <text:p text:style-name="Text_20_body">Se puso de pie con una rapidez sorprendente para alguien de su edad.</text:p>
      <text:p text:style-name="Text_20_body">Todavía sujetando la llave, caminó hacia la casa.</text:p>
      <text:p text:style-name="Text_20_body">—Venid.</text:p>
      <text:p text:style-name="Text_20_body"><text:soft-page-break/>Los seis amigos lo siguieron.<text:span text:style-name="T3"> </text:span>Atravesaron un estrecho pasillo y llegaron al salón principal.</text:p>
      <text:p text:style-name="Text_20_body">La habitación estaba rodeada de estanterías desde el suelo hasta el techo.</text:p>
      <text:p text:style-name="Text_20_body">Decenas.<text:span text:style-name="T3"> </text:span>Tal vez cientos de libros.</text:p>
      <text:p text:style-name="Text_20_body">Algunos estaban cuidadosamente encuadernados.<text:span text:style-name="T3"> </text:span>Otros parecían tan antiguos que amenazaban con deshacerse al tocarlos.</text:p>
      <text:p text:style-name="Text_20_body">Había mapas enrollados, pergaminos, cajas repletas de documentos y pequeños objetos procedentes de lugares remotos.<text:span text:style-name="T3"> </text:span>Aquella colección era el orgullo de Jorhm.</text:p>
      <text:p text:style-name="Text_20_body">Y también el motivo por el que muchos habitantes del pueblo lo consideraban un hombre extraño.</text:p>
      <text:p text:style-name="Text_20_body">Mientras otros dedicaban su vida a cultivar la tierra o comerciar, él la dedicaba a conservar historias.</text:p>
      <text:p text:style-name="Text_20_body">A recopilar fragmentos olvidados del pasado.<text:span text:style-name="T3"> </text:span>A estudiar los antiguos pueblos de Lluviara.</text:p>
      <text:p text:style-name="Text_20_body">Los libros eran su verdadera riqueza.</text:p>
      <text:p text:style-name="Text_20_body">Jorhm se dirigió directamente hacia una de las estanterías del fondo.</text:p>
      <text:p text:style-name="Text_20_body">No dudó ni un instante.<text:span text:style-name="T3"> Sabia</text:span> exactamente dónde buscar.<text:span text:style-name="T3"> </text:span>Extrajo un volumen grueso cubierto de polvo.</text:p>
      <text:p text:style-name="Text_20_body">La encuadernación estaba desgastada por los años.<text:span text:style-name="T3"> </text:span>El cuero había adquirido un color oscuro y agrietado.</text:p>
      <text:p text:style-name="Text_20_body">Con sumo cuidado llevó el libro hasta una mesa.<text:span text:style-name="T3"> </text:span>Lo abrió.</text:p>
      <text:p text:style-name="Text_20_body">Las páginas crujieron suavemente.</text:p>
      <text:p text:style-name="Text_20_body">Pasó varias hojas con rapidez.</text:p>
      <text:p text:style-name="Text_20_body">Después otras más despacio.<text:span text:style-name="T3"> </text:span>Hasta que finalmente se detuvo.</text:p>
      <text:p text:style-name="Text_20_body">Sus ojos brillaron.</text:p>
      <text:p text:style-name="Text_20_body">Colocó la llave sobre la página abierta.</text:p>
      <text:p text:style-name="Text_20_body">—Observad.</text:p>
      <text:p text:style-name="Text_20_body">Los jóvenes se inclinaron sobre la mesa.</text:p>
      <text:p text:style-name="Text_20_body">En la página había un dibujo.<text:span text:style-name="T3"> </text:span>Una llave.<text:span text:style-name="T3"> </text:span>Exactamente igual.</text:p>
      <text:p text:style-name="Text_20_body">La misma forma.<text:span text:style-name="T3"> </text:span>La misma piedra verde.<text:span text:style-name="T3"> </text:span>El mismo escudo real grabado en el metal.</text:p>
      <text:p text:style-name="Text_20_body">Incluso las pequeñas marcas decorativas coincidían perfectamente.</text:p>
      <text:p text:style-name="Text_20_body">No era parecida.<text:span text:style-name="T3"> </text:span>Era la misma llave.</text:p>
      <text:p text:style-name="Text_20_body">Nadie habló.</text:p>
      <text:p text:style-name="Text_20_body">La sorpresa había silenciado la habitación.</text:p>
      <text:p text:style-name="Text_20_body">Finalmente Jorhm rompió el silencio.</text:p>
      <text:p text:style-name="Text_20_body">—No hay duda.</text:p>
      <text:p text:style-name="Text_20_body"><text:soft-page-break/>Su voz sonó más grave que antes.</text:p>
      <text:p text:style-name="Text_20_body">—Es ella.</text:p>
      <text:p text:style-name="Text_20_body">—¿Ella? —preguntó Nohk.</text:p>
      <text:p text:style-name="Text_20_body">El anciano apoyó lentamente una mano sobre el libro.</text:p>
      <text:p text:style-name="Text_20_body">—La llave del tesoro del rey.</text:p>
      <text:p text:style-name="Text_20_body">Jorhm observó nuevamente la llave.</text:p>
      <text:p text:style-name="P1">—<text:span text:style-name="T3">Y s</text:span>i esta llave es auténtica...</text:p>
      <text:p text:style-name="P1"><text:span text:style-name="T3">e</text:span>ntonces quizá la leyenda también lo sea.</text:p>
      <text:p text:style-name="Text_20_body"/>
      <text:p text:style-name="Text_20_body"/>
      <text:p text:style-name="Horizontal_20_Line"/>
      <text:p text:style-name="Text_20_body"/>
      <text:h text:style-name="Heading_20_2" text:outline-level="2"><text:span text:style-name="T4">Parte 2 - </text:span>La leyenda del tesoro del rey</text:h>
      <text:p text:style-name="Text_20_body"/>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Parecía estar ordenando sus pensamientos.</text:p>
      <text:p text:style-name="Text_20_body">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text:soft-page-break/>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Text_20_body">—Fue entonces cuando tomó una decisión extraordinaria. Ordenó construir una cámara secreta. Una bóveda oculta en algún lugar de Lluviara.</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Y allí apareció.</text:p>
      <text:p text:style-name="Text_20_body">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Era un mapa.</text:p>
      <text:p text:style-name="Text_20_body">El mapa del tesoro.</text:p>
      <text:p text:style-name="Text_20_body">Los jóvenes se acercaron todavía más.</text:p>
      <text:p text:style-name="Text_20_body">Aquellas líneas antiguas despertaban la imaginación de forma irresistible.</text:p>
      <text:p text:style-name="Text_20_body">Montañas.<text:span text:style-name="T4"> </text:span>Ríos.<text:span text:style-name="T4"> </text:span>Senderos.<text:span text:style-name="T4"> </text:span>Lugares desconocidos.</text:p>
      <text:p text:style-name="Text_20_body"><text:soft-page-break/>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span text:style-name="T4">, nunca</text:span>.</text:p>
      <text:p text:style-name="Text_20_body">El anciano golpeó la cubierta del libro con los dedos.</text:p>
      <text:p text:style-name="Text_20_body">—Ni la cámara apareció jamás. Ni la llave fue encontrada nunca.</text:p>
      <text:p text:style-name="Text_20_body">Miró de nuevo el dibujo.<text:span text:style-name="T4"> </text:span>Después observó la llave.<text:span text:style-name="T4"> </text:span>Luego volvió a mirar el dibujo.</text:p>
      <text:p text:style-name="Text_20_body">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span text:style-name="T4"> </text:span>La giró lentamente.<text:span text:style-name="T4"> </text:span>Examinó el escudo grabado.<text:span text:style-name="T4"> </text:span>La piedra verde.</text:p>
      <text:p text:style-name="Text_20_body">Las formas del metal.</text:p>
      <text:p text:style-name="Text_20_body">Después volvió a compararla con la ilustración.<text:span text:style-name="T4"> </text:span>Una vez más.</text:p>
      <text:p text:style-name="Text_20_body">Y otra.</text:p>
      <text:p text:style-name="Text_20_body">Como si esperara descubrir alguna diferencia.<text:span text:style-name="T4"> </text:span>Pero no la encontró.</text:p>
      <text:p text:style-name="Text_20_body">Finalmente dejó escapar un largo suspiro.</text:p>
      <text:p text:style-name="Text_20_body">—Juraría que esto es imposible.</text:p>
      <text:p text:style-name="Text_20_body">Nadie habló.</text:p>
      <text:p text:style-name="Text_20_body">El anciano seguía observando la llave con una mezcla de fascinación y desconcierto.</text:p>
      <text:p text:style-name="Text_20_body"><text:soft-page-break/>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6-28T18:16:57.020000000</dc:date>
    <meta:editing-duration>PT1H10M9S</meta:editing-duration>
    <meta:editing-cycles>11</meta:editing-cycles>
    <meta:generator>LibreOffice/7.3.5.2$Windows_X86_64 LibreOffice_project/184fe81b8c8c30d8b5082578aee2fed2ea847c01</meta:generator>
    <meta:document-statistic meta:table-count="0" meta:image-count="0" meta:object-count="0" meta:page-count="6" meta:paragraph-count="129" meta:word-count="1258" meta:character-count="7797" meta:non-whitespace-character-count="6668"/>
  </office:meta>
</office:document-meta>
</file>