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3503"/>
    </style:style>
    <style:style style:name="P2" style:family="paragraph" style:parent-style-name="Text_20_body">
      <style:text-properties officeooo:paragraph-rsid="001f3503"/>
    </style:style>
    <style:style style:name="P3" style:family="paragraph" style:parent-style-name="Standard">
      <style:text-properties officeooo:paragraph-rsid="0020edb9"/>
    </style:style>
    <style:style style:name="P4" style:family="paragraph" style:parent-style-name="Text_20_body">
      <style:text-properties officeooo:paragraph-rsid="0020edb9"/>
    </style:style>
    <style:style style:name="P5" style:family="paragraph" style:parent-style-name="Standard">
      <style:text-properties officeooo:paragraph-rsid="0023b558"/>
    </style:style>
    <style:style style:name="P6" style:family="paragraph" style:parent-style-name="Text_20_body">
      <style:text-properties officeooo:paragraph-rsid="0023b558"/>
    </style:style>
    <style:style style:name="P7" style:family="paragraph" style:parent-style-name="Text_20_body">
      <style:text-properties officeooo:paragraph-rsid="001d5d84"/>
    </style:style>
    <style:style style:name="P8" style:family="paragraph" style:parent-style-name="Text_20_body">
      <style:text-properties officeooo:rsid="001f3503" officeooo:paragraph-rsid="001f3503"/>
    </style:style>
    <style:style style:name="P9" style:family="paragraph" style:parent-style-name="Text_20_body">
      <style:text-properties fo:color="#c9211e" loext:opacity="100%" officeooo:paragraph-rsid="001f3503"/>
    </style:style>
    <style:style style:name="P10" style:family="paragraph" style:parent-style-name="Text_20_body">
      <style:text-properties officeooo:rsid="0020edb9" officeooo:paragraph-rsid="0020edb9"/>
    </style:style>
    <style:style style:name="P11" style:family="paragraph" style:parent-style-name="Text_20_body">
      <style:text-properties officeooo:rsid="0020edb9" officeooo:paragraph-rsid="0029d198"/>
    </style:style>
    <style:style style:name="P12" style:family="paragraph" style:parent-style-name="Text_20_body">
      <style:text-properties officeooo:paragraph-rsid="0022aab3"/>
    </style:style>
    <style:style style:name="P13" style:family="paragraph" style:parent-style-name="Standard">
      <style:text-properties officeooo:rsid="002a7f37" officeooo:paragraph-rsid="002a7f37"/>
    </style:style>
    <style:style style:name="P14" style:family="paragraph" style:parent-style-name="Text_20_body">
      <style:text-properties officeooo:rsid="0023b558" officeooo:paragraph-rsid="0023b558"/>
    </style:style>
    <style:style style:name="P15" style:family="paragraph" style:parent-style-name="Text_20_body">
      <style:text-properties officeooo:paragraph-rsid="00290660"/>
    </style:style>
    <style:style style:name="P16" style:family="paragraph" style:parent-style-name="Text_20_body">
      <style:text-properties officeooo:paragraph-rsid="0029d198"/>
    </style:style>
    <style:style style:name="P17" style:family="paragraph" style:parent-style-name="Text_20_body">
      <style:text-properties officeooo:rsid="00290660" officeooo:paragraph-rsid="00290660"/>
    </style:style>
    <style:style style:name="P18" style:family="paragraph" style:parent-style-name="Text_20_body">
      <style:text-properties officeooo:paragraph-rsid="002f9789"/>
    </style:style>
    <style:style style:name="P19" style:family="paragraph" style:parent-style-name="Text_20_body">
      <style:text-properties officeooo:rsid="003194bf" officeooo:paragraph-rsid="00361f93"/>
    </style:style>
    <style:style style:name="P20" style:family="paragraph" style:parent-style-name="Text_20_body">
      <style:text-properties officeooo:paragraph-rsid="0033815e"/>
    </style:style>
    <style:style style:name="P21" style:family="paragraph" style:parent-style-name="Text_20_body">
      <style:text-properties officeooo:paragraph-rsid="003467d3"/>
    </style:style>
    <style:style style:name="P22" style:family="paragraph" style:parent-style-name="Text_20_body">
      <style:text-properties officeooo:rsid="003467d3" officeooo:paragraph-rsid="003467d3"/>
    </style:style>
    <style:style style:name="P23" style:family="paragraph" style:parent-style-name="Text_20_body">
      <style:text-properties officeooo:rsid="00361f93" officeooo:paragraph-rsid="00361f93"/>
    </style:style>
    <style:style style:name="P24" style:family="paragraph" style:parent-style-name="Heading_20_2">
      <style:text-properties officeooo:paragraph-rsid="00377a64"/>
    </style:style>
    <style:style style:name="P25" style:family="paragraph" style:parent-style-name="Text_20_body">
      <style:text-properties officeooo:rsid="001b98dd" officeooo:paragraph-rsid="00377a64"/>
    </style:style>
    <style:style style:name="P26" style:family="paragraph" style:parent-style-name="Text_20_body">
      <style:text-properties officeooo:paragraph-rsid="00377a64"/>
    </style:style>
    <style:style style:name="T1" style:family="text">
      <style:text-properties officeooo:rsid="001d5d84"/>
    </style:style>
    <style:style style:name="T2" style:family="text">
      <style:text-properties officeooo:rsid="001f3503"/>
    </style:style>
    <style:style style:name="T3" style:family="text">
      <style:text-properties officeooo:rsid="001f357e"/>
    </style:style>
    <style:style style:name="T4" style:family="text">
      <style:text-properties officeooo:rsid="002010f6"/>
    </style:style>
    <style:style style:name="T5" style:family="text">
      <style:text-properties officeooo:rsid="0020edb9"/>
    </style:style>
    <style:style style:name="T6" style:family="text">
      <style:text-properties officeooo:rsid="0022aab3"/>
    </style:style>
    <style:style style:name="T7" style:family="text">
      <style:text-properties officeooo:rsid="0023b558"/>
    </style:style>
    <style:style style:name="T8" style:family="text">
      <style:text-properties officeooo:rsid="00268109"/>
    </style:style>
    <style:style style:name="T9" style:family="text">
      <style:text-properties officeooo:rsid="00274f7d"/>
    </style:style>
    <style:style style:name="T10" style:family="text">
      <style:text-properties officeooo:rsid="00290660"/>
    </style:style>
    <style:style style:name="T11" style:family="text">
      <style:text-properties officeooo:rsid="0029d198"/>
    </style:style>
    <style:style style:name="T12" style:family="text">
      <style:text-properties officeooo:rsid="002a7f37"/>
    </style:style>
    <style:style style:name="T13" style:family="text">
      <style:text-properties officeooo:rsid="002e473b"/>
    </style:style>
    <style:style style:name="T14" style:family="text">
      <style:text-properties officeooo:rsid="002f9789"/>
    </style:style>
    <style:style style:name="T15" style:family="text">
      <style:text-properties officeooo:rsid="00311178"/>
    </style:style>
    <style:style style:name="T16" style:family="text">
      <style:text-properties officeooo:rsid="003194bf"/>
    </style:style>
    <style:style style:name="T17" style:family="text">
      <style:text-properties officeooo:rsid="0033815e"/>
    </style:style>
    <style:style style:name="T18" style:family="text">
      <style:text-properties officeooo:rsid="003467d3"/>
    </style:style>
    <style:style style:name="T19" style:family="text">
      <style:text-properties officeooo:rsid="00361f93"/>
    </style:style>
    <style:style style:name="T20" style:family="text">
      <style:text-properties officeooo:rsid="00377a64"/>
    </style:style>
    <style:style style:name="T21" style:family="text">
      <style:text-properties officeooo:rsid="001b98dd"/>
    </style:style>
    <style:style style:name="T22" style:family="text">
      <style:text-properties officeooo:rsid="001cad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2" text:outline-level="2">Parte 1 - El ascenso imposible</text:h>
      <text:p text:style-name="Text_20_body"/>
      <text:p text:style-name="Text_20_body">El descenso por la pared occidental resultó más sencillo de lo esperado.</text:p>
      <text:p text:style-name="Text_20_body">La roca estaba surcada por numerosas grietas y repisas naturales que ofrecían puntos de apoyo relativamente seguros.</text:p>
      <text:p text:style-name="Text_20_body">Uno a uno, los seis hombres fueron descendiendo hasta alcanzar el fondo del valle.</text:p>
      <text:p text:style-name="Text_20_body">Desde allí cruzaron el río ayudándose con las cuerdas que habían conseguido salvar de la tormenta.</text:p>
      <text:p text:style-name="Text_20_body">El agua era rápida y helada, pero la corriente no representó un problema serio.</text:p>
      <text:p text:style-name="Text_20_body">Al caer la tarde todos se encontraban ya al otro lado.</text:p>
      <text:p text:style-name="Text_20_body">Y fue entonces cuando comprendieron la magnitud del desafío que les esperaba.</text:p>
      <text:p text:style-name="Text_20_body">La pared oriental se alzaba frente a ellos como una muralla construida por gigantes.</text:p>
      <text:p text:style-name="Text_20_body"><text:span text:style-name="T8">L</text:span>isa.<text:span text:style-name="T1"> </text:span><text:span text:style-name="T8">I</text:span>ntimidante.</text:p>
      <text:p text:style-name="Text_20_body">Trescientos metros de granito gris ascendían casi verticalmente hacia el cielo.</text:p>
      <text:p text:style-name="Text_20_body">Durante varios minutos permanecieron observándola en silencio.</text:p>
      <text:p text:style-name="Text_20_body"><text:span text:style-name="T9">El ascenso</text:span> parecía imposible.</text:p>
      <text:p text:style-name="Text_20_body">No había senderos.<text:span text:style-name="T1"> </text:span>No existía ninguna ruta evidente.</text:p>
      <text:p text:style-name="Text_20_body">Sólo roca desnuda elevándose sobre sus cabezas.</text:p>
      <text:p text:style-name="Text_20_body">—Tiene que haber algún paso —dijo uno de ellos finalmente.</text:p>
      <text:p text:style-name="Text_20_body">Decidieron acampar junto al río.<text:span text:style-name="T1"> </text:span>Necesitaban descansar<text:span text:style-name="T9"> y</text:span> estudiar la montaña.</text:p>
      <text:p text:style-name="Text_20_body">Pasaron el resto de la tarde examinando la pared desde distintos ángulos.<text:span text:style-name="T1"> </text:span>Buscando grietas<text:span text:style-name="T9">, c</text:span>ornisas<text:span text:style-name="T9">, p</text:span>osibles rutas.</text:p>
      <text:p text:style-name="Text_20_body">El río les proporcionó agua<text:span text:style-name="T9">, l</text:span>a pesca les permitió conseguir algo de comida<text:span text:style-name="T9">, y </text:span>un conjunto de árboles inclinados junto a unas rocas salientes les ofreció refugio suficiente para pasar la noche.</text:p>
      <text:p text:style-name="Text_20_body">Sin embargo, ninguno durmió especialmente bien.</text:p>
      <text:p text:style-name="Text_20_body">La montaña permanecía allí.<text:span text:style-name="T9"> </text:span>Observándolos.<text:span text:style-name="T9"> Esperando. </text:span>Como una amenaza silenciosa.</text:p>
      <text:p text:style-name="Text_20_body"/>
      <text:p text:style-name="Text_20_body">Al amanecer el tiempo era excelente.<text:span text:style-name="T1"> </text:span>El cielo estaba despejado.<text:span text:style-name="T1"> </text:span>El aire fresco.</text:p>
      <text:p text:style-name="Text_20_body">Prepararon las cuerdas.<text:span text:style-name="T1"> </text:span>Repartieron el equipo.<text:span text:style-name="T1"> </text:span>Y comenzaron a subir.</text:p>
      <text:p text:style-name="Text_20_body">Los primeros metros resultaron relativamente sencillos.<text:span text:style-name="T1"> </text:span>La roca ofrecía numerosos <text:span text:style-name="T9">puntos de </text:span>apoyo.</text:p>
      <text:p text:style-name="P7"><text:soft-page-break/>Las grietas permitían avanzar con cierta comodidad.<text:span text:style-name="T1"> </text:span></text:p>
      <text:p text:style-name="P17">Pero poco a poco, a medida que ganaban altura, el cansancio comenzo a notarse. </text:p>
      <text:p text:style-name="P15"><text:span text:style-name="T10">Y entonces todo</text:span> cambió.</text:p>
      <text:p text:style-name="Text_20_body">El suelo había desaparecido muy por debajo de ellos<text:span text:style-name="T10">, e</text:span>l río se había convertido en una cinta plateada<text:span text:style-name="T10">, y l</text:span>os árboles parecían arbustos diminutos<text:span text:style-name="T10">, cuando</text:span> los apoyos empeza<text:span text:style-name="T10">ron </text:span>a escasear.</text:p>
      <text:p text:style-name="Text_20_body"/>
      <text:p text:style-name="Text_20_body">Los hombres avanzaban despacio.<text:span text:style-name="T1"> </text:span>Uno detrás de otro.<text:span text:style-name="T1"> </text:span>Separados apenas por unos metros.</text:p>
      <text:p text:style-name="P15">Cada paso debía estudiarse cuidadosamente.</text:p>
      <text:p text:style-name="P7">La montaña parecía cambiar a medida que ascendían.<text:span text:style-name="T10"> </text:span><text:span text:style-name="T1">Ya no ofrecía tantas oportunidades como en la base.</text:span></text:p>
      <text:p text:style-name="P2"><text:span text:style-name="T2">Y comenzaron uno a uno a quedar bloqueados en el ascenso. </text:span>Atrapado<text:span text:style-name="T2">s</text:span>.</text:p>
      <text:p text:style-name="P8">En mitad de la pared.</text:p>
      <text:p text:style-name="P2">Sin encontrar un camino evidente para continuar.<text:span text:style-name="T10"> </text:span>Ni hacia arriba.<text:span text:style-name="T2"> Ni hacia abajo.</text:span></text:p>
      <text:p text:style-name="P1"><text:span text:style-name="T2">Comprendieron entonces </text:span>que la montaña podía vencerlos.</text:p>
      <text:p text:style-name="P8">Y de pronto, se encontraron luchando por sus vidas.</text:p>
      <text:p text:style-name="P2">Aferrados a la roca.</text:p>
      <text:p text:style-name="P2">Suspendidos sobre el vacío.</text:p>
      <text:p text:style-name="P8"><text:span text:style-name="T3">Paralizados por el vertigo</text:span>.</text:p>
      <text:p text:style-name="P8"/>
      <text:p text:style-name="P9"/>
      <text:p text:style-name="Standard"/>
      <text:p text:style-name="Horizontal_20_Line"/>
      <text:p text:style-name="Text_20_body"/>
      <text:h text:style-name="Heading_20_2" text:outline-level="2">Parte 2 - El accidente</text:h>
      <text:p text:style-name="Text_20_body"/>
      <text:p text:style-name="Text_20_body">El viento <text:span text:style-name="T5">comenzo a </text:span>sopla<text:span text:style-name="T5">r</text:span> con mayor fuerza.<text:span text:style-name="T4"> Y</text:span> la cima seguía pareciendo lejana.</text:p>
      <text:p text:style-name="P4">El más joven de todos<text:span text:style-name="T5">, Ghim, </text:span><text:s/><text:span text:style-name="T5">comenzo</text:span> a desviarse<text:span text:style-name="T5"> por </text:span>una serie de grietas diagonales que ascendían por la pared forma<text:span text:style-name="T5">ndo</text:span> una ruta mucho más accesible.</text:p>
      <text:p text:style-name="P10">Comenzo a avanzar rapidamente.</text:p>
      <text:p text:style-name="P10">—¡Por aquí! —gritó.</text:p>
      <text:p text:style-name="P4">Aquello era exactamente lo que todos necesitaban.<text:span text:style-name="T5"> Una salida.</text:span></text:p>
      <text:p text:style-name="P3"><text:soft-page-break/><text:span text:style-name="T5">S</text:span>uspendido a más de doscientos metros sobre el vacío, Ghim continuó subiendo.</text:p>
      <text:p text:style-name="P4"/>
      <text:p text:style-name="P4">Y entonces sucedió.</text:p>
      <text:p text:style-name="P4">Nadie comprendió exactamente qué ocurrió.</text:p>
      <text:p text:style-name="P16">Todo <text:span text:style-name="T11">pasó</text:span> demasiado rápido.</text:p>
      <text:p text:style-name="P3"><text:span text:style-name="T5">S</text:span>us manos se separaron de la pared.</text:p>
      <text:p text:style-name="P4">Simplemente se separaron.</text:p>
      <text:p text:style-name="P11">Y cayó.</text:p>
      <text:p text:style-name="P10"/>
      <text:p text:style-name="P12">Su cuerpo rebotó contra la pared de granito mientras descendía.</text:p>
      <text:p text:style-name="P12"><text:span text:style-name="T6">El</text:span> impacto produ<text:span text:style-name="T6">jo</text:span> un sonido horrible.</text:p>
      <text:p text:style-name="P12">Seco.</text:p>
      <text:p text:style-name="P4"/>
      <text:p text:style-name="P12">Los demás observa<text:span text:style-name="T6">ron</text:span> paralizados.<text:span text:style-name="T13"> </text:span>Nadie podía moverse.</text:p>
      <text:p text:style-name="P6">Durante varios segundos ninguno de ellos fue capaz de pensar.<text:span text:style-name="T13"> </text:span>Simplemente permanecieron inmóviles.</text:p>
      <text:p text:style-name="P6">Aferrados a la roca.</text:p>
      <text:p text:style-name="P6">Intentando comprender.</text:p>
      <text:p text:style-name="P6">Ninguno había podido hacer nada<text:span text:style-name="T12"> para evitarlo</text:span>.</text:p>
      <text:p text:style-name="P13"/>
      <text:p text:style-name="P6">Fue entonces cuando comprendieron algo aterrador.<text:span text:style-name="T7"> <text:s/></text:span></text:p>
      <text:p text:style-name="P14">La muerte estaba mucho más cerca de lo que imaginaban<text:span text:style-name="T12">.</text:span></text:p>
      <text:p text:style-name="P13">Y al instante, el profundo dolor por la muerte repentina de un amigo se confundio con el horror de sentirse esperando, de forma inminente, la misma suerte.</text:p>
      <text:p text:style-name="P13"/>
      <text:p text:style-name="P6">Ahora sabían la verdad.</text:p>
      <text:p text:style-name="P5"><text:span text:style-name="T7">A</text:span>trapados en mitad de la pared.<text:span text:style-name="T7"> </text:span>Suspendidos sobre el vacío.</text:p>
      <text:p text:style-name="P6">Ninguno estaba a salvo.<text:span text:style-name="T7"> </text:span>Ninguno dominaba la situación.</text:p>
      <text:p text:style-name="P6"><text:span text:style-name="T7">N</text:span>inguno tenía garantía alguna de alcanzar la cima.</text:p>
      <text:p text:style-name="P6"/>
      <text:p text:style-name="Text_20_body"/>
      <text:p text:style-name="Horizontal_20_Line"/>
      <text:p text:style-name="Text_20_body"/>
      <text:h text:style-name="P24" text:outline-level="2"><text:soft-page-break/></text:h>
      <text:h text:style-name="P24" text:outline-level="2">Parte 3 -<text:span text:style-name="T20"> Derrota</text:span></text:h>
      <text:p text:style-name="P26"/>
      <text:p text:style-name="P26">La caída de Ghim conmocionó al grupo.</text:p>
      <text:p text:style-name="P26">Durante varios minutos permanecieron inmóviles sobre la pared de roca, incapaces de aceptar lo que acababan de ver.</text:p>
      <text:p text:style-name="P26"><text:span text:style-name="T20">D</text:span>ecidieron descender.<text:span text:style-name="T22"> </text:span>No podían marcharse sin encontrarlo.<text:span text:style-name="T20"> </text:span>Ayudados por las cuerdas, el descenso fue relativamente rápido. </text:p>
      <text:p text:style-name="P26">Una vez en la base del acantilado comenzaron la búsqueda.</text:p>
      <text:p text:style-name="P26">Recorrieron las rocas.<text:span text:style-name="T21"> </text:span>Registraron las grietas.<text:span text:style-name="T21"> </text:span>Examinaron la orilla.</text:p>
      <text:p text:style-name="P26">Llamaron su nombre una y otra vez.</text:p>
      <text:p text:style-name="P26">No encontraron nada.</text:p>
      <text:p text:style-name="P26">Cuando el sol comenzó a ocultarse comprendieron que era inútil.</text:p>
      <text:p text:style-name="P26"/>
      <text:p text:style-name="P26">Entonces aceptaron otra verdad.</text:p>
      <text:p text:style-name="P26">La montaña había <text:span text:style-name="T21">vencido</text:span>.</text:p>
      <text:p text:style-name="P26"><text:span text:style-name="T21">S</text:span>i querian alcanzar el objetivo<text:span text:style-name="T21"> d</text:span>ebían buscar otra forma de llegar.</text:p>
      <text:p text:style-name="P26"><text:span text:style-name="T21">Sin</text:span> caballos<text:span text:style-name="T21">, sin</text:span> el equipo necesario<text:span text:style-name="T21"> l</text:span>a expedición había terminado.</text:p>
      <text:p text:style-name="P26">Regresarían a Oldwood al amanecer.<text:span text:style-name="T20"> </text:span><text:span text:style-name="T21">No había otra opción.</text:span></text:p>
      <text:p text:style-name="P25"/>
      <text:p text:style-name="P25">La oscuridad envolvió<text:span text:style-name="T22"> poco a poco</text:span> la montaña.</text:p>
      <text:p text:style-name="P26"><text:span text:style-name="T22">E</text:span>ncendieron una hoguera<text:span text:style-name="T22">,</text:span> compartieron las últimas provisiones.<text:span text:style-name="T22"> Hablaron poco.</text:span></text:p>
      <text:p text:style-name="P26">La muerte<text:span text:style-name="T22"> lo</text:span> había<text:span text:style-name="T22"> cambiado</text:span> <text:span text:style-name="T22">todo</text:span>.</text:p>
      <text:p text:style-name="P26">La silueta negra del acantilado se elevaba sobre ellos ocultando las estrellas.</text:p>
      <text:p text:style-name="P26">El viento descendía desde las alturas arrastrando sonidos extraños entre las rocas.</text:p>
      <text:p text:style-name="P26"><text:span text:style-name="T22">L</text:span>a montaña <text:span text:style-name="T22">a</text:span>hora <text:span text:style-name="T20">se sentía como</text:span> una presencia.<text:span text:style-name="T20"> </text:span>Oscura.<text:span text:style-name="T20"> </text:span>Inmensa.<text:span text:style-name="T20"> </text:span></text:p>
      <text:p text:style-name="P26">Indiferente.</text:p>
      <text:p text:style-name="P26"/>
      <text:p text:style-name="P26"><text:span text:style-name="T22">Y la noche lleg</text:span><text:span text:style-name="T21">ó</text:span><text:span text:style-name="T22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5T15:34:27.961000000</meta:creation-date>
    <dc:date>2026-06-29T19:32:44.694000000</dc:date>
    <meta:editing-duration>PT1H48M36S</meta:editing-duration>
    <meta:editing-cycles>16</meta:editing-cycles>
    <meta:generator>LibreOffice/7.3.5.2$Windows_X86_64 LibreOffice_project/184fe81b8c8c30d8b5082578aee2fed2ea847c01</meta:generator>
    <meta:document-statistic meta:table-count="0" meta:image-count="0" meta:object-count="0" meta:page-count="4" meta:paragraph-count="89" meta:word-count="829" meta:character-count="5293" meta:non-whitespace-character-count="4546"/>
  </office:meta>
</office:document-meta>
</file>