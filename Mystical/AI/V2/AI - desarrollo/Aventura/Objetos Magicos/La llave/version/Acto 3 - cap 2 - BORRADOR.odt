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cf993"/>
    </style:style>
    <style:style style:name="P2" style:family="paragraph" style:parent-style-name="Text_20_body">
      <style:text-properties officeooo:rsid="000cf993" officeooo:paragraph-rsid="0011458c"/>
    </style:style>
    <style:style style:name="P3" style:family="paragraph" style:parent-style-name="Text_20_body">
      <style:text-properties officeooo:rsid="000cf993" officeooo:paragraph-rsid="00225480"/>
    </style:style>
    <style:style style:name="P4" style:family="paragraph" style:parent-style-name="Text_20_body">
      <style:text-properties officeooo:rsid="000dde6b" officeooo:paragraph-rsid="0011458c"/>
    </style:style>
    <style:style style:name="P5" style:family="paragraph" style:parent-style-name="Text_20_body">
      <style:text-properties officeooo:rsid="000dde6b" officeooo:paragraph-rsid="000dde6b"/>
    </style:style>
    <style:style style:name="P6" style:family="paragraph" style:parent-style-name="Text_20_body">
      <style:text-properties officeooo:rsid="000dde6b" officeooo:paragraph-rsid="0014d8ee"/>
    </style:style>
    <style:style style:name="P7" style:family="paragraph" style:parent-style-name="Text_20_body">
      <style:text-properties officeooo:paragraph-rsid="000f2d7c"/>
    </style:style>
    <style:style style:name="P8" style:family="paragraph" style:parent-style-name="Text_20_body">
      <style:text-properties officeooo:rsid="000f2d7c" officeooo:paragraph-rsid="001100a6"/>
    </style:style>
    <style:style style:name="P9" style:family="paragraph" style:parent-style-name="Text_20_body">
      <style:text-properties officeooo:rsid="000f2d7c" officeooo:paragraph-rsid="000f2d7c"/>
    </style:style>
    <style:style style:name="P10" style:family="paragraph" style:parent-style-name="Text_20_body">
      <style:text-properties officeooo:paragraph-rsid="001100a6"/>
    </style:style>
    <style:style style:name="P11" style:family="paragraph" style:parent-style-name="Text_20_body">
      <style:text-properties officeooo:rsid="001100a6" officeooo:paragraph-rsid="001100a6"/>
    </style:style>
    <style:style style:name="P12" style:family="paragraph" style:parent-style-name="Text_20_body">
      <style:text-properties officeooo:rsid="0011458c" officeooo:paragraph-rsid="0011458c"/>
    </style:style>
    <style:style style:name="P13" style:family="paragraph" style:parent-style-name="Text_20_body">
      <style:text-properties officeooo:paragraph-rsid="0011458c"/>
    </style:style>
    <style:style style:name="P14" style:family="paragraph" style:parent-style-name="Text_20_body">
      <style:text-properties officeooo:paragraph-rsid="00128437"/>
    </style:style>
    <style:style style:name="P15" style:family="paragraph" style:parent-style-name="Heading_20_3">
      <style:text-properties officeooo:paragraph-rsid="0015eb07"/>
    </style:style>
    <style:style style:name="P16" style:family="paragraph" style:parent-style-name="Text_20_body">
      <style:text-properties officeooo:paragraph-rsid="0015eb07"/>
    </style:style>
    <style:style style:name="P17" style:family="paragraph" style:parent-style-name="Text_20_body">
      <style:text-properties officeooo:rsid="0014d8ee" officeooo:paragraph-rsid="0014d8ee"/>
    </style:style>
    <style:style style:name="P18" style:family="paragraph" style:parent-style-name="Text_20_body">
      <style:text-properties officeooo:paragraph-rsid="001b9214"/>
    </style:style>
    <style:style style:name="P19" style:family="paragraph" style:parent-style-name="Text_20_body">
      <style:text-properties officeooo:paragraph-rsid="001d830f"/>
    </style:style>
    <style:style style:name="P20" style:family="paragraph" style:parent-style-name="Standard">
      <style:text-properties officeooo:paragraph-rsid="00232f81"/>
    </style:style>
    <style:style style:name="P21" style:family="paragraph" style:parent-style-name="Text_20_body">
      <style:text-properties officeooo:paragraph-rsid="00232f81"/>
    </style:style>
    <style:style style:name="P22" style:family="paragraph" style:parent-style-name="Text_20_body">
      <style:text-properties officeooo:rsid="0017e81f" officeooo:paragraph-rsid="0017e81f"/>
    </style:style>
    <style:style style:name="P23" style:family="paragraph" style:parent-style-name="Text_20_body">
      <style:text-properties officeooo:paragraph-rsid="0017e81f"/>
    </style:style>
    <style:style style:name="P24" style:family="paragraph" style:parent-style-name="Text_20_body">
      <style:text-properties officeooo:rsid="0019e633" officeooo:paragraph-rsid="0019e633"/>
    </style:style>
    <style:style style:name="P25" style:family="paragraph" style:parent-style-name="Text_20_body">
      <style:text-properties officeooo:paragraph-rsid="00226cf7"/>
    </style:style>
    <style:style style:name="P26" style:family="paragraph" style:parent-style-name="Text_20_body">
      <style:text-properties officeooo:rsid="00226cf7" officeooo:paragraph-rsid="00226cf7"/>
    </style:style>
    <style:style style:name="P27" style:family="paragraph" style:parent-style-name="Text_20_body">
      <style:text-properties officeooo:rsid="00232f81" officeooo:paragraph-rsid="00232f81"/>
    </style:style>
    <style:style style:name="P28" style:family="paragraph" style:parent-style-name="Text_20_body">
      <style:text-properties officeooo:rsid="00232f81" officeooo:paragraph-rsid="0024d3a6"/>
    </style:style>
    <style:style style:name="P29" style:family="paragraph" style:parent-style-name="Text_20_body">
      <style:text-properties officeooo:rsid="0024d3a6" officeooo:paragraph-rsid="0024d3a6"/>
    </style:style>
    <style:style style:name="P30" style:family="paragraph" style:parent-style-name="Text_20_body">
      <style:text-properties officeooo:rsid="0024d3a6" officeooo:paragraph-rsid="0025c5f2"/>
    </style:style>
    <style:style style:name="P31" style:family="paragraph" style:parent-style-name="Text_20_body">
      <style:text-properties officeooo:paragraph-rsid="0024d3a6"/>
    </style:style>
    <style:style style:name="P32" style:family="paragraph" style:parent-style-name="Text_20_body">
      <style:text-properties officeooo:paragraph-rsid="0025c5f2"/>
    </style:style>
    <style:style style:name="P33" style:family="paragraph" style:parent-style-name="Standard">
      <style:text-properties officeooo:paragraph-rsid="00284ec2"/>
    </style:style>
    <style:style style:name="P34" style:family="paragraph" style:parent-style-name="Text_20_body">
      <style:text-properties officeooo:paragraph-rsid="00294fac"/>
    </style:style>
    <style:style style:name="P35" style:family="paragraph" style:parent-style-name="Text_20_body">
      <style:text-properties officeooo:rsid="00232f81" officeooo:paragraph-rsid="002a1e45"/>
    </style:style>
    <style:style style:name="T1" style:family="text">
      <style:text-properties officeooo:rsid="000cf993"/>
    </style:style>
    <style:style style:name="T2" style:family="text">
      <style:text-properties officeooo:rsid="000dde6b"/>
    </style:style>
    <style:style style:name="T3" style:family="text">
      <style:text-properties officeooo:rsid="000f2d7c"/>
    </style:style>
    <style:style style:name="T4" style:family="text">
      <style:text-properties officeooo:rsid="001100a6"/>
    </style:style>
    <style:style style:name="T5" style:family="text">
      <style:text-properties officeooo:rsid="0011458c"/>
    </style:style>
    <style:style style:name="T6" style:family="text">
      <style:text-properties officeooo:rsid="00128437"/>
    </style:style>
    <style:style style:name="T7" style:family="text">
      <style:text-properties officeooo:rsid="0014d8ee"/>
    </style:style>
    <style:style style:name="T8" style:family="text">
      <style:text-properties officeooo:rsid="0015eb07"/>
    </style:style>
    <style:style style:name="T9" style:family="text">
      <style:text-properties officeooo:rsid="001681a1"/>
    </style:style>
    <style:style style:name="T10" style:family="text">
      <style:text-properties officeooo:rsid="0017e81f"/>
    </style:style>
    <style:style style:name="T11" style:family="text">
      <style:text-properties officeooo:rsid="0019e633"/>
    </style:style>
    <style:style style:name="T12" style:family="text">
      <style:text-properties officeooo:rsid="001b9214"/>
    </style:style>
    <style:style style:name="T13" style:family="text">
      <style:text-properties officeooo:rsid="001d830f"/>
    </style:style>
    <style:style style:name="T14" style:family="text">
      <style:text-properties officeooo:rsid="00226cf7"/>
    </style:style>
    <style:style style:name="T15" style:family="text">
      <style:text-properties officeooo:rsid="00232f81"/>
    </style:style>
    <style:style style:name="T16" style:family="text">
      <style:text-properties officeooo:rsid="0024d3a6"/>
    </style:style>
    <style:style style:name="T17" style:family="text">
      <style:text-properties officeooo:rsid="0025c5f2"/>
    </style:style>
    <style:style style:name="T18" style:family="text">
      <style:text-properties officeooo:rsid="00284ec2"/>
    </style:style>
    <style:style style:name="T19" style:family="text">
      <style:text-properties officeooo:rsid="00294fac"/>
    </style:style>
    <style:style style:name="T20" style:family="text">
      <style:text-properties officeooo:rsid="002a1e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Parte 1 - El acantilado</text:h>
      <text:p text:style-name="Text_20_body"><text:span text:style-name="T1">Tras varios</text:span> días <text:span text:style-name="T1">de viaje, finalmente</text:span> alcanzaron el lugar señalado en el mapa.</text:p>
      <text:p text:style-name="P12">Una vasta llanura desierta terminaba abruptamente en un acantilado.</text:p>
      <text:p text:style-name="P1"><text:span text:style-name="T1">N</text:span>o había nada<text:span text:style-name="T5"> mas</text:span><text:span text:style-name="T1"> allí</text:span>.<text:span text:style-name="T5"> </text:span>Sólo un acantilado.</text:p>
      <text:p text:style-name="Text_20_body">Una inmensa pared de roca que <text:span text:style-name="T1">ca</text:span>ía<text:span text:style-name="T1"> en vertical</text:span> cientos de metros hasta el mar.</text:p>
      <text:p text:style-name="Text_20_body"><text:span text:style-name="T5">Y m</text:span>ás allá no existía ninguna otra tierra.</text:p>
      <text:p text:style-name="Text_20_body">Sólo <text:span text:style-name="T1">e</text:span>l <text:span text:style-name="T1">mar y el </text:span>horizonte<text:span text:style-name="T1">.</text:span><text:span text:style-name="T5"> </text:span><text:span text:style-name="T1">E</text:span>l borde mismo del mundo.</text:p>
      <text:p text:style-name="Text_20_body"/>
      <text:p text:style-name="P3"><text:span text:style-name="T5">A</text:span> sus espaldas, la llanura se extendía en todas direcciones.<text:span text:style-name="T5"> </text:span></text:p>
      <text:p text:style-name="P3">No había nada mas que explorar. Todo estaba a la vista.</text:p>
      <text:p text:style-name="P13">Ambos comprendieron inmediatamente lo que significaba aquel lugar.</text:p>
      <text:p text:style-name="P2">El camino terminaba allí.</text:p>
      <text:p text:style-name="P13">El mapa los había conducido al fin del continente.</text:p>
      <text:p text:style-name="P2">Y nada más.</text:p>
      <text:p text:style-name="P2"/>
      <text:p text:style-name="P13"><text:span text:style-name="T7">Y</text:span>a no les quedaba energía para seguir luchando.<text:span text:style-name="T2"> </text:span></text:p>
      <text:p text:style-name="P4">La realidad les había alcanzado. Era el momento de aceptar la derrota.</text:p>
      <text:p text:style-name="P4"/>
      <text:p text:style-name="Text_20_body"><text:span text:style-name="T5">Permanecieron</text:span> largo rato observ<text:span text:style-name="T6">a</text:span>ndo<text:span text:style-name="T1"> el mar</text:span> en silencio.</text:p>
      <text:p text:style-name="Text_20_body">Ninguno habló.<text:span text:style-name="T5"> </text:span>No era necesario.</text:p>
      <text:p text:style-name="P14"><text:span text:style-name="T5">El tesoro hab</text:span><text:span text:style-name="T2">ía</text:span><text:span text:style-name="T5"> sido siempre una fantas</text:span><text:span text:style-name="T2">ía</text:span><text:span text:style-name="T6">. Ahora estaba claro. El viejo tenia razón.</text:span></text:p>
      <text:p text:style-name="P6">Nohk se tumbo en la hierva mirando el cielo<text:span text:style-name="T7">.</text:span></text:p>
      <text:p text:style-name="P6"><text:span text:style-name="T7">V</text:span>io pasar la nubes, lentas.</text:p>
      <text:p text:style-name="P5">La brisa del mar olía a hierva y sal. Fresca, suave.</text:p>
      <text:p text:style-name="Text_20_body"><text:span text:style-name="T3">C</text:span>erró los ojos<text:span text:style-name="T3"> un momento, y</text:span> escuchó.</text:p>
      <text:p text:style-name="Text_20_body">El sonido del viento.<text:span text:style-name="T3"> Y l</text:span>os gritos lejanos de las aves marinas.</text:p>
      <text:p text:style-name="P9">Las vió volar<text:span text:style-name="T7">. L</text:span>ibres.</text:p>
      <text:p text:style-name="P17">Una de ellas cruzo el cielo justo sobre el. </text:p>
      <text:p text:style-name="P8"><text:span text:style-name="T7">La </text:span><text:span text:style-name="T4">S</text:span>iguió<text:span text:style-name="T4"> </text:span>con la vista <text:span text:style-name="T7">hasta que</text:span> desapareció detras de la pared del acantilado.</text:p>
      <text:p text:style-name="P7"><text:soft-page-break/>Kempht también lo <text:span text:style-name="T3">vió</text:span>.</text:p>
      <text:p text:style-name="P14"><text:span text:style-name="T4">E</text:span>star<text:span text:style-name="T2">ía</text:span><text:span text:style-name="T4"> posiblemente</text:span> anidando <text:span text:style-name="T6">all</text:span><text:span text:style-name="T2">í</text:span><text:span text:style-name="T4">.</text:span></text:p>
      <text:p text:style-name="P11">Se acercó despacio al borde y miró hacia abajo.</text:p>
      <text:p text:style-name="P10"><text:span text:style-name="T4">S</text:span>intió el vertigo de la altura.<text:span text:style-name="T4"> La caída era enorme. A</text:span>bajo el mar golpeaba <text:span text:style-name="T4">con fuerza </text:span>contra las rocas.</text:p>
      <text:p text:style-name="P10"><text:span text:style-name="T4">E</text:span>ntonces lo vió.</text:p>
      <text:p text:style-name="P10">A unos cincuenta metros de distancia.<text:span text:style-name="T4"> </text:span>Pegada a la pared del acantilado.</text:p>
      <text:p text:style-name="P10">Una estrecha cornisa descendía en diagonal hacia algún lugar oculto bajo la roca.</text:p>
      <text:p text:style-name="P11">Dijo:</text:p>
      <text:p text:style-name="P10">—Eh, Nohk...es eso un camino?</text:p>
      <text:p text:style-name="P10"/>
      <text:p text:style-name="Horizontal_20_Line"/>
      <text:p text:style-name="Text_20_body"/>
      <text:h text:style-name="P15" text:outline-level="3">Parte <text:span text:style-name="T8">2</text:span><text:span text:style-name="T9"> - El camino</text:span></text:h>
      <text:p text:style-name="Text_20_body"/>
      <text:p text:style-name="Text_20_body">No estaba claro que aquella estrecha cornisa condujera a ninguna parte.</text:p>
      <text:p text:style-name="Text_20_body">Podía terminar unos metros más adelante.</text:p>
      <text:p text:style-name="Text_20_body">Podía derrumbarse.</text:p>
      <text:p text:style-name="Text_20_body">Podía no ser más que una irregularidad de la roca.</text:p>
      <text:p text:style-name="Text_20_body">Pero después de todo lo que habían perdido, cualquier posibilidad merecía ser examinada.</text:p>
      <text:p text:style-name="Text_20_body">—Tenemos que investigarlo —dijo Nohk.</text:p>
      <text:p text:style-name="Text_20_body">Kempht no dudó.</text:p>
      <text:p text:style-name="Text_20_body">La esperanza seguía viva en él.</text:p>
      <text:p text:style-name="Text_20_body">Descendió por la pared del acantilado hasta alcanzar la cornisa y apoyó ambos pies sobre la estrecha franja de piedra.</text:p>
      <text:p text:style-name="Text_20_body">El mar rugía cientos de metros más abajo.</text:p>
      <text:p text:style-name="Text_20_body">El viento golpeaba la roca.</text:p>
      <text:p text:style-name="Text_20_body">La cornisa avanzaba bordeando la montaña y desaparecía tras un saliente.</text:p>
      <text:p text:style-name="Text_20_body">—Puede que sea el camino —gritó.</text:p>
      <text:p text:style-name="Text_20_body">Nohk no respondió.</text:p>
      <text:p text:style-name="P22">El no lo creia realmente.</text:p>
      <text:p text:style-name="Text_20_body"><text:soft-page-break/>Observaba desde arriba.<text:span text:style-name="T10"> </text:span>Lejos del borde.<text:span text:style-name="T10"> </text:span>Lejos del peligro.</text:p>
      <text:p text:style-name="Text_20_body"><text:span text:style-name="T10">M</text:span>anteniendose prudentemente apartado. <text:span text:style-name="T10">E</text:span>n un lugar seguro.</text:p>
      <text:p text:style-name="Text_20_body"><text:span text:style-name="T10">N</text:span>o estaba ayudando. <text:span text:style-name="T10">S</text:span>olo queria ver lo que sucedia.</text:p>
      <text:p text:style-name="Text_20_body"/>
      <text:p text:style-name="Text_20_body">Kempht avanzó lentamente.</text:p>
      <text:p text:style-name="Text_20_body">Un paso.<text:span text:style-name="T10"> </text:span>Después otro.<text:span text:style-name="T10"> </text:span>No parecía asustado.<text:span text:style-name="T10"> </text:span>Al contrario.<text:span text:style-name="T10"> Estaba</text:span> emocionado.</text:p>
      <text:p text:style-name="Text_20_body">C<text:span text:style-name="T10">reyendo</text:span> ver el final de la búsqueda.<text:span text:style-name="T10"> Imaginando que el tesoro estaba</text:span> esperándolo al otro lado.</text:p>
      <text:p text:style-name="Text_20_body">Nohk lo observó alejarse.</text:p>
      <text:p text:style-name="Text_20_body"><text:span text:style-name="T10">Poco tiempo</text:span> atrás habría descendido junto a él.</text:p>
      <text:p text:style-name="Text_20_body">Habría compartido el riesgo.</text:p>
      <text:p text:style-name="Text_20_body">Habría protegido a su amigo.</text:p>
      <text:p text:style-name="Text_20_body">Pero aquellos hombres ya no existían.</text:p>
      <text:p text:style-name="P23">La montaña los había cambiado.<text:span text:style-name="T10"> </text:span></text:p>
      <text:p text:style-name="P23"><text:span text:style-name="T10">Y e</text:span>l hambre<text:span text:style-name="T10">, l</text:span>a codicia<text:span text:style-name="T10">, la traicion, la muerte</text:span>.</text:p>
      <text:p text:style-name="Text_20_body"/>
      <text:p text:style-name="Text_20_body">Kempht avanzó otro paso<text:span text:style-name="T10">, y otro, entonces...</text:span></text:p>
      <text:p text:style-name="Text_20_body">una piedra se desprendió.</text:p>
      <text:p text:style-name="P22"><text:span text:style-name="T18">Y s</text:span>u pie se hundio en el vacio. Perdio el equilibrio<text:span text:style-name="T11">.</text:span></text:p>
      <text:p text:style-name="P23"><text:span text:style-name="T11">Y</text:span><text:span text:style-name="T10"> c</text:span>ayó.</text:p>
      <text:p text:style-name="Text_20_body"/>
      <text:p text:style-name="P24">Cientos de metros.</text:p>
      <text:p text:style-name="Text_20_body">Nohk caminó hasta el borde.</text:p>
      <text:p text:style-name="Text_20_body">Miró hacia abajo.<text:span text:style-name="T11"> </text:span>Muy abajo, donde el mar golpeaba las rocas negras.</text:p>
      <text:p text:style-name="Text_20_body"><text:span text:style-name="T11">Lo b</text:span>uscó <text:span text:style-name="T11">con la mirada </text:span>durante unos segundos.</text:p>
      <text:p text:style-name="Text_20_body">No sintió pena.</text:p>
      <text:p text:style-name="Text_20_body"/>
      <text:p text:style-name="Text_20_body">Se alejó del borde.</text:p>
      <text:p text:style-name="Text_20_body">Se sentó sobre la hierba.<text:span text:style-name="T11"> </text:span><text:span text:style-name="T12">Y un rato d</text:span>espués se tumbó boca arriba.</text:p>
      <text:p text:style-name="Text_20_body">El cielo comenzaba a teñirse de rojo.</text:p>
      <text:p text:style-name="P18">Permaneció inmóvil mientras <text:span text:style-name="T18">el tiempo</text:span> pasaba lentamente.</text:p>
      <text:p text:style-name="Text_20_body"><text:soft-page-break/><text:span text:style-name="T12">N</text:span>o tenia adonde ir.</text:p>
      <text:p text:style-name="P18">Cuando cayó la noche encendió una hoguera.</text:p>
      <text:p text:style-name="P18">Observó las llamas durante largo rato.</text:p>
      <text:p text:style-name="P18"><text:span text:style-name="T18">C</text:span>uando una idea comenzó a abrirse paso entre sus pensamientos.</text:p>
      <text:p text:style-name="P18">¿Y si realmente <text:span text:style-name="T18">ese </text:span>era el camino?</text:p>
      <text:p text:style-name="P33"><text:span text:style-name="T13">Encendi</text:span>ó una lámpara<text:span text:style-name="T18">.</text:span></text:p>
      <text:p text:style-name="P33"><text:span text:style-name="T18">Caminó hasta el borde. D</text:span>escendió por la pared<text:span text:style-name="T12"> hasta la cornisa</text:span>.</text:p>
      <text:p text:style-name="P19">No sentía miedo<text:span text:style-name="T13">.</text:span></text:p>
      <text:p text:style-name="P19">La montaña era ya una masa negra contra el cielo.</text:p>
      <text:p text:style-name="P18"><text:span text:style-name="T13">A</text:span>vanzo sin pensar<text:span text:style-name="T13">.</text:span></text:p>
      <text:p text:style-name="P33"><text:span text:style-name="T18">Consiguió recorrer la cornisa hasta el final. </text:span><text:span text:style-name="T13">R</text:span>odeó el saliente de la montaña.</text:p>
      <text:p text:style-name="P19">Y entonces la vio.</text:p>
      <text:p text:style-name="P19">Una abertura oscura.</text:p>
      <text:p text:style-name="P19">La entrada de una cueva.<text:span text:style-name="T13"> Un túnel que se internaba en las entrañas de la montaña.</text:span></text:p>
      <text:p text:style-name="P19">Levantó la lámpara.</text:p>
      <text:p text:style-name="P19">La luz penetró unos metros en la oscuridad.</text:p>
      <text:p text:style-name="P19">Y reveló<text:span text:style-name="T13">,</text:span> unos pocos pasos mas adelante<text:span text:style-name="T13">,</text:span> una puerta de hierro incrustada en la pared de roca.</text:p>
      <text:p text:style-name="P19"/>
      <text:p text:style-name="Horizontal_20_Line"/>
      <text:p text:style-name="Text_20_body"/>
      <text:h text:style-name="P15" text:outline-level="3">Parte 3 - El destino</text:h>
      <text:p text:style-name="P16"/>
      <text:p text:style-name="P16">Nohk corrió hacia la puerta.</text:p>
      <text:p text:style-name="P34"><text:span text:style-name="T19">Ahora ya no tenía ninguna duda. </text:span>La bóveda existía.</text:p>
      <text:p text:style-name="P16">Todos estaban equivocados.</text:p>
      <text:p text:style-name="P16"><text:span text:style-name="T19">Aunque...</text:span> <text:span text:style-name="T14">n</text:span>o había símbolos<text:span text:style-name="T14">, ni </text:span>escudos reales<text:span text:style-name="T19">, ni </text:span>inscripciones antiguas.</text:p>
      <text:p text:style-name="P16">Sólo <text:span text:style-name="T14">la puerta de </text:span>hierro.</text:p>
      <text:p text:style-name="P16">Y una cerradura.</text:p>
      <text:p text:style-name="P16"/>
      <text:p text:style-name="P16">Introdujo la llave.</text:p>
      <text:p text:style-name="P16">Encajó perfectamente.</text:p>
      <text:p text:style-name="P16"><text:soft-page-break/><text:span text:style-name="T14">La</text:span> giró <text:span text:style-name="T14">con fuerza</text:span>.</text:p>
      <text:p text:style-name="P16">Un sonido seco<text:span text:style-name="T14">, como un golpe,</text:span> resonó en el interior de la <text:span text:style-name="T14">cueva</text:span>.</text:p>
      <text:p text:style-name="P16"><text:span text:style-name="T19">Y l</text:span>a cerradura cedió.</text:p>
      <text:p text:style-name="P16"><text:span text:style-name="T19">Empujo con fuerza, y la pesada</text:span> puerta <text:span text:style-name="T19">de hierro </text:span>se abrió.</text:p>
      <text:p text:style-name="P16"/>
      <text:p text:style-name="P26">Creia estar preparado para este momento, pero ahora dudaba.</text:p>
      <text:p text:style-name="P27">La profunda oscuridad dentro de la boveda ocultaba <text:span text:style-name="T19">cualquier peligro</text:span> que pudiera estar acechando en su interior.</text:p>
      <text:p text:style-name="P35">Pero, </text:p>
      <text:p text:style-name="P35">que amenaza podria sobrevivir en una boveda cerrada durante siglos?</text:p>
      <text:p text:style-name="P25"/>
      <text:p text:style-name="P25">Levantó la lámpara.</text:p>
      <text:p text:style-name="P25">Y entró<text:span text:style-name="T14">, abriendose paso en la oscuridad.</text:span></text:p>
      <text:p text:style-name="P20"><text:span text:style-name="T15">L</text:span>os esqueletos<text:span text:style-name="T15"> de algunos hombres, cubiertos por jirones de ropa podrida, yacían cerca de la entrada</text:span><text:span text:style-name="T20">.</text:span></text:p>
      <text:p text:style-name="P21">Tres.<text:span text:style-name="T15"> </text:span>Tal vez cuatro.</text:p>
      <text:p text:style-name="P21">La visión le produjo una sensación incómoda.</text:p>
      <text:p text:style-name="P21">Continuó avanzando.</text:p>
      <text:p text:style-name="P35">Unos pasos mas adelante, la luz de la lámpara reveló el muro posterior.</text:p>
      <text:p text:style-name="P27">Parecia el final de la boveda.</text:p>
      <text:p text:style-name="P31">Llegó hasta la pared del fondo.<text:span text:style-name="T16"> </text:span>La tocó.<text:span text:style-name="T16"> </text:span>Sólida.<text:span text:style-name="T16"> </text:span><text:span text:style-name="T15">Fría.</text:span></text:p>
      <text:p text:style-name="P31">Se volvió lentamente.</text:p>
      <text:p text:style-name="P28"><text:span text:style-name="T17">Y desde alli pudo ver</text:span> toda la estancia.</text:p>
      <text:p text:style-name="P27"/>
      <text:p text:style-name="P27">Era una construccion circular, sin ventanas, sin otras puertas, sin otras camaras.</text:p>
      <text:p text:style-name="P29">Excavada en la roca. Sin inscripciones, ni simbolos. </text:p>
      <text:p text:style-name="P29">Solo contenia los esqueletos de aquellos hombres.</text:p>
      <text:p text:style-name="P29">Estaba vacia.</text:p>
      <text:p text:style-name="P29"/>
      <text:p text:style-name="P30">Un ruido metálico interrumpió sus pensamientos.</text:p>
      <text:p text:style-name="P29"><text:span text:style-name="T17">L</text:span>a puerta se movio.</text:p>
      <text:p text:style-name="P32"><text:soft-page-break/>Durante una fracción de segundo observó cómo comenzaba a cerrarse.</text:p>
      <text:p text:style-name="P32">Después <text:span text:style-name="T17">l</text:span>a pesada hoja de hierro golpeó el marco con un estruendo ensordecedor.</text:p>
      <text:p text:style-name="P32">La roca entera pareció temblar.</text:p>
      <text:p text:style-name="P32">La llave salió despedida de la cerradura.</text:p>
      <text:p text:style-name="P32">Rebotó sobre la piedra.</text:p>
      <text:p text:style-name="P32">Y desapareció al otro lado de la puerta.</text:p>
      <text:p text:style-name="P32"/>
      <text:p text:style-name="P29">Corrio hacia la puerta. </text:p>
      <text:p text:style-name="P31">Golpeó el hierro.</text:p>
      <text:p text:style-name="P31">Empujó.</text:p>
      <text:p text:style-name="P29">Intentó abrirla.</text:p>
      <text:p text:style-name="P30">La puerta no se movió.</text:p>
      <text:p text:style-name="P29">Estaba cerrada. Y no era posible abrirla desde dentro.</text:p>
      <text:p text:style-name="P29"/>
      <text:p text:style-name="P29">Entonces lo comprendio.</text:p>
      <text:p text:style-name="P3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27T11:32:13.069000000</meta:creation-date>
    <dc:date>2026-07-01T15:20:27.069000000</dc:date>
    <meta:editing-duration>PT1H11M49S</meta:editing-duration>
    <meta:editing-cycles>15</meta:editing-cycles>
    <meta:generator>LibreOffice/7.3.5.2$Windows_X86_64 LibreOffice_project/184fe81b8c8c30d8b5082578aee2fed2ea847c01</meta:generator>
    <meta:document-statistic meta:table-count="0" meta:image-count="0" meta:object-count="0" meta:page-count="6" meta:paragraph-count="141" meta:word-count="1037" meta:character-count="6071" meta:non-whitespace-character-count="5168"/>
  </office:meta>
</office:document-meta>
</file>