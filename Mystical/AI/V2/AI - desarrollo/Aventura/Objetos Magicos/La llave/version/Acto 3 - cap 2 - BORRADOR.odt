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f993"/>
    </style:style>
    <style:style style:name="P2" style:family="paragraph" style:parent-style-name="Text_20_body">
      <style:text-properties officeooo:rsid="000cf993" officeooo:paragraph-rsid="000cf993"/>
    </style:style>
    <style:style style:name="P3" style:family="paragraph" style:parent-style-name="Text_20_body">
      <style:text-properties officeooo:rsid="000cf993" officeooo:paragraph-rsid="0011458c"/>
    </style:style>
    <style:style style:name="P4" style:family="paragraph" style:parent-style-name="Text_20_body">
      <style:text-properties officeooo:rsid="000dde6b" officeooo:paragraph-rsid="0011458c"/>
    </style:style>
    <style:style style:name="P5" style:family="paragraph" style:parent-style-name="Text_20_body">
      <style:text-properties officeooo:paragraph-rsid="000f2d7c"/>
    </style:style>
    <style:style style:name="P6" style:family="paragraph" style:parent-style-name="Text_20_body">
      <style:text-properties officeooo:rsid="000f2d7c" officeooo:paragraph-rsid="001100a6"/>
    </style:style>
    <style:style style:name="P7" style:family="paragraph" style:parent-style-name="Text_20_body">
      <style:text-properties officeooo:paragraph-rsid="001100a6"/>
    </style:style>
    <style:style style:name="P8" style:family="paragraph" style:parent-style-name="Text_20_body">
      <style:text-properties officeooo:rsid="001100a6" officeooo:paragraph-rsid="001100a6"/>
    </style:style>
    <style:style style:name="P9" style:family="paragraph" style:parent-style-name="Text_20_body">
      <style:text-properties officeooo:rsid="0011458c" officeooo:paragraph-rsid="0011458c"/>
    </style:style>
    <style:style style:name="P10" style:family="paragraph" style:parent-style-name="Text_20_body">
      <style:text-properties officeooo:paragraph-rsid="0011458c"/>
    </style:style>
    <style:style style:name="P11" style:family="paragraph" style:parent-style-name="Text_20_body">
      <style:text-properties officeooo:paragraph-rsid="00128437"/>
    </style:style>
    <style:style style:name="P12" style:family="paragraph" style:parent-style-name="Heading_20_3">
      <style:text-properties officeooo:paragraph-rsid="0015eb07"/>
    </style:style>
    <style:style style:name="P13" style:family="paragraph" style:parent-style-name="Standard">
      <style:text-properties officeooo:paragraph-rsid="0015eb07"/>
    </style:style>
    <style:style style:name="P14" style:family="paragraph" style:parent-style-name="Text_20_body">
      <style:text-properties officeooo:rsid="000dde6b" officeooo:paragraph-rsid="000dde6b"/>
    </style:style>
    <style:style style:name="P15" style:family="paragraph" style:parent-style-name="Text_20_body">
      <style:text-properties officeooo:rsid="000dde6b" officeooo:paragraph-rsid="0014d8ee"/>
    </style:style>
    <style:style style:name="P16" style:family="paragraph" style:parent-style-name="Text_20_body">
      <style:text-properties officeooo:rsid="000f2d7c" officeooo:paragraph-rsid="000f2d7c"/>
    </style:style>
    <style:style style:name="P17" style:family="paragraph" style:parent-style-name="Text_20_body">
      <style:text-properties officeooo:rsid="0014d8ee" officeooo:paragraph-rsid="0014d8ee"/>
    </style:style>
    <style:style style:name="P18" style:family="paragraph" style:parent-style-name="Text_20_body">
      <style:text-properties officeooo:paragraph-rsid="001100a6"/>
    </style:style>
    <style:style style:name="P19" style:family="paragraph" style:parent-style-name="Text_20_body">
      <style:text-properties officeooo:paragraph-rsid="0015eb07"/>
    </style:style>
    <style:style style:name="T1" style:family="text">
      <style:text-properties officeooo:rsid="000cf993"/>
    </style:style>
    <style:style style:name="T2" style:family="text">
      <style:text-properties officeooo:rsid="000dde6b"/>
    </style:style>
    <style:style style:name="T3" style:family="text">
      <style:text-properties officeooo:rsid="000f2d7c"/>
    </style:style>
    <style:style style:name="T4" style:family="text">
      <style:text-properties officeooo:rsid="001100a6"/>
    </style:style>
    <style:style style:name="T5" style:family="text">
      <style:text-properties officeooo:rsid="0011458c"/>
    </style:style>
    <style:style style:name="T6" style:family="text">
      <style:text-properties officeooo:rsid="00128437"/>
    </style:style>
    <style:style style:name="T7" style:family="text">
      <style:text-properties officeooo:rsid="0014d8ee"/>
    </style:style>
    <style:style style:name="T8" style:family="text">
      <style:text-properties officeooo:rsid="0015eb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1 - El acantilado</text:h>
      <text:p text:style-name="Text_20_body"><text:span text:style-name="T1">Tras varios</text:span> días <text:span text:style-name="T1">de viaje, finalmente</text:span> alcanzaron el lugar señalado en el mapa.</text:p>
      <text:p text:style-name="P9">Una vasta llanura desierta terminaba abruptamente en un acantilado.</text:p>
      <text:p text:style-name="P1"><text:span text:style-name="T1">N</text:span>o había nada<text:span text:style-name="T5"> mas</text:span><text:span text:style-name="T1"> allí</text:span>.<text:span text:style-name="T5"> </text:span>Sólo un acantilado.</text:p>
      <text:p text:style-name="Text_20_body">Una inmensa pared de roca que <text:span text:style-name="T1">ca</text:span>ía<text:span text:style-name="T1"> en vertical</text:span> cientos de metros hasta el mar.</text:p>
      <text:p text:style-name="Text_20_body"><text:span text:style-name="T5">Y m</text:span>ás allá no existía ninguna otra tierra.</text:p>
      <text:p text:style-name="Text_20_body">Sólo <text:span text:style-name="T1">e</text:span>l <text:span text:style-name="T1">mar y el </text:span>horizonte<text:span text:style-name="T1">.</text:span><text:span text:style-name="T5"> </text:span><text:span text:style-name="T1">E</text:span>l borde mismo del mundo.</text:p>
      <text:p text:style-name="Text_20_body"/>
      <text:p text:style-name="P2"><text:span text:style-name="T5">A</text:span> sus espaldas, la llanura se extendía en todas direcciones.<text:span text:style-name="T5"> </text:span>No había nada mas que explorar. </text:p>
      <text:p text:style-name="P2">Todo estaba a la vista.</text:p>
      <text:p text:style-name="P10">Ambos comprendieron inmediatamente lo que significaba aquel lugar.</text:p>
      <text:p text:style-name="P3">El camino terminaba allí.</text:p>
      <text:p text:style-name="P10">El mapa los había conducido al fin del continente.</text:p>
      <text:p text:style-name="P3">Y nada más.</text:p>
      <text:p text:style-name="P3"/>
      <text:p text:style-name="P10"><text:span text:style-name="T7">Y</text:span>a no les quedaba energía para seguir luchando.<text:span text:style-name="T2"> </text:span></text:p>
      <text:p text:style-name="P4">La realidad les había alcanzado. Era el momento de aceptar la derrota.</text:p>
      <text:p text:style-name="P4"/>
      <text:p text:style-name="Text_20_body"><text:span text:style-name="T5">Permanecieron</text:span> largo rato observ<text:span text:style-name="T6">a</text:span>ndo<text:span text:style-name="T1"> el mar</text:span> en silencio.</text:p>
      <text:p text:style-name="Text_20_body">Ninguno habló.<text:span text:style-name="T5"> </text:span>No era necesario.</text:p>
      <text:p text:style-name="P11"><text:span text:style-name="T5">El tesoro hab</text:span><text:span text:style-name="T2">ía</text:span><text:span text:style-name="T5"> sido siempre una fantas</text:span><text:span text:style-name="T2">ía</text:span><text:span text:style-name="T6">. Ahora estaba claro. El viejo tenia razón.</text:span></text:p>
      <text:p text:style-name="P15">Nohk se tumbo en la hierva mirando el cielo<text:span text:style-name="T7">.</text:span></text:p>
      <text:p text:style-name="P15"><text:span text:style-name="T7">V</text:span>io pasar la nubes, lentas.</text:p>
      <text:p text:style-name="P14">La brisa del mar olía a hierva y sal. Fresca, suave.</text:p>
      <text:p text:style-name="Text_20_body"><text:span text:style-name="T3">C</text:span>erró los ojos<text:span text:style-name="T3"> un momento, y</text:span> escuchó.</text:p>
      <text:p text:style-name="Text_20_body">El sonido del viento.<text:span text:style-name="T3"> Y l</text:span>os gritos lejanos de las aves marinas.</text:p>
      <text:p text:style-name="P16">Las vió volar<text:span text:style-name="T7">. L</text:span>ibres.</text:p>
      <text:p text:style-name="P17">Una de ellas cruzo el cielo justo sobre el. </text:p>
      <text:p text:style-name="P6"><text:span text:style-name="T7">La </text:span><text:span text:style-name="T4">S</text:span>iguió<text:span text:style-name="T4"> </text:span>con la vista <text:span text:style-name="T7">hasta que</text:span> desapareció detras de la pared del acantilado.</text:p>
      <text:p text:style-name="P5"><text:soft-page-break/>Kempht también lo <text:span text:style-name="T3">vió</text:span>.</text:p>
      <text:p text:style-name="P11"><text:span text:style-name="T4">E</text:span>star<text:span text:style-name="T2">ía</text:span><text:span text:style-name="T4"> posiblemente</text:span> anidando <text:span text:style-name="T6">all</text:span><text:span text:style-name="T2">í</text:span><text:span text:style-name="T4">.</text:span></text:p>
      <text:p text:style-name="P8">Se acercó despacio al borde y miró hacia abajo.</text:p>
      <text:p text:style-name="P7"><text:span text:style-name="T4">S</text:span>intió el vertigo de la altura.<text:span text:style-name="T4"> La caída era enorme. A</text:span>bajo el mar golpeaba <text:span text:style-name="T4">con fuerza </text:span>contra las rocas.</text:p>
      <text:p text:style-name="P7"><text:span text:style-name="T4">E</text:span>ntonces lo vió.</text:p>
      <text:p text:style-name="P7">A unos cincuenta metros de distancia.<text:span text:style-name="T4"> </text:span>Pegada a la pared del acantilado.</text:p>
      <text:p text:style-name="P7">Una estrecha cornisa descendía en diagonal hacia algún lugar oculto bajo la roca.</text:p>
      <text:p text:style-name="P8">Dijo:</text:p>
      <text:p text:style-name="P7">—Eh, Nohk...es eso un camino?</text:p>
      <text:p text:style-name="P7"/>
      <text:p text:style-name="Horizontal_20_Line"/>
      <text:p text:style-name="Text_20_body"/>
      <text:h text:style-name="P12" text:outline-level="3">Parte <text:span text:style-name="T8">2</text:span></text:h>
      <text:p text:style-name="Text_20_body"/>
      <text:p text:style-name="Horizontal_20_Line"/>
      <text:p text:style-name="Text_20_body"/>
      <text:p text:style-name="Text_20_body"/>
      <text:h text:style-name="P12" text:outline-level="3">Parte 3 - El destino</text:h>
      <text:p text:style-name="P19">Nohk corrió hacia la puerta.</text:p>
      <text:p text:style-name="P19">La lámpara temblaba en su mano.</text:p>
      <text:p text:style-name="P19">Lo sabía.</text:p>
      <text:p text:style-name="P19">Siempre lo había sabido.</text:p>
      <text:p text:style-name="P19">La bóveda existía.</text:p>
      <text:p text:style-name="P19">Todos estaban equivocados.</text:p>
      <text:p text:style-name="P19">Jorhm estaba equivocado.</text:p>
      <text:p text:style-name="P19">Kempht estaba equivocado.</text:p>
      <text:p text:style-name="P19">Incluso él mismo había estado a punto de rendirse.</text:p>
      <text:p text:style-name="P19">Pero la bóveda existía.</text:p>
      <text:p text:style-name="P19">Estaba allí.</text:p>
      <text:p text:style-name="P19"><text:soft-page-break/>Esperándolo.</text:p>
      <text:p text:style-name="P19">Sin embargo, al acercarse sintió una extraña decepción.</text:p>
      <text:p text:style-name="P19">La puerta era simple.</text:p>
      <text:p text:style-name="P19">No había símbolos.</text:p>
      <text:p text:style-name="P19">No había escudos reales.</text:p>
      <text:p text:style-name="P19">No había inscripciones antiguas.</text:p>
      <text:p text:style-name="P19">Nada.</text:p>
      <text:p text:style-name="P19">Sólo hierro.</text:p>
      <text:p text:style-name="P19">Hierro oscuro y envejecido.</text:p>
      <text:p text:style-name="P19">Y una cerradura.</text:p>
      <text:p text:style-name="P19">Nada más.</text:p>
      <text:p text:style-name="P19">Introdujo la llave.</text:p>
      <text:p text:style-name="P19">Encajó perfectamente.</text:p>
      <text:p text:style-name="P19">Como si hubiera sido fabricada para aquella puerta.</text:p>
      <text:p text:style-name="P19">Como si hubiera permanecido siglos esperando ese instante.</text:p>
      <text:p text:style-name="P19">Nohk giró la llave.</text:p>
      <text:p text:style-name="P19">Un sonido seco resonó en el interior de la roca.</text:p>
      <text:p text:style-name="P19">Un golpe profundo.</text:p>
      <text:p text:style-name="P19">Lejano.</text:p>
      <text:p text:style-name="P19">La cerradura cedió.</text:p>
      <text:p text:style-name="P19">La puerta se abrió lentamente.</text:p>
      <text:p text:style-name="P19">No encontró oro.</text:p>
      <text:p text:style-name="P19">Ni joyas.</text:p>
      <text:p text:style-name="P19">Ni riquezas.</text:p>
      <text:p text:style-name="P19">Sólo oscuridad.</text:p>
      <text:p text:style-name="P19">Levantó la lámpara.</text:p>
      <text:p text:style-name="P19">Y entró.</text:p>
      <text:p text:style-name="P19">La estancia era pequeña.</text:p>
      <text:p text:style-name="P19">Mucho más pequeña de lo que había imaginado.</text:p>
      <text:p text:style-name="P19">Una simple cámara excavada en la roca.</text:p>
      <text:p text:style-name="P19"><text:soft-page-break/>Vacía.</text:p>
      <text:p text:style-name="P19">Al principio creyó que se equivocaba.</text:p>
      <text:p text:style-name="P19">Que la oscuridad ocultaba el tesoro.</text:p>
      <text:p text:style-name="P19">Que debía estar más adentro.</text:p>
      <text:p text:style-name="P19">Entonces vio los esqueletos.</text:p>
      <text:p text:style-name="P19">Tres.</text:p>
      <text:p text:style-name="P19">Tal vez cuatro.</text:p>
      <text:p text:style-name="P19">Resultaba difícil saberlo.</text:p>
      <text:p text:style-name="P19">Yacían cerca de la entrada.</text:p>
      <text:p text:style-name="P19">Desordenados.</text:p>
      <text:p text:style-name="P19">Cubiertos por jirones de ropa podrida.</text:p>
      <text:p text:style-name="P19">Algunos conservaban fragmentos de cuero.</text:p>
      <text:p text:style-name="P19">Otros restos de cinturones.</text:p>
      <text:p text:style-name="P19">Uno de ellos todavía sujetaba algo entre los dedos.</text:p>
      <text:p text:style-name="P19">Una piedra.</text:p>
      <text:p text:style-name="P19">Nada más.</text:p>
      <text:p text:style-name="P19">Nohk se detuvo.</text:p>
      <text:p text:style-name="P19">La visión le produjo una sensación incómoda.</text:p>
      <text:p text:style-name="P19">Aquellos hombres no parecían enterrados allí.</text:p>
      <text:p text:style-name="P19">Parecían haber muerto donde habían caído.</text:p>
      <text:p text:style-name="P19">Como si hubieran intentado alcanzar la puerta.</text:p>
      <text:p text:style-name="P19">O escapar de ella.</text:p>
      <text:p text:style-name="P19">Apartó la idea.</text:p>
      <text:p text:style-name="P19">Continuó avanzando.</text:p>
      <text:p text:style-name="P19">La bóveda no podía terminar allí.</text:p>
      <text:p text:style-name="P19">Tenía que existir algo más.</text:p>
      <text:p text:style-name="P19">Una sala interior.</text:p>
      <text:p text:style-name="P19">Un compartimento oculto.</text:p>
      <text:p text:style-name="P19">Un pasadizo secreto.</text:p>
      <text:p text:style-name="P19">Algo.</text:p>
      <text:p text:style-name="P19"><text:soft-page-break/>Cualquier cosa.</text:p>
      <text:p text:style-name="P19">Pero cuanto más observaba, más evidente resultaba la verdad.</text:p>
      <text:p text:style-name="P19">La cámara estaba vacía.</text:p>
      <text:p text:style-name="P19">Completamente vacía.</text:p>
      <text:p text:style-name="P19">No había cofres.</text:p>
      <text:p text:style-name="P19">No había tesoro.</text:p>
      <text:p text:style-name="P19">No había pasillos.</text:p>
      <text:p text:style-name="P19">No había salidas.</text:p>
      <text:p text:style-name="P19">Sólo roca.</text:p>
      <text:p text:style-name="P19">Roca desnuda.</text:p>
      <text:p text:style-name="P19">Una habitación cerrada.</text:p>
      <text:p text:style-name="P19">Nada más.</text:p>
      <text:p text:style-name="P19">Llegó hasta la pared del fondo.</text:p>
      <text:p text:style-name="P19">La tocó.</text:p>
      <text:p text:style-name="P19">Sólida.</text:p>
      <text:p text:style-name="P19">Fría.</text:p>
      <text:p text:style-name="P19">Sin grietas.</text:p>
      <text:p text:style-name="P19">Sin mecanismos.</text:p>
      <text:p text:style-name="P19">Sin secretos.</text:p>
      <text:p text:style-name="P19">Se volvió lentamente.</text:p>
      <text:p text:style-name="P19">La luz de la lámpara iluminó toda la estancia.</text:p>
      <text:p text:style-name="P19">Y entonces lo comprendió.</text:p>
      <text:p text:style-name="P19">Aquellos esqueletos.</text:p>
      <text:p text:style-name="P19">La habitación vacía.</text:p>
      <text:p text:style-name="P19">La ausencia de tesoro.</text:p>
      <text:p text:style-name="P19">Todo encajaba.</text:p>
      <text:p text:style-name="P19">Aquellos hombres habían venido buscando exactamente lo mismo que él.</text:p>
      <text:p text:style-name="P19">Habían encontrado la puerta.</text:p>
      <text:p text:style-name="P19">Habían abierto la cerradura.</text:p>
      <text:p text:style-name="P19">Habían entrado.</text:p>
      <text:p text:style-name="P19"><text:soft-page-break/>Y jamás habían salido.</text:p>
      <text:p text:style-name="P19">Un ruido metálico interrumpió sus pensamientos.</text:p>
      <text:p text:style-name="P19">La puerta se movió.</text:p>
      <text:p text:style-name="P19">Nohk giró la cabeza.</text:p>
      <text:p text:style-name="P19">Durante una fracción de segundo observó cómo comenzaba a cerrarse.</text:p>
      <text:p text:style-name="P19">Después todo ocurrió demasiado rápido.</text:p>
      <text:p text:style-name="P19">La pesada hoja de hierro golpeó el marco con un estruendo ensordecedor.</text:p>
      <text:p text:style-name="P19">La roca entera pareció temblar.</text:p>
      <text:p text:style-name="P19">La llave salió despedida de la cerradura.</text:p>
      <text:p text:style-name="P19">Rebotó sobre la piedra.</text:p>
      <text:p text:style-name="P19">Y desapareció al otro lado de la puerta.</text:p>
      <text:p text:style-name="P19">Nohk corrió.</text:p>
      <text:p text:style-name="P19">Golpeó el hierro.</text:p>
      <text:p text:style-name="P19">Empujó.</text:p>
      <text:p text:style-name="P19">Intentó abrirla.</text:p>
      <text:p text:style-name="P19">Nada.</text:p>
      <text:p text:style-name="P19">La puerta no se movió.</text:p>
      <text:p text:style-name="P19">Ni un milímetro.</text:p>
      <text:p text:style-name="P19">Empujó otra vez.</text:p>
      <text:p text:style-name="P19">Con más fuerza.</text:p>
      <text:p text:style-name="P19">Después golpeó.</text:p>
      <text:p text:style-name="P19">Después gritó.</text:p>
      <text:p text:style-name="P19">Nada.</text:p>
      <text:p text:style-name="P19">Sólo silencio.</text:p>
      <text:p text:style-name="P19">Un silencio absoluto.</text:p>
      <text:p text:style-name="P19">La lámpara temblaba en su mano.</text:p>
      <text:p text:style-name="P19">Respiraba agitadamente.</text:p>
      <text:p text:style-name="P19">Entonces observó la cerradura.</text:p>
      <text:p text:style-name="P19">No tenía mecanismo interior.</text:p>
      <text:p text:style-name="P19">No había manilla.</text:p>
      <text:p text:style-name="P19"><text:soft-page-break/>No había pestillo.</text:p>
      <text:p text:style-name="P19">No había forma de abrirla desde dentro.</text:p>
      <text:p text:style-name="P19">Nohk permaneció inmóvil.</text:p>
      <text:p text:style-name="P19">Mirando el hierro.</text:p>
      <text:p text:style-name="P19">Sin respirar.</text:p>
      <text:p text:style-name="P19">Y por primera vez desde que encontró la llave comprendió la verdad.</text:p>
      <text:p text:style-name="P19">La bóveda nunca había protegido un tesoro.</text:p>
      <text:p text:style-name="P19">La bóveda era el tesoro.</text:p>
      <text:p text:style-name="P19">La llave no abría una cámara.</text:p>
      <text:p text:style-name="P19">La llave elegía a su próximo ocupante.</text:p>
      <text:p text:style-name="P19">Lentamente volvió la vista hacia los esqueletos.</text:p>
      <text:p text:style-name="P19">La lámpara iluminó los rostros vacíos.</text:p>
      <text:p text:style-name="P19">Las mandíbulas abiertas.</text:p>
      <text:p text:style-name="P19">Las cuencas oscuras.</text:p>
      <text:p text:style-name="P19">Y por primera vez no vio desconocidos.</text:p>
      <text:p text:style-name="P19">Vio compañeros.</text:p>
      <text:p text:style-name="P19">Vio hombres que habían recorrido el mismo camino.</text:p>
      <text:p text:style-name="P19">Que habían seguido las mismas pistas.</text:p>
      <text:p text:style-name="P19">Que habían tomado las mismas decisiones.</text:p>
      <text:p text:style-name="P19">Que habían sacrificado las mismas cosas.</text:p>
      <text:p text:style-name="P19">Y que finalmente habían llegado exactamente al mismo lugar.</text:p>
      <text:p text:style-name="P19">La lámpara comenzó a temblar.</text:p>
      <text:p text:style-name="P19">No por el viento.</text:p>
      <text:p text:style-name="P19">No había viento allí dentro.</text:p>
      <text:p text:style-name="P19">Temblaba porque sus manos temblaban.</text:p>
      <text:p text:style-name="P19">Porque al fin comprendía lo que le esperaba.</text:p>
      <text:p text:style-name="P19">Y porque ya era demasiado tarde.</text:p>
      <text:p text:style-name="P13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7T11:32:13.069000000</meta:creation-date>
    <dc:date>2026-06-30T15:59:07.071000000</dc:date>
    <meta:editing-duration>PT30M32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195" meta:word-count="964" meta:character-count="5774" meta:non-whitespace-character-count="5002"/>
  </office:meta>
</office:document-meta>
</file>