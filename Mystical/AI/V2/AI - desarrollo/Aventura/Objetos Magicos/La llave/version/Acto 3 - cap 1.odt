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201e35"/>
    </style:style>
    <style:style style:name="P2" style:family="paragraph" style:parent-style-name="Heading_20_3">
      <style:text-properties officeooo:rsid="00201e35" officeooo:paragraph-rsid="00201e35"/>
    </style:style>
    <style:style style:name="P3" style:family="paragraph" style:parent-style-name="Heading_20_3">
      <style:text-properties officeooo:paragraph-rsid="0021653f"/>
    </style:style>
    <style:style style:name="P4" style:family="paragraph" style:parent-style-name="Heading_20_3">
      <style:text-properties officeooo:paragraph-rsid="00225b49"/>
    </style:style>
    <style:style style:name="P5" style:family="paragraph" style:parent-style-name="Text_20_body">
      <style:text-properties officeooo:paragraph-rsid="0021653f"/>
    </style:style>
    <style:style style:name="P6" style:family="paragraph" style:parent-style-name="Text_20_body">
      <style:text-properties fo:color="#c9211e" loext:opacity="100%" officeooo:rsid="001b055b" officeooo:paragraph-rsid="00225b49"/>
    </style:style>
    <style:style style:name="P7" style:family="paragraph" style:parent-style-name="Text_20_body">
      <style:text-properties fo:color="#c9211e" loext:opacity="100%" officeooo:paragraph-rsid="00225b49"/>
    </style:style>
    <style:style style:name="P8" style:family="paragraph" style:parent-style-name="Text_20_body">
      <style:text-properties officeooo:rsid="001b055b" officeooo:paragraph-rsid="00225b49"/>
    </style:style>
    <style:style style:name="P9" style:family="paragraph" style:parent-style-name="Text_20_body">
      <style:text-properties officeooo:paragraph-rsid="00225b49"/>
    </style:style>
    <style:style style:name="T1" style:family="text">
      <style:text-properties officeooo:rsid="001ca8dd"/>
    </style:style>
    <style:style style:name="T2" style:family="text">
      <style:text-properties officeooo:rsid="00201e35"/>
    </style:style>
    <style:style style:name="T3" style:family="text">
      <style:text-properties officeooo:rsid="001d67f1"/>
    </style:style>
    <style:style style:name="T4" style:family="text">
      <style:text-properties officeooo:rsid="001eb40a"/>
    </style:style>
    <style:style style:name="T5" style:family="text">
      <style:text-properties officeooo:rsid="001f49b2"/>
    </style:style>
    <style:style style:name="T6" style:family="text">
      <style:text-properties officeooo:rsid="0021653f"/>
    </style:style>
    <style:style style:name="T7" style:family="text">
      <style:text-properties officeooo:rsid="001b055b"/>
    </style:style>
    <style:style style:name="T8" style:family="text">
      <style:text-properties officeooo:rsid="001b33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apítulo 1</text:h>
      <text:h text:style-name="P2" text:outline-level="3">Parte 1 - Financiación</text:h>
      <text:p text:style-name="Standard"/>
      <text:p text:style-name="Text_20_body">El regreso a Oldwood fue muy distinto a la partida.</text:p>
      <text:p text:style-name="Text_20_body"><text:span text:style-name="T1">R</text:span>egresaban en silencio.<text:span text:style-name="T2"> </text:span>Sin caballos.<text:span text:style-name="T1"> </text:span>Sin provisiones.<text:span text:style-name="T2"> </text:span>Sin Ghim.</text:p>
      <text:p text:style-name="Text_20_body">Durante las semanas siguientes cada uno intentó reconstruir su vida.</text:p>
      <text:p text:style-name="Text_20_body">Pero Nohk no podía dejar de pensar en el tesoro.</text:p>
      <text:p text:style-name="Text_20_body">Estudiaba el mapa una y otra vez.<text:span text:style-name="T1"> </text:span>Repasaba cada tramo del viaje.<text:span text:style-name="T1"> </text:span>Cada decisión.<text:span text:style-name="T1"> </text:span>Cada error.</text:p>
      <text:p text:style-name="Text_20_body">Y poco a poco llegó a una conclusión.</text:p>
      <text:p text:style-name="Text_20_body">La pared del puente no era la única forma de alcanzar las tierras altas.</text:p>
      <text:p text:style-name="Text_20_body">Existía otra ruta.<text:span text:style-name="T1"> </text:span>Más larga.<text:span text:style-name="T1"> </text:span>Más dura.<text:span text:style-name="T1"> </text:span>Un rodeo por el Desierto de Piedra.</text:p>
      <text:p text:style-name="Text_20_body">Si conseguían atravesarlo, podrían llegar a la misma región sin necesidad de escalar el acantilado.</text:p>
      <text:p text:style-name="Text_20_body">Cuando estuvo convencido, reunió a sus compañeros en la posada.</text:p>
      <text:p text:style-name="Text_20_body">Extendió el mapa sobre la mesa.</text:p>
      <text:p text:style-name="Text_20_body">—Voy a volver —dijo—. En cuanto consiga el equipo necesario.</text:p>
      <text:p text:style-name="Text_20_body">Nadie respondió de inmediato.</text:p>
      <text:p text:style-name="Text_20_body">Las llamas de la chimenea crepitaban en el silencio.</text:p>
      <text:p text:style-name="Text_20_body">Finalmente habló Tarhk.</text:p>
      <text:p text:style-name="Text_20_body">—Yo no iré.<text:span text:style-name="T1"> </text:span>Ya he perdido bastante.</text:p>
      <text:p text:style-name="Text_20_body">Pohval asintió.</text:p>
      <text:p text:style-name="Text_20_body">—Yo tampoco volveré.</text:p>
      <text:p text:style-name="Text_20_body">Nohk observó a sus dos amigos.</text:p>
      <text:p text:style-name="Text_20_body">Le resultaba imposible entenderlos.<text:span text:style-name="T1"> </text:span>¿Cómo podían abandonar ahora?</text:p>
      <text:p text:style-name="Text_20_body">Pero Tarhk y Pohval ya habían tomado su decisión.</text:p>
      <text:p text:style-name="Text_20_body">Todavía conservaban sus tierras.<text:span text:style-name="T1"> </text:span>Todavía tenían una vida a la que regresar.</text:p>
      <text:p text:style-name="Text_20_body">Y, por primera vez desde que comenzó la expedición, se permitieron considerar una posibilidad que antes habían rechazado.</text:p>
      <text:p text:style-name="Text_20_body">Tal vez no existía ningún tesoro.<text:span text:style-name="T1"> </text:span>Tal vez la leyenda era sólo una leyenda.</text:p>
      <text:p text:style-name="Text_20_body">No estaban dispuestos a sacrificarlo todo por una promesa.</text:p>
      <text:p text:style-name="Text_20_body"><text:soft-page-break/>Cuando se marcharon de la posada, no volvieron a hablar del tesoro.</text:p>
      <text:p text:style-name="Text_20_body">Nohk permaneció sentado junto a Kempht y Johf.</text:p>
      <text:p text:style-name="Text_20_body">Los tres guardaron silencio durante un rato.</text:p>
      <text:p text:style-name="Text_20_body">Finalmente fue Kempht quien habló.</text:p>
      <text:p text:style-name="Text_20_body">—Yo iré.</text:p>
      <text:p text:style-name="Text_20_body">Johf asintió.</text:p>
      <text:p text:style-name="Text_20_body">—Yo también.</text:p>
      <text:p text:style-name="Text_20_body">Ninguno habló de los riesgos.<text:span text:style-name="T1"> </text:span>En sus mentes sólo existía una idea.<text:span text:style-name="T1"> </text:span>El tesoro tenía que ser real.</text:p>
      <text:p text:style-name="Text_20_body">Tenía que serlo.</text:p>
      <text:p text:style-name="Text_20_body">De lo contrario, ¿qué sentido habría tenido todo aquello?</text:p>
      <text:p text:style-name="Text_20_body"><text:span text:style-name="T2">En l</text:span>as semanas siguientes vendieron cuanto poseían.</text:p>
      <text:p text:style-name="Text_20_body">Las tierras.<text:span text:style-name="T1"> </text:span>Las casas.<text:span text:style-name="T1"> </text:span>Los animales.<text:span text:style-name="T1"> </text:span>Las herramientas.</text:p>
      <text:p text:style-name="Text_20_body">Todo.</text:p>
      <text:p text:style-name="Text_20_body">Convirtieron sus vidas enteras en provisiones, cuerdas y equipo de viaje.</text:p>
      <text:p text:style-name="Text_20_body">Cuando terminaron, ya no les quedaba nada en Oldwood.</text:p>
      <text:p text:style-name="Text_20_body">Nada a lo que regresar.<text:span text:style-name="T1"> </text:span>Nada que los esperara si fracasaban.</text:p>
      <text:p text:style-name="Text_20_body">Sus destinos habían quedado unidos al tesoro.</text:p>
      <text:p text:style-name="Text_20_body">Lo encontrarían.</text:p>
      <text:p text:style-name="Text_20_body">O lo perderían todo.</text:p>
      <text:p text:style-name="Standard"/>
      <text:p text:style-name="Standard"/>
      <text:p text:style-name="Horizontal_20_Line"/>
      <text:p text:style-name="Text_20_body"/>
      <text:h text:style-name="P3" text:outline-level="3">Parte 2 - <text:span text:style-name="T6">El robo</text:span></text:h>
      <text:p text:style-name="P5"/>
      <text:p text:style-name="P5">Durante los días siguientes apenas descansaron.</text:p>
      <text:p text:style-name="P5">La compra de los caballos, las provisiones y el equipo había ocupado cada hora de luz. Cuando no estaban negociando con comerciantes, estaban revisando herramientas, reforzando cuerdas o calculando la cantidad de comida necesaria para el viaje.</text:p>
      <text:p text:style-name="P5">Todo debía estar preparado.</text:p>
      <text:p text:style-name="P5">Todo debía funcionar.</text:p>
      <text:p text:style-name="P5"><text:soft-page-break/>La nueva expedición no podía fracasar.</text:p>
      <text:p text:style-name="P5">No después de todo lo que habían sacrificado.</text:p>
      <text:p text:style-name="P5">La tarde anterior a la partida, los tres hombres se reunieron en el patio de una vieja posada situada junto al camino principal.</text:p>
      <text:p text:style-name="P5">La carreta estaba lista.<text:span text:style-name="T3"> </text:span>Dos caballos fuertes tiraban de ella.</text:p>
      <text:p text:style-name="P5">Los sacos de grano estaban bien sujetos.<text:span text:style-name="T3"> </text:span>Las herramientas ocupaban varios cajones de madera.</text:p>
      <text:p text:style-name="P5">Las cuerdas habían sido enrolladas cuidadosamente.</text:p>
      <text:p text:style-name="P5">Al caer la noche guardaron la llave junto al resto de los suministros.</text:p>
      <text:p text:style-name="P5">Partirían al amanecer.</text:p>
      <text:p text:style-name="P5"/>
      <text:p text:style-name="P5"><text:span text:style-name="T3">A mitad de la noche </text:span>Nohk despertó sobresaltado.</text:p>
      <text:p text:style-name="P5">La habitación estaba oscura.<text:span text:style-name="T3"> </text:span>El amanecer todavía parecía lejano.</text:p>
      <text:p text:style-name="P5">Entonces volvió a escucharlo.</text:p>
      <text:p text:style-name="P5">Caballos.<text:span text:style-name="T3"> </text:span>El sonido de cascos golpeando el suelo.</text:p>
      <text:p text:style-name="P5">Lejos.<text:span text:style-name="T3"> </text:span>Alejándose.</text:p>
      <text:p text:style-name="P5">Se incorporó de inmediato.<text:span text:style-name="T3"> </text:span>Una sensación desagradable recorrió su espalda.<text:span text:style-name="T3"> </text:span></text:p>
      <text:p text:style-name="P5">Salió al exterior.</text:p>
      <text:p text:style-name="P5">Y se quedó paralizado.</text:p>
      <text:p text:style-name="P5">La carreta había desaparecido.<text:span text:style-name="T3"> </text:span>Los caballos también.</text:p>
      <text:p text:style-name="P5">El espacio donde habían pasado la noche estaba vacío.</text:p>
      <text:p text:style-name="P5"><text:span text:style-name="T3">S</text:span>intió un golpe de frío en el estómago.</text:p>
      <text:p text:style-name="P5"/>
      <text:p text:style-name="P5">La llave no estaba.</text:p>
      <text:p text:style-name="P5">Entonces una realidad brutal se abrió paso.</text:p>
      <text:p text:style-name="P5">Johf.</text:p>
      <text:p text:style-name="P5">Johf había desaparecido.</text:p>
      <text:p text:style-name="P5">Despertó a Kempht de un tirón.</text:p>
      <text:p text:style-name="P5">—¡Levántate!</text:p>
      <text:p text:style-name="P5">Johf había robado la llave<text:span text:style-name="T4">, </text:span>la expedición<text:span text:style-name="T4">, t</text:span>odo lo que poseían.</text:p>
      <text:p text:style-name="P5">No podían correr detrás de una carreta a pie.</text:p>
      <text:p text:style-name="P5"><text:soft-page-break/>—Necesitamos caballos.</text:p>
      <text:p text:style-name="P5">Kempht comprendió inmediatamente.</text:p>
      <text:p text:style-name="P5">—El viejo Hompt tiene dos.<text:span text:style-name="T4"> El lo comprendera. <text:s/>Se los devolveremos.</text:span></text:p>
      <text:p text:style-name="P5"><text:span text:style-name="T4">E</text:span>n sus mentes la situación ya había sido resuelta.</text:p>
      <text:p text:style-name="P5">Johf les había robado.<text:span text:style-name="T4"> </text:span>Y ellos tenían derecho a recuperar lo que era suyo.</text:p>
      <text:p text:style-name="P5">Todo lo demás era secundario.</text:p>
      <text:p text:style-name="P5">—<text:span text:style-name="T4">Se los devolveremos c</text:span>uando recuperemos la carreta<text:span text:style-name="T4">. </text:span>Hompt lo entenderá.</text:p>
      <text:p text:style-name="P5">Ninguno de los dos pareció advertir la facilidad con la que acababan de justificar un robo.</text:p>
      <text:p text:style-name="P5">Ni siquiera se consideraban ladrones.</text:p>
      <text:p text:style-name="P5">Al contrario.<text:span text:style-name="T5"> </text:span>Se sentían víctimas.<text:span text:style-name="T5"> </text:span>Hombres obligados por las circunstancias.</text:p>
      <text:p text:style-name="P5">Hombres que simplemente recuperaban lo que les pertenecía.</text:p>
      <text:p text:style-name="P5">La decisión quedó tomada.</text:p>
      <text:p text:style-name="P5">Minutos después abandonaban el establo con los dos caballos.</text:p>
      <text:p text:style-name="P5">El pueblo continuaba dormido.<text:span text:style-name="T5"> </text:span>Las casas permanecían oscuras.<text:span text:style-name="T5"> </text:span></text:p>
      <text:p text:style-name="P5">Nadie vio partir a los dos jinetes.</text:p>
      <text:p text:style-name="P5">A todo galope atravesaron las calles vacías y dejaron atrás Oldwood.</text:p>
      <text:p text:style-name="P5">Cabalgaban impulsados por la ira.</text:p>
      <text:p text:style-name="P5">Frente a ellos sólo existía una única dirección.</text:p>
      <text:p text:style-name="P5">Johf.</text:p>
      <text:p text:style-name="P5">Sabían exactamente adónde se dirigía.</text:p>
      <text:p text:style-name="P5"/>
      <text:p text:style-name="Horizontal_20_Line"/>
      <text:p text:style-name="Text_20_body"/>
      <text:h text:style-name="P4" text:outline-level="3">Parte 3 - El desierto de piedra</text:h>
      <text:p text:style-name="P9"/>
      <text:p text:style-name="P9"/>
      <text:p text:style-name="P9">Dos días después encontraron el Desierto de Piedra.</text:p>
      <text:p text:style-name="P9">Ninguno de los dos estaba preparado para aquella visión.</text:p>
      <text:p text:style-name="P9">Hasta entonces ambos habían imaginado un terreno árido, difícil de atravesar, pero el paisaje que apareció ante ellos superaba cualquier expectativa.</text:p>
      <text:p text:style-name="P9"><text:soft-page-break/>El mundo parecía haber muerto allí.</text:p>
      <text:p text:style-name="P9">Hasta donde alcanzaba la vista no existía ni un árbol.</text:p>
      <text:p text:style-name="P9">Ni una sombra.</text:p>
      <text:p text:style-name="P9">Ni una sola brizna de hierba.</text:p>
      <text:p text:style-name="P9">Sólo roca.</text:p>
      <text:p text:style-name="P9">Un océano interminable de piedra agrietada que se extendía en todas direcciones bajo un cielo blanco y abrasador.</text:p>
      <text:p text:style-name="P9">Grandes murallas de roca rojiza emergían del suelo formando cañones profundos y laberintos naturales.</text:p>
      <text:p text:style-name="P9">Algunas alcanzaban alturas imposibles.</text:p>
      <text:p text:style-name="P9">Otras aparecían erosionadas por siglos de viento y calor.</text:p>
      <text:p text:style-name="P9">Todo parecía inmóvil.</text:p>
      <text:p text:style-name="P9">Antiguo.</text:p>
      <text:p text:style-name="P9">Hostil.</text:p>
      <text:p text:style-name="P9">Como si la propia tierra rechazara la presencia de los hombres.</text:p>
      <text:p text:style-name="P9">El sol golpeaba con una violencia insoportable.</text:p>
      <text:p text:style-name="P9">La luz rebotaba sobre las piedras y ascendía nuevamente desde el suelo.</text:p>
      <text:p text:style-name="P9">El calor llegaba desde arriba y desde abajo al mismo tiempo.</text:p>
      <text:p text:style-name="P9">Cada respiración parecía secar un poco más la garganta.</text:p>
      <text:p text:style-name="P9">Cada paso levantaba polvo caliente.</text:p>
      <text:p text:style-name="P9">Cada hora consumía las fuerzas que les quedaban.</text:p>
      <text:p text:style-name="P9">Nohk y Kempht habían cabalgado sin descanso desde que abandonaron Oldwood.</text:p>
      <text:p text:style-name="P9">Apenas habían dormido.</text:p>
      <text:p text:style-name="P9">Apenas habían comido.</text:p>
      <text:p text:style-name="P9">No llevaban provisiones.</text:p>
      <text:p text:style-name="P9">No llevaban agua.</text:p>
      <text:p text:style-name="P9">No llevaban nada.</text:p>
      <text:p text:style-name="P9">Sólo la desesperación de quienes lo habían perdido todo.</text:p>
      <text:p text:style-name="P9">Sus labios estaban agrietados.</text:p>
      <text:p text:style-name="P9">Sus rostros cubiertos de polvo.</text:p>
      <text:p text:style-name="P9">Los ojos hundidos por el cansancio.</text:p>
      <text:p text:style-name="P9"><text:soft-page-break/>Varias veces durante el trayecto estuvieron a punto de detenerse.</text:p>
      <text:p text:style-name="P9">Pero cada vez que la idea aparecía, recordaban a Johf.</text:p>
      <text:p text:style-name="P9">Recordaban la llave.</text:p>
      <text:p text:style-name="P9">Recordaban el carro.</text:p>
      <text:p text:style-name="P9">Recordaban las tierras vendidas.</text:p>
      <text:p text:style-name="P9">Las monedas gastadas.</text:p>
      <text:p text:style-name="P9">La casa perdida.</text:p>
      <text:p text:style-name="P9">Y continuaban avanzando.</text:p>
      <text:p text:style-name="P9">No podían detenerse.</text:p>
      <text:p text:style-name="P9">No después de todo aquello.</text:p>
      <text:p text:style-name="P9">La tarde del segundo día, cuando el calor comenzaba a disminuir ligeramente, Kempht divisó algo en la distancia.</text:p>
      <text:p text:style-name="P9">Al principio creyó que era un espejismo.</text:p>
      <text:p text:style-name="P9">Las ondas de aire caliente deformaban el horizonte.</text:p>
      <text:p text:style-name="P9">Pero poco a poco la imagen se volvió más clara.</text:p>
      <text:p text:style-name="P9">Una carreta.</text:p>
      <text:p text:style-name="P9">Dos caballos.</text:p>
      <text:p text:style-name="P9">Un pequeño refugio improvisado junto a una pared rocosa.</text:p>
      <text:p text:style-name="P9">—Allí —murmuró.</text:p>
      <text:p text:style-name="P9">Nohk levantó la vista.</text:p>
      <text:p text:style-name="P9">Y la vio.</text:p>
      <text:p text:style-name="P9">Incluso desde aquella distancia reconoció inmediatamente el carro.</text:p>
      <text:p text:style-name="P9">Una extraña mezcla de alivio y rabia recorrió su cuerpo.</text:p>
      <text:p text:style-name="P9">Lo habían encontrado.</text:p>
      <text:p text:style-name="P9">Johf estaba allí.</text:p>
      <text:p text:style-name="P9">Después de dos días de persecución.</text:p>
      <text:p text:style-name="P9">Después de dos días de hambre y sed.</text:p>
      <text:p text:style-name="P9">Después de dos días cabalgando casi sin descanso.</text:p>
      <text:p text:style-name="P9">Por fin lo habían alcanzado.</text:p>
      <text:p text:style-name="P9">Descendieron de los caballos y buscaron refugio entre las rocas.</text:p>
      <text:p text:style-name="P9"><text:soft-page-break/>Desde allí podían observar el campamento sin ser vistos.</text:p>
      <text:p text:style-name="P9">Johf parecía cómodo.</text:p>
      <text:p text:style-name="P9">Había colocado una lona para protegerse del sol.</text:p>
      <text:p text:style-name="P9">Los caballos descansaban.</text:p>
      <text:p text:style-name="P9">Las provisiones permanecían apiladas junto a la carreta.</text:p>
      <text:p text:style-name="P9">Incluso desde lejos podían distinguir los barriles de agua.</text:p>
      <text:p text:style-name="P9">Aquella visión despertó una ira silenciosa.</text:p>
      <text:p text:style-name="P9">Mientras ellos atravesaban el desierto con la garganta ardiendo, Johf viajaba protegido.</text:p>
      <text:p text:style-name="P9">Mientras ellos sufrían, él descansaba.</text:p>
      <text:p text:style-name="P9">Mientras ellos arriesgaban la vida, él disfrutaba de todo aquello que les había robado.</text:p>
      <text:p text:style-name="P9">Esperaron.</text:p>
      <text:p text:style-name="P9">No hablaron demasiado.</text:p>
      <text:p text:style-name="P9">No era necesario.</text:p>
      <text:p text:style-name="P9">La decisión parecía evidente.</text:p>
      <text:p text:style-name="P9">No podían enfrentarse a él durante el día.</text:p>
      <text:p text:style-name="P9">Estaban agotados.</text:p>
      <text:p text:style-name="P9">Y Johf todavía conservaba todas las ventajas.</text:p>
      <text:p text:style-name="P9">Así que aguardaron.</text:p>
      <text:p text:style-name="P9">Horas interminables.</text:p>
      <text:p text:style-name="P9">Ocultos entre las piedras.</text:p>
      <text:p text:style-name="P9">Observando.</text:p>
      <text:p text:style-name="P9">El sol descendió lentamente.</text:p>
      <text:p text:style-name="P9">Las sombras comenzaron a crecer.</text:p>
      <text:p text:style-name="P9">El calor se transformó en un frío desagradable.</text:p>
      <text:p text:style-name="P9">Y finalmente llegó la noche.</text:p>
      <text:p text:style-name="P9">La oscuridad envolvió el desierto.</text:p>
      <text:p text:style-name="P9">El silencio se volvió absoluto.</text:p>
      <text:p text:style-name="P9">Sólo permanecía el viento recorriendo los cañones.</text:p>
      <text:p text:style-name="P9">Esperaron todavía un poco más.</text:p>
      <text:p text:style-name="P9">Hasta que estuvieron seguros.</text:p>
      <text:p text:style-name="P9"><text:soft-page-break/>Hasta que Johf quedó profundamente dormido.</text:p>
      <text:p text:style-name="P9">Entonces avanzaron.</text:p>
      <text:p text:style-name="P9">Lentamente.</text:p>
      <text:p text:style-name="P9">Sin hacer ruido.</text:p>
      <text:p text:style-name="P7"/>
      <text:p text:style-name="P7"/>
      <text:p text:style-name="P9">Todo estaba allí.</text:p>
      <text:p text:style-name="P9">Las provisiones.</text:p>
      <text:p text:style-name="P9">Las herramientas.</text:p>
      <text:p text:style-name="P9">Las cuerdas.</text:p>
      <text:p text:style-name="P9">Los barriles de agua.</text:p>
      <text:p text:style-name="P9">Y la llave.</text:p>
      <text:p text:style-name="P7"/>
      <text:p text:style-name="P9">Nohk la tomó inmediatamente.</text:p>
      <text:p text:style-name="P9">La sostuvo durante un instante.</text:p>
      <text:p text:style-name="P9">Y sintió una satisfacción oscura.</text:p>
      <text:p text:style-name="P7"/>
      <text:p text:style-name="P9">Desataron los caballos.</text:p>
      <text:p text:style-name="P9">Tomaron las riendas.</text:p>
      <text:p text:style-name="P9">Y comenzaron a alejarse.</text:p>
      <text:p text:style-name="P9">Sin ruido.</text:p>
      <text:p text:style-name="P9">Sin prisas.</text:p>
      <text:p text:style-name="P7"/>
      <text:p text:style-name="P9"><text:s/>una voz rompió el silencio.</text:p>
      <text:p text:style-name="P9">—¡No!</text:p>
      <text:p text:style-name="P9">Johf.</text:p>
      <text:p text:style-name="P9">Había despertado.</text:p>
      <text:p text:style-name="P9">—¡Esperad!</text:p>
      <text:p text:style-name="P9">Su voz resonó en la oscuridad.</text:p>
      <text:p text:style-name="P9"><text:span text:style-name="T7">C</text:span>orría detrás de ellos.</text:p>
      <text:p text:style-name="P9"><text:soft-page-break/>—¡No me dejéis aquí!</text:p>
      <text:p text:style-name="P9">Poco a poco la distancia aumentó.</text:p>
      <text:p text:style-name="P8">Johf <text:span text:style-name="T8">ya no pudo perseguirlos.</text:span></text:p>
      <text:p text:style-name="P8"><text:span text:style-name="T8">Y </text:span>vio como la carreta se alejaba dejandolo a merced del desierto.</text:p>
      <text:p text:style-name="P8">Sin consideracion, sin discusiones, sin perdon, sin piedad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9T18:39:11.534000000</meta:creation-date>
    <dc:date>2026-06-29T20:40:23.461000000</dc:date>
    <meta:editing-duration>PT1H10M8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20" meta:word-count="1456" meta:character-count="9060" meta:non-whitespace-character-count="7821"/>
  </office:meta>
</office:document-meta>
</file>