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b1dc7"/>
    </style:style>
    <style:style style:name="P2" style:family="paragraph" style:parent-style-name="Heading_20_2">
      <style:text-properties officeooo:paragraph-rsid="000b1dc7"/>
    </style:style>
    <style:style style:name="P3" style:family="paragraph" style:parent-style-name="Heading_20_2">
      <style:text-properties officeooo:rsid="000b1dc7" officeooo:paragraph-rsid="000b1dc7"/>
    </style:style>
    <style:style style:name="P4" style:family="paragraph" style:parent-style-name="Text_20_body">
      <style:text-properties officeooo:paragraph-rsid="0013d63f"/>
    </style:style>
    <style:style style:name="P5" style:family="paragraph" style:parent-style-name="Text_20_body">
      <style:text-properties officeooo:rsid="0013d63f" officeooo:paragraph-rsid="0013d63f"/>
    </style:style>
    <style:style style:name="P6" style:family="paragraph" style:parent-style-name="Text_20_body">
      <style:text-properties officeooo:rsid="0015a697" officeooo:paragraph-rsid="0015a697"/>
    </style:style>
    <style:style style:name="P7" style:family="paragraph" style:parent-style-name="Text_20_body">
      <style:text-properties fo:color="#c9211e" loext:opacity="100%" officeooo:rsid="0015a697" officeooo:paragraph-rsid="0015a697"/>
    </style:style>
    <style:style style:name="T1" style:family="text">
      <style:text-properties officeooo:rsid="00117d44"/>
    </style:style>
    <style:style style:name="T2" style:family="text">
      <style:text-properties officeooo:rsid="0013d63f"/>
    </style:style>
    <style:style style:name="T3" style:family="text">
      <style:text-properties officeooo:rsid="0015a6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Cap 3</text:h>
      <text:h text:style-name="P2" text:outline-level="2">Parte 1 - Decepción: el tesoro no está en la cueva</text:h>
      <text:p text:style-name="P1"/>
      <text:p text:style-name="Text_20_body">La euforia del descubrimiento duró poco.</text:p>
      <text:p text:style-name="Text_20_body">Durante las primeras horas todos se movían por la cueva con energía renovada.</text:p>
      <text:p text:style-name="Text_20_body">Las lámparas iluminaban las paredes de roca mientras avanzaban por galerías estrechas, pasadizos sinuosos y enormes cámaras subterráneas que parecían perderse en la oscuridad.</text:p>
      <text:p text:style-name="Text_20_body">A cada nuevo corredor esperaban encontrar una puerta.</text:p>
      <text:p text:style-name="Text_20_body">A cada recodo imaginaban descubrir una cámara secreta.</text:p>
      <text:p text:style-name="Text_20_body">A cada sombra proyectada por las lámparas creían distinguir algo construido por manos humanas.</text:p>
      <text:p text:style-name="Text_20_body">Pero no encontraban nada.</text:p>
      <text:p text:style-name="Text_20_body">Sólo roca.<text:span text:style-name="T1"> </text:span>Roca húmeda<text:span text:style-name="T1">, </text:span>antigua<text:span text:style-name="T1">, </text:span>interminable.</text:p>
      <text:p text:style-name="Text_20_body">La cueva resultó ser mucho más grande de lo que habían imaginado.</text:p>
      <text:p text:style-name="Text_20_body">Desde la cámara principal partían numerosos túneles que se dividían una y otra vez.</text:p>
      <text:p text:style-name="Text_20_body">Muy pronto comprendieron que explorar aquel lugar sería una tarea lenta.</text:p>
      <text:p text:style-name="Text_20_body">Y peligrosa.</text:p>
      <text:p text:style-name="Text_20_body">Perderse allí dentro parecía alarmantemente fácil.</text:p>
      <text:p text:style-name="Text_20_body"><text:span text:style-name="T1">Y</text:span> los días comenzaron a pasar.</text:p>
      <text:p text:style-name="Text_20_body">La oscuridad constante empezó a afectar el ánimo del grupo.</text:p>
      <text:p text:style-name="Text_20_body">El tiempo parecía inmóvil.</text:p>
      <text:p text:style-name="Text_20_body">¿Y si la cueva sólo era una cueva?</text:p>
      <text:p text:style-name="Text_20_body"/>
      <text:p text:style-name="Text_20_body"><text:span text:style-name="T1">Despues de varios dias de busqueda, f</text:span>inalmente Tarhk <text:span text:style-name="T3">se di</text:span>ó<text:span text:style-name="T3"> por vencido</text:span>.</text:p>
      <text:p text:style-name="Text_20_body">Su voz resonó con fuerza en la oscuridad.</text:p>
      <text:p text:style-name="Text_20_body">—No hay nada en esta cueva.<text:span text:style-name="T1"> </text:span>El tesoro no existe.</text:p>
      <text:p text:style-name="Text_20_body"/>
      <text:p text:style-name="Text_20_body"/>
      <text:p text:style-name="Text_20_body"/>
      <text:p text:style-name="Text_20_body"/>
      <text:p text:style-name="Horizontal_20_Line"><text:soft-page-break/></text:p>
      <text:p text:style-name="Text_20_body"/>
      <text:h text:style-name="Heading_20_2" text:outline-level="2">Parte 2 - La deserción</text:h>
      <text:p text:style-name="Text_20_body"/>
      <text:p text:style-name="P7">(rehacer completamente)</text:p>
      <text:p text:style-name="P6"/>
      <text:p text:style-name="P6"/>
      <text:p text:style-name="P4">—Es hora de volver.</text:p>
      <text:p text:style-name="P5">Partire por la manana. </text:p>
      <text:p text:style-name="P4"/>
      <text:p text:style-name="P4"/>
      <text:p text:style-name="P4"/>
      <text:p text:style-name="Text_20_body">Las palabras de Tarhk permanecieron suspendidas en la oscuridad mucho después de haber sido pronunciadas.</text:p>
      <text:p text:style-name="Text_20_body">Nadie respondió.</text:p>
      <text:p text:style-name="Text_20_body">Las lámparas proyectaban sombras temblorosas sobre las paredes de roca.</text:p>
      <text:p text:style-name="Text_20_body">El silencio de la cueva parecía absorber cualquier intento de conversación.</text:p>
      <text:p text:style-name="Text_20_body">Todos sabían que Tarhk tenía razón.</text:p>
      <text:p text:style-name="Text_20_body">Y todos sabían también que admitirlo significaba aceptar algo mucho peor.</text:p>
      <text:p text:style-name="Text_20_body">Aceptar que habían llegado hasta allí para nada.</text:p>
      <text:p text:style-name="Text_20_body">Aceptar que Ghim había muerto persiguiendo una ilusión.</text:p>
      <text:p text:style-name="Text_20_body">Aceptar que todo había sido un error.</text:p>
      <text:p text:style-name="Text_20_body">Finalmente Tarhk volvió a hablar.</text:p>
      <text:p text:style-name="Text_20_body">Esta vez con voz firme.</text:p>
      <text:p text:style-name="Text_20_body">Como quien ha tomado una decisión irrevocable.</text:p>
      <text:p text:style-name="Text_20_body">—Es hora de volver.</text:p>
      <text:p text:style-name="Text_20_body">Nadie necesitó preguntar qué quería decir.</text:p>
      <text:p text:style-name="Text_20_body">Había dejado de hablar de la cueva.</text:p>
      <text:p text:style-name="Text_20_body">Había dejado de hablar del tesoro.</text:p>
      <text:p text:style-name="Text_20_body"><text:soft-page-break/>Estaba hablando de la expedición.</text:p>
      <text:p text:style-name="Text_20_body">De todo aquello.</text:p>
      <text:p text:style-name="Text_20_body">De la búsqueda completa.</text:p>
      <text:p text:style-name="Text_20_body">Tarhk se incorporó lentamente.</text:p>
      <text:p text:style-name="Text_20_body">Miró a cada uno de sus compañeros.</text:p>
      <text:p text:style-name="Text_20_body">—Hemos perdido la carreta.</text:p>
      <text:p text:style-name="Text_20_body">Los caballos.</text:p>
      <text:p text:style-name="Text_20_body">Las provisiones.</text:p>
      <text:p text:style-name="Text_20_body">Ghim ha muerto.</text:p>
      <text:p text:style-name="Text_20_body">Llevamos semanas persiguiendo una leyenda.</text:p>
      <text:p text:style-name="Text_20_body">Y no hemos encontrado nada.</text:p>
      <text:p text:style-name="Text_20_body">Su voz resonó entre las paredes de piedra.</text:p>
      <text:p text:style-name="Text_20_body">—Ya basta.</text:p>
      <text:p text:style-name="Text_20_body">Nadie discutió sus palabras.</text:p>
      <text:p text:style-name="Text_20_body">Porque eran ciertas.</text:p>
      <text:p text:style-name="Text_20_body">Todas.</text:p>
      <text:p text:style-name="Text_20_body">El silencio volvió a extenderse.</text:p>
      <text:p text:style-name="Text_20_body">Entonces Nohk levantó la cabeza.</text:p>
      <text:p text:style-name="Text_20_body">Respondió inmediatamente.</text:p>
      <text:p text:style-name="Text_20_body">Como si llevara horas preparándose para aquella conversación.</text:p>
      <text:p text:style-name="Text_20_body">—Esto no ha terminado.</text:p>
      <text:p text:style-name="Text_20_body">Tarhk lo observó.</text:p>
      <text:p text:style-name="Text_20_body">Nohk continuó.</text:p>
      <text:p text:style-name="Text_20_body">—No para mí.</text:p>
      <text:p text:style-name="Text_20_body">Su voz sonó más dura de lo habitual.</text:p>
      <text:p text:style-name="Text_20_body">Más intensa.</text:p>
      <text:p text:style-name="Text_20_body">—He invertido demasiado para dejarlo ahora.</text:p>
      <text:p text:style-name="Text_20_body">Aquellas palabras hicieron que varios levantaran la mirada.</text:p>
      <text:p text:style-name="Text_20_body">Nohk se puso en pie.</text:p>
      <text:p text:style-name="Text_20_body">Comenzó a caminar lentamente alrededor de la pequeña zona iluminada por las lámparas.</text:p>
      <text:p text:style-name="Text_20_body"><text:soft-page-break/>—Vendimos nuestros animales.</text:p>
      <text:p text:style-name="Text_20_body">Entregamos nuestro dinero.</text:p>
      <text:p text:style-name="Text_20_body">Atravesamos media región.</text:p>
      <text:p text:style-name="Text_20_body">Sobrevivimos a la tormenta.</text:p>
      <text:p text:style-name="Text_20_body">Perdimos todo el equipo.</text:p>
      <text:p text:style-name="Text_20_body">Escalamos aquella maldita montaña.</text:p>
      <text:p text:style-name="Text_20_body">Su voz fue ganando fuerza.</text:p>
      <text:p text:style-name="Text_20_body">—¿Y ahora vamos a regresar porque una cueva está vacía?</text:p>
      <text:p text:style-name="Text_20_body">Nadie respondió.</text:p>
      <text:p text:style-name="Text_20_body">—No.</text:p>
      <text:p text:style-name="Text_20_body">Yo no voy a hacerlo.</text:p>
      <text:p text:style-name="Text_20_body">Se volvió hacia ellos.</text:p>
      <text:p text:style-name="Text_20_body">Sus ojos brillaban bajo la luz amarillenta de las lámparas.</text:p>
      <text:p text:style-name="Text_20_body">—El tesoro existe.</text:p>
      <text:p text:style-name="Text_20_body">Estoy seguro.</text:p>
      <text:p text:style-name="Text_20_body">Tal vez esta cueva no era el final.</text:p>
      <text:p text:style-name="Text_20_body">Tal vez interpretamos algo mal.</text:p>
      <text:p text:style-name="Text_20_body">Tal vez todavía no hemos encontrado la entrada correcta.</text:p>
      <text:p text:style-name="Text_20_body">Pero existe.</text:p>
      <text:p text:style-name="Text_20_body">Y voy a encontrarlo.</text:p>
      <text:p text:style-name="Text_20_body">El grupo guardó silencio.</text:p>
      <text:p text:style-name="Text_20_body">La tensión era evidente.</text:p>
      <text:p text:style-name="Text_20_body">Cada hombre parecía atrapado entre dos futuros distintos.</text:p>
      <text:p text:style-name="Text_20_body">Uno implicaba regresar.</text:p>
      <text:p text:style-name="Text_20_body">El otro continuar.</text:p>
      <text:p text:style-name="Text_20_body">Ninguno resultaba sencillo.</text:p>
      <text:p text:style-name="Text_20_body">Tarhk negó lentamente con la cabeza.</text:p>
      <text:p text:style-name="Text_20_body">—Estás dejando que la codicia decida por ti.</text:p>
      <text:p text:style-name="Text_20_body">—No.</text:p>
      <text:p text:style-name="Text_20_body">—Sí.</text:p>
      <text:p text:style-name="Text_20_body"><text:soft-page-break/>Tarhk señaló la oscuridad que los rodeaba.</text:p>
      <text:p text:style-name="Text_20_body">—Mira dónde estamos.</text:p>
      <text:p text:style-name="Text_20_body">Mira lo que hemos perdido.</text:p>
      <text:p text:style-name="Text_20_body">¿Y qué tenemos a cambio?</text:p>
      <text:p text:style-name="Text_20_body">Nada.</text:p>
      <text:p text:style-name="Text_20_body">Absolutamente nada.</text:p>
      <text:p text:style-name="Text_20_body">Por primera vez la conversación comenzaba a parecer una discusión.</text:p>
      <text:p text:style-name="Text_20_body">Nohk dio un paso hacia él.</text:p>
      <text:p text:style-name="Text_20_body">—Tenemos una pista.</text:p>
      <text:p text:style-name="Text_20_body">—Tenemos una montaña llena de piedra.</text:p>
      <text:p text:style-name="Text_20_body">—Tenemos un mapa.</text:p>
      <text:p text:style-name="Text_20_body">—Tenemos una leyenda.</text:p>
      <text:p text:style-name="Text_20_body">—Tenemos una llave.</text:p>
      <text:p text:style-name="Text_20_body">—Tenemos una historia para niños.</text:p>
      <text:p text:style-name="Text_20_body">La respuesta fue inmediata.</text:p>
      <text:p text:style-name="Text_20_body">Violenta.</text:p>
      <text:p text:style-name="Text_20_body">Cargada de frustración acumulada.</text:p>
      <text:p text:style-name="Text_20_body">Ambos hombres se observaron durante varios segundos.</text:p>
      <text:p text:style-name="Text_20_body">El resto permanecía inmóvil.</text:p>
      <text:p text:style-name="Text_20_body">Incapaz de intervenir.</text:p>
      <text:p text:style-name="Text_20_body">Porque el problema era mucho más profundo que una simple discusión.</text:p>
      <text:p text:style-name="Text_20_body">Era una elección.</text:p>
      <text:p text:style-name="Text_20_body">Y cada uno de ellos debía tomarla.</text:p>
      <text:p text:style-name="Text_20_body">Finalmente Nohk se volvió hacia los demás.</text:p>
      <text:p text:style-name="Text_20_body">Comprendió que no podía convencer a Tarhk.</text:p>
      <text:p text:style-name="Text_20_body">Debía convencer al grupo.</text:p>
      <text:p text:style-name="Text_20_body">—¿Quién está conmigo?</text:p>
      <text:p text:style-name="Text_20_body">La pregunta cayó sobre ellos como una piedra.</text:p>
      <text:p text:style-name="Text_20_body">Nadie respondió inmediatamente.</text:p>
      <text:p text:style-name="Text_20_body">Kempht observó el suelo.</text:p>
      <text:p text:style-name="Text_20_body"><text:soft-page-break/>Johf miró las sombras de la cueva.</text:p>
      <text:p text:style-name="Text_20_body">Pohval parecía dividido.</text:p>
      <text:p text:style-name="Text_20_body"><text:span text:style-name="T2">h</text:span>Todos entendían lo que significaba responder.</text:p>
      <text:p text:style-name="Text_20_body">No era una opinión.</text:p>
      <text:p text:style-name="Text_20_body">Era un compromiso.</text:p>
      <text:p text:style-name="Text_20_body">Una promesa.</text:p>
      <text:p text:style-name="Text_20_body">Un riesgo.</text:p>
      <text:p text:style-name="Text_20_body">El silencio se prolongó durante varios segundos.</text:p>
      <text:p text:style-name="Text_20_body">Hasta que finalmente Kempht habló.</text:p>
      <text:p text:style-name="Text_20_body">Su voz sonó insegura.</text:p>
      <text:p text:style-name="Text_20_body">Pero clara.</text:p>
      <text:p text:style-name="Text_20_body">—Yo continúo.</text:p>
      <text:p text:style-name="Text_20_body">Nohk asintió.</text:p>
      <text:p text:style-name="Text_20_body">Aquello parecía suficiente para romper la inmovilidad.</text:p>
      <text:p text:style-name="Text_20_body">Un instante después Johf levantó la cabeza.</text:p>
      <text:p text:style-name="Text_20_body">—Yo también.</text:p>
      <text:p text:style-name="Text_20_body">Tarhk cerró los ojos durante un momento.</text:p>
      <text:p text:style-name="Text_20_body">Como si aquella respuesta confirmara algo que ya sospechaba.</text:p>
      <text:p text:style-name="Text_20_body">Entonces todas las miradas se dirigieron hacia Pohval.</text:p>
      <text:p text:style-name="Text_20_body">El último indeciso.</text:p>
      <text:p text:style-name="Text_20_body">El hombre respiró profundamente.</text:p>
      <text:p text:style-name="Text_20_body">Durante unos segundos pareció debatirse consigo mismo.</text:p>
      <text:p text:style-name="Text_20_body">Finalmente negó con la cabeza.</text:p>
      <text:p text:style-name="Text_20_body">—No.</text:p>
      <text:p text:style-name="Text_20_body">Nadie dijo nada.</text:p>
      <text:p text:style-name="Text_20_body">—Es demasiado arriesgado.</text:p>
      <text:p text:style-name="Text_20_body">Ya hemos perdido suficiente.</text:p>
      <text:p text:style-name="Text_20_body">Todavía estamos a tiempo de recuperar nuestras vidas.</text:p>
      <text:p text:style-name="Text_20_body">Miró a Nohk.</text:p>
      <text:p text:style-name="Text_20_body">—Creo que es hora de volver.</text:p>
      <text:p text:style-name="Text_20_body"><text:soft-page-break/>Las palabras dolieron.</text:p>
      <text:p text:style-name="Text_20_body">No porque fueran agresivas.</text:p>
      <text:p text:style-name="Text_20_body">Sino porque eran sinceras.</text:p>
      <text:p text:style-name="Text_20_body">Porque todos sabían que podían ser ciertas.</text:p>
      <text:p text:style-name="Text_20_body">La decisión quedó tomada.</text:p>
      <text:p text:style-name="Text_20_body">Tres continuarían.</text:p>
      <text:p text:style-name="Text_20_body">Dos regresarían.</text:p>
      <text:p text:style-name="Text_20_body">El grupo que había abandonado Oldwood unido comenzaba a romperse.</text:p>
      <text:p text:style-name="Text_20_body">Aquella noche casi nadie durmió.</text:p>
      <text:p text:style-name="Text_20_body">Al amanecer prepararon sus cosas en silencio.</text:p>
      <text:p text:style-name="Text_20_body">No hubo discusiones.</text:p>
      <text:p text:style-name="Text_20_body">No hubo intentos de convencer a nadie.</text:p>
      <text:p text:style-name="Text_20_body">Las decisiones ya estaban tomadas.</text:p>
      <text:p text:style-name="Text_20_body">Tarhk y Pohval se ajustaron las mochilas.</text:p>
      <text:p text:style-name="Text_20_body">Intercambiaron algunas palabras breves con sus antiguos compañeros.</text:p>
      <text:p text:style-name="Text_20_body">Después se dirigieron hacia la salida de la cueva.</text:p>
      <text:p text:style-name="Text_20_body">Nohk observó cómo se alejaban.</text:p>
      <text:p text:style-name="Text_20_body">Sintió una extraña mezcla de emociones.</text:p>
      <text:p text:style-name="Text_20_body">Tristeza.</text:p>
      <text:p text:style-name="Text_20_body">Duda.</text:p>
      <text:p text:style-name="Text_20_body">Ira.</text:p>
      <text:p text:style-name="Text_20_body">Y algo más.</text:p>
      <text:p text:style-name="Text_20_body">Algo que no quería admitir.</text:p>
      <text:p text:style-name="Text_20_body">Envidia.</text:p>
      <text:p text:style-name="Text_20_body">Porque durante un instante deseó marcharse con ellos.</text:p>
      <text:p text:style-name="Text_20_body">Abandonarlo todo.</text:p>
      <text:p text:style-name="Text_20_body">Regresar a casa.</text:p>
      <text:p text:style-name="Text_20_body">Recuperar la vida que había dejado atrás.</text:p>
      <text:p text:style-name="Text_20_body">Pero el pensamiento desapareció rápidamente.</text:p>
      <text:p text:style-name="Text_20_body">La llave seguía allí.</text:p>
      <text:p text:style-name="Text_20_body"><text:soft-page-break/>El mapa seguía allí.</text:p>
      <text:p text:style-name="Text_20_body">Y el tesoro también.</text:p>
      <text:p text:style-name="Text_20_body">Tenía que estarlo.</text:p>
      <text:p text:style-name="Text_20_body">Porque si no existía, entonces todo lo que habían sacrificado carecía de sentido.</text:p>
      <text:p text:style-name="Text_20_body">Y Nohk todavía no estaba preparado para aceptar una verdad semejante.</text:p>
      <text:p text:style-name="Text_20_body">Mientras Tarhk y Pohval desaparecían en la oscuridad del túnel, los tres hombres que permanecían en la cueva continuaron observando la entrada durante largo tiempo.</text:p>
      <text:p text:style-name="Text_20_body">Sin saber que acababan de despedirse por última vez.</text:p>
      <text:p text:style-name="Text_20_body"/>
      <text:p text:style-name="Horizontal_20_Line"/>
      <text:p text:style-name="Text_20_body"/>
      <text:h text:style-name="Heading_20_2" text:outline-level="2">Parte 3 - La revelación de un nuevo mapa</text:h>
      <text:p text:style-name="Text_20_body">La marcha de Tarhk y Pohval dejó un vacío difícil de ignorar.</text:p>
      <text:p text:style-name="Text_20_body">La cueva parecía más grande ahora.</text:p>
      <text:p text:style-name="Text_20_body">Más oscura.</text:p>
      <text:p text:style-name="Text_20_body">Más silenciosa.</text:p>
      <text:p text:style-name="Text_20_body">Durante semanas habían tomado todas las decisiones entre seis hombres.</text:p>
      <text:p text:style-name="Text_20_body">Después entre cinco.</text:p>
      <text:p text:style-name="Text_20_body">Ahora sólo quedaban tres.</text:p>
      <text:p text:style-name="Text_20_body">Nohk.</text:p>
      <text:p text:style-name="Text_20_body">Kempht.</text:p>
      <text:p text:style-name="Text_20_body">Johf.</text:p>
      <text:p text:style-name="Text_20_body">Y por primera vez desde el inicio de la expedición comenzaron a parecer un grupo demasiado pequeño para una tarea tan grande.</text:p>
      <text:p text:style-name="Text_20_body">La exploración continuó.</text:p>
      <text:p text:style-name="Text_20_body">Pero avanzaba lentamente.</text:p>
      <text:p text:style-name="Text_20_body">Cada galería debía ser revisada con cuidado.</text:p>
      <text:p text:style-name="Text_20_body">Cada bifurcación obligaba a detenerse.</text:p>
      <text:p text:style-name="Text_20_body">Cada tramo de cuerda tenía que ser colocado por menos manos.</text:p>
      <text:p text:style-name="Text_20_body">El trabajo era más pesado.</text:p>
      <text:p text:style-name="Text_20_body"><text:soft-page-break/>Más lento.</text:p>
      <text:p text:style-name="Text_20_body">Más agotador.</text:p>
      <text:p text:style-name="Text_20_body">Los días siguieron transcurriendo en la oscuridad.</text:p>
      <text:p text:style-name="Text_20_body">Un túnel llevaba a otro.</text:p>
      <text:p text:style-name="Text_20_body">Una cámara desembocaba en otra cámara.</text:p>
      <text:p text:style-name="Text_20_body">Y siempre ocurría lo mismo.</text:p>
      <text:p text:style-name="Text_20_body">Nada.</text:p>
      <text:p text:style-name="Text_20_body">Absolutamente nada.</text:p>
      <text:p text:style-name="Text_20_body">Poco a poco la esperanza comenzó a desgastarse nuevamente.</text:p>
      <text:p text:style-name="Text_20_body">No desapareció de golpe.</text:p>
      <text:p text:style-name="Text_20_body">Fue algo gradual.</text:p>
      <text:p text:style-name="Text_20_body">Silencioso.</text:p>
      <text:p text:style-name="Text_20_body">Como una llama que se consume lentamente.</text:p>
      <text:p text:style-name="Text_20_body">Nohk intentaba mantener la confianza.</text:p>
      <text:p text:style-name="Text_20_body">Seguía hablando del tesoro.</text:p>
      <text:p text:style-name="Text_20_body">Seguía hablando de la bóveda.</text:p>
      <text:p text:style-name="Text_20_body">Seguía hablando de la puerta de hierro.</text:p>
      <text:p text:style-name="Text_20_body">Pero incluso él comenzaba a sentir el peso de las dudas.</text:p>
      <text:p text:style-name="Text_20_body">Algunas noches permanecía despierto observando la luz de las lámparas.</text:p>
      <text:p text:style-name="Text_20_body">Escuchando el eco distante del agua entre las galerías.</text:p>
      <text:p text:style-name="Text_20_body">Preguntándose cuánto tiempo más continuarían buscando.</text:p>
      <text:p text:style-name="Text_20_body">Una semana.</text:p>
      <text:p text:style-name="Text_20_body">¿Un mes?</text:p>
      <text:p text:style-name="Text_20_body">¿Un año?</text:p>
      <text:p text:style-name="Text_20_body">La cueva parecía interminable.</text:p>
      <text:p text:style-name="Text_20_body">Y por primera vez comenzó a plantearse una pregunta que hasta entonces había evitado cuidadosamente.</text:p>
      <text:p text:style-name="Text_20_body">¿Y si Tarhk tenía razón?</text:p>
      <text:p text:style-name="Text_20_body">Intentó apartar aquel pensamiento.</text:p>
      <text:p text:style-name="Text_20_body">Pero regresaba una y otra vez.</text:p>
      <text:p text:style-name="Text_20_body"><text:soft-page-break/>Como una sombra.</text:p>
      <text:p text:style-name="Text_20_body">Como una grieta que comenzaba a abrirse lentamente en sus convicciones.</text:p>
      <text:p text:style-name="Text_20_body">La mañana del descubrimiento comenzó como cualquier otra.</text:p>
      <text:p text:style-name="Text_20_body">Los tres hombres avanzaban por una galería estrecha que descendía suavemente hacia las profundidades.</text:p>
      <text:p text:style-name="Text_20_body">Nada la diferenciaba de los cientos de pasillos que ya habían explorado.</text:p>
      <text:p text:style-name="Text_20_body">La roca era la misma.</text:p>
      <text:p text:style-name="Text_20_body">La oscuridad era la misma.</text:p>
      <text:p text:style-name="Text_20_body">La sensación de agotamiento también.</text:p>
      <text:p text:style-name="Text_20_body">Johf caminaba en cabeza.</text:p>
      <text:p text:style-name="Text_20_body">La antorcha iluminaba apenas unos metros delante de él.</text:p>
      <text:p text:style-name="Text_20_body">De repente se detuvo.</text:p>
      <text:p text:style-name="Text_20_body">Nohk estuvo a punto de chocar contra su espalda.</text:p>
      <text:p text:style-name="Text_20_body">—¿Qué ocurre?</text:p>
      <text:p text:style-name="Text_20_body">Johf no respondió inmediatamente.</text:p>
      <text:p text:style-name="Text_20_body">Acercó la llama a una pared.</text:p>
      <text:p text:style-name="Text_20_body">—Venid.</text:p>
      <text:p text:style-name="Text_20_body">Los otros dos avanzaron.</text:p>
      <text:p text:style-name="Text_20_body">Al principio no vieron nada.</text:p>
      <text:p text:style-name="Text_20_body">Sólo roca.</text:p>
      <text:p text:style-name="Text_20_body">Después distinguieron unas marcas.</text:p>
      <text:p text:style-name="Text_20_body">Arañazos.</text:p>
      <text:p text:style-name="Text_20_body">Líneas.</text:p>
      <text:p text:style-name="Text_20_body">Pequeñas incisiones grabadas sobre la piedra.</text:p>
      <text:p text:style-name="Text_20_body">No parecían naturales.</text:p>
      <text:p text:style-name="Text_20_body">Nohk sintió que el corazón comenzaba a acelerarse.</text:p>
      <text:p text:style-name="Text_20_body">Continuaron avanzando.</text:p>
      <text:p text:style-name="Text_20_body">La galería se estrechó.</text:p>
      <text:p text:style-name="Text_20_body">Las marcas aparecieron nuevamente.</text:p>
      <text:p text:style-name="Text_20_body">Esta vez eran más evidentes.</text:p>
      <text:p text:style-name="Text_20_body"><text:soft-page-break/>Más elaboradas.</text:p>
      <text:p text:style-name="Text_20_body">Símbolos.</text:p>
      <text:p text:style-name="Text_20_body">Figuras geométricas.</text:p>
      <text:p text:style-name="Text_20_body">Signos que claramente habían sido realizados por manos humanas.</text:p>
      <text:p text:style-name="Text_20_body">Los tres hombres se miraron.</text:p>
      <text:p text:style-name="Text_20_body">Nadie dijo nada.</text:p>
      <text:p text:style-name="Text_20_body">No hacía falta.</text:p>
      <text:p text:style-name="Text_20_body">Todos estaban pensando lo mismo.</text:p>
      <text:p text:style-name="Text_20_body">Alguien había estado allí antes.</text:p>
      <text:p text:style-name="Text_20_body">Alguien conocía aquella galería.</text:p>
      <text:p text:style-name="Text_20_body">La siguieron casi corriendo.</text:p>
      <text:p text:style-name="Text_20_body">La fatiga desapareció.</text:p>
      <text:p text:style-name="Text_20_body">La duda desapareció.</text:p>
      <text:p text:style-name="Text_20_body">Incluso el hambre desapareció.</text:p>
      <text:p text:style-name="Text_20_body">La adrenalina ocupó su lugar.</text:p>
      <text:p text:style-name="Text_20_body">Más adelante apareció un nuevo grabado.</text:p>
      <text:p text:style-name="Text_20_body">Mucho más grande.</text:p>
      <text:p text:style-name="Text_20_body">Mucho más claro.</text:p>
      <text:p text:style-name="Text_20_body">La luz de las antorchas iluminó la figura.</text:p>
      <text:p text:style-name="Text_20_body">Y los tres quedaron inmóviles.</text:p>
      <text:p text:style-name="Text_20_body">Era una llave.</text:p>
      <text:p text:style-name="Text_20_body">La misma llave.</text:p>
      <text:p text:style-name="Text_20_body">El mismo diseño.</text:p>
      <text:p text:style-name="Text_20_body">El mismo escudo real.</text:p>
      <text:p text:style-name="Text_20_body">La misma piedra incrustada representada en el dibujo.</text:p>
      <text:p text:style-name="Text_20_body">No podía existir ninguna duda.</text:p>
      <text:p text:style-name="Text_20_body">Nohk sintió un escalofrío recorrerle la espalda.</text:p>
      <text:p text:style-name="Text_20_body">Un escalofrío tan intenso que lo obligó a apoyarse contra la pared.</text:p>
      <text:p text:style-name="Text_20_body">Durante unos segundos fue incapaz de hablar.</text:p>
      <text:p text:style-name="Text_20_body">La llave.</text:p>
      <text:p text:style-name="Text_20_body"><text:soft-page-break/>Allí.</text:p>
      <text:p text:style-name="Text_20_body">Grabada en la roca.</text:p>
      <text:p text:style-name="Text_20_body">En el interior de una galería oculta.</text:p>
      <text:p text:style-name="Text_20_body">En una montaña perdida.</text:p>
      <text:p text:style-name="Text_20_body">Era imposible.</text:p>
      <text:p text:style-name="Text_20_body">Y precisamente por eso era real.</text:p>
      <text:p text:style-name="Text_20_body">Sólo entonces comprendió algo inquietante.</text:p>
      <text:p text:style-name="Text_20_body">Había perdido la esperanza.</text:p>
      <text:p text:style-name="Text_20_body">No lo había admitido.</text:p>
      <text:p text:style-name="Text_20_body">Ni siquiera ante sí mismo.</text:p>
      <text:p text:style-name="Text_20_body">Pero había ocurrido.</text:p>
      <text:p text:style-name="Text_20_body">Alguna parte de él ya había empezado a creer que Tarhk estaba en lo cierto.</text:p>
      <text:p text:style-name="Text_20_body">Alguna parte de él ya había empezado a aceptar que el tesoro no existía.</text:p>
      <text:p text:style-name="Text_20_body">De lo contrario aquel hallazgo no le habría parecido tan extraordinario.</text:p>
      <text:p text:style-name="Text_20_body">Tan imposible.</text:p>
      <text:p text:style-name="Text_20_body">Tan inesperado.</text:p>
      <text:p text:style-name="Text_20_body">Sus propios pensamientos habían comenzado a traicionarlo.</text:p>
      <text:p text:style-name="Text_20_body">Habían comenzado a abandonar la búsqueda antes que él.</text:p>
      <text:p text:style-name="Text_20_body">Pero ahora todo aquello quedaba atrás.</text:p>
      <text:p text:style-name="Text_20_body">La prueba estaba frente a sus ojos.</text:p>
      <text:p text:style-name="Text_20_body">La leyenda era real.</text:p>
      <text:p text:style-name="Text_20_body">La llave era real.</text:p>
      <text:p text:style-name="Text_20_body">Y si ambas cosas eran reales, también debía existir la bóveda.</text:p>
      <text:p text:style-name="Text_20_body">Nohk sintió regresar toda la convicción que había perdido.</text:p>
      <text:p text:style-name="Text_20_body">Con más fuerza que nunca.</text:p>
      <text:p text:style-name="Text_20_body">—Está cerca —susurró.</text:p>
      <text:p text:style-name="Text_20_body">Kempht sonrió por primera vez en muchos días.</text:p>
      <text:p text:style-name="Text_20_body">Johf asintió.</text:p>
      <text:p text:style-name="Text_20_body">Y los tres comenzaron a avanzar por la galería a toda velocidad.</text:p>
      <text:p text:style-name="Text_20_body">La emoción había sustituido a la prudencia.</text:p>
      <text:p text:style-name="Text_20_body"><text:soft-page-break/>Ya no caminaban.</text:p>
      <text:p text:style-name="Text_20_body">Prácticamente corrían.</text:p>
      <text:p text:style-name="Text_20_body">Convencidos de que el final de la búsqueda se encontraba unos metros más adelante.</text:p>
      <text:p text:style-name="Text_20_body">La galería continuó durante varios minutos.</text:p>
      <text:p text:style-name="Text_20_body">Después giró bruscamente.</text:p>
      <text:p text:style-name="Text_20_body">Y terminó.</text:p>
      <text:p text:style-name="Text_20_body">Simplemente terminó.</text:p>
      <text:p text:style-name="Text_20_body">Una pared de roca cerraba el paso.</text:p>
      <text:p text:style-name="Text_20_body">No había puerta.</text:p>
      <text:p text:style-name="Text_20_body">No había cámara secreta.</text:p>
      <text:p text:style-name="Text_20_body">No había tesoro.</text:p>
      <text:p text:style-name="Text_20_body">Nada.</text:p>
      <text:p text:style-name="Text_20_body">Los tres quedaron inmóviles.</text:p>
      <text:p text:style-name="Text_20_body">Confundidos.</text:p>
      <text:p text:style-name="Text_20_body">Incapaces de comprender.</text:p>
      <text:p text:style-name="Text_20_body">La llave estaba allí.</text:p>
      <text:p text:style-name="Text_20_body">La prueba estaba allí.</text:p>
      <text:p text:style-name="Text_20_body">Entonces, ¿dónde estaba la bóveda?</text:p>
      <text:p text:style-name="Text_20_body">Nohk examinó la pared.</text:p>
      <text:p text:style-name="Text_20_body">Johf recorrió el suelo con la luz de su antorcha.</text:p>
      <text:p text:style-name="Text_20_body">Kempht observó las rocas cercanas.</text:p>
      <text:p text:style-name="Text_20_body">Y de pronto habló.</text:p>
      <text:p text:style-name="Text_20_body">Su voz resonó suavemente en la oscuridad.</text:p>
      <text:p text:style-name="Text_20_body">—Observad esto.</text:p>
      <text:p text:style-name="Text_20_body">Los otros se volvieron.</text:p>
      <text:p text:style-name="Text_20_body">Kempht acercó la antorcha a una sección de la pared que había permanecido oculta entre las sombras.</text:p>
      <text:p text:style-name="Text_20_body">La luz reveló una serie de líneas grabadas cuidadosamente sobre la piedra.</text:p>
      <text:p text:style-name="Text_20_body">Líneas.</text:p>
      <text:p text:style-name="Text_20_body">Símbolos.</text:p>
      <text:p text:style-name="Text_20_body">Marcas.</text:p>
      <text:p text:style-name="Text_20_body"><text:soft-page-break/>No era una inscripción.</text:p>
      <text:p text:style-name="Text_20_body">No era un dibujo.</text:p>
      <text:p text:style-name="Text_20_body">Era un mapa.</text:p>
      <text:p text:style-name="Text_20_body">Y señalaba un lugar completamente distinto.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5T20:46:45.649000000</meta:creation-date>
    <dc:date>2026-06-29T15:59:14.679000000</dc:date>
    <meta:editing-duration>PT43M17S</meta:editing-duration>
    <meta:editing-cycles>9</meta:editing-cycles>
    <meta:generator>LibreOffice/7.3.5.2$Windows_X86_64 LibreOffice_project/184fe81b8c8c30d8b5082578aee2fed2ea847c01</meta:generator>
    <meta:document-statistic meta:table-count="0" meta:image-count="0" meta:object-count="0" meta:page-count="14" meta:paragraph-count="369" meta:word-count="1971" meta:character-count="12203" meta:non-whitespace-character-count="10600"/>
  </office:meta>
</office:document-meta>
</file>