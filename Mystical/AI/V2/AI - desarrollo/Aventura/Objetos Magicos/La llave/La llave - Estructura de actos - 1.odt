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Creo que ahora sí tenemos una estructura muy sólida, porque el coste hundido deja de ser una idea oculta y pasa a formar parte de las decisiones de los personajes.</text:p>
      <text:p text:style-name="Text_20_body">Además, hacer que el protagonista venda sus propiedades temprano es un gran acierto narrativo. El lector verá el error mucho antes que el personaje. Cuando más adelante diga "no puedo abandonar ahora", el lector recordará exactamente cuándo cruzó ese punto de no retorno.</text:p>
      <text:p text:style-name="Text_20_body">Yo organizaría el cuento en <text:span text:style-name="Strong_20_Emphasis">seis actos</text:span>:</text:p>
      <text:p text:style-name="Horizontal_20_Line"/>
      <text:h text:style-name="Heading_20_1" text:outline-level="1">Acto I - La llave de hierro</text:h>
      <text:h text:style-name="Heading_20_3" text:outline-level="3">Propósito</text:h>
      <text:p text:style-name="Text_20_body">Presentar el misterio y el grupo de amigos.</text:p>
      <text:h text:style-name="Heading_20_3" text:outline-level="3">Acontecimientos</text:h>
      <text:list xml:id="list1781258839" text:style-name="L1">
        <text:list-item>
          <text:p text:style-name="P1">En un pueblo medieval, un joven campesino encuentra una extraña llave de hierro.</text:p>
        </text:list-item>
        <text:list-item>
          <text:p text:style-name="P1">Se la muestra a sus cuatro amigos más cercanos.</text:p>
        </text:list-item>
        <text:list-item>
          <text:p text:style-name="P1">Un anciano del pueblo reconoce el símbolo grabado en la llave y relata la leyenda de una puerta que guarda una fortuna inimaginable.</text:p>
        </text:list-item>
        <text:list-item>
          <text:p text:style-name="P1">Los amigos se entusiasman.</text:p>
        </text:list-item>
        <text:list-item>
          <text:p text:style-name="P1">Deciden buscar la puerta juntos.</text:p>
        </text:list-item>
        <text:list-item>
          <text:p text:style-name="P1">La búsqueda comienza como una aventura.</text:p>
        </text:list-item>
      </text:list>
      <text:h text:style-name="Heading_20_3" text:outline-level="3">Final del acto</text:h>
      <text:p text:style-name="Text_20_body">El protagonista vende parte de sus tierras para financiar viajes e investigaciones.</text:p>
      <text:p text:style-name="Text_20_body">Todavía parece una decisión razonable.</text:p>
      <text:p text:style-name="Horizontal_20_Line"/>
      <text:h text:style-name="Heading_20_1" text:outline-level="1">Acto II - El precio de la esperanza</text:h>
      <text:h text:style-name="Heading_20_3" text:outline-level="3">Propósito</text:h>
      <text:p text:style-name="Text_20_body">Mostrar las primeras pérdidas.</text:p>
      <text:h text:style-name="Heading_20_3" text:outline-level="3">Acontecimientos</text:h>
      <text:list xml:id="list412048525" text:style-name="L2">
        <text:list-item>
          <text:p text:style-name="P2">Los amigos recorren aldeas, monasterios y ruinas.</text:p>
        </text:list-item>
        <text:list-item>
          <text:p text:style-name="P2">Los meses se convierten en años.</text:p>
        </text:list-item>
        <text:list-item>
          <text:p text:style-name="P2"><text:soft-page-break/>Gastan dinero.</text:p>
        </text:list-item>
        <text:list-item>
          <text:p text:style-name="P2">Pierden oportunidades.</text:p>
        </text:list-item>
        <text:list-item>
          <text:p text:style-name="P2">Otros habitantes prosperan mientras ellos siguen buscando.</text:p>
        </text:list-item>
        <text:list-item>
          <text:p text:style-name="P2">Uno de los amigos empieza a dudar.</text:p>
        </text:list-item>
      </text:list>
      <text:p text:style-name="Text_20_body">Durante una discusión dice:</text:p>
      <text:p text:style-name="Quotations">"Quizá la puerta nunca existió."</text:p>
      <text:p text:style-name="Text_20_body">El protagonista responde:</text:p>
      <text:p text:style-name="Quotations">"No puedo abandonar ahora. Ya he entregado demasiado para detenerme."</text:p>
      <text:p text:style-name="Text_20_body">Esta es la primera aparición explícita del coste hundido.</text:p>
      <text:h text:style-name="Heading_20_3" text:outline-level="3">Final del acto</text:h>
      <text:p text:style-name="Text_20_body">Encuentran una pista importante que parece demostrar que la leyenda es real.</text:p>
      <text:p text:style-name="Text_20_body">La esperanza renace.</text:p>
      <text:p text:style-name="Horizontal_20_Line"/>
      <text:h text:style-name="Heading_20_1" text:outline-level="1">Acto III - La primera muerte</text:h>
      <text:h text:style-name="Heading_20_3" text:outline-level="3">Propósito</text:h>
      <text:p text:style-name="Text_20_body">Cruzar el punto de no retorno.</text:p>
      <text:h text:style-name="Heading_20_3" text:outline-level="3">Acontecimientos</text:h>
      <text:list xml:id="list1638072534" text:style-name="L3">
        <text:list-item>
          <text:p text:style-name="P3">El grupo sigue una nueva pista hacia una región peligrosa.</text:p>
        </text:list-item>
        <text:list-item>
          <text:p text:style-name="P3">Durante una expedición, uno de los amigos muere en un accidente.</text:p>
        </text:list-item>
        <text:list-item>
          <text:p text:style-name="P3">El grupo queda conmocionado.</text:p>
        </text:list-item>
        <text:list-item>
          <text:p text:style-name="P3">Durante el funeral surge la posibilidad de abandonar.</text:p>
        </text:list-item>
      </text:list>
      <text:p text:style-name="Text_20_body">Pero ocurre lo contrario.</text:p>
      <text:p text:style-name="Text_20_body">La muerte se convierte en una razón para continuar.</text:p>
      <text:p text:style-name="Text_20_body">Ahora necesitan que el tesoro exista.</text:p>
      <text:h text:style-name="Heading_20_3" text:outline-level="3">Final del acto</text:h>
      <text:p text:style-name="Text_20_body">Descubren otra pista relacionada con la puerta.</text:p>
      <text:p text:style-name="Horizontal_20_Line"/>
      <text:h text:style-name="Heading_20_1" text:outline-level="1"><text:soft-page-break/>Acto IV - La ruptura</text:h>
      <text:h text:style-name="Heading_20_3" text:outline-level="3">Propósito</text:h>
      <text:p text:style-name="Text_20_body">Destruir la amistad.</text:p>
      <text:h text:style-name="Heading_20_3" text:outline-level="3">Acontecimientos</text:h>
      <text:list xml:id="list378520877" text:style-name="L4">
        <text:list-item>
          <text:p text:style-name="P4">La búsqueda continúa durante años.</text:p>
        </text:list-item>
        <text:list-item>
          <text:p text:style-name="P4">El protagonista vende el resto de sus propiedades.</text:p>
        </text:list-item>
        <text:list-item>
          <text:p text:style-name="P4">Los amigos empiezan a ocultarse información.</text:p>
        </text:list-item>
        <text:list-item>
          <text:p text:style-name="P4">Surgen sospechas.</text:p>
        </text:list-item>
        <text:list-item>
          <text:p text:style-name="P4">Aparecen traiciones.</text:p>
        </text:list-item>
        <text:list-item>
          <text:p text:style-name="P4">Algunos intentan apropiarse de la llave.</text:p>
        </text:list-item>
        <text:list-item>
          <text:p text:style-name="P4">La amistad desaparece.</text:p>
        </text:list-item>
      </text:list>
      <text:p text:style-name="Text_20_body">Ya no son compañeros.</text:p>
      <text:p text:style-name="Text_20_body">Son competidores.</text:p>
      <text:h text:style-name="Heading_20_3" text:outline-level="3">Final del acto</text:h>
      <text:p text:style-name="Text_20_body">Otro amigo muere.</text:p>
      <text:p text:style-name="Text_20_body">Quizá como consecuencia indirecta de una traición.</text:p>
      <text:p text:style-name="Horizontal_20_Line"/>
      <text:h text:style-name="Heading_20_1" text:outline-level="1">Acto V - El último buscador</text:h>
      <text:h text:style-name="Heading_20_3" text:outline-level="3">Propósito</text:h>
      <text:p text:style-name="Text_20_body">Mostrar la obsesión absoluta.</text:p>
      <text:h text:style-name="Heading_20_3" text:outline-level="3">Acontecimientos</text:h>
      <text:list xml:id="list2466698779" text:style-name="L5">
        <text:list-item>
          <text:p text:style-name="P5">Los años siguen pasando.</text:p>
        </text:list-item>
        <text:list-item>
          <text:p text:style-name="P5">Los restantes amigos desaparecen uno a uno.</text:p>
        </text:list-item>
        <text:list-item>
          <text:p text:style-name="P5">Mueren, se enfrentan o se abandonan mutuamente.</text:p>
        </text:list-item>
        <text:list-item>
          <text:p text:style-name="P5">Finalmente sólo queda el protagonista.</text:p>
        </text:list-item>
        <text:list-item>
          <text:p text:style-name="P5">Ya es un hombre envejecido.</text:p>
        </text:list-item>
        <text:list-item>
          <text:p text:style-name="P5">Está arruinado.</text:p>
        </text:list-item>
        <text:list-item>
          <text:p text:style-name="P5"><text:soft-page-break/>Ha perdido amigos, familia, tierras y juventud.</text:p>
        </text:list-item>
      </text:list>
      <text:p text:style-name="Text_20_body">En varios momentos encuentra indicios de que la leyenda podría ser falsa.</text:p>
      <text:p text:style-name="Text_20_body">Pero ya no puede detenerse.</text:p>
      <text:p text:style-name="Text_20_body">Necesita justificar toda una vida de sacrificios.</text:p>
      <text:h text:style-name="Heading_20_3" text:outline-level="3">Final del acto</text:h>
      <text:p text:style-name="Text_20_body">Encuentra la puerta.</text:p>
      <text:p text:style-name="Horizontal_20_Line"/>
      <text:h text:style-name="Heading_20_1" text:outline-level="1">Acto VI - La habitación vacía</text:h>
      <text:h text:style-name="Heading_20_3" text:outline-level="3">Propósito</text:h>
      <text:p text:style-name="Text_20_body">Revelar la maldición.</text:p>
      <text:h text:style-name="Heading_20_3" text:outline-level="3">Acontecimientos</text:h>
      <text:list xml:id="list2151480152" text:style-name="L6">
        <text:list-item>
          <text:p text:style-name="P6">La llave abre perfectamente la puerta.</text:p>
        </text:list-item>
        <text:list-item>
          <text:p text:style-name="P6">El protagonista entra con una lámpara.</text:p>
        </text:list-item>
        <text:list-item>
          <text:p text:style-name="P6">La habitación está vacía.</text:p>
        </text:list-item>
        <text:list-item>
          <text:p text:style-name="P6">No hay tesoro.</text:p>
        </text:list-item>
        <text:list-item>
          <text:p text:style-name="P6">No hay secretos.</text:p>
        </text:list-item>
        <text:list-item>
          <text:p text:style-name="P6">No hay explicación.</text:p>
        </text:list-item>
      </text:list>
      <text:p text:style-name="Text_20_body">Sólo piedra desnuda.</text:p>
      <text:p text:style-name="Text_20_body">Entonces la puerta se cierra.</text:p>
      <text:p text:style-name="Text_20_body">La llave cae al exterior.</text:p>
      <text:p text:style-name="Text_20_body">El hombre queda atrapado.</text:p>
      <text:p text:style-name="Text_20_body">Golpea la puerta.</text:p>
      <text:p text:style-name="Text_20_body">Grita.</text:p>
      <text:p text:style-name="Text_20_body">Nadie responde.</text:p>
      <text:p text:style-name="Text_20_body">Un cuervo toma la llave y se aleja.</text:p>
      <text:p text:style-name="Text_20_body">Horas después la deja caer en un camino.</text:p>
      <text:p text:style-name="Text_20_body">Un campesino la encuentra.</text:p>
      <text:p text:style-name="Text_20_body">La observa con curiosidad.</text:p>
      <text:p text:style-name="Text_20_body"><text:soft-page-break/>Reconoce el símbolo.</text:p>
      <text:p text:style-name="Text_20_body">Recuerda una vieja leyenda.</text:p>
      <text:h text:style-name="Heading_20_3" text:outline-level="3">Escena final</text:h>
      <text:p text:style-name="Text_20_body">Regreso a la Biblioteca Infinita.</text:p>
      <text:p text:style-name="Text_20_body">Elara cierra lentamente el libro.</text:p>
      <text:p text:style-name="Text_20_body">Permanece inmóvil unos segundos.</text:p>
      <text:p text:style-name="Text_20_body">Luego lo devuelve a la estantería.</text:p>
      <text:p text:style-name="Text_20_body">Mientras se aleja, su mirada se detiene sobre otro volumen cubierto de polvo.</text:p>
      <text:p text:style-name="Text_20_body">Su título apenas puede leerse.</text:p>
      <text:p text:style-name="Text_20_body">Y por alguna razón, eso le produce más miedo que la historia que acaba de terminar.</text:p>
      <text:p text:style-name="Text_20_body">Fin.</text:p>
      <text:p text:style-name="Horizontal_20_Line"/>
      <text:p text:style-name="Text_20_body">Lo que más me gusta de esta estructura es que cada acto aumenta el coste:</text:p>
      <text:p text:style-name="Text_20_body"><text:span text:style-name="Strong_20_Emphasis">Dinero → Tiempo → Oportunidades → Amistad → Familia → Vidas → Toda una existencia.</text:span></text:p>
      <text:p text:style-name="Text_20_body">Y cuando el protagonista finalmente abre la puerta, el lector comprende que la habitación vacía no es el castigo.</text:p>
      <text:p text:style-name="Text_20_body">El castigo fue todo lo que entregó para llegar hasta ella.</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6-23T20:10:19.262000000</meta:creation-date>
    <dc:date>2026-06-23T20:14:52.566000000</dc:date>
    <meta:editing-duration>PT4M34S</meta:editing-duration>
    <meta:editing-cycles>1</meta:editing-cycles>
    <meta:document-statistic meta:table-count="0" meta:image-count="0" meta:object-count="0" meta:page-count="5" meta:paragraph-count="115" meta:word-count="730" meta:character-count="4284" meta:non-whitespace-character-count="3705"/>
    <meta:generator>LibreOffice/7.3.5.2$Windows_X86_64 LibreOffice_project/184fe81b8c8c30d8b5082578aee2fed2ea847c01</meta:generator>
  </office:meta>
</office:document-meta>
</file>