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ste tema encaja muy bien con Fabhrius porque los costes hundidos pueden transformarse en una reflexión más profunda sobre el pasado, la pérdida y la incapacidad humana para soltar aquello que ya no existe.</text:p>
      <text:p text:style-name="Text_20_body">Fabhrius probablemente no hablaría de "inversiones" ni de "decisiones económicas". Hablaría de viajeros, caminos, ruinas, barcos hundidos, cosechas perdidas, fuego consumido. Convertiría el principio racional en una enseñanza existencial.</text:p>
      <text:p text:style-name="Text_20_body">Podríamos explorar varias facetas del problema.</text:p>
      <text:h text:style-name="Heading_20_3" text:outline-level="3">El pasado no puede recuperarse</text:h>
      <text:p text:style-name="Quotations">"Muchos hombres continúan caminando hacia el abismo porque temen admitir que el camino anterior estaba equivocado."</text:p>
      <text:p text:style-name="Quotations">"Lo perdido pertenece al reino de los muertos. Ninguna cantidad de sacrificios puede traerlo de regreso."</text:p>
      <text:p text:style-name="Quotations">"El universo no devuelve una cosecha porque el agricultor haya trabajado duro. Sólo responde a las semillas que aún permanecen bajo la tierra."</text:p>
      <text:h text:style-name="Heading_20_3" text:outline-level="3">La trampa de las pérdidas pasadas</text:h>
      <text:p text:style-name="Quotations">"Hay quienes arrojan una segunda vida tras la primera, creyendo que dos pérdidas pueden convertirse en una victoria."</text:p>
      <text:p text:style-name="Quotations">"El fuego consumió la leña de ayer. Añadir más leña no devolverá la que ya fue ceniza."</text:p>
      <text:p text:style-name="Quotations">"El necio mide sus decisiones por lo que perdió. El sabio las mide por lo que aún puede ganar."</text:p>
      <text:h text:style-name="Heading_20_3" text:outline-level="3">La dificultad de abandonar</text:h>
      <text:p text:style-name="Quotations">"Algunos hombres permanecen años empujando una puerta cerrada porque no soportan admitir que eligieron la puerta equivocada."</text:p>
      <text:p text:style-name="Quotations">"No toda retirada es una derrota. A veces abandonar un camino es la única forma de encontrar otro."</text:p>
      <text:p text:style-name="Quotations">"Cuanto más largo es el error, más difícil resulta reconocerlo."</text:p>
      <text:h text:style-name="Heading_20_3" text:outline-level="3">La identidad atrapada en una decisión</text:h>
      <text:p text:style-name="Text_20_body">Esta idea me gusta especialmente para Nohk.</text:p>
      <text:p text:style-name="Quotations">"El peligro no comienza cuando eliges un mal camino. Comienza cuando tu orgullo te impide abandonarlo."</text:p>
      <text:p text:style-name="Quotations"><text:soft-page-break/>"Hay decisiones que se convierten en cadenas. No porque sean irrevocables, sino porque quien las tomó ya no puede imaginarse sin ellas."</text:p>
      <text:p text:style-name="Quotations">"Muchos hombres dejan de perseguir un objetivo. Después continúan persiguiéndolo únicamente para defender la imagen que tienen de sí mismos."</text:p>
      <text:h text:style-name="Heading_20_3" text:outline-level="3">El universo es indiferente a nuestros sacrificios</text:h>
      <text:p text:style-name="Text_20_body">Muy apropiado para el final de "La Llave".</text:p>
      <text:p text:style-name="Quotations">"El universo no recompensa el esfuerzo. Sólo recompensa los resultados."</text:p>
      <text:p text:style-name="Quotations">"La montaña no concede el paso porque hayas escalado durante días. La roca desconoce tus sacrificios."</text:p>
      <text:p text:style-name="Quotations">"La realidad no negocia con el pasado. Cada instante exige ser juzgado de nuevo."</text:p>
      <text:h text:style-name="Heading_20_3" text:outline-level="3">Las más cercanas al tono de Omniscientis</text:h>
      <text:p text:style-name="Text_20_body">Si tuviera que elegir las que más suenan a Fabhrius, me quedaría con algo así:</text:p>
      <text:p text:style-name="Quotations">"Lo perdido pertenece al reino de los muertos. Ninguna cantidad de sacrificios puede traerlo de regreso."</text:p>
      <text:p text:style-name="Quotations">"El peligro no comienza cuando eliges un mal camino. Comienza cuando tu orgullo te impide abandonarlo."</text:p>
      <text:p text:style-name="Quotations">"La montaña desconoce tus esfuerzos. La roca no recuerda tus sacrificios. Cada paso debe justificarse por sí mismo."</text:p>
      <text:p text:style-name="Quotations">"Hay hombres que sacrifican su futuro intentando rescatar su pasado."</text:p>
      <text:p text:style-name="Quotations">"No toda retirada es una derrota. A veces es la última victoria que nos queda."</text:p>
      <text:p text:style-name="Quotations">"Cuanto más largo es el error, más difícil resulta reconocerlo."</text:p>
      <text:p text:style-name="Quotations">"El universo no pregunta cuánto has invertido. Sólo pregunta qué ocurrirá después."</text:p>
      <text:p text:style-name="Quotations">"Muchos hombres llegan al abismo no porque eligieran mal, sino porque fueron incapaces de detenerse."</text:p>
      <text:p text:style-name="Text_20_body">Esa última tiene un aire especialmente apropiado para "La Llave", porque resume exactamente la tragedia de Nohk: su condena no nace de haber comenzado la búsqueda, sino de no haber sabido abandonarla cuando todavía podía hacerl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19T16:44:55.311000000</meta:creation-date>
    <dc:date>2026-07-19T16:49:25.140000000</dc:date>
    <meta:editing-duration>PT4M30S</meta:editing-duration>
    <meta:editing-cycles>1</meta:editing-cycles>
    <meta:document-statistic meta:table-count="0" meta:image-count="0" meta:object-count="0" meta:page-count="2" meta:paragraph-count="36" meta:word-count="534" meta:character-count="3403" meta:non-whitespace-character-count="2905"/>
    <meta:generator>LibreOffice/7.3.5.2$Windows_X86_64 LibreOffice_project/184fe81b8c8c30d8b5082578aee2fed2ea847c01</meta:generator>
  </office:meta>
</office:document-meta>
</file>