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Creo que aquí conviene olvidar por completo el lenguaje moderno ("información", "expectativas", etc.) y buscar la idea que hay debajo.</text:p>
      <text:p text:style-name="Text_20_body">Lo que Fabhrius quiere transmitir no es una teoría psicológica, sino una observación sobre la naturaleza del conocimiento.</text:p>
      <text:p text:style-name="Text_20_body">En esencia está diciendo:</text:p>
      <text:list xml:id="list798838609" text:style-name="L1">
        <text:list-item>
          <text:p text:style-name="P1">Sabemos menos de lo que creemos.</text:p>
        </text:list-item>
        <text:list-item>
          <text:p text:style-name="P1">Nuestros deseos completan aquello que ignoramos.</text:p>
        </text:list-item>
        <text:list-item>
          <text:p text:style-name="P1">Confundimos nuestras interpretaciones con la realidad.</text:p>
        </text:list-item>
      </text:list>
      <text:p text:style-name="Text_20_body">Eso puede expresarse con un lenguaje antiguo, como si fuera una verdad descubierta hace siglos.</text:p>
      <text:p text:style-name="Text_20_body">Aquí tienes varias posibilidades, de más explícitas a más enigmáticas.</text:p>
      <text:p text:style-name="Horizontal_20_Line"/>
      <text:h text:style-name="Heading_20_3" text:outline-level="3">Opción 1 (mi favorita)</text:h>
      <text:p text:style-name="Quotations"><text:span text:style-name="Strong_20_Emphasis">"El hombre rara vez contempla el mundo tal como es. Contempla aquello que espera encontrar en él."</text:span></text:p>
      <text:p text:style-name="Text_20_body">No revela el argumento.</text:p>
      <text:p text:style-name="Text_20_body">Después de leer el cuento adquiere un significado muy claro.</text:p>
      <text:p text:style-name="Horizontal_20_Line"/>
      <text:h text:style-name="Heading_20_3" text:outline-level="3">Opción 2</text:h>
      <text:p text:style-name="Quotations"><text:span text:style-name="Strong_20_Emphasis">"Las sombras del deseo suelen proyectarse sobre aquello que aún desconocemos."</text:span></text:p>
      <text:p text:style-name="Text_20_body">Más poética.</text:p>
      <text:p text:style-name="Text_20_body">Muy apropiada para Fabhrius.</text:p>
      <text:p text:style-name="Horizontal_20_Line"/>
      <text:h text:style-name="Heading_20_3" text:outline-level="3">Opción 3</text:h>
      <text:p text:style-name="Quotations"><text:span text:style-name="Strong_20_Emphasis">"Donde el conocimiento termina, la imaginación comienza a escribir sus propias certezas."</text:span></text:p>
      <text:p text:style-name="Text_20_body">Me gusta mucho porque habla exactamente del nacimiento de la leyenda.</text:p>
      <text:p text:style-name="Horizontal_20_Line"/>
      <text:h text:style-name="Heading_20_3" text:outline-level="3">Opción 4</text:h>
      <text:p text:style-name="Quotations"><text:span text:style-name="Strong_20_Emphasis">"Los ojos sólo alcanzan a ver una pequeña parte del mundo. El resto suele ser completado por los anhelos del corazón."</text:span></text:p>
      <text:p text:style-name="Text_20_body"><text:soft-page-break/>Muy medieval.</text:p>
      <text:p text:style-name="Text_20_body">Muy contemplativa.</text:p>
      <text:p text:style-name="Horizontal_20_Line"/>
      <text:h text:style-name="Heading_20_3" text:outline-level="3">Opción 5</text:h>
      <text:p text:style-name="Quotations"><text:span text:style-name="Strong_20_Emphasis">"Quien desconoce los límites de su conocimiento termina confundiendo sus deseos con la verdad."</text:span></text:p>
      <text:p text:style-name="Text_20_body">Más filosófica.</text:p>
      <text:p text:style-name="Text_20_body">Algo más directa.</text:p>
      <text:p text:style-name="Horizontal_20_Line"/>
      <text:h text:style-name="Heading_20_3" text:outline-level="3">Opción 6</text:h>
      <text:p text:style-name="Quotations"><text:span text:style-name="Strong_20_Emphasis">"No es la realidad la que engaña al viajero. Son las historias que construye para completar aquello que ignora."</text:span></text:p>
      <text:p text:style-name="Text_20_body">Esta me recuerda mucho al universo de Omniscientis.</text:p>
      <text:p text:style-name="Horizontal_20_Line"/>
      <text:h text:style-name="Heading_20_3" text:outline-level="3">Opción 7</text:h>
      <text:p text:style-name="Quotations"><text:span text:style-name="Strong_20_Emphasis">"Pocas cosas resultan tan peligrosas como una verdad edificada sobre fragmentos de realidad."</text:span></text:p>
      <text:p text:style-name="Text_20_body">Muy misteriosa.</text:p>
      <text:p text:style-name="Text_20_body">No anticipa el final.</text:p>
      <text:p text:style-name="Horizontal_20_Line"/>
      <text:h text:style-name="Heading_20_3" text:outline-level="3">Opción 8</text:h>
      <text:p text:style-name="Quotations"><text:span text:style-name="Strong_20_Emphasis">"El conocimiento incompleto rara vez permanece incompleto. La mente del hombre siempre se apresura a terminar la obra."</text:span></text:p>
      <text:p text:style-name="Text_20_body">Esta introduce una idea muy profunda: nuestro cerebro odia los vacíos de información.</text:p>
      <text:p text:style-name="Horizontal_20_Line"/>
      <text:h text:style-name="Heading_20_2" text:outline-level="2">Una idea que creo que encaja especialmente con Fabhrius</text:h>
      <text:p text:style-name="Text_20_body">Mientras leía tu mensaje se me ocurrió otra posibilidad que me gusta incluso más porque tiene un tono casi sapiencial:</text:p>
      <text:p text:style-name="Quotations"><text:span text:style-name="Strong_20_Emphasis">"Los vacíos del conocimiento nunca permanecen vacíos. Allí donde la realidad guarda silencio, el deseo suele tomar la palabra."</text:span></text:p>
      <text:p text:style-name="Text_20_body"><text:soft-page-break/>No habla del tesoro.</text:p>
      <text:p text:style-name="Text_20_body">No habla de Nohk.</text:p>
      <text:p text:style-name="Text_20_body">No habla del fracaso.</text:p>
      <text:p text:style-name="Text_20_body">Pero cuando el lector termina el Acto I comprende exactamente qué ocurrió: la realidad guardaba silencio sobre la existencia del tesoro, y fueron los propios protagonistas quienes llenaron ese silencio con aquello que deseaban creer.</text:p>
      <text:p text:style-name="Text_20_body">Creo que esa es la dirección que diferencia a Fabhrius de un filósofo moderno. No explica un sesgo cognitivo; lo convierte en una ley antigua sobre la naturaleza human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3T10:11:24.125000000</meta:creation-date>
    <dc:date>2026-07-23T10:12:19.541000000</dc:date>
    <meta:editing-duration>PT56S</meta:editing-duration>
    <meta:editing-cycles>1</meta:editing-cycles>
    <meta:document-statistic meta:table-count="0" meta:image-count="0" meta:object-count="0" meta:page-count="3" meta:paragraph-count="45" meta:word-count="423" meta:character-count="2654" meta:non-whitespace-character-count="2279"/>
    <meta:generator>LibreOffice/7.3.5.2$Windows_X86_64 LibreOffice_project/184fe81b8c8c30d8b5082578aee2fed2ea847c01</meta:generator>
  </office:meta>
</office:document-meta>
</file>