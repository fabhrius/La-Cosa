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ca8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ext_20_body">El regreso a Oldwood fue muy distinto a la partida.</text:p>
      <text:p text:style-name="Text_20_body"><text:span text:style-name="T1">R</text:span>egresaban en silencio.</text:p>
      <text:p text:style-name="Text_20_body">Sin caballos.<text:span text:style-name="T1"> </text:span>Sin provisiones.</text:p>
      <text:p text:style-name="Text_20_body">Sin Ghim.</text:p>
      <text:p text:style-name="Text_20_body">Durante las semanas siguientes cada uno intentó reconstruir su vida.</text:p>
      <text:p text:style-name="Text_20_body">Pero Nohk no podía dejar de pensar en el tesoro.</text:p>
      <text:p text:style-name="Text_20_body">Estudiaba el mapa una y otra vez.<text:span text:style-name="T1"> </text:span>Repasaba cada tramo del viaje.<text:span text:style-name="T1"> </text:span>Cada decisión.<text:span text:style-name="T1"> </text:span>Cada error.</text:p>
      <text:p text:style-name="Text_20_body">Y poco a poco llegó a una conclusión.</text:p>
      <text:p text:style-name="Text_20_body">La pared del puente no era la única forma de alcanzar las tierras altas.</text:p>
      <text:p text:style-name="Text_20_body">Existía otra ruta.<text:span text:style-name="T1"> </text:span>Más larga.<text:span text:style-name="T1"> </text:span>Más dura.<text:span text:style-name="T1"> </text:span>Un rodeo por el Desierto de Piedra.</text:p>
      <text:p text:style-name="Text_20_body">Si conseguían atravesarlo, podrían llegar a la misma región sin necesidad de escalar el acantilado.</text:p>
      <text:p text:style-name="Text_20_body">Cuando estuvo convencido, reunió a sus compañeros en la posada.</text:p>
      <text:p text:style-name="Text_20_body">Extendió el mapa sobre la mesa.</text:p>
      <text:p text:style-name="Text_20_body">—Voy a volver —dijo—. En cuanto consiga el equipo necesario.</text:p>
      <text:p text:style-name="Text_20_body">Nadie respondió de inmediato.</text:p>
      <text:p text:style-name="Text_20_body">Las llamas de la chimenea crepitaban en el silencio.</text:p>
      <text:p text:style-name="Text_20_body">Finalmente habló Tarhk.</text:p>
      <text:p text:style-name="Text_20_body">—Yo no iré.<text:span text:style-name="T1"> </text:span>Ya he perdido bastante.</text:p>
      <text:p text:style-name="Text_20_body">Pohval asintió.</text:p>
      <text:p text:style-name="Text_20_body">—Yo tampoco volveré.</text:p>
      <text:p text:style-name="Text_20_body">Nohk observó a sus dos amigos.</text:p>
      <text:p text:style-name="Text_20_body">Le resultaba imposible entenderlos.<text:span text:style-name="T1"> </text:span>¿Cómo podían abandonar ahora?</text:p>
      <text:p text:style-name="Text_20_body">Pero Tarhk y Pohval ya habían tomado su decisión.</text:p>
      <text:p text:style-name="Text_20_body">Todavía conservaban sus tierras.<text:span text:style-name="T1"> </text:span>Todavía tenían una vida a la que regresar.</text:p>
      <text:p text:style-name="Text_20_body">Y, por primera vez desde que comenzó la expedición, se permitieron considerar una posibilidad que antes habían rechazado.</text:p>
      <text:p text:style-name="Text_20_body">Tal vez no existía ningún tesoro.<text:span text:style-name="T1"> </text:span>Tal vez la leyenda era sólo una leyenda.</text:p>
      <text:p text:style-name="Text_20_body">No estaban dispuestos a sacrificarlo todo por una promesa.</text:p>
      <text:p text:style-name="Text_20_body">Cuando se marcharon de la posada, no volvieron a hablar del tesoro.</text:p>
      <text:p text:style-name="Text_20_body"><text:soft-page-break/>Nohk permaneció sentado junto a Kempht y Johf.</text:p>
      <text:p text:style-name="Text_20_body">Los tres guardaron silencio durante un rato.</text:p>
      <text:p text:style-name="Text_20_body">Finalmente fue Kempht quien habló.</text:p>
      <text:p text:style-name="Text_20_body">—Yo iré.</text:p>
      <text:p text:style-name="Text_20_body">Johf asintió.</text:p>
      <text:p text:style-name="Text_20_body">—Yo también.</text:p>
      <text:p text:style-name="Text_20_body">Ninguno habló de los riesgos.<text:span text:style-name="T1"> </text:span>En sus mentes sólo existía una idea.<text:span text:style-name="T1"> </text:span>El tesoro tenía que ser real.</text:p>
      <text:p text:style-name="Text_20_body">Tenía que serlo.</text:p>
      <text:p text:style-name="Text_20_body">De lo contrario, ¿qué sentido habría tenido todo aquello?</text:p>
      <text:p text:style-name="Text_20_body">Las semanas siguientes vendieron cuanto poseían.</text:p>
      <text:p text:style-name="Text_20_body">Las tierras.<text:span text:style-name="T1"> </text:span>Las casas.<text:span text:style-name="T1"> </text:span>Los animales.<text:span text:style-name="T1"> </text:span>Las herramientas.</text:p>
      <text:p text:style-name="Text_20_body">Todo.</text:p>
      <text:p text:style-name="Text_20_body">Convirtieron sus vidas enteras en provisiones, cuerdas y equipo de viaje.</text:p>
      <text:p text:style-name="Text_20_body">Cuando terminaron, ya no les quedaba nada en Oldwood.</text:p>
      <text:p text:style-name="Text_20_body">Nada a lo que regresar.<text:span text:style-name="T1"> </text:span>Nada que los esperara si fracasaban.</text:p>
      <text:p text:style-name="Text_20_body">Sus destinos habían quedado unidos al tesoro.</text:p>
      <text:p text:style-name="Text_20_body">Lo encontrarían.</text:p>
      <text:p text:style-name="Text_20_body">O lo perderían tod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9T18:39:11.534000000</meta:creation-date>
    <dc:date>2026-06-29T19:06:01.820000000</dc:date>
    <meta:editing-duration>PT6M53S</meta:editing-duration>
    <meta:editing-cycles>1</meta:editing-cycles>
    <meta:document-statistic meta:table-count="0" meta:image-count="0" meta:object-count="0" meta:page-count="2" meta:paragraph-count="46" meta:word-count="364" meta:character-count="2171" meta:non-whitespace-character-count="1854"/>
    <meta:generator>LibreOffice/7.3.5.2$Windows_X86_64 LibreOffice_project/184fe81b8c8c30d8b5082578aee2fed2ea847c01</meta:generator>
  </office:meta>
</office:document-meta>
</file>