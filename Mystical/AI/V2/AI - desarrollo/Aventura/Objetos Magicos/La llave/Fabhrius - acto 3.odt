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 Y aquí creo que aparece algo muy interesante: el Acto III ya no trata sobre el mundo exterior.</text:p>
      <text:p text:style-name="Text_20_body">La tormenta, el puente roto y la muerte pertenecen al Acto II.</text:p>
      <text:p text:style-name="Text_20_body">El Acto III ocurre principalmente dentro de la mente de los personajes.</text:p>
      <text:p text:style-name="Text_20_body">Es el acto donde toman la decisión de continuar.</text:p>
      <text:p text:style-name="Text_20_body">Por eso los principios relevantes son más psicológicos que físicos.</text:p>
      <text:p text:style-name="Horizontal_20_Line"/>
      <text:h text:style-name="Heading_20_2" text:outline-level="2">1. Costes hundidos</text:h>
      <text:p text:style-name="Text_20_body">Por supuesto.</text:p>
      <text:p text:style-name="Text_20_body">Pero Fabhrius no debería hablar de "costes hundidos".</text:p>
      <text:p text:style-name="Text_20_body">Debería hablar de algo más universal.</text:p>
      <text:p text:style-name="Text_20_body">Lo que realmente ocurre es esto:</text:p>
      <text:p text:style-name="Text_20_body">Los personajes evalúan el futuro utilizando pérdidas pasadas.</text:p>
      <text:p text:style-name="Text_20_body">No preguntan:</text:p>
      <text:p text:style-name="Quotations">"¿Es una buena idea continuar?"</text:p>
      <text:p text:style-name="Text_20_body">Preguntan:</text:p>
      <text:p text:style-name="Quotations">"¿Cómo podemos evitar que todo lo perdido haya sido en vano?"</text:p>
      <text:p text:style-name="Text_20_body">Son preguntas distintas.</text:p>
      <text:p text:style-name="Text_20_body">Principio universal:</text:p>
      <text:p text:style-name="Quotations">El pasado puede influir en nuestras decisiones aunque ya no pueda modificarse.</text:p>
      <text:p text:style-name="Horizontal_20_Line"/>
      <text:h text:style-name="Heading_20_2" text:outline-level="2">2. Escalada de compromiso</text:h>
      <text:p text:style-name="Text_20_body">Esto es ligeramente distinto de los costes hundidos.</text:p>
      <text:p text:style-name="Text_20_body">Al principio invierten dinero.</text:p>
      <text:p text:style-name="Text_20_body">Luego tiempo.</text:p>
      <text:p text:style-name="Text_20_body">Luego recursos.</text:p>
      <text:p text:style-name="Text_20_body">Luego vidas.</text:p>
      <text:p text:style-name="Text_20_body">Y cuanto más invierten, más difícil resulta detenerse.</text:p>
      <text:p text:style-name="Text_20_body">Principio universal:</text:p>
      <text:p text:style-name="Quotations"><text:soft-page-break/>Cada compromiso facilita el siguiente.</text:p>
      <text:p text:style-name="Text_20_body">o</text:p>
      <text:p text:style-name="Quotations">Las decisiones suelen encadenarse unas a otras.</text:p>
      <text:p text:style-name="Horizontal_20_Line"/>
      <text:h text:style-name="Heading_20_2" text:outline-level="2">3. La identidad se fusiona con el objetivo</text:h>
      <text:p text:style-name="Text_20_body">Esto me parece especialmente importante para Nohk.</text:p>
      <text:p text:style-name="Text_20_body">Al principio busca un tesoro.</text:p>
      <text:p text:style-name="Text_20_body">Ahora empieza a convertirse en alguien que busca el tesoro.</text:p>
      <text:p text:style-name="Text_20_body">Ya no es una actividad.</text:p>
      <text:p text:style-name="Text_20_body">Es una identidad.</text:p>
      <text:p text:style-name="Text_20_body">Abandonar el proyecto empieza a sentirse como abandonarse a sí mismo.</text:p>
      <text:p text:style-name="Text_20_body">Principio universal:</text:p>
      <text:p text:style-name="Quotations">Los objetivos prolongados terminan modificando a quien los persigue.</text:p>
      <text:p text:style-name="Horizontal_20_Line"/>
      <text:h text:style-name="Heading_20_2" text:outline-level="2">4. El valor de abandonar</text:h>
      <text:p text:style-name="Text_20_body">Este es muy interesante porque no revela el final.</text:p>
      <text:p text:style-name="Text_20_body">Normalmente asociamos persistencia con virtud.</text:p>
      <text:p text:style-name="Text_20_body">Pero la realidad es más compleja.</text:p>
      <text:p text:style-name="Text_20_body">A veces continuar es correcto.</text:p>
      <text:p text:style-name="Text_20_body">A veces abandonar es correcto.</text:p>
      <text:p text:style-name="Text_20_body">Principio universal:</text:p>
      <text:p text:style-name="Quotations">La perseverancia y la obstinación suelen parecer idénticas mientras la historia está ocurriendo.</text:p>
      <text:p text:style-name="Text_20_body">Esta me gusta muchísimo.</text:p>
      <text:p text:style-name="Text_20_body">Porque durante la lectura nadie sabe cuál de las dos está viendo.</text:p>
      <text:p text:style-name="Horizontal_20_Line"/>
      <text:h text:style-name="Heading_20_2" text:outline-level="2"><text:soft-page-break/>5. La dificultad de reconocer un error</text:h>
      <text:p text:style-name="Text_20_body">Algo muy humano.</text:p>
      <text:p text:style-name="Text_20_body">Cuanto más tiempo dedicamos a una idea, más difícil resulta cuestionarla.</text:p>
      <text:p text:style-name="Text_20_body">Principio universal:</text:p>
      <text:p text:style-name="Quotations">Las creencias arraigadas suelen resistirse a la evidencia.</text:p>
      <text:p text:style-name="Horizontal_20_Line"/>
      <text:h text:style-name="Heading_20_2" text:outline-level="2">6. Selección natural de las decisiones</text:h>
      <text:p text:style-name="Text_20_body">Esto tiene un sabor muy Omniscientis.</text:p>
      <text:p text:style-name="Text_20_body">Los personajes se separan.</text:p>
      <text:p text:style-name="Text_20_body">Algunos continúan.</text:p>
      <text:p text:style-name="Text_20_body">Otros no.</text:p>
      <text:p text:style-name="Text_20_body">El futuro actuará como mecanismo de selección.</text:p>
      <text:p text:style-name="Text_20_body">Todavía no sabemos quién tiene razón.</text:p>
      <text:p text:style-name="Text_20_body">Principio universal:</text:p>
      <text:p text:style-name="Quotations">Las decisiones no se validan mediante argumentos. Se validan mediante sus consecuencias.</text:p>
      <text:p text:style-name="Horizontal_20_Line"/>
      <text:h text:style-name="Heading_20_2" text:outline-level="2">7. Dependencia creciente</text:h>
      <text:p text:style-name="Text_20_body">Hay otro fenómeno muy interesante.</text:p>
      <text:p text:style-name="Text_20_body">Después del fracaso ya no poseen recursos propios.</text:p>
      <text:p text:style-name="Text_20_body">Necesitan financiación externa.</text:p>
      <text:p text:style-name="Text_20_body">Eso significa que cada vez son menos libres.</text:p>
      <text:p text:style-name="Text_20_body">La búsqueda empieza a consumir la capacidad de elegir.</text:p>
      <text:p text:style-name="Text_20_body">Principio universal:</text:p>
      <text:p text:style-name="Quotations">Todo compromiso prolongado reduce las alternativas disponibles.</text:p>
      <text:p text:style-name="Horizontal_20_Line"/>
      <text:h text:style-name="Heading_20_2" text:outline-level="2">8. El efecto de las pérdidas sobre el juicio</text:h>
      <text:p text:style-name="Text_20_body">Muy relacionado con la psicología del riesgo.</text:p>
      <text:p text:style-name="Text_20_body"><text:soft-page-break/>Las personas que han perdido mucho suelen asumir riesgos mayores.</text:p>
      <text:p text:style-name="Text_20_body">Porque sienten que ya no tienen tanto que perder.</text:p>
      <text:p text:style-name="Text_20_body">Nohk está entrando exactamente en esa fase.</text:p>
      <text:p text:style-name="Text_20_body">Principio universal:</text:p>
      <text:p text:style-name="Quotations">Las pérdidas modifican la percepción del riesgo.</text:p>
      <text:p text:style-name="Horizontal_20_Line"/>
      <text:h text:style-name="Heading_20_2" text:outline-level="2">Lo que más me gusta para Fabhrius</text:h>
      <text:p text:style-name="Text_20_body">Si buscamos frases que no revelen nada y que adquieran significado después del final, me parecen especialmente fuertes estas ideas:</text:p>
      <text:h text:style-name="Heading_20_3" text:outline-level="3">Opción A</text:h>
      <text:p text:style-name="Quotations">"La perseverancia y la obstinación suelen parecer idénticas mientras la historia está ocurriendo."</text:p>
      <text:p text:style-name="Text_20_body">Esta es probablemente mi favorita para este acto.</text:p>
      <text:p text:style-name="Text_20_body">Porque el lector tampoco sabe todavía cuál está viendo.</text:p>
      <text:p text:style-name="Horizontal_20_Line"/>
      <text:h text:style-name="Heading_20_3" text:outline-level="3">Opción B</text:h>
      <text:p text:style-name="Quotations">"Todo compromiso prolongado reduce las alternativas disponibles."</text:p>
      <text:p text:style-name="Text_20_body">Muy relacionada con la venta de tierras y la nueva financiación.</text:p>
      <text:p text:style-name="Horizontal_20_Line"/>
      <text:h text:style-name="Heading_20_3" text:outline-level="3">Opción C</text:h>
      <text:p text:style-name="Quotations">"Los objetivos prolongados terminan modificando a quien los persigue."</text:p>
      <text:p text:style-name="Text_20_body">Encaja perfectamente con la transformación moral de Nohk.</text:p>
      <text:p text:style-name="Horizontal_20_Line"/>
      <text:h text:style-name="Heading_20_3" text:outline-level="3">Opción D</text:h>
      <text:p text:style-name="Quotations">"Las pérdidas modifican la percepción del riesgo."</text:p>
      <text:p text:style-name="Text_20_body">Explica por qué vuelven a intentarlo.</text:p>
      <text:p text:style-name="Horizontal_20_Line"/>
      <text:h text:style-name="Heading_20_3" text:outline-level="3"><text:soft-page-break/>Opción E</text:h>
      <text:p text:style-name="Quotations">"Las decisiones no se validan mediante argumentos. Se validan mediante sus consecuencias."</text:p>
      <text:p text:style-name="Text_20_body">Tiene un tono casi profético.</text:p>
      <text:p text:style-name="Text_20_body">Y sólo adquiere su verdadero significado al final del relato.</text:p>
      <text:p text:style-name="Horizontal_20_Line"/>
      <text:p text:style-name="Text_20_body">De todas ellas, para abrir el Acto III, la que más me interesa es:</text:p>
      <text:p text:style-name="Quotations"><text:span text:style-name="Strong_20_Emphasis">"La perseverancia y la obstinación suelen parecer idénticas mientras la historia está ocurriendo."</text:span></text:p>
      <text:p text:style-name="Text_20_body">Porque durante toda la segunda mitad del cuento el lector está exactamente en esa situación. No sabe si Nohk es un hombre admirablemente persistente o un hombre incapaz de detenerse. Sólo el desenlace permitirá distinguir una cosa de la otra. Y esa incertidumbre es precisamente el corazón de la histor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2T15:28:53.249000000</meta:creation-date>
    <dc:date>2026-07-22T15:29:16.844000000</dc:date>
    <meta:editing-duration>PT23S</meta:editing-duration>
    <meta:editing-cycles>1</meta:editing-cycles>
    <meta:document-statistic meta:table-count="0" meta:image-count="0" meta:object-count="0" meta:page-count="5" meta:paragraph-count="99" meta:word-count="695" meta:character-count="4455" meta:non-whitespace-character-count="3859"/>
    <meta:generator>LibreOffice/7.3.5.2$Windows_X86_64 LibreOffice_project/184fe81b8c8c30d8b5082578aee2fed2ea847c01</meta:generator>
  </office:meta>
</office:document-meta>
</file>