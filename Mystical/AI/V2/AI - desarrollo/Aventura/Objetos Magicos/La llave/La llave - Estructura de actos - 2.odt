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T1" style:family="text">
      <style:text-properties officeooo:rsid="001278dd"/>
    </style:style>
    <style:style style:name="T2" style:family="text">
      <style:text-properties fo:color="#c9211e" loext:opacity="100%" officeooo:rsid="001278d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Sí. En este punto ya tenemos definidos:</text:p>
      <text:list xml:id="list328418222" text:style-name="L1">
        <text:list-item>
          <text:p text:style-name="P1">El objeto maldito (la llave).</text:p>
        </text:list-item>
        <text:list-item>
          <text:p text:style-name="P1">El misterio (el tesoro del rey).</text:p>
        </text:list-item>
        <text:list-item>
          <text:p text:style-name="P1">La enseñanza (coste hundido).</text:p>
        </text:list-item>
        <text:list-item>
          <text:p text:style-name="P1">Los personajes (un grupo de amigos).</text:p>
        </text:list-item>
        <text:list-item>
          <text:p text:style-name="P1">La progresión de pérdidas.</text:p>
        </text:list-item>
        <text:list-item>
          <text:p text:style-name="P1">Las pistas escalonadas.</text:p>
        </text:list-item>
        <text:list-item>
          <text:p text:style-name="P1">El final circular.</text:p>
        </text:list-item>
        <text:list-item>
          <text:p text:style-name="P1">El marco narrativo de la Biblioteca Infinita.</text:p>
        </text:list-item>
      </text:list>
      <text:p text:style-name="Text_20_body">Ahora podemos construir una estructura de actos más definitiva, que servirá como esqueleto para escribir el cuento.</text:p>
      <text:h text:style-name="Heading_20_1" text:outline-level="1">Cuento 1: La Llave de Hierro</text:h>
      <text:h text:style-name="Heading_20_2" text:outline-level="2">Prólogo - La Biblioteca Infinita</text:h>
      <text:list xml:id="list1395230424" text:style-name="L2">
        <text:list-item>
          <text:p text:style-name="P2">Elara explora una sección poco visitada de la Biblioteca Infinita.</text:p>
        </text:list-item>
        <text:list-item>
          <text:p text:style-name="P2">Encuentra un libro antiguo encuadernado en cuero negro.</text:p>
        </text:list-item>
        <text:list-item>
          <text:p text:style-name="P2">En la portada aparece grabada una llave de hierro.</text:p>
        </text:list-item>
        <text:list-item>
          <text:p text:style-name="P2">Lo abre.</text:p>
        </text:list-item>
        <text:list-item>
          <text:p text:style-name="P2">La narración abandona la biblioteca.</text:p>
        </text:list-item>
      </text:list>
      <text:p text:style-name="Horizontal_20_Line"/>
      <text:h text:style-name="Heading_20_1" text:outline-level="1">Acto I - La promesa</text:h>
      <text:h text:style-name="Heading_20_3" text:outline-level="3">Objetivo dramático</text:h>
      <text:p text:style-name="Text_20_body">Crear esperanza.</text:p>
      <text:h text:style-name="Heading_20_3" text:outline-level="3">Acontecimientos</text:h>
      <text:list xml:id="list4004406022" text:style-name="L3">
        <text:list-item>
          <text:p text:style-name="P3">En un pequeño pueblo, un joven campesino encuentra una extraña llave de hierro.</text:p>
        </text:list-item>
        <text:list-item>
          <text:p text:style-name="P3">Se la muestra a sus cuatro amigos.<text:span text:style-name="T1"> </text:span><text:span text:style-name="T2">(cinco)</text:span></text:p>
        </text:list-item>
        <text:list-item>
          <text:p text:style-name="P3">El grupo investiga el origen del objeto.</text:p>
        </text:list-item>
        <text:list-item>
          <text:p text:style-name="P3"><text:soft-page-break/>Un anciano posee un viejo libro donde aparece dibujada exactamente la misma llave.</text:p>
        </text:list-item>
        <text:list-item>
          <text:p text:style-name="P3">El libro narra la historia de un rey que ocultó un tesoro inmenso.</text:p>
        </text:list-item>
        <text:list-item>
          <text:p text:style-name="P3">También contiene un mapa.</text:p>
        </text:list-item>
      </text:list>
      <text:h text:style-name="Heading_20_3" text:outline-level="3">Coste</text:h>
      <text:p text:style-name="Text_20_body">El anciano se niega a regalar el libro.</text:p>
      <text:p text:style-name="Text_20_body">Los amigos reúnen dinero para comprarlo.</text:p>
      <text:p text:style-name="Text_20_body">El protagonista vende una parte de sus tierras para financiar la adquisición.</text:p>
      <text:h text:style-name="Heading_20_3" text:outline-level="3">Final del acto</text:h>
      <text:p text:style-name="Text_20_body">El mapa señala una cueva escondida en las montañas.</text:p>
      <text:p text:style-name="Text_20_body">El grupo parte lleno de ilusión.</text:p>
      <text:p text:style-name="Horizontal_20_Line"/>
      <text:h text:style-name="Heading_20_1" text:outline-level="1">Acto II - La primera inversión</text:h>
      <text:h text:style-name="Heading_20_3" text:outline-level="3">Objetivo dramático</text:h>
      <text:p text:style-name="Text_20_body">Mostrar que la búsqueda tiene un precio.</text:p>
      <text:h text:style-name="Heading_20_3" text:outline-level="3">Acontecimientos</text:h>
      <text:list xml:id="list510648201" text:style-name="L4">
        <text:list-item>
          <text:p text:style-name="P4">La expedición atraviesa bosques y montañas.</text:p>
        </text:list-item>
        <text:list-item>
          <text:p text:style-name="P4">Las dificultades son mayores de lo esperado.</text:p>
        </text:list-item>
        <text:list-item>
          <text:p text:style-name="P4">Uno de los amigos muere en un accidente durante el ascenso.</text:p>
        </text:list-item>
        <text:list-item>
          <text:p text:style-name="P4">El grupo queda devastado.</text:p>
        </text:list-item>
      </text:list>
      <text:p text:style-name="Text_20_body">Finalmente alcanzan la cueva.</text:p>
      <text:h text:style-name="Heading_20_3" text:outline-level="3">Decepción</text:h>
      <text:p text:style-name="Text_20_body">La cueva está vacía.</text:p>
      <text:p text:style-name="Text_20_body">No hay tesoro.</text:p>
      <text:p text:style-name="Text_20_body">No hay puerta.</text:p>
      <text:p text:style-name="Text_20_body">No hay riqueza.</text:p>
      <text:h text:style-name="Heading_20_3" text:outline-level="3">Ruptura inicial</text:h>
      <text:p text:style-name="Text_20_body">Uno de los integrantes concluye que todo ha sido un error.</text:p>
      <text:p text:style-name="Text_20_body"><text:soft-page-break/>Decide abandonar.</text:p>
      <text:p text:style-name="Text_20_body">Los demás lo dejan marchar.</text:p>
      <text:h text:style-name="Heading_20_3" text:outline-level="3">Revelación</text:h>
      <text:p text:style-name="Text_20_body">Esa misma noche descubren grabados antiguos en la roca.</text:p>
      <text:p text:style-name="Text_20_body">Entre ellos aparece nuevamente el símbolo de la llave.</text:p>
      <text:p text:style-name="Text_20_body">Y un segundo mapa.</text:p>
      <text:h text:style-name="Heading_20_3" text:outline-level="3">Final del acto</text:h>
      <text:p text:style-name="Text_20_body">Aunque tienen dudas, deciden continuar.</text:p>
      <text:p text:style-name="Horizontal_20_Line"/>
      <text:h text:style-name="Heading_20_1" text:outline-level="1">Acto III - El punto de no retorno</text:h>
      <text:h text:style-name="Heading_20_3" text:outline-level="3">Objetivo dramático</text:h>
      <text:p text:style-name="Text_20_body">Introducir explícitamente el coste hundido.</text:p>
      <text:h text:style-name="Heading_20_3" text:outline-level="3">Acontecimientos</text:h>
      <text:list xml:id="list2659192026" text:style-name="L5">
        <text:list-item>
          <text:p text:style-name="P5">El segundo mapa conduce a regiones lejanas.</text:p>
        </text:list-item>
        <text:list-item>
          <text:p text:style-name="P5">El viaje dura años.</text:p>
        </text:list-item>
        <text:list-item>
          <text:p text:style-name="P5">El grupo sigue encontrando símbolos que parecen confirmar la autenticidad de la leyenda.</text:p>
        </text:list-item>
      </text:list>
      <text:p text:style-name="Text_20_body">Aparecen nuevas pérdidas:</text:p>
      <text:list xml:id="list4058956313" text:style-name="L6">
        <text:list-item>
          <text:p text:style-name="P6">dinero,</text:p>
        </text:list-item>
        <text:list-item>
          <text:p text:style-name="P6">tiempo,</text:p>
        </text:list-item>
        <text:list-item>
          <text:p text:style-name="P6">oportunidades,</text:p>
        </text:list-item>
        <text:list-item>
          <text:p text:style-name="P6">relaciones personales.</text:p>
        </text:list-item>
      </text:list>
      <text:h text:style-name="Heading_20_3" text:outline-level="3">Escena central</text:h>
      <text:p text:style-name="Text_20_body">Varios integrantes quieren abandonar.</text:p>
      <text:p text:style-name="Text_20_body">El protagonista se opone.</text:p>
      <text:p text:style-name="Text_20_body">Argumenta que ya han sacrificado demasiado:</text:p>
      <text:list xml:id="list3702328959" text:style-name="L7">
        <text:list-item>
          <text:p text:style-name="P7">compraron el libro,</text:p>
        </text:list-item>
        <text:list-item>
          <text:p text:style-name="P7">realizaron la expedición,</text:p>
        </text:list-item>
        <text:list-item>
          <text:p text:style-name="P7"><text:soft-page-break/>perdieron años,</text:p>
        </text:list-item>
        <text:list-item>
          <text:p text:style-name="P7">un amigo murió.</text:p>
        </text:list-item>
      </text:list>
      <text:p text:style-name="Text_20_body">No está dispuesto a detenerse ahora.</text:p>
      <text:h text:style-name="Heading_20_3" text:outline-level="3">Final del acto</text:h>
      <text:p text:style-name="Text_20_body">El protagonista vende el resto de sus propiedades para financiar la búsqueda.</text:p>
      <text:p text:style-name="Text_20_body">La decisión lo ata definitivamente al proyecto.</text:p>
      <text:p text:style-name="Horizontal_20_Line"/>
      <text:h text:style-name="Heading_20_1" text:outline-level="1">Acto IV - La desintegración</text:h>
      <text:h text:style-name="Heading_20_3" text:outline-level="3">Objetivo dramático</text:h>
      <text:p text:style-name="Text_20_body">Destruir la amistad.</text:p>
      <text:h text:style-name="Heading_20_3" text:outline-level="3">Acontecimientos</text:h>
      <text:list xml:id="list2794632192" text:style-name="L8">
        <text:list-item>
          <text:p text:style-name="P8">La búsqueda continúa durante años.</text:p>
        </text:list-item>
        <text:list-item>
          <text:p text:style-name="P8">Los recursos escasean.</text:p>
        </text:list-item>
        <text:list-item>
          <text:p text:style-name="P8">Surgen sospechas y conflictos.</text:p>
        </text:list-item>
      </text:list>
      <text:p text:style-name="Text_20_body">Cada nuevo fracaso aumenta la tensión.</text:p>
      <text:p text:style-name="Text_20_body">Los amigos empiezan a ocultarse información.</text:p>
      <text:p text:style-name="Text_20_body">Aparecen mentiras y traiciones.</text:p>
      <text:h text:style-name="Heading_20_3" text:outline-level="3">Escalada</text:h>
      <text:p text:style-name="Text_20_body">Algunos miembros mueren en circunstancias ambiguas.</text:p>
      <text:p text:style-name="Text_20_body">Accidentes.</text:p>
      <text:p text:style-name="Text_20_body">Peleas.</text:p>
      <text:p text:style-name="Text_20_body">Actos desesperados.</text:p>
      <text:h text:style-name="Heading_20_3" text:outline-level="3">Final del acto</text:h>
      <text:p text:style-name="Text_20_body">Sólo quedan unos pocos supervivientes.</text:p>
      <text:p text:style-name="Text_20_body">La amistad ha desaparecido.</text:p>
      <text:p text:style-name="Horizontal_20_Line"/>
      <text:h text:style-name="Heading_20_1" text:outline-level="1"><text:soft-page-break/>Acto V - El borde del mundo</text:h>
      <text:h text:style-name="Heading_20_3" text:outline-level="3">Objetivo dramático</text:h>
      <text:p text:style-name="Text_20_body">Llevar la búsqueda a su máxima tensión.</text:p>
      <text:h text:style-name="Heading_20_3" text:outline-level="3">Acontecimientos</text:h>
      <text:list xml:id="list2990850671" text:style-name="L9">
        <text:list-item>
          <text:p text:style-name="P9">El último mapa conduce a un gigantesco acantilado.</text:p>
        </text:list-item>
        <text:list-item>
          <text:p text:style-name="P9">Tras años de búsqueda, parece que han llegado a ninguna parte.</text:p>
        </text:list-item>
      </text:list>
      <text:p text:style-name="Text_20_body">Los supervivientes se enfrentan.</text:p>
      <text:p text:style-name="Text_20_body">Toda la frustración acumulada explota.</text:p>
      <text:p text:style-name="Text_20_body">Se reprochan:</text:p>
      <text:list xml:id="list756813798" text:style-name="L10">
        <text:list-item>
          <text:p text:style-name="P10">los años perdidos,</text:p>
        </text:list-item>
        <text:list-item>
          <text:p text:style-name="P10">las muertes,</text:p>
        </text:list-item>
        <text:list-item>
          <text:p text:style-name="P10">las traiciones,</text:p>
        </text:list-item>
        <text:list-item>
          <text:p text:style-name="P10">las oportunidades desperdiciadas.</text:p>
        </text:list-item>
      </text:list>
      <text:h text:style-name="Heading_20_3" text:outline-level="3">Clímax humano</text:h>
      <text:p text:style-name="Text_20_body">La confrontación termina en tragedia.</text:p>
      <text:p text:style-name="Text_20_body">Todos mueren excepto el protagonista.</text:p>
      <text:h text:style-name="Heading_20_3" text:outline-level="3">Descubrimiento</text:h>
      <text:p text:style-name="Text_20_body">Mientras examina el acantilado descubre una abertura oculta en la pared de roca.</text:p>
      <text:p text:style-name="Text_20_body">Desciende.</text:p>
      <text:p text:style-name="Text_20_body">Encuentra una cueva.</text:p>
      <text:p text:style-name="Text_20_body">Y al fondo de ella...</text:p>
      <text:p text:style-name="Text_20_body">una puerta de hierro.</text:p>
      <text:h text:style-name="Heading_20_3" text:outline-level="3">Final del acto</text:h>
      <text:p text:style-name="Text_20_body">La llave encaja perfectamente.</text:p>
      <text:p text:style-name="Horizontal_20_Line"/>
      <text:h text:style-name="Heading_20_1" text:outline-level="1"><text:soft-page-break/>Acto VI - La cámara</text:h>
      <text:h text:style-name="Heading_20_3" text:outline-level="3">Objetivo dramático</text:h>
      <text:p text:style-name="Text_20_body">Revelar la maldición.</text:p>
      <text:h text:style-name="Heading_20_3" text:outline-level="3">Acontecimientos</text:h>
      <text:list xml:id="list1776297484" text:style-name="L11">
        <text:list-item>
          <text:p text:style-name="P11">El protagonista abre la puerta.</text:p>
        </text:list-item>
        <text:list-item>
          <text:p text:style-name="P11">Entra con una lámpara.</text:p>
        </text:list-item>
      </text:list>
      <text:p text:style-name="Text_20_body">No encuentra tesoros.</text:p>
      <text:p text:style-name="Text_20_body">No encuentra riquezas.</text:p>
      <text:p text:style-name="Text_20_body">No encuentra secretos.</text:p>
      <text:p text:style-name="Text_20_body">Sólo una pequeña cámara de piedra.</text:p>
      <text:p text:style-name="Text_20_body">Y varios esqueletos.</text:p>
      <text:p text:style-name="Text_20_body">Tres personas.</text:p>
      <text:p text:style-name="Text_20_body">Muertas hace siglos.</text:p>
      <text:p text:style-name="Text_20_body">Junto a ellas hay restos de lámparas y herramientas.</text:p>
      <text:h text:style-name="Heading_20_3" text:outline-level="3">Revelación</text:h>
      <text:p text:style-name="Text_20_body">Comprende que otros llegaron antes.</text:p>
      <text:p text:style-name="Text_20_body">Otros siguieron las mismas pistas.</text:p>
      <text:p text:style-name="Text_20_body">Otros sacrificaron sus vidas por la misma promesa.</text:p>
      <text:h text:style-name="Heading_20_3" text:outline-level="3">Horror final</text:h>
      <text:p text:style-name="Text_20_body">La puerta se cierra.</text:p>
      <text:p text:style-name="Text_20_body">La llave cae al exterior.</text:p>
      <text:p text:style-name="Text_20_body">El protagonista queda atrapado junto a los esqueletos.</text:p>
      <text:p text:style-name="Text_20_body">Ahora forma parte de la colección.</text:p>
      <text:p text:style-name="Horizontal_20_Line"/>
      <text:h text:style-name="Heading_20_1" text:outline-level="1">Epílogo - El ciclo</text:h>
      <text:list xml:id="list2610023314" text:style-name="L12">
        <text:list-item>
          <text:p text:style-name="P12">Un cuervo encuentra la llave.</text:p>
        </text:list-item>
        <text:list-item>
          <text:p text:style-name="P12">La toma con el pico.</text:p>
        </text:list-item>
        <text:list-item>
          <text:p text:style-name="P12"><text:soft-page-break/>La transporta durante kilómetros.</text:p>
        </text:list-item>
        <text:list-item>
          <text:p text:style-name="P12">Finalmente la deja caer en un camino rural.</text:p>
        </text:list-item>
      </text:list>
      <text:p text:style-name="Text_20_body">Un campesino la recoge.</text:p>
      <text:p text:style-name="Text_20_body">La examina.</text:p>
      <text:p text:style-name="Text_20_body">Le parece extrañamente familiar.</text:p>
      <text:p text:style-name="Text_20_body">Recuerda haber visto ese símbolo en un viejo libro.</text:p>
      <text:p text:style-name="Horizontal_20_Line"/>
      <text:h text:style-name="Heading_20_1" text:outline-level="1">Regreso a la Biblioteca</text:h>
      <text:list xml:id="list3518822637" text:style-name="L13">
        <text:list-item>
          <text:p text:style-name="P13">Elara cierra lentamente el volumen.</text:p>
        </text:list-item>
        <text:list-item>
          <text:p text:style-name="P13">Permanece unos segundos en silencio.</text:p>
        </text:list-item>
        <text:list-item>
          <text:p text:style-name="P13">Mira la portada.</text:p>
        </text:list-item>
        <text:list-item>
          <text:p text:style-name="P13">Vuelve a colocarlo en la estantería.</text:p>
        </text:list-item>
      </text:list>
      <text:p text:style-name="Text_20_body">Mientras se aleja, observa otros libros cercanos.</text:p>
      <text:p text:style-name="Text_20_body">Todos tienen símbolos extraños grabados en el lomo.</text:p>
      <text:p text:style-name="Text_20_body">Por primera vez se pregunta cuántas de aquellas historias terminaron igual.</text:p>
      <text:p text:style-name="Text_20_body">Y cuántas podrían repetirse todavía.</text:p>
      <text:p text:style-name="Text_20_body">Fi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4T10:27:35.338000000</meta:creation-date>
    <dc:date>2026-06-24T10:33:19.226000000</dc:date>
    <meta:editing-duration>PT5M44S</meta:editing-duration>
    <meta:editing-cycles>1</meta:editing-cycles>
    <meta:document-statistic meta:table-count="0" meta:image-count="0" meta:object-count="0" meta:page-count="7" meta:paragraph-count="166" meta:word-count="850" meta:character-count="5112" meta:non-whitespace-character-count="4481"/>
    <meta:generator>LibreOffice/7.3.5.2$Windows_X86_64 LibreOffice_project/184fe81b8c8c30d8b5082578aee2fed2ea847c01</meta:generator>
  </office:meta>
</office:document-meta>
</file>