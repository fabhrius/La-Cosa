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arte 1 - La expedición</text:h>
      <text:p text:style-name="Text_20_body">No tardaron mucho en organizar la expedición.</text:p>
      <text:p text:style-name="Text_20_body">Desde el momento en que el libro llegó a sus manos, la espera comenzó a parecer insoportable.</text:p>
      <text:p text:style-name="Text_20_body">Cada día que pasaba era un día más durante el cual el tesoro continuaba oculto en algún lugar de las montañas.</text:p>
      <text:p text:style-name="Text_20_body">Cada amanecer parecía un retraso innecesario.</text:p>
      <text:p text:style-name="Text_20_body">Cada conversación terminaba inevitablemente hablando de lo mismo.</text:p>
      <text:p text:style-name="Text_20_body">La bóveda.</text:p>
      <text:p text:style-name="Text_20_body">La llave.</text:p>
      <text:p text:style-name="Text_20_body">El mapa.</text:p>
      <text:p text:style-name="Text_20_body">La fortuna del rey.</text:p>
      <text:p text:style-name="Text_20_body">El entusiasmo se había transformado en un poderoso sentimiento de urgencia.</text:p>
      <text:p text:style-name="Text_20_body">Si el tesoro existía, debían encontrarlo.</text:p>
      <text:p text:style-name="Text_20_body">Y debían hacerlo cuanto antes.</text:p>
      <text:p text:style-name="Text_20_body">Durante varios días estudiaron el mapa con atención.</text:p>
      <text:p text:style-name="Text_20_body">Lo extendían sobre la mesa de la casa de Nohk y pasaban horas siguiendo con el dedo las líneas dibujadas siglos atrás.</text:p>
      <text:p text:style-name="Text_20_body">Comparaban las marcas con mapas modernos.</text:p>
      <text:p text:style-name="Text_20_body">Identificaban montañas, ríos y caminos conocidos.</text:p>
      <text:p text:style-name="Text_20_body">Debatían posibles rutas.</text:p>
      <text:p text:style-name="Text_20_body">Calculaban distancias.</text:p>
      <text:p text:style-name="Text_20_body">Discutían lugares adecuados para acampar.</text:p>
      <text:p text:style-name="Text_20_body">Aquello ya no parecía una fantasía.</text:p>
      <text:p text:style-name="Text_20_body">Era un proyecto.</text:p>
      <text:p text:style-name="Text_20_body">Una expedición real.</text:p>
      <text:p text:style-name="Text_20_body">Un desafío que podían planificar.</text:p>
      <text:p text:style-name="Text_20_body">Un objetivo que podían alcanzar.</text:p>
      <text:p text:style-name="Text_20_body">Cada uno asumió responsabilidades concretas.</text:p>
      <text:p text:style-name="Text_20_body">Uno se ocupó de reunir provisiones.</text:p>
      <text:p text:style-name="Text_20_body">Otro revisó los caballos.</text:p>
      <text:p text:style-name="Text_20_body"><text:soft-page-break/>Algunos consiguieron herramientas.</text:p>
      <text:p text:style-name="Text_20_body">Otros prepararon tiendas, mantas, cuerdas y recipientes para transportar agua.</text:p>
      <text:p text:style-name="Text_20_body">Durante días el pueblo observó con curiosidad aquella actividad frenética.</text:p>
      <text:p text:style-name="Text_20_body">Los seis amigos parecían poseídos por una energía inagotable.</text:p>
      <text:p text:style-name="Text_20_body">Trabajaban desde el amanecer hasta el anochecer.</text:p>
      <text:p text:style-name="Text_20_body">Y aun así encontraban fuerzas para reunirse cada noche y seguir hablando del viaje.</text:p>
      <text:p text:style-name="Text_20_body">A medida que los preparativos avanzaban, la aventura comenzaba a parecer cada vez más cercana.</text:p>
      <text:p text:style-name="Text_20_body">Y también cada vez más real.</text:p>
      <text:p text:style-name="Text_20_body">Según sus cálculos, alcanzarían las montañas en pocos días.</text:p>
      <text:p text:style-name="Text_20_body">Después tendrían que internarse en las tierras altas siguiendo las indicaciones del mapa.</text:p>
      <text:p text:style-name="Text_20_body">Si todo salía bien, en menos de una semana llegarían a la zona señalada por el antiguo manuscrito.</text:p>
      <text:p text:style-name="Text_20_body">A partir de allí, el tiempo dependería de la suerte.</text:p>
      <text:p text:style-name="Text_20_body">La ubicación exacta de la bóveda seguía siendo un misterio.</text:p>
      <text:p text:style-name="Text_20_body">Pero eso no les preocupaba.</text:p>
      <text:p text:style-name="Text_20_body">No demasiado.</text:p>
      <text:p text:style-name="Text_20_body">Después de todo, poseían algo que nadie más había tenido jamás.</text:p>
      <text:p text:style-name="Text_20_body">La llave.</text:p>
      <text:p text:style-name="Text_20_body">Aquella pieza de hierro descansaba siempre cerca de ellos.</text:p>
      <text:p text:style-name="Text_20_body">Sobre una mesa.</text:p>
      <text:p text:style-name="Text_20_body">Dentro de una bolsa de cuero.</text:p>
      <text:p text:style-name="Text_20_body">O colgada del cuello de Nohk durante las reuniones.</text:p>
      <text:p text:style-name="Text_20_body">Su sola presencia parecía confirmar que la leyenda era auténtica.</text:p>
      <text:p text:style-name="Text_20_body">Nadie fabricaba una llave tan extraordinaria para abrir una puerta ordinaria.</text:p>
      <text:p text:style-name="Text_20_body">Y si existía una llave, debía existir una cerradura.</text:p>
      <text:p text:style-name="Text_20_body">Y si existía una cerradura, debía existir una puerta.</text:p>
      <text:p text:style-name="Text_20_body">Y detrás de aquella puerta les esperaba el tesoro de un rey.</text:p>
      <text:p text:style-name="Text_20_body">La lógica parecía irrefutable.</text:p>
      <text:p text:style-name="Text_20_body">Con el paso de los días comenzaron a imaginar lo que encontrarían.</text:p>
      <text:p text:style-name="Text_20_body">Algunos hablaban de montañas de oro.</text:p>
      <text:p text:style-name="Text_20_body">Otros imaginaban joyas, coronas y artefactos mágicos.</text:p>
      <text:p text:style-name="Text_20_body"><text:soft-page-break/>Kempht estaba convencido de que hallarían cofres enteros repletos de monedas antiguas.</text:p>
      <text:p text:style-name="Text_20_body">Las discusiones se prolongaban durante horas.</text:p>
      <text:p text:style-name="Text_20_body">Cada teoría era más ambiciosa que la anterior.</text:p>
      <text:p text:style-name="Text_20_body">Y cada nueva posibilidad aumentaba todavía más la emoción del grupo.</text:p>
      <text:p text:style-name="Text_20_body">Por las noches apenas podían dormir.</text:p>
      <text:p text:style-name="Text_20_body">La imaginación viajaba constantemente hacia las montañas.</text:p>
      <text:p text:style-name="Text_20_body">Hacia la puerta de hierro.</text:p>
      <text:p text:style-name="Text_20_body">Hacia la fortuna escondida durante siglos.</text:p>
      <text:p text:style-name="Text_20_body">Ninguno de ellos era capaz de pensar en otra cosa.</text:p>
      <text:p text:style-name="Text_20_body">Finalmente llegó el día de partir.</text:p>
      <text:p text:style-name="Text_20_body">El amanecer apareció limpio y brillante sobre el valle.</text:p>
      <text:p text:style-name="Text_20_body">Las lluvias de la semana anterior habían dejado el aire fresco y transparente.</text:p>
      <text:p text:style-name="Text_20_body">Las montañas se dibujaban con extraordinaria claridad en el horizonte occidental.</text:p>
      <text:p text:style-name="Text_20_body">Parecían llamarles.</text:p>
      <text:p text:style-name="Text_20_body">Invitarles.</text:p>
      <text:p text:style-name="Text_20_body">Prometerles secretos que habían permanecido ocultos durante generaciones.</text:p>
      <text:p text:style-name="Text_20_body">Los seis amigos se reunieron antes de la salida del sol.</text:p>
      <text:p text:style-name="Text_20_body">La carreta estaba preparada.</text:p>
      <text:p text:style-name="Text_20_body">Los caballos descansados.</text:p>
      <text:p text:style-name="Text_20_body">Las provisiones cuidadosamente almacenadas.</text:p>
      <text:p text:style-name="Text_20_body">Las herramientas aseguradas.</text:p>
      <text:p text:style-name="Text_20_body">Todo estaba listo.</text:p>
      <text:p text:style-name="Text_20_body">Durante unos instantes permanecieron observando el pueblo.</text:p>
      <text:p text:style-name="Text_20_body">Las casas.</text:p>
      <text:p text:style-name="Text_20_body">Los campos.</text:p>
      <text:p text:style-name="Text_20_body">Las chimeneas comenzando a despertar.</text:p>
      <text:p text:style-name="Text_20_body">Aquel había sido su mundo durante toda la vida.</text:p>
      <text:p text:style-name="Text_20_body">Y sin embargo, por primera vez, sentían que algo mucho más grande los esperaba más allá del horizonte.</text:p>
      <text:p text:style-name="Text_20_body">Nohk miró a sus compañeros.</text:p>
      <text:p text:style-name="Text_20_body"><text:soft-page-break/>Vio entusiasmo.</text:p>
      <text:p text:style-name="Text_20_body">Confianza.</text:p>
      <text:p text:style-name="Text_20_body">Expectación.</text:p>
      <text:p text:style-name="Text_20_body">Nadie dudaba.</text:p>
      <text:p text:style-name="Text_20_body">Nadie temía.</text:p>
      <text:p text:style-name="Text_20_body">Nadie pensaba en fracasar.</text:p>
      <text:p text:style-name="Text_20_body">¿Por qué iban a hacerlo?</text:p>
      <text:p text:style-name="Text_20_body">Tenían el mapa.</text:p>
      <text:p text:style-name="Text_20_body">Tenían la llave.</text:p>
      <text:p text:style-name="Text_20_body">Tenían el conocimiento que nadie había poseído durante tres siglos.</text:p>
      <text:p text:style-name="Text_20_body">Todo parecía alinearse perfectamente.</text:p>
      <text:p text:style-name="Text_20_body">Todo parecía conducirlos hacia el mismo destino.</text:p>
      <text:p text:style-name="Text_20_body">Nohk sonrió.</text:p>
      <text:p text:style-name="Text_20_body">—Es hora.</text:p>
      <text:p text:style-name="Text_20_body">Los demás asintieron.</text:p>
      <text:p text:style-name="Text_20_body">Los caballos comenzaron a avanzar.</text:p>
      <text:p text:style-name="Text_20_body">Las ruedas de la carreta crujieron sobre el camino de tierra.</text:p>
      <text:p text:style-name="Text_20_body">Y mientras los primeros rayos del sol iluminaban el valle de Oldwood, los seis amigos abandonaron el pueblo.</text:p>
      <text:p text:style-name="Text_20_body">Ninguno volvió la vista atrás.</text:p>
      <text:p text:style-name="Text_20_body">Ante ellos se extendían los bosques, las montañas y la promesa de una riqueza inimaginable.</text:p>
      <text:p text:style-name="Text_20_body">La aventura había comenzado.</text:p>
      <text:p text:style-name="Standard"/>
      <text:p text:style-name="Standard"/>
      <text:p text:style-name="Horizontal_20_Line"/>
      <text:p text:style-name="Text_20_body"/>
      <text:h text:style-name="Heading_20_2" text:outline-level="2">Parte 2 - Los primeros contratiempos</text:h>
      <text:p text:style-name="Text_20_body">Los primeros días transcurrieron mejor de lo esperado.</text:p>
      <text:p text:style-name="Text_20_body">El camino era largo, pero agradable.</text:p>
      <text:p text:style-name="Text_20_body"><text:soft-page-break/>Atravesaron bosques de robles y abedules, cruzaron pequeñas aldeas y siguieron antiguos senderos comerciales que serpenteaban entre colinas cubiertas de hierba.</text:p>
      <text:p text:style-name="Text_20_body">Las noches terminaban alrededor del fuego.</text:p>
      <text:p text:style-name="Text_20_body">Comían juntos.</text:p>
      <text:p text:style-name="Text_20_body">Hablaban del tesoro.</text:p>
      <text:p text:style-name="Text_20_body">Discutían qué harían cuando regresaran convertidos en hombres ricos.</text:p>
      <text:p text:style-name="Text_20_body">La aventura parecía exactamente aquello que habían imaginado.</text:p>
      <text:p text:style-name="Text_20_body">Pero las montañas todavía estaban lejos.</text:p>
      <text:p text:style-name="Text_20_body">Y las montañas no compartían su entusiasmo.</text:p>
      <text:h text:style-name="Heading_20_3" text:outline-level="3">La tormenta</text:h>
      <text:p text:style-name="Text_20_body">Al quinto día de viaje alcanzaron la extensa zona pantanosa que rodeaba el río Sigsagueante.</text:p>
      <text:p text:style-name="Text_20_body">El paisaje cambió por completo.</text:p>
      <text:p text:style-name="Text_20_body">Los bosques desaparecieron.</text:p>
      <text:p text:style-name="Text_20_body">La tierra firme se volvió escasa.</text:p>
      <text:p text:style-name="Text_20_body">Pequeñas islas de hierba sobresalían entre enormes extensiones de agua oscura.</text:p>
      <text:p text:style-name="Text_20_body">El camino se estrechó hasta convertirse en una franja de terreno apenas más elevada que el propio pantano.</text:p>
      <text:p text:style-name="Text_20_body">Durante la mañana el cielo permaneció despejado.</text:p>
      <text:p text:style-name="Text_20_body">El sol brillaba.</text:p>
      <text:p text:style-name="Text_20_body">Nada hacía presagiar problemas.</text:p>
      <text:p text:style-name="Text_20_body">Sin embargo, al avanzar la tarde, las nubes comenzaron a aparecer por el oeste.</text:p>
      <text:p text:style-name="Text_20_body">Primero fueron unas pocas manchas oscuras.</text:p>
      <text:p text:style-name="Text_20_body">Después una masa compacta que cubrió rápidamente el horizonte.</text:p>
      <text:p text:style-name="Text_20_body">El viento cambió.</text:p>
      <text:p text:style-name="Text_20_body">El aire se volvió húmedo.</text:p>
      <text:p text:style-name="Text_20_body">Pesado.</text:p>
      <text:p text:style-name="Text_20_body">Inquietante.</text:p>
      <text:p text:style-name="Text_20_body">—No me gusta esto —murmuró Kempht observando el cielo.</text:p>
      <text:p text:style-name="Text_20_body">Nohk también lo vio.</text:p>
      <text:p text:style-name="Text_20_body">Pero continuaron avanzando.</text:p>
      <text:p text:style-name="Text_20_body"><text:soft-page-break/>La zona pantanosa era un lugar terrible para detenerse.</text:p>
      <text:p text:style-name="Text_20_body">Debían alcanzar terreno elevado.</text:p>
      <text:p text:style-name="Text_20_body">Las primeras gotas comenzaron a caer pocos minutos después.</text:p>
      <text:p text:style-name="Text_20_body">Pequeñas.</text:p>
      <text:p text:style-name="Text_20_body">Dispersas.</text:p>
      <text:p text:style-name="Text_20_body">Inofensivas.</text:p>
      <text:p text:style-name="Text_20_body">Luego llegaron más.</text:p>
      <text:p text:style-name="Text_20_body">Y más.</text:p>
      <text:p text:style-name="Text_20_body">El grupo aceleró el paso.</text:p>
      <text:p text:style-name="Text_20_body">Los caballos comenzaron a ponerse nerviosos.</text:p>
      <text:p text:style-name="Text_20_body">El viento aumentó.</text:p>
      <text:p text:style-name="Text_20_body">Los árboles cercanos se inclinaron.</text:p>
      <text:p text:style-name="Text_20_body">Un trueno retumbó en la distancia.</text:p>
      <text:p text:style-name="Text_20_body">Y entonces llegó la tormenta.</text:p>
      <text:p text:style-name="Text_20_body">Fue tan repentina que ninguno tuvo tiempo de reaccionar.</text:p>
      <text:p text:style-name="Text_20_body">El cielo se oscureció por completo.</text:p>
      <text:p text:style-name="Text_20_body">Los relámpagos comenzaron a desgarrar las nubes.</text:p>
      <text:p text:style-name="Text_20_body">Los truenos sacudieron el aire.</text:p>
      <text:p text:style-name="Text_20_body">Y un instante después el agua cayó sobre ellos como si el propio cielo se hubiera roto.</text:p>
      <text:p text:style-name="Text_20_body">La lluvia era tan intensa que resultaba difícil respirar.</text:p>
      <text:p text:style-name="Text_20_body">La visibilidad desapareció.</text:p>
      <text:p text:style-name="Text_20_body">El paisaje quedó oculto tras una cortina gris.</text:p>
      <text:p text:style-name="Text_20_body">Los hombres apenas podían distinguir las siluetas de sus compañeros.</text:p>
      <text:p text:style-name="Text_20_body">—¡Seguid avanzando! —gritó Nohk.</text:p>
      <text:p text:style-name="Text_20_body">Pero incluso su voz desaparecía entre el ruido de la tormenta.</text:p>
      <text:p text:style-name="Text_20_body">Tiraban de la carreta.</text:p>
      <text:p text:style-name="Text_20_body">Empujaban los caballos.</text:p>
      <text:p text:style-name="Text_20_body">Intentaban mantenerse juntos.</text:p>
      <text:p text:style-name="Text_20_body">Cada paso era una lucha.</text:p>
      <text:p text:style-name="Text_20_body">Por primera vez desde que abandonaron el pueblo sintieron auténtico miedo.</text:p>
      <text:p text:style-name="Text_20_body"><text:soft-page-break/>No al fracaso.</text:p>
      <text:p text:style-name="Text_20_body">No a la pobreza.</text:p>
      <text:p text:style-name="Text_20_body">Sino a algo mucho más simple.</text:p>
      <text:p text:style-name="Text_20_body">A no sobrevivir.</text:p>
      <text:p text:style-name="Text_20_body">El agua comenzó a acumularse rápidamente.</text:p>
      <text:p text:style-name="Text_20_body">Al principio cubría los tobillos.</text:p>
      <text:p text:style-name="Text_20_body">Luego las rodillas.</text:p>
      <text:p text:style-name="Text_20_body">Después la cintura.</text:p>
      <text:p text:style-name="Text_20_body">Nadie sabía exactamente dónde terminaba el camino y dónde comenzaba el río.</text:p>
      <text:p text:style-name="Text_20_body">Tal vez se habían desviado.</text:p>
      <text:p text:style-name="Text_20_body">Tal vez el río se estaba desbordando.</text:p>
      <text:p text:style-name="Text_20_body">Tal vez ambas cosas.</text:p>
      <text:p text:style-name="Text_20_body">El suelo desaparecía bajo sus pies.</text:p>
      <text:p text:style-name="Text_20_body">Cada paso terminaba con una bota hundiéndose profundamente en el barro.</text:p>
      <text:p text:style-name="Text_20_body">Los caballos avanzaban con enorme dificultad.</text:p>
      <text:p text:style-name="Text_20_body">Resoplaban.</text:p>
      <text:p text:style-name="Text_20_body">Patinaban.</text:p>
      <text:p text:style-name="Text_20_body">Luchaban por mantenerse erguidos.</text:p>
      <text:p text:style-name="Text_20_body">Un relámpago iluminó brevemente el paisaje.</text:p>
      <text:p text:style-name="Text_20_body">Y todos comprendieron la magnitud del problema.</text:p>
      <text:p text:style-name="Text_20_body">Ya no existía camino.</text:p>
      <text:p text:style-name="Text_20_body">Todo era agua.</text:p>
      <text:p text:style-name="Text_20_body">Todo era barro.</text:p>
      <text:p text:style-name="Text_20_body">Todo era pantano.</text:p>
      <text:p text:style-name="Text_20_body">La carreta avanzó unos metros más.</text:p>
      <text:p text:style-name="Text_20_body">Entonces se detuvo.</text:p>
      <text:p text:style-name="Text_20_body">Una de las ruedas se hundió.</text:p>
      <text:p text:style-name="Text_20_body">Los caballos tiraron.</text:p>
      <text:p text:style-name="Text_20_body">La madera crujió.</text:p>
      <text:p text:style-name="Text_20_body">Nada ocurrió.</text:p>
      <text:p text:style-name="Text_20_body"><text:soft-page-break/>La rueda desapareció todavía más profundamente.</text:p>
      <text:p text:style-name="Text_20_body">Intentaron empujar.</text:p>
      <text:p text:style-name="Text_20_body">Intentaron cavar.</text:p>
      <text:p text:style-name="Text_20_body">Intentaron liberar el vehículo.</text:p>
      <text:p text:style-name="Text_20_body">Fue inútil.</text:p>
      <text:p text:style-name="Text_20_body">La tormenta estaba ganando.</text:p>
      <text:p text:style-name="Text_20_body">—¡Dejadla! —gritó uno de los hombres.</text:p>
      <text:p text:style-name="Text_20_body">Nohk dudó.</text:p>
      <text:p text:style-name="Text_20_body">Toda su comida.</text:p>
      <text:p text:style-name="Text_20_body">La mayor parte de las herramientas.</text:p>
      <text:p text:style-name="Text_20_body">Las mantas.</text:p>
      <text:p text:style-name="Text_20_body">Las provisiones.</text:p>
      <text:p text:style-name="Text_20_body">Todo estaba allí.</text:p>
      <text:p text:style-name="Text_20_body">Pero la decisión ya no les pertenecía.</text:p>
      <text:p text:style-name="Text_20_body">La naturaleza había decidido por ellos.</text:p>
      <text:p text:style-name="Text_20_body">Abandonaron la carreta.</text:p>
      <text:p text:style-name="Text_20_body">Cargaron sobre los hombros todo lo que pudieron rescatar.</text:p>
      <text:p text:style-name="Text_20_body">Y comenzaron a avanzar.</text:p>
      <text:p text:style-name="Text_20_body">La marcha se convirtió en una pesadilla.</text:p>
      <text:p text:style-name="Text_20_body">El agua les llegaba al pecho.</text:p>
      <text:p text:style-name="Text_20_body">El barro intentaba arrancarles las botas.</text:p>
      <text:p text:style-name="Text_20_body">La lluvia golpeaba sus rostros con violencia.</text:p>
      <text:p text:style-name="Text_20_body">Varias veces alguno perdió el equilibrio.</text:p>
      <text:p text:style-name="Text_20_body">Los demás lo ayudaban inmediatamente.</text:p>
      <text:p text:style-name="Text_20_body">Nadie quedó atrás.</text:p>
      <text:p text:style-name="Text_20_body">Se sujetaban unos a otros.</text:p>
      <text:p text:style-name="Text_20_body">Compartían la carga.</text:p>
      <text:p text:style-name="Text_20_body">Se animaban mutuamente.</text:p>
      <text:p text:style-name="Text_20_body">En medio del caos seguían siendo amigos.</text:p>
      <text:p text:style-name="Text_20_body">Seguían siendo un equipo.</text:p>
      <text:p text:style-name="Text_20_body"><text:soft-page-break/>Finalmente divisaron terreno rocoso.</text:p>
      <text:p text:style-name="Text_20_body">Una elevación que sobresalía del pantano.</text:p>
      <text:p text:style-name="Text_20_body">La alcanzaron exhaustos.</text:p>
      <text:p text:style-name="Text_20_body">Empapados.</text:p>
      <text:p text:style-name="Text_20_body">Temblando.</text:p>
      <text:p text:style-name="Text_20_body">Y allí permanecieron durante horas esperando que la tormenta terminara.</text:p>
      <text:p text:style-name="Text_20_body">Cuando la noche llegó, la lluvia había cesado.</text:p>
      <text:p text:style-name="Text_20_body">El silencio regresó poco a poco.</text:p>
      <text:p text:style-name="Text_20_body">Ante ellos se extendía una enorme laguna oscura.</text:p>
      <text:p text:style-name="Text_20_body">El paisaje había cambiado por completo.</text:p>
      <text:p text:style-name="Text_20_body">Nadie podía identificar dónde había estado el camino.</text:p>
      <text:p text:style-name="Text_20_body">Ni dónde había quedado la carreta.</text:p>
      <text:p text:style-name="Text_20_body">Ni dónde estaban los caballos.</text:p>
      <text:p text:style-name="Text_20_body">Todo había desaparecido.</text:p>
      <text:p text:style-name="Text_20_body">Durante mucho tiempo contemplaron el agua sin decir nada.</text:p>
      <text:p text:style-name="Text_20_body">La expedición acababa de perder la mayor parte de sus recursos.</text:p>
      <text:p text:style-name="Text_20_body">Y apenas habían comenzado.</text:p>
      <text:h text:style-name="Heading_20_3" text:outline-level="3">El puente roto</text:h>
      <text:p text:style-name="Text_20_body">Los días siguientes fueron mucho más difíciles.</text:p>
      <text:p text:style-name="Text_20_body">Ahora transportaban el equipo a la espalda.</text:p>
      <text:p text:style-name="Text_20_body">Las provisiones eran escasas.</text:p>
      <text:p text:style-name="Text_20_body">El cansancio se acumulaba.</text:p>
      <text:p text:style-name="Text_20_body">Y el entusiasmo inicial comenzaba a mezclarse con preocupación.</text:p>
      <text:p text:style-name="Text_20_body">Sin embargo continuaron.</text:p>
      <text:p text:style-name="Text_20_body">El mapa seguía señalando un objetivo concreto.</text:p>
      <text:p text:style-name="Text_20_body">Y cada día los acercaba más a él.</text:p>
      <text:p text:style-name="Text_20_body">Finalmente alcanzaron la región montañosa.</text:p>
      <text:p text:style-name="Text_20_body">Según sus cálculos, ya no se encontraban lejos del destino.</text:p>
      <text:p text:style-name="Text_20_body">Quizá diez millas.</text:p>
      <text:p text:style-name="Text_20_body"><text:soft-page-break/>Tal vez menos.</text:p>
      <text:p text:style-name="Text_20_body">Un día de marcha.</text:p>
      <text:p text:style-name="Text_20_body">Dos como mucho.</text:p>
      <text:p text:style-name="Text_20_body">La noticia levantó la moral del grupo.</text:p>
      <text:p text:style-name="Text_20_body">Después de todas las dificultades, el tesoro parecía estar al alcance de la mano.</text:p>
      <text:p text:style-name="Text_20_body">Pero entonces llegaron al acantilado.</text:p>
      <text:p text:style-name="Text_20_body">Y descubrieron el problema.</text:p>
      <text:p text:style-name="Text_20_body">El mapa mostraba un antiguo puente de piedra que conectaba ambas regiones de Terroja.</text:p>
      <text:p text:style-name="Text_20_body">Sin embargo el puente ya no existía.</text:p>
      <text:p text:style-name="Text_20_body">Sólo quedaban algunos fragmentos adheridos a los extremos del precipicio.</text:p>
      <text:p text:style-name="Text_20_body">El resto había desaparecido.</text:p>
      <text:p text:style-name="Text_20_body">Probablemente siglos atrás.</text:p>
      <text:p text:style-name="Text_20_body">Abajo rugía un río violento.</text:p>
      <text:p text:style-name="Text_20_body">Muy por debajo de ellos.</text:p>
      <text:p text:style-name="Text_20_body">El silencio se apoderó del grupo.</text:p>
      <text:p text:style-name="Text_20_body">Todos observaban el vacío.</text:p>
      <text:p text:style-name="Text_20_body">Todos comprendían lo mismo.</text:p>
      <text:p text:style-name="Text_20_body">La ruta había desaparecido.</text:p>
      <text:p text:style-name="Text_20_body">Durante varios minutos nadie habló.</text:p>
      <text:p text:style-name="Text_20_body">Finalmente uno de ellos rompió el silencio.</text:p>
      <text:p text:style-name="Text_20_body">—Hemos llegado hasta aquí.</text:p>
      <text:p text:style-name="Text_20_body">—Y no podemos seguir.</text:p>
      <text:p text:style-name="Text_20_body">—Podemos volver.</text:p>
      <text:p text:style-name="Text_20_body">La palabra quedó suspendida en el aire.</text:p>
      <text:p text:style-name="Text_20_body">Volver.</text:p>
      <text:p text:style-name="Text_20_body">Era la primera vez que alguien la pronunciaba.</text:p>
      <text:p text:style-name="Text_20_body">Varios bajaron la mirada.</text:p>
      <text:p text:style-name="Text_20_body">Otros contemplaron nuevamente el precipicio.</text:p>
      <text:p text:style-name="Text_20_body">La posibilidad era real.</text:p>
      <text:p text:style-name="Text_20_body">Quizá la única decisión sensata.</text:p>
      <text:p text:style-name="Text_20_body"><text:soft-page-break/>Nohk sintió una punzada de frustración.</text:p>
      <text:p text:style-name="Text_20_body">Habían perdido la carreta.</text:p>
      <text:p text:style-name="Text_20_body">Los caballos.</text:p>
      <text:p text:style-name="Text_20_body">Las provisiones.</text:p>
      <text:p text:style-name="Text_20_body">Días enteros de viaje.</text:p>
      <text:p text:style-name="Text_20_body">No podían regresar ahora.</text:p>
      <text:p text:style-name="Text_20_body">No después de todo aquello.</text:p>
      <text:p text:style-name="Text_20_body">—Yo no voy a abandonar —dijo finalmente.</text:p>
      <text:p text:style-name="Text_20_body">Su voz sonó más dura de lo habitual.</text:p>
      <text:p text:style-name="Text_20_body">Algunos lo miraron con sorpresa.</text:p>
      <text:p text:style-name="Text_20_body">—De algún modo cruzaremos.</text:p>
      <text:p text:style-name="Text_20_body">Nadie respondió inmediatamente.</text:p>
      <text:p text:style-name="Text_20_body">Pero poco a poco comenzaron a surgir otras voces.</text:p>
      <text:p text:style-name="Text_20_body">Primero una.</text:p>
      <text:p text:style-name="Text_20_body">Después otra.</text:p>
      <text:p text:style-name="Text_20_body">Y otra más.</text:p>
      <text:p text:style-name="Text_20_body">Ninguno quería ser el primero en rendirse.</text:p>
      <text:p text:style-name="Text_20_body">No tan cerca del objetivo.</text:p>
      <text:p text:style-name="Text_20_body">No después de haber llegado tan lejos.</text:p>
      <text:p text:style-name="Text_20_body">Finalmente tomaron una decisión.</text:p>
      <text:p text:style-name="Text_20_body">Descenderían por la pared del acantilado.</text:p>
      <text:p text:style-name="Text_20_body">Cruzarían el río.</text:p>
      <text:p text:style-name="Text_20_body">Y tratarían de escalar por el lado opuesto.</text:p>
      <text:p text:style-name="Text_20_body">La idea era peligrosa.</text:p>
      <text:p text:style-name="Text_20_body">Tal vez imposible.</text:p>
      <text:p text:style-name="Text_20_body">Pero ya era la única opción.</text:p>
      <text:p text:style-name="Text_20_body">Una hora más tarde comenzaron el descenso.</text:p>
      <text:p text:style-name="Text_20_body">Las manos se aferraban a grietas estrechas.</text:p>
      <text:p text:style-name="Text_20_body">Las botas buscaban apoyo sobre el granito pulido.</text:p>
      <text:p text:style-name="Text_20_body">Debajo de ellos se abría el vacío.</text:p>
      <text:p text:style-name="Text_20_body"><text:soft-page-break/>Y mientras las sombras del atardecer comenzaban a extenderse sobre las montañas, los seis amigos descendieron lentamente hacia el abismo.</text:p>
      <text:p text:style-name="P1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5T10:56:39.456000000</meta:creation-date>
    <dc:date>2026-06-25T14:24:21.173000000</dc:date>
    <meta:editing-duration>PT7M30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12" meta:paragraph-count="319" meta:word-count="1915" meta:character-count="12077" meta:non-whitespace-character-count="10481"/>
  </office:meta>
</office:document-meta>
</file>