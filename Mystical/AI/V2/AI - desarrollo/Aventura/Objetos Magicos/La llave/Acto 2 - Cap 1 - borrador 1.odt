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rte 1 - La expedición</text:h>
      <text:p text:style-name="Text_20_body">No tardaron mucho en organizar la expedición.</text:p>
      <text:p text:style-name="Text_20_body">Desde el momento en que el libro llegó a sus manos, la espera comenzó a parecer insoportable.</text:p>
      <text:p text:style-name="Text_20_body">Cada día que pasaba era un día más durante el cual el tesoro continuaba oculto en algún lugar de las montañas.</text:p>
      <text:p text:style-name="Text_20_body">Cada amanecer parecía un retraso innecesario.</text:p>
      <text:p text:style-name="Text_20_body">Cada conversación terminaba inevitablemente hablando de lo mismo.</text:p>
      <text:p text:style-name="Text_20_body">La bóveda.</text:p>
      <text:p text:style-name="Text_20_body">La llave.</text:p>
      <text:p text:style-name="Text_20_body">El mapa.</text:p>
      <text:p text:style-name="Text_20_body">La fortuna del rey.</text:p>
      <text:p text:style-name="Text_20_body">El entusiasmo se había transformado en un poderoso sentimiento de urgencia.</text:p>
      <text:p text:style-name="Text_20_body">Si el tesoro existía, debían encontrarlo.</text:p>
      <text:p text:style-name="Text_20_body">Y debían hacerlo cuanto antes.</text:p>
      <text:p text:style-name="Text_20_body">Durante varios días estudiaron el mapa con atención.</text:p>
      <text:p text:style-name="Text_20_body">Lo extendían sobre la mesa de la casa de Nohk y pasaban horas siguiendo con el dedo las líneas dibujadas siglos atrás.</text:p>
      <text:p text:style-name="Text_20_body">Comparaban las marcas con mapas modernos.</text:p>
      <text:p text:style-name="Text_20_body">Identificaban montañas, ríos y caminos conocidos.</text:p>
      <text:p text:style-name="Text_20_body">Debatían posibles rutas.</text:p>
      <text:p text:style-name="Text_20_body">Calculaban distancias.</text:p>
      <text:p text:style-name="Text_20_body">Discutían lugares adecuados para acampar.</text:p>
      <text:p text:style-name="Text_20_body">Aquello ya no parecía una fantasía.</text:p>
      <text:p text:style-name="Text_20_body">Era un proyecto.</text:p>
      <text:p text:style-name="Text_20_body">Una expedición real.</text:p>
      <text:p text:style-name="Text_20_body">Un desafío que podían planificar.</text:p>
      <text:p text:style-name="Text_20_body">Un objetivo que podían alcanzar.</text:p>
      <text:p text:style-name="Text_20_body">Cada uno asumió responsabilidades concretas.</text:p>
      <text:p text:style-name="Text_20_body">Uno se ocupó de reunir provisiones.</text:p>
      <text:p text:style-name="Text_20_body">Otro revisó los caballos.</text:p>
      <text:p text:style-name="Text_20_body"><text:soft-page-break/>Algunos consiguieron herramientas.</text:p>
      <text:p text:style-name="Text_20_body">Otros prepararon tiendas, mantas, cuerdas y recipientes para transportar agua.</text:p>
      <text:p text:style-name="Text_20_body">Durante días el pueblo observó con curiosidad aquella actividad frenética.</text:p>
      <text:p text:style-name="Text_20_body">Los seis amigos parecían poseídos por una energía inagotable.</text:p>
      <text:p text:style-name="Text_20_body">Trabajaban desde el amanecer hasta el anochecer.</text:p>
      <text:p text:style-name="Text_20_body">Y aun así encontraban fuerzas para reunirse cada noche y seguir hablando del viaje.</text:p>
      <text:p text:style-name="Text_20_body">A medida que los preparativos avanzaban, la aventura comenzaba a parecer cada vez más cercana.</text:p>
      <text:p text:style-name="Text_20_body">Y también cada vez más real.</text:p>
      <text:p text:style-name="Text_20_body">Según sus cálculos, alcanzarían las montañas en pocos días.</text:p>
      <text:p text:style-name="Text_20_body">Después tendrían que internarse en las tierras altas siguiendo las indicaciones del mapa.</text:p>
      <text:p text:style-name="Text_20_body">Si todo salía bien, en menos de una semana llegarían a la zona señalada por el antiguo manuscrito.</text:p>
      <text:p text:style-name="Text_20_body">A partir de allí, el tiempo dependería de la suerte.</text:p>
      <text:p text:style-name="Text_20_body">La ubicación exacta de la bóveda seguía siendo un misterio.</text:p>
      <text:p text:style-name="Text_20_body">Pero eso no les preocupaba.</text:p>
      <text:p text:style-name="Text_20_body">No demasiado.</text:p>
      <text:p text:style-name="Text_20_body">Después de todo, poseían algo que nadie más había tenido jamás.</text:p>
      <text:p text:style-name="Text_20_body">La llave.</text:p>
      <text:p text:style-name="Text_20_body">Aquella pieza de hierro descansaba siempre cerca de ellos.</text:p>
      <text:p text:style-name="Text_20_body">Sobre una mesa.</text:p>
      <text:p text:style-name="Text_20_body">Dentro de una bolsa de cuero.</text:p>
      <text:p text:style-name="Text_20_body">O colgada del cuello de Nohk durante las reuniones.</text:p>
      <text:p text:style-name="Text_20_body">Su sola presencia parecía confirmar que la leyenda era auténtica.</text:p>
      <text:p text:style-name="Text_20_body">Nadie fabricaba una llave tan extraordinaria para abrir una puerta ordinaria.</text:p>
      <text:p text:style-name="Text_20_body">Y si existía una llave, debía existir una cerradura.</text:p>
      <text:p text:style-name="Text_20_body">Y si existía una cerradura, debía existir una puerta.</text:p>
      <text:p text:style-name="Text_20_body">Y detrás de aquella puerta les esperaba el tesoro de un rey.</text:p>
      <text:p text:style-name="Text_20_body">La lógica parecía irrefutable.</text:p>
      <text:p text:style-name="Text_20_body">Con el paso de los días comenzaron a imaginar lo que encontrarían.</text:p>
      <text:p text:style-name="Text_20_body">Algunos hablaban de montañas de oro.</text:p>
      <text:p text:style-name="Text_20_body">Otros imaginaban joyas, coronas y artefactos mágicos.</text:p>
      <text:p text:style-name="Text_20_body"><text:soft-page-break/>Kempht estaba convencido de que hallarían cofres enteros repletos de monedas antiguas.</text:p>
      <text:p text:style-name="Text_20_body">Las discusiones se prolongaban durante horas.</text:p>
      <text:p text:style-name="Text_20_body">Cada teoría era más ambiciosa que la anterior.</text:p>
      <text:p text:style-name="Text_20_body">Y cada nueva posibilidad aumentaba todavía más la emoción del grupo.</text:p>
      <text:p text:style-name="Text_20_body">Por las noches apenas podían dormir.</text:p>
      <text:p text:style-name="Text_20_body">La imaginación viajaba constantemente hacia las montañas.</text:p>
      <text:p text:style-name="Text_20_body">Hacia la puerta de hierro.</text:p>
      <text:p text:style-name="Text_20_body">Hacia la fortuna escondida durante siglos.</text:p>
      <text:p text:style-name="Text_20_body">Ninguno de ellos era capaz de pensar en otra cosa.</text:p>
      <text:p text:style-name="Text_20_body">Finalmente llegó el día de partir.</text:p>
      <text:p text:style-name="Text_20_body">El amanecer apareció limpio y brillante sobre el valle.</text:p>
      <text:p text:style-name="Text_20_body">Las lluvias de la semana anterior habían dejado el aire fresco y transparente.</text:p>
      <text:p text:style-name="Text_20_body">Las montañas se dibujaban con extraordinaria claridad en el horizonte occidental.</text:p>
      <text:p text:style-name="Text_20_body">Parecían llamarles.</text:p>
      <text:p text:style-name="Text_20_body">Invitarles.</text:p>
      <text:p text:style-name="Text_20_body">Prometerles secretos que habían permanecido ocultos durante generaciones.</text:p>
      <text:p text:style-name="Text_20_body">Los seis amigos se reunieron antes de la salida del sol.</text:p>
      <text:p text:style-name="Text_20_body">La carreta estaba preparada.</text:p>
      <text:p text:style-name="Text_20_body">Los caballos descansados.</text:p>
      <text:p text:style-name="Text_20_body">Las provisiones cuidadosamente almacenadas.</text:p>
      <text:p text:style-name="Text_20_body">Las herramientas aseguradas.</text:p>
      <text:p text:style-name="Text_20_body">Todo estaba listo.</text:p>
      <text:p text:style-name="Text_20_body">Durante unos instantes permanecieron observando el pueblo.</text:p>
      <text:p text:style-name="Text_20_body">Las casas.</text:p>
      <text:p text:style-name="Text_20_body">Los campos.</text:p>
      <text:p text:style-name="Text_20_body">Las chimeneas comenzando a despertar.</text:p>
      <text:p text:style-name="Text_20_body">Aquel había sido su mundo durante toda la vida.</text:p>
      <text:p text:style-name="Text_20_body">Y sin embargo, por primera vez, sentían que algo mucho más grande los esperaba más allá del horizonte.</text:p>
      <text:p text:style-name="Text_20_body">Nohk miró a sus compañeros.</text:p>
      <text:p text:style-name="Text_20_body"><text:soft-page-break/>Vio entusiasmo.</text:p>
      <text:p text:style-name="Text_20_body">Confianza.</text:p>
      <text:p text:style-name="Text_20_body">Expectación.</text:p>
      <text:p text:style-name="Text_20_body">Nadie dudaba.</text:p>
      <text:p text:style-name="Text_20_body">Nadie temía.</text:p>
      <text:p text:style-name="Text_20_body">Nadie pensaba en fracasar.</text:p>
      <text:p text:style-name="Text_20_body">¿Por qué iban a hacerlo?</text:p>
      <text:p text:style-name="Text_20_body">Tenían el mapa.</text:p>
      <text:p text:style-name="Text_20_body">Tenían la llave.</text:p>
      <text:p text:style-name="Text_20_body">Tenían el conocimiento que nadie había poseído durante tres siglos.</text:p>
      <text:p text:style-name="Text_20_body">Todo parecía alinearse perfectamente.</text:p>
      <text:p text:style-name="Text_20_body">Todo parecía conducirlos hacia el mismo destino.</text:p>
      <text:p text:style-name="Text_20_body">Nohk sonrió.</text:p>
      <text:p text:style-name="Text_20_body">—Es hora.</text:p>
      <text:p text:style-name="Text_20_body">Los demás asintieron.</text:p>
      <text:p text:style-name="Text_20_body">Los caballos comenzaron a avanzar.</text:p>
      <text:p text:style-name="Text_20_body">Las ruedas de la carreta crujieron sobre el camino de tierra.</text:p>
      <text:p text:style-name="Text_20_body">Y mientras los primeros rayos del sol iluminaban el valle de Oldwood, los seis amigos abandonaron el pueblo.</text:p>
      <text:p text:style-name="Text_20_body">Ninguno volvió la vista atrás.</text:p>
      <text:p text:style-name="Text_20_body">Ante ellos se extendían los bosques, las montañas y la promesa de una riqueza inimaginable.</text:p>
      <text:p text:style-name="Text_20_body">La aventura había comenza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0:56:39.456000000</meta:creation-date>
    <dc:date>2026-06-25T11:02:12.359000000</dc:date>
    <meta:editing-duration>PT5M33S</meta:editing-duration>
    <meta:editing-cycles>1</meta:editing-cycles>
    <meta:document-statistic meta:table-count="0" meta:image-count="0" meta:object-count="0" meta:page-count="4" meta:paragraph-count="108" meta:word-count="752" meta:character-count="4760" meta:non-whitespace-character-count="4116"/>
    <meta:generator>LibreOffice/7.3.5.2$Windows_X86_64 LibreOffice_project/184fe81b8c8c30d8b5082578aee2fed2ea847c01</meta:generator>
  </office:meta>
</office:document-meta>
</file>