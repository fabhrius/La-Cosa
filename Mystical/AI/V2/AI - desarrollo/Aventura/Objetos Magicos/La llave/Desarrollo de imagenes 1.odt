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, lo he entendido.</text:p>
      <text:p text:style-name="Text_20_body">Antes de diseñar las imágenes individuales, creo que conviene fijar una <text:span text:style-name="Strong_20_Emphasis">biblia visual mínima</text:span> para que las 17 ilustraciones parezcan pertenecer al mismo libro y no a proyectos distintos.</text:p>
      <text:h text:style-name="Heading_20_3" text:outline-level="3">Estética general del cuento</text:h>
      <text:p text:style-name="Text_20_body"><text:span text:style-name="Strong_20_Emphasis">Género visual</text:span></text:p>
      <text:list xml:id="list3561598559" text:style-name="L1">
        <text:list-item>
          <text:p text:style-name="P1">Fantasía medieval realista.</text:p>
        </text:list-item>
        <text:list-item>
          <text:p text:style-name="P1">Tono adulto.</text:p>
        </text:list-item>
        <text:list-item>
          <text:p text:style-name="P1">Misterio, aventura y horror progresivo.</text:p>
        </text:list-item>
        <text:list-item>
          <text:p text:style-name="P1">Nada caricaturesco.</text:p>
        </text:list-item>
        <text:list-item>
          <text:p text:style-name="P1">Nada épico-fantástico al estilo héroes invencibles.</text:p>
        </text:list-item>
        <text:list-item>
          <text:p text:style-name="P1">Más cercano a una novela ilustrada que a un videojuego.</text:p>
        </text:list-item>
      </text:list>
      <text:p text:style-name="Text_20_body"><text:span text:style-name="Strong_20_Emphasis">Inspiración visual</text:span></text:p>
      <text:list xml:id="list1469259439" text:style-name="L2">
        <text:list-item>
          <text:p text:style-name="P2">Paisajes amplios y melancólicos.</text:p>
        </text:list-item>
        <text:list-item>
          <text:p text:style-name="P2">Naturaleza dominante.</text:p>
        </text:list-item>
        <text:list-item>
          <text:p text:style-name="P2">Personajes pequeños frente al mundo.</text:p>
        </text:list-item>
        <text:list-item>
          <text:p text:style-name="P2">Sensación de belleza al principio.</text:p>
        </text:list-item>
        <text:list-item>
          <text:p text:style-name="P2">Sensación de decadencia y amenaza al final.</text:p>
        </text:list-item>
      </text:list>
      <text:p text:style-name="Text_20_body"><text:span text:style-name="Strong_20_Emphasis">Evolución de la paleta</text:span></text:p>
      <text:list xml:id="list3491328528" text:style-name="L3">
        <text:list-item>
          <text:p text:style-name="P3">Acto 1: verdes, dorados, luz cálida.</text:p>
        </text:list-item>
        <text:list-item>
          <text:p text:style-name="P3">Acto 2: grises, lluvia, piedra, niebla.</text:p>
        </text:list-item>
        <text:list-item>
          <text:p text:style-name="P3">Acto 3: ocres, polvo, roca desnuda, sombras largas.</text:p>
        </text:list-item>
        <text:list-item>
          <text:p text:style-name="P3">Final: azul oscuro, hierro negro, luz de lámpara.</text:p>
        </text:list-item>
      </text:list>
      <text:p text:style-name="Text_20_body">De este modo el lector percibe visualmente la caída de los personajes.</text:p>
      <text:p text:style-name="Horizontal_20_Line"/>
      <text:h text:style-name="Heading_20_2" text:outline-level="2">La llave</text:h>
      <text:p text:style-name="Text_20_body">La llave es prácticamente un personaje.</text:p>
      <text:p text:style-name="Text_20_body">Debe ser reconocible en cualquier imagen.</text:p>
      <text:p text:style-name="Text_20_body">Yo la haría así:</text:p>
      <text:list xml:id="list187442165" text:style-name="L4">
        <text:list-item>
          <text:p text:style-name="P4">Hierro negro envejecido.</text:p>
        </text:list-item>
        <text:list-item>
          <text:p text:style-name="P4"><text:soft-page-break/>Grande (unos 25 cm).</text:p>
        </text:list-item>
        <text:list-item>
          <text:p text:style-name="P4">Diseño elegante pero inquietante.</text:p>
        </text:list-item>
        <text:list-item>
          <text:p text:style-name="P4">Cabeza de la llave con forma de escudo real.</text:p>
        </text:list-item>
        <text:list-item>
          <text:p text:style-name="P4">Piedra verde ovalada incrustada.</text:p>
        </text:list-item>
        <text:list-item>
          <text:p text:style-name="P4">La piedra debe parecer demasiado perfecta.</text:p>
        </text:list-item>
        <text:list-item>
          <text:p text:style-name="P4">Reflejos verdes intensos.</text:p>
        </text:list-item>
        <text:list-item>
          <text:p text:style-name="P4">Aspecto antiguo pero intacto.</text:p>
        </text:list-item>
      </text:list>
      <text:p text:style-name="Text_20_body">La piedra verde será el elemento que el lector identifique instantáneamente.</text:p>
      <text:p text:style-name="Horizontal_20_Line"/>
      <text:h text:style-name="Heading_20_2" text:outline-level="2">Nohk</text:h>
      <text:p text:style-name="Text_20_body">Como protagonista aparecerá varias veces.</text:p>
      <text:p text:style-name="Text_20_body"><text:span text:style-name="Strong_20_Emphasis">Edad</text:span></text:p>
      <text:list xml:id="list2955022381" text:style-name="L5">
        <text:list-item>
          <text:p text:style-name="P5">25 años.</text:p>
        </text:list-item>
      </text:list>
      <text:p text:style-name="Text_20_body"><text:span text:style-name="Strong_20_Emphasis">Aspecto</text:span></text:p>
      <text:list xml:id="list3671187914" text:style-name="L6">
        <text:list-item>
          <text:p text:style-name="P6">Delgado y fuerte.</text:p>
        </text:list-item>
        <text:list-item>
          <text:p text:style-name="P6">Rostro alargado.</text:p>
        </text:list-item>
        <text:list-item>
          <text:p text:style-name="P6">Cabello oscuro hasta los hombros.</text:p>
        </text:list-item>
        <text:list-item>
          <text:p text:style-name="P6">Barba corta descuidada.</text:p>
        </text:list-item>
        <text:list-item>
          <text:p text:style-name="P6">Ojos oscuros.</text:p>
        </text:list-item>
      </text:list>
      <text:p text:style-name="Text_20_body"><text:span text:style-name="Strong_20_Emphasis">Vestimenta inicial</text:span></text:p>
      <text:list xml:id="list3166803478" text:style-name="L7">
        <text:list-item>
          <text:p text:style-name="P7">Ropa sencilla de campesino.</text:p>
        </text:list-item>
        <text:list-item>
          <text:p text:style-name="P7">Túnica marrón.</text:p>
        </text:list-item>
        <text:list-item>
          <text:p text:style-name="P7">Capa de lana.</text:p>
        </text:list-item>
        <text:list-item>
          <text:p text:style-name="P7">Botas gastadas.</text:p>
        </text:list-item>
      </text:list>
      <text:p text:style-name="Text_20_body"><text:span text:style-name="Strong_20_Emphasis">Transformación visual</text:span></text:p>
      <text:list xml:id="list1415079103" text:style-name="L8">
        <text:list-item>
          <text:p text:style-name="P8">Al principio limpio y saludable.</text:p>
        </text:list-item>
        <text:list-item>
          <text:p text:style-name="P8">Después cada vez más delgado.</text:p>
        </text:list-item>
        <text:list-item>
          <text:p text:style-name="P8">Más barba.</text:p>
        </text:list-item>
        <text:list-item>
          <text:p text:style-name="P8">Más cansancio.</text:p>
        </text:list-item>
        <text:list-item>
          <text:p text:style-name="P8"><text:soft-page-break/>Más obsesivo.</text:p>
        </text:list-item>
        <text:list-item>
          <text:p text:style-name="P8">Al final casi irreconocible.</text:p>
        </text:list-item>
      </text:list>
      <text:p text:style-name="Horizontal_20_Line"/>
      <text:h text:style-name="Heading_20_2" text:outline-level="2">Los cinco amigos</text:h>
      <text:p text:style-name="Text_20_body">No necesitan ser tan detallados como Nohk, pero sí distinguibles.</text:p>
      <text:h text:style-name="Heading_20_3" text:outline-level="3">Ghim</text:h>
      <text:list xml:id="list320481370" text:style-name="L9">
        <text:list-item>
          <text:p text:style-name="P9">El más joven.</text:p>
        </text:list-item>
        <text:list-item>
          <text:p text:style-name="P9">Cabello claro.</text:p>
        </text:list-item>
        <text:list-item>
          <text:p text:style-name="P9">Expresivo.</text:p>
        </text:list-item>
        <text:list-item>
          <text:p text:style-name="P9">Optimista.</text:p>
        </text:list-item>
        <text:list-item>
          <text:p text:style-name="P9">Muere en la montaña.</text:p>
        </text:list-item>
      </text:list>
      <text:h text:style-name="Heading_20_3" text:outline-level="3">Tarhk</text:h>
      <text:list xml:id="list1094522806" text:style-name="L10">
        <text:list-item>
          <text:p text:style-name="P10">Más corpulento.</text:p>
        </text:list-item>
        <text:list-item>
          <text:p text:style-name="P10">Aspecto práctico.</text:p>
        </text:list-item>
        <text:list-item>
          <text:p text:style-name="P10">El primero que dice que el tesoro no existe.</text:p>
        </text:list-item>
        <text:list-item>
          <text:p text:style-name="P10">Abandona.</text:p>
        </text:list-item>
      </text:list>
      <text:h text:style-name="Heading_20_3" text:outline-level="3">Pohval</text:h>
      <text:list xml:id="list2971168664" text:style-name="L11">
        <text:list-item>
          <text:p text:style-name="P11">Delgado.</text:p>
        </text:list-item>
        <text:list-item>
          <text:p text:style-name="P11">Prudente.</text:p>
        </text:list-item>
        <text:list-item>
          <text:p text:style-name="P11">Sigue a Tarhk.</text:p>
        </text:list-item>
        <text:list-item>
          <text:p text:style-name="P11">Abandona.</text:p>
        </text:list-item>
      </text:list>
      <text:h text:style-name="Heading_20_3" text:outline-level="3">Johf</text:h>
      <text:list xml:id="list2397182771" text:style-name="L12">
        <text:list-item>
          <text:p text:style-name="P12">Apariencia seria.</text:p>
        </text:list-item>
        <text:list-item>
          <text:p text:style-name="P12">Reservado.</text:p>
        </text:list-item>
        <text:list-item>
          <text:p text:style-name="P12">Ojos duros.</text:p>
        </text:list-item>
        <text:list-item>
          <text:p text:style-name="P12">El traidor.</text:p>
        </text:list-item>
      </text:list>
      <text:h text:style-name="Heading_20_3" text:outline-level="3">Kempht</text:h>
      <text:list xml:id="list2688958598" text:style-name="L13">
        <text:list-item>
          <text:p text:style-name="P13">Más cercano a Nohk.</text:p>
        </text:list-item>
        <text:list-item>
          <text:p text:style-name="P13"><text:soft-page-break/>Curioso.</text:p>
        </text:list-item>
        <text:list-item>
          <text:p text:style-name="P13">Energético.</text:p>
        </text:list-item>
        <text:list-item>
          <text:p text:style-name="P13">Último compañero.</text:p>
        </text:list-item>
      </text:list>
      <text:p text:style-name="Horizontal_20_Line"/>
      <text:h text:style-name="Heading_20_1" text:outline-level="1">Capítulo 1-1</text:h>
      <text:h text:style-name="Heading_20_3" text:outline-level="3">Imagen 1</text:h>
      <text:h text:style-name="Heading_20_3" text:outline-level="3">"El valle perfecto"</text:h>
      <text:p text:style-name="Text_20_body">Objetivo:<text:line-break/>Mostrar lo que van a perder.</text:p>
      <text:p text:style-name="Text_20_body">La imagen debe transmitir paz absoluta.</text:p>
      <text:p text:style-name="Text_20_body">Elementos:</text:p>
      <text:list xml:id="list1776834501" text:style-name="L14">
        <text:list-item>
          <text:p text:style-name="P14">Valle de Lluviara.</text:p>
        </text:list-item>
        <text:list-item>
          <text:p text:style-name="P14">Río Bager.</text:p>
        </text:list-item>
        <text:list-item>
          <text:p text:style-name="P14">Casa de Nohk.</text:p>
        </text:list-item>
        <text:list-item>
          <text:p text:style-name="P14">Campos cultivados.</text:p>
        </text:list-item>
        <text:list-item>
          <text:p text:style-name="P14">Cabras y gallinas.</text:p>
        </text:list-item>
        <text:list-item>
          <text:p text:style-name="P14">Bosque al fondo.</text:p>
        </text:list-item>
        <text:list-item>
          <text:p text:style-name="P14">Montañas lejanas.</text:p>
        </text:list-item>
        <text:list-item>
          <text:p text:style-name="P14">Mañana luminosa.</text:p>
        </text:list-item>
      </text:list>
      <text:p text:style-name="Text_20_body">Nohk aparece pequeño trabajando cerca del río.</text:p>
      <text:p text:style-name="Text_20_body">Lo importante no es él.</text:p>
      <text:p text:style-name="Text_20_body">Lo importante es la vida tranquila.</text:p>
      <text:p text:style-name="Text_20_body">El lector debe pensar:</text:p>
      <text:p text:style-name="Quotations">"¿Por qué querría abandonar este lugar?"</text:p>
      <text:p text:style-name="Horizontal_20_Line"/>
      <text:h text:style-name="Heading_20_3" text:outline-level="3"><text:soft-page-break/>Imagen 2</text:h>
      <text:h text:style-name="Heading_20_3" text:outline-level="3">"La llave"</text:h>
      <text:p text:style-name="Text_20_body">Objetivo:<text:line-break/>Introducir el misterio.</text:p>
      <text:p text:style-name="Text_20_body">Escena:</text:p>
      <text:list xml:id="list582149351" text:style-name="L15">
        <text:list-item>
          <text:p text:style-name="P15">Sendero del bosque.</text:p>
        </text:list-item>
        <text:list-item>
          <text:p text:style-name="P15">Hierba alta.</text:p>
        </text:list-item>
        <text:list-item>
          <text:p text:style-name="P15">Luz de la tarde filtrándose entre los árboles.</text:p>
        </text:list-item>
        <text:list-item>
          <text:p text:style-name="P15">Nohk agachado.</text:p>
        </text:list-item>
      </text:list>
      <text:p text:style-name="Text_20_body">En primer plano:</text:p>
      <text:list xml:id="list701142602" text:style-name="L16">
        <text:list-item>
          <text:p text:style-name="P16">La llave.</text:p>
        </text:list-item>
        <text:list-item>
          <text:p text:style-name="P16">La piedra verde brillando.</text:p>
        </text:list-item>
      </text:list>
      <text:p text:style-name="Text_20_body">El rostro de Nohk debe mostrar sorpresa.</text:p>
      <text:p text:style-name="Text_20_body">La composición debe hacer que la llave parezca importante.</text:p>
      <text:p text:style-name="Text_20_body">No debe parecer un objeto encontrado por casualidad.</text:p>
      <text:p text:style-name="Text_20_body">Debe parecer un objeto que estaba esperando ser encontrado.</text:p>
      <text:p text:style-name="Horizontal_20_Line"/>
      <text:p text:style-name="Text_20_body">Me gusta especialmente esta combinación porque resume todo el cuento:</text:p>
      <text:p text:style-name="Text_20_body"><text:span text:style-name="Strong_20_Emphasis">Imagen 1:</text:span> la vida que merece ser conservada.</text:p>
      <text:p text:style-name="Text_20_body"><text:span text:style-name="Strong_20_Emphasis">Imagen 2:</text:span> la tentación que destruirá esa vida.</text:p>
      <text:p text:style-name="Text_20_body">Es una transición visual muy poderosa para abrir el relato.</text:p>
      <text:p text:style-name="Text_20_body">Cuando estés de acuerdo con estas dos, pasamos al capítulo 1-2 ("El libro" y "La leyenda del tesoro"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8T11:25:21.841000000</meta:creation-date>
    <dc:date>2026-06-28T11:28:01.462000000</dc:date>
    <meta:editing-duration>PT2M39S</meta:editing-duration>
    <meta:editing-cycles>1</meta:editing-cycles>
    <meta:document-statistic meta:table-count="0" meta:image-count="0" meta:object-count="0" meta:page-count="5" meta:paragraph-count="124" meta:word-count="589" meta:character-count="3351" meta:non-whitespace-character-count="2960"/>
    <meta:generator>LibreOffice/7.3.5.2$Windows_X86_64 LibreOffice_project/184fe81b8c8c30d8b5082578aee2fed2ea847c01</meta:generator>
  </office:meta>
</office:document-meta>
</file>