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22dc2"/>
    </style:style>
    <style:style style:name="P2" style:family="paragraph" style:parent-style-name="Horizontal_20_Line">
      <style:text-properties officeooo:paragraph-rsid="00022dc2"/>
    </style:style>
    <style:style style:name="P3" style:family="paragraph" style:parent-style-name="Text_20_body">
      <style:text-properties officeooo:paragraph-rsid="00022d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1" text:outline-level="2">La compra del libro</text:h>
      <text:p text:style-name="P3">Durante los días siguientes, la llave se convirtió en el tema principal de todas las conversaciones.</text:p>
      <text:p text:style-name="P3">Al principio sólo era una curiosidad.</text:p>
      <text:p text:style-name="P3">Un objeto extraño encontrado en el bosque.</text:p>
      <text:p text:style-name="P3">Una coincidencia llamativa.</text:p>
      <text:p text:style-name="P3">Nada más.</text:p>
      <text:p text:style-name="P3">Pero la mente humana rara vez se conforma con una explicación sencilla cuando existe otra más emocionante.</text:p>
      <text:p text:style-name="P3">Cada tarde los jóvenes se reunían en la cantina.</text:p>
      <text:p text:style-name="P3">Y cada tarde la conversación regresaba inevitablemente al mismo asunto.</text:p>
      <text:p text:style-name="P3">La llave.</text:p>
      <text:p text:style-name="P3">El rey.</text:p>
      <text:p text:style-name="P3">El tesoro.</text:p>
      <text:p text:style-name="P3">El mapa.</text:p>
      <text:p text:style-name="P3">Al principio discutían posibilidades.</text:p>
      <text:p text:style-name="P3">Después empezaron a discutir certezas.</text:p>
      <text:p text:style-name="P3">¿Qué ocurriría si la leyenda fuera cierta?</text:p>
      <text:p text:style-name="P3">¿Y si aquella llave era realmente la llave del rey?</text:p>
      <text:p text:style-name="P3">¿Y si nadie había encontrado el tesoro porque nadie había encontrado la llave?</text:p>
      <text:p text:style-name="P3">Aquella última idea resultaba especialmente poderosa.</text:p>
      <text:p text:style-name="P3">La leyenda hablaba de dos elementos.</text:p>
      <text:p text:style-name="P3">La bóveda.</text:p>
      <text:p text:style-name="P3">Y la llave.</text:p>
      <text:p text:style-name="P3">Quizá otros habían buscado la bóveda.</text:p>
      <text:p text:style-name="P3">Quizá incluso habían encontrado pistas.</text:p>
      <text:p text:style-name="P3">Pero sin la llave nunca habrían podido entrar.</text:p>
      <text:p text:style-name="P3">Ahora la situación era diferente.</text:p>
      <text:p text:style-name="P3">Ellos tenían la llave.</text:p>
      <text:p text:style-name="P3"><text:soft-page-break/>La auténtica.</text:p>
      <text:p text:style-name="P3">La misma que aparecía dibujada en el libro.</text:p>
      <text:p text:style-name="P3">Cuanto más hablaban de ello, más razonable parecía.</text:p>
      <text:p text:style-name="P3">Y cuanto más razonable parecía, más difícil resultaba pensar en otra cosa.</text:p>
      <text:p text:style-name="P3">Nohk comenzó a imaginar cofres repletos de monedas.</text:p>
      <text:p text:style-name="P3">Kempht hablaba de comprar tierras.</text:p>
      <text:p text:style-name="P3">Otros soñaban con abrir negocios, construir casas más grandes o viajar a lugares que jamás habían visto.</text:p>
      <text:p text:style-name="P3">La fortuna del rey empezó a adquirir forma en sus pensamientos.</text:p>
      <text:p text:style-name="P3">Ya no era una leyenda.</text:p>
      <text:p text:style-name="P3">Era una oportunidad.</text:p>
      <text:p text:style-name="P3">Una oportunidad extraordinaria.</text:p>
      <text:p text:style-name="P3">Una oportunidad única.</text:p>
      <text:p text:style-name="P3">Finalmente decidieron regresar a la casa de Jorhm.</text:p>
      <text:p text:style-name="P3">Necesitaban volver a ver el libro.</text:p>
      <text:p text:style-name="P3">Necesitaban estudiar el mapa.</text:p>
      <text:p text:style-name="P3">Tal vez la respuesta hubiera estado allí todo el tiempo.</text:p>
      <text:p text:style-name="P3">Tal vez aquellas líneas aparentemente caóticas escondieran indicaciones precisas.</text:p>
      <text:p text:style-name="P3">Pero cuando llegaron, el anciano se negó.</text:p>
      <text:p text:style-name="P3">—No.</text:p>
      <text:p text:style-name="P3">La respuesta fue inmediata.</text:p>
      <text:p text:style-name="P3">Ni siquiera permitió que terminaran de hablar.</text:p>
      <text:p text:style-name="P3">—Ya habéis visto suficiente.</text:p>
      <text:p text:style-name="P3">Los jóvenes insistieron.</text:p>
      <text:p text:style-name="P3">Intentaron razonar con él.</text:p>
      <text:p text:style-name="P3">Le explicaron sus teorías.</text:p>
      <text:p text:style-name="P3">Le mostraron nuevamente la llave.</text:p>
      <text:p text:style-name="P3">Pero Jorhm permaneció firme.</text:p>
      <text:p text:style-name="P3">—Escuchadme bien —dijo con seriedad—. Estáis convirtiendo una historia en una obsesión.</text:p>
      <text:p text:style-name="P3">Aquellas palabras les molestaron.</text:p>
      <text:p text:style-name="P3"><text:soft-page-break/>Porque en el fondo todos sabían que tenía razón.</text:p>
      <text:p text:style-name="P3">El anciano observó sus rostros.</text:p>
      <text:p text:style-name="P3">Vio la ansiedad.</text:p>
      <text:p text:style-name="P3">La esperanza.</text:p>
      <text:p text:style-name="P3">La ambición.</text:p>
      <text:p text:style-name="P3">Y algo más.</text:p>
      <text:p text:style-name="P3">Algo que empezaba a preocuparle.</text:p>
      <text:p text:style-name="P3">—Es una leyenda —continuó—. Un cuento inventado hace siglos. Nadie encontró jamás el tesoro. Nadie encontró jamás la bóveda. Y nadie encontró jamás la llave.</text:p>
      <text:p text:style-name="P3">Levantó la mirada hacia Nohk.</text:p>
      <text:p text:style-name="P3">—No dejéis que un hallazgo afortunado os haga olvidar la realidad.</text:p>
      <text:p text:style-name="P3">Pero sus advertencias llegaron demasiado tarde.</text:p>
      <text:p text:style-name="P3">Durante los días siguientes la imaginación hizo el resto.</text:p>
      <text:p text:style-name="P3">Cada conversación reforzaba la anterior.</text:p>
      <text:p text:style-name="P3">Cada duda era respondida por una nueva posibilidad.</text:p>
      <text:p text:style-name="P3">Cada objeción encontraba una explicación.</text:p>
      <text:p text:style-name="P3">Poco a poco la existencia del tesoro dejó de ser una hipótesis.</text:p>
      <text:p text:style-name="P3">Se convirtió en una convicción.</text:p>
      <text:p text:style-name="P3">Los jóvenes comenzaron a sentirse como hombres que ya poseían una fortuna, aunque todavía no hubieran puesto una sola moneda en sus manos.</text:p>
      <text:p text:style-name="P3">La riqueza parecía estar esperándolos.</text:p>
      <text:p text:style-name="P3">Oculta.</text:p>
      <text:p text:style-name="P3">Pacientemente.</text:p>
      <text:p text:style-name="P3">Al final surgió una idea.</text:p>
      <text:p text:style-name="P3">Simple.</text:p>
      <text:p text:style-name="P3">Directa.</text:p>
      <text:p text:style-name="P3">Inevitable.</text:p>
      <text:p text:style-name="P3">—¿Y si compramos el libro?</text:p>
      <text:p text:style-name="P3">La propuesta cayó sobre la mesa como una revelación.</text:p>
      <text:p text:style-name="P3">Durante unos segundos nadie habló.</text:p>
      <text:p text:style-name="P3"><text:soft-page-break/>Luego comenzaron a asentir.</text:p>
      <text:p text:style-name="P3">Por supuesto.</text:p>
      <text:p text:style-name="P3">Era la solución.</text:p>
      <text:p text:style-name="P3">Si Jorhm no quería prestarlo, podían adquirirlo.</text:p>
      <text:p text:style-name="P3">Todo tenía un precio.</text:p>
      <text:p text:style-name="P3">Sólo debían ofrecer una cantidad lo bastante alta.</text:p>
      <text:p text:style-name="P3">Una cantidad imposible de rechazar.</text:p>
      <text:p text:style-name="P3">Y así comenzaron a reunir dinero.</text:p>
      <text:p text:style-name="P3">Vendieron animales.</text:p>
      <text:p text:style-name="P3">Herramientas.</text:p>
      <text:p text:style-name="P3">Mercancías.</text:p>
      <text:p text:style-name="P3">Carros.</text:p>
      <text:p text:style-name="P3">Todo aquello de lo que podían prescindir.</text:p>
      <text:p text:style-name="P3">Conservaron únicamente las tierras.</text:p>
      <text:p text:style-name="P3">Lo indispensable para seguir viviendo.</text:p>
      <text:p text:style-name="P3">Cuando terminaron, habían reunido más dinero del que ninguno había tenido jamás entre las manos.</text:p>
      <text:p text:style-name="P3">Una pequeña fortuna.</text:p>
      <text:p text:style-name="P3">Quizá la mayor inversión que harían en toda su vida.</text:p>
      <text:p text:style-name="P3">Y una mañana, llevando consigo una pesada bolsa repleta de monedas, los seis amigos volvieron a recorrer el camino que conducía a la casa de Jorhm.</text:p>
      <text:p text:style-name="P3">Estaban convencidos de que aquella vez regresarían con el libro.</text:p>
      <text:p text:style-name="P3">Y con él, con el primer paso hacia el tesoro del rey.</text:p>
      <text:p text:style-name="P3"/>
      <text:p text:style-name="P2"/>
      <text:p text:style-name="P3"/>
      <text:h text:style-name="P1" text:outline-level="2">Inicia la aventura</text:h>
      <text:p text:style-name="P3">Jorhm los vio llegar mucho antes de que alcanzaran la casa.</text:p>
      <text:p text:style-name="P3">Estaba sentado bajo las vides, en el mismo lugar donde acostumbraba pasar las tardes observando el valle.</text:p>
      <text:p text:style-name="P3">Desde allí podía ver el camino que ascendía desde el pueblo.</text:p>
      <text:p text:style-name="P3"><text:soft-page-break/>Y aquel día los reconoció enseguida.</text:p>
      <text:p text:style-name="P3">Los seis caminaban juntos.</text:p>
      <text:p text:style-name="P3">Decididos.</text:p>
      <text:p text:style-name="P3">Con un propósito claro.</text:p>
      <text:p text:style-name="P3">El anciano suspiró.</text:p>
      <text:p text:style-name="P3">Había esperado que el entusiasmo desapareciera con el paso de los días.</text:p>
      <text:p text:style-name="P3">Que la emoción inicial se desvaneciera.</text:p>
      <text:p text:style-name="P3">Que la razón terminara imponiéndose.</text:p>
      <text:p text:style-name="P3">Pero no había ocurrido.</text:p>
      <text:p text:style-name="P3">Al contrario.</text:p>
      <text:p text:style-name="P3">Algo había cambiado en ellos.</text:p>
      <text:p text:style-name="P3">Lo percibió incluso antes de escuchar una sola palabra.</text:p>
      <text:p text:style-name="P3">Aquella mezcla de ilusión y ansiedad que brillaba en sus ojos le resultaba inquietante.</text:p>
      <text:p text:style-name="P3">Había visto esa expresión otras veces.</text:p>
      <text:p text:style-name="P3">En comerciantes arruinados.</text:p>
      <text:p text:style-name="P3">En jugadores.</text:p>
      <text:p text:style-name="P3">En hombres convencidos de que estaban a punto de encontrar una fortuna.</text:p>
      <text:p text:style-name="P3">Y rara vez terminaba bien.</text:p>
      <text:p text:style-name="P3">Los jóvenes llegaron hasta la mesa.</text:p>
      <text:p text:style-name="P3">Nohk fue el primero en hablar.</text:p>
      <text:p text:style-name="P3">—Jorhm, queremos el libro.</text:p>
      <text:p text:style-name="P3">El anciano levantó la vista.</text:p>
      <text:p text:style-name="P3">—Ya os dije lo que pienso sobre esa historia.</text:p>
      <text:p text:style-name="P3">—Venimos a hacerte una oferta.</text:p>
      <text:p text:style-name="P3">Por un instante nadie habló.</text:p>
      <text:p text:style-name="P3">Entonces uno de los muchachos depositó sobre la mesa una pesada bolsa de cuero.</text:p>
      <text:p text:style-name="P3">Las monedas tintinearon al golpear la madera.</text:p>
      <text:p text:style-name="P3">Jorhm observó la bolsa.</text:p>
      <text:p text:style-name="P3">Después observó a los jóvenes.</text:p>
      <text:p text:style-name="P3">Y finalmente volvió a mirar la bolsa.</text:p>
      <text:p text:style-name="P3"><text:soft-page-break/>Su expresión cambió.</text:p>
      <text:p text:style-name="P3">—¿Qué es esto?</text:p>
      <text:p text:style-name="P3">—Doscientas monedas.</text:p>
      <text:p text:style-name="P3">El anciano abrió los ojos con sorpresa.</text:p>
      <text:p text:style-name="P3">—¿Doscientas?</text:p>
      <text:p text:style-name="P3">Nohk asintió.</text:p>
      <text:p text:style-name="P3">—Doscientas monedas por el libro.</text:p>
      <text:p text:style-name="P3">Jorhm permaneció en silencio.</text:p>
      <text:p text:style-name="P3">Aquella cantidad era absurda.</text:p>
      <text:p text:style-name="P3">Con ese dinero podía vivir cómodamente durante años.</text:p>
      <text:p text:style-name="P3">Era mucho más de lo que valía cualquier libro que poseyera.</text:p>
      <text:p text:style-name="P3">Incluso aquel.</text:p>
      <text:p text:style-name="P3">Sacudió lentamente la cabeza.</text:p>
      <text:p text:style-name="P3">—Muchachos... la bóveda no existe.</text:p>
      <text:p text:style-name="P3">Nadie respondió.</text:p>
      <text:p text:style-name="P3">—Es una leyenda.</text:p>
      <text:p text:style-name="P3">Una historia inventada.</text:p>
      <text:p text:style-name="P3">Nada más.</text:p>
      <text:p text:style-name="P3">Los seis permanecieron inmóviles.</text:p>
      <text:p text:style-name="P3">Nohk sostuvo la mirada del anciano.</text:p>
      <text:p text:style-name="P3">—Doscientas monedas por el libro.</text:p>
      <text:p text:style-name="P3">Jorhm comprendió entonces que la discusión había terminado antes de empezar.</text:p>
      <text:p text:style-name="P3">Aquellos jóvenes ya no estaban buscando consejo.</text:p>
      <text:p text:style-name="P3">Habían tomado una decisión.</text:p>
      <text:p text:style-name="P3">El dinero era sólo una formalidad.</text:p>
      <text:p text:style-name="P3">Observó nuevamente la bolsa.</text:p>
      <text:p text:style-name="P3">Después miró el libro que había conservado durante tantos años.</text:p>
      <text:p text:style-name="P3">Y finalmente volvió a mirar a los muchachos.</text:p>
      <text:p text:style-name="P3">Por primera vez sintió una vaga sensación de preocupación.</text:p>
      <text:p text:style-name="P3">Como si estuviera entregándoles algo más peligroso que un simple volumen antiguo.</text:p>
      <text:p text:style-name="P3"><text:soft-page-break/>—Veo que habéis tomado una decisión —dijo finalmente.</text:p>
      <text:p text:style-name="P3">Nadie respondió.</text:p>
      <text:p text:style-name="P3">No hacía falta.</text:p>
      <text:p text:style-name="P3">Minutos después abandonaban la casa llevando el libro entre las manos.</text:p>
      <text:p text:style-name="P3">La primera etapa había terminado.</text:p>
      <text:p text:style-name="P3">La aventura acababa de comenzar.</text:p>
      <text:p text:style-name="P2"/>
      <text:p text:style-name="P3">Aquella misma noche se reunieron en la casa de Nohk.</text:p>
      <text:p text:style-name="P3">El libro ocupó el centro de la mesa.</text:p>
      <text:p text:style-name="P3">Las lámparas permanecieron encendidas hasta altas horas.</text:p>
      <text:p text:style-name="P3">Una y otra vez estudiaron las páginas.</text:p>
      <text:p text:style-name="P3">Compararon símbolos.</text:p>
      <text:p text:style-name="P3">Examinaron anotaciones.</text:p>
      <text:p text:style-name="P3">Y sobre todo analizaron el mapa.</text:p>
      <text:p text:style-name="P3">Para sorpresa de todos, resultó mucho más comprensible de lo que habían imaginado.</text:p>
      <text:p text:style-name="P3">No era una colección de garabatos sin sentido.</text:p>
      <text:p text:style-name="P3">Los accidentes geográficos coincidían con lugares conocidos.</text:p>
      <text:p text:style-name="P3">Las referencias parecían reales.</text:p>
      <text:p text:style-name="P3">Y lo más importante de todo:</text:p>
      <text:p text:style-name="P3">el destino señalado por el mapa no estaba al otro lado del mundo.</text:p>
      <text:p text:style-name="P3">Se encontraba relativamente cerca.</text:p>
      <text:p text:style-name="P3">Hacia el oeste.</text:p>
      <text:p text:style-name="P3">En las montañas.</text:p>
      <text:p text:style-name="P3">Apenas unos días de viaje.</text:p>
      <text:p text:style-name="P3">La revelación llenó la habitación de entusiasmo.</text:p>
      <text:p text:style-name="P3">Por primera vez el tesoro dejó de parecer una leyenda lejana.</text:p>
      <text:p text:style-name="P3">Ahora tenía una ubicación.</text:p>
      <text:p text:style-name="P3">Un lugar concreto.</text:p>
      <text:p text:style-name="P3">Un destino.</text:p>
      <text:p text:style-name="P3">Algo que podían alcanzar.</text:p>
      <text:p text:style-name="P3"><text:soft-page-break/>Algo que podían encontrar.</text:p>
      <text:p text:style-name="P3">La fortuna del rey parecía estar esperándolos.</text:p>
      <text:p text:style-name="P3">Oculta durante siglos.</text:p>
      <text:p text:style-name="P3">A sólo unos días de distancia.</text:p>
      <text:p text:style-name="P3">El vino comenzó a correr.</text:p>
      <text:p text:style-name="P3">Las conversaciones se hicieron más animadas.</text:p>
      <text:p text:style-name="P3">Las risas más frecuentes.</text:p>
      <text:p text:style-name="P3">Cada uno imaginaba ya el futuro que le aguardaba.</text:p>
      <text:p text:style-name="P3">Tierras.</text:p>
      <text:p text:style-name="P3">Casas.</text:p>
      <text:p text:style-name="P3">Negocios.</text:p>
      <text:p text:style-name="P3">Animales.</text:p>
      <text:p text:style-name="P3">Libertad.</text:p>
      <text:p text:style-name="P3">Riquezas imposibles para un campesino común.</text:p>
      <text:p text:style-name="P3">Finalmente Nohk levantó una copa.</text:p>
      <text:p text:style-name="P3">Los demás hicieron lo mismo.</text:p>
      <text:p text:style-name="P3">—Cuando encontremos el tesoro —dijo— lo dividiremos en partes iguales.</text:p>
      <text:p text:style-name="P3">Los cinco asintieron inmediatamente.</text:p>
      <text:p text:style-name="P3">Era justo.</text:p>
      <text:p text:style-name="P3">Habían comenzado juntos.</text:p>
      <text:p text:style-name="P3">Terminarían juntos.</text:p>
      <text:p text:style-name="P3">—Socios —afirmó Kempht.</text:p>
      <text:p text:style-name="P3">—Socios —repitieron los demás.</text:p>
      <text:p text:style-name="P3">Las copas chocaron.</text:p>
      <text:p text:style-name="P3">El pacto quedó sellado.</text:p>
      <text:p text:style-name="P3">El tesoro de un rey dividido entre seis hombres.</text:p>
      <text:p text:style-name="P3">Había más que suficiente para todos.</text:p>
      <text:p text:style-name="P3">Aquella noche ninguno dudó.</text:p>
      <text:p text:style-name="P3">Ninguno sintió miedo.</text:p>
      <text:p text:style-name="P3">Ninguno imaginó que acababan de pronunciar palabras que recordarían durante el resto de sus vidas.</text:p>
      <text:p text:style-name="P3"><text:soft-page-break/>Porque mientras brindaban por una fortuna que todavía no existía, la búsqueda ya había comenzado.</text:p>
      <text:p text:style-name="P3">Y la llave de hierro, silenciosa sobre la mesa, parecía observarlo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4T19:05:55.780000000</meta:creation-date>
    <dc:date>2026-06-24T19:06:18.930000000</dc:date>
    <meta:editing-duration>PT23S</meta:editing-duration>
    <meta:editing-cycles>1</meta:editing-cycles>
    <meta:document-statistic meta:table-count="0" meta:image-count="0" meta:object-count="0" meta:page-count="9" meta:paragraph-count="230" meta:word-count="1377" meta:character-count="8624" meta:non-whitespace-character-count="7479"/>
    <meta:generator>LibreOffice/7.3.5.2$Windows_X86_64 LibreOffice_project/184fe81b8c8c30d8b5082578aee2fed2ea847c01</meta:generator>
  </office:meta>
</office:document-meta>
</file>