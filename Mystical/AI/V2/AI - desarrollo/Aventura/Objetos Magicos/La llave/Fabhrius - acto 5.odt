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has identificado algo muy importante.</text:p>
      <text:p text:style-name="Text_20_body">El último acto ya no trata realmente sobre Nohk.</text:p>
      <text:p text:style-name="Text_20_body">Si las frases anteriores hablaban del protagonista, aquí existe el riesgo de revelar demasiado.</text:p>
      <text:p text:style-name="Text_20_body">Pero el final introduce algo mucho más grande: <text:span text:style-name="Strong_20_Emphasis">el sistema</text:span>.</text:p>
      <text:p text:style-name="Text_20_body">La llave.</text:p>
      <text:p text:style-name="Text_20_body">La leyenda.</text:p>
      <text:p text:style-name="Text_20_body">El mapa.</text:p>
      <text:p text:style-name="Text_20_body">La búsqueda.</text:p>
      <text:p text:style-name="Text_20_body">Todo eso sigue funcionando incluso después de destruir a quienes participan en él.</text:p>
      <text:p text:style-name="Text_20_body">Desde una perspectiva de Omniscientis, el último acto es casi una transición desde la historia individual hacia una visión sistémica.</text:p>
      <text:p text:style-name="Horizontal_20_Line"/>
      <text:h text:style-name="Heading_20_2" text:outline-level="2">¿Qué principios aparecen aquí?</text:h>
      <text:h text:style-name="Heading_20_3" text:outline-level="3">1. El éxito de un sistema y el éxito de sus componentes no son lo mismo</text:h>
      <text:p text:style-name="Text_20_body">Esta es probablemente la idea más profunda del relato.</text:p>
      <text:p text:style-name="Text_20_body">Nohk fracasa.</text:p>
      <text:p text:style-name="Text_20_body">Pero la llave tiene éxito.</text:p>
      <text:p text:style-name="Text_20_body">El mecanismo continúa funcionando.</text:p>
      <text:p text:style-name="Text_20_body">La historia no termina.</text:p>
      <text:p text:style-name="Text_20_body">Se reinicia.</text:p>
      <text:p text:style-name="Text_20_body">Principio universal:</text:p>
      <text:p text:style-name="Quotations">El éxito de un sistema no implica el éxito de quienes lo integran.</text:p>
      <text:p text:style-name="Text_20_body">Esto tiene mucho sabor a Omniscientis.</text:p>
      <text:p text:style-name="Horizontal_20_Line"/>
      <text:h text:style-name="Heading_20_3" text:outline-level="3">2. Los sistemas persisten aunque sus componentes desaparezcan</text:h>
      <text:p text:style-name="Text_20_body">Nohk muere.</text:p>
      <text:p text:style-name="Text_20_body">Kempht muere.</text:p>
      <text:p text:style-name="Text_20_body">Ghim muere.</text:p>
      <text:p text:style-name="Text_20_body">Todos desaparecen.</text:p>
      <text:p text:style-name="Text_20_body"><text:soft-page-break/>La llave permanece.</text:p>
      <text:p text:style-name="Text_20_body">Principio universal:</text:p>
      <text:p text:style-name="Quotations">Los componentes son reemplazables. El sistema permanece.</text:p>
      <text:p text:style-name="Horizontal_20_Line"/>
      <text:h text:style-name="Heading_20_3" text:outline-level="3">3. Las consecuencias pueden extenderse más allá de sus creadores</text:h>
      <text:p text:style-name="Text_20_body">Nadie sabe quién construyó la bóveda.</text:p>
      <text:p text:style-name="Text_20_body">Quizá murió hace siglos.</text:p>
      <text:p text:style-name="Text_20_body">Pero sus efectos siguen activos.</text:p>
      <text:p text:style-name="Text_20_body">Principio universal:</text:p>
      <text:p text:style-name="Quotations">Algunas causas sobreviven a quienes las originaron.</text:p>
      <text:p text:style-name="Horizontal_20_Line"/>
      <text:h text:style-name="Heading_20_3" text:outline-level="3">4. Los procesos pueden perpetuarse sin propósito aparente</text:h>
      <text:p text:style-name="Text_20_body">Esta me gusta mucho.</text:p>
      <text:p text:style-name="Text_20_body">Nadie obtiene beneficio.</text:p>
      <text:p text:style-name="Text_20_body">Sin embargo el ciclo continúa.</text:p>
      <text:p text:style-name="Text_20_body">Principio universal:</text:p>
      <text:p text:style-name="Quotations">No todo lo que persiste lo hace porque sea útil.</text:p>
      <text:p text:style-name="Horizontal_20_Line"/>
      <text:h text:style-name="Heading_20_3" text:outline-level="3">5. La información se replica</text:h>
      <text:p text:style-name="Text_20_body">Desde una perspectiva muy Omniscientis.</text:p>
      <text:p text:style-name="Text_20_body">La llave transmite una idea.</text:p>
      <text:p text:style-name="Text_20_body">La idea se propaga.</text:p>
      <text:p text:style-name="Text_20_body">Un nuevo individuo la recibe.</text:p>
      <text:p text:style-name="Text_20_body">El ciclo continúa.</text:p>
      <text:p text:style-name="Text_20_body">Casi como un gen.</text:p>
      <text:p text:style-name="Text_20_body">Principio universal:</text:p>
      <text:p text:style-name="Quotations">Algunas ideas sobreviven propagándose de una mente a otra.</text:p>
      <text:p text:style-name="Horizontal_20_Line"/>
      <text:h text:style-name="Heading_20_3" text:outline-level="3"><text:soft-page-break/>6. El final de una historia puede ser el inicio de otra</text:h>
      <text:p text:style-name="Text_20_body">Obviamente encaja perfectamente.</text:p>
      <text:p text:style-name="Text_20_body">Pero hay que expresarlo de forma menos narrativa y más filosófica.</text:p>
      <text:p text:style-name="Text_20_body">Principio universal:</text:p>
      <text:p text:style-name="Quotations">Todo final es local. Todo comienzo también.</text:p>
      <text:p text:style-name="Horizontal_20_Line"/>
      <text:h text:style-name="Heading_20_2" text:outline-level="2">Las que más me gustan para Fabhrius</text:h>
      <text:p text:style-name="Text_20_body">Intentaría alejarlas completamente de Nohk.</text:p>
      <text:p text:style-name="Text_20_body">Que parezcan hablar de algo abstracto.</text:p>
      <text:p text:style-name="Horizontal_20_Line"/>
      <text:h text:style-name="Heading_20_3" text:outline-level="3">Opción A</text:h>
      <text:p text:style-name="Quotations">"Los sistemas más antiguos rara vez dependen de un único individuo."</text:p>
      <text:p text:style-name="Text_20_body">Muy Omniscientis.</text:p>
      <text:p text:style-name="Horizontal_20_Line"/>
      <text:h text:style-name="Heading_20_3" text:outline-level="3">Opción B</text:h>
      <text:p text:style-name="Quotations">"Los componentes desaparecen. Los patrones permanecen."</text:p>
      <text:p text:style-name="Text_20_body">Esta me gusta muchísimo.</text:p>
      <text:p text:style-name="Text_20_body">Muy científica.</text:p>
      <text:p text:style-name="Text_20_body">Muy misteriosa.</text:p>
      <text:p text:style-name="Text_20_body">Y sólo cobra sentido completo al final.</text:p>
      <text:p text:style-name="Horizontal_20_Line"/>
      <text:h text:style-name="Heading_20_3" text:outline-level="3">Opción C</text:h>
      <text:p text:style-name="Quotations">"Algunas causas continúan produciendo efectos mucho después de haber sido olvidadas."</text:p>
      <text:p text:style-name="Text_20_body">Perfecta para la bóveda.</text:p>
      <text:p text:style-name="Horizontal_20_Line"/>
      <text:h text:style-name="Heading_20_3" text:outline-level="3">Opción D</text:h>
      <text:p text:style-name="Quotations">"El final de un proceso suele confundirse con el final de sus consecuencias."</text:p>
      <text:p text:style-name="Text_20_body"><text:soft-page-break/>Muy elegante.</text:p>
      <text:p text:style-name="Horizontal_20_Line"/>
      <text:h text:style-name="Heading_20_3" text:outline-level="3">Opción E</text:h>
      <text:p text:style-name="Quotations">"Aquello que puede repetirse rara vez ocurre una sola vez."</text:p>
      <text:p text:style-name="Text_20_body">Tiene un aire casi profético.</text:p>
      <text:p text:style-name="Horizontal_20_Line"/>
      <text:h text:style-name="Heading_20_3" text:outline-level="3">Opción F</text:h>
      <text:p text:style-name="Quotations">"Los individuos recorren el ciclo una vez. Los sistemas lo recorren indefinidamente."</text:p>
      <text:p text:style-name="Text_20_body">Extremadamente Omniscientis.</text:p>
      <text:p text:style-name="Horizontal_20_Line"/>
      <text:h text:style-name="Heading_20_3" text:outline-level="3">Opción G</text:h>
      <text:p text:style-name="Quotations">"La permanencia de un patrón no requiere la permanencia de quienes lo ejecutan."</text:p>
      <text:p text:style-name="Text_20_body">Muy científica.</text:p>
      <text:p text:style-name="Text_20_body">Muy Fabhrius.</text:p>
      <text:p text:style-name="Horizontal_20_Line"/>
      <text:h text:style-name="Heading_20_2" text:outline-level="2">Si yo tuviera que elegir una sola</text:h>
      <text:p text:style-name="Text_20_body">Para abrir el acto final elegiría probablemente:</text:p>
      <text:p text:style-name="Quotations"><text:span text:style-name="Strong_20_Emphasis">"Los componentes desaparecen. Los patrones permanecen."</text:span></text:p>
      <text:p text:style-name="Text_20_body">Porque:</text:p>
      <text:list xml:id="list3700728108" text:style-name="L1">
        <text:list-item>
          <text:p text:style-name="P1">No revela el destino de Nohk.</text:p>
        </text:list-item>
        <text:list-item>
          <text:p text:style-name="P1">No habla del tesoro.</text:p>
        </text:list-item>
        <text:list-item>
          <text:p text:style-name="P1">No habla de la bóveda.</text:p>
        </text:list-item>
        <text:list-item>
          <text:p text:style-name="P1">No habla de la muerte.</text:p>
        </text:list-item>
        <text:list-item>
          <text:p text:style-name="P1">Parece una reflexión abstracta.</text:p>
        </text:list-item>
      </text:list>
      <text:p text:style-name="Text_20_body">Pero después de leer el final, el lector entiende:</text:p>
      <text:list xml:id="list2244076614" text:style-name="L2">
        <text:list-item>
          <text:p text:style-name="P2">Nohk era un componente.</text:p>
        </text:list-item>
        <text:list-item>
          <text:p text:style-name="P2">Kempht era un componente.</text:p>
        </text:list-item>
        <text:list-item>
          <text:p text:style-name="P2">Ghim era un componente.</text:p>
        </text:list-item>
        <text:list-item>
          <text:p text:style-name="P2"><text:soft-page-break/>Jahnk será otro componente.</text:p>
        </text:list-item>
      </text:list>
      <text:p text:style-name="Text_20_body">Y lo que permanece es el patrón.</text:p>
      <text:p text:style-name="Text_20_body">La llave.<text:line-break/>La búsqueda.<text:line-break/>La obsesión.<text:line-break/>El ciclo.</text:p>
      <text:p text:style-name="Text_20_body">Eso encaja extraordinariamente bien con el cierre de un relato de Omniscientis, porque desplaza el foco desde el individuo hacia el sistema completo. Y esa es precisamente la clase de mirada que Fabhrius suele tener sobre el mun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18:52:41.789000000</meta:creation-date>
    <dc:date>2026-07-22T18:57:37.420000000</dc:date>
    <meta:editing-duration>PT4M55S</meta:editing-duration>
    <meta:editing-cycles>1</meta:editing-cycles>
    <meta:document-statistic meta:table-count="0" meta:image-count="0" meta:object-count="0" meta:page-count="5" meta:paragraph-count="100" meta:word-count="593" meta:character-count="3642" meta:non-whitespace-character-count="3158"/>
    <meta:generator>LibreOffice/7.3.5.2$Windows_X86_64 LibreOffice_project/184fe81b8c8c30d8b5082578aee2fed2ea847c01</meta:generator>
  </office:meta>
</office:document-meta>
</file>