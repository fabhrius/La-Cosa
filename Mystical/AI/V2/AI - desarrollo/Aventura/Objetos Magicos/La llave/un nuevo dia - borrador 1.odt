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arte 4 - Un nuevo día</text:h>
      <text:p text:style-name="Text_20_body">Durante un largo instante no ocurrió nada.</text:p>
      <text:p text:style-name="Text_20_body">La noche avanzó sobre el acantilado.</text:p>
      <text:p text:style-name="Text_20_body">El mar siguió golpeando las rocas cientos de metros más abajo.</text:p>
      <text:p text:style-name="Text_20_body">Y la puerta de hierro permaneció cerrada.</text:p>
      <text:p text:style-name="Text_20_body">Entonces un cuervo descendió desde la oscuridad.</text:p>
      <text:p text:style-name="Text_20_body">Se posó frente a la entrada de la cueva.</text:p>
      <text:p text:style-name="Text_20_body">Inclinó la cabeza.</text:p>
      <text:p text:style-name="Text_20_body">Observó la llave abandonada sobre la roca.</text:p>
      <text:p text:style-name="Text_20_body">Después la tomó con el pico.</text:p>
      <text:p text:style-name="Text_20_body">Y levantó el vuelo.</text:p>
      <text:p text:style-name="Text_20_body">Atravesó el borde del acantilado.</text:p>
      <text:p text:style-name="Text_20_body">Se alejó de la montaña.</text:p>
      <text:p text:style-name="Text_20_body">Sobrevoló bosques dormidos y colinas silenciosas.</text:p>
      <text:p text:style-name="Text_20_body">Cruzó valles donde las aldeas todavía descansaban bajo la luz gris del amanecer.</text:p>
      <text:p text:style-name="Text_20_body">Voló durante horas.</text:p>
      <text:p text:style-name="Text_20_body">Sin rumbo aparente.</text:p>
      <text:p text:style-name="Text_20_body">Sin prisa.</text:p>
      <text:p text:style-name="Text_20_body">Como si siguiera un camino conocido.</text:p>
      <text:p text:style-name="Text_20_body">Cuando el sol comenzó a elevarse sobre las llanuras del este, el cuervo abrió el pico.</text:p>
      <text:p text:style-name="Text_20_body">La llave cayó.</text:p>
      <text:p text:style-name="Text_20_body">Giró varias veces en el aire.</text:p>
      <text:p text:style-name="Text_20_body">Y desapareció entre la hierba.</text:p>
      <text:p text:style-name="Text_20_body">El cuervo siguió volando.</text:p>
      <text:p text:style-name="Text_20_body">No volvió la vista atrás.</text:p>
      <text:p text:style-name="Text_20_body">Era una mañana perfecta de primavera.</text:p>
      <text:p text:style-name="Text_20_body">El rocío brillaba sobre los campos.</text:p>
      <text:p text:style-name="Text_20_body">Una suave brisa agitaba las espigas jóvenes.</text:p>
      <text:p text:style-name="Text_20_body">No muy lejos del pueblo de Wetwood, un campesino llamado Jahnk caminaba por un sendero de tierra.</text:p>
      <text:p text:style-name="Text_20_body"><text:soft-page-break/>Se dirigía al mercado.</text:p>
      <text:p text:style-name="Text_20_body">Pensaba en asuntos sencillos.</text:p>
      <text:p text:style-name="Text_20_body">La cosecha.</text:p>
      <text:p text:style-name="Text_20_body">Los animales.</text:p>
      <text:p text:style-name="Text_20_body">El precio del grano.</text:p>
      <text:p text:style-name="Text_20_body">Entonces algo llamó su atención.</text:p>
      <text:p text:style-name="Text_20_body">Un destello verde entre la hierba.</text:p>
      <text:p text:style-name="Text_20_body">Jahnk se detuvo.</text:p>
      <text:p text:style-name="Text_20_body">Se agachó.</text:p>
      <text:p text:style-name="Text_20_body">Y apartó las hojas con la mano.</text:p>
      <text:p text:style-name="Text_20_body">Allí encontró una llave de hierro.</text:p>
      <text:p text:style-name="Text_20_body">Pesada.</text:p>
      <text:p text:style-name="Text_20_body">Hermosa.</text:p>
      <text:p text:style-name="Text_20_body">Extrañamente hermosa.</text:p>
      <text:p text:style-name="Text_20_body">La observó unos instantes.</text:p>
      <text:p text:style-name="Text_20_body">El metal estaba frío.</text:p>
      <text:p text:style-name="Text_20_body">En el extremo superior brillaba una gran piedra verde.</text:p>
      <text:p text:style-name="Text_20_body">Nunca había visto una igual.</text:p>
      <text:p text:style-name="Text_20_body">Sonrió.</text:p>
      <text:p text:style-name="Text_20_body">—Hoy es mi día de suerte —murmuró.</text:p>
      <text:p text:style-name="Text_20_body">Guardó la llave en el cinturón.</text:p>
      <text:p text:style-name="Text_20_body">Y continuó caminando hacia el pueblo.</text:p>
      <text:p text:style-name="Text_20_body">Detrás de él, la brisa agitó la hierba.</text:p>
      <text:p text:style-name="Text_20_body">Durante un instante, apenas un instante, la piedra verde pareció reflejar la luz del sol como un ojo que despertara.</text:p>
      <text:p text:style-name="Text_20_body">Después el sendero quedó vacío.</text:p>
      <text:p text:style-name="Text_20_body">Y el mundo siguió adelante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8T10:18:02.852000000</meta:creation-date>
    <dc:date>2026-06-28T10:20:38.643000000</dc:date>
    <meta:editing-duration>PT2M36S</meta:editing-duration>
    <meta:editing-cycles>1</meta:editing-cycles>
    <meta:document-statistic meta:table-count="0" meta:image-count="0" meta:object-count="0" meta:page-count="2" meta:paragraph-count="55" meta:word-count="320" meta:character-count="1828" meta:non-whitespace-character-count="1563"/>
    <meta:generator>LibreOffice/7.3.5.2$Windows_X86_64 LibreOffice_project/184fe81b8c8c30d8b5082578aee2fed2ea847c01</meta:generator>
  </office:meta>
</office:document-meta>
</file>