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f993"/>
    </style:style>
    <style:style style:name="P2" style:family="paragraph" style:parent-style-name="Text_20_body">
      <style:text-properties officeooo:rsid="000cf993" officeooo:paragraph-rsid="000cf993"/>
    </style:style>
    <style:style style:name="P3" style:family="paragraph" style:parent-style-name="Text_20_body">
      <style:text-properties officeooo:rsid="000cf993" officeooo:paragraph-rsid="0011458c"/>
    </style:style>
    <style:style style:name="P4" style:family="paragraph" style:parent-style-name="Text_20_body">
      <style:text-properties officeooo:rsid="000dde6b" officeooo:paragraph-rsid="000dde6b"/>
    </style:style>
    <style:style style:name="P5" style:family="paragraph" style:parent-style-name="Text_20_body">
      <style:text-properties officeooo:rsid="000dde6b" officeooo:paragraph-rsid="0011458c"/>
    </style:style>
    <style:style style:name="P6" style:family="paragraph" style:parent-style-name="Text_20_body">
      <style:text-properties officeooo:paragraph-rsid="000dde6b"/>
    </style:style>
    <style:style style:name="P7" style:family="paragraph" style:parent-style-name="Text_20_body">
      <style:text-properties officeooo:paragraph-rsid="000f2d7c"/>
    </style:style>
    <style:style style:name="P8" style:family="paragraph" style:parent-style-name="Text_20_body">
      <style:text-properties officeooo:rsid="000f2d7c" officeooo:paragraph-rsid="000f2d7c"/>
    </style:style>
    <style:style style:name="P9" style:family="paragraph" style:parent-style-name="Text_20_body">
      <style:text-properties officeooo:rsid="000f2d7c" officeooo:paragraph-rsid="001100a6"/>
    </style:style>
    <style:style style:name="P10" style:family="paragraph" style:parent-style-name="Text_20_body">
      <style:text-properties officeooo:paragraph-rsid="001100a6"/>
    </style:style>
    <style:style style:name="P11" style:family="paragraph" style:parent-style-name="Text_20_body">
      <style:text-properties officeooo:rsid="001100a6" officeooo:paragraph-rsid="001100a6"/>
    </style:style>
    <style:style style:name="P12" style:family="paragraph" style:parent-style-name="Text_20_body">
      <style:text-properties officeooo:rsid="0011458c" officeooo:paragraph-rsid="0011458c"/>
    </style:style>
    <style:style style:name="P13" style:family="paragraph" style:parent-style-name="Text_20_body">
      <style:text-properties officeooo:paragraph-rsid="0011458c"/>
    </style:style>
    <style:style style:name="P14" style:family="paragraph" style:parent-style-name="Text_20_body">
      <style:text-properties officeooo:paragraph-rsid="00128437"/>
    </style:style>
    <style:style style:name="T1" style:family="text">
      <style:text-properties officeooo:rsid="000cf993"/>
    </style:style>
    <style:style style:name="T2" style:family="text">
      <style:text-properties officeooo:rsid="000dde6b"/>
    </style:style>
    <style:style style:name="T3" style:family="text">
      <style:text-properties officeooo:rsid="000f2d7c"/>
    </style:style>
    <style:style style:name="T4" style:family="text">
      <style:text-properties officeooo:rsid="001100a6"/>
    </style:style>
    <style:style style:name="T5" style:family="text">
      <style:text-properties officeooo:rsid="0011458c"/>
    </style:style>
    <style:style style:name="T6" style:family="text">
      <style:text-properties officeooo:rsid="001284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 - El acantilado</text:h>
      <text:p text:style-name="Text_20_body"><text:span text:style-name="T1">Tras varios</text:span> días <text:span text:style-name="T1">de viaje, finalmente</text:span> alcanzaron el lugar señalado en el mapa.</text:p>
      <text:p text:style-name="P12">Una vasta llanura desierta terminaba abruptamente en un acantilado.</text:p>
      <text:p text:style-name="P1"><text:span text:style-name="T1">N</text:span>o había nada<text:span text:style-name="T5"> mas</text:span><text:span text:style-name="T1"> allí</text:span>.<text:span text:style-name="T5"> </text:span>Sólo un acantilado.</text:p>
      <text:p text:style-name="Text_20_body">Una inmensa pared de roca que <text:span text:style-name="T1">ca</text:span>ía<text:span text:style-name="T1"> en vertical</text:span> cientos de metros hasta el mar.</text:p>
      <text:p text:style-name="Text_20_body"><text:span text:style-name="T5">Y m</text:span>ás allá no existía ninguna otra tierra.</text:p>
      <text:p text:style-name="Text_20_body">Sólo <text:span text:style-name="T1">e</text:span>l <text:span text:style-name="T1">mar y el </text:span>horizonte<text:span text:style-name="T1">.</text:span><text:span text:style-name="T5"> </text:span><text:span text:style-name="T1">E</text:span>l borde mismo del mundo.</text:p>
      <text:p text:style-name="P2"><text:span text:style-name="T5">A</text:span> sus espaldas, la llanura se extendía en todas direcciones.<text:span text:style-name="T5"> </text:span>No había nada mas que explorar. </text:p>
      <text:p text:style-name="P2">Todo estaba a la vista.</text:p>
      <text:p text:style-name="P13">Ambos comprendieron inmediatamente lo que significaba aquel lugar.</text:p>
      <text:p text:style-name="P3">El camino terminaba allí.</text:p>
      <text:p text:style-name="P13">El mapa los había conducido al fin del continente.</text:p>
      <text:p text:style-name="P3">Y nada más.</text:p>
      <text:p text:style-name="P3"/>
      <text:p text:style-name="P13">Por primera vez desde que habían encontrado la llave, ninguno intentó buscar explicaciones.</text:p>
      <text:p text:style-name="P13">Nadie sugirió explorar los alrededores.<text:span text:style-name="T5"> </text:span>Nadie propuso revisar el mapa otra vez.</text:p>
      <text:p text:style-name="P13">Simplemente aceptaron la evidencia.</text:p>
      <text:p text:style-name="P13">Quizá porque ya no les quedaba energía para seguir luchando.<text:span text:style-name="T2"> </text:span></text:p>
      <text:p text:style-name="P5">La realidad les había alcanzado. Era el momento de aceptar la derrota.</text:p>
      <text:p text:style-name="P5"/>
      <text:p text:style-name="Text_20_body"><text:span text:style-name="T5">Permanecieron</text:span> largo rato observ<text:span text:style-name="T6">a</text:span>ndo<text:span text:style-name="T1"> el mar</text:span> en silencio.</text:p>
      <text:p text:style-name="Text_20_body">Ninguno habló.<text:span text:style-name="T5"> </text:span>No era necesario.</text:p>
      <text:p text:style-name="P14"><text:span text:style-name="T5">El tesoro hab</text:span><text:span text:style-name="T2">ía</text:span><text:span text:style-name="T5"> sido siempre una fantas</text:span><text:span text:style-name="T2">ía</text:span><text:span text:style-name="T6">. Ahora estaba claro. El viejo tenia razón.</text:span></text:p>
      <text:p text:style-name="P4">Nohk se tumbo en la hierva mirando el cielo, y vio pasar la nubes, lentas.</text:p>
      <text:p text:style-name="P6"><text:span text:style-name="T2">La brisa del mar olía a hierva y sal. Fresca, suave.</text:span></text:p>
      <text:p text:style-name="Text_20_body"><text:span text:style-name="T3">C</text:span>erró los ojos<text:span text:style-name="T3"> un momento, y</text:span> escuchó.</text:p>
      <text:p text:style-name="Text_20_body">El sonido del viento.<text:span text:style-name="T3"> Y l</text:span>os gritos lejanos de las aves marinas.</text:p>
      <text:p text:style-name="P8">Las vió volar, libres.</text:p>
      <text:p text:style-name="P9"><text:span text:style-name="T4">S</text:span>iguió<text:span text:style-name="T4"> </text:span>con la vista <text:span text:style-name="T4">a </text:span>una en vuelo. <text:span text:style-name="T4">S</text:span>e sentó.</text:p>
      <text:p text:style-name="P9"><text:soft-page-break/><text:span text:style-name="T4">E</text:span>l ave desapareció detras de la pared del acantilado.</text:p>
      <text:p text:style-name="P7">Kempht también lo <text:span text:style-name="T3">vió</text:span>.</text:p>
      <text:p text:style-name="P14"><text:span text:style-name="T4">E</text:span>star<text:span text:style-name="T2">ía</text:span><text:span text:style-name="T4"> posiblemente</text:span> anidando <text:span text:style-name="T6">all</text:span><text:span text:style-name="T2">í</text:span><text:span text:style-name="T4">.</text:span></text:p>
      <text:p text:style-name="P11">Se acercó despacio al borde y miró hacia abajo.</text:p>
      <text:p text:style-name="P10"><text:span text:style-name="T4">S</text:span>intió el vertigo de la altura.<text:span text:style-name="T4"> La caída era enorme. A</text:span>bajo el mar golpeaba <text:span text:style-name="T4">con fuerza </text:span>contra las rocas.</text:p>
      <text:p text:style-name="P10"><text:span text:style-name="T4">E</text:span>ntonces lo vió.</text:p>
      <text:p text:style-name="P10">A unos cincuenta metros de distancia.<text:span text:style-name="T4"> </text:span>Pegada a la pared del acantilado.</text:p>
      <text:p text:style-name="P10">Una estrecha cornisa descendía en diagonal hacia algún lugar oculto bajo la roca.</text:p>
      <text:p text:style-name="P11">Dijo:</text:p>
      <text:p text:style-name="P10">—Eh, Nohk...es eso un camino?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27T11:32:13.069000000</meta:creation-date>
    <dc:date>2026-06-27T17:54:06.942000000</dc:date>
    <meta:editing-duration>PT11M17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7" meta:word-count="330" meta:character-count="1914" meta:non-whitespace-character-count="1619"/>
  </office:meta>
</office:document-meta>
</file>