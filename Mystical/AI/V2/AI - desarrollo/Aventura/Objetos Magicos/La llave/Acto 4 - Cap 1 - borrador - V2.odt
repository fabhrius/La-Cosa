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 - El acantilado</text:h>
      <text:p text:style-name="Text_20_body">Tres días después alcanzaron el lugar señalado en el mapa.</text:p>
      <text:p text:style-name="Text_20_body">Durante buena parte del trayecto habían esperado algún signo.</text:p>
      <text:p text:style-name="Text_20_body">Una montaña extraña.</text:p>
      <text:p text:style-name="Text_20_body">Una ruina olvidada.</text:p>
      <text:p text:style-name="Text_20_body">Una torre.</text:p>
      <text:p text:style-name="Text_20_body">Una cueva.</text:p>
      <text:p text:style-name="Text_20_body">Cualquier cosa.</text:p>
      <text:p text:style-name="Text_20_body">Algo que justificara una vez más todos los sacrificios realizados.</text:p>
      <text:p text:style-name="Text_20_body">Pero cuando finalmente llegaron al punto exacto indicado por el mapa, descubrieron que no había nada.</text:p>
      <text:p text:style-name="Text_20_body">Sólo un acantilado.</text:p>
      <text:p text:style-name="Text_20_body">Una inmensa pared de roca que descendía cientos de metros hasta el mar.</text:p>
      <text:p text:style-name="Text_20_body">Más allá no existía ninguna otra tierra.</text:p>
      <text:p text:style-name="Text_20_body">Sólo agua.</text:p>
      <text:p text:style-name="Text_20_body">Agua hasta donde alcanzaba la vista.</text:p>
      <text:p text:style-name="Text_20_body">El horizonte parecía el borde mismo del mundo.</text:p>
      <text:p text:style-name="Text_20_body">Nohk permaneció largo rato observándolo en silencio.</text:p>
      <text:p text:style-name="Text_20_body">Kempht hizo lo mismo.</text:p>
      <text:p text:style-name="Text_20_body">Ninguno habló.</text:p>
      <text:p text:style-name="Text_20_body">No era necesario.</text:p>
      <text:p text:style-name="Text_20_body">Ambos comprendieron inmediatamente lo que significaba aquel lugar.</text:p>
      <text:p text:style-name="Text_20_body">El camino terminaba allí.</text:p>
      <text:p text:style-name="Text_20_body">No había senderos.</text:p>
      <text:p text:style-name="Text_20_body">No había cuevas.</text:p>
      <text:p text:style-name="Text_20_body">No había construcciones antiguas.</text:p>
      <text:p text:style-name="Text_20_body">No había ninguna puerta de hierro.</text:p>
      <text:p text:style-name="Text_20_body">Ningún tesoro.</text:p>
      <text:p text:style-name="Text_20_body">Nada.</text:p>
      <text:p text:style-name="Text_20_body">El mapa los había conducido al fin del continente.</text:p>
      <text:p text:style-name="Text_20_body"><text:soft-page-break/>Y nada más.</text:p>
      <text:p text:style-name="Text_20_body">Por primera vez desde que habían encontrado la llave, ninguno intentó buscar explicaciones.</text:p>
      <text:p text:style-name="Text_20_body">Nadie sugirió explorar los alrededores.</text:p>
      <text:p text:style-name="Text_20_body">Nadie propuso revisar el mapa otra vez.</text:p>
      <text:p text:style-name="Text_20_body">Ni siquiera discutieron.</text:p>
      <text:p text:style-name="Text_20_body">Simplemente aceptaron la evidencia.</text:p>
      <text:p text:style-name="Text_20_body">Quizá porque ya no les quedaba energía para seguir luchando contra ella.</text:p>
      <text:p text:style-name="Text_20_body">Durante meses habían perseguido una promesa.</text:p>
      <text:p text:style-name="Text_20_body">Habían vendido sus pertenencias.</text:p>
      <text:p text:style-name="Text_20_body">Habían abandonado sus hogares.</text:p>
      <text:p text:style-name="Text_20_body">Habían perdido amigos.</text:p>
      <text:p text:style-name="Text_20_body">Habían cruzado montañas, cuevas y desiertos.</text:p>
      <text:p text:style-name="Text_20_body">Y ahora, al final del camino, sólo encontraban el mar.</text:p>
      <text:p text:style-name="Text_20_body">Nohk dejó caer la mochila sobre la hierba.</text:p>
      <text:p text:style-name="Text_20_body">Después se sentó al borde del acantilado.</text:p>
      <text:p text:style-name="Text_20_body">La brisa marina golpeó su rostro.</text:p>
      <text:p text:style-name="Text_20_body">Era fresca.</text:p>
      <text:p text:style-name="Text_20_body">Suave.</text:p>
      <text:p text:style-name="Text_20_body">Muy distinta al calor despiadado del Desierto de Piedra.</text:p>
      <text:p text:style-name="Text_20_body">Durante unos instantes cerró los ojos.</text:p>
      <text:p text:style-name="Text_20_body">Y escuchó.</text:p>
      <text:p text:style-name="Text_20_body">El sonido constante de las olas rompiendo contra las rocas.</text:p>
      <text:p text:style-name="Text_20_body">El viento recorriendo la hierba.</text:p>
      <text:p text:style-name="Text_20_body">Los gritos lejanos de las aves marinas.</text:p>
      <text:p text:style-name="Text_20_body">Sonidos simples.</text:p>
      <text:p text:style-name="Text_20_body">Olvidados.</text:p>
      <text:p text:style-name="Text_20_body">Sonidos que habían desaparecido de su vida mientras perseguía el tesoro.</text:p>
      <text:p text:style-name="Text_20_body">Kempht se sentó unos metros más allá.</text:p>
      <text:p text:style-name="Text_20_body">Tampoco parecía interesado en seguir buscando.</text:p>
      <text:p text:style-name="Text_20_body">Miró el horizonte durante largo tiempo.</text:p>
      <text:p text:style-name="Text_20_body"><text:soft-page-break/>Pensó en Oldwood.</text:p>
      <text:p text:style-name="Text_20_body">Pensó en su casa.</text:p>
      <text:p text:style-name="Text_20_body">Pensó en los días tranquilos junto al río.</text:p>
      <text:p text:style-name="Text_20_body">Le parecieron recuerdos de otra vida.</text:p>
      <text:p text:style-name="Text_20_body">Como si hubieran sucedido muchos años atrás.</text:p>
      <text:p text:style-name="Text_20_body">Quizá porque aquellos hombres ya no existían.</text:p>
      <text:p text:style-name="Text_20_body">Los jóvenes que habían abandonado el pueblo llenos de entusiasmo habían desaparecido en algún lugar del camino.</text:p>
      <text:p text:style-name="Text_20_body">Y los que quedaban ahora eran apenas sombras de ellos mismos.</text:p>
      <text:p text:style-name="Text_20_body">Durante mucho tiempo permanecieron allí sentados.</text:p>
      <text:p text:style-name="Text_20_body">Sin hablar.</text:p>
      <text:p text:style-name="Text_20_body">Sin discutir.</text:p>
      <text:p text:style-name="Text_20_body">Sin hacer planes.</text:p>
      <text:p text:style-name="Text_20_body">La búsqueda había terminado.</text:p>
      <text:p text:style-name="Text_20_body">Por fin.</text:p>
      <text:p text:style-name="Text_20_body">Y aunque aquella conclusión resultaba amarga, también traía una extraña sensación de alivio.</text:p>
      <text:p text:style-name="Text_20_body">Ya no había decisiones que tomar.</text:p>
      <text:p text:style-name="Text_20_body">Ya no había riesgos.</text:p>
      <text:p text:style-name="Text_20_body">Ya no había inversiones.</text:p>
      <text:p text:style-name="Text_20_body">Ya no había promesas.</text:p>
      <text:p text:style-name="Text_20_body">Sólo el final.</text:p>
      <text:p text:style-name="Text_20_body">Nohk terminó tumbándose sobre la hierba.</text:p>
      <text:p text:style-name="Text_20_body">Apoyó la cabeza sobre los brazos y contempló el cielo.</text:p>
      <text:p text:style-name="Text_20_body">Las nubes avanzaban lentamente sobre el océano.</text:p>
      <text:p text:style-name="Text_20_body">Empujadas por el viento.</text:p>
      <text:p text:style-name="Text_20_body">Libres.</text:p>
      <text:p text:style-name="Text_20_body">Sin objetivos.</text:p>
      <text:p text:style-name="Text_20_body">Sin mapas.</text:p>
      <text:p text:style-name="Text_20_body">Sin tesoros.</text:p>
      <text:p text:style-name="Text_20_body">Por primera vez en mucho tiempo no pensó en la llave.</text:p>
      <text:p text:style-name="Text_20_body"><text:soft-page-break/>Ni en la bóveda.</text:p>
      <text:p text:style-name="Text_20_body">Ni en la riqueza.</text:p>
      <text:p text:style-name="Text_20_body">Simplemente observó las nubes.</text:p>
      <text:p text:style-name="Text_20_body">Y respiró.</text:p>
      <text:p text:style-name="Text_20_body">La brisa transportaba el aroma de la hierba silvestre.</text:p>
      <text:p text:style-name="Text_20_body">También el olor salado del mar.</text:p>
      <text:p text:style-name="Text_20_body">Aquella mezcla le resultó extrañamente agradable.</text:p>
      <text:p text:style-name="Text_20_body">Cerca de allí, varias aves marinas volaban sobre el acantilado.</text:p>
      <text:p text:style-name="Text_20_body">Sus siluetas aparecían y desaparecían entre las corrientes de aire.</text:p>
      <text:p text:style-name="Text_20_body">Nohk siguió una de ellas con la mirada.</text:p>
      <text:p text:style-name="Text_20_body">La observó elevarse.</text:p>
      <text:p text:style-name="Text_20_body">Descender.</text:p>
      <text:p text:style-name="Text_20_body">Girar sobre sí misma.</text:p>
      <text:p text:style-name="Text_20_body">Y entonces la vio desaparecer detrás de la pared rocosa del acantilado.</text:p>
      <text:p text:style-name="P1">Frunció ligeramente el ceño.</text:p>
      <text:p text:style-name="P1">No le dio importancia.</text:p>
      <text:p text:style-name="P1">Pero unos segundos después observó cómo otra ave hacía exactamente lo mismo.</text:p>
      <text:p text:style-name="Text_20_body">Kempht también lo había notado.</text:p>
      <text:p text:style-name="Text_20_body">Se levantó <text:span text:style-name="T1">lentamente</text:span>.</text:p>
      <text:p text:style-name="Text_20_body">Movido más por curiosidad que por esperanza.</text:p>
      <text:p text:style-name="Text_20_body">Caminó hasta el borde del precipicio.</text:p>
      <text:p text:style-name="Text_20_body">El vértigo lo obligó a detenerse.</text:p>
      <text:p text:style-name="Text_20_body">La caída era enorme.</text:p>
      <text:p text:style-name="Text_20_body">Muy abajo, el mar golpeaba violentamente contra las rocas.</text:p>
      <text:p text:style-name="Text_20_body">Retrocedió un paso.</text:p>
      <text:p text:style-name="Text_20_body">Después volvió a asomarse.</text:p>
      <text:p text:style-name="Text_20_body">Con más cuidado.</text:p>
      <text:p text:style-name="Text_20_body">Y entonces lo vio.</text:p>
      <text:p text:style-name="Text_20_body">A unos cincuenta metros de distancia.</text:p>
      <text:p text:style-name="Text_20_body">Pegada a la pared del acantilado.</text:p>
      <text:p text:style-name="Text_20_body"><text:soft-page-break/>Una estrecha cornisa descendía en diagonal hacia algún lugar oculto bajo la roca.</text:p>
      <text:p text:style-name="Text_20_body">Era apenas visible.</text:p>
      <text:p text:style-name="Text_20_body">Una grieta natural.</text:p>
      <text:p text:style-name="Text_20_body">Un camino imposible.</text:p>
      <text:p text:style-name="Text_20_body">Tan estrecho que desde arriba resultaba casi invisible.</text:p>
      <text:p text:style-name="Text_20_body">Kempht permaneció inmóvil varios segundos.</text:p>
      <text:p text:style-name="Text_20_body">Observándola.</text:p>
      <text:p text:style-name="Text_20_body">Pensando.</text:p>
      <text:p text:style-name="Text_20_body">Sintiendo cómo una idea comenzaba a abrirse paso lentamente en su mente.</text:p>
      <text:p text:style-name="Text_20_body">Una idea absurda.</text:p>
      <text:p text:style-name="Text_20_body">Peligrosa.</text:p>
      <text:p text:style-name="Text_20_body">Una idea que había jurado abandonar apenas unos minutos antes.</text:p>
      <text:p text:style-name="Text_20_body">Se volvió hacia Nohk.</text:p>
      <text:p text:style-name="Text_20_body">Y señaló la pared del acantilado.</text:p>
      <text:p text:style-name="Text_20_body">—Eh, Nohk...</text:p>
      <text:p text:style-name="P1">Nohk levantó la cabeza.</text:p>
      <text:p text:style-name="P1">—¿Qué ocurre?</text:p>
      <text:p text:style-name="P1">Kempht continuó mirando la cornisa.</text:p>
      <text:p text:style-name="P1">Y preguntó:</text:p>
      <text:p text:style-name="Text_20_body">—¿Es cosa mía... o eso parece un camin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7T11:32:13.069000000</meta:creation-date>
    <dc:date>2026-06-27T11:39:01.630000000</dc:date>
    <meta:editing-duration>PT6M48S</meta:editing-duration>
    <meta:editing-cycles>1</meta:editing-cycles>
    <meta:document-statistic meta:table-count="0" meta:image-count="0" meta:object-count="0" meta:page-count="5" meta:paragraph-count="138" meta:word-count="759" meta:character-count="4684" meta:non-whitespace-character-count="4063"/>
    <meta:generator>LibreOffice/7.3.5.2$Windows_X86_64 LibreOffice_project/184fe81b8c8c30d8b5082578aee2fed2ea847c01</meta:generator>
  </office:meta>
</office:document-meta>
</file>