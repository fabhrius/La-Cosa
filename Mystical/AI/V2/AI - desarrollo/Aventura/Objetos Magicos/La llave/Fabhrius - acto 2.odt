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Creo que el Acto II es muy diferente del Acto I.</text:p>
      <text:p text:style-name="Text_20_body">El Acto I trata sobre cómo nace una creencia.</text:p>
      <text:p text:style-name="Text_20_body">El Acto II trata sobre el encuentro entre esa creencia y la realidad.</text:p>
      <text:p text:style-name="Text_20_body">Hasta este momento, la expedición existe únicamente en la imaginación de los personajes. Ahora aparece el mundo físico y empieza a imponer sus propias reglas.</text:p>
      <text:p text:style-name="Text_20_body">Veo varios principios interesantes.</text:p>
      <text:p text:style-name="Horizontal_20_Line"/>
      <text:h text:style-name="Heading_20_2" text:outline-level="2">1. La realidad es indiferente a nuestros planes</text:h>
      <text:p text:style-name="Text_20_body">Este es probablemente el más importante.</text:p>
      <text:p text:style-name="Text_20_body">Los protagonistas tienen:</text:p>
      <text:list xml:id="list2092362832" text:style-name="L1">
        <text:list-item>
          <text:p text:style-name="P1">un objetivo</text:p>
        </text:list-item>
        <text:list-item>
          <text:p text:style-name="P1">un mapa</text:p>
        </text:list-item>
        <text:list-item>
          <text:p text:style-name="P1">provisiones</text:p>
        </text:list-item>
        <text:list-item>
          <text:p text:style-name="P1">un plan</text:p>
        </text:list-item>
      </text:list>
      <text:p text:style-name="Text_20_body">Pero el río no sabe nada de eso.</text:p>
      <text:p text:style-name="Text_20_body">La tormenta no sabe nada de eso.</text:p>
      <text:p text:style-name="Text_20_body">La montaña no sabe nada de eso.</text:p>
      <text:p text:style-name="Text_20_body">La naturaleza no coopera.</text:p>
      <text:p text:style-name="Text_20_body">Principio universal:</text:p>
      <text:p text:style-name="Quotations">El universo no está obligado a respetar nuestros planes.</text:p>
      <text:p text:style-name="Text_20_body">o</text:p>
      <text:p text:style-name="Quotations">La realidad no negocia con las expectativas.</text:p>
      <text:p text:style-name="Horizontal_20_Line"/>
      <text:h text:style-name="Heading_20_2" text:outline-level="2">2. La diferencia entre teoría y práctica</text:h>
      <text:p text:style-name="Text_20_body">Desde una mesa en Oldwood la expedición parecía sencilla.</text:p>
      <text:p text:style-name="Text_20_body">Una vez allí aparecen problemas que nadie anticipó.</text:p>
      <text:p text:style-name="Text_20_body">Es un principio muy universal.</text:p>
      <text:p text:style-name="Text_20_body">Todos los proyectos parecen más simples antes de empezar.</text:p>
      <text:p text:style-name="Text_20_body"><text:soft-page-break/>Principio universal:</text:p>
      <text:p text:style-name="Quotations">Existe una diferencia fundamental entre imaginar un camino y recorrerlo.</text:p>
      <text:p text:style-name="Horizontal_20_Line"/>
      <text:h text:style-name="Heading_20_2" text:outline-level="2">3. La fragilidad de los sistemas complejos</text:h>
      <text:p text:style-name="Text_20_body">Esto es muy Omniscientis.</text:p>
      <text:p text:style-name="Text_20_body">Toda la expedición depende de muchas piezas funcionando a la vez:</text:p>
      <text:list xml:id="list4220728878" text:style-name="L2">
        <text:list-item>
          <text:p text:style-name="P2">caballos</text:p>
        </text:list-item>
        <text:list-item>
          <text:p text:style-name="P2">equipo</text:p>
        </text:list-item>
        <text:list-item>
          <text:p text:style-name="P2">comida</text:p>
        </text:list-item>
        <text:list-item>
          <text:p text:style-name="P2">clima</text:p>
        </text:list-item>
        <text:list-item>
          <text:p text:style-name="P2">rutas transitables</text:p>
        </text:list-item>
        <text:list-item>
          <text:p text:style-name="P2">salud</text:p>
        </text:list-item>
      </text:list>
      <text:p text:style-name="Text_20_body">Basta con que falle una para que todo se derrumbe.</text:p>
      <text:p text:style-name="Text_20_body">Principio universal:</text:p>
      <text:p text:style-name="Quotations">Los sistemas suelen ser tan fuertes como su componente más vulnerable.</text:p>
      <text:p text:style-name="Text_20_body">o</text:p>
      <text:p text:style-name="Quotations">Un plan puede fracasar por un detalle que parecía insignificante.</text:p>
      <text:p text:style-name="Horizontal_20_Line"/>
      <text:h text:style-name="Heading_20_2" text:outline-level="2">4. Riesgo acumulado</text:h>
      <text:p text:style-name="Text_20_body">Esta me gusta mucho.</text:p>
      <text:p text:style-name="Text_20_body">Ningún problema individual los destruye.</text:p>
      <text:p text:style-name="Text_20_body">Lo que los destruye es la acumulación.</text:p>
      <text:list xml:id="list3442812608" text:style-name="L3">
        <text:list-item>
          <text:p text:style-name="P3">tormenta</text:p>
        </text:list-item>
        <text:list-item>
          <text:p text:style-name="P3">pérdida de recursos</text:p>
        </text:list-item>
        <text:list-item>
          <text:p text:style-name="P3">puente roto</text:p>
        </text:list-item>
        <text:list-item>
          <text:p text:style-name="P3">escalada</text:p>
        </text:list-item>
        <text:list-item>
          <text:p text:style-name="P3">muerte</text:p>
        </text:list-item>
      </text:list>
      <text:p text:style-name="Text_20_body">Cada evento aumenta la exposición al siguiente.</text:p>
      <text:p text:style-name="Text_20_body"><text:soft-page-break/>Principio universal:</text:p>
      <text:p text:style-name="Quotations">Los riesgos rara vez actúan solos.</text:p>
      <text:p text:style-name="Horizontal_20_Line"/>
      <text:h text:style-name="Heading_20_2" text:outline-level="2">5. La asimetría entre construcción y destrucción</text:h>
      <text:p text:style-name="Text_20_body">Tardaron meses en preparar la expedición.</text:p>
      <text:p text:style-name="Text_20_body">Una tormenta destruye gran parte de ella en horas.</text:p>
      <text:p text:style-name="Text_20_body">Principio universal:</text:p>
      <text:p text:style-name="Quotations">Destruir suele requerir menos energía que construir.</text:p>
      <text:p text:style-name="Text_20_body">Esto además es un principio físico bastante profundo.</text:p>
      <text:p text:style-name="Horizontal_20_Line"/>
      <text:h text:style-name="Heading_20_2" text:outline-level="2">6. La ilusión de seguridad</text:h>
      <text:p text:style-name="Text_20_body">Antes de partir probablemente se consideraban preparados.</text:p>
      <text:p text:style-name="Text_20_body">La expedición revela que no lo estaban.</text:p>
      <text:p text:style-name="Text_20_body">Principio universal:</text:p>
      <text:p text:style-name="Quotations">La ausencia de problemas pasados no garantiza la ausencia de problemas futuros.</text:p>
      <text:p text:style-name="Horizontal_20_Line"/>
      <text:h text:style-name="Heading_20_2" text:outline-level="2">7. Consecuencias irreversibles</text:h>
      <text:p text:style-name="Text_20_body">La muerte de Ghim introduce algo nuevo.</text:p>
      <text:p text:style-name="Text_20_body">Hasta entonces los errores podían corregirse.</text:p>
      <text:p text:style-name="Text_20_body">Después ya no.</text:p>
      <text:p text:style-name="Text_20_body">Esto es muy importante.</text:p>
      <text:p text:style-name="Text_20_body">Principio universal:</text:p>
      <text:p text:style-name="Quotations">Algunas decisiones producen consecuencias que no admiten corrección.</text:p>
      <text:p text:style-name="Horizontal_20_Line"/>
      <text:h text:style-name="Heading_20_2" text:outline-level="2">8. Coste real frente a coste imaginado</text:h>
      <text:p text:style-name="Text_20_body">Al principio el tesoro era una posibilidad abstracta.</text:p>
      <text:p text:style-name="Text_20_body">Ahora aparece un coste real.</text:p>
      <text:p text:style-name="Text_20_body"><text:soft-page-break/>La muerte.</text:p>
      <text:p text:style-name="Text_20_body">El sufrimiento.</text:p>
      <text:p text:style-name="Text_20_body">La pérdida de recursos.</text:p>
      <text:p text:style-name="Text_20_body">Principio universal:</text:p>
      <text:p text:style-name="Quotations">Las recompensas futuras son inciertas. Los costes presentes suelen ser inmediatos.</text:p>
      <text:p text:style-name="Horizontal_20_Line"/>
      <text:h text:style-name="Heading_20_2" text:outline-level="2">9. El mundo es más grande que nuestros objetivos</text:h>
      <text:p text:style-name="Text_20_body">Esta tiene mucho tono de Fabhrius.</text:p>
      <text:p text:style-name="Text_20_body">Los personajes creen que la historia trata sobre ellos.</text:p>
      <text:p text:style-name="Text_20_body">La montaña no.</text:p>
      <text:p text:style-name="Text_20_body">La montaña simplemente existe.</text:p>
      <text:p text:style-name="Text_20_body">Principio universal:</text:p>
      <text:p text:style-name="Quotations">La naturaleza no distingue entre héroes y extraños.</text:p>
      <text:p text:style-name="Horizontal_20_Line"/>
      <text:h text:style-name="Heading_20_2" text:outline-level="2">Las que más me gustan para Fabhrius</text:h>
      <text:p text:style-name="Text_20_body">Si buscamos frases misteriosas que no revelen nada, yo extraería ideas de estos principios:</text:p>
      <text:h text:style-name="Heading_20_3" text:outline-level="3">Opción A</text:h>
      <text:p text:style-name="Text_20_body">Basada en realidad vs expectativas.</text:p>
      <text:p text:style-name="Quotations">"El mundo que imaginamos y el mundo que habitamos rara vez son el mismo."</text:p>
      <text:p text:style-name="Horizontal_20_Line"/>
      <text:h text:style-name="Heading_20_3" text:outline-level="3">Opción B</text:h>
      <text:p text:style-name="Text_20_body">Basada en riesgo.</text:p>
      <text:p text:style-name="Quotations">"Toda distancia parece corta antes del primer obstáculo."</text:p>
      <text:p text:style-name="Horizontal_20_Line"/>
      <text:h text:style-name="Heading_20_3" text:outline-level="3">Opción C</text:h>
      <text:p text:style-name="Text_20_body">Basada en complejidad.</text:p>
      <text:p text:style-name="Quotations">"Los planes suelen fracasar por aquello que nunca fue considerado."</text:p>
      <text:p text:style-name="Horizontal_20_Line"><text:soft-page-break/></text:p>
      <text:h text:style-name="Heading_20_3" text:outline-level="3">Opción D</text:h>
      <text:p text:style-name="Text_20_body">Basada en incertidumbre.</text:p>
      <text:p text:style-name="Quotations">"Ningún viajero conoce todos los peligros del camino que elige."</text:p>
      <text:p text:style-name="Horizontal_20_Line"/>
      <text:h text:style-name="Heading_20_3" text:outline-level="3">Opción E</text:h>
      <text:p text:style-name="Text_20_body">Basada en sistemas.</text:p>
      <text:p text:style-name="Quotations">"A veces una sola piedra determina el destino de toda una caravana."</text:p>
      <text:p text:style-name="Horizontal_20_Line"/>
      <text:p text:style-name="Text_20_body">Fíjate que ninguna de estas frases dice:</text:p>
      <text:p text:style-name="Quotations">"deberían haber abandonado"</text:p>
      <text:p text:style-name="Text_20_body">ni</text:p>
      <text:p text:style-name="Quotations">"la búsqueda acabará mal"</text:p>
      <text:p text:style-name="Text_20_body">ni</text:p>
      <text:p text:style-name="Quotations">"el tesoro no existe"</text:p>
      <text:p text:style-name="Text_20_body">Simplemente describen propiedades generales de la realidad.</text:p>
      <text:p text:style-name="Text_20_body">Y eso es precisamente lo que hace que, después de terminar el cuento, el lector vuelva a ellas y descubra que hablaban de la historia sin haberla explic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11:25:37.746000000</meta:creation-date>
    <dc:date>2026-07-22T11:26:28.654000000</dc:date>
    <meta:editing-duration>PT51S</meta:editing-duration>
    <meta:editing-cycles>1</meta:editing-cycles>
    <meta:document-statistic meta:table-count="0" meta:image-count="0" meta:object-count="0" meta:page-count="5" meta:paragraph-count="111" meta:word-count="646" meta:character-count="3935" meta:non-whitespace-character-count="3415"/>
    <meta:generator>LibreOffice/7.3.5.2$Windows_X86_64 LibreOffice_project/184fe81b8c8c30d8b5082578aee2fed2ea847c01</meta:generator>
  </office:meta>
</office:document-meta>
</file>