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de acuerdo.</text:p>
      <text:p text:style-name="P1">vamos a probar creando una primera estructura para el primer cuento.</text:p>
      <text:p text:style-name="P1"/>
      <text:p text:style-name="P1">empecemos por crear las lineas generales del guion.</text:p>
      <text:p text:style-name="P1">vamos a utilizar un objeto maldito en torno al cual girara la trama.</text:p>
      <text:p text:style-name="P1">utilizaremos la llave que has propuesto.</text:p>
      <text:p text:style-name="P1"/>
      <text:p text:style-name="P1">vamos a situar al accion en un pueblo medieval.</text:p>
      <text:p text:style-name="P1">alguien encuentra una extrana llave de hierro.</text:p>
      <text:p text:style-name="P1">los vecinos hablan de una leyenda de riqueza incalculable.</text:p>
      <text:p text:style-name="P1">algo como que existe una puerta que encierra un tesoro o algo asi.</text:p>
      <text:p text:style-name="P1">en poco tiempo todos creen en la leyenda y creen que la llave es la que abre el tesoro.</text:p>
      <text:p text:style-name="P1">los vecinos se matan, unos a otros por codicia.</text:p>
      <text:p text:style-name="P1">la llave es robada una y otra vez.</text:p>
      <text:p text:style-name="P1">el ultimo sobreviviente encuentra una puerta.</text:p>
      <text:p text:style-name="P1">la llave abre la puerta.</text:p>
      <text:p text:style-name="P1">adentro no hay nada, un pequeno cuarto oscuro, sin ventanas, con las paredes de piedra y la unica puerta de hierro.</text:p>
      <text:p text:style-name="P1">el hombre entra con su lampara.</text:p>
      <text:p text:style-name="P1">la puerta se cierra detras de el.</text:p>
      <text:p text:style-name="P1">la llave todavia en la cerradura cae al suelo cuando la puerta golpea al cerrarse.</text:p>
      <text:p text:style-name="P1">el hombre queda atrapado dentro.</text:p>
      <text:p text:style-name="P1">un cuervo coge la llave y se la lleva volando.</text:p>
      <text:p text:style-name="P1">la arroja en algun lugar en campo abierto.</text:p>
      <text:p text:style-name="P1">un campesino que pasa por alli encuentra la llave.</text:p>
      <text:p text:style-name="P1"/>
      <text:p text:style-name="P1"/>
      <text:p text:style-name="P1">me ayudas a estructurar esta idea en cuatro o cinco actos?</text:p>
      <text:p text:style-name="P1">solo un resumen corto de lo que ocurre en cada acto.</text:p>
      <text:p text:style-name="P1"><text:soft-page-break/>despues lo desarrollamos.</text:p>
      <text:p text:style-name="P1"/>
      <text:p text:style-name="Text_20_body"/>
      <text:p text:style-name="Horizontal_20_Line"/>
      <text:p text:style-name="Text_20_body"/>
      <text:p text:style-name="Text_20_body"/>
      <text:p text:style-name="Text_20_body">La idea ya tiene una estructura muy parecida a una historia de <text:span text:style-name="Emphasis">The Twilight Zone</text:span>: una promesa irresistible, una escalada de consecuencias, una aparente recompensa y un castigo final que revela que todo el proceso era una trampa.</text:p>
      <text:p text:style-name="Text_20_body">Yo la dividiría en <text:span text:style-name="Strong_20_Emphasis">cinco actos</text:span>, porque permite que la obsesión colectiva crezca gradualmente.</text:p>
      <text:h text:style-name="Heading_20_3" text:outline-level="3">Acto I - La llave</text:h>
      <text:p text:style-name="Text_20_body">En un pequeño pueblo medieval, un campesino encuentra una extraña llave de hierro ennegrecido.</text:p>
      <text:p text:style-name="Text_20_body">Un anciano recuerda una antigua leyenda: existe una puerta oculta que guarda una riqueza inimaginable, y sólo puede abrirse con una llave perdida hace siglos.</text:p>
      <text:p text:style-name="Text_20_body">La historia se extiende rápidamente por el pueblo.</text:p>
      <text:p text:style-name="Text_20_body">Lo que comienza como curiosidad se convierte en esperanza.</text:p>
      <text:p text:style-name="Horizontal_20_Line"/>
      <text:h text:style-name="Heading_20_3" text:outline-level="3">Acto II - La codicia</text:h>
      <text:p text:style-name="Text_20_body">Los habitantes empiezan a disputar la posesión de la llave.</text:p>
      <text:p text:style-name="Text_20_body">Primero aparecen engaños, después robos, y finalmente asesinatos.</text:p>
      <text:p text:style-name="Text_20_body">Cada nuevo dueño está convencido de que está más cerca del tesoro.</text:p>
      <text:p text:style-name="Text_20_body">La llave cambia de manos una y otra vez mientras el pueblo se hunde en la violencia.</text:p>
      <text:p text:style-name="Text_20_body">La leyenda crece con cada muerte.</text:p>
      <text:p text:style-name="Horizontal_20_Line"/>
      <text:h text:style-name="Heading_20_3" text:outline-level="3">Acto III - La búsqueda</text:h>
      <text:p text:style-name="Text_20_body">Tras años de conflictos, sólo queda un último poseedor de la llave.</text:p>
      <text:p text:style-name="Text_20_body">Obsesionado por justificar toda la sangre derramada, abandona el pueblo y dedica su vida a buscar la puerta.</text:p>
      <text:p text:style-name="Text_20_body">Recorre montañas, bosques y ruinas olvidadas.</text:p>
      <text:p text:style-name="Text_20_body">Cuando está a punto de rendirse, descubre una antigua puerta de hierro incrustada en una pared de piedra en medio de un paraje desolado.</text:p>
      <text:p text:style-name="Text_20_body"><text:soft-page-break/>La llave encaja perfectamente.</text:p>
      <text:p text:style-name="Horizontal_20_Line"/>
      <text:h text:style-name="Heading_20_3" text:outline-level="3">Acto IV - El tesoro</text:h>
      <text:p text:style-name="Text_20_body">La puerta se abre.</text:p>
      <text:p text:style-name="Text_20_body">El hombre entra con una lámpara.</text:p>
      <text:p text:style-name="Text_20_body">Espera encontrar oro, joyas o secretos antiguos.</text:p>
      <text:p text:style-name="Text_20_body">Pero la habitación está completamente vacía.</text:p>
      <text:p text:style-name="Text_20_body">Sólo hay paredes de piedra desnuda.</text:p>
      <text:p text:style-name="Text_20_body">Mientras intenta comprenderlo, la puerta se cierra de golpe.</text:p>
      <text:p text:style-name="Text_20_body">La llave cae de la cerradura al suelo del exterior.</text:p>
      <text:p text:style-name="Text_20_body">El hombre corre hacia la puerta, pero ya es imposible abrirla desde dentro.</text:p>
      <text:p text:style-name="Text_20_body">Queda atrapado.</text:p>
      <text:p text:style-name="Horizontal_20_Line"/>
      <text:h text:style-name="Heading_20_3" text:outline-level="3">Acto V - El ciclo</text:h>
      <text:p text:style-name="Text_20_body">Un cuervo se posa junto a la puerta.</text:p>
      <text:p text:style-name="Text_20_body">Picotea la llave.</text:p>
      <text:p text:style-name="Text_20_body">Finalmente la toma con el pico y se aleja volando.</text:p>
      <text:p text:style-name="Text_20_body">Horas después la deja caer en un camino rural.</text:p>
      <text:p text:style-name="Text_20_body">Un campesino que pasa por allí la encuentra.</text:p>
      <text:p text:style-name="Text_20_body">La observa con curiosidad.</text:p>
      <text:p text:style-name="Text_20_body">Entonces recuerda una vieja historia que escuchó cuando era niño.</text:p>
      <text:p text:style-name="Text_20_body">La historia de una puerta que esconde una fortuna imposible de imaginar.</text:p>
      <text:p text:style-name="Text_20_body">Fin.</text:p>
      <text:p text:style-name="Horizontal_20_Line"/>
      <text:p text:style-name="Text_20_body">Lo que me gusta de esta estructura es que la <text:span text:style-name="Strong_20_Emphasis">maldición no está en la puerta</text:span>, sino en la propia promesa del tesoro. La llave funciona como un mecanismo que genera una búsqueda interminable. Eso encaja muy bien con futuras interpretaciones inspiradas en ciencias de la computación: una búsqueda que consume todos los recursos disponibles y nunca produce la recompensa esperada. El tesoro no es el objetivo; el verdadero efecto de la llave es obligar a las personas a seguir buscan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6-23T18:13:18.045000000</meta:creation-date>
    <dc:date>2026-06-23T18:15:48.866000000</dc:date>
    <meta:editing-duration>PT2M31S</meta:editing-duration>
    <meta:editing-cycles>1</meta:editing-cycles>
    <meta:document-statistic meta:table-count="0" meta:image-count="0" meta:object-count="0" meta:page-count="3" meta:paragraph-count="65" meta:word-count="690" meta:character-count="3946" meta:non-whitespace-character-count="3321"/>
    <meta:generator>LibreOffice/7.3.5.2$Windows_X86_64 LibreOffice_project/184fe81b8c8c30d8b5082578aee2fed2ea847c01</meta:generator>
  </office:meta>
</office:document-meta>
</file>