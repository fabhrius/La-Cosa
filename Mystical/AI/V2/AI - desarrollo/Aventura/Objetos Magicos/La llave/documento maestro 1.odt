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MNISCIENTIS - RELATO CORTO Nº1</text:h>
      <text:h text:style-name="Heading_20_2" text:outline-level="2">Título provisional</text:h>
      <text:p text:style-name="Text_20_body"><text:span text:style-name="Strong_20_Emphasis">La llave del rey</text:span></text:p>
      <text:p text:style-name="Horizontal_20_Line"/>
      <text:h text:style-name="Heading_20_1" text:outline-level="1">Información general</text:h>
      <text:h text:style-name="Heading_20_3" text:outline-level="3">Universo</text:h>
      <text:p text:style-name="Text_20_body">Omniscientis</text:p>
      <text:h text:style-name="Heading_20_3" text:outline-level="3">Época</text:h>
      <text:p text:style-name="Text_20_body">Año 750 aproximadamente.</text:p>
      <text:p text:style-name="Text_20_body">Edad Media.</text:p>
      <text:h text:style-name="Heading_20_3" text:outline-level="3">Localización</text:h>
      <text:p text:style-name="Text_20_body">Región oriental de Lluviara.</text:p>
      <text:p text:style-name="Text_20_body">Valle de Oldwood.</text:p>
      <text:p text:style-name="Text_20_body">Montañas de Terroja.</text:p>
      <text:p text:style-name="Horizontal_20_Line"/>
      <text:h text:style-name="Heading_20_1" text:outline-level="1">Género</text:h>
      <text:list xml:id="list392678765" text:style-name="L1">
        <text:list-item>
          <text:p text:style-name="P1">Fantasía medieval</text:p>
        </text:list-item>
        <text:list-item>
          <text:p text:style-name="P1">Misterio</text:p>
        </text:list-item>
        <text:list-item>
          <text:p text:style-name="P1">Aventura</text:p>
        </text:list-item>
        <text:list-item>
          <text:p text:style-name="P1">Suspense psicológico</text:p>
        </text:list-item>
        <text:list-item>
          <text:p text:style-name="P1">Final tipo "La dimensión desconocida"</text:p>
        </text:list-item>
      </text:list>
      <text:p text:style-name="Horizontal_20_Line"/>
      <text:h text:style-name="Heading_20_1" text:outline-level="1"><text:soft-page-break/>Tema filosófico principal</text:h>
      <text:h text:style-name="Heading_20_2" text:outline-level="2">Costes hundidos (Sunk Cost Fallacy)</text:h>
      <text:p text:style-name="Text_20_body">Idea central:</text:p>
      <text:p text:style-name="Text_20_body">Las personas continúan invirtiendo en proyectos fallidos porque ya han invertido demasiado para abandonarlos.</text:p>
      <text:p text:style-name="Text_20_body">El error consiste en permitir que las pérdidas pasadas determinen decisiones futuras.</text:p>
      <text:p text:style-name="Text_20_body">Nohk representa este error.</text:p>
      <text:p text:style-name="Text_20_body">Tarhk representa la decisión racional de abandonar a tiempo.</text:p>
      <text:p text:style-name="Text_20_body">El relato demuestra cómo una cadena de inversiones, pérdidas y sacrificios puede arrastrar a una persona hacia su destrucción.</text:p>
      <text:p text:style-name="Horizontal_20_Line"/>
      <text:h text:style-name="Heading_20_1" text:outline-level="1">Enseñanza implícita</text:h>
      <text:p text:style-name="Text_20_body">No todo aquello en lo que hemos invertido merece ser terminado.</text:p>
      <text:p text:style-name="Text_20_body">A veces la decisión correcta es abandonar.</text:p>
      <text:p text:style-name="Text_20_body">Cada nueva inversión debe evaluarse por sus beneficios futuros y no por lo que ya se ha perdido.</text:p>
      <text:p text:style-name="Horizontal_20_Line"/>
      <text:h text:style-name="Heading_20_1" text:outline-level="1">Estructura marco</text:h>
      <text:h text:style-name="Heading_20_2" text:outline-level="2">Prólogo</text:h>
      <text:p text:style-name="Text_20_body">Elara explora la Biblioteca Infinita.</text:p>
      <text:p text:style-name="Text_20_body">Toma un libro antiguo.</text:p>
      <text:p text:style-name="Text_20_body">Lo abre.</text:p>
      <text:p text:style-name="Text_20_body">La narración se traslada al pasado.</text:p>
      <text:p text:style-name="Text_20_body">Comienza la historia de Nohk.</text:p>
      <text:p text:style-name="Horizontal_20_Line"/>
      <text:h text:style-name="Heading_20_2" text:outline-level="2">Cierre</text:h>
      <text:p text:style-name="Text_20_body">La narración regresa a la Biblioteca Infinita.</text:p>
      <text:p text:style-name="Text_20_body"><text:soft-page-break/>Elara cierra el libro.</text:p>
      <text:p text:style-name="Text_20_body">Lo devuelve a la estantería.</text:p>
      <text:p text:style-name="Text_20_body">Queda inquieta por lo que acaba de leer.</text:p>
      <text:p text:style-name="Text_20_body">Final abierto.</text:p>
      <text:p text:style-name="Horizontal_20_Line"/>
      <text:h text:style-name="Heading_20_1" text:outline-level="1">Personajes</text:h>
      <text:h text:style-name="Heading_20_2" text:outline-level="2">Nohk</text:h>
      <text:p text:style-name="Text_20_body">25 años.</text:p>
      <text:p text:style-name="Text_20_body">Campesino.</text:p>
      <text:p text:style-name="Text_20_body">Vive cerca del río Bager.</text:p>
      <text:p text:style-name="Text_20_body">Posee:</text:p>
      <text:list xml:id="list2761760797" text:style-name="L2">
        <text:list-item>
          <text:p text:style-name="P2">pequeña casa</text:p>
        </text:list-item>
        <text:list-item>
          <text:p text:style-name="P2">tierras de cultivo</text:p>
        </text:list-item>
        <text:list-item>
          <text:p text:style-name="P2">cabras</text:p>
        </text:list-item>
        <text:list-item>
          <text:p text:style-name="P2">gallinas</text:p>
        </text:list-item>
        <text:list-item>
          <text:p text:style-name="P2">caballos</text:p>
        </text:list-item>
      </text:list>
      <text:p text:style-name="Text_20_body">Características:</text:p>
      <text:list xml:id="list1808450526" text:style-name="L3">
        <text:list-item>
          <text:p text:style-name="P3">trabajador</text:p>
        </text:list-item>
        <text:list-item>
          <text:p text:style-name="P3">optimista</text:p>
        </text:list-item>
        <text:list-item>
          <text:p text:style-name="P3">ambicioso</text:p>
        </text:list-item>
        <text:list-item>
          <text:p text:style-name="P3">persistente</text:p>
        </text:list-item>
      </text:list>
      <text:p text:style-name="Text_20_body">Defecto principal:</text:p>
      <text:p text:style-name="Text_20_body">incapacidad para abandonar.</text:p>
      <text:p text:style-name="Text_20_body">Protagonista.</text:p>
      <text:p text:style-name="Text_20_body">Último superviviente previsto.</text:p>
      <text:p text:style-name="Horizontal_20_Line"/>
      <text:h text:style-name="Heading_20_2" text:outline-level="2">Kempht</text:h>
      <text:p text:style-name="Text_20_body">Más joven del grupo.</text:p>
      <text:p text:style-name="Text_20_body"><text:soft-page-break/>Entusiasta.</text:p>
      <text:p text:style-name="Text_20_body">Leal a Nohk.</text:p>
      <text:p text:style-name="Text_20_body">Permanece en la expedición tras la deserción.</text:p>
      <text:p text:style-name="Horizontal_20_Line"/>
      <text:h text:style-name="Heading_20_2" text:outline-level="2">Johf</text:h>
      <text:p text:style-name="Text_20_body">Práctico.</text:p>
      <text:p text:style-name="Text_20_body">Observador.</text:p>
      <text:p text:style-name="Text_20_body">Encuentra los grabados dentro de la cueva.</text:p>
      <text:p text:style-name="Text_20_body">Permanece en la expedición tras la deserción.</text:p>
      <text:p text:style-name="Horizontal_20_Line"/>
      <text:h text:style-name="Heading_20_2" text:outline-level="2">Tarhk</text:h>
      <text:p text:style-name="Text_20_body">Escéptico.</text:p>
      <text:p text:style-name="Text_20_body">Pragmático.</text:p>
      <text:p text:style-name="Text_20_body">Primero en admitir que la búsqueda puede ser un error.</text:p>
      <text:p text:style-name="Text_20_body">Representa la decisión correcta.</text:p>
      <text:p text:style-name="Text_20_body">Abandona la expedición.</text:p>
      <text:p text:style-name="Horizontal_20_Line"/>
      <text:h text:style-name="Heading_20_2" text:outline-level="2">Pohval</text:h>
      <text:p text:style-name="Text_20_body">Moderado.</text:p>
      <text:p text:style-name="Text_20_body">Indeciso.</text:p>
      <text:p text:style-name="Text_20_body">Finalmente decide regresar.</text:p>
      <text:p text:style-name="Text_20_body">Abandona junto a Tarhk.</text:p>
      <text:p text:style-name="Horizontal_20_Line"/>
      <text:h text:style-name="Heading_20_2" text:outline-level="2">Ghim</text:h>
      <text:p text:style-name="Text_20_body">El más joven.</text:p>
      <text:p text:style-name="Text_20_body">Muere durante la escalada del gran acantilado.</text:p>
      <text:p text:style-name="Text_20_body">Primera víctima de la expedición.</text:p>
      <text:p text:style-name="Horizontal_20_Line"/>
      <text:h text:style-name="Heading_20_2" text:outline-level="2"><text:soft-page-break/>Jorhm</text:h>
      <text:p text:style-name="Text_20_body">Anciano estudioso.</text:p>
      <text:p text:style-name="Text_20_body">Posee una biblioteca.</text:p>
      <text:p text:style-name="Text_20_body">Conserva el libro del tesoro.</text:p>
      <text:p text:style-name="Text_20_body">Nunca cree realmente en la leyenda.</text:p>
      <text:p text:style-name="Text_20_body">Advierte repetidamente al grupo.</text:p>
      <text:p text:style-name="Horizontal_20_Line"/>
      <text:h text:style-name="Heading_20_1" text:outline-level="1">Objeto maldito</text:h>
      <text:h text:style-name="Heading_20_2" text:outline-level="2">La llave del rey</text:h>
      <text:p text:style-name="Text_20_body">Llave de hierro.</text:p>
      <text:p text:style-name="Text_20_body">Escudo real grabado.</text:p>
      <text:p text:style-name="Text_20_body">Gran piedra verde incrustada.</text:p>
      <text:p text:style-name="Text_20_body">Hermosa.</text:p>
      <text:p text:style-name="Text_20_body">Antigua.</text:p>
      <text:p text:style-name="Text_20_body">Valiosa.</text:p>
      <text:p text:style-name="Text_20_body">No posee magia explícita.</text:p>
      <text:p text:style-name="Text_20_body">Su poder es psicológico.</text:p>
      <text:p text:style-name="Text_20_body">Provoca obsesión.</text:p>
      <text:p text:style-name="Text_20_body">Representa la promesa de una recompensa futura.</text:p>
      <text:p text:style-name="Horizontal_20_Line"/>
      <text:h text:style-name="Heading_20_1" text:outline-level="1">La leyenda</text:h>
      <text:p text:style-name="Text_20_body">Hace aproximadamente 300 años.</text:p>
      <text:p text:style-name="Text_20_body">Durante el reinado de Jumphrestebar.</text:p>
      <text:p text:style-name="Text_20_body">Una guerra dividió el reino.</text:p>
      <text:p text:style-name="Text_20_body">El rey escondió un tesoro de valor incalculable.</text:p>
      <text:p text:style-name="Text_20_body">Construyó una cámara invulnerable.</text:p>
      <text:p text:style-name="Text_20_body">La protegió con una única puerta de hierro.</text:p>
      <text:p text:style-name="Text_20_body"><text:soft-page-break/>Sólo existe una llave.</text:p>
      <text:p text:style-name="Text_20_body">Antes de morir ordenó dibujar un mapa.</text:p>
      <text:p text:style-name="Text_20_body">Ese mapa aparece reproducido en el libro de Jorhm.</text:p>
      <text:p text:style-name="Horizontal_20_Line"/>
      <text:h text:style-name="Heading_20_1" text:outline-level="1">Acto I - La promesa</text:h>
      <text:h text:style-name="Heading_20_2" text:outline-level="2">Capítulo 1</text:h>
      <text:list xml:id="list1716017139" text:style-name="L4">
        <text:list-item>
          <text:p text:style-name="P4">Presentación de Nohk y Oldwood.</text:p>
        </text:list-item>
        <text:list-item>
          <text:p text:style-name="P4">Encuentra la llave en el bosque.</text:p>
        </text:list-item>
        <text:list-item>
          <text:p text:style-name="P4">La muestra a sus amigos.</text:p>
        </text:list-item>
        <text:list-item>
          <text:p text:style-name="P4">Uno reconoce el símbolo.</text:p>
        </text:list-item>
        <text:list-item>
          <text:p text:style-name="P4">Existe un libro que contiene el dibujo de la misma llave.</text:p>
        </text:list-item>
      </text:list>
      <text:p text:style-name="Text_20_body">Cliffhanger:<text:line-break/>La llave podría ser mucho más importante de lo que parece.</text:p>
      <text:p text:style-name="Horizontal_20_Line"/>
      <text:h text:style-name="Heading_20_2" text:outline-level="2">Capítulo 2</text:h>
      <text:list xml:id="list3209535316" text:style-name="L5">
        <text:list-item>
          <text:p text:style-name="P5">Visita a Jorhm.</text:p>
        </text:list-item>
        <text:list-item>
          <text:p text:style-name="P5">El anciano muestra el libro.</text:p>
        </text:list-item>
        <text:list-item>
          <text:p text:style-name="P5">Aparece el dibujo idéntico de la llave.</text:p>
        </text:list-item>
        <text:list-item>
          <text:p text:style-name="P5">Relata la leyenda del tesoro del rey.</text:p>
        </text:list-item>
      </text:list>
      <text:p text:style-name="Text_20_body">Cliffhanger:<text:line-break/>El mapa podría ser real.</text:p>
      <text:p text:style-name="Horizontal_20_Line"/>
      <text:h text:style-name="Heading_20_2" text:outline-level="2">Capítulo 3</text:h>
      <text:list xml:id="list1768851963" text:style-name="L6">
        <text:list-item>
          <text:p text:style-name="P6">La obsesión crece.</text:p>
        </text:list-item>
        <text:list-item>
          <text:p text:style-name="P6">El grupo se convence de que el tesoro existe.</text:p>
        </text:list-item>
        <text:list-item>
          <text:p text:style-name="P6">Reúnen dinero.</text:p>
        </text:list-item>
        <text:list-item>
          <text:p text:style-name="P6">Compran el libro por una fortuna.</text:p>
        </text:list-item>
        <text:list-item>
          <text:p text:style-name="P6">Estudian el mapa.</text:p>
        </text:list-item>
        <text:list-item>
          <text:p text:style-name="P6"><text:soft-page-break/>Organizan la expedición.</text:p>
        </text:list-item>
        <text:list-item>
          <text:p text:style-name="P6">Hacen un pacto para dividir el tesoro.</text:p>
        </text:list-item>
      </text:list>
      <text:p text:style-name="Text_20_body">Cliffhanger:<text:line-break/>La aventura comienza.</text:p>
      <text:p text:style-name="Horizontal_20_Line"/>
      <text:h text:style-name="Heading_20_1" text:outline-level="1">Acto II - El alto coste de la búsqueda</text:h>
      <text:h text:style-name="Heading_20_2" text:outline-level="2">Capítulo 1</text:h>
      <text:h text:style-name="Heading_20_3" text:outline-level="3">Expedición</text:h>
      <text:p text:style-name="Text_20_body">Viaje épico.</text:p>
      <text:p text:style-name="Text_20_body">Optimismo.</text:p>
      <text:p text:style-name="Text_20_body">Sensación de aventura.</text:p>
      <text:h text:style-name="Heading_20_3" text:outline-level="3">Primeros contratiempos</text:h>
      <text:p text:style-name="Text_20_body">Tormenta.</text:p>
      <text:p text:style-name="Text_20_body">Pierden:</text:p>
      <text:list xml:id="list755187269" text:style-name="L7">
        <text:list-item>
          <text:p text:style-name="P7">carreta</text:p>
        </text:list-item>
        <text:list-item>
          <text:p text:style-name="P7">caballos</text:p>
        </text:list-item>
        <text:list-item>
          <text:p text:style-name="P7">provisiones</text:p>
        </text:list-item>
      </text:list>
      <text:p text:style-name="Text_20_body">Descubren un puente destruido.</text:p>
      <text:p text:style-name="Text_20_body">Deben descender y ascender un enorme acantilado.</text:p>
      <text:p text:style-name="Text_20_body">Cliffhanger:<text:line-break/>Comienza el ascenso.</text:p>
      <text:p text:style-name="Horizontal_20_Line"/>
      <text:h text:style-name="Heading_20_2" text:outline-level="2">Capítulo 2</text:h>
      <text:h text:style-name="Heading_20_3" text:outline-level="3">El ascenso imposible</text:h>
      <text:p text:style-name="Text_20_body">Escalada extrema.</text:p>
      <text:p text:style-name="Text_20_body">Fatiga.</text:p>
      <text:p text:style-name="Text_20_body">Miedo.</text:p>
      <text:p text:style-name="Text_20_body"><text:soft-page-break/>Primeras tensiones.</text:p>
      <text:h text:style-name="Heading_20_3" text:outline-level="3">El accidente</text:h>
      <text:p text:style-name="Text_20_body">Ghim encuentra una posible ruta.</text:p>
      <text:p text:style-name="Text_20_body">Cae al vacío.</text:p>
      <text:p text:style-name="Text_20_body">Muere.</text:p>
      <text:p text:style-name="Text_20_body">El grupo queda traumatizado.</text:p>
      <text:h text:style-name="Heading_20_3" text:outline-level="3">La cueva</text:h>
      <text:p text:style-name="Text_20_body">Alcanzan la cima.</text:p>
      <text:p text:style-name="Text_20_body">Encuentran la cueva señalada por el mapa.</text:p>
      <text:p text:style-name="Text_20_body">Cliffhanger:<text:line-break/>El tesoro podría estar dentro.</text:p>
      <text:p text:style-name="Horizontal_20_Line"/>
      <text:h text:style-name="Heading_20_2" text:outline-level="2">Capítulo 3</text:h>
      <text:h text:style-name="Heading_20_3" text:outline-level="3">Decepción</text:h>
      <text:p text:style-name="Text_20_body">Exploran durante días.</text:p>
      <text:p text:style-name="Text_20_body">La cueva parece vacía.</text:p>
      <text:h text:style-name="Heading_20_3" text:outline-level="3">Deserción</text:h>
      <text:p text:style-name="Text_20_body">Tarhk propone regresar.</text:p>
      <text:p text:style-name="Text_20_body">Nohk declara:</text:p>
      <text:p text:style-name="Text_20_body">"He invertido demasiado para abandonar."</text:p>
      <text:p text:style-name="Text_20_body">Primera manifestación explícita del tema central.</text:p>
      <text:p text:style-name="Text_20_body">Tarhk y Pohval abandonan la expedición.</text:p>
      <text:h text:style-name="Heading_20_3" text:outline-level="3">Revelación</text:h>
      <text:p text:style-name="Text_20_body">Johf encuentra grabados.</text:p>
      <text:p text:style-name="Text_20_body">Aparece el símbolo de la llave.</text:p>
      <text:p text:style-name="Text_20_body">Encuentran un segundo mapa.</text:p>
      <text:p text:style-name="Text_20_body">Cliffhanger:<text:line-break/>La búsqueda continúa.</text:p>
      <text:p text:style-name="Horizontal_20_Line"/>
      <text:h text:style-name="Heading_20_1" text:outline-level="1"><text:soft-page-break/>Actos pendientes</text:h>
      <text:h text:style-name="Heading_20_2" text:outline-level="2">Acto III</text:h>
      <text:p text:style-name="Text_20_body">Seguir el segundo mapa.</text:p>
      <text:p text:style-name="Text_20_body">Viaje mucho más difícil.</text:p>
      <text:p text:style-name="Text_20_body">El tesoro parece cada vez más cercano.</text:p>
      <text:p text:style-name="Text_20_body">Nuevas pérdidas.</text:p>
      <text:p text:style-name="Text_20_body">Mayor aislamiento.</text:p>
      <text:p text:style-name="Horizontal_20_Line"/>
      <text:h text:style-name="Heading_20_2" text:outline-level="2">Acto IV</text:h>
      <text:p text:style-name="Text_20_body">Llegada al gran acantilado final.</text:p>
      <text:p text:style-name="Text_20_body">Conflictos internos.</text:p>
      <text:p text:style-name="Text_20_body">Paranoia.</text:p>
      <text:p text:style-name="Text_20_body">Muertes adicionales.</text:p>
      <text:p text:style-name="Text_20_body">Sólo queda un superviviente.</text:p>
      <text:p text:style-name="Text_20_body">Descubre una cueva oculta.</text:p>
      <text:p text:style-name="Text_20_body">Encuentra la puerta.</text:p>
      <text:p text:style-name="Horizontal_20_Line"/>
      <text:h text:style-name="Heading_20_2" text:outline-level="2">Acto V</text:h>
      <text:p text:style-name="Text_20_body">La llave abre la puerta.</text:p>
      <text:p text:style-name="Text_20_body">La bóveda existe.</text:p>
      <text:p text:style-name="Text_20_body">La leyenda era cierta.</text:p>
      <text:p text:style-name="Text_20_body">El protagonista entra.</text:p>
      <text:p text:style-name="Text_20_body">Descubre varios esqueletos antiguos.</text:p>
      <text:p text:style-name="Text_20_body">Personas que llegaron antes.</text:p>
      <text:p text:style-name="Text_20_body">No hay tesoro.</text:p>
      <text:p text:style-name="Text_20_body">La habitación está vacía.</text:p>
      <text:p text:style-name="Horizontal_20_Line"/>
      <text:h text:style-name="Heading_20_2" text:outline-level="2"><text:soft-page-break/>Acto VI</text:h>
      <text:p text:style-name="Text_20_body">La puerta se cierra.</text:p>
      <text:p text:style-name="Text_20_body">La llave cae al suelo.</text:p>
      <text:p text:style-name="Text_20_body">El protagonista queda atrapado.</text:p>
      <text:p text:style-name="Text_20_body">Comprende demasiado tarde toda la verdad.</text:p>
      <text:p text:style-name="Text_20_body">La búsqueda nunca conducía a riqueza.</text:p>
      <text:p text:style-name="Text_20_body">Sólo a la prisión.</text:p>
      <text:p text:style-name="Text_20_body">Un cuervo recoge la llave.</text:p>
      <text:p text:style-name="Text_20_body">Vuela lejos.</text:p>
      <text:p text:style-name="Text_20_body">La deja caer en otro lugar.</text:p>
      <text:p text:style-name="Text_20_body">Un campesino la encuentra.</text:p>
      <text:p text:style-name="Text_20_body">El ciclo comienza de nuevo.</text:p>
      <text:p text:style-name="Horizontal_20_Line"/>
      <text:h text:style-name="Heading_20_1" text:outline-level="1">Elementos que deben reaparecer al final</text:h>
      <text:list xml:id="list952900965" text:style-name="L8">
        <text:list-item>
          <text:p text:style-name="P8">La llave.</text:p>
        </text:list-item>
        <text:list-item>
          <text:p text:style-name="P8">La obsesión por el tesoro.</text:p>
        </text:list-item>
        <text:list-item>
          <text:p text:style-name="P8">La frase de Nohk sobre haber invertido demasiado.</text:p>
        </text:list-item>
        <text:list-item>
          <text:p text:style-name="P8">Los sacrificios realizados.</text:p>
        </text:list-item>
        <text:list-item>
          <text:p text:style-name="P8">La idea de que otros llegaron antes.</text:p>
        </text:list-item>
        <text:list-item>
          <text:p text:style-name="P8">El ciclo infinito de la búsqueda.</text:p>
        </text:list-item>
        <text:list-item>
          <text:p text:style-name="P8">El campesino encontrando la llave.</text:p>
        </text:list-item>
      </text:list>
      <text:p text:style-name="Horizontal_20_Line"/>
      <text:h text:style-name="Heading_20_1" text:outline-level="1">Longitud prevista</text:h>
      <text:p text:style-name="Text_20_body">25.000 a 30.000 palabras.</text:p>
      <text:p text:style-name="Text_20_body">Formato:</text:p>
      <text:p text:style-name="Text_20_body">Novela corta / novelette.</text:p>
      <text:p text:style-name="Text_20_body">Diseñada para publicación independiente en Ko-fi como primer relato del universo Omniscienti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09:51:02.248000000</meta:creation-date>
    <dc:date>2026-06-26T09:51:56.597000000</dc:date>
    <meta:editing-duration>PT54S</meta:editing-duration>
    <meta:editing-cycles>1</meta:editing-cycles>
    <meta:document-statistic meta:table-count="0" meta:image-count="0" meta:object-count="0" meta:page-count="10" meta:paragraph-count="234" meta:word-count="917" meta:character-count="5648" meta:non-whitespace-character-count="5005"/>
    <meta:generator>LibreOffice/7.3.5.2$Windows_X86_64 LibreOffice_project/184fe81b8c8c30d8b5082578aee2fed2ea847c01</meta:generator>
  </office:meta>
</office:document-meta>
</file>