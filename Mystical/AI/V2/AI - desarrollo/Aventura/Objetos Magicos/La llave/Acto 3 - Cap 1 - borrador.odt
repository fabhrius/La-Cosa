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2" text:outline-level="2">Capítulo 1</text:h>
      <text:h text:style-name="Heading_20_3" text:outline-level="3">Parte 1 - El nuevo mapa</text:h>
      <text:p text:style-name="Text_20_body">Durante varios minutos ninguno de los tres hombres fue capaz de apartar la vista del grabado.</text:p>
      <text:p text:style-name="Text_20_body">La luz de las antorchas temblaba sobre la roca, iluminando las líneas que alguien había trazado siglos atrás.</text:p>
      <text:p text:style-name="Text_20_body">Un mapa.</text:p>
      <text:p text:style-name="Text_20_body">Otro mapa.</text:p>
      <text:p text:style-name="Text_20_body">La confirmación de que la búsqueda no había terminado.</text:p>
      <text:p text:style-name="Text_20_body">Nohk sintió cómo una energía que creía perdida regresaba de golpe.</text:p>
      <text:p text:style-name="Text_20_body">El cansancio desapareció.</text:p>
      <text:p text:style-name="Text_20_body">La decepción desapareció.</text:p>
      <text:p text:style-name="Text_20_body">Incluso el recuerdo de los días interminables explorando galerías vacías parecía alejarse.</text:p>
      <text:p text:style-name="Text_20_body">Habían estado a punto de rendirse.</text:p>
      <text:p text:style-name="Text_20_body">Y sin embargo, la montaña volvía a responderles.</text:p>
      <text:p text:style-name="Text_20_body">La leyenda seguía viva.</text:p>
      <text:p text:style-name="Text_20_body">Johf fue el primero en reaccionar.</text:p>
      <text:p text:style-name="Text_20_body">Sacó pergamino, tinta y carbón de su mochila.</text:p>
      <text:p text:style-name="Text_20_body">—Debemos copiarlo antes de marcharnos.</text:p>
      <text:p text:style-name="P1">Los demás asintieron.</text:p>
      <text:p text:style-name="Text_20_body">Trabajaron durante horas.</text:p>
      <text:p text:style-name="Text_20_body">Con paciencia.</text:p>
      <text:p text:style-name="Text_20_body">Con precisión.</text:p>
      <text:p text:style-name="Text_20_body">Revisando una y otra vez cada línea, cada símbolo y cada marca grabada en la piedra.</text:p>
      <text:p text:style-name="Text_20_body">Nadie quería cometer un error.</text:p>
      <text:p text:style-name="Text_20_body">Aquellas líneas podían valer más que cualquier tesoro.</text:p>
      <text:p text:style-name="Text_20_body">Cuando terminaron, extendieron la copia sobre el suelo y comenzaron a estudiarla.</text:p>
      <text:p text:style-name="Text_20_body">Pronto comprendieron algo inquietante.</text:p>
      <text:p text:style-name="Text_20_body">El nuevo mapa era muy diferente al primero.</text:p>
      <text:p text:style-name="Text_20_body"><text:soft-page-break/>Mucho más extenso.</text:p>
      <text:p text:style-name="Text_20_body">Mucho más complejo.</text:p>
      <text:p text:style-name="Text_20_body">Y el destino parecía encontrarse extraordinariamente lejos.</text:p>
      <text:p text:style-name="Text_20_body">Una pequeña cruz dibujada en uno de los extremos señalaba una región situada al otro lado de Lluviara.</text:p>
      <text:p text:style-name="Text_20_body">Debían atravesar las montañas.</text:p>
      <text:p text:style-name="Text_20_body">Cruzar el gran bosque central.</text:p>
      <text:p text:style-name="Text_20_body">Internarse en territorios que ninguno de ellos conocía.</text:p>
      <text:p text:style-name="Text_20_body">Algunas de aquellas regiones ni siquiera aparecían en los mapas habituales.</text:p>
      <text:p text:style-name="Text_20_body">Eran lugares remotos.</text:p>
      <text:p text:style-name="Text_20_body">Tierras casi olvidadas.</text:p>
      <text:p text:style-name="Text_20_body">Durante unos minutos el silencio dominó la conversación.</text:p>
      <text:p text:style-name="Text_20_body">Cada uno calculaba mentalmente la distancia.</text:p>
      <text:p text:style-name="Text_20_body">Las dificultades.</text:p>
      <text:p text:style-name="Text_20_body">El tiempo necesario.</text:p>
      <text:p text:style-name="Text_20_body">Finalmente Kempht habló.</text:p>
      <text:p text:style-name="Text_20_body">—Eso está muy lejos.</text:p>
      <text:p text:style-name="Text_20_body">Nadie respondió.</text:p>
      <text:p text:style-name="Text_20_body">Porque era evidente.</text:p>
      <text:p text:style-name="Text_20_body">Johf continuó observando el pergamino.</text:p>
      <text:p text:style-name="Text_20_body">—Podrían ser meses de viaje.</text:p>
      <text:p text:style-name="Text_20_body">Tal vez más.</text:p>
      <text:p text:style-name="Text_20_body">Nohk permaneció inmóvil.</text:p>
      <text:p text:style-name="Text_20_body">Sus ojos seguían fijos en la pequeña cruz.</text:p>
      <text:p text:style-name="Text_20_body">La observaba como si ya pudiera verla frente a él.</text:p>
      <text:p text:style-name="Text_20_body">Como si el tesoro se encontrara al alcance de la mano.</text:p>
      <text:p text:style-name="Text_20_body">—No importa cuánto tiempo lleve —dijo finalmente.</text:p>
      <text:p text:style-name="Text_20_body">—Importa si podemos hacerlo —respondió Johf.</text:p>
      <text:p text:style-name="Text_20_body">Aquellas palabras devolvieron la conversación a la realidad.</text:p>
      <text:p text:style-name="Text_20_body">La emoción comenzó a enfriarse.</text:p>
      <text:p text:style-name="Text_20_body">Por primera vez examinaron honestamente su situación.</text:p>
      <text:p text:style-name="Text_20_body"><text:soft-page-break/>Y la conclusión fue desalentadora.</text:p>
      <text:p text:style-name="Text_20_body">No tenían nada.</text:p>
      <text:p text:style-name="Text_20_body">Habían perdido la carreta.</text:p>
      <text:p text:style-name="Text_20_body">Los caballos.</text:p>
      <text:p text:style-name="Text_20_body">Las provisiones.</text:p>
      <text:p text:style-name="Text_20_body">Las herramientas.</text:p>
      <text:p text:style-name="Text_20_body">El dinero.</text:p>
      <text:p text:style-name="Text_20_body">Todo lo que habían reunido para la primera expedición había desaparecido.</text:p>
      <text:p text:style-name="Text_20_body">Incluso la ropa que llevaban mostraba las cicatrices del viaje.</text:p>
      <text:p text:style-name="Text_20_body">Desgarrada.</text:p>
      <text:p text:style-name="Text_20_body">Gastada.</text:p>
      <text:p text:style-name="Text_20_body">Cubierta de polvo y barro.</text:p>
      <text:p text:style-name="Text_20_body">Pensar en atravesar medio continente en aquellas condiciones era absurdo.</text:p>
      <text:p text:style-name="Text_20_body">No podían hacerlo.</text:p>
      <text:p text:style-name="Text_20_body">No a pie.</text:p>
      <text:p text:style-name="Text_20_body">No sin provisiones.</text:p>
      <text:p text:style-name="Text_20_body">No sin equipamiento.</text:p>
      <text:p text:style-name="Text_20_body">No sin dinero.</text:p>
      <text:p text:style-name="Text_20_body">El descubrimiento del mapa había devuelto la esperanza.</text:p>
      <text:p text:style-name="Text_20_body">Pero también había revelado un nuevo problema.</text:p>
      <text:p text:style-name="Text_20_body">Quizá el mayor de todos hasta aquel momento.</text:p>
      <text:p text:style-name="Text_20_body">Durante varios minutos nadie habló.</text:p>
      <text:p text:style-name="Text_20_body">La realidad resultaba difícil de ignorar.</text:p>
      <text:p text:style-name="Text_20_body">El tesoro parecía existir.</text:p>
      <text:p text:style-name="Text_20_body">Pero también parecía más lejano que nunca.</text:p>
      <text:p text:style-name="Text_20_body">Johf fue quien rompió el silencio.</text:p>
      <text:p text:style-name="Text_20_body">—Tal vez deberíamos regresar a Oldwood.</text:p>
      <text:p text:style-name="Text_20_body">Prepararnos mejor.</text:p>
      <text:p text:style-name="Text_20_body">Esperar.</text:p>
      <text:p text:style-name="Text_20_body">Planificarlo con calma.</text:p>
      <text:p text:style-name="Text_20_body"><text:soft-page-break/>Kempht asintió lentamente.</text:p>
      <text:p text:style-name="Text_20_body">La propuesta parecía razonable.</text:p>
      <text:p text:style-name="Text_20_body">Nohk, en cambio, negó con la cabeza.</text:p>
      <text:p text:style-name="Text_20_body">No porque estuviera en desacuerdo.</text:p>
      <text:p text:style-name="Text_20_body">Sino porque ya estaba pensando en otra cosa.</text:p>
      <text:p text:style-name="Text_20_body">Pensaba en la distancia.</text:p>
      <text:p text:style-name="Text_20_body">Pensaba en el tiempo.</text:p>
      <text:p text:style-name="Text_20_body">Pensaba en la fortuna que los esperaba al final del camino.</text:p>
      <text:p text:style-name="Text_20_body">Y sobre todo pensaba en todo lo que ya habían sacrificado para llegar hasta allí.</text:p>
      <text:p text:style-name="Text_20_body">Observó nuevamente el mapa.</text:p>
      <text:p text:style-name="Text_20_body">Después la llave.</text:p>
      <text:p text:style-name="Text_20_body">La sostuvo entre sus manos durante unos segundos.</text:p>
      <text:p text:style-name="Text_20_body">La piedra verde reflejó la luz de la antorcha.</text:p>
      <text:p text:style-name="Text_20_body">Hermosa.</text:p>
      <text:p text:style-name="Text_20_body">Silenciosa.</text:p>
      <text:p text:style-name="Text_20_body">Prometedora.</text:p>
      <text:p text:style-name="Text_20_body">Entonces levantó la mirada.</text:p>
      <text:p text:style-name="Text_20_body">Había una determinación casi feroz en sus ojos.</text:p>
      <text:p text:style-name="Text_20_body">Una determinación que comenzaba a resultar inquietante.</text:p>
      <text:p text:style-name="Text_20_body">—Conseguiré el dinero.</text:p>
      <text:p text:style-name="Text_20_body">Johf y Kempht intercambiaron una mirada.</text:p>
      <text:p text:style-name="Text_20_body">Nohk continuó observando el mapa.</text:p>
      <text:p text:style-name="Text_20_body">Como si ya hubiera tomado una decisión.</text:p>
      <text:p text:style-name="Text_20_body">—No hemos llegado hasta aquí para detenernos ahora.</text:p>
      <text:p text:style-name="P1">La frase quedó suspendida en el aire.</text:p>
      <text:p text:style-name="P1">Y aunque ninguno de los tres lo sabía todavía, aquellas palabras marcarían el inicio de una nueva etapa.</text:p>
      <text:p text:style-name="P1">Una etapa mucho más peligrosa que todas las anteriore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6T11:30:05.980000000</meta:creation-date>
    <dc:date>2026-06-26T11:35:13.433000000</dc:date>
    <meta:editing-duration>PT5M7S</meta:editing-duration>
    <meta:editing-cycles>1</meta:editing-cycles>
    <meta:document-statistic meta:table-count="0" meta:image-count="0" meta:object-count="0" meta:page-count="4" meta:paragraph-count="114" meta:word-count="664" meta:character-count="4185" meta:non-whitespace-character-count="3635"/>
    <meta:generator>LibreOffice/7.3.5.2$Windows_X86_64 LibreOffice_project/184fe81b8c8c30d8b5082578aee2fed2ea847c01</meta:generator>
  </office:meta>
</office:document-meta>
</file>