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paragraph-rsid="000b1dc7"/>
    </style:style>
    <style:style style:name="T1" style:family="text">
      <style:text-properties officeooo:rsid="000b1d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Cap 3</text:span></text:h>
      <text:h text:style-name="P1" text:outline-level="2">Parte 1 - Decepción: el tesoro no está en la cueva</text:h>
      <text:p text:style-name="Text_20_body">La euforia del descubrimiento duró poco.</text:p>
      <text:p text:style-name="Text_20_body">Durante las primeras horas todos se movían por la cueva con energía renovada.</text:p>
      <text:p text:style-name="Text_20_body">Las lámparas iluminaban las paredes de roca mientras avanzaban por galerías estrechas, pasadizos sinuosos y enormes cámaras subterráneas que parecían perderse en la oscuridad.</text:p>
      <text:p text:style-name="Text_20_body">A cada nuevo corredor esperaban encontrar una puerta.</text:p>
      <text:p text:style-name="Text_20_body">A cada recodo imaginaban descubrir una cámara secreta.</text:p>
      <text:p text:style-name="Text_20_body">A cada sombra proyectada por las lámparas creían distinguir algo construido por manos humanas.</text:p>
      <text:p text:style-name="Text_20_body">Pero no encontraban nada.</text:p>
      <text:p text:style-name="Text_20_body">Sólo roca.</text:p>
      <text:p text:style-name="Text_20_body">Roca húmeda.</text:p>
      <text:p text:style-name="Text_20_body">Roca antigua.</text:p>
      <text:p text:style-name="Text_20_body">Roca interminable.</text:p>
      <text:p text:style-name="Text_20_body">La cueva resultó ser mucho más grande de lo que habían imaginado.</text:p>
      <text:p text:style-name="Text_20_body">Desde la cámara principal partían numerosos túneles que se dividían una y otra vez.</text:p>
      <text:p text:style-name="Text_20_body">Algunos descendían hacia las profundidades.</text:p>
      <text:p text:style-name="Text_20_body">Otros ascendían entre grietas estrechas.</text:p>
      <text:p text:style-name="Text_20_body">Muchos terminaban abruptamente en paredes de piedra.</text:p>
      <text:p text:style-name="Text_20_body">Otros continuaban durante cientos de metros antes de ramificarse nuevamente.</text:p>
      <text:p text:style-name="Text_20_body">Muy pronto comprendieron que explorar aquel lugar sería una tarea lenta.</text:p>
      <text:p text:style-name="Text_20_body">Y peligrosa.</text:p>
      <text:p text:style-name="Text_20_body">Perderse allí dentro parecía alarmantemente fácil.</text:p>
      <text:p text:style-name="Text_20_body">Por ese motivo decidieron mantenerse siempre unidos.</text:p>
      <text:p text:style-name="Text_20_body">Nadie volvería a alejarse del grupo como había ocurrido durante la escalada.</text:p>
      <text:p text:style-name="Text_20_body">La muerte de Ghim seguía demasiado presente en sus recuerdos.</text:p>
      <text:p text:style-name="Text_20_body">Utilizaron las cuerdas para marcar las rutas exploradas.</text:p>
      <text:p text:style-name="Text_20_body">Avanzaban formando una línea.</text:p>
      <text:p text:style-name="Text_20_body">Uno delante.</text:p>
      <text:p text:style-name="Text_20_body"><text:soft-page-break/>Los demás detrás.</text:p>
      <text:p text:style-name="Text_20_body">Anotando mentalmente cada bifurcación.</text:p>
      <text:p text:style-name="Text_20_body">Cada túnel.</text:p>
      <text:p text:style-name="Text_20_body">Cada sala.</text:p>
      <text:p text:style-name="Text_20_body">Cada rincón.</text:p>
      <text:p text:style-name="Text_20_body">Al principio aquello parecía razonable.</text:p>
      <text:p text:style-name="Text_20_body">Incluso emocionante.</text:p>
      <text:p text:style-name="Text_20_body">Cada nueva galería podía conducir al tesoro.</text:p>
      <text:p text:style-name="Text_20_body">Cada cámara podía ocultar la puerta de hierro.</text:p>
      <text:p text:style-name="Text_20_body">Cada paso podía acercarlos al final de la búsqueda.</text:p>
      <text:p text:style-name="Text_20_body">Pero los días comenzaron a pasar.</text:p>
      <text:p text:style-name="Text_20_body">Y nada cambiaba.</text:p>
      <text:p text:style-name="Text_20_body">La primera jornada terminó sin resultados.</text:p>
      <text:p text:style-name="Text_20_body">La segunda también.</text:p>
      <text:p text:style-name="Text_20_body">La tercera fue aún peor.</text:p>
      <text:p text:style-name="Text_20_body">La oscuridad constante empezó a afectar el ánimo del grupo.</text:p>
      <text:p text:style-name="Text_20_body">Dentro de la montaña no existía el amanecer.</text:p>
      <text:p text:style-name="Text_20_body">Ni el atardecer.</text:p>
      <text:p text:style-name="Text_20_body">Ni el cielo.</text:p>
      <text:p text:style-name="Text_20_body">El tiempo parecía inmóvil.</text:p>
      <text:p text:style-name="Text_20_body">Las lámparas marcaban el ritmo de sus vidas.</text:p>
      <text:p text:style-name="Text_20_body">Cuando el aceite comenzaba a agotarse descansaban.</text:p>
      <text:p text:style-name="Text_20_body">Cuando volvían a llenarlas continuaban explorando.</text:p>
      <text:p text:style-name="Text_20_body">La sensación era extraña.</text:p>
      <text:p text:style-name="Text_20_body">Como si la montaña estuviera devorando lentamente los días.</text:p>
      <text:p text:style-name="Text_20_body">Las conversaciones se hicieron menos frecuentes.</text:p>
      <text:p text:style-name="Text_20_body">Cada vez que encontraban una nueva bifurcación aparecía la misma expectativa.</text:p>
      <text:p text:style-name="Text_20_body">Y cada vez la decepción regresaba.</text:p>
      <text:p text:style-name="Text_20_body">Una pared vacía.</text:p>
      <text:p text:style-name="Text_20_body">Un túnel derrumbado.</text:p>
      <text:p text:style-name="Text_20_body"><text:soft-page-break/>Una cámara natural sin nada especial.</text:p>
      <text:p text:style-name="Text_20_body">Nada.</text:p>
      <text:p text:style-name="Text_20_body">Siempre nada.</text:p>
      <text:p text:style-name="Text_20_body">Poco a poco comenzaron a evitar hablar del tesoro.</text:p>
      <text:p text:style-name="Text_20_body">Nadie quería admitirlo.</text:p>
      <text:p text:style-name="Text_20_body">Pero todos empezaban a formular la misma pregunta.</text:p>
      <text:p text:style-name="Text_20_body">¿Y si la cueva sólo era una cueva?</text:p>
      <text:p text:style-name="Text_20_body">La duda se instaló silenciosamente entre ellos.</text:p>
      <text:p text:style-name="Text_20_body">Primero como un pensamiento incómodo.</text:p>
      <text:p text:style-name="Text_20_body">Después como una posibilidad real.</text:p>
      <text:p text:style-name="Text_20_body">Y finalmente como una conclusión difícil de ignorar.</text:p>
      <text:p text:style-name="Text_20_body">La cuarta jornada fue especialmente dura.</text:p>
      <text:p text:style-name="Text_20_body">Habían explorado una extensa red de galerías hacia el norte.</text:p>
      <text:p text:style-name="Text_20_body">Horas enteras avanzando por túneles húmedos y estrechos.</text:p>
      <text:p text:style-name="Text_20_body">Horas enteras arrastrándose entre rocas.</text:p>
      <text:p text:style-name="Text_20_body">Horas enteras esperando encontrar algo.</text:p>
      <text:p text:style-name="Text_20_body">Cuando regresaron al campamento improvisado dentro de la cueva, el agotamiento era evidente.</text:p>
      <text:p text:style-name="Text_20_body">Nadie tenía ganas de hablar.</text:p>
      <text:p text:style-name="Text_20_body">Nadie tenía ganas de seguir fingiendo optimismo.</text:p>
      <text:p text:style-name="Text_20_body">Las lámparas proyectaban sombras inquietantes sobre las paredes.</text:p>
      <text:p text:style-name="Text_20_body">El silencio se prolongó durante varios minutos.</text:p>
      <text:p text:style-name="Text_20_body">Hasta que finalmente Tarhk habló.</text:p>
      <text:p text:style-name="Text_20_body">Su voz resonó con fuerza en la oscuridad.</text:p>
      <text:p text:style-name="Text_20_body">—No hay nada en esta cueva.</text:p>
      <text:p text:style-name="Text_20_body">Las palabras quedaron suspendidas en el aire.</text:p>
      <text:p text:style-name="Text_20_body">Nadie respondió.</text:p>
      <text:p text:style-name="Text_20_body">Porque nadie podía hacerlo.</text:p>
      <text:p text:style-name="Text_20_body">Todos habían pensado exactamente lo mismo.</text:p>
      <text:p text:style-name="Text_20_body">Tarhk observó a sus compañeros.</text:p>
      <text:p text:style-name="Text_20_body">Después continuó.</text:p>
      <text:p text:style-name="Text_20_body"><text:soft-page-break/>—Llevamos días aquí dentro.</text:p>
      <text:p text:style-name="Text_20_body">Hemos recorrido kilómetros de túneles.</text:p>
      <text:p text:style-name="Text_20_body">Hemos explorado todas las galerías que hemos encontrado.</text:p>
      <text:p text:style-name="Text_20_body">Y no hemos visto una sola señal de la bóveda.</text:p>
      <text:p text:style-name="Text_20_body">Ni una puerta.</text:p>
      <text:p text:style-name="Text_20_body">Ni una cerradura.</text:p>
      <text:p text:style-name="Text_20_body">Ni una piedra trabajada por el hombre.</text:p>
      <text:p text:style-name="Text_20_body">Nada.</text:p>
      <text:p text:style-name="Text_20_body">La lámpara iluminó parcialmente su rostro cansado.</text:p>
      <text:p text:style-name="Text_20_body">—Jorhm tenía razón.</text:p>
      <text:p text:style-name="Text_20_body">Aquellas palabras dolieron más que cualquier otra cosa.</text:p>
      <text:p text:style-name="Text_20_body">Porque no atacaban la expedición.</text:p>
      <text:p text:style-name="Text_20_body">Atacaban la esperanza.</text:p>
      <text:p text:style-name="Text_20_body">—El tesoro no existe.</text:p>
      <text:p text:style-name="Text_20_body">Nadie protestó.</text:p>
      <text:p text:style-name="Text_20_body">Nadie se enfadó.</text:p>
      <text:p text:style-name="Text_20_body">Nadie intentó discutir.</text:p>
      <text:p text:style-name="Text_20_body">Simplemente guardaron silencio.</text:p>
      <text:p text:style-name="Text_20_body">El silencio de quienes empiezan a sospechar que han cometido un terrible error.</text:p>
      <text:p text:style-name="Text_20_body">Nohk bajó la mirada.</text:p>
      <text:p text:style-name="Text_20_body">Intentó encontrar una respuesta.</text:p>
      <text:p text:style-name="Text_20_body">Un argumento.</text:p>
      <text:p text:style-name="Text_20_body">Cualquier cosa.</text:p>
      <text:p text:style-name="Text_20_body">Pero las palabras no llegaron.</text:p>
      <text:p text:style-name="Text_20_body">Las imágenes acudieron primero.</text:p>
      <text:p text:style-name="Text_20_body">La bolsa de monedas entregada a Jorhm.</text:p>
      <text:p text:style-name="Text_20_body">La carreta perdida en la tormenta.</text:p>
      <text:p text:style-name="Text_20_body">Los caballos desaparecidos.</text:p>
      <text:p text:style-name="Text_20_body">Los días de viaje.</text:p>
      <text:p text:style-name="Text_20_body">La escalada.</text:p>
      <text:p text:style-name="Text_20_body"><text:soft-page-break/>La caída de Ghim.</text:p>
      <text:p text:style-name="Text_20_body">Todo aquello había sucedido para llegar a una cueva vacía.</text:p>
      <text:p text:style-name="Text_20_body">La idea era insoportable.</text:p>
      <text:p text:style-name="Text_20_body">Y sin embargo cada día resultaba más difícil negarla.</text:p>
      <text:p text:style-name="Text_20_body">La oscuridad volvió a llenar el campamento.</text:p>
      <text:p text:style-name="Text_20_body">Las llamas de las lámparas vacilaron suavemente.</text:p>
      <text:p text:style-name="Text_20_body">Y por primera vez desde que comenzó la expedición, ninguno de ellos podía asegurar que el tesoro existiera realmente.</text:p>
      <text:p text:style-name="Text_20_body">Tal vez sólo habían perseguido una historia.</text:p>
      <text:p text:style-name="Text_20_body">Tal vez una leyenda había sido suficiente para arrastrarlos hasta el corazón de una montaña.</text:p>
      <text:p text:style-name="Text_20_body">Y tal vez, después de todo lo que habían perdido, la montaña no tenía nada que ofrecerles a cambio.</text:p>
      <text:p text:style-name="Standard"/>
      <text:p text:style-name="Horizontal_20_Line"/>
      <text:p text:style-name="Text_20_body"/>
      <text:h text:style-name="Heading_20_2" text:outline-level="2">Parte 2 - La deserción</text:h>
      <text:p text:style-name="Text_20_body">Las palabras de Tarhk permanecieron suspendidas en la oscuridad mucho después de haber sido pronunciadas.</text:p>
      <text:p text:style-name="Text_20_body">Nadie respondió.</text:p>
      <text:p text:style-name="Text_20_body">Las lámparas proyectaban sombras temblorosas sobre las paredes de roca.</text:p>
      <text:p text:style-name="Text_20_body">El silencio de la cueva parecía absorber cualquier intento de conversación.</text:p>
      <text:p text:style-name="Text_20_body">Todos sabían que Tarhk tenía razón.</text:p>
      <text:p text:style-name="Text_20_body">Y todos sabían también que admitirlo significaba aceptar algo mucho peor.</text:p>
      <text:p text:style-name="Text_20_body">Aceptar que habían llegado hasta allí para nada.</text:p>
      <text:p text:style-name="Text_20_body">Aceptar que Ghim había muerto persiguiendo una ilusión.</text:p>
      <text:p text:style-name="Text_20_body">Aceptar que todo había sido un error.</text:p>
      <text:p text:style-name="Text_20_body">Finalmente Tarhk volvió a hablar.</text:p>
      <text:p text:style-name="Text_20_body">Esta vez con voz firme.</text:p>
      <text:p text:style-name="Text_20_body">Como quien ha tomado una decisión irrevocable.</text:p>
      <text:p text:style-name="Text_20_body">—Es hora de volver.</text:p>
      <text:p text:style-name="Text_20_body">Nadie necesitó preguntar qué quería decir.</text:p>
      <text:p text:style-name="Text_20_body"><text:soft-page-break/>Había dejado de hablar de la cueva.</text:p>
      <text:p text:style-name="Text_20_body">Había dejado de hablar del tesoro.</text:p>
      <text:p text:style-name="Text_20_body">Estaba hablando de la expedición.</text:p>
      <text:p text:style-name="Text_20_body">De todo aquello.</text:p>
      <text:p text:style-name="Text_20_body">De la búsqueda completa.</text:p>
      <text:p text:style-name="Text_20_body">Tarhk se incorporó lentamente.</text:p>
      <text:p text:style-name="Text_20_body">Miró a cada uno de sus compañeros.</text:p>
      <text:p text:style-name="Text_20_body">—Hemos perdido la carreta.</text:p>
      <text:p text:style-name="Text_20_body">Los caballos.</text:p>
      <text:p text:style-name="Text_20_body">Las provisiones.</text:p>
      <text:p text:style-name="Text_20_body">Ghim ha muerto.</text:p>
      <text:p text:style-name="Text_20_body">Llevamos semanas persiguiendo una leyenda.</text:p>
      <text:p text:style-name="Text_20_body">Y no hemos encontrado nada.</text:p>
      <text:p text:style-name="Text_20_body">Su voz resonó entre las paredes de piedra.</text:p>
      <text:p text:style-name="Text_20_body">—Ya basta.</text:p>
      <text:p text:style-name="Text_20_body">Nadie discutió sus palabras.</text:p>
      <text:p text:style-name="Text_20_body">Porque eran ciertas.</text:p>
      <text:p text:style-name="Text_20_body">Todas.</text:p>
      <text:p text:style-name="Text_20_body">El silencio volvió a extenderse.</text:p>
      <text:p text:style-name="Text_20_body">Entonces Nohk levantó la cabeza.</text:p>
      <text:p text:style-name="Text_20_body">Respondió inmediatamente.</text:p>
      <text:p text:style-name="Text_20_body">Como si llevara horas preparándose para aquella conversación.</text:p>
      <text:p text:style-name="Text_20_body">—Esto no ha terminado.</text:p>
      <text:p text:style-name="Text_20_body">Tarhk lo observó.</text:p>
      <text:p text:style-name="Text_20_body">Nohk continuó.</text:p>
      <text:p text:style-name="Text_20_body">—No para mí.</text:p>
      <text:p text:style-name="Text_20_body">Su voz sonó más dura de lo habitual.</text:p>
      <text:p text:style-name="Text_20_body">Más intensa.</text:p>
      <text:p text:style-name="Text_20_body">—He invertido demasiado para dejarlo ahora.</text:p>
      <text:p text:style-name="Text_20_body">Aquellas palabras hicieron que varios levantaran la mirada.</text:p>
      <text:p text:style-name="Text_20_body"><text:soft-page-break/>Nohk se puso en pie.</text:p>
      <text:p text:style-name="Text_20_body">Comenzó a caminar lentamente alrededor de la pequeña zona iluminada por las lámparas.</text:p>
      <text:p text:style-name="Text_20_body">—Vendimos nuestros animales.</text:p>
      <text:p text:style-name="Text_20_body">Entregamos nuestro dinero.</text:p>
      <text:p text:style-name="Text_20_body">Atravesamos media región.</text:p>
      <text:p text:style-name="Text_20_body">Sobrevivimos a la tormenta.</text:p>
      <text:p text:style-name="Text_20_body">Perdimos todo el equipo.</text:p>
      <text:p text:style-name="Text_20_body">Escalamos aquella maldita montaña.</text:p>
      <text:p text:style-name="Text_20_body">Su voz fue ganando fuerza.</text:p>
      <text:p text:style-name="Text_20_body">—¿Y ahora vamos a regresar porque una cueva está vacía?</text:p>
      <text:p text:style-name="Text_20_body">Nadie respondió.</text:p>
      <text:p text:style-name="Text_20_body">—No.</text:p>
      <text:p text:style-name="Text_20_body">Yo no voy a hacerlo.</text:p>
      <text:p text:style-name="Text_20_body">Se volvió hacia ellos.</text:p>
      <text:p text:style-name="Text_20_body">Sus ojos brillaban bajo la luz amarillenta de las lámparas.</text:p>
      <text:p text:style-name="Text_20_body">—El tesoro existe.</text:p>
      <text:p text:style-name="Text_20_body">Estoy seguro.</text:p>
      <text:p text:style-name="Text_20_body">Tal vez esta cueva no era el final.</text:p>
      <text:p text:style-name="Text_20_body">Tal vez interpretamos algo mal.</text:p>
      <text:p text:style-name="Text_20_body">Tal vez todavía no hemos encontrado la entrada correcta.</text:p>
      <text:p text:style-name="Text_20_body">Pero existe.</text:p>
      <text:p text:style-name="Text_20_body">Y voy a encontrarlo.</text:p>
      <text:p text:style-name="Text_20_body">El grupo guardó silencio.</text:p>
      <text:p text:style-name="Text_20_body">La tensión era evidente.</text:p>
      <text:p text:style-name="Text_20_body">Cada hombre parecía atrapado entre dos futuros distintos.</text:p>
      <text:p text:style-name="Text_20_body">Uno implicaba regresar.</text:p>
      <text:p text:style-name="Text_20_body">El otro continuar.</text:p>
      <text:p text:style-name="Text_20_body">Ninguno resultaba sencillo.</text:p>
      <text:p text:style-name="Text_20_body">Tarhk negó lentamente con la cabeza.</text:p>
      <text:p text:style-name="Text_20_body">—Estás dejando que la codicia decida por ti.</text:p>
      <text:p text:style-name="Text_20_body"><text:soft-page-break/>—No.</text:p>
      <text:p text:style-name="Text_20_body">—Sí.</text:p>
      <text:p text:style-name="Text_20_body">Tarhk señaló la oscuridad que los rodeaba.</text:p>
      <text:p text:style-name="Text_20_body">—Mira dónde estamos.</text:p>
      <text:p text:style-name="Text_20_body">Mira lo que hemos perdido.</text:p>
      <text:p text:style-name="Text_20_body">¿Y qué tenemos a cambio?</text:p>
      <text:p text:style-name="Text_20_body">Nada.</text:p>
      <text:p text:style-name="Text_20_body">Absolutamente nada.</text:p>
      <text:p text:style-name="Text_20_body">Por primera vez la conversación comenzaba a parecer una discusión.</text:p>
      <text:p text:style-name="Text_20_body">Nohk dio un paso hacia él.</text:p>
      <text:p text:style-name="Text_20_body">—Tenemos una pista.</text:p>
      <text:p text:style-name="Text_20_body">—Tenemos una montaña llena de piedra.</text:p>
      <text:p text:style-name="Text_20_body">—Tenemos un mapa.</text:p>
      <text:p text:style-name="Text_20_body">—Tenemos una leyenda.</text:p>
      <text:p text:style-name="Text_20_body">—Tenemos una llave.</text:p>
      <text:p text:style-name="Text_20_body">—Tenemos una historia para niños.</text:p>
      <text:p text:style-name="Text_20_body">La respuesta fue inmediata.</text:p>
      <text:p text:style-name="Text_20_body">Violenta.</text:p>
      <text:p text:style-name="Text_20_body">Cargada de frustración acumulada.</text:p>
      <text:p text:style-name="Text_20_body">Ambos hombres se observaron durante varios segundos.</text:p>
      <text:p text:style-name="Text_20_body">El resto permanecía inmóvil.</text:p>
      <text:p text:style-name="Text_20_body">Incapaz de intervenir.</text:p>
      <text:p text:style-name="Text_20_body">Porque el problema era mucho más profundo que una simple discusión.</text:p>
      <text:p text:style-name="Text_20_body">Era una elección.</text:p>
      <text:p text:style-name="Text_20_body">Y cada uno de ellos debía tomarla.</text:p>
      <text:p text:style-name="Text_20_body">Finalmente Nohk se volvió hacia los demás.</text:p>
      <text:p text:style-name="Text_20_body">Comprendió que no podía convencer a Tarhk.</text:p>
      <text:p text:style-name="Text_20_body">Debía convencer al grupo.</text:p>
      <text:p text:style-name="Text_20_body">—¿Quién está conmigo?</text:p>
      <text:p text:style-name="Text_20_body">La pregunta cayó sobre ellos como una piedra.</text:p>
      <text:p text:style-name="Text_20_body"><text:soft-page-break/>Nadie respondió inmediatamente.</text:p>
      <text:p text:style-name="Text_20_body">Kempht observó el suelo.</text:p>
      <text:p text:style-name="Text_20_body">Johf miró las sombras de la cueva.</text:p>
      <text:p text:style-name="Text_20_body">Pohval parecía dividido.</text:p>
      <text:p text:style-name="Text_20_body">Todos entendían lo que significaba responder.</text:p>
      <text:p text:style-name="Text_20_body">No era una opinión.</text:p>
      <text:p text:style-name="Text_20_body">Era un compromiso.</text:p>
      <text:p text:style-name="Text_20_body">Una promesa.</text:p>
      <text:p text:style-name="Text_20_body">Un riesgo.</text:p>
      <text:p text:style-name="Text_20_body">El silencio se prolongó durante varios segundos.</text:p>
      <text:p text:style-name="Text_20_body">Hasta que finalmente Kempht habló.</text:p>
      <text:p text:style-name="Text_20_body">Su voz sonó insegura.</text:p>
      <text:p text:style-name="Text_20_body">Pero clara.</text:p>
      <text:p text:style-name="Text_20_body">—Yo continúo.</text:p>
      <text:p text:style-name="Text_20_body">Nohk asintió.</text:p>
      <text:p text:style-name="Text_20_body">Aquello parecía suficiente para romper la inmovilidad.</text:p>
      <text:p text:style-name="Text_20_body">Un instante después Johf levantó la cabeza.</text:p>
      <text:p text:style-name="Text_20_body">—Yo también.</text:p>
      <text:p text:style-name="Text_20_body">Tarhk cerró los ojos durante un momento.</text:p>
      <text:p text:style-name="Text_20_body">Como si aquella respuesta confirmara algo que ya sospechaba.</text:p>
      <text:p text:style-name="Text_20_body">Entonces todas las miradas se dirigieron hacia Pohval.</text:p>
      <text:p text:style-name="Text_20_body">El último indeciso.</text:p>
      <text:p text:style-name="Text_20_body">El hombre respiró profundamente.</text:p>
      <text:p text:style-name="Text_20_body">Durante unos segundos pareció debatirse consigo mismo.</text:p>
      <text:p text:style-name="Text_20_body">Finalmente negó con la cabeza.</text:p>
      <text:p text:style-name="Text_20_body">—No.</text:p>
      <text:p text:style-name="Text_20_body">Nadie dijo nada.</text:p>
      <text:p text:style-name="Text_20_body">—Es demasiado arriesgado.</text:p>
      <text:p text:style-name="Text_20_body">Ya hemos perdido suficiente.</text:p>
      <text:p text:style-name="Text_20_body">Todavía estamos a tiempo de recuperar nuestras vidas.</text:p>
      <text:p text:style-name="Text_20_body"><text:soft-page-break/>Miró a Nohk.</text:p>
      <text:p text:style-name="Text_20_body">—Creo que es hora de volver.</text:p>
      <text:p text:style-name="Text_20_body">Las palabras dolieron.</text:p>
      <text:p text:style-name="Text_20_body">No porque fueran agresivas.</text:p>
      <text:p text:style-name="Text_20_body">Sino porque eran sinceras.</text:p>
      <text:p text:style-name="Text_20_body">Porque todos sabían que podían ser ciertas.</text:p>
      <text:p text:style-name="Text_20_body">La decisión quedó tomada.</text:p>
      <text:p text:style-name="Text_20_body">Tres continuarían.</text:p>
      <text:p text:style-name="Text_20_body">Dos regresarían.</text:p>
      <text:p text:style-name="Text_20_body">El grupo que había abandonado Oldwood unido comenzaba a romperse.</text:p>
      <text:p text:style-name="Text_20_body">Aquella noche casi nadie durmió.</text:p>
      <text:p text:style-name="Text_20_body">Al amanecer prepararon sus cosas en silencio.</text:p>
      <text:p text:style-name="Text_20_body">No hubo discusiones.</text:p>
      <text:p text:style-name="Text_20_body">No hubo intentos de convencer a nadie.</text:p>
      <text:p text:style-name="Text_20_body">Las decisiones ya estaban tomadas.</text:p>
      <text:p text:style-name="Text_20_body">Tarhk y Pohval se ajustaron las mochilas.</text:p>
      <text:p text:style-name="Text_20_body">Intercambiaron algunas palabras breves con sus antiguos compañeros.</text:p>
      <text:p text:style-name="Text_20_body">Después se dirigieron hacia la salida de la cueva.</text:p>
      <text:p text:style-name="Text_20_body">Nohk observó cómo se alejaban.</text:p>
      <text:p text:style-name="Text_20_body">Sintió una extraña mezcla de emociones.</text:p>
      <text:p text:style-name="Text_20_body">Tristeza.</text:p>
      <text:p text:style-name="Text_20_body">Duda.</text:p>
      <text:p text:style-name="Text_20_body">Ira.</text:p>
      <text:p text:style-name="Text_20_body">Y algo más.</text:p>
      <text:p text:style-name="Text_20_body">Algo que no quería admitir.</text:p>
      <text:p text:style-name="Text_20_body">Envidia.</text:p>
      <text:p text:style-name="Text_20_body">Porque durante un instante deseó marcharse con ellos.</text:p>
      <text:p text:style-name="Text_20_body">Abandonarlo todo.</text:p>
      <text:p text:style-name="Text_20_body">Regresar a casa.</text:p>
      <text:p text:style-name="Text_20_body">Recuperar la vida que había dejado atrás.</text:p>
      <text:p text:style-name="Text_20_body"><text:soft-page-break/>Pero el pensamiento desapareció rápidamente.</text:p>
      <text:p text:style-name="Text_20_body">La llave seguía allí.</text:p>
      <text:p text:style-name="Text_20_body">El mapa seguía allí.</text:p>
      <text:p text:style-name="Text_20_body">Y el tesoro también.</text:p>
      <text:p text:style-name="Text_20_body">Tenía que estarlo.</text:p>
      <text:p text:style-name="Text_20_body">Porque si no existía, entonces todo lo que habían sacrificado carecía de sentido.</text:p>
      <text:p text:style-name="Text_20_body">Y Nohk todavía no estaba preparado para aceptar una verdad semejante.</text:p>
      <text:p text:style-name="Text_20_body">Mientras Tarhk y Pohval desaparecían en la oscuridad del túnel, los tres hombres que permanecían en la cueva continuaron observando la entrada durante largo tiempo.</text:p>
      <text:p text:style-name="Text_20_body">Sin saber que acababan de despedirse por última vez.</text:p>
      <text:p text:style-name="Text_20_body"/>
      <text:p text:style-name="Horizontal_20_Line"/>
      <text:p text:style-name="Text_20_body"/>
      <text:h text:style-name="Heading_20_2" text:outline-level="2">Parte 3 - La revelación de un nuevo mapa</text:h>
      <text:p text:style-name="Text_20_body">La marcha de Tarhk y Pohval dejó un vacío difícil de ignorar.</text:p>
      <text:p text:style-name="Text_20_body">La cueva parecía más grande ahora.</text:p>
      <text:p text:style-name="Text_20_body">Más oscura.</text:p>
      <text:p text:style-name="Text_20_body">Más silenciosa.</text:p>
      <text:p text:style-name="Text_20_body">Durante semanas habían tomado todas las decisiones entre seis hombres.</text:p>
      <text:p text:style-name="Text_20_body">Después entre cinco.</text:p>
      <text:p text:style-name="Text_20_body">Ahora sólo quedaban tres.</text:p>
      <text:p text:style-name="Text_20_body">Nohk.</text:p>
      <text:p text:style-name="Text_20_body">Kempht.</text:p>
      <text:p text:style-name="Text_20_body">Johf.</text:p>
      <text:p text:style-name="Text_20_body">Y por primera vez desde el inicio de la expedición comenzaron a parecer un grupo demasiado pequeño para una tarea tan grande.</text:p>
      <text:p text:style-name="Text_20_body">La exploración continuó.</text:p>
      <text:p text:style-name="Text_20_body">Pero avanzaba lentamente.</text:p>
      <text:p text:style-name="Text_20_body">Cada galería debía ser revisada con cuidado.</text:p>
      <text:p text:style-name="Text_20_body">Cada bifurcación obligaba a detenerse.</text:p>
      <text:p text:style-name="Text_20_body"><text:soft-page-break/>Cada tramo de cuerda tenía que ser colocado por menos manos.</text:p>
      <text:p text:style-name="Text_20_body">El trabajo era más pesado.</text:p>
      <text:p text:style-name="Text_20_body">Más lento.</text:p>
      <text:p text:style-name="Text_20_body">Más agotador.</text:p>
      <text:p text:style-name="Text_20_body">Los días siguieron transcurriendo en la oscuridad.</text:p>
      <text:p text:style-name="Text_20_body">Un túnel llevaba a otro.</text:p>
      <text:p text:style-name="Text_20_body">Una cámara desembocaba en otra cámara.</text:p>
      <text:p text:style-name="Text_20_body">Y siempre ocurría lo mismo.</text:p>
      <text:p text:style-name="Text_20_body">Nada.</text:p>
      <text:p text:style-name="Text_20_body">Absolutamente nada.</text:p>
      <text:p text:style-name="Text_20_body">Poco a poco la esperanza comenzó a desgastarse nuevamente.</text:p>
      <text:p text:style-name="Text_20_body">No desapareció de golpe.</text:p>
      <text:p text:style-name="Text_20_body">Fue algo gradual.</text:p>
      <text:p text:style-name="Text_20_body">Silencioso.</text:p>
      <text:p text:style-name="Text_20_body">Como una llama que se consume lentamente.</text:p>
      <text:p text:style-name="Text_20_body">Nohk intentaba mantener la confianza.</text:p>
      <text:p text:style-name="Text_20_body">Seguía hablando del tesoro.</text:p>
      <text:p text:style-name="Text_20_body">Seguía hablando de la bóveda.</text:p>
      <text:p text:style-name="Text_20_body">Seguía hablando de la puerta de hierro.</text:p>
      <text:p text:style-name="Text_20_body">Pero incluso él comenzaba a sentir el peso de las dudas.</text:p>
      <text:p text:style-name="Text_20_body">Algunas noches permanecía despierto observando la luz de las lámparas.</text:p>
      <text:p text:style-name="Text_20_body">Escuchando el eco distante del agua entre las galerías.</text:p>
      <text:p text:style-name="Text_20_body">Preguntándose cuánto tiempo más continuarían buscando.</text:p>
      <text:p text:style-name="Text_20_body">Una semana.</text:p>
      <text:p text:style-name="Text_20_body">¿Un mes?</text:p>
      <text:p text:style-name="Text_20_body">¿Un año?</text:p>
      <text:p text:style-name="Text_20_body">La cueva parecía interminable.</text:p>
      <text:p text:style-name="Text_20_body">Y por primera vez comenzó a plantearse una pregunta que hasta entonces había evitado cuidadosamente.</text:p>
      <text:p text:style-name="Text_20_body">¿Y si Tarhk tenía razón?</text:p>
      <text:p text:style-name="Text_20_body"><text:soft-page-break/>Intentó apartar aquel pensamiento.</text:p>
      <text:p text:style-name="Text_20_body">Pero regresaba una y otra vez.</text:p>
      <text:p text:style-name="Text_20_body">Como una sombra.</text:p>
      <text:p text:style-name="Text_20_body">Como una grieta que comenzaba a abrirse lentamente en sus convicciones.</text:p>
      <text:p text:style-name="Text_20_body">La mañana del descubrimiento comenzó como cualquier otra.</text:p>
      <text:p text:style-name="Text_20_body">Los tres hombres avanzaban por una galería estrecha que descendía suavemente hacia las profundidades.</text:p>
      <text:p text:style-name="Text_20_body">Nada la diferenciaba de los cientos de pasillos que ya habían explorado.</text:p>
      <text:p text:style-name="Text_20_body">La roca era la misma.</text:p>
      <text:p text:style-name="Text_20_body">La oscuridad era la misma.</text:p>
      <text:p text:style-name="Text_20_body">La sensación de agotamiento también.</text:p>
      <text:p text:style-name="Text_20_body">Johf caminaba en cabeza.</text:p>
      <text:p text:style-name="Text_20_body">La antorcha iluminaba apenas unos metros delante de él.</text:p>
      <text:p text:style-name="Text_20_body">De repente se detuvo.</text:p>
      <text:p text:style-name="Text_20_body">Nohk estuvo a punto de chocar contra su espalda.</text:p>
      <text:p text:style-name="Text_20_body">—¿Qué ocurre?</text:p>
      <text:p text:style-name="Text_20_body">Johf no respondió inmediatamente.</text:p>
      <text:p text:style-name="Text_20_body">Acercó la llama a una pared.</text:p>
      <text:p text:style-name="Text_20_body">—Venid.</text:p>
      <text:p text:style-name="Text_20_body">Los otros dos avanzaron.</text:p>
      <text:p text:style-name="Text_20_body">Al principio no vieron nada.</text:p>
      <text:p text:style-name="Text_20_body">Sólo roca.</text:p>
      <text:p text:style-name="Text_20_body">Después distinguieron unas marcas.</text:p>
      <text:p text:style-name="Text_20_body">Arañazos.</text:p>
      <text:p text:style-name="Text_20_body">Líneas.</text:p>
      <text:p text:style-name="Text_20_body">Pequeñas incisiones grabadas sobre la piedra.</text:p>
      <text:p text:style-name="Text_20_body">No parecían naturales.</text:p>
      <text:p text:style-name="Text_20_body">Nohk sintió que el corazón comenzaba a acelerarse.</text:p>
      <text:p text:style-name="Text_20_body">Continuaron avanzando.</text:p>
      <text:p text:style-name="Text_20_body">La galería se estrechó.</text:p>
      <text:p text:style-name="Text_20_body"><text:soft-page-break/>Las marcas aparecieron nuevamente.</text:p>
      <text:p text:style-name="Text_20_body">Esta vez eran más evidentes.</text:p>
      <text:p text:style-name="Text_20_body">Más elaboradas.</text:p>
      <text:p text:style-name="Text_20_body">Símbolos.</text:p>
      <text:p text:style-name="Text_20_body">Figuras geométricas.</text:p>
      <text:p text:style-name="Text_20_body">Signos que claramente habían sido realizados por manos humanas.</text:p>
      <text:p text:style-name="Text_20_body">Los tres hombres se miraron.</text:p>
      <text:p text:style-name="Text_20_body">Nadie dijo nada.</text:p>
      <text:p text:style-name="Text_20_body">No hacía falta.</text:p>
      <text:p text:style-name="Text_20_body">Todos estaban pensando lo mismo.</text:p>
      <text:p text:style-name="Text_20_body">Alguien había estado allí antes.</text:p>
      <text:p text:style-name="Text_20_body">Alguien conocía aquella galería.</text:p>
      <text:p text:style-name="Text_20_body">La siguieron casi corriendo.</text:p>
      <text:p text:style-name="Text_20_body">La fatiga desapareció.</text:p>
      <text:p text:style-name="Text_20_body">La duda desapareció.</text:p>
      <text:p text:style-name="Text_20_body">Incluso el hambre desapareció.</text:p>
      <text:p text:style-name="Text_20_body">La adrenalina ocupó su lugar.</text:p>
      <text:p text:style-name="Text_20_body">Más adelante apareció un nuevo grabado.</text:p>
      <text:p text:style-name="Text_20_body">Mucho más grande.</text:p>
      <text:p text:style-name="Text_20_body">Mucho más claro.</text:p>
      <text:p text:style-name="Text_20_body">La luz de las antorchas iluminó la figura.</text:p>
      <text:p text:style-name="Text_20_body">Y los tres quedaron inmóviles.</text:p>
      <text:p text:style-name="Text_20_body">Era una llave.</text:p>
      <text:p text:style-name="Text_20_body">La misma llave.</text:p>
      <text:p text:style-name="Text_20_body">El mismo diseño.</text:p>
      <text:p text:style-name="Text_20_body">El mismo escudo real.</text:p>
      <text:p text:style-name="Text_20_body">La misma piedra incrustada representada en el dibujo.</text:p>
      <text:p text:style-name="Text_20_body">No podía existir ninguna duda.</text:p>
      <text:p text:style-name="Text_20_body">Nohk sintió un escalofrío recorrerle la espalda.</text:p>
      <text:p text:style-name="Text_20_body">Un escalofrío tan intenso que lo obligó a apoyarse contra la pared.</text:p>
      <text:p text:style-name="Text_20_body"><text:soft-page-break/>Durante unos segundos fue incapaz de hablar.</text:p>
      <text:p text:style-name="Text_20_body">La llave.</text:p>
      <text:p text:style-name="Text_20_body">Allí.</text:p>
      <text:p text:style-name="Text_20_body">Grabada en la roca.</text:p>
      <text:p text:style-name="Text_20_body">En el interior de una galería oculta.</text:p>
      <text:p text:style-name="Text_20_body">En una montaña perdida.</text:p>
      <text:p text:style-name="Text_20_body">Era imposible.</text:p>
      <text:p text:style-name="Text_20_body">Y precisamente por eso era real.</text:p>
      <text:p text:style-name="Text_20_body">Sólo entonces comprendió algo inquietante.</text:p>
      <text:p text:style-name="Text_20_body">Había perdido la esperanza.</text:p>
      <text:p text:style-name="Text_20_body">No lo había admitido.</text:p>
      <text:p text:style-name="Text_20_body">Ni siquiera ante sí mismo.</text:p>
      <text:p text:style-name="Text_20_body">Pero había ocurrido.</text:p>
      <text:p text:style-name="Text_20_body">Alguna parte de él ya había empezado a creer que Tarhk estaba en lo cierto.</text:p>
      <text:p text:style-name="Text_20_body">Alguna parte de él ya había empezado a aceptar que el tesoro no existía.</text:p>
      <text:p text:style-name="Text_20_body">De lo contrario aquel hallazgo no le habría parecido tan extraordinario.</text:p>
      <text:p text:style-name="Text_20_body">Tan imposible.</text:p>
      <text:p text:style-name="Text_20_body">Tan inesperado.</text:p>
      <text:p text:style-name="Text_20_body">Sus propios pensamientos habían comenzado a traicionarlo.</text:p>
      <text:p text:style-name="Text_20_body">Habían comenzado a abandonar la búsqueda antes que él.</text:p>
      <text:p text:style-name="Text_20_body">Pero ahora todo aquello quedaba atrás.</text:p>
      <text:p text:style-name="Text_20_body">La prueba estaba frente a sus ojos.</text:p>
      <text:p text:style-name="Text_20_body">La leyenda era real.</text:p>
      <text:p text:style-name="Text_20_body">La llave era real.</text:p>
      <text:p text:style-name="Text_20_body">Y si ambas cosas eran reales, también debía existir la bóveda.</text:p>
      <text:p text:style-name="Text_20_body">Nohk sintió regresar toda la convicción que había perdido.</text:p>
      <text:p text:style-name="Text_20_body">Con más fuerza que nunca.</text:p>
      <text:p text:style-name="Text_20_body">—Está cerca —susurró.</text:p>
      <text:p text:style-name="Text_20_body">Kempht sonrió por primera vez en muchos días.</text:p>
      <text:p text:style-name="Text_20_body">Johf asintió.</text:p>
      <text:p text:style-name="Text_20_body"><text:soft-page-break/>Y los tres comenzaron a avanzar por la galería a toda velocidad.</text:p>
      <text:p text:style-name="Text_20_body">La emoción había sustituido a la prudencia.</text:p>
      <text:p text:style-name="Text_20_body">Ya no caminaban.</text:p>
      <text:p text:style-name="Text_20_body">Prácticamente corrían.</text:p>
      <text:p text:style-name="Text_20_body">Convencidos de que el final de la búsqueda se encontraba unos metros más adelante.</text:p>
      <text:p text:style-name="Text_20_body">La galería continuó durante varios minutos.</text:p>
      <text:p text:style-name="Text_20_body">Después giró bruscamente.</text:p>
      <text:p text:style-name="Text_20_body">Y terminó.</text:p>
      <text:p text:style-name="Text_20_body">Simplemente terminó.</text:p>
      <text:p text:style-name="Text_20_body">Una pared de roca cerraba el paso.</text:p>
      <text:p text:style-name="Text_20_body">No había puerta.</text:p>
      <text:p text:style-name="Text_20_body">No había cámara secreta.</text:p>
      <text:p text:style-name="Text_20_body">No había tesoro.</text:p>
      <text:p text:style-name="Text_20_body">Nada.</text:p>
      <text:p text:style-name="Text_20_body">Los tres quedaron inmóviles.</text:p>
      <text:p text:style-name="Text_20_body">Confundidos.</text:p>
      <text:p text:style-name="Text_20_body">Incapaces de comprender.</text:p>
      <text:p text:style-name="Text_20_body">La llave estaba allí.</text:p>
      <text:p text:style-name="Text_20_body">La prueba estaba allí.</text:p>
      <text:p text:style-name="Text_20_body">Entonces, ¿dónde estaba la bóveda?</text:p>
      <text:p text:style-name="Text_20_body">Nohk examinó la pared.</text:p>
      <text:p text:style-name="Text_20_body">Johf recorrió el suelo con la luz de su antorcha.</text:p>
      <text:p text:style-name="Text_20_body">Kempht observó las rocas cercanas.</text:p>
      <text:p text:style-name="Text_20_body">Y de pronto habló.</text:p>
      <text:p text:style-name="Text_20_body">Su voz resonó suavemente en la oscuridad.</text:p>
      <text:p text:style-name="Text_20_body">—Observad esto.</text:p>
      <text:p text:style-name="Text_20_body">Los otros se volvieron.</text:p>
      <text:p text:style-name="Text_20_body">Kempht acercó la antorcha a una sección de la pared que había permanecido oculta entre las sombras.</text:p>
      <text:p text:style-name="Text_20_body">La luz reveló una serie de líneas grabadas cuidadosamente sobre la piedra.</text:p>
      <text:p text:style-name="Text_20_body">Líneas.</text:p>
      <text:p text:style-name="Text_20_body"><text:soft-page-break/>Símbolos.</text:p>
      <text:p text:style-name="Text_20_body">Marcas.</text:p>
      <text:p text:style-name="Text_20_body">No era una inscripción.</text:p>
      <text:p text:style-name="Text_20_body">No era un dibujo.</text:p>
      <text:p text:style-name="Text_20_body">Era un mapa.</text:p>
      <text:p text:style-name="Text_20_body">Y señalaba un lugar completamente distinto.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5T20:46:45.649000000</meta:creation-date>
    <dc:date>2026-06-25T21:22:36.949000000</dc:date>
    <meta:editing-duration>PT35M50S</meta:editing-duration>
    <meta:editing-cycles>5</meta:editing-cycles>
    <meta:generator>LibreOffice/7.3.5.2$Windows_X86_64 LibreOffice_project/184fe81b8c8c30d8b5082578aee2fed2ea847c01</meta:generator>
    <meta:document-statistic meta:table-count="0" meta:image-count="0" meta:object-count="0" meta:page-count="17" meta:paragraph-count="472" meta:word-count="2553" meta:character-count="15979" meta:non-whitespace-character-count="13898"/>
  </office:meta>
</office:document-meta>
</file>