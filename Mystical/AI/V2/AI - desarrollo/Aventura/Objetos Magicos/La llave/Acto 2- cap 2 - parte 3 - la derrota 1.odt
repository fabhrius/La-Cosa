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98dd"/>
    </style:style>
    <style:style style:name="P2" style:family="paragraph" style:parent-style-name="Text_20_body">
      <style:text-properties officeooo:rsid="001b98dd" officeooo:paragraph-rsid="001b98dd"/>
    </style:style>
    <style:style style:name="P3" style:family="paragraph" style:parent-style-name="Text_20_body">
      <style:text-properties officeooo:rsid="001b98dd" officeooo:paragraph-rsid="001cad6f"/>
    </style:style>
    <style:style style:name="P4" style:family="paragraph" style:parent-style-name="Text_20_body">
      <style:text-properties officeooo:paragraph-rsid="001cad6f"/>
    </style:style>
    <style:style style:name="P5" style:family="paragraph" style:parent-style-name="Text_20_body">
      <style:text-properties officeooo:rsid="001cad6f" officeooo:paragraph-rsid="001cad6f"/>
    </style:style>
    <style:style style:name="T1" style:family="text">
      <style:text-properties officeooo:rsid="001b98dd"/>
    </style:style>
    <style:style style:name="T2" style:family="text">
      <style:text-properties officeooo:rsid="001ca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a caída de Ghim conmocionó al grupo.</text:p>
      <text:p text:style-name="Text_20_body">Durante varios minutos permanecieron inmóviles sobre la pared de roca, incapaces de aceptar lo que acababan de ver.</text:p>
      <text:p text:style-name="Text_20_body">Finalmente decidieron descender.<text:span text:style-name="T2"> </text:span>No podían marcharse sin encontrarlo.</text:p>
      <text:p text:style-name="Text_20_body">Ayudados por las cuerdas, el descenso fue relativamente rápido. Una vez en la base del acantilado comenzaron la búsqueda.</text:p>
      <text:p text:style-name="Text_20_body">Recorrieron las rocas.<text:span text:style-name="T1"> </text:span>Registraron las grietas.<text:span text:style-name="T1"> </text:span>Examinaron la orilla.</text:p>
      <text:p text:style-name="Text_20_body">Llamaron su nombre una y otra vez.</text:p>
      <text:p text:style-name="Text_20_body">No encontraron nada.</text:p>
      <text:p text:style-name="Text_20_body">Cuando el sol comenzó a ocultarse comprendieron que era inútil.</text:p>
      <text:p text:style-name="Text_20_body"/>
      <text:p text:style-name="P1">Entonces aceptaron otra verdad.</text:p>
      <text:p text:style-name="Text_20_body">La montaña había <text:span text:style-name="T1">vencido</text:span>.</text:p>
      <text:p text:style-name="P1"><text:span text:style-name="T1">S</text:span>i querian alcanzar el objetivo<text:span text:style-name="T1"> d</text:span>ebían buscar otra forma de llegar.</text:p>
      <text:p text:style-name="P1"><text:span text:style-name="T1">Sin</text:span> caballos<text:span text:style-name="T1">, sin</text:span> el equipo necesario<text:span text:style-name="T1"> l</text:span>a expedición había terminado.</text:p>
      <text:p text:style-name="P1">Regresarían a Oldwood al amanecer.</text:p>
      <text:p text:style-name="P2">No había otra opción.</text:p>
      <text:p text:style-name="P2"/>
      <text:p text:style-name="P3">La oscuridad envolvió<text:span text:style-name="T2"> poco a poco</text:span> la montaña.</text:p>
      <text:p text:style-name="P4"><text:span text:style-name="T2">E</text:span>ncendieron una hoguera<text:span text:style-name="T2">,</text:span> compartieron las últimas provisiones.<text:span text:style-name="T2"> Hablaron poco.</text:span></text:p>
      <text:p text:style-name="P4"/>
      <text:p text:style-name="P4">La muerte<text:span text:style-name="T2"> lo</text:span> había<text:span text:style-name="T2"> cambiado</text:span> <text:span text:style-name="T2">todo</text:span>.</text:p>
      <text:p text:style-name="P4">La silueta negra del acantilado se elevaba sobre ellos ocultando las estrellas.</text:p>
      <text:p text:style-name="P4">El viento descendía desde las alturas arrastrando sonidos extraños entre las rocas.</text:p>
      <text:p text:style-name="P4"><text:span text:style-name="T2">L</text:span>a montaña <text:span text:style-name="T2">a</text:span>hora parecía una presencia.</text:p>
      <text:p text:style-name="P4">Oscura.</text:p>
      <text:p text:style-name="P4">Inmensa.</text:p>
      <text:p text:style-name="P4">Indiferente.</text:p>
      <text:p text:style-name="P4"/>
      <text:p text:style-name="P5">Y la noche lleg<text:span text:style-name="T1">ó</text:span>.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9T18:07:04.709000000</meta:creation-date>
    <dc:date>2026-06-29T18:31:04.005000000</dc:date>
    <meta:editing-duration>PT3M6S</meta:editing-duration>
    <meta:editing-cycles>1</meta:editing-cycles>
    <meta:document-statistic meta:table-count="0" meta:image-count="0" meta:object-count="0" meta:page-count="2" meta:paragraph-count="24" meta:word-count="179" meta:character-count="1174" meta:non-whitespace-character-count="1019"/>
    <meta:generator>LibreOffice/7.3.5.2$Windows_X86_64 LibreOffice_project/184fe81b8c8c30d8b5082578aee2fed2ea847c01</meta:generator>
  </office:meta>
</office:document-meta>
</file>