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apítulo 1 - La llave de hierro</text:h>
      <text:h text:style-name="Heading_20_2" text:outline-level="2">El valle</text:h>
      <text:p text:style-name="Text_20_body">Corría el año 750.</text:p>
      <text:p text:style-name="Text_20_body">Mucho antes de las grandes guerras que cambiarían el destino de Lluviara, cuando los caminos eran apenas senderos de tierra y los pueblos vivían al ritmo de las estaciones, existía un pequeño valle al este de las montañas.</text:p>
      <text:p text:style-name="Text_20_body">Allí, donde el río Bager descendía desde las tierras altas y atravesaba los bosques de Oldwood, vivía un joven campesino llamado Nohk.</text:p>
      <text:p text:style-name="Text_20_body">Tenía veinticinco años.</text:p>
      <text:p text:style-name="Text_20_body">Poseía una pequeña casa de madera construida junto al río, en una estrecha franja de terreno fértil donde cultivaba granos y criaba algunos animales: cuatro gallinas, cuatro cabras y dos caballos.</text:p>
      <text:p text:style-name="Text_20_body">No era rico.</text:p>
      <text:p text:style-name="Text_20_body">Pero tampoco era pobre.</text:p>
      <text:p text:style-name="Text_20_body">Tenía suficiente para vivir.</text:p>
      <text:p text:style-name="Text_20_body">Y en aquellos tiempos, aquello era una fortuna.</text:p>
      <text:p text:style-name="Text_20_body">Las mañanas comenzaban con la luz dorada del amanecer reflejándose sobre el agua.</text:p>
      <text:p text:style-name="Text_20_body">Las tardes transcurrían entre el trabajo de los campos y el sonido constante del río golpeando suavemente contra las raíces de los árboles.</text:p>
      <text:p text:style-name="Text_20_body">Y por las noches, cuando el viento descendía desde las montañas, el valle quedaba envuelto en un silencio tan profundo que podía escucharse el canto lejano de los búhos en el bosque.</text:p>
      <text:p text:style-name="Text_20_body">Nohk amaba aquel lugar.</text:p>
      <text:p text:style-name="Text_20_body">Conocía cada curva del río.</text:p>
      <text:p text:style-name="Text_20_body">Cada árbol.</text:p>
      <text:p text:style-name="Text_20_body">Cada sendero.</text:p>
      <text:p text:style-name="Text_20_body">Sabía dónde crecían las flores en primavera y dónde aparecían los primeros hongos después de la lluvia.</text:p>
      <text:p text:style-name="Text_20_body">Aquella parte del mundo parecía existir fuera del tiempo.</text:p>
      <text:p text:style-name="Text_20_body">Todo encontraba allí un equilibrio perfecto.</text:p>
      <text:p text:style-name="Text_20_body">La lluvia llegaba cuando era necesaria.</text:p>
      <text:p text:style-name="Text_20_body">El sol calentaba sin quemar.</text:p>
      <text:p text:style-name="Text_20_body"><text:soft-page-break/>Las cosechas crecían.</text:p>
      <text:p text:style-name="Text_20_body">Los animales prosperaban.</text:p>
      <text:p text:style-name="Text_20_body">Y los años pasaban con una serenidad que hacía difícil imaginar que algo pudiera cambiar.</text:p>
      <text:p text:style-name="Text_20_body">Algunas tardes caminaba hasta el pueblo.</text:p>
      <text:p text:style-name="Text_20_body">No estaba lejos.</text:p>
      <text:p text:style-name="Text_20_body">Media hora siguiendo el sendero que atravesaba el bosque.</text:p>
      <text:p text:style-name="Text_20_body">Allí compraba herramientas, vendía parte de sus productos o simplemente se reunía con los amigos en la cantina.</text:p>
      <text:p text:style-name="Text_20_body">Aquellos encuentros eran una de las pocas diversiones disponibles en la región.</text:p>
      <text:p text:style-name="Text_20_body">Los jóvenes discutían negocios, hablaban de cosechas, intercambiaban noticias y soñaban con proyectos que casi nunca llegaban a realizar.</text:p>
      <text:p text:style-name="Text_20_body">Y aunque todos se quejaban ocasionalmente de la monotonía de la vida rural, en el fondo ninguno deseaba realmente cambiarla.</text:p>
      <text:p text:style-name="Text_20_body">Eran felices.</text:p>
      <text:p text:style-name="Text_20_body">Tal vez sin saberlo.</text:p>
      <text:p text:style-name="Text_20_body">Tal vez precisamente porque no lo sabían.</text:p>
      <text:p text:style-name="Text_20_body">Aquella tarde parecía una más entre tantas otras.</text:p>
      <text:p text:style-name="Text_20_body">El sol descendía lentamente detrás de las montañas.</text:p>
      <text:p text:style-name="Text_20_body">Una brisa suave agitaba las hojas de los árboles.</text:p>
      <text:p text:style-name="Text_20_body">Y Nohk caminaba hacia el pueblo siguiendo el sendero habitual.</text:p>
      <text:p text:style-name="Text_20_body">Entonces vio algo extraño.</text:p>
      <text:p text:style-name="Text_20_body">Un destello.</text:p>
      <text:p text:style-name="Text_20_body">Breve.</text:p>
      <text:p text:style-name="Text_20_body">Pequeño.</text:p>
      <text:p text:style-name="Text_20_body">Pero imposible de ignorar.</text:p>
      <text:p text:style-name="Text_20_body">Algo brillaba entre la hierba.</text:p>
      <text:p text:style-name="Text_20_body">Se detuvo.</text:p>
      <text:p text:style-name="P1">Frunció el ceño.</text:p>
      <text:p text:style-name="P1">Y observó el lugar durante unos segundos.</text:p>
      <text:p text:style-name="P1">Volvió a producirse el reflejo.</text:p>
      <text:p text:style-name="P1">Como si una pequeña estrella hubiera quedado atrapada entre las raíces de los árboles.</text:p>
      <text:p text:style-name="Text_20_body"><text:soft-page-break/>Nohk abandonó el sendero y se acercó.</text:p>
      <text:h text:style-name="Heading_20_2" text:outline-level="2">La llave</text:h>
      <text:p text:style-name="Text_20_body">El brillo procedía de la base de un viejo roble.</text:p>
      <text:p text:style-name="Text_20_body">Entre la maleza sobresalía parcialmente un objeto metálico.</text:p>
      <text:p text:style-name="Text_20_body">Nohk apartó algunas ramas.</text:p>
      <text:p text:style-name="Text_20_body">Y lo recogió.</text:p>
      <text:p text:style-name="Text_20_body">Era una llave.</text:p>
      <text:p text:style-name="Text_20_body">Una llave de hierro.</text:p>
      <text:p text:style-name="Text_20_body">Pero no se parecía a ninguna que hubiera visto antes.</text:p>
      <text:p text:style-name="Text_20_body">Era más grande que las cerraduras habituales de las casas o los graneros.</text:p>
      <text:p text:style-name="Text_20_body">El metal estaba trabajado con una precisión poco común.</text:p>
      <text:p text:style-name="Text_20_body">El mango formaba un diseño elegante compuesto por líneas curvas y figuras geométricas entrelazadas.</text:p>
      <text:p text:style-name="Text_20_body">Y en el centro destacaba una piedra verde del tamaño de una nuez.</text:p>
      <text:p text:style-name="Text_20_body">La gema capturaba la luz del sol y la devolvía en destellos esmeralda.</text:p>
      <text:p text:style-name="Text_20_body">Aquello era lo que había llamado su atención desde el sendero.</text:p>
      <text:p text:style-name="Text_20_body">Nohk giró la pieza entre los dedos.</text:p>
      <text:p text:style-name="Text_20_body">Pesaba más de lo esperado.</text:p>
      <text:p text:style-name="Text_20_body">En uno de los lados descubrió un símbolo grabado en el metal.</text:p>
      <text:p text:style-name="Text_20_body">Parecía un escudo.</text:p>
      <text:p text:style-name="Text_20_body">O tal vez un emblema real.</text:p>
      <text:p text:style-name="Text_20_body">No supo interpretarlo.</text:p>
      <text:p text:style-name="Text_20_body">—Extraño... —murmuró.</text:p>
      <text:p text:style-name="Text_20_body">Miró alrededor.</text:p>
      <text:p text:style-name="Text_20_body">No había nadie.</text:p>
      <text:p text:style-name="Text_20_body">Sólo árboles.</text:p>
      <text:p text:style-name="Text_20_body">Hierba.</text:p>
      <text:p text:style-name="Text_20_body">Y el sonido distante del río.</text:p>
      <text:p text:style-name="Text_20_body">La observó nuevamente.</text:p>
      <text:p text:style-name="Text_20_body">Era un objeto demasiado valioso para pertenecer a un campesino.</text:p>
      <text:p text:style-name="Text_20_body"><text:soft-page-break/>Tal vez algún noble la había perdido durante un viaje.</text:p>
      <text:p text:style-name="Text_20_body">Tal vez había caído de un carruaje.</text:p>
      <text:p text:style-name="Text_20_body">O quizá alguien la había ocultado allí.</text:p>
      <text:p text:style-name="Text_20_body">Pero si era así, ¿por qué nadie la había recuperado?</text:p>
      <text:p text:style-name="Text_20_body">Y una pregunta aún más inquietante comenzó a abrirse paso en su mente.</text:p>
      <text:p text:style-name="Text_20_body">¿Cómo era posible que nunca la hubiera visto?</text:p>
      <text:p text:style-name="Text_20_body">Conocía aquel sendero desde niño.</text:p>
      <text:p text:style-name="Text_20_body">Había pasado por allí cientos de veces.</text:p>
      <text:p text:style-name="Text_20_body">Miles quizá.</text:p>
      <text:p text:style-name="Text_20_body">Conocía cada piedra del camino.</text:p>
      <text:p text:style-name="Text_20_body">Y sin embargo estaba seguro de que aquella llave no había estado allí el día anterior.</text:p>
      <text:p text:style-name="Text_20_body">La idea le produjo una extraña incomodidad.</text:p>
      <text:p text:style-name="Text_20_body">Como si el objeto hubiera aparecido de repente.</text:p>
      <text:p text:style-name="Text_20_body">Como si hubiera surgido de ninguna parte.</text:p>
      <text:p text:style-name="Text_20_body">Sacudió la cabeza.</text:p>
      <text:p text:style-name="Text_20_body">Era una tontería.</text:p>
      <text:p text:style-name="Text_20_body">Seguramente nunca había prestado atención.</text:p>
      <text:p text:style-name="Text_20_body">Volvió a examinar la gema.</text:p>
      <text:p text:style-name="Text_20_body">Aquella piedra por sí sola podía valer una pequeña fortuna.</text:p>
      <text:p text:style-name="Text_20_body">Sonrió.</text:p>
      <text:p text:style-name="Text_20_body">Quizá tendría suerte.</text:p>
      <text:p text:style-name="Text_20_body">Quizá podría venderla en el pueblo.</text:p>
      <text:p text:style-name="Text_20_body">Con un buen comprador tal vez conseguiría dinero suficiente para comprar un carro nuevo.</text:p>
      <text:p text:style-name="Text_20_body">O reparar el tejado antes del invierno.</text:p>
      <text:p text:style-name="Text_20_body">Guardó la llave en una bolsa de cuero y retomó el camino.</text:p>
      <text:p text:style-name="Text_20_body">Sin darse cuenta, aceleró ligeramente el paso.</text:p>
      <text:p text:style-name="Text_20_body">Sentía curiosidad.</text:p>
      <text:p text:style-name="Text_20_body">Y también una emoción infantil difícil de explicar.</text:p>
      <text:p text:style-name="Text_20_body">La sensación de haber encontrado algo especial.</text:p>
      <text:p text:style-name="Text_20_body">Algo importante.</text:p>
      <text:p text:style-name="Text_20_body"><text:soft-page-break/>Aunque todavía no supiera por qué.</text:p>
      <text:h text:style-name="Heading_20_2" text:outline-level="2">La leyenda</text:h>
      <text:p text:style-name="Text_20_body">Como siempre que llegaba al pueblo, su primera parada fue la cantina.</text:p>
      <text:p text:style-name="Text_20_body">Era un edificio grande de madera oscura situado junto a la plaza principal.</text:p>
      <text:p text:style-name="Text_20_body">A aquella hora estaba bastante concurrido.</text:p>
      <text:p text:style-name="Text_20_body">Campesinos.</text:p>
      <text:p text:style-name="Text_20_body">Mercaderes.</text:p>
      <text:p text:style-name="Text_20_body">Artesanos.</text:p>
      <text:p text:style-name="Text_20_body">La mayoría conversaba animadamente alrededor de largas mesas comunales.</text:p>
      <text:p text:style-name="Text_20_body">Nohk localizó enseguida a sus amigos.</text:p>
      <text:p text:style-name="Text_20_body">Cinco jóvenes del pueblo discutían sobre intercambios de mercancías y precios de las cosechas.</text:p>
      <text:p text:style-name="Text_20_body">Gran parte de los acuerdos comerciales de la región comenzaban precisamente allí.</text:p>
      <text:p text:style-name="Text_20_body">Entre jarras de cerveza y discusiones interminables.</text:p>
      <text:p text:style-name="Text_20_body">Nohk tomó asiento.</text:p>
      <text:p text:style-name="Text_20_body">—¿Qué os parece esto? —preguntó.</text:p>
      <text:p text:style-name="Text_20_body">Y dejó la llave sobre la mesa.</text:p>
      <text:p text:style-name="Text_20_body">La conversación se detuvo inmediatamente.</text:p>
      <text:p text:style-name="Text_20_body">Todos miraron el objeto.</text:p>
      <text:p text:style-name="Text_20_body">La piedra verde brilló bajo la luz de las lámparas.</text:p>
      <text:p text:style-name="Text_20_body">Uno de ellos la tomó entre las manos.</text:p>
      <text:p text:style-name="Text_20_body">Otro examinó el símbolo grabado.</text:p>
      <text:p text:style-name="Text_20_body">Un tercero comprobó el peso.</text:p>
      <text:p text:style-name="Text_20_body">Durante varios minutos intercambiaron opiniones.</text:p>
      <text:p text:style-name="Text_20_body">—No es una llave corriente.</text:p>
      <text:p text:style-name="Text_20_body">—Desde luego que no.</text:p>
      <text:p text:style-name="Text_20_body">—La gema vale dinero.</text:p>
      <text:p text:style-name="Text_20_body">—Mucho dinero.</text:p>
      <text:p text:style-name="Text_20_body">—Y el trabajo del metal también.</text:p>
      <text:p text:style-name="Text_20_body">—Debe pertenecer a algún noble.</text:p>
      <text:p text:style-name="Text_20_body"><text:soft-page-break/>—O a algún comerciante importante.</text:p>
      <text:p text:style-name="Text_20_body">Nohk sonrió.</text:p>
      <text:p text:style-name="Text_20_body">Aquello confirmaba sus sospechas.</text:p>
      <text:p text:style-name="Text_20_body">Quizá realmente había encontrado algo valioso.</text:p>
      <text:p text:style-name="Text_20_body">Los comentarios comenzaron a volverse cada vez más entusiastas.</text:p>
      <text:p text:style-name="Text_20_body">Discutieron posibles compradores.</text:p>
      <text:p text:style-name="Text_20_body">Calcularon precios.</text:p>
      <text:p text:style-name="Text_20_body">Imaginaron distintas maneras de venderla.</text:p>
      <text:p text:style-name="Text_20_body">Por un momento todos parecían compartir la misma fantasía.</text:p>
      <text:p text:style-name="Text_20_body">Hasta que una voz interrumpió la conversación.</text:p>
      <text:p text:style-name="Text_20_body">—Esperad.</text:p>
      <text:p text:style-name="Text_20_body">El silencio cayó sobre la mesa.</text:p>
      <text:p text:style-name="Text_20_body">Quien había hablado era el más callado del grupo.</text:p>
      <text:p text:style-name="Text_20_body">Tenía la llave entre las manos y la observaba con expresión extraña.</text:p>
      <text:p text:style-name="Text_20_body">—¿Qué ocurre? —preguntó Nohk.</text:p>
      <text:p text:style-name="Text_20_body">El joven tardó unos segundos en responder.</text:p>
      <text:p text:style-name="Text_20_body">—He visto esta llave antes.</text:p>
      <text:p text:style-name="Text_20_body">Algunos se echaron a reír.</text:p>
      <text:p text:style-name="Text_20_body">—Imposible.</text:p>
      <text:p text:style-name="Text_20_body">—Nunca habías visto esta pieza.</text:p>
      <text:p text:style-name="Text_20_body">—Estoy seguro de que sí.</text:p>
      <text:p text:style-name="Text_20_body">Las risas cesaron.</text:p>
      <text:p text:style-name="Text_20_body">—¿Dónde? —preguntó Nohk.</text:p>
      <text:p text:style-name="Text_20_body">El muchacho levantó la mirada.</text:p>
      <text:p text:style-name="Text_20_body">Parecía incómodo.</text:p>
      <text:p text:style-name="Text_20_body">Como si acabara de recordar algo que preferiría haber olvidado.</text:p>
      <text:p text:style-name="Text_20_body">—En un dibujo.</text:p>
      <text:p text:style-name="Text_20_body">Todos permanecieron en silencio.</text:p>
      <text:p text:style-name="Text_20_body">—¿Qué dibujo?</text:p>
      <text:p text:style-name="Text_20_body">—En un libro antiguo.</text:p>
      <text:p text:style-name="Text_20_body"><text:soft-page-break/>—¿Qué libro?</text:p>
      <text:p text:style-name="Text_20_body">—El de Jorhm.</text:p>
      <text:p text:style-name="Text_20_body">Aquello llamó inmediatamente la atención de todos.</text:p>
      <text:p text:style-name="Text_20_body">Jorhm era un anciano conocido por conservar una pequeña colección de manuscritos heredados de generaciones anteriores.</text:p>
      <text:p text:style-name="Text_20_body">Libros extraños.</text:p>
      <text:p text:style-name="Text_20_body">Viejas leyendas.</text:p>
      <text:p text:style-name="Text_20_body">Historias olvidadas.</text:p>
      <text:p text:style-name="Text_20_body">Nadie les prestaba demasiada atención.</text:p>
      <text:p text:style-name="Text_20_body">—Estoy seguro —continuó el joven—. Es exactamente la misma llave.</text:p>
      <text:p text:style-name="Text_20_body">Nohk sintió un leve escalofrío.</text:p>
      <text:p text:style-name="Text_20_body">—¿Y qué decía el libro?</text:p>
      <text:p text:style-name="Text_20_body">El muchacho dudó.</text:p>
      <text:p text:style-name="Text_20_body">Luego respondió en voz más baja.</text:p>
      <text:p text:style-name="Text_20_body">—No lo recuerdo todo.</text:p>
      <text:p text:style-name="Text_20_body">Pero creo que hablaba de un tesoro.</text:p>
      <text:p text:style-name="Text_20_body">Y creo que también había una maldición.</text:p>
      <text:p text:style-name="Text_20_body">Nadie dijo nada.</text:p>
      <text:p text:style-name="Text_20_body">La llave permanecía sobre la mesa.</text:p>
      <text:p text:style-name="Text_20_body">Brillando silenciosamente bajo la luz de las lámparas.</text:p>
      <text:p text:style-name="Text_20_body">—Si yo fuera tú —añadió finalmente—, averiguaría más antes de venderla.</text:p>
      <text:p text:style-name="Text_20_body">Podría valer mucho más de lo que imaginas.</text:p>
      <text:p text:style-name="Text_20_body">O podría traer problemas.</text:p>
      <text:p text:style-name="Text_20_body">El silencio regresó.</text:p>
      <text:p text:style-name="Text_20_body">Y por primera vez desde que había encontrado la llave, Nohk dejó de verla como un simple objeto valioso.</text:p>
      <text:p text:style-name="Text_20_body">Quizá aquella pieza de hierro escondía una historia.</text:p>
      <text:p text:style-name="Text_20_body">Y quizá esa historia acababa de comenz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5:13:39.593000000</meta:creation-date>
    <dc:date>2026-06-24T15:23:01.514000000</dc:date>
    <meta:editing-duration>PT9M22S</meta:editing-duration>
    <meta:editing-cycles>1</meta:editing-cycles>
    <meta:document-statistic meta:table-count="0" meta:image-count="0" meta:object-count="0" meta:page-count="7" meta:paragraph-count="195" meta:word-count="1336" meta:character-count="8106" meta:non-whitespace-character-count="6967"/>
    <meta:generator>LibreOffice/7.3.5.2$Windows_X86_64 LibreOffice_project/184fe81b8c8c30d8b5082578aee2fed2ea847c01</meta:generator>
  </office:meta>
</office:document-meta>
</file>