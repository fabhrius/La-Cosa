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oy de acuerdo. Si al comienzo del Acto I Fabhrius dice:</text:p>
      <text:p text:style-name="Quotations">"Muchos hombres llegan al abismo porque no saben detenerse."</text:p>
      <text:p text:style-name="Text_20_body">el lector ya sabe cuál será el desenlace moral de la historia.</text:p>
      <text:p text:style-name="Text_20_body">Las frases de apertura deberían funcionar de otra manera:</text:p>
      <text:list xml:id="list3849844567" text:style-name="L1">
        <text:list-item>
          <text:p text:style-name="P1">Deben parecer una reflexión profunda y misteriosa cuando el lector empieza el acto.</text:p>
        </text:list-item>
        <text:list-item>
          <text:p text:style-name="P1">Deben adquirir un significado nuevo después de terminar el cuento.</text:p>
        </text:list-item>
        <text:list-item>
          <text:p text:style-name="P1">No deben revelar quién tiene razón.</text:p>
        </text:list-item>
        <text:list-item>
          <text:p text:style-name="P1">Idealmente deberían poder interpretarse de varias formas durante la primera lectura.</text:p>
        </text:list-item>
      </text:list>
      <text:p text:style-name="Text_20_body">De hecho, creo que Fabhrius funciona mejor cuando habla de principios universales que cuando habla directamente de la moraleja.</text:p>
      <text:p text:style-name="Horizontal_20_Line"/>
      <text:h text:style-name="Heading_20_2" text:outline-level="2">Idea 1: Hablar de información incompleta</text:h>
      <text:p text:style-name="Text_20_body">La búsqueda del tesoro es, en el fondo, un problema de información.</text:p>
      <text:p text:style-name="Text_20_body">Nohk toma decisiones con datos insuficientes.</text:p>
      <text:p text:style-name="Text_20_body">Eso permite frases como:</text:p>
      <text:p text:style-name="Quotations">"Todo viajero cree conocer su destino. Ninguno conoce realmente el camino."</text:p>
      <text:p text:style-name="Text_20_body">Al principio parece una frase sobre aventuras.</text:p>
      <text:p text:style-name="Text_20_body">Al final entendemos que el verdadero problema era que Nohk jamás supo adónde conducía la llave.</text:p>
      <text:p text:style-name="Horizontal_20_Line"/>
      <text:p text:style-name="Quotations">"Una señal puede indicar un camino. No puede prometer lo que existe al final de él."</text:p>
      <text:p text:style-name="Text_20_body">Esta encaja perfectamente con el mapa.</text:p>
      <text:p text:style-name="Horizontal_20_Line"/>
      <text:p text:style-name="Quotations">"Los mapas describen el mundo. Nunca las consecuencias de recorrerlo."</text:p>
      <text:p text:style-name="Text_20_body">Al principio parece una observación trivial.</text:p>
      <text:p text:style-name="Text_20_body">Al final resulta aterradora.</text:p>
      <text:p text:style-name="Horizontal_20_Line"/>
      <text:h text:style-name="Heading_20_2" text:outline-level="2">Idea 2: Hablar de sistemas y objetivos</text:h>
      <text:p text:style-name="Text_20_body">Muy propio de Omniscientis.</text:p>
      <text:p text:style-name="Horizontal_20_Line"><text:soft-page-break/></text:p>
      <text:p text:style-name="Quotations">"Cuando una flecha abandona el arco, sólo conoce una dirección."</text:p>
      <text:p text:style-name="Horizontal_20_Line"/>
      <text:p text:style-name="Quotations">"Algunos caminos parecen conducir a una meta. Otros conducen únicamente al siguiente paso."</text:p>
      <text:p text:style-name="Text_20_body">Después de leer el final cobra otro significado.</text:p>
      <text:p text:style-name="Horizontal_20_Line"/>
      <text:p text:style-name="Quotations">"No toda búsqueda fue creada para encontrar algo."</text:p>
      <text:p text:style-name="Text_20_body">Esta me gusta muchísimo.</text:p>
      <text:p text:style-name="Text_20_body">No revela nada.</text:p>
      <text:p text:style-name="Text_20_body">Pero después del final se vuelve inquietante.</text:p>
      <text:p text:style-name="Horizontal_20_Line"/>
      <text:h text:style-name="Heading_20_2" text:outline-level="2">Idea 3: Hablar del azar</text:h>
      <text:p text:style-name="Text_20_body">La historia empieza porque alguien encuentra una llave.</text:p>
      <text:p text:style-name="Text_20_body">Todo depende de una casualidad.</text:p>
      <text:p text:style-name="Horizontal_20_Line"/>
      <text:p text:style-name="Quotations">"Los grandes acontecimientos suelen entrar en nuestras vidas disfrazados de accidentes."</text:p>
      <text:p text:style-name="Horizontal_20_Line"/>
      <text:p text:style-name="Quotations">"A veces una piedra encontrada en el camino pesa más que una montaña."</text:p>
      <text:p text:style-name="Horizontal_20_Line"/>
      <text:p text:style-name="Quotations">"El destino rara vez llama a la puerta. Prefiere dejar objetos olvidados en el suelo."</text:p>
      <text:p text:style-name="Text_20_body">Esta última tiene un aire muy Fabhrius.</text:p>
      <text:p text:style-name="Horizontal_20_Line"/>
      <text:h text:style-name="Heading_20_2" text:outline-level="2">Idea 4: Hablar sobre la transformación</text:h>
      <text:p text:style-name="Text_20_body">Esto conecta con la corrupción moral de Nohk.</text:p>
      <text:p text:style-name="Horizontal_20_Line"/>
      <text:p text:style-name="Quotations">"Nadie recorre un largo camino sin dejar algo de sí mismo atrás."</text:p>
      <text:p text:style-name="Horizontal_20_Line"/>
      <text:p text:style-name="Quotations"><text:soft-page-break/>"Todo viaje modifica al viajero. Algunos regresan irreconocibles."</text:p>
      <text:p text:style-name="Text_20_body">Esta es buena, pero quizá demasiado directa.</text:p>
      <text:p text:style-name="Text_20_body">Más sutil sería:</text:p>
      <text:p text:style-name="Quotations">"Las montañas erosionan la piedra. Los años erosionan a los hombres."</text:p>
      <text:p text:style-name="Horizontal_20_Line"/>
      <text:h text:style-name="Heading_20_2" text:outline-level="2">Idea 5: Hablar de la imposibilidad de conocer las consecuencias</text:h>
      <text:p text:style-name="Text_20_body">Esto es muy científico y muy Omniscientis.</text:p>
      <text:p text:style-name="Horizontal_20_Line"/>
      <text:p text:style-name="Quotations">"El conocimiento revela el siguiente paso. Nunca el último."</text:p>
      <text:p text:style-name="Horizontal_20_Line"/>
      <text:p text:style-name="Quotations">"Ninguna decisión puede observar todas sus consecuencias."</text:p>
      <text:p text:style-name="Horizontal_20_Line"/>
      <text:p text:style-name="Quotations">"Hay puertas cuya existencia puede descubrirse. Lo que hay tras ellas pertenece al futuro."</text:p>
      <text:p text:style-name="Horizontal_20_Line"/>
      <text:h text:style-name="Heading_20_2" text:outline-level="2">Una propuesta para los cuatro actos</text:h>
      <text:p text:style-name="Text_20_body">Si yo tuviera que elegir una frase para cada acto, intentaría que formen una progresión.</text:p>
      <text:h text:style-name="Heading_20_3" text:outline-level="3">Acto I — El hallazgo</text:h>
      <text:p text:style-name="Quotations">"Los grandes acontecimientos suelen entrar en nuestras vidas disfrazados de accidentes."</text:p>
      <text:p text:style-name="Text_20_body">La llave encontrada en el bosque.</text:p>
      <text:p text:style-name="Horizontal_20_Line"/>
      <text:h text:style-name="Heading_20_3" text:outline-level="3">Acto II — La expedición</text:h>
      <text:p text:style-name="Quotations">"Los mapas describen el mundo. Nunca las consecuencias de recorrerlo."</text:p>
      <text:p text:style-name="Text_20_body">Empiezan a sufrir las primeras pérdidas.</text:p>
      <text:p text:style-name="Horizontal_20_Line"/>
      <text:h text:style-name="Heading_20_3" text:outline-level="3">Acto III — La obsesión</text:h>
      <text:p text:style-name="Quotations">"No toda búsqueda fue creada para encontrar algo."</text:p>
      <text:p text:style-name="Text_20_body"><text:soft-page-break/>Parece una frase misteriosa.</text:p>
      <text:p text:style-name="Text_20_body">Después del final resulta demoledora.</text:p>
      <text:p text:style-name="Horizontal_20_Line"/>
      <text:h text:style-name="Heading_20_3" text:outline-level="3">Acto IV — El desenlace</text:h>
      <text:p text:style-name="Quotations">"El conocimiento revela el siguiente paso. Nunca el último."</text:p>
      <text:p text:style-name="Text_20_body">Porque Nohk descubre la puerta, pero jamás comprende el verdadero resultado de abrirla.</text:p>
      <text:p text:style-name="Horizontal_20_Line"/>
      <text:p text:style-name="Text_20_body">De todas las opciones, la que más me recuerda al tono que has construido para Fabhrius es esta:</text:p>
      <text:p text:style-name="Quotations"><text:span text:style-name="Strong_20_Emphasis">"No toda búsqueda fue creada para encontrar algo."</text:span></text:p>
      <text:p text:style-name="Text_20_body">Tiene ese aire de profecía antigua. Parece esconder una verdad enorme. No explica nada. No revela nada. Pero cuando el lector termina el cuento, entiende exactamente lo que quería decir. Y además puede interpretarse de varias maneras: la búsqueda del tesoro, la obsesión de Nohk, e incluso la propia llave como mecanismo que no conduce a riqueza sino a la repetición eterna del cic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9T17:52:55.065000000</meta:creation-date>
    <dc:date>2026-07-19T17:53:23.806000000</dc:date>
    <meta:editing-duration>PT29S</meta:editing-duration>
    <meta:editing-cycles>1</meta:editing-cycles>
    <meta:document-statistic meta:table-count="0" meta:image-count="0" meta:object-count="0" meta:page-count="4" meta:paragraph-count="67" meta:word-count="637" meta:character-count="3979" meta:non-whitespace-character-count="3409"/>
    <meta:generator>LibreOffice/7.3.5.2$Windows_X86_64 LibreOffice_project/184fe81b8c8c30d8b5082578aee2fed2ea847c01</meta:generator>
  </office:meta>
</office:document-meta>
</file>