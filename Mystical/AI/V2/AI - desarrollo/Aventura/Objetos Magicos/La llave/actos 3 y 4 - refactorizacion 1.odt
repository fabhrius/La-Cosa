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has identificado correctamente un problema real.</text:p>
      <text:p text:style-name="Text_20_body">Si observamos el cuento desde el punto de vista del lector, los dos primeros actos funcionan porque contienen una cadena continua de preguntas:</text:p>
      <text:list xml:id="list2964655787" text:style-name="L1">
        <text:list-item>
          <text:p text:style-name="P1">¿Qué es la llave?</text:p>
        </text:list-item>
        <text:list-item>
          <text:p text:style-name="P1">¿Existe el tesoro?</text:p>
        </text:list-item>
        <text:list-item>
          <text:p text:style-name="P1">¿Qué hay en la cueva?</text:p>
        </text:list-item>
        <text:list-item>
          <text:p text:style-name="P1">¿Era real el mapa?</text:p>
        </text:list-item>
        <text:list-item>
          <text:p text:style-name="P1">¿Qué ocurrirá con la expedición?</text:p>
        </text:list-item>
      </text:list>
      <text:p text:style-name="Text_20_body">Siempre está sucediendo algo.</text:p>
      <text:p text:style-name="Text_20_body">Sin embargo, mi propuesta original para el Acto III tenía un riesgo: se convertía en una fase de transición. Mucho viaje, mucha preparación, mucho debate. Eso puede funcionar en una novela larga, pero no necesariamente en un relato de 20.000 palabras.</text:p>
      <text:p text:style-name="Text_20_body">Y este cuento no necesita ser una novela.</text:p>
      <text:p text:style-name="Text_20_body">Necesita ser una trampa.</text:p>
      <text:p text:style-name="Text_20_body">Una trampa que se va cerrando.</text:p>
      <text:p text:style-name="Text_20_body">Por eso me gusta bastante tu nueva dirección.</text:p>
      <text:p text:style-name="Text_20_body">Lo que más me gusta es que las pérdidas dejan de ser accidentes y pasan a ser consecuencias humanas.</text:p>
      <text:p text:style-name="Text_20_body">Hasta ahora:</text:p>
      <text:list xml:id="list602234425" text:style-name="L2">
        <text:list-item>
          <text:p text:style-name="P2">tormenta,</text:p>
        </text:list-item>
        <text:list-item>
          <text:p text:style-name="P2">montaña,</text:p>
        </text:list-item>
        <text:list-item>
          <text:p text:style-name="P2">caída.</text:p>
        </text:list-item>
      </text:list>
      <text:p text:style-name="Text_20_body">El mundo era el enemigo.</text:p>
      <text:p text:style-name="Text_20_body">Ahora:</text:p>
      <text:list xml:id="list213025102" text:style-name="L3">
        <text:list-item>
          <text:p text:style-name="P3">robo,</text:p>
        </text:list-item>
        <text:list-item>
          <text:p text:style-name="P3">abandono,</text:p>
        </text:list-item>
        <text:list-item>
          <text:p text:style-name="P3">egoísmo,</text:p>
        </text:list-item>
        <text:list-item>
          <text:p text:style-name="P3">manipulación,</text:p>
        </text:list-item>
        <text:list-item>
          <text:p text:style-name="P3">traición.</text:p>
        </text:list-item>
      </text:list>
      <text:p text:style-name="Text_20_body">Los personajes se convierten en el enemigo.</text:p>
      <text:p text:style-name="Text_20_body">Y eso es mucho más inquietante.</text:p>
      <text:p text:style-name="Text_20_body">Además, encaja perfectamente con el tema de los costes hundidos.</text:p>
      <text:p text:style-name="Text_20_body"><text:soft-page-break/>Porque cuanto más invierte Nohk, más dispuesto está a justificar comportamientos que antes habría considerado inaceptables.</text:p>
      <text:p text:style-name="Text_20_body">Eso es exactamente lo que hace una obsesión.</text:p>
      <text:p text:style-name="Horizontal_20_Line"/>
      <text:p text:style-name="Text_20_body">Yo incluso haría un pequeño ajuste.</text:p>
      <text:p text:style-name="Text_20_body">No mataría inmediatamente al ladrón.</text:p>
      <text:p text:style-name="Text_20_body">Lo dejaría vivo.</text:p>
      <text:p text:style-name="Text_20_body">Porque es más cruel.</text:p>
      <text:p text:style-name="Text_20_body">Imagina esto:</text:p>
      <text:h text:style-name="Heading_20_3" text:outline-level="3">Capítulo 1</text:h>
      <text:list xml:id="list3774649624" text:style-name="L4">
        <text:list-item>
          <text:p text:style-name="P4">Nohk vende su casa.</text:p>
        </text:list-item>
        <text:list-item>
          <text:p text:style-name="P4">Compran carro, caballos y provisiones.</text:p>
        </text:list-item>
        <text:list-item>
          <text:p text:style-name="P4">El tesoro parece cercano.</text:p>
        </text:list-item>
        <text:list-item>
          <text:p text:style-name="P4">Esa noche Johf roba todo y desaparece.</text:p>
        </text:list-item>
      </text:list>
      <text:p text:style-name="Text_20_body">Cliffhanger.</text:p>
      <text:p text:style-name="Horizontal_20_Line"/>
      <text:h text:style-name="Heading_20_3" text:outline-level="3">Capítulo 2</text:h>
      <text:list xml:id="list3518027706" text:style-name="L5">
        <text:list-item>
          <text:p text:style-name="P5">Nohk y Kempht lo persiguen.</text:p>
        </text:list-item>
        <text:list-item>
          <text:p text:style-name="P5">Lo alcanzan en el Desierto de Piedra.</text:p>
        </text:list-item>
        <text:list-item>
          <text:p text:style-name="P5">Recuperan el carro.</text:p>
        </text:list-item>
        <text:list-item>
          <text:p text:style-name="P5">Recuperan la llave.</text:p>
        </text:list-item>
      </text:list>
      <text:p text:style-name="Text_20_body">Pero no lo matan.</text:p>
      <text:p text:style-name="Text_20_body">Lo abandonan.</text:p>
      <text:p text:style-name="Text_20_body">Solo.</text:p>
      <text:p text:style-name="Text_20_body">Sin agua.</text:p>
      <text:p text:style-name="Text_20_body">Sin caballo.</text:p>
      <text:p text:style-name="Text_20_body">Sin provisiones.</text:p>
      <text:p text:style-name="Text_20_body">Johf les suplica.</text:p>
      <text:p text:style-name="Text_20_body">Les recuerda que fueron amigos.</text:p>
      <text:p text:style-name="Text_20_body"><text:soft-page-break/>Kempht duda.</text:p>
      <text:p text:style-name="Text_20_body">Nohk no.</text:p>
      <text:p text:style-name="Text_20_body">Nohk es quien toma la decisión.</text:p>
      <text:p text:style-name="Text_20_body">Es importante.</text:p>
      <text:p text:style-name="Text_20_body">La crueldad debe venir de él.</text:p>
      <text:p text:style-name="Text_20_body">Cuando se marchan, Johf sigue vivo.</text:p>
      <text:p text:style-name="Text_20_body">Gritando detrás de ellos.</text:p>
      <text:p text:style-name="Text_20_body">Eso resulta mucho más perturbador que una pelea.</text:p>
      <text:p text:style-name="Text_20_body">Y muestra la transformación moral del protagonista.</text:p>
      <text:p text:style-name="Horizontal_20_Line"/>
      <text:h text:style-name="Heading_20_3" text:outline-level="3">Capítulo 3</text:h>
      <text:list xml:id="list1589342898" text:style-name="L6">
        <text:list-item>
          <text:p text:style-name="P6">Llegan al acantilado.</text:p>
        </text:list-item>
        <text:list-item>
          <text:p text:style-name="P6">Sólo quedan Nohk y Kempht.</text:p>
        </text:list-item>
        <text:list-item>
          <text:p text:style-name="P6">El mapa parece terminar allí.</text:p>
        </text:list-item>
        <text:list-item>
          <text:p text:style-name="P6">Discuten.</text:p>
        </text:list-item>
        <text:list-item>
          <text:p text:style-name="P6">Kempht quiere detenerse.</text:p>
        </text:list-item>
        <text:list-item>
          <text:p text:style-name="P6">Nohk se niega.</text:p>
        </text:list-item>
      </text:list>
      <text:p text:style-name="Text_20_body">Encuentran una cornisa peligrosa.</text:p>
      <text:p text:style-name="Text_20_body">Nohk sospecha que podría haber algo abajo.</text:p>
      <text:p text:style-name="Text_20_body">Pero no quiere arriesgarse.</text:p>
      <text:p text:style-name="Text_20_body">Convence a Kempht para intentarlo.</text:p>
      <text:p text:style-name="Text_20_body">Lo presenta como una decisión conjunta.</text:p>
      <text:p text:style-name="Text_20_body">Pero en realidad está utilizándolo.</text:p>
      <text:p text:style-name="Text_20_body">Kempht cae.</text:p>
      <text:p text:style-name="Text_20_body">Muere.</text:p>
      <text:p text:style-name="Text_20_body">Nohk observa la caída.</text:p>
      <text:p text:style-name="Text_20_body">Y durante unos segundos no siente tristeza.</text:p>
      <text:p text:style-name="Text_20_body">Sólo piensa:</text:p>
      <text:p text:style-name="Quotations">"Ahora estoy más cerca."</text:p>
      <text:p text:style-name="Text_20_body"><text:soft-page-break/>Ese pensamiento debería asustarlo incluso a él.</text:p>
      <text:p text:style-name="Text_20_body">Y al lector.</text:p>
      <text:p text:style-name="Horizontal_20_Line"/>
      <text:p text:style-name="Text_20_body">Entonces el Acto 4 comienza con algo muy poderoso:</text:p>
      <text:p text:style-name="Text_20_body">Nohk ya ha conseguido lo que quería.</text:p>
      <text:p text:style-name="Text_20_body">Está solo.</text:p>
      <text:p text:style-name="Text_20_body">Tiene la llave.</text:p>
      <text:p text:style-name="Text_20_body">Tiene el mapa.</text:p>
      <text:p text:style-name="Text_20_body">Ha sacrificado:</text:p>
      <text:list xml:id="list3859762277" text:style-name="L7">
        <text:list-item>
          <text:p text:style-name="P7">su dinero,</text:p>
        </text:list-item>
        <text:list-item>
          <text:p text:style-name="P7">su casa,</text:p>
        </text:list-item>
        <text:list-item>
          <text:p text:style-name="P7">sus animales,</text:p>
        </text:list-item>
        <text:list-item>
          <text:p text:style-name="P7">sus amigos,</text:p>
        </text:list-item>
        <text:list-item>
          <text:p text:style-name="P7">su humanidad.</text:p>
        </text:list-item>
      </text:list>
      <text:p text:style-name="Text_20_body">Y justo en ese momento encuentra la puerta.</text:p>
      <text:p text:style-name="Text_20_body">Es una estructura mucho más compacta.</text:p>
      <text:p text:style-name="Text_20_body">Más oscura.</text:p>
      <text:p text:style-name="Text_20_body">Más propia de una historia al estilo <text:span text:style-name="Emphasis">The Twilight Zone</text:span>.</text:p>
      <text:p text:style-name="Text_20_body">Y además refuerza mejor la moraleja:</text:p>
      <text:p text:style-name="Text_20_body">El verdadero precio del tesoro no era el dinero.</text:p>
      <text:p text:style-name="Text_20_body">Era la persona en la que te convertías para alcanzar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4:33:06.357000000</meta:creation-date>
    <dc:date>2026-06-26T14:38:29.283000000</dc:date>
    <meta:editing-duration>PT5M23S</meta:editing-duration>
    <meta:editing-cycles>1</meta:editing-cycles>
    <meta:document-statistic meta:table-count="0" meta:image-count="0" meta:object-count="0" meta:page-count="4" meta:paragraph-count="102" meta:word-count="534" meta:character-count="3019" meta:non-whitespace-character-count="2619"/>
    <meta:generator>LibreOffice/7.3.5.2$Windows_X86_64 LibreOffice_project/184fe81b8c8c30d8b5082578aee2fed2ea847c01</meta:generator>
  </office:meta>
</office:document-meta>
</file>