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laro que sí, Fab. El argumento que planteaste es perfecto para un relato de atmósfera medieval con un objeto maldito que encierra un demonio. Te propongo un <text:span text:style-name="Strong_20_Emphasis">resumen narrativo claro</text:span> del capítulo del <text:span text:style-name="Emphasis">Mazo de Cartas del Futuro</text:span>, siguiendo tu esquema y cuidando la coherencia temporal:</text:p>
      <text:p text:style-name="Horizontal_20_Line"/>
      <text:h text:style-name="Heading_20_2" text:outline-level="2">🃏 <text:span text:style-name="Emphasis">Capítulo X: El Mazo de Cartas del Futuro</text:span> — Resumen narrativo</text:h>
      <text:h text:style-name="Heading_20_3" text:outline-level="3"><text:span text:style-name="Strong_20_Emphasis">1. Llegada al pueblo y descubrimiento</text:span></text:h>
      <text:list xml:id="list2734398993" text:style-name="L1">
        <text:list-item>
          <text:p text:style-name="P2">Elara llega a un pueblo cercano a unas ruinas que desea explorar. </text:p>
        </text:list-item>
        <text:list-item>
          <text:p text:style-name="P2">En una tienda extraña, llena de objetos polvorientos y reliquias, encuentra un <text:span text:style-name="Strong_20_Emphasis">mazo de cartas antiguas</text:span> con símbolos arcanos. </text:p>
        </text:list-item>
        <text:list-item>
          <text:p text:style-name="P2">El tendero le advierte que las cartas “dicen la verdad”, pero no explica más. </text:p>
        </text:list-item>
        <text:list-item>
          <text:p text:style-name="P1">Elara, intrigada, las guarda. </text:p>
        </text:list-item>
      </text:list>
      <text:p text:style-name="Horizontal_20_Line"/>
      <text:h text:style-name="Heading_20_3" text:outline-level="3"><text:span text:style-name="Strong_20_Emphasis">2. Primera prueba</text:span></text:h>
      <text:list xml:id="list2122062652" text:style-name="L2">
        <text:list-item>
          <text:p text:style-name="P4">Esa noche, por curiosidad, Elara extiende las cartas y pregunta qué sucederá mañana. </text:p>
        </text:list-item>
        <text:list-item>
          <text:p text:style-name="P4">Las cartas muestran una imagen clara: un banquete en la plaza, con música y alegría. </text:p>
        </text:list-item>
        <text:list-item>
          <text:p text:style-name="P4">Al día siguiente, el banquete ocurre… pero se convierte en tragedia: un incendio devora las mesas, varios aldeanos mueren, y Elara queda atrapada en el caos. </text:p>
        </text:list-item>
        <text:list-item>
          <text:p text:style-name="P3">Comprende que las cartas predicen el futuro, pero lo transforman en pesadilla. </text:p>
        </text:list-item>
      </text:list>
      <text:p text:style-name="Horizontal_20_Line"/>
      <text:h text:style-name="Heading_20_3" text:outline-level="3"><text:span text:style-name="Strong_20_Emphasis">3. Segunda prueba</text:span></text:h>
      <text:list xml:id="list3713504844" text:style-name="L3">
        <text:list-item>
          <text:p text:style-name="P6">Para estar preparada, Elara usa el mazo de nuevo. </text:p>
        </text:list-item>
        <text:list-item>
          <text:p text:style-name="P6">Las cartas muestran un niño jugando con un perro. </text:p>
        </text:list-item>
        <text:list-item>
          <text:p text:style-name="P6">Al día siguiente, el niño aparece… pero el perro lo ataca salvajemente. Elara interviene, pero queda marcada por la violencia. </text:p>
        </text:list-item>
        <text:list-item>
          <text:p text:style-name="P5">Entiende que las cartas cumplen lo que muestran, pero siempre con un giro infernal. </text:p>
        </text:list-item>
      </text:list>
      <text:p text:style-name="Horizontal_20_Line"/>
      <text:h text:style-name="Heading_20_3" text:outline-level="3"><text:span text:style-name="Strong_20_Emphasis">4. La espiral</text:span></text:h>
      <text:list xml:id="list1511308903" text:style-name="L4">
        <text:list-item>
          <text:p text:style-name="P8">Elara intenta usar las cartas para anticipar y evitar desgracias. </text:p>
        </text:list-item>
        <text:list-item>
          <text:p text:style-name="P8">Cada vez que las consulta, la situación se complica más: </text:p>
          <text:list>
            <text:list-item>
              <text:p text:style-name="P8">Una boda se convierte en un duelo sangriento. </text:p>
            </text:list-item>
            <text:list-item>
              <text:p text:style-name="P8">Una cosecha prometedora termina en plaga. </text:p>
            </text:list-item>
            <text:list-item>
              <text:p text:style-name="P8">Una reunión pacífica se transforma en linchamiento. </text:p>
            </text:list-item>
          </text:list>
        </text:list-item>
        <text:list-item>
          <text:p text:style-name="P7"><text:soft-page-break/>Elara queda atrapada en una dinámica sin fin: cuanto más usa el mazo, más tragedias se acumulan en el futuro. </text:p>
        </text:list-item>
      </text:list>
      <text:p text:style-name="Horizontal_20_Line"/>
      <text:h text:style-name="Heading_20_3" text:outline-level="3"><text:span text:style-name="Strong_20_Emphasis">5. La revelación</text:span></text:h>
      <text:list xml:id="list2259348365" text:style-name="L5">
        <text:list-item>
          <text:p text:style-name="P10">Elara comprende que el mazo encierra un demonio que se alimenta de sus deseos de control. </text:p>
        </text:list-item>
        <text:list-item>
          <text:p text:style-name="P10">El demonio corrompe cada predicción, sembrando caos y dolor. </text:p>
        </text:list-item>
        <text:list-item>
          <text:p text:style-name="P9">Decide que la única salida es destruir el mazo. </text:p>
        </text:list-item>
      </text:list>
      <text:p text:style-name="Horizontal_20_Line"/>
      <text:h text:style-name="Heading_20_3" text:outline-level="3"><text:span text:style-name="Strong_20_Emphasis">6. La destrucción</text:span></text:h>
      <text:list xml:id="list833573547" text:style-name="L6">
        <text:list-item>
          <text:p text:style-name="P12">En un ritual improvisado, Elara quema las cartas en la plaza del pueblo. </text:p>
        </text:list-item>
        <text:list-item>
          <text:p text:style-name="P12">El humo se eleva con un olor extraño, como azufre. </text:p>
        </text:list-item>
        <text:list-item>
          <text:p text:style-name="P12">El pueblo recupera la calma. Los aldeanos agradecen a Elara. </text:p>
        </text:list-item>
        <text:list-item>
          <text:p text:style-name="P11">Ella se prepara para continuar su viaje hacia las ruinas. </text:p>
        </text:list-item>
      </text:list>
      <text:p text:style-name="Horizontal_20_Line"/>
      <text:h text:style-name="Heading_20_3" text:outline-level="3"><text:span text:style-name="Strong_20_Emphasis">7. Epílogo desconcertante</text:span></text:h>
      <text:list xml:id="list1305591390" text:style-name="L7">
        <text:list-item>
          <text:p text:style-name="P14">Al atardecer, Elara abandona el pueblo en su carreta. </text:p>
        </text:list-item>
        <text:list-item>
          <text:p text:style-name="P14">Mira por la ventana y ve a un grupo de niños jugando en la calle. </text:p>
        </text:list-item>
        <text:list-item>
          <text:p text:style-name="P14">Uno de ellos sostiene un mazo de cartas idéntico, riendo mientras las reparte entre sus amigos. </text:p>
        </text:list-item>
        <text:list-item>
          <text:p text:style-name="P14">El corazón de Elara se detiene. ¿No había destruido el mazo? </text:p>
        </text:list-item>
        <text:list-item>
          <text:p text:style-name="P13">Cierra la ventana, convencida de que debe seguir adelante… pero con la certeza de que el demonio sigue libre, sembrando nuevas pesadillas. </text:p>
        </text:list-item>
      </text:list>
      <text:p text:style-name="Horizontal_20_Line"/>
      <text:h text:style-name="Heading_20_2" text:outline-level="2">🎭 Efecto narrativo</text:h>
      <text:list xml:id="list4047563421" text:style-name="L8">
        <text:list-item>
          <text:p text:style-name="P16"><text:span text:style-name="Strong_20_Emphasis">Tema central:</text:span> el deseo de conocer el futuro se convierte en una trampa infernal. </text:p>
        </text:list-item>
        <text:list-item>
          <text:p text:style-name="P16"><text:span text:style-name="Strong_20_Emphasis">Suspenso:</text:span> cada predicción se cumple, pero siempre como pesadilla. </text:p>
        </text:list-item>
        <text:list-item>
          <text:p text:style-name="P16"><text:span text:style-name="Strong_20_Emphasis">Final inquietante:</text:span> aunque Elara destruye el mazo, el objeto reaparece en manos inocentes, sugiriendo que el demonio nunca muere. </text:p>
        </text:list-item>
        <text:list-item>
          <text:p text:style-name="P15"><text:span text:style-name="Strong_20_Emphasis">Continuidad:</text:span> Elara puede seguir su viaje hacia las ruinas, pero marcada por la experiencia. </text:p>
        </text:list-item>
      </text:list>
      <text:p text:style-name="Horizontal_20_Line"/>
      <text:p text:style-name="Text_20_body">👉 Con esto tienes la <text:span text:style-name="Strong_20_Emphasis">estructura completa</text:span> del relato, lista para desarrollarse en prosa medieval más adelante.</text:p>
      <text:p text:style-name="Text_20_body">¿Quieres que el siguiente paso sea proponer <text:span text:style-name="Strong_20_Emphasis">otro objeto maldito</text:span> para el capítulo XI, o prefieres que refine este borrador con más detalles atmosféricos (tienda, cartas, escenas de tragedia) antes de avanzar?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07T18:39:16.727000000</meta:creation-date>
    <dc:date>2026-05-07T18:41:32.030000000</dc:date>
    <meta:editing-duration>PT2M16S</meta:editing-duration>
    <meta:editing-cycles>1</meta:editing-cycles>
    <meta:document-statistic meta:table-count="0" meta:image-count="0" meta:object-count="0" meta:page-count="3" meta:paragraph-count="46" meta:word-count="601" meta:character-count="3469" meta:non-whitespace-character-count="2913"/>
    <meta:generator>LibreOffice/7.3.5.2$Windows_X86_64 LibreOffice_project/184fe81b8c8c30d8b5082578aee2fed2ea847c01</meta:generator>
  </office:meta>
</office:document-meta>
</file>