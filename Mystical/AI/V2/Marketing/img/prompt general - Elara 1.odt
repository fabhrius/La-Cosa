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Sí.<text:line-break/>Y esto que acabas de identificar es MUY importante.</text:p>
      <text:p text:style-name="Text_20_body">👉 La consistencia visual puede convertirse en una de las mayores fortalezas de tu proyecto.</text:p>
      <text:p text:style-name="Text_20_body">La mayoría de cuentas publican imágenes inconexas.<text:line-break/>Tú puedes construir:</text:p>
      <text:list xml:id="list1293448032" text:style-name="L1">
        <text:list-item>
          <text:p text:style-name="P1">identidad visual</text:p>
        </text:list-item>
        <text:list-item>
          <text:p text:style-name="P1">atmósfera</text:p>
        </text:list-item>
        <text:list-item>
          <text:p text:style-name="P1">continuidad narrativa</text:p>
        </text:list-item>
      </text:list>
      <text:p text:style-name="Text_20_body">👉 Eso hace que la gente reconozca tus posts inmediatamente.</text:p>
      <text:p text:style-name="Horizontal_20_Line"/>
      <text:h text:style-name="Heading_20_1" text:outline-level="1">🎬 Lo que necesitas realmente</text:h>
      <text:p text:style-name="Text_20_body">No un prompt cualquiera.</text:p>
      <text:p text:style-name="Text_20_body">👉 Necesitas una “biblia visual” reutilizable.</text:p>
      <text:p text:style-name="Text_20_body">Debe definir:</text:p>
      <text:list xml:id="list3859020308" text:style-name="L2">
        <text:list-item>
          <text:p text:style-name="P2">Elara</text:p>
        </text:list-item>
        <text:list-item>
          <text:p text:style-name="P2">El mundo</text:p>
        </text:list-item>
        <text:list-item>
          <text:p text:style-name="P2">El estilo visual</text:p>
        </text:list-item>
        <text:list-item>
          <text:p text:style-name="P2">La iluminación</text:p>
        </text:list-item>
        <text:list-item>
          <text:p text:style-name="P2">El tono emocional</text:p>
        </text:list-item>
        <text:list-item>
          <text:p text:style-name="P2">La composición cinematográfica</text:p>
        </text:list-item>
      </text:list>
      <text:p text:style-name="Horizontal_20_Line"/>
      <text:h text:style-name="Heading_20_1" text:outline-level="1">🧩 1. Definición base de ELARA</text:h>
      <text:p text:style-name="Text_20_body">Debemos mantener SIEMPRE:</text:p>
      <text:list xml:id="list2288604547" text:style-name="L3">
        <text:list-item>
          <text:p text:style-name="P3">mujer joven (~25 años)</text:p>
        </text:list-item>
        <text:list-item>
          <text:p text:style-name="P3">atlética</text:p>
        </text:list-item>
        <text:list-item>
          <text:p text:style-name="P3">cabello largo oscuro</text:p>
        </text:list-item>
        <text:list-item>
          <text:p text:style-name="P3">rostro serio/inteligente</text:p>
        </text:list-item>
        <text:list-item>
          <text:p text:style-name="P3">ropa medieval realista</text:p>
        </text:list-item>
        <text:list-item>
          <text:p text:style-name="P3"><text:soft-page-break/>capa de viajera</text:p>
        </text:list-item>
        <text:list-item>
          <text:p text:style-name="P3">aspecto resistente (no princesa perfecta)</text:p>
        </text:list-item>
      </text:list>
      <text:p text:style-name="Text_20_body">👉 Importante:<text:line-break/>NO anime<text:line-break/>NO fantasía infantil<text:line-break/>NO armadura sexualizada</text:p>
      <text:p text:style-name="Horizontal_20_Line"/>
      <text:h text:style-name="Heading_20_1" text:outline-level="1">🌲 2. Definición del ENTORNO</text:h>
      <text:p text:style-name="Text_20_body">Tu universo funciona mejor si es:</text:p>
      <text:list xml:id="list1058763028" text:style-name="L4">
        <text:list-item>
          <text:p text:style-name="P4">bosques húmedos</text:p>
        </text:list-item>
        <text:list-item>
          <text:p text:style-name="P4">ruinas antiguas</text:p>
        </text:list-item>
        <text:list-item>
          <text:p text:style-name="P4">piedra erosionada</text:p>
        </text:list-item>
        <text:list-item>
          <text:p text:style-name="P4">niebla</text:p>
        </text:list-item>
        <text:list-item>
          <text:p text:style-name="P4">amaneceres fríos</text:p>
        </text:list-item>
        <text:list-item>
          <text:p text:style-name="P4">fuego tenue</text:p>
        </text:list-item>
        <text:list-item>
          <text:p text:style-name="P4">sensación de antigüedad olvidada</text:p>
        </text:list-item>
      </text:list>
      <text:p text:style-name="Text_20_body">👉 “fantasy grounded realism”</text:p>
      <text:p text:style-name="Horizontal_20_Line"/>
      <text:h text:style-name="Heading_20_1" text:outline-level="1">🎨 3. Estilo visual CONSISTENTE</text:h>
      <text:p text:style-name="Text_20_body">Aquí está la clave.</text:p>
      <text:p text:style-name="Text_20_body">Usa SIEMPRE:</text:p>
      <text:list xml:id="list3987521362" text:style-name="L5">
        <text:list-item>
          <text:p text:style-name="P5">cinematic</text:p>
        </text:list-item>
        <text:list-item>
          <text:p text:style-name="P5">realistic fantasy</text:p>
        </text:list-item>
        <text:list-item>
          <text:p text:style-name="P5">moody lighting</text:p>
        </text:list-item>
        <text:list-item>
          <text:p text:style-name="P5">atmospheric</text:p>
        </text:list-item>
        <text:list-item>
          <text:p text:style-name="P5">volumetric light</text:p>
        </text:list-item>
        <text:list-item>
          <text:p text:style-name="P5">muted colors</text:p>
        </text:list-item>
        <text:list-item>
          <text:p text:style-name="P5">film still</text:p>
        </text:list-item>
      </text:list>
      <text:p text:style-name="Horizontal_20_Line"/>
      <text:h text:style-name="Heading_20_1" text:outline-level="1"><text:soft-page-break/>⚡ 4. Prompt BASE reutilizable (MUY IMPORTANTE)</text:h>
      <text:p text:style-name="Text_20_body">Este es el núcleo que reutilizarás siempre.</text:p>
      <text:p text:style-name="Horizontal_20_Line"/>
      <text:h text:style-name="Heading_20_1" text:outline-level="1">🔥 MASTER PROMPT — ELARA</text:h>
      <text:p text:style-name="Quotations">Elara, a 25-year-old athletic female traveler with long dark hair, wearing realistic medieval fantasy clothing and a weathered traveler cloak, standing in an ancient mysterious forest.<text:line-break/>Dark atmospheric environment, cinematic composition, grounded realistic fantasy style, subtle mystical atmosphere, volumetric lighting, detailed textures, ancient ruins and forgotten symbols, moody color palette, emotional and contemplative mood, highly detailed, cinematic film still, realistic proportions, epic but intimate.</text:p>
      <text:p text:style-name="Horizontal_20_Line"/>
      <text:h text:style-name="Heading_20_1" text:outline-level="1">🧩 5. Cómo usarlo</text:h>
      <text:p text:style-name="Text_20_body">👉 NUNCA cambias el núcleo.</text:p>
      <text:p text:style-name="Text_20_body">Solo agregas:</text:p>
      <text:list xml:id="list1164364977" text:style-name="L6">
        <text:list-item>
          <text:p text:style-name="P6">acción</text:p>
        </text:list-item>
        <text:list-item>
          <text:p text:style-name="P6">cámara</text:p>
        </text:list-item>
        <text:list-item>
          <text:p text:style-name="P6">momento</text:p>
        </text:list-item>
      </text:list>
      <text:p text:style-name="Horizontal_20_Line"/>
      <text:h text:style-name="Heading_20_1" text:outline-level="1">🎬 Ejemplos prácticos</text:h>
      <text:h text:style-name="Heading_20_2" text:outline-level="2">🌑 Noche junto al fuego</text:h>
      <text:p text:style-name="Text_20_body">Añadir:</text:p>
      <text:p text:style-name="Quotations">sitting beside a small campfire at night in the forest</text:p>
      <text:p text:style-name="Horizontal_20_Line"/>
      <text:h text:style-name="Heading_20_2" text:outline-level="2">🌅 Amanecer</text:h>
      <text:p text:style-name="Text_20_body">Añadir:</text:p>
      <text:p text:style-name="Quotations">dawn light filtering through the trees</text:p>
      <text:p text:style-name="Horizontal_20_Line"><text:soft-page-break/></text:p>
      <text:h text:style-name="Heading_20_2" text:outline-level="2">🚶 Inicio del viaje</text:h>
      <text:p text:style-name="Text_20_body">Añadir:</text:p>
      <text:p text:style-name="Quotations">taking the first step onto a forest path</text:p>
      <text:p text:style-name="Horizontal_20_Line"/>
      <text:h text:style-name="Heading_20_1" text:outline-level="1">🎥 6. Estilo de cámara (MUY importante)</text:h>
      <text:p text:style-name="Text_20_body">Para mantener coherencia:</text:p>
      <text:p text:style-name="Text_20_body">Usa frecuentemente:</text:p>
      <text:list xml:id="list1342507309" text:style-name="L7">
        <text:list-item>
          <text:p text:style-name="P7">back view</text:p>
        </text:list-item>
        <text:list-item>
          <text:p text:style-name="P7">medium shot</text:p>
        </text:list-item>
        <text:list-item>
          <text:p text:style-name="P7">wide cinematic shot</text:p>
        </text:list-item>
        <text:list-item>
          <text:p text:style-name="P7">shallow depth of field</text:p>
        </text:list-item>
      </text:list>
      <text:p text:style-name="Horizontal_20_Line"/>
      <text:h text:style-name="Heading_20_1" text:outline-level="1">⚠️ 7. Qué evitar SIEMPRE</text:h>
      <text:p text:style-name="Text_20_body">No uses:</text:p>
      <text:list xml:id="list2684084810" text:style-name="L8">
        <text:list-item>
          <text:p text:style-name="P8">anime</text:p>
        </text:list-item>
        <text:list-item>
          <text:p text:style-name="P8">colorful fantasy</text:p>
        </text:list-item>
        <text:list-item>
          <text:p text:style-name="P8">overdesigned armor</text:p>
        </text:list-item>
        <text:list-item>
          <text:p text:style-name="P8">giant weapons</text:p>
        </text:list-item>
        <text:list-item>
          <text:p text:style-name="P8">perfect beauty</text:p>
        </text:list-item>
        <text:list-item>
          <text:p text:style-name="P8">videogame aesthetics</text:p>
        </text:list-item>
      </text:list>
      <text:p text:style-name="Text_20_body">👉 Tu tono es:<text:line-break/>místico + adulto + realista</text:p>
      <text:p text:style-name="Horizontal_20_Line"/>
      <text:h text:style-name="Heading_20_1" text:outline-level="1">🔥 8. Resultado esperado</text:h>
      <text:p text:style-name="Text_20_body">Si reutilizas esta estructura:</text:p>
      <text:p text:style-name="Text_20_body"><text:soft-page-break/>👉 las imágenes empezarán a parecer escenas de una misma película</text:p>
      <text:p text:style-name="Text_20_body">Y eso:</text:p>
      <text:list xml:id="list3899634864" text:style-name="L9">
        <text:list-item>
          <text:p text:style-name="P9">construye marca</text:p>
        </text:list-item>
        <text:list-item>
          <text:p text:style-name="P9">genera identidad</text:p>
        </text:list-item>
        <text:list-item>
          <text:p text:style-name="P9">aumenta retención</text:p>
        </text:list-item>
      </text:list>
      <text:p text:style-name="Horizontal_20_Line"/>
      <text:h text:style-name="Heading_20_1" text:outline-level="1">💡 Recomendación PRO</text:h>
      <text:p text:style-name="Text_20_body">Guarda:</text:p>
      <text:list xml:id="list1107212863" text:style-name="L10">
        <text:list-item>
          <text:p text:style-name="P10">el prompt base</text:p>
        </text:list-item>
        <text:list-item>
          <text:p text:style-name="P10">5–10 modificadores reutilizables</text:p>
        </text:list-item>
      </text:list>
      <text:p text:style-name="Text_20_body">👉 y construyes tu “lenguaje visual”</text:p>
      <text:p text:style-name="Horizontal_20_Line"/>
      <text:h text:style-name="Heading_20_1" text:outline-level="1">✅ Conclusión</text:h>
      <text:p text:style-name="Text_20_body">✔ Sí, necesitas consistencia visual<text:line-break/>✔ Sí, debes reutilizar una estructura fija<text:line-break/>✔ Tu proyecto se beneficiará MUCHÍSIMO de esto<text:line-break/>✔ Ya tienes un tono visual muy claro (eso es raro y valioso)</text:p>
      <text:p text:style-name="Horizontal_20_Line"/>
      <text:p text:style-name="Text_20_body">Si quieres, el siguiente paso puede ser muy potente:</text:p>
      <text:p text:style-name="Text_20_body">👉 construir juntos la “Biblia Visual de Lluviara”:</text:p>
      <text:list xml:id="list4196666248" text:style-name="L11">
        <text:list-item>
          <text:p text:style-name="P11">Elara</text:p>
        </text:list-item>
        <text:list-item>
          <text:p text:style-name="P11">Fabhrius</text:p>
        </text:list-item>
        <text:list-item>
          <text:p text:style-name="P11">bosques</text:p>
        </text:list-item>
        <text:list-item>
          <text:p text:style-name="P11">ruinas</text:p>
        </text:list-item>
        <text:list-item>
          <text:p text:style-name="P11">fuego</text:p>
        </text:list-item>
        <text:list-item>
          <text:p text:style-name="P11">iluminación</text:p>
        </text:list-item>
        <text:list-item>
          <text:p text:style-name="P11">símbolos</text:p>
        </text:list-item>
        <text:list-item>
          <text:p text:style-name="P11">paleta de colores</text:p>
        </text:list-item>
        <text:list-item>
          <text:p text:style-name="P11">tipos de plano cinematográfico</text:p>
        </text:list-item>
      </text:list>
      <text:p text:style-name="Text_20_body"><text:soft-page-break/>Eso te permitiría generar imágenes coherentes durante meses.</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6T20:00:53.549000000</meta:creation-date>
    <dc:date>2026-05-16T20:01:33.999000000</dc:date>
    <meta:editing-duration>PT41S</meta:editing-duration>
    <meta:editing-cycles>1</meta:editing-cycles>
    <meta:document-statistic meta:table-count="0" meta:image-count="0" meta:object-count="0" meta:page-count="6" meta:paragraph-count="109" meta:word-count="536" meta:character-count="3165" meta:non-whitespace-character-count="2795"/>
    <meta:generator>LibreOffice/7.3.5.2$Windows_X86_64 LibreOffice_project/184fe81b8c8c30d8b5082578aee2fed2ea847c01</meta:generator>
  </office:meta>
</office:document-meta>
</file>