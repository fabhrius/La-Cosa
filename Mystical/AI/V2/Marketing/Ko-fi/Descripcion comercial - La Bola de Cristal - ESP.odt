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T1" style:family="text">
      <style:text-properties officeooo:rsid="000f9e2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hora mismo estás en un punto crítico.</text:p>
      <text:p text:style-name="Text_20_body">La portada consigue el clic.</text:p>
      <text:p text:style-name="Text_20_body">La descripción consigue la compra.</text:p>
      <text:p text:style-name="Text_20_body">Y para un autor desconocido, la descripción es mucho más importante de lo que parece.</text:p>
      <text:p text:style-name="Horizontal_20_Line"/>
      <text:h text:style-name="Heading_20_2" text:outline-level="2">Qué NO debe ser la descripción</text:h>
      <text:p text:style-name="Text_20_body">No debería ser:</text:p>
      <text:list xml:id="list2678342145" text:style-name="L1">
        <text:list-item>
          <text:p text:style-name="P1">un resumen completo del argumento</text:p>
        </text:list-item>
        <text:list-item>
          <text:p text:style-name="P1">una ficha técnica</text:p>
        </text:list-item>
        <text:list-item>
          <text:p text:style-name="P1">una explicación filosófica</text:p>
        </text:list-item>
        <text:list-item>
          <text:p text:style-name="P1">una sinopsis que revele demasiado</text:p>
        </text:list-item>
      </text:list>
      <text:p text:style-name="Text_20_body">El objetivo no es explicar la historia.</text:p>
      <text:p text:style-name="Text_20_body">El objetivo es provocar una pregunta en la mente del lector.</text:p>
      <text:p text:style-name="Horizontal_20_Line"/>
      <text:h text:style-name="Heading_20_2" text:outline-level="2">Lo que vende "La bola de cristal"</text:h>
      <text:p text:style-name="Text_20_body">Si pensamos en el relato, el verdadero gancho no es la bola.</text:p>
      <text:p text:style-name="Text_20_body">El verdadero gancho es la pregunta:</text:p>
      <text:p text:style-name="Quotations">¿Qué harías si pudieras ver tu propio futuro?</text:p>
      <text:p text:style-name="Text_20_body">Esa es la idea que genera curiosidad.</text:p>
      <text:p text:style-name="Horizontal_20_Line"/>
      <text:h text:style-name="Heading_20_2" text:outline-level="2">Estructura recomendada</text:h>
      <text:p text:style-name="Text_20_body">Yo utilizaría cuatro bloques.</text:p>
      <text:h text:style-name="Heading_20_3" text:outline-level="3">1. Gancho</text:h>
      <text:p text:style-name="Text_20_body">Una o dos frases.</text:p>
      <text:p text:style-name="Text_20_body">Por ejemplo:</text:p>
      <text:p text:style-name="Quotations">Dahg es un comerciante ambulante que adquiere una misteriosa bola de cristal capaz de mostrar fragmentos del futuro.</text:p>
      <text:p text:style-name="Quotations"><text:soft-page-break/>Cuando una visión le revela una tragedia inminente, deberá decidir si desafiar al destino o aceptarlo.</text:p>
      <text:p text:style-name="Horizontal_20_Line"/>
      <text:h text:style-name="Heading_20_3" text:outline-level="3">2. Intriga</text:h>
      <text:p text:style-name="Text_20_body">Sin revelar el misterio.</text:p>
      <text:p text:style-name="Text_20_body">Por ejemplo:</text:p>
      <text:p text:style-name="Quotations">Pero algunas preguntas no tienen respuesta.</text:p>
      <text:p text:style-name="Quotations">Y algunas advertencias solo existen para poner a prueba a quienes las reciben.</text:p>
      <text:p text:style-name="Horizontal_20_Line"/>
      <text:h text:style-name="Heading_20_3" text:outline-level="3">3. Presentación del producto</text:h>
      <text:p text:style-name="Quotations">La Bola de Cristal es el primer relato de la colección <text:span text:style-name="Emphasis">Omniscientis: Relatos de la Librería Infinita</text:span>.</text:p>
      <text:p text:style-name="Quotations">Una historia de misterio ambientada en un mundo medieval que combina intriga, reflexión filosófica y un final abierto que invita al lector a continuar la historia más allá de la última página.</text:p>
      <text:p text:style-name="Horizontal_20_Line"/>
      <text:h text:style-name="Heading_20_3" text:outline-level="3">4. Características</text:h>
      <text:p text:style-name="Quotations">Incluye:</text:p>
      <text:p text:style-name="Quotations">• 100 páginas<text:line-break/>• Más de 10.000 palabras<text:line-break/>• 7 ilustraciones a página completa<text:line-break/>• Edición digital en PDF<text:line-break/>• Idioma: Español</text:p>
      <text:p text:style-name="Horizontal_20_Line"/>
      <text:h text:style-name="Heading_20_2" text:outline-level="2">Una versión más comercial</text:h>
      <text:p text:style-name="Text_20_body">Si quieres algo con un tono más cercano al que usan las plataformas digitales, podría ser:</text:p>
      <text:p text:style-name="Horizontal_20_Line"/>
      <text:h text:style-name="Heading_20_3" text:outline-level="3">La Bola de Cristal</text:h>
      <text:p text:style-name="Text_20_body">¿Qué harías si pudieras conocer el futuro?</text:p>
      <text:p text:style-name="Text_20_body"><text:soft-page-break/><text:span text:style-name="T1">Un</text:span> comerciante<text:span text:style-name="T1"> llamado</text:span> Dahg adquiere una extraña bola de cristal capaz de mostrar fragmentos de lo que está por venir. Al principio parece un simple objeto de curiosidad. Pero cuando una de sus visiones anuncia una tragedia inminente, la frontera entre advertencia y destino comienza a desvanecerse.</text:p>
      <text:p text:style-name="Text_20_body">Mientras intenta comprender el significado de lo que ha visto, Dahg se adentra en un misterio que pondrá a prueba sus decisiones, sus convicciones y su comprensión de la realidad.</text:p>
      <text:p text:style-name="Text_20_body"><text:span text:style-name="Emphasis">La Bola de Cristal</text:span> es el primer relato de la colección <text:span text:style-name="Strong_20_Emphasis">Omniscientis: Relatos de la Librería Infinita</text:span>, una serie de historias de misterio ambientadas en un mundo medieval donde lo imposible desafía la comprensión humana.</text:p>
      <text:p text:style-name="Text_20_body">Una narración que combina intriga, reflexión filosófica y un final abierto que continúa mucho después de la última página.</text:p>
      <text:p text:style-name="Text_20_body"><text:span text:style-name="Strong_20_Emphasis">Incluye:</text:span></text:p>
      <text:p text:style-name="Text_20_body">• <text:span text:style-name="T1">92</text:span> páginas<text:line-break/>• Más de 10.000 palabras<text:line-break/>• 7 ilustraciones interiores a página completa<text:line-break/>• Edición digital en PDF</text:p>
      <text:p text:style-name="Horizontal_20_Line"/>
      <text:p text:style-name="Text_20_body">Lo que me gusta de esta versión es que vende exactamente lo que el cuento ofrece:</text:p>
      <text:list xml:id="list1280320765" text:style-name="L2">
        <text:list-item>
          <text:p text:style-name="P2">misterio</text:p>
        </text:list-item>
        <text:list-item>
          <text:p text:style-name="P2">destino</text:p>
        </text:list-item>
        <text:list-item>
          <text:p text:style-name="P2">reflexión</text:p>
        </text:list-item>
        <text:list-item>
          <text:p text:style-name="P2">ambientación medieval</text:p>
        </text:list-item>
        <text:list-item>
          <text:p text:style-name="P2">final abierto</text:p>
        </text:list-item>
      </text:list>
      <text:p text:style-name="Text_20_body">sin revelar la verdadera naturaleza del desenlace. Y además conecta el producto con la marca Omniscientis, que es algo que te interesará cada vez más a medida que publiques el segundo, tercer y cuarto relat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7-21T15:42:10.564000000</meta:creation-date>
    <dc:date>2026-07-21T15:52:24.489000000</dc:date>
    <meta:editing-duration>PT10M14S</meta:editing-duration>
    <meta:editing-cycles>1</meta:editing-cycles>
    <meta:document-statistic meta:table-count="0" meta:image-count="0" meta:object-count="0" meta:page-count="3" meta:paragraph-count="52" meta:word-count="518" meta:character-count="3053" meta:non-whitespace-character-count="2596"/>
    <meta:generator>LibreOffice/7.3.5.2$Windows_X86_64 LibreOffice_project/184fe81b8c8c30d8b5082578aee2fed2ea847c01</meta:generator>
  </office:meta>
</office:document-meta>
</file>