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hora mismo no necesitas una gran estrategia de marketing.</text:p>
      <text:p text:style-name="Text_20_body">Necesitas una estrategia de <text:span text:style-name="Strong_20_Emphasis">descubrimiento</text:span>.</text:p>
      <text:p text:style-name="Text_20_body">La pregunta inicial no es:</text:p>
      <text:p text:style-name="Quotations">¿Cómo vendo 100 copias?</text:p>
      <text:p text:style-name="Text_20_body">La pregunta es:</text:p>
      <text:p text:style-name="Quotations">¿Cómo consigo que las primeras 20 personas interesadas vean el producto?</text:p>
      <text:p text:style-name="Horizontal_20_Line"/>
      <text:h text:style-name="Heading_20_1" text:outline-level="1">Fase 1: Tráfico desde tus activos existentes</text:h>
      <text:p text:style-name="Text_20_body">Esta es la fase que yo atacaría primero porque es gratuita.</text:p>
      <text:h text:style-name="Heading_20_2" text:outline-level="2">Facebook</text:h>
      <text:p text:style-name="Text_20_body">Tú ya tienes:</text:p>
      <text:list xml:id="list1470555451" text:style-name="L1">
        <text:list-item>
          <text:p text:style-name="P1">perfil de Facebook</text:p>
        </text:list-item>
        <text:list-item>
          <text:p text:style-name="P1">contactos</text:p>
        </text:list-item>
        <text:list-item>
          <text:p text:style-name="P1">grupo relacionado con Omniscientis</text:p>
        </text:list-item>
      </text:list>
      <text:p text:style-name="Text_20_body">Haría un post sencillo.</text:p>
      <text:p text:style-name="Text_20_body">No un anuncio.</text:p>
      <text:p text:style-name="Text_20_body">No una venta agresiva.</text:p>
      <text:p text:style-name="Text_20_body">Algo parecido a:</text:p>
      <text:p text:style-name="Quotations">Después de varios meses de trabajo, el primer volumen de Omniscientis ya está disponible.</text:p>
      <text:p text:style-name="Quotations"><text:span text:style-name="Emphasis">La Bola de Cristal</text:span> es un relato de misterio ambientado en un mundo medieval.</text:p>
      <text:p text:style-name="Quotations">Una historia sobre el destino, las decisiones y los límites del conocimiento.</text:p>
      <text:p text:style-name="Quotations">Disponible en español e inglés.</text:p>
      <text:p text:style-name="Quotations">[enlace]</text:p>
      <text:p text:style-name="Text_20_body">La idea es informar.</text:p>
      <text:p text:style-name="Horizontal_20_Line"/>
      <text:h text:style-name="Heading_20_2" text:outline-level="2"><text:soft-page-break/>X (Twitter)</text:h>
      <text:p text:style-name="Text_20_body">Aquí la estrategia es distinta.</text:p>
      <text:p text:style-name="Text_20_body">Nadie conoce Omniscientis.</text:p>
      <text:p text:style-name="Text_20_body">Por tanto, no publiques:</text:p>
      <text:p text:style-name="Quotations">Comprad mi libro.</text:p>
      <text:p text:style-name="Text_20_body">Publica ideas.</text:p>
      <text:p text:style-name="Text_20_body">Por ejemplo:</text:p>
      <text:p text:style-name="Quotations">¿Si conocieras tu futuro, intentarías cambiarlo?</text:p>
      <text:p text:style-name="Text_20_body">Y debajo:</text:p>
      <text:p text:style-name="Quotations">Esa es la pregunta que inspiró <text:span text:style-name="Emphasis">La Bola de Cristal</text:span>, primer relato de Omniscientis.</text:p>
      <text:p text:style-name="Quotations">[enlace]</text:p>
      <text:p text:style-name="Text_20_body">La reflexión primero.</text:p>
      <text:p text:style-name="Text_20_body">El producto después.</text:p>
      <text:p text:style-name="Horizontal_20_Line"/>
      <text:h text:style-name="Heading_20_1" text:outline-level="1">Fase 2: Utilizar el propio contenido</text:h>
      <text:p text:style-name="Text_20_body">Aquí veo una oportunidad enorme para tu proyecto.</text:p>
      <text:p text:style-name="Text_20_body">Porque tus relatos generan mucho material reutilizable.</text:p>
      <text:p text:style-name="Horizontal_20_Line"/>
      <text:h text:style-name="Heading_20_2" text:outline-level="2">Fragmentos ilustrados</text:h>
      <text:p text:style-name="Text_20_body">Tienes:</text:p>
      <text:list xml:id="list466875860" text:style-name="L2">
        <text:list-item>
          <text:p text:style-name="P2">ilustraciones</text:p>
        </text:list-item>
        <text:list-item>
          <text:p text:style-name="P2">frases de Fabhrius</text:p>
        </text:list-item>
        <text:list-item>
          <text:p text:style-name="P2">escenas</text:p>
        </text:list-item>
      </text:list>
      <text:p text:style-name="Text_20_body">Eso permite crear publicaciones durante semanas.</text:p>
      <text:p text:style-name="Text_20_body">Ejemplo:</text:p>
      <text:p text:style-name="Text_20_body">Imagen del puente.</text:p>
      <text:p text:style-name="Text_20_body">Texto:</text:p>
      <text:p text:style-name="Quotations"><text:soft-page-break/>Algunas advertencias existen para protegernos.</text:p>
      <text:p text:style-name="Quotations">Otras existen para ponernos a prueba.</text:p>
      <text:p text:style-name="Text_20_body">Al final:</text:p>
      <text:p text:style-name="Quotations">Extraído de <text:span text:style-name="Emphasis">La Bola de Cristal</text:span>.</text:p>
      <text:p text:style-name="Horizontal_20_Line"/>
      <text:h text:style-name="Heading_20_2" text:outline-level="2">Citas filosóficas</text:h>
      <text:p text:style-name="Text_20_body">Esto encaja muy bien con Omniscientis.</text:p>
      <text:p text:style-name="Text_20_body">Por ejemplo:</text:p>
      <text:p text:style-name="Quotations">Quien intenta huir de su destino puede terminar guiándolo.</text:p>
      <text:p text:style-name="Text_20_body">— Fabhrius</text:p>
      <text:p text:style-name="Text_20_body">Y un enlace en comentarios.</text:p>
      <text:p text:style-name="Horizontal_20_Line"/>
      <text:h text:style-name="Heading_20_1" text:outline-level="1">Fase 3: Construir la colección</text:h>
      <text:p text:style-name="Text_20_body">Aquí está la clave.</text:p>
      <text:p text:style-name="Text_20_body">No estás vendiendo un cuento.</text:p>
      <text:p text:style-name="Text_20_body">Estás construyendo una serie.</text:p>
      <text:p text:style-name="Text_20_body">Cada nuevo relato hace más valiosos los anteriores.</text:p>
      <text:p text:style-name="Text_20_body">Por eso yo dedicaría mucho esfuerzo a terminar:</text:p>
      <text:list xml:id="list2779165137" text:style-name="L3">
        <text:list-item>
          <text:p text:style-name="P3">La Lámpara de Aceite</text:p>
        </text:list-item>
        <text:list-item>
          <text:p text:style-name="P3">La Llave</text:p>
        </text:list-item>
        <text:list-item>
          <text:p text:style-name="P3">La Semilla de Oro</text:p>
        </text:list-item>
      </text:list>
      <text:p text:style-name="Text_20_body">Porque una tienda con cuatro productos parece mucho más sólida que una tienda con uno.</text:p>
      <text:p text:style-name="Horizontal_20_Line"/>
      <text:h text:style-name="Heading_20_1" text:outline-level="1">Lo que NO haría todavía</text:h>
      <text:p text:style-name="Text_20_body">No invertiría dinero en publicidad.</text:p>
      <text:p text:style-name="Text_20_body">Todavía no.</text:p>
      <text:p text:style-name="Text_20_body"><text:soft-page-break/>Porque aún no sabemos:</text:p>
      <text:list xml:id="list2680512052" text:style-name="L4">
        <text:list-item>
          <text:p text:style-name="P4">si la portada convierte</text:p>
        </text:list-item>
        <text:list-item>
          <text:p text:style-name="P4">si el precio funciona</text:p>
        </text:list-item>
        <text:list-item>
          <text:p text:style-name="P4">si la descripción funciona</text:p>
        </text:list-item>
        <text:list-item>
          <text:p text:style-name="P4">si el público responde</text:p>
        </text:list-item>
      </text:list>
      <text:p text:style-name="Text_20_body">Primero obtendría datos orgánicos.</text:p>
      <text:p text:style-name="Horizontal_20_Line"/>
      <text:h text:style-name="Heading_20_1" text:outline-level="1">El experimento que haría esta semana</text:h>
      <text:p text:style-name="Text_20_body">Muy simple.</text:p>
      <text:p text:style-name="Text_20_body">Publicar durante siete días.</text:p>
      <text:h text:style-name="Heading_20_3" text:outline-level="3">Día 1</text:h>
      <text:p text:style-name="Text_20_body">Anuncio oficial del lanzamiento.</text:p>
      <text:h text:style-name="Heading_20_3" text:outline-level="3">Día 2</text:h>
      <text:p text:style-name="Text_20_body">Una ilustración del cuento.</text:p>
      <text:h text:style-name="Heading_20_3" text:outline-level="3">Día 3</text:h>
      <text:p text:style-name="Text_20_body">Una frase de Fabhrius.</text:p>
      <text:h text:style-name="Heading_20_3" text:outline-level="3">Día 4</text:h>
      <text:p text:style-name="Text_20_body">Otra ilustración.</text:p>
      <text:h text:style-name="Heading_20_3" text:outline-level="3">Día 5</text:h>
      <text:p text:style-name="Text_20_body">Una pregunta filosófica relacionada con el relato.</text:p>
      <text:h text:style-name="Heading_20_3" text:outline-level="3">Día 6</text:h>
      <text:p text:style-name="Text_20_body">Fragmento corto del texto.</text:p>
      <text:h text:style-name="Heading_20_3" text:outline-level="3">Día 7</text:h>
      <text:p text:style-name="Text_20_body">Recordatorio:</text:p>
      <text:p text:style-name="Quotations">Ya disponible en Ko-fi.</text:p>
      <text:p text:style-name="Horizontal_20_Line"/>
      <text:p text:style-name="Text_20_body">Lo que intentaría medir no son las ventas, sino tres cosas:</text:p>
      <text:list xml:id="list3564709155" text:style-name="L5">
        <text:list-item>
          <text:p text:style-name="P5"><text:soft-page-break/>¿La gente hace clic?</text:p>
        </text:list-item>
        <text:list-item>
          <text:p text:style-name="P5">¿La gente comenta o reacciona?</text:p>
        </text:list-item>
        <text:list-item>
          <text:p text:style-name="P5">¿Qué tipo de publicaciones generan más interés?</text:p>
        </text:list-item>
      </text:list>
      <text:p text:style-name="Text_20_body">Porque esa información será extremadamente valiosa cuando publiques el segundo relato. En realidad, los próximos treinta días no son tanto una campaña de ventas como un experimento para descubrir dónde están los lectores potenciales de Omniscientis y qué aspectos del proyecto les resultan más atractiv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2T19:52:14.107000000</meta:creation-date>
    <dc:date>2026-07-22T20:31:34.481000000</dc:date>
    <meta:editing-duration>PT29M10S</meta:editing-duration>
    <meta:editing-cycles>1</meta:editing-cycles>
    <meta:document-statistic meta:table-count="0" meta:image-count="0" meta:object-count="0" meta:page-count="5" meta:paragraph-count="100" meta:word-count="504" meta:character-count="3044" meta:non-whitespace-character-count="2655"/>
    <meta:generator>LibreOffice/7.3.5.2$Windows_X86_64 LibreOffice_project/184fe81b8c8c30d8b5082578aee2fed2ea847c01</meta:generator>
  </office:meta>
</office:document-meta>
</file>