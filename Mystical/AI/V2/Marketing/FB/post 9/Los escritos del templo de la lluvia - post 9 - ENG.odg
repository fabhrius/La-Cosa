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20000057A73666F232B156E8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6.01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Old English Text MT" fo:font-size="48pt" style:font-size-asian="48pt" style:font-size-complex="48pt"/>
    </style:style>
    <style:style style:name="T4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1pt" fo:font-style="normal" fo:text-shadow="none" style:text-underline-style="none" fo:font-weight="normal" style:letter-kerning="true" style:font-name-asian="Microsoft YaHei1" style:font-size-asian="21pt" style:font-style-asian="normal" style:font-weight-asian="normal" style:font-name-complex="Lucida San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de78a" loext:opacity="100%" style:font-name="EB Garamond" fo:font-size="21pt" style:font-size-asian="21pt" style:font-size-complex="21pt"/>
    </style:style>
    <style:style style:name="T6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1" style:font-size-asian="15pt" style:font-style-asian="normal" style:font-weight-asian="normal" style:font-name-complex="Lucida 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aebae" loext:opacity="100%" style:font-name="Script MT Bold" fo:font-size="15pt" style:font-size-asian="15pt" style:font-size-complex="15pt"/>
    </style:style>
    <style:style style:name="T8" style:family="text">
      <style:text-properties fo:color="#fde78a" loext:opacity="100%" style:font-name="Script MT Bold" fo:font-size="15pt" style:font-size-asian="15pt" style:font-size-complex="15pt"/>
    </style:style>
    <style:style style:name="T9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415cm" svg:height="26.265cm" svg:x="1.417cm" svg:y="1.117cm">
          <draw:text-box>
            <text:p text:style-name="P1"><text:span text:style-name="T1">( Omniscientis — Fragment IX </text:span><text:span text:style-name="T2">— The Temple of Rain — Part III )</text:span></text:p>
            <text:p text:style-name="P2"><text:span text:style-name="T3"><text:tab/></text:span><text:span text:style-name="T3">K</text:span><text:span text:style-name="T4">hrom took a torch…</text:span></text:p>
            <text:p><text:span text:style-name="T5"><text:tab/></text:span><text:span text:style-name="T5"><text:tab/></text:span><text:span text:style-name="T5"><text:tab/></text:span><text:span text:style-name="T5">and walked through one of the temple corridors.</text:span></text:p>
            <text:p><text:span text:style-name="T5">At the end of the passage, hidden within the shadows,</text:span><text:span text:style-name="T5"><text:line-break/></text:span><text:span text:style-name="T5">there was a narrow staircase descending beneath the temple.</text:span></text:p>
            <text:p><text:span text:style-name="T5">He began to descend without saying a word.</text:span></text:p>
            <text:p><text:span text:style-name="T5">The staircase seemed endless, spiraling downward into the depths of the earth, into absolute darkness.</text:span></text:p>
            <text:p><text:span text:style-name="T5">This was not a temple. It was something else.</text:span></text:p>
            <text:p><text:span text:style-name="T5">Stone corridors and chambers, arranged in an irregular maze,</text:span><text:span text:style-name="T5"><text:line-break/></text:span><text:span text:style-name="T5">formed an impossible structure beneath the world.</text:span></text:p>
            <text:p><text:span text:style-name="T5">He stopped before a particular chamber</text:span><text:span text:style-name="T5"><text:line-break/></text:span><text:span text:style-name="T5">and lit the torches fixed upon the walls.</text:span></text:p>
            <text:p><text:span text:style-name="T5">The firelight revealed an vast library— inmense.</text:span></text:p>
            <text:p><text:span text:style-name="T5">Thousands of ancient texts covered the room.</text:span></text:p>
            <text:p><text:span text:style-name="T5">Engravings. Maps. Scrolls. </text:span></text:p>
            <text:p><text:span text:style-name="T5">Books written in unknown languages. Strange symbols.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Incomprehensible.</text:span></text:p>
            <text:p><text:span text:style-name="T5"/></text:p>
            <text:p><text:span text:style-name="T5">All of them… except one.</text:span></text:p>
            <text:p><text:span text:style-name="T5">A single manuscript rested open upon a stone table,</text:span><text:span text:style-name="T5"><text:line-break/></text:span><text:span text:style-name="T5">at the center of the chamber.</text:span></text:p>
            <text:p><text:span text:style-name="T5"/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Perfectly legible.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To be continued</text:span><text:span text:style-name="T8">…</text:span></text:p>
            <text:p text:style-name="P1"><text:span text:style-name="T1">(From</text:span><text:span text:style-name="T9"> “Omniscientis”, the lost codex of Lluviara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620000057A73666F232B156E8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29T10:41:21.698000000</dc:date>
    <meta:editing-duration>PT2H50M17S</meta:editing-duration>
    <meta:editing-cycles>26</meta:editing-cycles>
    <meta:generator>LibreOffice/7.3.5.2$Windows_X86_64 LibreOffice_project/184fe81b8c8c30d8b5082578aee2fed2ea847c01</meta:generator>
    <meta:document-statistic meta:object-count="1"/>
  </office:meta>
</office:document-meta>
</file>