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2dbc"/>
    </style:style>
    <style:style style:name="P2" style:family="paragraph" style:parent-style-name="Standard">
      <style:text-properties officeooo:rsid="00012dbc" officeooo:paragraph-rsid="00012dbc"/>
    </style:style>
    <style:style style:name="P3" style:family="paragraph" style:parent-style-name="Standard">
      <style:text-properties officeooo:paragraph-rsid="00044ac5"/>
    </style:style>
    <style:style style:name="P4" style:family="paragraph" style:parent-style-name="Standard">
      <style:text-properties officeooo:rsid="0004f0d6" officeooo:paragraph-rsid="0004f0d6"/>
    </style:style>
    <style:style style:name="T1" style:family="text">
      <style:text-properties officeooo:rsid="00012dbc"/>
    </style:style>
    <style:style style:name="T2" style:family="text">
      <style:text-properties officeooo:rsid="00044ac5"/>
    </style:style>
    <style:style style:name="T3" style:family="text">
      <style:text-properties officeooo:rsid="000685ce"/>
    </style:style>
    <style:style style:name="T4" style:family="text">
      <style:text-properties officeooo:rsid="000b77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Khrom tomó una antorcha…</text:p>
      <text:p text:style-name="Standard"/>
      <text:p text:style-name="Standard">y caminó por uno de los pasillos del templo.</text:p>
      <text:p text:style-name="Standard">Al final de aquel corredor,</text:p>
      <text:p text:style-name="Standard">oculta en la penumbra,</text:p>
      <text:p text:style-name="Standard">había una estrecha escalera descendiendo hacia <text:span text:style-name="T1">el subsuelo</text:span>.</text:p>
      <text:p text:style-name="Standard"/>
      <text:p text:style-name="Standard"><text:span text:style-name="T2">C</text:span>omenzó a bajar sin decir una palabra.</text:p>
      <text:p text:style-name="Standard">La escalera parecía no tener fin,<text:span text:style-name="T1"> girando sobre si misma en una espiral que se hundia en</text:span> las profundidades de la tierra<text:span text:style-name="T2">, en la oscuridad mas absoluta.</text:span></text:p>
      <text:p text:style-name="Standard"/>
      <text:p text:style-name="P3">Aquello no era un templo.</text:p>
      <text:p text:style-name="P3">Era algo más.</text:p>
      <text:p text:style-name="P3"/>
      <text:p text:style-name="Standard"><text:span text:style-name="T1">P</text:span>asillos y cámaras de piedra<text:span text:style-name="T1"> dispuestos de forma irregular</text:span><text:span text:style-name="T2"> formaban un entramado imposible.</text:span></text:p>
      <text:p text:style-name="Standard"><text:span text:style-name="T3">S</text:span>e detuvo frente a una cámara particular<text:span text:style-name="T1"> y e</text:span>ncendió las antorchas dispuestas sobre las paredes.</text:p>
      <text:p text:style-name="Standard"/>
      <text:p text:style-name="P4">La luz del fuego revelo una<text:span text:style-name="T4"> gran</text:span> biblioteca<text:span text:style-name="T4">,</text:span> inmensa.</text:p>
      <text:p text:style-name="Standard">Miles de textos antiguos cubrían la sala.</text:p>
      <text:p text:style-name="Standard">Grabados.<text:span text:style-name="T2"> </text:span>Mapas.<text:span text:style-name="T2"> </text:span>Pergaminos.<text:span text:style-name="T2"> </text:span>Libros escritos en lenguajes desconocidos.<text:span text:style-name="T1"> </text:span>Símbolos extraños.</text:p>
      <text:p text:style-name="P2">Incomprensibles.</text:p>
      <text:p text:style-name="P1"/>
      <text:p text:style-name="Standard">Todos…</text:p>
      <text:p text:style-name="Standard">excepto uno.</text:p>
      <text:p text:style-name="Standard"/>
      <text:p text:style-name="Standard">Un único manuscrito descansaba abierto sobre una mesa de piedra,</text:p>
      <text:p text:style-name="Standard">en el centro de la sala.</text:p>
      <text:p text:style-name="Standard"/>
      <text:p text:style-name="Standard">Perfectamente legible.</text:p>
      <text:p text:style-name="Standard"/>
      <text:p text:style-name="Standard"/>
      <text:p text:style-name="Horizontal_20_Line"/>
      <text:p text:style-name="Text_20_body"/>
      <text:p text:style-name="Text_20_body"/>
      <text:p text:style-name="Text_20_body">Khrom tomó una antorcha…</text:p>
      <text:p text:style-name="Text_20_body">y caminó por uno de los pasillos del templo.</text:p>
      <text:p text:style-name="Text_20_body">Al final de aquel corredor,<text:line-break/>oculta en la penumbra,<text:line-break/>había una estrecha escalera descendiendo hacia el subsuelo.</text:p>
      <text:p text:style-name="Text_20_body">Comenzó a bajar sin decir una palabra.</text:p>
      <text:p text:style-name="Text_20_body">La escalera parecía no tener fin,<text:line-break/>girando sobre sí misma en una espiral que se hundía en las profundidades de la tierra,<text:line-break/>en la oscuridad más absoluta.</text:p>
      <text:p text:style-name="Text_20_body"><text:soft-page-break/>Aquello no era un templo.</text:p>
      <text:p text:style-name="Text_20_body">Era algo más.</text:p>
      <text:p text:style-name="Text_20_body">Pasillos y cámaras de piedra,<text:line-break/>dispuestos de forma irregular,<text:line-break/>formaban un entramado imposible bajo el mundo.</text:p>
      <text:p text:style-name="Text_20_body">Finalmente,<text:line-break/>Khrom se detuvo frente a una cámara particular<text:line-break/>y encendió las antorchas dispuestas sobre las paredes.</text:p>
      <text:p text:style-name="Text_20_body">La luz reveló una biblioteca inmensa.</text:p>
      <text:p text:style-name="Text_20_body">Miles de textos antiguos cubrían la sala.</text:p>
      <text:p text:style-name="Text_20_body">Grabados.<text:line-break/>Mapas.<text:line-break/>Pergaminos.<text:line-break/>Libros escritos en lenguajes desconocidos.</text:p>
      <text:p text:style-name="Text_20_body">Símbolos extraños.</text:p>
      <text:p text:style-name="Text_20_body">Incomprensibles.</text:p>
      <text:p text:style-name="Text_20_body">Todos…</text:p>
      <text:p text:style-name="Text_20_body">excepto uno.</text:p>
      <text:p text:style-name="Text_20_body">Un único manuscrito descansaba abierto sobre una mesa de piedra,<text:line-break/>en el centro de la sala.</text:p>
      <text:p text:style-name="Text_20_body">Perfectamente legible.</text:p>
      <text:p text:style-name="Horizontal_20_Line"/>
      <text:p text:style-name="Text_20_body"/>
      <text:p text:style-name="Text_20_body">Khrom took a torch…</text:p>
      <text:p text:style-name="Text_20_body">and walked through one of the temple corridors.</text:p>
      <text:p text:style-name="Text_20_body">At the end of the passage,<text:line-break/>hidden within the shadows,<text:line-break/>there was a narrow staircase descending beneath the temple.</text:p>
      <text:p text:style-name="Text_20_body">He began to descend without saying a word.</text:p>
      <text:p text:style-name="Text_20_body">The staircase seemed endless,<text:line-break/>spiraling downward into the depths of the earth,<text:line-break/>into absolute darkness.</text:p>
      <text:p text:style-name="Text_20_body">This was not a temple.</text:p>
      <text:p text:style-name="Text_20_body"><text:soft-page-break/>It was something else.</text:p>
      <text:p text:style-name="Text_20_body">Stone corridors and chambers,<text:line-break/>arranged in an irregular maze,<text:line-break/>formed an impossible structure beneath the world.</text:p>
      <text:p text:style-name="Text_20_body">At last,<text:line-break/>Khrom stopped before a particular chamber<text:line-break/>and lit the torches fixed upon the walls.</text:p>
      <text:p text:style-name="Text_20_body">The firelight revealed an immense library.</text:p>
      <text:p text:style-name="Text_20_body">Thousands of ancient texts covered the room.</text:p>
      <text:p text:style-name="Text_20_body">Engravings.<text:line-break/>Maps.<text:line-break/>Scrolls.<text:line-break/>Books written in unknown languages.</text:p>
      <text:p text:style-name="Text_20_body">Strange symbols.</text:p>
      <text:p text:style-name="Text_20_body">Incomprehensible.</text:p>
      <text:p text:style-name="Text_20_body">All of them…</text:p>
      <text:p text:style-name="Text_20_body">except one.</text:p>
      <text:p text:style-name="Text_20_body">A single manuscript rested open upon a stone table,<text:line-break/>at the center of the chamber.</text:p>
      <text:p text:style-name="Text_20_body">Perfectly legible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28T10:56:49.545000000</meta:creation-date>
    <dc:date>2026-05-29T09:24:52.657000000</dc:date>
    <meta:editing-duration>PT36M25S</meta:editing-duration>
    <meta:editing-cycles>7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56" meta:word-count="439" meta:character-count="2724" meta:non-whitespace-character-count="2341"/>
  </office:meta>
</office:document-meta>
</file>