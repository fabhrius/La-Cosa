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20000057A73666F232B156E8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0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color="#fde78a" loext:opacity="100%" style:font-name="EB Garamond" fo:font-size="21pt" style:font-size-asian="21pt" style:font-size-complex="21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aebae" loext:opacity="100%" style:font-name="Script MT Bold" fo:font-size="15pt" style:font-size-asian="15pt" style:font-size-complex="15pt"/>
    </style:style>
    <style:style style:name="T7" style:family="text">
      <style:text-properties fo:color="#fde78a" loext:opacity="100%" style:font-name="Script MT Bold" fo:font-size="15pt" style:font-size-asian="15pt" style:font-size-complex="15pt"/>
    </style:style>
    <style:style style:name="T8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415cm" svg:height="26.265cm" svg:x="1.417cm" svg:y="1.117cm">
          <draw:text-box>
            <text:p text:style-name="P1"><text:span text:style-name="T1">( Omniscientis — Fragmento IX </text:span><text:span text:style-name="T2">— El Templo de la Lluvia — Parte III )</text:span></text:p>
            <text:p text:style-name="P2"><text:span text:style-name="T3"><text:tab/></text:span><text:span text:style-name="T3">K</text:span><text:span text:style-name="T4">hrom tomó una antorcha…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y caminó por uno de los pasillos del templo.</text:span></text:p>
            <text:p text:style-name="P2"><text:span text:style-name="T4">Al final de aquel corredor, oculta en la penumbra,</text:span></text:p>
            <text:p text:style-name="P2"><text:span text:style-name="T4">había una estrecha escalera descendiendo hacia el subsuelo.</text:span></text:p>
            <text:p text:style-name="P2"><text:span text:style-name="T4">Comenzó a bajar sin decir una palabra.</text:span></text:p>
            <text:p text:style-name="P2"><text:span text:style-name="T4">La escalera parecía no tener fin, girando sobre sí misma en una espiral que se hundía en las profundidades de la tierra,</text:span></text:p>
            <text:p text:style-name="P2"><text:span text:style-name="T4">en la oscuridad más absoluta. </text:span></text:p>
            <text:p text:style-name="P2"><text:span text:style-name="T4">Aquello no era un templo. Era algo más. </text:span></text:p>
            <text:p text:style-name="P2"><text:span text:style-name="T4">Pasillos y cámaras de piedra, dispuestos de forma irregular,</text:span></text:p>
            <text:p text:style-name="P2"><text:span text:style-name="T4">formaban un entramado imposible.</text:span></text:p>
            <text:p text:style-name="P2"><text:span text:style-name="T4">Se detuvo frente a una cámara particular</text:span></text:p>
            <text:p text:style-name="P2"><text:span text:style-name="T4">y encendió las antorchas dispuestas sobre las paredes. </text:span></text:p>
            <text:p text:style-name="P2"><text:span text:style-name="T4">La luz reveló una gran biblioteca, inmensa.</text:span></text:p>
            <text:p text:style-name="P2"><text:span text:style-name="T4">Miles de textos antiguos cubrían la sala. </text:span></text:p>
            <text:p text:style-name="P2"><text:span text:style-name="T4">Grabados. Mapas. Pergaminos.</text:span></text:p>
            <text:p text:style-name="P2"><text:span text:style-name="T4">Libros escritos en lenguajes desconocidos. Símbolos extraños.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Incomprensibles. </text:span></text:p>
            <text:p text:style-name="P2"><text:span text:style-name="T4">Todos…</text:span><text:span text:style-name="T4"><text:tab/></text:span><text:span text:style-name="T4">excepto uno.</text:span></text:p>
            <text:p text:style-name="P2"><text:span text:style-name="T4">Un único manuscrito descansaba abierto sobre una mesa de piedra, en el centro de la sala.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Perfectamente legible.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ontinuará</text:span><text:span text:style-name="T7">…</text:span></text:p>
            <text:p text:style-name="P1"><text:span text:style-name="T1">(</text:span><text:span text:style-name="T8">De “Omniscientis”, el códice perdido de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620000057A73666F232B156E8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8T19:19:28.741000000</dc:date>
    <meta:editing-duration>PT2H1M7S</meta:editing-duration>
    <meta:editing-cycles>20</meta:editing-cycles>
    <meta:generator>LibreOffice/7.3.5.2$Windows_X86_64 LibreOffice_project/184fe81b8c8c30d8b5082578aee2fed2ea847c01</meta:generator>
    <meta:document-statistic meta:object-count="1"/>
  </office:meta>
</office:document-meta>
</file>