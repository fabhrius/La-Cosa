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00000034001519CD36867F07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2.0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af1ce" loext:opacity="100%" style:font-name="EB Garamond"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color="#faf1ce" loext:opacity="100%" style:font-name="EB Garamond" fo:font-size="24pt" style:font-size-asian="24pt" style:font-size-complex="24pt"/>
    </style:style>
    <style:style style:name="T1" style:family="text">
      <style:text-properties fo:color="#faf1ce" loext:opacity="100%" style:font-name="EB Garamon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58cm" svg:x="1cm" svg:y="7.44cm">
          <draw:image xlink:href="Pictures/10000000000004E00000034001519CD36867F07C.jpg" xlink:type="simple" xlink:show="embed" xlink:actuate="onLoad" draw:mime-type="image/jpeg">
            <text:p/>
          </draw:image>
        </draw:frame>
        <draw:frame draw:style-name="gr2" draw:text-style-name="P3" draw:layer="layout" svg:width="19.273cm" svg:height="12.406cm" svg:x="1.317cm" svg:y="7.714cm">
          <draw:text-box>
            <text:p text:style-name="P2"><text:span text:style-name="T1">She found the remains of a forgotten civilization.</text:span></text:p>
            <text:p text:style-name="P2"><text:span text:style-name="T1">They were not ruins… they were answers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The engravings bore a name: Fabhrius.</text:span></text:p>
            <text:p text:style-name="P2"><text:span text:style-name="T1"/></text:p>
            <text:p text:style-name="P2"><text:span text:style-name="T1">They did not explain the world.</text:span></text:p>
            <text:p text:style-name="P2"><text:span text:style-name="T1">They revealed what we are.</text:span></text:p>
            <text:p text:style-name="P2"><text:span text:style-name="T1"/></text:p>
            <text:p text:style-name="P2"><text:span text:style-name="T1">I am reconstructing that knowledge now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07T19:11:24.968000000</dc:date>
    <meta:editing-duration>PT8M48S</meta:editing-duration>
    <meta:editing-cycles>1</meta:editing-cycles>
    <meta:document-statistic meta:object-count="2"/>
    <meta:generator>LibreOffice/7.3.5.2$Windows_X86_64 LibreOffice_project/184fe81b8c8c30d8b5082578aee2fed2ea847c01</meta:generator>
  </office:meta>
</office:document-meta>
</file>