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358E61C6CF634E1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23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9.5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af1ce" loext:opacity="100%" style:font-name="EB Garamond" fo:font-size="24pt" style:font-size-asian="24pt" style:font-name-complex="EB Garamond" style:font-size-complex="24pt"/>
    </style:style>
    <style:style style:name="T1" style:family="text">
      <style:text-properties fo:color="#faf1ce" loext:opacity="100%" style:font-name="Sans Serif Collection" fo:font-size="14pt" style:font-size-asian="14pt" style:font-name-complex="EB Garamond" style:font-size-complex="14pt"/>
    </style:style>
    <style:style style:name="T2" style:family="text">
      <style:text-properties fo:color="#faf1ce" loext:opacity="100%" style:font-name="EB Garamond" fo:font-size="24pt" style:font-size-asian="24pt" style:font-name-complex="EB Garamond" style:font-size-complex="24pt"/>
    </style:style>
    <style:style style:name="T3" style:family="text">
      <style:text-properties fo:color="#faf1ce" loext:opacity="100%" style:font-name="EB Garamond" fo:font-size="26pt" style:font-size-asian="26pt" style:font-name-complex="EB Garamond" style:font-size-complex="26pt"/>
    </style:style>
    <style:style style:name="T4" style:family="text">
      <style:text-properties fo:font-variant="normal" fo:text-transform="none" fo:color="#faf1ce" loext:opacity="100%" style:text-outline="false" style:text-line-through-style="none" style:text-line-through-type="none" style:font-name="EB Garamond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EB Garamond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af1ce" loext:opacity="100%" style:text-outline="false" style:text-line-through-style="none" style:text-line-through-type="none" style:font-name="Cinzel Decorative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EB Garamond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af1ce" loext:opacity="100%" style:text-outline="false" style:text-line-through-style="none" style:text-line-through-type="none" style:font-name="Sans Serif Collection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EB Garamond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svg:x="1cm" svg:y="4.175cm">
          <draw:image xlink:href="Pictures/100000000000040000000400358E61C6CF634E19.jpg" xlink:type="simple" xlink:show="embed" xlink:actuate="onLoad" draw:mime-type="image/jpeg">
            <text:p/>
          </draw:image>
        </draw:frame>
        <draw:frame draw:style-name="gr2" draw:text-style-name="P4" draw:layer="layout" svg:width="19.273cm" svg:height="19.799cm" svg:x="1.317cm" svg:y="4.492cm">
          <draw:text-box>
            <text:p text:style-name="P2"><text:span text:style-name="T1">( Omniscientis — Fragment II )</text:span></text:p>
            <text:p text:style-name="P2"><text:span text:style-name="T1"/></text:p>
            <text:p text:style-name="P2"><text:span text:style-name="T2"/></text:p>
            <text:p text:style-name="P2"><text:span text:style-name="T3">“</text:span><text:span text:style-name="T3">No system can fully comprehend the universe.</text:span></text:p>
            <text:p text:style-name="P2"><text:span text:style-name="T3">Not even itself.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The structure of reality forbids it.”</text:span></text:p>
            <text:p text:style-name="P2"><text:span text:style-name="T2"/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— </text:span><text:span text:style-name="T5">Fabhrius</text:span></text:p>
            <text:p><text:span text:style-name="T5"/></text:p>
            <text:p text:style-name="P3"><text:span text:style-name="T6">( From “Omniscientis”, the lost codex of Lluviara 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3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3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5.2$Windows_X86_64 LibreOffice_project/184fe81b8c8c30d8b5082578aee2fed2ea847c01</meta:generator>
    <dc:date>2026-05-08T19:23:44.678000000</dc:date>
    <meta:editing-duration>PT13M45S</meta:editing-duration>
    <meta:editing-cycles>3</meta:editing-cycles>
    <meta:document-statistic meta:object-count="2"/>
  </office:meta>
</office:document-meta>
</file>