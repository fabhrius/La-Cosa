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20000057A376170A189D8EF2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none" draw:fill-color="#ffffff" fo:min-height="25.1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de78a" loext:opacity="100%"/>
    </style:style>
    <style:style style:name="T1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de78a" loext:opacity="100%" style:font-name="Sans Serif Collection" fo:font-size="12pt" style:font-size-asian="12pt" style:font-size-complex="12pt"/>
    </style:style>
    <style:style style:name="T3" style:family="text">
      <style:text-properties fo:color="#fde78a" loext:opacity="100%" style:font-name="EB Garamond" fo:font-size="21pt" style:font-size-asian="21pt" style:font-size-complex="21pt"/>
    </style:style>
    <style:style style:name="T4" style:family="text">
      <style:text-properties fo:font-variant="normal" fo:text-transform="none" fo:color="#fde78a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de78a" loext:opacity="100%" style:font-name="Script MT Bol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415cm" svg:height="26.29cm" svg:x="1.317cm" svg:y="0.917cm">
          <draw:text-box>
            <text:p text:style-name="P1"><text:span text:style-name="T1">( Omniscientis — Fragment VIII <text:s/>— The Temple of Rain — Part II</text:span><text:span text:style-name="T2"> )</text:span></text:p>
            <text:p text:style-name="P2"><text:span text:style-name="T3">The storm battered the immense columns of the temple.</text:span></text:p>
            <text:p text:style-name="P2"><text:span text:style-name="T3">And within its depths, Elara and Khrom spoke together.</text:span></text:p>
            <text:p text:style-name="P2"><text:span text:style-name="T3">As they had many times before. But that night was different.</text:span></text:p>
            <text:p text:style-name="P2"><text:span text:style-name="T3"/></text:p>
            <text:p text:style-name="P2"><text:span text:style-name="T3">There was a question that had been growing inside her.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Why do I exist?</text:span></text:p>
            <text:p text:style-name="P2"><text:span text:style-name="T3">No one seemed to know the answer.</text:span></text:p>
            <text:p text:style-name="P2"><text:span text:style-name="T3">Everything was stories. Myths. Empty answers.</text:span></text:p>
            <text:p text:style-name="P2"><text:span text:style-name="T3"/></text:p>
            <text:p text:style-name="P2"><text:span text:style-name="T3">Elara watched the fire for a few moments before speaking.</text:span></text:p>
            <text:p text:style-name="P2"><text:span text:style-name="T3">— </text:span><text:span text:style-name="T3">Why am I conscious?</text:span></text:p>
            <text:p text:style-name="P2"><text:span text:style-name="T3">Why am I here, observing reality? — she asked.</text:span></text:p>
            <text:p text:style-name="P2"><text:span text:style-name="T3"/></text:p>
            <text:p text:style-name="P2"><text:span text:style-name="T3">— </text:span><text:span text:style-name="T3">Because what you are demands it. — Khrom answered without hesitation.</text:span></text:p>
            <text:p text:style-name="P2"><text:span text:style-name="T3"/></text:p>
            <text:p text:style-name="P2"><text:span text:style-name="T3">A chill ran through Elara.</text:span></text:p>
            <text:p text:style-name="P2"><text:span text:style-name="T3"><text:tab/></text:span><text:span text:style-name="T3"><text:tab/></text:span><text:span text:style-name="T3"><text:tab/></text:span><text:span text:style-name="T3">— </text:span><text:span text:style-name="T3">And what is it that I am?</text:span></text:p>
            <text:p text:style-name="P2"><text:span text:style-name="T3"/></text:p>
            <text:p text:style-name="P2"><text:span text:style-name="T3">The priest remained silent.</text:span></text:p>
            <text:p text:style-name="P2"><text:span text:style-name="T3">The expression on his face slowly hardened.</text:span></text:p>
            <text:p text:style-name="P2"><text:span text:style-name="T3"/></text:p>
            <text:p text:style-name="P2"><text:span text:style-name="T3">Finally, he said:</text:span></text:p>
            <text:p text:style-name="P2"><text:span text:style-name="T3"><text:tab/></text:span><text:span text:style-name="T3"><text:tab/></text:span><text:span text:style-name="T3"><text:tab/></text:span><text:span text:style-name="T3">— </text:span><text:span text:style-name="T3">That is the right question.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To be continued</text:span><text:span text:style-name="T5">…</text:span></text:p>
            <text:p text:style-name="P1"><text:span text:style-name="T1">(From “Omniscientis”, the lost codex of Lluviara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4620000057A376170A189D8EF2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5-25T16:28:12.203000000</dc:date>
    <meta:editing-duration>PT1H47M28S</meta:editing-duration>
    <meta:editing-cycles>15</meta:editing-cycles>
    <meta:generator>LibreOffice/7.3.5.2$Windows_X86_64 LibreOffice_project/184fe81b8c8c30d8b5082578aee2fed2ea847c01</meta:generator>
    <meta:document-statistic meta:object-count="1"/>
  </office:meta>
</office:document-meta>
</file>