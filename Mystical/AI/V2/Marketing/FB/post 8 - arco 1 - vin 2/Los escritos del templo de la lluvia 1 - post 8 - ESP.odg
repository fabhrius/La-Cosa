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57A376170A189D8EF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5.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1pt" style:font-size-asian="21pt" style:font-size-complex="21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de78a" loext:opacity="100%" style:font-name="Script MT Bold" fo:font-size="15pt" style:font-size-asian="15pt" style:font-size-complex="15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cript MT Bold" fo:font-size="15pt" style:font-size-asian="15pt" style:font-size-complex="15pt"/>
    </style:style>
    <style:style style:name="T8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5.96cm" svg:x="1.317cm" svg:y="1.117cm">
          <draw:text-box>
            <text:p text:style-name="P1"><text:span text:style-name="T1">( Omniscientis — Fragmento VIII </text:span><text:span text:style-name="T2">— El Templo de la Lluvia — Parte II )</text:span></text:p>
            <text:p text:style-name="P2"><text:span text:style-name="T3">Afuera, la tormenta azotaba las enormes columnas del templo.</text:span></text:p>
            <text:p text:style-name="P2"><text:span text:style-name="T3">Y en su interior, Elara y Khrom conversaban como tantas otras veces. Pero aquella noche era diferente.</text:span></text:p>
            <text:p text:style-name="P2"><text:span text:style-name="T3">Había una pregunta que crecía dentro de ella.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¿Por qué existo?</text:span></text:p>
            <text:p text:style-name="P2"><text:span text:style-name="T3">Nadie parecía conocer la respuesta.</text:span></text:p>
            <text:p text:style-name="P2"><text:span text:style-name="T3">Todo eran historias. Mitos. Respuestas vacías.</text:span></text:p>
            <text:p text:style-name="P2"><text:span text:style-name="T3"/></text:p>
            <text:p text:style-name="P2"><text:span text:style-name="T3">Elara observó el fuego por unos instantes antes de hablar.</text:span></text:p>
            <text:p text:style-name="P2"><text:span text:style-name="T3"/></text:p>
            <text:p text:style-name="P2"><text:span text:style-name="T3">— </text:span><text:span text:style-name="T3">¿Por qué soy consciente?</text:span></text:p>
            <text:p text:style-name="P2"><text:span text:style-name="T4">¿Por qué estoy aquí observando la realidad? — preguntó</text:span></text:p>
            <text:p text:style-name="P2"><text:span text:style-name="T3"/></text:p>
            <text:p text:style-name="P2"><text:span text:style-name="T4">— </text:span><text:span text:style-name="T4">Porque lo que eres lo exige. — respondió </text:span><text:span text:style-name="T3">Khrom sin dudar.</text:span></text:p>
            <text:p text:style-name="P2"><text:span text:style-name="T3"/></text:p>
            <text:p text:style-name="P2"><text:span text:style-name="T3">Elara sintió un escalofrío.</text:span></text:p>
            <text:p text:style-name="P2"><text:span text:style-name="T3"><text:tab/></text:span><text:span text:style-name="T3"><text:tab/></text:span><text:span text:style-name="T3"><text:tab/></text:span><text:span text:style-name="T3">— </text:span><text:span text:style-name="T3">¿Y qué es lo que soy?</text:span></text:p>
            <text:p text:style-name="P2"><text:span text:style-name="T3"/></text:p>
            <text:p text:style-name="P2"><text:span text:style-name="T3">Khrom permaneció en silencio.</text:span></text:p>
            <text:p text:style-name="P2"><text:span text:style-name="T3">La expresión de su rostro se endureció lentamente.</text:span></text:p>
            <text:p text:style-name="P2"><text:span text:style-name="T3"/></text:p>
            <text:p text:style-name="P2"><text:span text:style-name="T3">Finalmente dijo:</text:span></text:p>
            <text:p text:style-name="P2"><text:span text:style-name="T3"><text:tab/></text:span><text:span text:style-name="T3"><text:tab/></text:span><text:span text:style-name="T3"><text:tab/></text:span><text:span text:style-name="T3">— </text:span><text:span text:style-name="T3">Esa es la pregunta correcta.</text:span><text:span text:style-name="T5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Continuará</text:span><text:span text:style-name="T5">…</text:span></text:p>
            <text:p text:style-name="P1"><text:span text:style-name="T1">(</text:span><text:span text:style-name="T8">De “Omniscientis”, el códice perdido de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620000057A376170A189D8EF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5T16:09:40.759000000</dc:date>
    <meta:editing-duration>PT1H42M21S</meta:editing-duration>
    <meta:editing-cycles>12</meta:editing-cycles>
    <meta:generator>LibreOffice/7.3.5.2$Windows_X86_64 LibreOffice_project/184fe81b8c8c30d8b5082578aee2fed2ea847c01</meta:generator>
    <meta:document-statistic meta:object-count="1"/>
  </office:meta>
</office:document-meta>
</file>