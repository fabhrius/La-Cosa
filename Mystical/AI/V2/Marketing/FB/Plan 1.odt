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ienes razón en la crítica.<text:line-break/>👉 Un plan sin métricas ni puntos de control <text:span text:style-name="Strong_20_Emphasis">no es un plan</text:span>, es una apuesta.</text:p>
      <text:p text:style-name="Text_20_body">Así que vamos a hacerlo bien: <text:span text:style-name="Strong_20_Emphasis">medible, con hitos claros y decisiones basadas en datos</text:span> en Facebook.</text:p>
      <text:p text:style-name="Horizontal_20_Line"/>
      <text:h text:style-name="Heading_20_1" text:outline-level="1">🎯 OBJETIVO REAL DEL PROYECTO</text:h>
      <text:p text:style-name="Text_20_body">No es “tener interacción”.</text:p>
      <text:p text:style-name="Text_20_body">👉 Es:<text:line-break/><text:span text:style-name="Strong_20_Emphasis">convertir desconocidos → interesados → lectores</text:span></text:p>
      <text:p text:style-name="Horizontal_20_Line"/>
      <text:h text:style-name="Heading_20_1" text:outline-level="1">🧠 FUNNEL (estructura del sistema)</text:h>
      <text:p text:style-name="Text_20_body">Vamos a trabajar con 3 niveles:</text:p>
      <text:h text:style-name="Heading_20_2" text:outline-level="2">1️⃣ Descubrimiento</text:h>
      <text:p text:style-name="Text_20_body">Personas ven tu contenido en grupos</text:p>
      <text:h text:style-name="Heading_20_2" text:outline-level="2">2️⃣ Interacción</text:h>
      <text:p text:style-name="Text_20_body">Comentan / responden / reaccionan</text:p>
      <text:h text:style-name="Heading_20_2" text:outline-level="2">3️⃣ Conversión</text:h>
      <text:p text:style-name="Text_20_body">Van a tu perfil → te siguen → quieren saber más</text:p>
      <text:p text:style-name="Horizontal_20_Line"/>
      <text:h text:style-name="Heading_20_1" text:outline-level="1">📊 MÉTRICAS (clave del sistema)</text:h>
      <text:p text:style-name="Text_20_body">Cada semana debes medir:</text:p>
      <text:list xml:id="list2607457253" text:style-name="L1">
        <text:list-item>
          <text:p text:style-name="P1">Nº de posts publicados</text:p>
        </text:list-item>
        <text:list-item>
          <text:p text:style-name="P1">Nº de comentarios recibidos</text:p>
        </text:list-item>
        <text:list-item>
          <text:p text:style-name="P1">Nº de respuestas que tú generas</text:p>
        </text:list-item>
        <text:list-item>
          <text:p text:style-name="P1">Nº de visitas al perfil</text:p>
        </text:list-item>
        <text:list-item>
          <text:p text:style-name="P1">Nº de seguidores nuevos</text:p>
        </text:list-item>
      </text:list>
      <text:p text:style-name="Text_20_body">👉 Si no suben → ajustamos</text:p>
      <text:p text:style-name="Horizontal_20_Line"><text:soft-page-break/></text:p>
      <text:h text:style-name="Heading_20_1" text:outline-level="1">🚀 PLAN 30 DÍAS (estructurado)</text:h>
      <text:p text:style-name="Horizontal_20_Line"/>
      <text:h text:style-name="Heading_20_2" text:outline-level="2">🔹 FASE 1 (Días 1–5) — Exploración</text:h>
      <text:h text:style-name="Heading_20_3" text:outline-level="3">Acción:</text:h>
      <text:list xml:id="list846432077" text:style-name="L2">
        <text:list-item>
          <text:p text:style-name="P2">Únete a 5–10 grupos</text:p>
        </text:list-item>
        <text:list-item>
          <text:p text:style-name="P2">NO publiques aún</text:p>
        </text:list-item>
      </text:list>
      <text:h text:style-name="Heading_20_3" text:outline-level="3">Haz:</text:h>
      <text:list xml:id="list887996669" text:style-name="L3">
        <text:list-item>
          <text:p text:style-name="P3">5–10 comentarios diarios</text:p>
        </text:list-item>
      </text:list>
      <text:h text:style-name="Heading_20_3" text:outline-level="3">Objetivo medible:</text:h>
      <text:p text:style-name="Text_20_body">👉 Obtener:</text:p>
      <text:list xml:id="list1553217180" text:style-name="L4">
        <text:list-item>
          <text:p text:style-name="P4">primeras respuestas</text:p>
        </text:list-item>
        <text:list-item>
          <text:p text:style-name="P4">primeros likes en comentarios</text:p>
        </text:list-item>
      </text:list>
      <text:p text:style-name="Horizontal_20_Line"/>
      <text:h text:style-name="Heading_20_2" text:outline-level="2">🔹 FASE 2 (Días 6–15) — Primeros posts</text:h>
      <text:h text:style-name="Heading_20_3" text:outline-level="3">Acción:</text:h>
      <text:list xml:id="list759449028" text:style-name="L5">
        <text:list-item>
          <text:p text:style-name="P5">1 post cada 2 días (en grupos)</text:p>
        </text:list-item>
      </text:list>
      <text:p text:style-name="Text_20_body">Formato:</text:p>
      <text:p text:style-name="Quotations">idea + pregunta</text:p>
      <text:h text:style-name="Heading_20_3" text:outline-level="3">Objetivo:</text:h>
      <text:p text:style-name="Text_20_body">👉 por post:</text:p>
      <text:list xml:id="list937415749" text:style-name="L6">
        <text:list-item>
          <text:p text:style-name="P6">mínimo 2–5 comentarios</text:p>
        </text:list-item>
      </text:list>
      <text:p text:style-name="Horizontal_20_Line"/>
      <text:h text:style-name="Heading_20_2" text:outline-level="2"><text:soft-page-break/>🔹 FASE 3 (Días 16–30) — Optimización</text:h>
      <text:h text:style-name="Heading_20_3" text:outline-level="3">Acción:</text:h>
      <text:list xml:id="list623140202" text:style-name="L7">
        <text:list-item>
          <text:p text:style-name="P7">repetir los formatos que funcionan</text:p>
        </text:list-item>
        <text:list-item>
          <text:p text:style-name="P7">eliminar los que no</text:p>
        </text:list-item>
      </text:list>
      <text:h text:style-name="Heading_20_3" text:outline-level="3">Añadir:</text:h>
      <text:list xml:id="list1161855194" text:style-name="L8">
        <text:list-item>
          <text:p text:style-name="P8">1 post más narrativo por semana (Elara)</text:p>
        </text:list-item>
      </text:list>
      <text:p text:style-name="Horizontal_20_Line"/>
      <text:h text:style-name="Heading_20_1" text:outline-level="1">📈 CRITERIOS DE ÉXITO (claros)</text:h>
      <text:p text:style-name="Text_20_body">Después de 30 días:</text:p>
      <text:p text:style-name="Text_20_body">👉 Esperamos:</text:p>
      <text:list xml:id="list179634443" text:style-name="L9">
        <text:list-item>
          <text:p text:style-name="P9">20–50 comentarios totales</text:p>
        </text:list-item>
        <text:list-item>
          <text:p text:style-name="P9">10–30 seguidores</text:p>
        </text:list-item>
        <text:list-item>
          <text:p text:style-name="P9">2–5 personas interesadas activamente</text:p>
        </text:list-item>
      </text:list>
      <text:p text:style-name="Horizontal_20_Line"/>
      <text:h text:style-name="Heading_20_1" text:outline-level="1">⚠️ CRITERIOS DE FALLO</text:h>
      <text:p text:style-name="Text_20_body">Si después de 15 días:</text:p>
      <text:list xml:id="list4051043851" text:style-name="L10">
        <text:list-item>
          <text:p text:style-name="P10">0 comentarios</text:p>
        </text:list-item>
        <text:list-item>
          <text:p text:style-name="P10">0 respuestas</text:p>
        </text:list-item>
      </text:list>
      <text:p text:style-name="Text_20_body">👉 Problema en:</text:p>
      <text:list xml:id="list635206223" text:style-name="L11">
        <text:list-item>
          <text:p text:style-name="P11">formato</text:p>
        </text:list-item>
        <text:list-item>
          <text:p text:style-name="P11">grupo</text:p>
        </text:list-item>
        <text:list-item>
          <text:p text:style-name="P11">enfoque</text:p>
        </text:list-item>
      </text:list>
      <text:p text:style-name="Text_20_body">Y se corrige inmediatamente.</text:p>
      <text:p text:style-name="Horizontal_20_Line"/>
      <text:h text:style-name="Heading_20_1" text:outline-level="1"><text:soft-page-break/>🔥 TIPOS DE POSTS (los que vas a usar)</text:h>
      <text:h text:style-name="Heading_20_2" text:outline-level="2">1️⃣ Pregunta existencial</text:h>
      <text:p text:style-name="Quotations">Do you think our thoughts are truly our own?</text:p>
      <text:p text:style-name="Horizontal_20_Line"/>
      <text:h text:style-name="Heading_20_2" text:outline-level="2">2️⃣ Idea + duda</text:h>
      <text:p text:style-name="Quotations">What if the truth isn’t hidden…<text:line-break/>but waiting for us?</text:p>
      <text:p text:style-name="Horizontal_20_Line"/>
      <text:h text:style-name="Heading_20_2" text:outline-level="2">3️⃣ Micro narrativa</text:h>
      <text:p text:style-name="Quotations">A character I’m writing begins to feel…<text:line-break/>that her thoughts are being observed.</text:p>
      <text:p text:style-name="Quotations">Have you ever felt that?</text:p>
      <text:p text:style-name="Horizontal_20_Line"/>
      <text:h text:style-name="Heading_20_1" text:outline-level="1">🧠 REGLA DE ORO</text:h>
      <text:p text:style-name="Text_20_body">Cada post debe:</text:p>
      <text:p text:style-name="Text_20_body">👉 invitar a responder</text:p>
      <text:p text:style-name="Text_20_body">Si no:<text:line-break/>👉 no sirve</text:p>
      <text:p text:style-name="Horizontal_20_Line"/>
      <text:h text:style-name="Heading_20_1" text:outline-level="1">🔄 BUCLE DE MEJORA</text:h>
      <text:p text:style-name="Text_20_body">Cada 3 días:</text:p>
      <text:list xml:id="list3429693687" text:style-name="L12">
        <text:list-item>
          <text:p text:style-name="P12">revisas métricas</text:p>
        </text:list-item>
        <text:list-item>
          <text:p text:style-name="P12">detectas qué funcionó</text:p>
        </text:list-item>
        <text:list-item>
          <text:p text:style-name="P12">repites patrón</text:p>
        </text:list-item>
      </text:list>
      <text:p text:style-name="Horizontal_20_Line"/>
      <text:h text:style-name="Heading_20_1" text:outline-level="1"><text:soft-page-break/>🎯 DIFERENCIA CLAVE CON EL PLAN ANTERIOR</text:h>
      <text:p text:style-name="Text_20_body">Antes:<text:line-break/>❌ “publica y espera”</text:p>
      <text:p text:style-name="Text_20_body">Ahora:<text:line-break/>✔ medir → ajustar → repetir</text:p>
      <text:p text:style-name="Horizontal_20_Line"/>
      <text:h text:style-name="Heading_20_1" text:outline-level="1">🚀 CONCLUSIÓN</text:h>
      <text:list xml:id="list2264844575" text:style-name="L13">
        <text:list-item>
          <text:p text:style-name="P13">✔ Ahora sí tienes un sistema real</text:p>
        </text:list-item>
        <text:list-item>
          <text:p text:style-name="P13">✔ Tiene métricas</text:p>
        </text:list-item>
        <text:list-item>
          <text:p text:style-name="P13">✔ Tiene puntos de control</text:p>
        </text:list-item>
        <text:list-item>
          <text:p text:style-name="P13">✔ Tiene criterios de éxito y fallo</text:p>
        </text:list-item>
      </text:list>
      <text:p text:style-name="Horizontal_20_Line"/>
      <text:h text:style-name="Heading_20_1" text:outline-level="1">👉 SIGUIENTE PASO</text:h>
      <text:p text:style-name="Text_20_body">Si quieres, hacemos esto:</text:p>
      <text:p text:style-name="Text_20_body">👉 te diseño <text:span text:style-name="Strong_20_Emphasis">3 primeros posts EXACTOS para Facebook</text:span><text:line-break/>optimizados para generar respuestas desde el día 1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23T18:02:44.630000000</meta:creation-date>
    <dc:date>2026-04-23T18:04:26.856000000</dc:date>
    <meta:editing-duration>PT1M42S</meta:editing-duration>
    <meta:editing-cycles>1</meta:editing-cycles>
    <meta:document-statistic meta:table-count="0" meta:image-count="0" meta:object-count="0" meta:page-count="5" meta:paragraph-count="89" meta:word-count="450" meta:character-count="2313" meta:non-whitespace-character-count="1988"/>
    <meta:generator>LibreOffice/7.3.5.2$Windows_X86_64 LibreOffice_project/184fe81b8c8c30d8b5082578aee2fed2ea847c01</meta:generator>
  </office:meta>
</office:document-meta>
</file>