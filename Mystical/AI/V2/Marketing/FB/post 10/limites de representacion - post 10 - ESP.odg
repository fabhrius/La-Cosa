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BBF4B517B32796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100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Old English Text MT" fo:font-size="60pt" fo:font-style="normal" fo:text-shadow="none" style:text-underline-style="none" fo:font-weight="normal" style:letter-kerning="true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aebae" loext:opacity="100%" style:font-name="Script MT Bold" fo:font-size="15pt" style:font-size-asian="15pt" style:font-size-complex="15pt"/>
    </style:style>
    <style:style style:name="T9" style:family="text">
      <style:text-properties fo:color="#fde78a" loext:opacity="100%" style:font-name="Script MT Bold" fo:font-size="15pt" style:font-size-asian="15pt" style:font-size-complex="15pt"/>
    </style:style>
    <style:style style:name="T10" style:family="text">
      <style:text-properties fo:font-variant="normal" fo:text-transform="none" fo:color="#faebae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15cm" svg:height="26.265cm" svg:x="1.117cm" svg:y="1.117cm">
          <draw:text-box>
            <text:p text:style-name="P1"><text:span text:style-name="T1">( Omniscientis — Fragmento X </text:span><text:span text:style-name="T2">— El Templo de la Lluvia — Parte IV )</text:span></text:p>
            <text:p text:style-name="P1"><text:span text:style-name="T2"/></text:p>
            <text:p text:style-name="P2"><text:span text:style-name="T3"><text:tab/></text:span><text:span text:style-name="T4"> </text:span><text:span text:style-name="T5">”</text:span><text:span text:style-name="T5">N</text:span><text:span text:style-name="T4">adie</text:span></text:p>
            <text:p text:style-name="P2"><text:span text:style-name="T4"><text:s/></text:span><text:span text:style-name="T4"><text:tab/></text:span><text:span text:style-name="T4"><text:tab/></text:span><text:span text:style-name="T4"><text:tab/></text:span><text:span text:style-name="T4">puede abarcar la forma completa de lo que es.</text:span></text:p>
            <text:p text:style-name="P2"><text:span text:style-name="T4"/></text:p>
            <text:p text:style-name="P1"><text:span text:style-name="T4">Percibir es esculpir.</text:span></text:p>
            <text:p text:style-name="P1"><text:span text:style-name="T4"/></text:p>
            <text:p text:style-name="P1"><text:span text:style-name="T4">Cada visión es apenas un fragmento.</text:span></text:p>
            <text:p text:style-name="P1"><text:span text:style-name="T4"/></text:p>
            <text:p text:style-name="P1"><text:span text:style-name="T4">Toda verdad,</text:span></text:p>
            <text:p text:style-name="P1"><text:span text:style-name="T4">un reflejo sobre aguas oscuras.</text:span></text:p>
            <text:p text:style-name="P1"><text:span text:style-name="T4"/></text:p>
            <text:p text:style-name="P1"><text:span text:style-name="T4">Aquello que los hombres llaman «realidad»</text:span></text:p>
            <text:p text:style-name="P1"><text:span text:style-name="T4">no es más que la forma que su espíritu es capaz de contener.</text:span></text:p>
            <text:p text:style-name="P1"><text:span text:style-name="T4"/></text:p>
            <text:p text:style-name="P2"><text:span text:style-name="T4"><text:tab/></text:span><text:span text:style-name="T4">Así, todos los seres caminan dentro de límites invisibles,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viendo,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in llegar a ver."</text:span><text:span text:style-name="T6"><text:tab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— </text:span><text:span text:style-name="T6">Fabhrius</text:span></text:p>
            <text:p text:style-name="P1"><text:span text:style-name="T6"/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Continuará</text:span><text:span text:style-name="T9">…</text:span></text:p>
            <text:p text:style-name="P1"><text:span text:style-name="T1"><text:tab/></text:span><text:span text:style-name="T1">( De</text:span><text:span text:style-name="T10"> “Omniscientis”, </text:span><text:span text:style-name="T11">el códice perdido de Lluviara 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00" draw:display-name="Bitmap 100" xlink:href="Pictures/100000000000040000000600BBF4B517B327960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3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02T18:19:57.783000000</dc:date>
    <meta:editing-duration>PT3H39M27S</meta:editing-duration>
    <meta:editing-cycles>33</meta:editing-cycles>
    <meta:generator>LibreOffice/7.3.5.2$Windows_X86_64 LibreOffice_project/184fe81b8c8c30d8b5082578aee2fed2ea847c01</meta:generator>
    <meta:document-statistic meta:object-count="1"/>
  </office:meta>
</office:document-meta>
</file>