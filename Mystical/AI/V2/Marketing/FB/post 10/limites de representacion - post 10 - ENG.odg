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600BBF4B517B327960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>
      <style:drawing-page-properties draw:fill="bitmap" draw:fill-image-name="Bitmap_20_100" style:repeat="stretch"/>
    </style:style>
    <style:style style:name="gr1" style:family="graphic" style:parent-style-name="standard">
      <style:graphic-properties draw:stroke="none" svg:stroke-color="#000000" draw:fill="none" draw:fill-color="#ffffff" fo:min-height="26.01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de78a" loext:opacity="100%"/>
    </style:style>
    <style:style style:name="T1" style:family="text">
      <style:text-properties fo:font-variant="normal" fo:text-transform="none" fo:color="#fde78a" loext:opacity="100%" style:text-outline="false" style:text-line-through-style="none" style:text-line-through-type="none" style:font-name="Sans Serif Collectio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de78a" loext:opacity="100%" style:font-name="Sans Serif Collection" fo:font-size="12pt" style:font-size-asian="12pt" style:font-size-complex="12pt"/>
    </style:style>
    <style:style style:name="T3" style:family="text">
      <style:text-properties fo:color="#fde78a" loext:opacity="100%" style:font-name="Old English Text MT" fo:font-size="48pt" style:font-size-asian="48pt" style:font-size-complex="48pt"/>
    </style:style>
    <style:style style:name="T4" style:family="text">
      <style:text-properties fo:color="#fde78a" loext:opacity="100%" style:font-name="EB Garamond" fo:font-size="22pt" style:font-size-asian="22pt" style:font-size-complex="22pt"/>
    </style:style>
    <style:style style:name="T5" style:family="text">
      <style:text-properties fo:color="#fde78a" loext:opacity="100%" style:font-name="Old English Text MT" fo:font-size="60pt" style:font-size-asian="60pt" style:font-size-complex="60pt"/>
    </style:style>
    <style:style style:name="T6" style:family="text">
      <style:text-properties fo:font-variant="normal" fo:text-transform="none" fo:color="#fde78a" loext:opacity="100%" style:text-outline="false" style:text-line-through-style="none" style:text-line-through-type="none" style:font-name="EB Garamond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af1ce" loext:opacity="100%" style:text-outline="false" style:text-line-through-style="none" style:text-line-through-type="none" style:font-name="Cinzel Decorative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EB Garamond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de78a" loext:opacity="100%" style:text-outline="false" style:text-line-through-style="none" style:text-line-through-type="none" style:font-name="Script MT Bol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aebae" loext:opacity="100%" style:font-name="Script MT Bold" fo:font-size="15pt" style:font-size-asian="15pt" style:font-size-complex="15pt"/>
    </style:style>
    <style:style style:name="T10" style:family="text">
      <style:text-properties fo:color="#fde78a" loext:opacity="100%" style:font-name="Script MT Bold" fo:font-size="15pt" style:font-size-asian="15pt" style:font-size-complex="15pt"/>
    </style:style>
    <style:style style:name="T11" style:family="text">
      <style:text-properties fo:color="#faebae" loext:opacity="100%" style:font-name="Sans Serif Collectio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715cm" svg:height="26.265cm" svg:x="1.117cm" svg:y="1.117cm">
          <draw:text-box>
            <text:p text:style-name="P1"><text:span text:style-name="T1">( Omniscientis — Fragment X </text:span><text:span text:style-name="T2">— The Temple of Rain — Part IV )</text:span></text:p>
            <text:p text:style-name="P1"><text:span text:style-name="T2"/></text:p>
            <text:p text:style-name="P1"><text:span text:style-name="T3"><text:tab/></text:span><text:span text:style-name="T4">”</text:span><text:span text:style-name="T5">N</text:span><text:span text:style-name="T6">o mind can carry the whole shape of the world.</text:span></text:p>
            <text:p text:style-name="P1"/>
            <text:p text:style-name="P1"><text:span text:style-name="T6">To perceive</text:span></text:p>
            <text:p text:style-name="P1"><text:span text:style-name="T6">is to carve away.</text:span></text:p>
            <text:p text:style-name="P1"/>
            <text:p text:style-name="P1"><text:span text:style-name="T6">Every vision is a fragment.</text:span></text:p>
            <text:p text:style-name="P1"/>
            <text:p text:style-name="P1"><text:span text:style-name="T6">Every truth,</text:span></text:p>
            <text:p text:style-name="P1"><text:span text:style-name="T6">a reflection upon dark water.</text:span></text:p>
            <text:p text:style-name="P1"/>
            <text:p text:style-name="P1"><text:span text:style-name="T6">What you name “reality”</text:span></text:p>
            <text:p text:style-name="P1"><text:span text:style-name="T6">is only the form your spirit is able to contain.</text:span></text:p>
            <text:p text:style-name="P1"/>
            <text:p text:style-name="P1"><text:span text:style-name="T6">Thus,</text:span></text:p>
            <text:p text:style-name="P1"><text:span text:style-name="T6">all beings walk within invisible boundaries, </text:span></text:p>
            <text:p text:style-name="P1"><text:span text:style-name="T6"/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Seeing,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nd not seeing.”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— </text:span><text:span text:style-name="T7">Fabhrius</text:span></text:p>
            <text:p text:style-name="P1"><text:span text:style-name="T7"/></text:p>
  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To be continued</text:span><text:span text:style-name="T10">…</text:span></text:p>
            <text:p text:style-name="P1"><text:span text:style-name="T1">(From</text:span><text:span text:style-name="T11"> “Omniscientis”, the lost codex of Lluviar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nzel Decorative" svg:font-family="'Cinzel Decorative'" style:font-pitch="variable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00" draw:display-name="Bitmap 100" xlink:href="Pictures/100000000000040000000600BBF4B517B327960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3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31T10:31:01.616000000</dc:date>
    <meta:editing-duration>PT3H26M6S</meta:editing-duration>
    <meta:editing-cycles>30</meta:editing-cycles>
    <meta:generator>LibreOffice/7.3.5.2$Windows_X86_64 LibreOffice_project/184fe81b8c8c30d8b5082578aee2fed2ea847c01</meta:generator>
    <meta:document-statistic meta:object-count="1"/>
  </office:meta>
</office:document-meta>
</file>