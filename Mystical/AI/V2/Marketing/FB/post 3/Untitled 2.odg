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E000000340D9DF33A9D71DB4E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EB Garamond" svg:font-family="'EB Garamond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ans Serif Collection" svg:font-family="'Sans Serif Collection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-4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  <style:text-properties fo:color="#fbf0c5" loext:opacity="100%" style:font-name="EB Garamond" fo:font-size="20pt" style:font-size-asian="20pt" style:font-size-complex="20pt"/>
    </style:style>
    <style:style style:name="T1" style:family="text">
      <style:text-properties fo:color="#fbf0c5" loext:opacity="100%" style:font-name="Sans Serif Collection" fo:font-size="12pt" style:font-size-asian="12pt" style:font-size-complex="12pt"/>
    </style:style>
    <style:style style:name="T2" style:family="text">
      <style:text-properties fo:color="#fbf0c5" loext:opacity="100%" style:font-name="EB Garamond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5.912cm" svg:height="17.273cm" svg:x="1.023cm" svg:y="3.222cm">
          <draw:image xlink:href="Pictures/10000000000004E000000340D9DF33A9D71DB4E8.png" xlink:type="simple" xlink:show="embed" xlink:actuate="onLoad" draw:mime-type="image/png">
            <text:p text:style-name="P1"><text:span text:style-name="T1">( Omniscientis – Fragmento III )</text:span></text:p>
            <text:p text:style-name="P1"><text:span text:style-name="T2"/></text:p>
            <text:p text:style-name="P1"><text:span text:style-name="T2">"Todos despertamos a la vida,</text:span></text:p>
            <text:p text:style-name="P1"><text:span text:style-name="T2">de pronto, como de un sueño.</text:span></text:p>
            <text:p text:style-name="P1"><text:span text:style-name="T2"/></text:p>
            <text:p text:style-name="P1"><text:span text:style-name="T2">Y en medio de la confusión,</text:span></text:p>
            <text:p text:style-name="P1"><text:span text:style-name="T2">sin comprender lo que está ocurriendo…</text:span></text:p>
            <text:p text:style-name="P1"><text:span text:style-name="T2">el tiempo avanza rápidamente.</text:span></text:p>
            <text:p text:style-name="P1"><text:span text:style-name="T2"/></text:p>
            <text:p text:style-name="P1"><text:span text:style-name="T2">Nos vemos obligados a sobrevivir en un entorno hostil,</text:span></text:p>
            <text:p text:style-name="P1"><text:span text:style-name="T2">porque no existe otra opción.</text:span></text:p>
            <text:p text:style-name="P1"><text:span text:style-name="T2"/></text:p>
            <text:p text:style-name="P1"><text:span text:style-name="T2">Y aun sin saber dónde estamos, seguimos avanzando.</text:span></text:p>
            <text:p text:style-name="P1"><text:span text:style-name="T2"/></text:p>
            <text:p text:style-name="P1"><text:span text:style-name="T2">Sin entender realmente lo que hacemos…</text:span></text:p>
            <text:p text:style-name="P1"><text:span text:style-name="T2">ni por qué."</text:span></text:p>
            <text:p text:style-name="P1"><text:span text:style-name="T2"/></text:p>
            <text:p text:style-name="P1"><text:span text:style-name="T1">( de ‘Omniscientis’, el códice perdido de Lluviara )</text:span></text:p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EB Garamond" svg:font-family="'EB Garamond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ans Serif Collection" svg:font-family="'Sans Serif Collection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6-05-10T18:39:13.472000000</meta:creation-date>
    <dc:date>2026-05-11T11:15:37.027000000</dc:date>
    <meta:editing-duration>PT7M46S</meta:editing-duration>
    <meta:editing-cycles>4</meta:editing-cycles>
    <meta:generator>LibreOffice/7.3.5.2$Windows_X86_64 LibreOffice_project/184fe81b8c8c30d8b5082578aee2fed2ea847c01</meta:generator>
    <meta:document-statistic meta:object-count="1"/>
  </office:meta>
</office:document-meta>
</file>