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D9DF33A9D71DB4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color="#fbf0c5" loext:opacity="100%"/>
    </style:style>
    <style:style style:name="P2" style:family="paragraph">
      <style:paragraph-properties fo:text-align="center"/>
      <style:text-properties fo:color="#fbf0c5" loext:opacity="100%" style:font-name="EB Garamond" fo:font-size="20pt" style:font-size-asian="20pt" style:font-size-complex="20pt"/>
    </style:style>
    <style:style style:name="T1" style:family="text">
      <style:text-properties fo:color="#fbf0c5" loext:opacity="100%" style:font-name="Sans Serif Collection" fo:font-size="12pt" style:font-size-asian="12pt" style:font-size-complex="12pt"/>
    </style:style>
    <style:style style:name="T2" style:family="text">
      <style:text-properties fo:color="#fbf0c5" loext:opacity="100%" style:font-name="EB Garamon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12cm" svg:height="17.273cm" svg:x="1.023cm" svg:y="3.222cm">
          <draw:image xlink:href="Pictures/10000000000004E000000340D9DF33A9D71DB4E8.png" xlink:type="simple" xlink:show="embed" xlink:actuate="onLoad" draw:mime-type="image/png">
            <text:p text:style-name="P1"><text:span text:style-name="T1">( Omniscientis – Fragment III )</text:span></text:p>
            <text:p text:style-name="P1"><text:span text:style-name="T2"/></text:p>
            <text:p text:style-name="P1"><text:span text:style-name="T2">"We all awaken to life suddenly, as if emerging from a dream.</text:span></text:p>
            <text:p text:style-name="P1"><text:span text:style-name="T2"/></text:p>
            <text:p text:style-name="P1"><text:span text:style-name="T2">And in the middle of the confusion, without understanding what is happening…</text:span></text:p>
            <text:p text:style-name="P1"><text:span text:style-name="T2">time moves fast.</text:span></text:p>
            <text:p text:style-name="P1"><text:span text:style-name="T2"/></text:p>
            <text:p text:style-name="P1"><text:span text:style-name="T2">We are forced to survive inside a hostile world,</text:span></text:p>
            <text:p text:style-name="P1"><text:span text:style-name="T2">because there is no other option.</text:span></text:p>
            <text:p text:style-name="P1"><text:span text:style-name="T2"/></text:p>
            <text:p text:style-name="P1"><text:span text:style-name="T2">And even without knowing where we are,</text:span></text:p>
            <text:p text:style-name="P1"><text:span text:style-name="T2">we continue forward.</text:span></text:p>
            <text:p text:style-name="P1"><text:span text:style-name="T2"/></text:p>
            <text:p text:style-name="P1"><text:span text:style-name="T2">Not truly understanding what we are doing…</text:span></text:p>
            <text:p text:style-name="P1"><text:span text:style-name="T2">or why."</text:span></text:p>
            <text:p text:style-name="P1"><text:span text:style-name="T2"/></text:p>
            <text:p text:style-name="P1"><text:span text:style-name="T1">( from ‘Omniscientis’, the lost code of Lluviara )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0T18:53:24.767000000</dc:date>
    <meta:editing-duration>PT3M39S</meta:editing-duration>
    <meta:editing-cycles>2</meta:editing-cycles>
    <meta:generator>LibreOffice/7.3.5.2$Windows_X86_64 LibreOffice_project/184fe81b8c8c30d8b5082578aee2fed2ea847c01</meta:generator>
    <meta:document-statistic meta:object-count="1"/>
  </office:meta>
</office:document-meta>
</file>