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Quotations">
      <style:text-properties officeooo:paragraph-rsid="00106977"/>
    </style:style>
    <style:style style:name="P2" style:family="paragraph" style:parent-style-name="Quotations">
      <style:text-properties officeooo:paragraph-rsid="00107a47"/>
    </style:style>
    <style:style style:name="T1" style:family="text">
      <style:text-properties officeooo:rsid="00106977"/>
    </style:style>
    <style:style style:name="T2" style:family="text">
      <style:text-properties officeooo:rsid="00107a47"/>
    </style:style>
    <style:style style:name="T3" style:family="text">
      <style:text-properties officeooo:rsid="00133782"/>
    </style:style>
    <style:style style:name="T4" style:family="text">
      <style:text-properties officeooo:rsid="001358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2"><text:span text:style-name="T3">El</text:span> deseo de encontrar respuestas rápidamente le impedía ver con claridad.</text:p>
      <text:p text:style-name="P2">Había algo inquietante en aquella biblioteca.<text:span text:style-name="T1"> </text:span>Lo <text:span text:style-name="T1">intu</text:span>ía.</text:p>
      <text:p text:style-name="P2">Pero todavía no lograba comprender qué era.</text:p>
      <text:p text:style-name="P2">La biblioteca se extendía en todas direcciones.<text:span text:style-name="T1"> Inmensa</text:span>.<text:span text:style-name="T1"> </text:span>Interminable.</text:p>
      <text:p text:style-name="P2"><text:span text:style-name="T4">Como u</text:span>na promesa de conocimiento sin límites.</text:p>
      <text:p text:style-name="P2">Sin perder un instante, tomó el libro más cercano, lo abrió por la primera página,<text:line-break/>y la primera frase la devolvió bruscamente a la realidad.</text:p>
      <text:p text:style-name="P2">Decía:</text:p>
      <text:p text:style-name="P2"><text:span text:style-name="Emphasis">"No todos los caminos fueron hechos para ser recorridos</text:span><text:span text:style-name="Emphasis"><text:span text:style-name="T2">.</text:span></text:span></text:p>
      <text:p text:style-name="P2">No todas las preguntas fueron hechas para encontrar respuesta.</text:p>
      <text:p text:style-name="P2"><text:span text:style-name="Emphasis">Pues cuando las posibilidades se multiplican,</text:span><text:line-break/><text:span text:style-name="Emphasis">el horizonte se aleja más allá de nuestro alcance.</text:span></text:p>
      <text:p text:style-name="P2"><text:span text:style-name="Emphasis">Así, el buscador se enfrenta a una antigua ley:</text:span></text:p>
      <text:p text:style-name="P2"><text:span text:style-name="Emphasis">El mundo contiene más puertas</text:span><text:line-break/><text:span text:style-name="Emphasis">de las que una vida </text:span><text:span text:style-name="Emphasis"><text:span text:style-name="T1">entera </text:span></text:span><text:span text:style-name="Emphasis">puede abrir."</text:span></text:p>
      <text:p text:style-name="P2">— Fabhriu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p text:style-name="Text_20_body"/>
      <text:p text:style-name="Quotations">Su deseo de encontrar respuestas rápidamente le impedía ver con claridad.</text:p>
      <text:p text:style-name="Quotations"><text:soft-page-break/>Había algo inquietante en aquella biblioteca.<text:span text:style-name="T1"> </text:span></text:p>
      <text:p text:style-name="Quotations">Lo <text:span text:style-name="T1">intu</text:span>ía.</text:p>
      <text:p text:style-name="Quotations">Pero todavía no lograba comprender qué era.</text:p>
      <text:p text:style-name="P1">La biblioteca se extendía en todas direcciones.<text:span text:style-name="T1"> Inmensa</text:span>.<text:span text:style-name="T1"> </text:span>Interminable.</text:p>
      <text:p text:style-name="P1">Una promesa de conocimiento sin límites.</text:p>
      <text:p text:style-name="Quotations">Sin perder un instante, tomó el libro más cercano, lo abrió por la primera página,<text:line-break/>y la primera frase la devolvió bruscamente a la realidad.</text:p>
      <text:p text:style-name="Quotations">Decía:</text:p>
      <text:p text:style-name="P1"><text:span text:style-name="Emphasis">"No todos los caminos pueden recorrerse.</text:span></text:p>
      <text:p text:style-name="P1"><text:span text:style-name="Emphasis">No todas las preguntas pueden perseguirse.</text:span></text:p>
      <text:p text:style-name="Quotations"><text:span text:style-name="Emphasis">A medida que las posibilidades se multiplican,</text:span><text:line-break/><text:span text:style-name="Emphasis">el horizonte se aleja más allá de nuestro alcance.</text:span></text:p>
      <text:p text:style-name="Quotations"><text:span text:style-name="Emphasis">Así, el buscador se enfrenta a una antigua ley:</text:span></text:p>
      <text:p text:style-name="P1"><text:span text:style-name="Emphasis">El mundo contiene más puertas</text:span><text:line-break/><text:span text:style-name="Emphasis">de las que</text:span><text:span text:style-name="Emphasis"><text:span text:style-name="T1"> </text:span></text:span><text:span text:style-name="Emphasis">puede abrir una vida </text:span><text:span text:style-name="Emphasis"><text:span text:style-name="T1">entera</text:span></text:span><text:span text:style-name="Emphasis">."</text:span></text:p>
      <text:p text:style-name="Quotations">— Fabhrius</text:p>
      <text:p text:style-name="Text_20_body"/>
      <text:p text:style-name="Text_20_body"/>
      <text:p text:style-name="Horizontal_20_Line"/>
      <text:p text:style-name="Text_20_body"/>
      <text:p text:style-name="Quotations">Her desire to find answers quickly prevented her from seeing clearly.</text:p>
      <text:p text:style-name="Quotations">There was something unsettling about that library.</text:p>
      <text:p text:style-name="Quotations">She could feel it.</text:p>
      <text:p text:style-name="Quotations">But she still could not understand what it was.</text:p>
      <text:p text:style-name="Quotations">The library stretched in every direction.</text:p>
      <text:p text:style-name="Quotations">Vast.</text:p>
      <text:p text:style-name="Quotations">Endless.</text:p>
      <text:p text:style-name="Quotations"><text:soft-page-break/>A promise of limitless knowledge.</text:p>
      <text:p text:style-name="Quotations">Without wasting a moment, she took the nearest book, opened it to the first page,<text:line-break/>and the very first sentence brought her abruptly back to reality.</text:p>
      <text:p text:style-name="Quotations">It read:</text:p>
      <text:p text:style-name="Quotations"><text:span text:style-name="Emphasis">"Not all paths can be walked.</text:span></text:p>
      <text:p text:style-name="Quotations"><text:span text:style-name="Emphasis">Not all questions can be pursued.</text:span></text:p>
      <text:p text:style-name="Quotations"><text:span text:style-name="Emphasis">For as possibilities multiply,</text:span><text:line-break/><text:span text:style-name="Emphasis">the horizon retreats beyond reach.</text:span></text:p>
      <text:p text:style-name="Quotations"><text:span text:style-name="Emphasis">Thus the seeker faces an ancient law:</text:span></text:p>
      <text:p text:style-name="Quotations"><text:span text:style-name="Emphasis">The world contains more doors</text:span><text:line-break/><text:span text:style-name="Emphasis">than any lifetime can open."</text:span></text:p>
      <text:p text:style-name="Quotations">— Fabhrius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>Su deseo de encontrar respuestas rápidamente le impedía ver con claridad.</text:p>
      <text:p text:style-name="Text_20_body">Había algo inquietante en aquella biblioteca.</text:p>
      <text:p text:style-name="Text_20_body">Lo intuía.</text:p>
      <text:p text:style-name="Text_20_body">Pero todavía no lograba comprender qué era.</text:p>
      <text:p text:style-name="Text_20_body">La biblioteca se extendía en todas direcciones.</text:p>
      <text:p text:style-name="Text_20_body">Inmensa.</text:p>
      <text:p text:style-name="Text_20_body">Interminable.</text:p>
      <text:p text:style-name="Text_20_body">Una promesa de conocimiento ilimitado.</text:p>
      <text:p text:style-name="Text_20_body">Sin perder tiempo, tomó el libro más cercano, lo abrió por la primera página,<text:line-break/>y la primera frase la devolvió de golpe a la realidad.</text:p>
      <text:p text:style-name="Text_20_body">Decía:</text:p>
      <text:p text:style-name="Text_20_body"><text:soft-page-break/><text:span text:style-name="Emphasis">"Not all paths can be walked.</text:span></text:p>
      <text:p text:style-name="Text_20_body"><text:span text:style-name="Emphasis">Not all questions can be pursued.</text:span></text:p>
      <text:p text:style-name="Text_20_body"><text:span text:style-name="Emphasis">For as possibilities multiply,</text:span><text:line-break/><text:span text:style-name="Emphasis">the horizon retreats beyond reach.</text:span></text:p>
      <text:p text:style-name="Text_20_body"><text:span text:style-name="Emphasis">Thus the seeker faces an ancient law:</text:span></text:p>
      <text:p text:style-name="Text_20_body"><text:span text:style-name="Emphasis">The world contains more doors</text:span><text:line-break/><text:span text:style-name="Emphasis">than any lifetime can open."</text:span></text:p>
      <text:p text:style-name="Text_20_body">— Fabhrius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7T10:21:47.357000000</meta:creation-date>
    <dc:date>2026-06-19T09:52:20.663000000</dc:date>
    <meta:editing-duration>PT25M52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59" meta:word-count="458" meta:character-count="2813" meta:non-whitespace-character-count="2409"/>
  </office:meta>
</office:document-meta>
</file>