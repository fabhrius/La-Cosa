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style:text-properties officeooo:paragraph-rsid="00106977"/>
    </style:style>
    <style:style style:name="T1" style:family="text">
      <style:text-properties officeooo:rsid="00106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Quotations">Su deseo de encontrar respuestas rápidamente le impedía ver con claridad.</text:p>
      <text:p text:style-name="Quotations">Había algo inquietante en aquella biblioteca.<text:span text:style-name="T1"> </text:span></text:p>
      <text:p text:style-name="Quotations">Lo <text:span text:style-name="T1">intu</text:span>ía.</text:p>
      <text:p text:style-name="Quotations">Pero todavía no lograba comprender qué era.</text:p>
      <text:p text:style-name="P1">La biblioteca se extendía en todas direcciones.<text:span text:style-name="T1"> Inmensa</text:span>.<text:span text:style-name="T1"> </text:span>Interminable.</text:p>
      <text:p text:style-name="P1">Una promesa de conocimiento sin límites.</text:p>
      <text:p text:style-name="Quotations">Sin perder un instante, tomó el libro más cercano, lo abrió por la primera página,<text:line-break/>y la primera frase la devolvió bruscamente a la realidad.</text:p>
      <text:p text:style-name="Quotations">Decía:</text:p>
      <text:p text:style-name="P1"><text:span text:style-name="Emphasis">"No todos los caminos pueden recorrerse.</text:span></text:p>
      <text:p text:style-name="P1"><text:span text:style-name="Emphasis">No todas las preguntas pueden perseguirse.</text:span></text:p>
      <text:p text:style-name="Quotations"><text:span text:style-name="Emphasis">A medida que las posibilidades se multiplican,</text:span><text:line-break/><text:span text:style-name="Emphasis">el horizonte se aleja más allá de nuestro alcance.</text:span></text:p>
      <text:p text:style-name="Quotations"><text:span text:style-name="Emphasis">Así, el buscador se enfrenta a una antigua ley:</text:span></text:p>
      <text:p text:style-name="P1"><text:span text:style-name="Emphasis">El mundo contiene más puertas</text:span><text:line-break/><text:span text:style-name="Emphasis">de las que</text:span><text:span text:style-name="Emphasis"><text:span text:style-name="T1"> </text:span></text:span><text:span text:style-name="Emphasis">puede abrir una vida </text:span><text:span text:style-name="Emphasis"><text:span text:style-name="T1">entera</text:span></text:span><text:span text:style-name="Emphasis">."</text:span></text:p>
      <text:p text:style-name="Quotations">— Fabhrius</text:p>
      <text:p text:style-name="Text_20_body"/>
      <text:p text:style-name="Text_20_body"/>
      <text:p text:style-name="Horizontal_20_Line"/>
      <text:p text:style-name="Text_20_body"/>
      <text:p text:style-name="Quotations">Her desire to find answers quickly prevented her from seeing clearly.</text:p>
      <text:p text:style-name="Quotations">There was something unsettling about that library.</text:p>
      <text:p text:style-name="Quotations">She could feel it.</text:p>
      <text:p text:style-name="Quotations">But she still could not understand what it was.</text:p>
      <text:p text:style-name="Quotations"><text:soft-page-break/>The library stretched in every direction.</text:p>
      <text:p text:style-name="Quotations">Vast.</text:p>
      <text:p text:style-name="Quotations">Endless.</text:p>
      <text:p text:style-name="Quotations">A promise of limitless knowledge.</text:p>
      <text:p text:style-name="Quotations">Without wasting a moment, she took the nearest book, opened it to the first page,<text:line-break/>and the very first sentence brought her abruptly back to reality.</text:p>
      <text:p text:style-name="Quotations">It read:</text:p>
      <text:p text:style-name="Quotations"><text:span text:style-name="Emphasis">"Not all paths can be walked.</text:span></text:p>
      <text:p text:style-name="Quotations"><text:span text:style-name="Emphasis">Not all questions can be pursued.</text:span></text:p>
      <text:p text:style-name="Quotations"><text:span text:style-name="Emphasis">For as possibilities multiply,</text:span><text:line-break/><text:span text:style-name="Emphasis">the horizon retreats beyond reach.</text:span></text:p>
      <text:p text:style-name="Quotations"><text:span text:style-name="Emphasis">Thus the seeker faces an ancient law:</text:span></text:p>
      <text:p text:style-name="Quotations"><text:span text:style-name="Emphasis">The world contains more doors</text:span><text:line-break/><text:span text:style-name="Emphasis">than any lifetime can open."</text:span></text:p>
      <text:p text:style-name="Quotations">— Fabhrius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>Su deseo de encontrar respuestas rápidamente le impedía ver con claridad.</text:p>
      <text:p text:style-name="Text_20_body">Había algo inquietante en aquella biblioteca.</text:p>
      <text:p text:style-name="Text_20_body">Lo intuía.</text:p>
      <text:p text:style-name="Text_20_body">Pero todavía no lograba comprender qué era.</text:p>
      <text:p text:style-name="Text_20_body">La biblioteca se extendía en todas direcciones.</text:p>
      <text:p text:style-name="Text_20_body">Inmensa.</text:p>
      <text:p text:style-name="Text_20_body">Interminable.</text:p>
      <text:p text:style-name="Text_20_body"><text:soft-page-break/>Una promesa de conocimiento ilimitado.</text:p>
      <text:p text:style-name="Text_20_body">Sin perder tiempo, tomó el libro más cercano, lo abrió por la primera página,<text:line-break/>y la primera frase la devolvió de golpe a la realidad.</text:p>
      <text:p text:style-name="Text_20_body">Decía:</text:p>
      <text:p text:style-name="Text_20_body"><text:span text:style-name="Emphasis">"Not all paths can be walked.</text:span></text:p>
      <text:p text:style-name="Text_20_body"><text:span text:style-name="Emphasis">Not all questions can be pursued.</text:span></text:p>
      <text:p text:style-name="Text_20_body"><text:span text:style-name="Emphasis">For as possibilities multiply,</text:span><text:line-break/><text:span text:style-name="Emphasis">the horizon retreats beyond reach.</text:span></text:p>
      <text:p text:style-name="Text_20_body"><text:span text:style-name="Emphasis">Thus the seeker faces an ancient law:</text:span></text:p>
      <text:p text:style-name="Text_20_body"><text:span text:style-name="Emphasis">The world contains more doors</text:span><text:line-break/><text:span text:style-name="Emphasis">than any lifetime can open."</text:span></text:p>
      <text:p text:style-name="Text_20_body">— Fabhriu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7T10:21:47.357000000</meta:creation-date>
    <dc:date>2026-06-17T10:30:42.893000000</dc:date>
    <meta:editing-duration>PT8M56S</meta:editing-duration>
    <meta:editing-cycles>1</meta:editing-cycles>
    <meta:document-statistic meta:table-count="0" meta:image-count="0" meta:object-count="0" meta:page-count="3" meta:paragraph-count="46" meta:word-count="334" meta:character-count="2039" meta:non-whitespace-character-count="1747"/>
    <meta:generator>LibreOffice/7.3.5.2$Windows_X86_64 LibreOffice_project/184fe81b8c8c30d8b5082578aee2fed2ea847c01</meta:generator>
  </office:meta>
</office:document-meta>
</file>