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6000B576C0F8EAB096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inzel Decorative" svg:font-family="'Cinzel Decorative'" style:font-pitch="variable"/>
    <style:font-face style:name="EB Garamond" svg:font-family="'EB Garamond'" style:font-pitch="variable"/>
    <style:font-face style:name="F" svg:font-family="" style:font-family-generic="roman"/>
    <style:font-face style:name="Great Vibes" svg:font-family="'Great Vibe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ans4" svg:font-family="'Liberation Sans'" style:font-family-generic="script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 style:font-pitch="variable"/>
    <style:font-face style:name="Lucida Sans3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ld English Text MT" svg:font-family="'Old English Text MT'" style:font-family-generic="script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family-generic="roma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</office:font-face-decls>
  <office:automatic-styles>
    <style:style style:name="dp1" style:family="drawing-page">
      <style:drawing-page-properties draw:fill="bitmap" draw:fill-image-name="Bitmap_20_100" style:repeat="stretch"/>
    </style:style>
    <style:style style:name="gr1" style:family="graphic" style:parent-style-name="standard">
      <style:graphic-properties draw:stroke="none" svg:stroke-color="#000000" draw:fill="none" draw:fill-color="#ffffff" fo:min-height="26.13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de78a" loext:opacity="100%"/>
    </style:style>
    <style:style style:name="T1" style:family="text">
      <style:text-properties fo:font-variant="normal" fo:text-transform="none" fo:color="#fde78a" loext:opacity="100%" style:text-outline="false" style:text-line-through-style="none" style:text-line-through-type="none" style:font-name="Sans Serif Collection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de78a" loext:opacity="100%" style:font-name="Sans Serif Collection" fo:font-size="12pt" style:font-size-asian="12pt" style:font-size-complex="12pt"/>
    </style:style>
    <style:style style:name="T3" style:family="text">
      <style:text-properties fo:color="#fde78a" loext:opacity="100%" style:font-name="EB Garamond" fo:font-size="22pt" style:font-size-asian="22pt" style:font-size-complex="22pt"/>
    </style:style>
    <style:style style:name="T4" style:family="text">
      <style:text-properties fo:color="#fde78a" loext:opacity="100%" style:font-name="Old English Text MT" fo:font-size="60pt" style:font-size-asian="60pt" style:font-size-complex="60pt"/>
    </style:style>
    <style:style style:name="T5" style:family="text">
      <style:text-properties fo:font-variant="normal" fo:text-transform="none" fo:color="#fde78a" loext:opacity="100%" style:text-outline="false" style:text-line-through-style="none" style:text-line-through-type="none" style:font-name="EB Garamond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de78a" loext:opacity="100%" style:text-outline="false" style:text-line-through-style="none" style:text-line-through-type="none" style:font-name="EB Garamond" fo:font-size="22pt" fo:font-style="italic" fo:text-shadow="none" style:text-underline-style="none" fo:font-weight="bold" style:letter-kerning="true" style:font-name-asian="Microsoft YaHei" style:font-size-asian="22pt" style:font-style-asian="italic" style:font-weight-asian="bold" style:font-name-complex="Lucida Sans" style:font-size-complex="22pt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de78a" loext:opacity="100%" style:text-outline="false" style:text-line-through-style="none" style:text-line-through-type="none" style:font-name="Cinzel Decorative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de78a" loext:opacity="100%" style:text-outline="false" style:text-line-through-style="none" style:text-line-through-type="none" style:font-name="Script MT Bold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aebae" loext:opacity="100%" style:font-name="Script MT Bold" fo:font-size="15pt" style:font-size-asian="15pt" style:font-size-complex="15pt"/>
    </style:style>
    <style:style style:name="T10" style:family="text">
      <style:text-properties fo:color="#fde78a" loext:opacity="100%" style:font-name="Script MT Bold" fo:font-size="15pt" style:font-size-asian="15pt" style:font-size-complex="15pt"/>
    </style:style>
    <style:style style:name="T11" style:family="text">
      <style:text-properties fo:color="#faebae" loext:opacity="100%" style:font-name="Sans Serif Collectio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5" draw:layer="layout" svg:width="19cm" svg:height="26.38cm" svg:x="1cm" svg:y="0.917cm">
          <draw:text-box>
            <text:p text:style-name="P1"><text:span text:style-name="T1">( Omniscientis — Fragment XIV </text:span><text:span text:style-name="T2">— The Temple of Rain — Part VIII )</text:span></text:p>
            <text:p text:style-name="P2"><text:span text:style-name="T3"><text:tab/></text:span><text:span text:style-name="T4">H</text:span><text:span text:style-name="T5">er desire to find answers quickly </text:span></text:p>
            <text:p text:style-name="P2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prevented her from seeing clearly.</text:span></text:p>
            <text:p><text:span text:style-name="T5">There was something unsettling about that library. She could feel it. But she still could not understand what it was.</text:span></text:p>
            <text:p><text:span text:style-name="T5">The library stretched in every direction. Vast. Endless.</text:span></text:p>
            <text:p text:style-name="P3"><text:span text:style-name="T5">A promise of limitless knowledge.</text:span></text:p>
            <text:p text:style-name="P4"><text:span text:style-name="T5">Without wasting a moment, she took the nearest book, </text:span></text:p>
            <text:p text:style-name="P4"><text:span text:style-name="T5">opened it to the first page, </text:span></text:p>
            <text:p text:style-name="P4"><text:span text:style-name="T5">and the very first sentence brought her abruptly back to reality.</text:span></text:p>
            <text:p><text:span text:style-name="T5">It read:</text:span></text:p>
            <text:p text:style-name="P3"><text:span text:style-name="T6">"Not all paths can be walked.</text:span></text:p>
            <text:p text:style-name="P3"><text:span text:style-name="T6">Not all questions can be pursued.</text:span></text:p>
            <text:p text:style-name="P3"/>
            <text:p text:style-name="P3"><text:span text:style-name="T6">For as possibilities multiply,</text:span><text:span text:style-name="T6"><text:line-break/></text:span><text:span text:style-name="T6">the horizon retreats beyond reach.</text:span></text:p>
            <text:p text:style-name="P3"/>
            <text:p text:style-name="P3"><text:span text:style-name="T6">Thus the seeker faces an ancient law:</text:span></text:p>
            <text:p text:style-name="P3"/>
            <text:p text:style-name="P3"><text:span text:style-name="T6">The world contains more doors</text:span><text:span text:style-name="T6"><text:line-break/></text:span><text:span text:style-name="T6">than any lifetime can open."</text:span></text:p>
            <text:p text:style-name="P3"><text:span text:style-name="T6"/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7">— </text:span><text:span text:style-name="T7">Fabhrius.</text:span></text:p>
            <text:p text:style-name="P1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/text:p>
            <text:p text:style-name="P2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To be continued</text:span><text:span text:style-name="T10">…</text:span></text:p>
            <text:p text:style-name="P1"><text:span text:style-name="T1">(From</text:span><text:span text:style-name="T11"> “Omniscientis”, the lost codex of Lluviara</text:span><text:span text:style-name="T2">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inzel Decorative" svg:font-family="'Cinzel Decorative'" style:font-pitch="variable"/>
    <style:font-face style:name="EB Garamond" svg:font-family="'EB Garamond'" style:font-pitch="variable"/>
    <style:font-face style:name="F" svg:font-family="" style:font-family-generic="roman"/>
    <style:font-face style:name="Great Vibes" svg:font-family="'Great Vibe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ans4" svg:font-family="'Liberation Sans'" style:font-family-generic="script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 style:font-pitch="variable"/>
    <style:font-face style:name="Lucida Sans3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ld English Text MT" svg:font-family="'Old English Text MT'" style:font-family-generic="script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family-generic="roma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00" draw:display-name="Bitmap 100" xlink:href="Pictures/1000000000000400000006000B576C0F8EAB096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" style:font-family-asian="'Segoe UI'" style:font-family-generic-asian="roman" style:font-pitch-asian="variable" style:font-size-asian="12pt" style:language-asian="zh" style:country-asian="CN" style:font-name-complex="Lucida Sans1" style:font-family-complex="'Lucida Sans'" style:font-pitch-complex="variable" style:font-size-complex="12pt" style:language-complex="hi" style:country-complex="IN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ucida Sans3" style:font-family-complex="'Lucida Sans'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3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3" style:font-family-complex="'Lucida Sans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6-06-18T11:07:42.549000000</dc:date>
    <meta:editing-duration>PT5H2M50S</meta:editing-duration>
    <meta:editing-cycles>46</meta:editing-cycles>
    <meta:generator>LibreOffice/7.3.5.2$Windows_X86_64 LibreOffice_project/184fe81b8c8c30d8b5082578aee2fed2ea847c01</meta:generator>
    <meta:document-statistic meta:object-count="1"/>
  </office:meta>
</office:document-meta>
</file>