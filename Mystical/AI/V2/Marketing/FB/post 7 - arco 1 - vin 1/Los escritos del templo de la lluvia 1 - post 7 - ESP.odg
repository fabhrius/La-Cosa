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3C17273E857FD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-14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7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4pt" style:font-size-asian="24pt" style:font-size-complex="24pt"/>
    </style:style>
    <style:style style:name="T4" style:family="text">
      <style:text-properties fo:color="#fde78a" loext:opacity="100%" style:font-name="Script MT Bold" fo:font-size="15pt" style:font-size-asian="15pt" style:font-size-complex="15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aebae" loext:opacity="100%" style:font-name="Script MT Bold" fo:font-size="15pt" style:font-size-asian="15pt" style:font-size-complex="15pt"/>
    </style:style>
    <style:style style:name="T7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7.292cm" svg:x="1cm" svg:y="1.006cm">
          <draw:image xlink:href="Pictures/10000000000004E0000003403C17273E857FD80A.jpg" xlink:type="simple" xlink:show="embed" xlink:actuate="onLoad" draw:mime-type="image/jpeg">
            <text:p/>
          </draw:image>
        </draw:frame>
        <draw:frame draw:style-name="gr2" draw:text-style-name="P4" draw:layer="layout" svg:width="25.4cm" svg:height="17.025cm" svg:x="1.317cm" svg:y="1.317cm">
          <draw:text-box>
            <text:p text:style-name="P2"><text:span text:style-name="T1">( Omniscientis — Fragmento VII </text:span><text:span text:style-name="T2">— El Templo de la Lluvia — Parte I )</text:span></text:p>
            <text:p text:style-name="P3"><text:span text:style-name="T3">Nadie recordaba quién construyó el Templo de la Lluvia.</text:span></text:p>
            <text:p text:style-name="P3"><text:span text:style-name="T3">La aldea existía alrededor de él…</text:span></text:p>
            <text:p text:style-name="P3"><text:span text:style-name="T3"><text:tab/></text:span><text:span text:style-name="T3"><text:tab/></text:span><text:span text:style-name="T3"><text:tab/></text:span><text:span text:style-name="T3">como si el templo hubiese estado allí antes que los hombres.</text:span></text:p>
            <text:p text:style-name="P3"><text:span text:style-name="T3">Los ancianos hablaban de una civilización desaparecida.</text:span></text:p>
            <text:p text:style-name="P3"><text:span text:style-name="T3">Un pueblo que encontró respuestas </text:span></text:p>
            <text:p text:style-name="P2"><text:span text:style-name="T3">acerca de la verdadera naturaleza de la existencia.</text:span></text:p>
            <text:p text:style-name="P3"><text:span text:style-name="T3">Algunos afirmaban que bajo la piedra dormían antiguos escritos ocultos.</text:span></text:p>
            <text:p text:style-name="P3"><text:span text:style-name="T3">Textos capaces de cambiar la forma en que las personas perciben la realidad.</text:span></text:p>
            <text:p text:style-name="P2"><text:span text:style-name="T3">Pero nadie descendía a las profundidades del templo.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adie…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xcepto el sacerdote,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Khrom.</text:span></text:p>
            <text:p text:style-name="P3"><text:span text:style-name="T4"><text:tab/>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inuará</text:span><text:span text:style-name="T4">…</text:span></text:p>
            <text:p text:style-name="P2"><text:span text:style-name="T1">(</text:span><text:span text:style-name="T7">De “Omniscientis”, el códice perdido de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4T11:11:47.224000000</dc:date>
    <meta:editing-duration>PT46M50S</meta:editing-duration>
    <meta:editing-cycles>9</meta:editing-cycles>
    <meta:generator>LibreOffice/7.3.5.2$Windows_X86_64 LibreOffice_project/184fe81b8c8c30d8b5082578aee2fed2ea847c01</meta:generator>
    <meta:document-statistic meta:object-count="2"/>
  </office:meta>
</office:document-meta>
</file>