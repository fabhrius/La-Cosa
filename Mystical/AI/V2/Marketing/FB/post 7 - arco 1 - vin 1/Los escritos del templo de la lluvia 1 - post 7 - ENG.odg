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0000003403C17273E857FD80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5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6.32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EB Garamond" fo:font-size="24pt" style:font-size-asian="24pt" style:font-size-complex="24pt"/>
    </style:style>
    <style:style style:name="T4" style:family="text">
      <style:text-properties fo:color="#fde78a" loext:opacity="100%" style:font-name="Script MT Bol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7.292cm" svg:x="1cm" svg:y="1.006cm">
          <draw:image xlink:href="Pictures/10000000000004E0000003403C17273E857FD80A.jpg" xlink:type="simple" xlink:show="embed" xlink:actuate="onLoad" draw:mime-type="image/jpeg">
            <text:p/>
          </draw:image>
        </draw:frame>
        <draw:frame draw:style-name="gr2" draw:text-style-name="P4" draw:layer="layout" svg:width="25.4cm" svg:height="17.495cm" svg:x="1.317cm" svg:y="1.017cm">
          <draw:text-box>
            <text:p text:style-name="P2"><text:span text:style-name="T1">( Omniscientis — Fragment VI I <text:s/></text:span><text:span text:style-name="T2">— The Temple of Rain — Part I)</text:span></text:p>
            <text:p text:style-name="P3"><text:span text:style-name="T3">No one remembered who built the Temple of Rain.</text:span></text:p>
            <text:p text:style-name="P3"><text:span text:style-name="T3">The village existed around it…</text:span></text:p>
            <text:p text:style-name="P3"><text:span text:style-name="T3"><text:tab/></text:span><text:span text:style-name="T3"><text:tab/></text:span><text:span text:style-name="T3"><text:tab/></text:span><text:span text:style-name="T3">as if the temple had stood there before men themselves.</text:span></text:p>
            <text:p text:style-name="P3"><text:span text:style-name="T3">The elders spoke of a vanished civilization.</text:span></text:p>
            <text:p text:style-name="P3"><text:span text:style-name="T3">A people who discovered answers 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bout the true nature of existence.</text:span></text:p>
            <text:p text:style-name="P3"><text:span text:style-name="T3">Some claimed that beneath the stone, ancient hidden writings still slept.</text:span></text:p>
            <text:p text:style-name="P3"><text:span text:style-name="T3">Texts capable of changing the way people perceive reality.</text:span></text:p>
            <text:p text:style-name="P3"><text:span text:style-name="T3"/></text:p>
            <text:p text:style-name="P2"><text:span text:style-name="T3">But no one descended into the depths of the temple.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No one…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xcept the priest,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Khrom.</text:span><text:span text:style-name="T4"><text:tab/></text:span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o be continued…</text:span></text:p>
            <text:p text:style-name="P2"><text:span text:style-name="T2">(From “Omniscientis”, the lost codex of Lluviara)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23T18:23:00.645000000</dc:date>
    <meta:editing-duration>PT54M11S</meta:editing-duration>
    <meta:editing-cycles>6</meta:editing-cycles>
    <meta:generator>LibreOffice/7.3.5.2$Windows_X86_64 LibreOffice_project/184fe81b8c8c30d8b5082578aee2fed2ea847c01</meta:generator>
    <meta:document-statistic meta:object-count="2"/>
  </office:meta>
</office:document-meta>
</file>