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.<text:line-break/>Y creo que esto es extremadamente importante para que el proyecto mantenga calidad consistente.</text:p>
      <text:p text:style-name="Text_20_body">Porque lo que estás creando ya no son simples posts.</text:p>
      <text:p text:style-name="Text_20_body">Son:</text:p>
      <text:list xml:id="list2702782006" text:style-name="L1">
        <text:list-item>
          <text:p text:style-name="P1">micro-capítulos,</text:p>
        </text:list-item>
        <text:list-item>
          <text:p text:style-name="P1">fragmentos narrativos,</text:p>
        </text:list-item>
        <text:list-item>
          <text:p text:style-name="P1">unidades de inmersión.</text:p>
        </text:list-item>
      </text:list>
      <text:p text:style-name="Text_20_body">Y cuando una viñeta funciona bien, normalmente contiene varios elementos simultáneamente.</text:p>
      <text:p text:style-name="Text_20_body">Lo que acabamos de descubrir con la viñeta 3 es justamente eso:<text:line-break/>la atmósfera sola no basta.</text:p>
      <text:p text:style-name="Text_20_body">La viñeta necesita:</text:p>
      <text:list xml:id="list1749503992" text:style-name="L2">
        <text:list-item>
          <text:p text:style-name="P2">avance,</text:p>
        </text:list-item>
        <text:list-item>
          <text:p text:style-name="P2">revelación,</text:p>
        </text:list-item>
        <text:list-item>
          <text:p text:style-name="P2">tensión,</text:p>
        </text:list-item>
        <text:list-item>
          <text:p text:style-name="P2">y recompensa emocional o intelectual.</text:p>
        </text:list-item>
      </text:list>
      <text:p text:style-name="Horizontal_20_Line"/>
      <text:h text:style-name="Heading_20_1" text:outline-level="1">Plantilla base para una viñeta de Omniscientis</text:h>
      <text:p text:style-name="Text_20_body">Creo que casi todas las viñetas fuertes que has creado contienen estos componentes:</text:p>
      <text:p text:style-name="Horizontal_20_Line"/>
      <text:h text:style-name="Heading_20_1" text:outline-level="1">1. Apertura atmosférica</text:h>
      <text:p text:style-name="Text_20_body">El lector debe entrar inmediatamente en:</text:p>
      <text:list xml:id="list2349449709" text:style-name="L3">
        <text:list-item>
          <text:p text:style-name="P3">un lugar,</text:p>
        </text:list-item>
        <text:list-item>
          <text:p text:style-name="P3">una sensación,</text:p>
        </text:list-item>
        <text:list-item>
          <text:p text:style-name="P3">o un estado emocional.</text:p>
        </text:list-item>
      </text:list>
      <text:p text:style-name="Text_20_body">Ejemplos:</text:p>
      <text:list xml:id="list427058082" text:style-name="L4">
        <text:list-item>
          <text:p text:style-name="P4">tormenta</text:p>
        </text:list-item>
        <text:list-item>
          <text:p text:style-name="P4">fuego</text:p>
        </text:list-item>
        <text:list-item>
          <text:p text:style-name="P4">ruinas</text:p>
        </text:list-item>
        <text:list-item>
          <text:p text:style-name="P4"><text:soft-page-break/>lluvia</text:p>
        </text:list-item>
        <text:list-item>
          <text:p text:style-name="P4">oscuridad</text:p>
        </text:list-item>
        <text:list-item>
          <text:p text:style-name="P4">silencio</text:p>
        </text:list-item>
      </text:list>
      <text:p text:style-name="Text_20_body">Objetivo:<text:line-break/>crear inmersión instantánea.</text:p>
      <text:p text:style-name="Horizontal_20_Line"/>
      <text:h text:style-name="Heading_20_1" text:outline-level="1">2. Movimiento narrativo</text:h>
      <text:p text:style-name="Text_20_body">Algo debe cambiar.</text:p>
      <text:p text:style-name="Text_20_body">Por ejemplo:</text:p>
      <text:list xml:id="list2670901447" text:style-name="L5">
        <text:list-item>
          <text:p text:style-name="P5">aparece una pregunta,</text:p>
        </text:list-item>
        <text:list-item>
          <text:p text:style-name="P5">alguien desciende,</text:p>
        </text:list-item>
        <text:list-item>
          <text:p text:style-name="P5">un manuscrito es descubierto,</text:p>
        </text:list-item>
        <text:list-item>
          <text:p text:style-name="P5">una idea cambia la percepción,</text:p>
        </text:list-item>
        <text:list-item>
          <text:p text:style-name="P5">un personaje toma una decisión.</text:p>
        </text:list-item>
      </text:list>
      <text:p text:style-name="Text_20_body">Sin movimiento,<text:line-break/>la viñeta se siente estática.</text:p>
      <text:p text:style-name="Horizontal_20_Line"/>
      <text:h text:style-name="Heading_20_1" text:outline-level="1">3. Revelación o promesa de revelación</text:h>
      <text:p text:style-name="Text_20_body">Este parece ser el núcleo más importante de tu proyecto.</text:p>
      <text:p text:style-name="Text_20_body">Cada viñeta debe contener al menos uno de estos:</text:p>
      <text:h text:style-name="Heading_20_3" text:outline-level="3">A) Una revelación filosófica</text:h>
      <text:p text:style-name="Text_20_body">Ejemplo:</text:p>
      <text:p text:style-name="Quotations">“Las personas no perciben la realidad tal como es…”</text:p>
      <text:h text:style-name="Heading_20_3" text:outline-level="3">B) Una revelación del mundo</text:h>
      <text:p text:style-name="Text_20_body">Ejemplo:</text:p>
      <text:p text:style-name="Quotations">“Bajo el templo existe una biblioteca secreta.”</text:p>
      <text:h text:style-name="Heading_20_3" text:outline-level="3"><text:soft-page-break/>C) Una promesa de conocimiento</text:h>
      <text:p text:style-name="Text_20_body">Ejemplo:</text:p>
      <text:p text:style-name="Quotations">“Khrom estaba a punto de mostrarle algo oculto durante siglos.”</text:p>
      <text:p text:style-name="Text_20_body">Esto es lo que alimenta la curiosidad de la audiencia.</text:p>
      <text:p text:style-name="Horizontal_20_Line"/>
      <text:h text:style-name="Heading_20_1" text:outline-level="1">4. Una imagen mental poderosa</text:h>
      <text:p text:style-name="Text_20_body">Cada viñeta necesita al menos:</text:p>
      <text:list xml:id="list1714779721" text:style-name="L6">
        <text:list-item>
          <text:p text:style-name="P6">una imagen memorable,</text:p>
        </text:list-item>
        <text:list-item>
          <text:p text:style-name="P6">o una escena visual fuerte.</text:p>
        </text:list-item>
      </text:list>
      <text:p text:style-name="Text_20_body">Ejemplos:</text:p>
      <text:list xml:id="list175544251" text:style-name="L7">
        <text:list-item>
          <text:p text:style-name="P7">escalera infinita</text:p>
        </text:list-item>
        <text:list-item>
          <text:p text:style-name="P7">manuscrito sobre piedra</text:p>
        </text:list-item>
        <text:list-item>
          <text:p text:style-name="P7">antorcha descendiendo</text:p>
        </text:list-item>
        <text:list-item>
          <text:p text:style-name="P7">rostro erosionado</text:p>
        </text:list-item>
        <text:list-item>
          <text:p text:style-name="P7">biblioteca subterránea</text:p>
        </text:list-item>
      </text:list>
      <text:p text:style-name="Text_20_body">La audiencia recuerda imágenes más que conceptos.</text:p>
      <text:p text:style-name="Horizontal_20_Line"/>
      <text:h text:style-name="Heading_20_1" text:outline-level="1">5. Final abierto</text:h>
      <text:p text:style-name="Text_20_body">Esto es esencial para redes.</text:p>
      <text:p text:style-name="Text_20_body">El final debe:</text:p>
      <text:list xml:id="list1677917385" text:style-name="L8">
        <text:list-item>
          <text:p text:style-name="P8">abrir una pregunta,</text:p>
        </text:list-item>
        <text:list-item>
          <text:p text:style-name="P8">insinuar algo enorme,</text:p>
        </text:list-item>
        <text:list-item>
          <text:p text:style-name="P8">o detenerse justo antes de la respuesta.</text:p>
        </text:list-item>
      </text:list>
      <text:p text:style-name="Text_20_body">Ejemplos:</text:p>
      <text:list xml:id="list4219246311" text:style-name="L9">
        <text:list-item>
          <text:p text:style-name="P9">“Perfectamente legible.”</text:p>
        </text:list-item>
        <text:list-item>
          <text:p text:style-name="P9">“Esa es la pregunta correcta.”</text:p>
        </text:list-item>
        <text:list-item>
          <text:p text:style-name="P9">“Había algo allí abajo.”</text:p>
        </text:list-item>
      </text:list>
      <text:p text:style-name="Text_20_body">El lector debe sentir:</text:p>
      <text:p text:style-name="Quotations"><text:soft-page-break/>“Necesito la siguiente parte.”</text:p>
      <text:p text:style-name="Horizontal_20_Line"/>
      <text:h text:style-name="Heading_20_1" text:outline-level="1">6. Recompensa emocional o intelectual</text:h>
      <text:p text:style-name="Text_20_body">Aquí estaba el problema de la viñeta 3 inicial.</text:p>
      <text:p text:style-name="Text_20_body">Toda viñeta debe dejar al lector con ALGO:</text:p>
      <text:list xml:id="list3796280894" text:style-name="L10">
        <text:list-item>
          <text:p text:style-name="P10">una idea,</text:p>
        </text:list-item>
        <text:list-item>
          <text:p text:style-name="P10">una emoción,</text:p>
        </text:list-item>
        <text:list-item>
          <text:p text:style-name="P10">una imagen,</text:p>
        </text:list-item>
        <text:list-item>
          <text:p text:style-name="P10">una inquietud,</text:p>
        </text:list-item>
        <text:list-item>
          <text:p text:style-name="P10">una verdad,</text:p>
        </text:list-item>
        <text:list-item>
          <text:p text:style-name="P10">una revelación parcial.</text:p>
        </text:list-item>
      </text:list>
      <text:p text:style-name="Text_20_body">Si no,<text:line-break/>la publicación se siente vacía aunque tenga atmósfera.</text:p>
      <text:p text:style-name="Horizontal_20_Line"/>
      <text:h text:style-name="Heading_20_1" text:outline-level="1">Fórmula condensada</text:h>
      <text:p text:style-name="Text_20_body">Creo que muchas viñetas exitosas tuyas siguen algo parecido a esto:</text:p>
      <text:h text:style-name="Heading_20_2" text:outline-level="2">Atmósfera</text:h>
      <text:p text:style-name="Text_20_body">→ Movimiento<text:line-break/>→ Misterio<text:line-break/>→ Revelación parcial<text:line-break/>→ Final abierto</text:p>
      <text:p text:style-name="Horizontal_20_Line"/>
      <text:h text:style-name="Heading_20_1" text:outline-level="1">Otra observación importante</text:h>
      <text:p text:style-name="Text_20_body">Tu contenido parece funcionar mejor cuando:</text:p>
      <text:h text:style-name="Heading_20_2" text:outline-level="2">la filosofía emerge desde la narrativa</text:h>
      <text:p text:style-name="Text_20_body">No cuando parece ensayo directo.</text:p>
      <text:p text:style-name="Text_20_body">Por ejemplo:</text:p>
      <text:list xml:id="list468670286" text:style-name="L11">
        <text:list-item>
          <text:p text:style-name="P11"><text:soft-page-break/>Khrom descendiendo hacia textos ocultos<text:line-break/>es más poderoso que:</text:p>
        </text:list-item>
        <text:list-item>
          <text:p text:style-name="P11">“La percepción humana es limitada.”</text:p>
        </text:list-item>
      </text:list>
      <text:p text:style-name="Text_20_body">Porque el lector descubre la idea emocionalmente.</text:p>
      <text:p text:style-name="Horizontal_20_Line"/>
      <text:h text:style-name="Heading_20_1" text:outline-level="1">Y quizá lo más importante de todo:</text:h>
      <text:p text:style-name="Text_20_body">Cada viñeta debe dar la sensación de que:</text:p>
      <text:h text:style-name="Heading_20_2" text:outline-level="2">el universo es mucho más grande que lo mostrado.</text:h>
      <text:p text:style-name="Text_20_body">Eso es exactamente lo que genera obsesión narrativ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7T19:49:57.594000000</meta:creation-date>
    <dc:date>2026-05-27T19:50:49.403000000</dc:date>
    <meta:editing-duration>PT52S</meta:editing-duration>
    <meta:editing-cycles>1</meta:editing-cycles>
    <meta:document-statistic meta:table-count="0" meta:image-count="0" meta:object-count="0" meta:page-count="5" meta:paragraph-count="99" meta:word-count="498" meta:character-count="2971" meta:non-whitespace-character-count="2614"/>
    <meta:generator>LibreOffice/7.3.5.2$Windows_X86_64 LibreOffice_project/184fe81b8c8c30d8b5082578aee2fed2ea847c01</meta:generator>
  </office:meta>
</office:document-meta>
</file>