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1C5ECF96860FC60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faebae" loext:opacity="100%"/>
    </style:style>
    <style:style style:name="T1" style:family="text">
      <style:text-properties fo:color="#faebae" loext:opacity="100%" style:font-name="Sans Serif Collection" fo:font-size="12pt" style:font-size-asian="12pt" style:font-size-complex="12pt"/>
    </style:style>
    <style:style style:name="T2" style:family="text">
      <style:text-properties fo:color="#faebae" loext:opacity="100%"/>
    </style:style>
    <style:style style:name="T3" style:family="text">
      <style:text-properties fo:color="#faebae" loext:opacity="100%" style:font-name="EB Garamond" fo:font-size="24pt" style:font-size-asian="24pt" style:font-size-complex="24pt"/>
    </style:style>
    <style:style style:name="T4" style:family="text">
      <style:text-properties fo:color="#faebae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5.939cm" svg:height="17.292cm" svg:x="1.061cm" svg:y="3.075cm">
          <draw:image xlink:href="Pictures/1000000000000600000004001C5ECF96860FC60C.jpg" xlink:type="simple" xlink:show="embed" xlink:actuate="onLoad" draw:mime-type="image/jpeg">
            <text:p text:style-name="P1"><text:span text:style-name="T1">( Omniscientis — Fragmento V )</text:span></text:p>
            <text:p text:style-name="P2"><text:span text:style-name="T2"/></text:p>
            <text:p text:style-name="P2"><text:span text:style-name="T3">Durante mucho tiempo, creyó que la sabiduría consistía en entenderlo todo.</text:span></text:p>
            <text:p text:style-name="P2"><text:span text:style-name="T3"/></text:p>
            <text:p text:style-name="P2"><text:span text:style-name="T3">Pero cuanto más profundizaba en su búsqueda, </text:span></text:p>
            <text:p text:style-name="P2"><text:span text:style-name="T3">más grande se volvía la oscuridad.</text:span></text:p>
            <text:p text:style-name="P2"><text:span text:style-name="T3"/></text:p>
            <text:p text:style-name="P2"><text:span text:style-name="T3">Entonces lo comprendió:</text:span></text:p>
            <text:p text:style-name="P2"><text:span text:style-name="T3">Tal vez la inteligencia nunca estuvo destinada a iluminar el universo entero.</text:span></text:p>
            <text:p text:style-name="P2"><text:span text:style-name="T3"/></text:p>
            <text:p text:style-name="P2"><text:span text:style-name="T3">Solo el siguiente pas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Y quizás eso era suficiente.</text:span></text:p>
            <text:p text:style-name="P2"><text:span text:style-name="T2"/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Continuará…</text:span></text:p>
            <text:p text:style-name="P1"><text:span text:style-name="T1">(De “Omniscientis”, el códice perdido de Lluviara)</text:span><text:span text:style-name="T1"><text:tab/>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8T18:56:05.018000000</dc:date>
    <meta:editing-duration>PT28M8S</meta:editing-duration>
    <meta:editing-cycles>9</meta:editing-cycles>
    <meta:generator>LibreOffice/7.3.5.2$Windows_X86_64 LibreOffice_project/184fe81b8c8c30d8b5082578aee2fed2ea847c01</meta:generator>
    <meta:document-statistic meta:object-count="1"/>
  </office:meta>
</office:document-meta>
</file>