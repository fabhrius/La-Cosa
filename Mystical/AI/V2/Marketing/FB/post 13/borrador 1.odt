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Elara recorrió la mirada por las interminables galerías.</text:p>
      <text:p text:style-name="Text_20_body">Cada estantería parecía contener siglos de trabajo.</text:p>
      <text:p text:style-name="Text_20_body">Sabios.</text:p>
      <text:p text:style-name="Text_20_body">Exploradores.</text:p>
      <text:p text:style-name="Text_20_body">Inventores.</text:p>
      <text:p text:style-name="Text_20_body">Personas que habían dedicado sus vidas a comprender el mundo.</text:p>
      <text:p text:style-name="Text_20_body">Todo aquel conocimiento había sobrevivido al paso del tiempo.</text:p>
      <text:p text:style-name="Text_20_body">Esperando.</text:p>
      <text:p text:style-name="Text_20_body">Oculto bajo la montaña.</text:p>
      <text:p text:style-name="Text_20_body">Por primera vez, las respuestas que había perseguido durante años parecían estar al alcance de su mano.</text:p>
      <text:p text:style-name="Text_20_body">¿Qué era la vida?</text:p>
      <text:p text:style-name="Text_20_body">¿Por qué morimos?</text:p>
      <text:p text:style-name="Text_20_body">¿Existía un propósito?</text:p>
      <text:p text:style-name="Text_20_body">Si alguien había logrado descubrirlo, aquel era el lugar donde debía buscar.</text:p>
      <text:p text:style-name="Text_20_body">Sin perder un instante, Elara avanzó hacia la estantería más cercana.</text:p>
      <text:p text:style-name="Text_20_body">Y tomó el primer libr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1T10:55:13.226000000</meta:creation-date>
    <dc:date>2026-06-11T10:57:41.591000000</dc:date>
    <meta:editing-duration>PT2M28S</meta:editing-duration>
    <meta:editing-cycles>1</meta:editing-cycles>
    <meta:document-statistic meta:table-count="0" meta:image-count="0" meta:object-count="0" meta:page-count="1" meta:paragraph-count="16" meta:word-count="97" meta:character-count="620" meta:non-whitespace-character-count="539"/>
    <meta:generator>LibreOffice/7.3.5.2$Windows_X86_64 LibreOffice_project/184fe81b8c8c30d8b5082578aee2fed2ea847c01</meta:generator>
  </office:meta>
</office:document-meta>
</file>