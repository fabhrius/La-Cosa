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6000DE8CE2967ECB0D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Lucida Sans3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ld English Text MT" svg:font-family="'Old English Text MT'" style:font-family-generic="script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roma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draw:stroke="none" svg:stroke-color="#000000" draw:fill="none" draw:fill-color="#ffffff" fo:min-height="26.13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style:paragraph-properties fo:margin-left="0cm" fo:margin-right="0cm" fo:margin-top="0cm" fo:margin-bottom="0cm" fo:line-height="100%" fo:text-align="end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de78a" loext:opacity="100%"/>
    </style:style>
    <style:style style:name="T1" style:family="text">
      <style:text-properties fo:font-variant="normal" fo:text-transform="none" fo:color="#fde78a" loext:opacity="100%" style:text-outline="false" style:text-line-through-style="none" style:text-line-through-type="none" style:font-name="Sans Serif Collection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de78a" loext:opacity="100%" style:font-name="Sans Serif Collection" fo:font-size="12pt" style:font-size-asian="12pt" style:font-size-complex="12pt"/>
    </style:style>
    <style:style style:name="T3" style:family="text">
      <style:text-properties fo:color="#fde78a" loext:opacity="100%" style:font-name="EB Garamond" fo:font-size="22pt" style:font-size-asian="22pt" style:font-size-complex="22pt"/>
    </style:style>
    <style:style style:name="T4" style:family="text">
      <style:text-properties fo:color="#fde78a" loext:opacity="100%" style:font-name="Old English Text MT" fo:font-size="60pt" style:font-size-asian="60pt" style:font-size-complex="60pt"/>
    </style:style>
    <style:style style:name="T5" style:family="text">
      <style:text-properties fo:font-variant="normal" fo:text-transform="none" fo:color="#fde78a" loext:opacity="100%" style:text-outline="false" style:text-line-through-style="none" style:text-line-through-type="none" style:font-name="EB Garamond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de78a" loext:opacity="100%" style:text-outline="false" style:text-line-through-style="none" style:text-line-through-type="none" style:font-name="EB Garamond" fo:font-size="22pt" fo:font-style="italic" fo:text-shadow="none" style:text-underline-style="none" fo:font-weight="bold" style:letter-kerning="true" style:font-name-asian="Microsoft YaHei" style:font-size-asian="22pt" style:font-style-asian="italic" style:font-weight-asian="bold" style:font-name-complex="Lucida Sans" style:font-size-complex="22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de78a" loext:opacity="100%" style:text-outline="false" style:text-line-through-style="none" style:text-line-through-type="none" style:font-name="Script MT Bold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aebae" loext:opacity="100%" style:font-name="Script MT Bold" fo:font-size="15pt" style:font-size-asian="15pt" style:font-size-complex="15pt"/>
    </style:style>
    <style:style style:name="T9" style:family="text">
      <style:text-properties fo:color="#fde78a" loext:opacity="100%" style:font-name="Script MT Bold" fo:font-size="15pt" style:font-size-asian="15pt" style:font-size-complex="15pt"/>
    </style:style>
    <style:style style:name="T10" style:family="text">
      <style:text-properties fo:color="#faebae" loext:opacity="100%" style:font-name="Sans Serif Collectio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4" draw:layer="layout" svg:width="19cm" svg:height="26.38cm" svg:x="1cm" svg:y="0.917cm">
          <draw:text-box>
            <text:p text:style-name="P1"><text:span text:style-name="T1">( Omniscientis — Fragment XIII </text:span><text:span text:style-name="T2">— The Temple of Rain — Part VII )</text:span></text:p>
            <text:p text:style-name="P2"><text:span text:style-name="T3"><text:tab/></text:span><text:span text:style-name="T4">T</text:span><text:span text:style-name="T5">he sight was almost supernatural.</text:span></text:p>
            <text:p text:style-name="P3"><text:span text:style-name="T5">How much knowledge could such a place contain?</text:span></text:p>
            <text:p text:style-name="P3"><text:span text:style-name="T5">Perhaps all of it?</text:span></text:p>
            <text:p text:style-name="P2"><text:span text:style-name="T5">Elara let herself be carried away by hope.</text:span></text:p>
            <text:p text:style-name="P2"><text:span text:style-name="T5">The answers she had pursued for years now seemed within reach.</text:span></text:p>
            <text:p text:style-name="P1"><text:span text:style-name="T6">Does existence have a purpose? Why do we die?</text:span></text:p>
            <text:p text:style-name="P2"><text:span text:style-name="T5">If anyone had ever discovered the answers, this was where she needed to look.</text:span></text:p>
            <text:p text:style-name="P3"><text:span text:style-name="T5">“</text:span><text:span text:style-name="T5">The answers are here, somewhere,” </text:span></text:p>
            <text:p text:style-name="P3"><text:span text:style-name="T5">she exclaimed with excitement.</text:span></text:p>
            <text:p text:style-name="P3"><text:span text:style-name="T5">Khrom gazed silently at the endless galleries.</text:span></text:p>
            <text:p text:style-name="P3"><text:span text:style-name="T5">He believed it was possible too. And yet… his expression revealed doubt. He said nothing. Elara barely noticed.</text:span></text:p>
            <text:p text:style-name="P2"><text:span text:style-name="T5"/></text:p>
            <text:p text:style-name="P2"><text:span text:style-name="T5">“</text:span><text:span text:style-name="T5">The sooner we begin, the sooner we'll finish.”</text:span></text:p>
            <text:p text:style-name="P2"><text:span text:style-name="T5">She reached for the nearest book. </text:span></text:p>
            <text:p text:style-name="P2"><text:span text:style-name="T5">And opened it to the first page.</text:span></text:p>
            <text:p text:style-name="P2"><text:span text:style-name="T5"/></text:p>
            <text:p text:style-name="P1"><text:span text:style-name="T5">Unaware that she was making the same mistake </text:span></text:p>
            <text:p text:style-name="P1"><text:span text:style-name="T5">many seekers before her had made.</text:span></text:p>
            <text:p text:style-name="P1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  <text:p text:style-name="P2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8">To be continued</text:span><text:span text:style-name="T9">…</text:span></text:p>
            <text:p text:style-name="P1"><text:span text:style-name="T1">(From</text:span><text:span text:style-name="T10"> “Omniscientis”, the lost codex of Lluviara</text:span><text:span text:style-name="T2">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Lucida Sans3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ld English Text MT" svg:font-family="'Old English Text MT'" style:font-family-generic="script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roma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400000006000DE8CE2967ECB0D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2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" style:font-family-asian="'Segoe UI'" style:font-family-generic-asian="roman" style:font-pitch-asian="variable" style:font-size-asian="12pt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2" style:font-family-complex="'Lucida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6-06-12T18:59:54.145000000</dc:date>
    <meta:editing-duration>PT4H38M33S</meta:editing-duration>
    <meta:editing-cycles>40</meta:editing-cycles>
    <meta:generator>LibreOffice/7.3.5.2$Windows_X86_64 LibreOffice_project/184fe81b8c8c30d8b5082578aee2fed2ea847c01</meta:generator>
    <meta:document-statistic meta:object-count="1"/>
  </office:meta>
</office:document-meta>
</file>