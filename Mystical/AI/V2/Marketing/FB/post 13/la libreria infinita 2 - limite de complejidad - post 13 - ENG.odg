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0DE8CE2967ECB0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1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2pt" style:font-size-asian="22pt" style:font-size-complex="22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1" style:font-size-asian="22pt" style:font-style-asian="normal" style:font-weight-asian="normal" style:font-name-complex="Lucida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1" style:font-size-asian="15pt" style:font-style-asian="normal" style:font-weight-asian="normal" style:font-name-complex="Lucida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aebae" loext:opacity="100%" style:font-name="Script MT Bold" fo:font-size="15pt" style:font-size-asian="15pt" style:font-size-complex="15pt"/>
    </style:style>
    <style:style style:name="T8" style:family="text">
      <style:text-properties fo:color="#fde78a" loext:opacity="100%" style:font-name="Script MT Bold" fo:font-size="15pt" style:font-size-asian="15pt" style:font-size-complex="15pt"/>
    </style:style>
    <style:style style:name="T9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932cm" svg:height="26.38cm" svg:x="1cm" svg:y="0.917cm">
          <draw:text-box>
            <text:p text:style-name="P1"><text:span text:style-name="T1">( Omniscientis — Fragment XII </text:span><text:span text:style-name="T2">— The Temple of Rain — Part VI )</text:span></text:p>
            <text:p text:style-name="P2"><text:span text:style-name="T3"><text:tab/></text:span><text:span text:style-name="T3"><text:tab/></text:span><text:span text:style-name="T4">T</text:span><text:span text:style-name="T5">he sight was almost supernatural.</text:span></text:p>
            <text:p text:style-name="P2"><text:span text:style-name="T5">How much knowledge could such a place contain?</text:span></text:p>
            <text:p text:style-name="P2"><text:span text:style-name="T5">Perhaps all of it.</text:span></text:p>
            <text:p text:style-name="P2"><text:span text:style-name="T5">Elara let herself be carried away by hope.</text:span></text:p>
            <text:p text:style-name="P2"><text:span text:style-name="T5">The answers she had pursued for years now seemed within reach.</text:span></text:p>
            <text:p text:style-name="P2"><text:span text:style-name="T5">Does existence have a purpose? Why do we die?</text:span></text:p>
            <text:p text:style-name="P2"><text:span text:style-name="T5">If anyone had ever discovered the answers, this was where she needed to look.</text:span></text:p>
            <text:p text:style-name="P2"><text:span text:style-name="T5">“</text:span><text:span text:style-name="T5">The answers are here, somewhere,” she exclaimed with excitement.</text:span></text:p>
            <text:p text:style-name="P2"><text:span text:style-name="T5">Khrom gazed silently at the endless galleries.</text:span></text:p>
            <text:p text:style-name="P2"><text:span text:style-name="T5">He believed it was possible too. And yet… his expression revealed doubt. He said nothing. Elara barely noticed.</text:span></text:p>
            <text:p text:style-name="P2"><text:span text:style-name="T5">“</text:span><text:span text:style-name="T5">The sooner we begin, the sooner we'll finish.”</text:span></text:p>
            <text:p text:style-name="P2"><text:span text:style-name="T5">She reached for the nearest book.</text:span></text:p>
            <text:p text:style-name="P2"><text:span text:style-name="T5">And opened it to the first page.</text:span></text:p>
            <text:p text:style-name="P2"><text:span text:style-name="T5">Unaware that she was making the same mistake many seekers before her had made.</text:span></text:p>
            <text:p text:style-name="P2"><text:span text:style-name="T5">. 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To be continued</text:span><text:span text:style-name="T8">…</text:span></text:p>
            <text:p text:style-name="P1"><text:span text:style-name="T1">(From</text:span><text:span text:style-name="T9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6000DE8CE2967ECB0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12T16:23:10.175000000</dc:date>
    <meta:editing-duration>PT3H49M29S</meta:editing-duration>
    <meta:editing-cycles>37</meta:editing-cycles>
    <meta:generator>LibreOffice/7.3.5.2$Windows_X86_64 LibreOffice_project/184fe81b8c8c30d8b5082578aee2fed2ea847c01</meta:generator>
    <meta:document-statistic meta:object-count="1"/>
  </office:meta>
</office:document-meta>
</file>