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6000DE8CE2967ECB0D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cript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Lucida Sans3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roman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svg:stroke-color="#000000" draw:fill="none" draw:fill-color="#ffffff" fo:min-height="26.37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de78a" loext:opacity="100%"/>
    </style:style>
    <style:style style:name="T1" style:family="text">
      <style:text-properties fo:font-variant="normal" fo:text-transform="none" fo:color="#fde78a" loext:opacity="100%" style:text-outline="false" style:text-line-through-style="none" style:text-line-through-type="none" style:font-name="Sans Serif Collectio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de78a" loext:opacity="100%" style:font-name="Sans Serif Collection" fo:font-size="12pt" style:font-size-asian="12pt" style:font-size-complex="12pt"/>
    </style:style>
    <style:style style:name="T3" style:family="text">
      <style:text-properties fo:color="#fde78a" loext:opacity="100%" style:font-name="Old English Text MT" fo:font-size="48pt" style:font-size-asian="48pt" style:font-size-complex="48pt"/>
    </style:style>
    <style:style style:name="T4" style:family="text">
      <style:text-properties fo:color="#fde78a" loext:opacity="100%" style:font-name="Old English Text MT" fo:font-size="60pt" style:font-size-asian="60pt" style:font-size-complex="60pt"/>
    </style:style>
    <style:style style:name="T5" style:family="text">
      <style:text-properties fo:font-variant="normal" fo:text-transform="none" fo:color="#fde78a" loext:opacity="100%" style:text-outline="false" style:text-line-through-style="none" style:text-line-through-type="none" style:font-name="EB Garamond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af1ce" loext:opacity="100%" style:text-outline="false" style:text-line-through-style="none" style:text-line-through-type="none" style:font-name="Cinzel Decorative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EB Garamond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de78a" loext:opacity="100%" style:text-outline="false" style:text-line-through-style="none" style:text-line-through-type="none" style:font-name="Script MT Bold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aebae" loext:opacity="100%" style:text-outline="false" style:text-line-through-style="none" style:text-line-through-type="none" style:font-name="Script MT Bold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de78a" loext:opacity="100%" style:font-name="Script MT Bold" fo:font-size="15pt" style:font-size-asian="15pt" style:font-size-complex="15pt"/>
    </style:style>
    <style:style style:name="T10" style:family="text">
      <style:text-properties fo:font-variant="normal" fo:text-transform="none" fo:color="#faebae" loext:opacity="100%" style:text-outline="false" style:text-line-through-style="none" style:text-line-through-type="none" style:font-name="Sans Serif Collectio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5" draw:layer="layout" svg:width="18.715cm" svg:height="26.626cm" svg:x="1.217cm" svg:y="0.817cm">
          <draw:text-box>
            <text:p text:style-name="P1"><text:span text:style-name="T1">( Omniscientis — Fragmento XII </text:span><text:span text:style-name="T2">— El Templo de la Lluvia — Parte VI )</text:span></text:p>
            <text:p text:style-name="P2"><text:span text:style-name="T3"><text:tab/></text:span><text:span text:style-name="T3"><text:tab/></text:span><text:span text:style-name="T3"><text:tab/></text:span><text:span text:style-name="T4">L</text:span><text:span text:style-name="T5">a visión era sobrenatural.</text:span></text:p>
            <text:p text:style-name="P3"><text:span text:style-name="T5">¿Cuánto conocimiento podía contener aquel lugar?</text:span><text:span text:style-name="T5"><text:line-break/></text:span><text:span text:style-name="T5">¿Tal vez todo?</text:span></text:p>
            <text:p><text:span text:style-name="T5">Elara se dejó llevar por su deseo.</text:span></text:p>
            <text:p><text:span text:style-name="T5">Las respuestas que había perseguido durante años parecían estar ahora a su alcance.</text:span></text:p>
            <text:p text:style-name="P4"><text:span text:style-name="T5"><text:line-break/></text:span><text:span text:style-name="T5">¿Tiene la existencia un propósito? ¿Por qué morimos?</text:span></text:p>
            <text:p><text:span text:style-name="T5">Si alguien había logrado descubrirlo, aquel era el lugar donde debía buscar.</text:span></text:p>
            <text:p><text:span text:style-name="T5">—</text:span><text:span text:style-name="T5">Las respuestas están aquí, en algún lugar —exclamó con euforia.</text:span></text:p>
            <text:p><text:span text:style-name="T5">Khrom observó las interminables galerías en silencio.</text:span></text:p>
            <text:p><text:span text:style-name="T5">El también lo creía posible. Y sin embargo… su expresión reflejaba duda. No dijo nada. Elara apenas lo notó.</text:span></text:p>
            <text:p><text:span text:style-name="T5"/></text:p>
            <text:p><text:span text:style-name="T5">—</text:span><text:span text:style-name="T5">Cuanto antes empecemos, antes terminaremos.</text:span></text:p>
            <text:p><text:span text:style-name="T5">Extendió la mano hacia el libro más cercano.</text:span></text:p>
            <text:p><text:span text:style-name="T5">Y lo abrió por la primera página.</text:span></text:p>
            <text:p><text:span text:style-name="T5"/></text:p>
            <text:p><text:span text:style-name="T5">Sin saber que estaba cometiendo el mismo error que muchos buscadores antes que ella.</text:span><text:span text:style-name="T6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Continuará</text:span><text:span text:style-name="T9">…</text:span></text:p>
            <text:p text:style-name="P1"><text:span text:style-name="T1">( De</text:span><text:span text:style-name="T10"> “Omniscientis”, el códice perdido de Lluviara 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cript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Lucida Sans3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roman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400000006000DE8CE2967ECB0D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2" style:font-family-asian="'Segoe UI'" style:font-family-generic-asian="roman" style:font-pitch-asian="variable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6-12T16:24:27.224000000</dc:date>
    <meta:editing-duration>PT6H29M11S</meta:editing-duration>
    <meta:editing-cycles>43</meta:editing-cycles>
    <meta:generator>LibreOffice/7.3.5.2$Windows_X86_64 LibreOffice_project/184fe81b8c8c30d8b5082578aee2fed2ea847c01</meta:generator>
    <meta:document-statistic meta:object-count="1"/>
  </office:meta>
</office:document-meta>
</file>