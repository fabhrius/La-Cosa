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0DE8CE2967ECB0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37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italic" fo:text-shadow="none" style:text-underline-style="none" fo:font-weight="bold" style:letter-kerning="true" style:font-name-asian="Microsoft YaHei" style:font-size-asian="22pt" style:font-style-asian="italic" style:font-weight-asian="bold" style:font-name-complex="Lucida Sans" style:font-size-complex="2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aebae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de78a" loext:opacity="100%" style:font-name="Script MT Bold" fo:font-size="15pt" style:font-size-asian="15pt" style:font-size-complex="15pt"/>
    </style:style>
    <style:style style:name="T11" style:family="text">
      <style:text-properties fo:font-variant="normal" fo:text-transform="none" fo:color="#faebae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5" draw:layer="layout" svg:width="18.932cm" svg:height="26.626cm" svg:x="1cm" svg:y="0.717cm">
          <draw:text-box>
            <text:p text:style-name="P1"><text:span text:style-name="T1">( Omniscientis — Fragmento XIII </text:span><text:span text:style-name="T2">— El Templo de la Lluvia — Parte VII )</text:span></text:p>
            <text:p text:style-name="P2"><text:span text:style-name="T3"><text:tab/></text:span><text:span text:style-name="T4">L</text:span><text:span text:style-name="T5">a visión era sobrenatural.</text:span></text:p>
            <text:p text:style-name="P3"><text:span text:style-name="T5">¿Cuánto conocimiento podía contener aquel lugar?</text:span><text:span text:style-name="T5"><text:line-break/></text:span><text:span text:style-name="T5">¿Tal vez todo?</text:span></text:p>
            <text:p><text:span text:style-name="T5">Elara se dejó llevar por su deseo.</text:span></text:p>
            <text:p><text:span text:style-name="T5">Las respuestas que había perseguido durante años </text:span></text:p>
            <text:p><text:span text:style-name="T5">parecían estar ahora a su alcance.</text:span></text:p>
            <text:p text:style-name="P4"><text:span text:style-name="T5"><text:line-break/></text:span><text:span text:style-name="T6">¿Tiene la existencia un propósito? ¿Por qué morimos?</text:span></text:p>
            <text:p><text:span text:style-name="T5">Si alguien había logrado descubrirlo, </text:span></text:p>
            <text:p><text:span text:style-name="T5">aquel era el lugar donde debía buscar.</text:span></text:p>
            <text:p text:style-name="P3"><text:span text:style-name="T5">—</text:span><text:span text:style-name="T5">Las respuestas están aquí, en algún lugar —</text:span></text:p>
            <text:p text:style-name="P3"><text:span text:style-name="T5">exclamó con euforia.</text:span></text:p>
            <text:p text:style-name="P3"><text:span text:style-name="T5">Khrom observó las interminables galerías en silencio.</text:span></text:p>
            <text:p text:style-name="P3"><text:span text:style-name="T5">El también lo creía posible. Y sin embargo… </text:span></text:p>
            <text:p text:style-name="P3"><text:span text:style-name="T5">su expresión reflejaba duda. </text:span></text:p>
            <text:p text:style-name="P3"><text:span text:style-name="T5">No dijo nada. Elara apenas lo notó.</text:span></text:p>
            <text:p><text:span text:style-name="T5">—</text:span><text:span text:style-name="T5">Cuanto antes empecemos, antes terminaremos.</text:span></text:p>
            <text:p><text:span text:style-name="T5">Extendió la mano hacia el libro más cercano.</text:span></text:p>
            <text:p><text:span text:style-name="T5">Y lo abrió por la primera página.</text:span></text:p>
            <text:p><text:span text:style-name="T5"/></text:p>
            <text:p text:style-name="P4"><text:span text:style-name="T5">Sin saber que estaba cometiendo el mismo error </text:span></text:p>
            <text:p text:style-name="P4"><text:span text:style-name="T5">que muchos buscadores antes que ella.</text:span><text:span text:style-name="T7"><text:tab/></text:span></text:p>
            <text:p text:style-name="P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Continuará</text:span><text:span text:style-name="T10">…</text:span></text:p>
            <text:p text:style-name="P1"><text:span text:style-name="T1">( De</text:span><text:span text:style-name="T11"> “Omniscientis”, el códice perdido de Lluviara 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00000006000DE8CE2967ECB0D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3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14T10:23:18.466000000</dc:date>
    <meta:editing-duration>PT6H42M3S</meta:editing-duration>
    <meta:editing-cycles>45</meta:editing-cycles>
    <meta:generator>LibreOffice/7.3.5.2$Windows_X86_64 LibreOffice_project/184fe81b8c8c30d8b5082578aee2fed2ea847c01</meta:generator>
    <meta:document-statistic meta:object-count="1"/>
  </office:meta>
</office:document-meta>
</file>