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reo que aquí conviene pensar menos en los detalles concretos de cada publicación y más en la <text:span text:style-name="Strong_20_Emphasis">función dramática</text:span> de la serie.</text:p>
      <text:p text:style-name="Text_20_body">Porque esta serie tiene un objetivo muy específico: hacer que tanto Elara como el lector crean que las respuestas podrían estar en la biblioteca.</text:p>
      <text:p text:style-name="Text_20_body">Si conseguimos eso, la futura revelación del códice tendrá mucho más impacto.</text:p>
      <text:h text:style-name="Heading_20_2" text:outline-level="2">Objetivo narrativo de la serie</text:h>
      <text:p text:style-name="Text_20_body">Al comenzar:</text:p>
      <text:p text:style-name="Quotations">"Quizás las respuestas estén aquí."</text:p>
      <text:p text:style-name="Text_20_body">Al terminar:</text:p>
      <text:p text:style-name="Quotations">"Aquí hay conocimiento inmenso, pero las respuestas definitivas siguen faltando."</text:p>
      <text:p text:style-name="Text_20_body">Es una diferencia importante.</text:p>
      <text:p text:style-name="Text_20_body">No queremos que la biblioteca resulte inútil.</text:p>
      <text:p text:style-name="Text_20_body">Queremos que resulte extraordinaria, pero insuficiente.</text:p>
      <text:p text:style-name="Horizontal_20_Line"/>
      <text:h text:style-name="Heading_20_1" text:outline-level="1">Estructura general del arco</text:h>
      <text:h text:style-name="Heading_20_2" text:outline-level="2">Capítulo 1: El océano de conocimiento</text:h>
      <text:p text:style-name="Text_20_body">Objetivo:<text:line-break/>Transmitir asombro.</text:p>
      <text:p text:style-name="Text_20_body">Elara desciende a las galerías subterráneas.</text:p>
      <text:p text:style-name="Text_20_body">Ve miles de manuscritos.</text:p>
      <text:p text:style-name="Text_20_body">Pergaminos.<text:line-break/>Tablillas.<text:line-break/>Mapas.<text:line-break/>Crónicas.</text:p>
      <text:p text:style-name="Text_20_body">Comprende que el conocimiento acumulado allí supera todo lo que ha visto en su vida.</text:p>
      <text:p text:style-name="Text_20_body">Khrom le explica que los guardianes han preservado estos textos durante siglos.</text:p>
      <text:p text:style-name="Text_20_body">Pregunta existencial asociada:</text:p>
      <text:p text:style-name="Quotations">¿Cuánto conocimiento puede acumular una civilización?</text:p>
      <text:p text:style-name="Horizontal_20_Line"/>
      <text:h text:style-name="Heading_20_2" text:outline-level="2"><text:soft-page-break/>Capítulo 2: Los guardianes del secreto</text:h>
      <text:p text:style-name="Text_20_body">Objetivo:<text:line-break/>Crear misterio.</text:p>
      <text:p text:style-name="Text_20_body">Elara pregunta por qué semejante conocimiento está oculto.</text:p>
      <text:p text:style-name="Text_20_body">Khrom explica que no todos los conocimientos son comprendidos de la misma manera por todas las personas.</text:p>
      <text:p text:style-name="Text_20_body">Algunas enseñanzas fueron perseguidas.<text:line-break/>Otras malinterpretadas.<text:line-break/>Otras provocaron conflictos.</text:p>
      <text:p text:style-name="Text_20_body">Los guardianes eligieron preservar los escritos en lugar de difundirlos.</text:p>
      <text:p text:style-name="Text_20_body">No porque fueran peligrosos.</text:p>
      <text:p text:style-name="Text_20_body">Sino porque eran valiosos.</text:p>
      <text:p text:style-name="Text_20_body">Pregunta asociada:</text:p>
      <text:p text:style-name="Quotations">¿Debe todo conocimiento ser compartido?</text:p>
      <text:p text:style-name="Horizontal_20_Line"/>
      <text:h text:style-name="Heading_20_2" text:outline-level="2">Capítulo 3: La búsqueda comienza</text:h>
      <text:p text:style-name="Text_20_body">Objetivo:<text:line-break/>Mostrar esperanza.</text:p>
      <text:p text:style-name="Text_20_body">Elara comienza a investigar.</text:p>
      <text:p text:style-name="Text_20_body">Lee día y noche.</text:p>
      <text:p text:style-name="Text_20_body">Consulta textos de diferentes épocas.</text:p>
      <text:p text:style-name="Text_20_body">Encuentra ideas sorprendentes.</text:p>
      <text:p text:style-name="Text_20_body">Teorías sobre la realidad.<text:line-break/>La mente.<text:line-break/>La muerte.<text:line-break/>El alma.<text:line-break/>La naturaleza de la vida.</text:p>
      <text:p text:style-name="Text_20_body">Cada descubrimiento aumenta su entusiasmo.</text:p>
      <text:p text:style-name="Text_20_body">Pregunta asociada:</text:p>
      <text:p text:style-name="Quotations">¿Y si las respuestas realmente estuvieran aquí?</text:p>
      <text:p text:style-name="Horizontal_20_Line"/>
      <text:h text:style-name="Heading_20_2" text:outline-level="2"><text:soft-page-break/>Capítulo 4: Muchas respuestas diferentes</text:h>
      <text:p text:style-name="Text_20_body">Objetivo:<text:line-break/>Introducir complejidad.</text:p>
      <text:p text:style-name="Text_20_body">Elara descubre algo inesperado.</text:p>
      <text:p text:style-name="Text_20_body">Los antiguos sabios no estaban de acuerdo entre ellos.</text:p>
      <text:p text:style-name="Text_20_body">Algunos textos se contradicen.</text:p>
      <text:p text:style-name="Text_20_body">Algunos afirman una cosa.<text:line-break/>Otros sostienen exactamente lo contrario.</text:p>
      <text:p text:style-name="Text_20_body">Todos parecen inteligentes.</text:p>
      <text:p text:style-name="Text_20_body">Todos parecen sinceros.</text:p>
      <text:p text:style-name="Text_20_body">Sin embargo llegan a conclusiones distintas.</text:p>
      <text:p text:style-name="Text_20_body">Pregunta asociada:</text:p>
      <text:p text:style-name="Quotations">¿Cómo saber quién tiene razón?</text:p>
      <text:p text:style-name="Horizontal_20_Line"/>
      <text:h text:style-name="Heading_20_2" text:outline-level="2">Capítulo 5: El muro invisible</text:h>
      <text:p text:style-name="Text_20_body">Objetivo:<text:line-break/>Primer golpe emocional.</text:p>
      <text:p text:style-name="Text_20_body">Tras semanas de investigación.</text:p>
      <text:p text:style-name="Text_20_body">Elara comienza a notar un patrón.</text:p>
      <text:p text:style-name="Text_20_body">Los autores describen observaciones.</text:p>
      <text:p text:style-name="Text_20_body">Teorías.</text:p>
      <text:p text:style-name="Text_20_body">Interpretaciones.</text:p>
      <text:p text:style-name="Text_20_body">Pero ninguno parece poseer certezas absolutas.</text:p>
      <text:p text:style-name="Text_20_body">Todos avanzan hasta cierto punto.</text:p>
      <text:p text:style-name="Text_20_body">Y luego aparece la duda.</text:p>
      <text:p text:style-name="Text_20_body">Pregunta asociada:</text:p>
      <text:p text:style-name="Quotations">¿Existe un límite para lo que podemos conocer?</text:p>
      <text:p text:style-name="Horizontal_20_Line"/>
      <text:h text:style-name="Heading_20_2" text:outline-level="2"><text:soft-page-break/>Capítulo 6: El escrito sin autor</text:h>
      <text:p text:style-name="Text_20_body">Objetivo:<text:line-break/>Incrementar el misterio.</text:p>
      <text:p text:style-name="Text_20_body">Entre miles de documentos aparece un texto extraño.</text:p>
      <text:p text:style-name="Text_20_body">Más antiguo.</text:p>
      <text:p text:style-name="Text_20_body">Sin firma.</text:p>
      <text:p text:style-name="Text_20_body">Sin fecha.</text:p>
      <text:p text:style-name="Text_20_body">Diferente a todos los demás.</text:p>
      <text:p text:style-name="Text_20_body">Khrom tampoco sabe quién lo escribió.</text:p>
      <text:p text:style-name="Text_20_body">Este texto introduce una idea inquietante.</text:p>
      <text:p text:style-name="Text_20_body">Por ejemplo:</text:p>
      <text:p text:style-name="Quotations">"La verdad no fue olvidada.<text:line-break/>Fue retirada."</text:p>
      <text:p text:style-name="Text_20_body">No explica nada más.</text:p>
      <text:p text:style-name="Horizontal_20_Line"/>
      <text:h text:style-name="Heading_20_2" text:outline-level="2">Capítulo 7: La referencia repetida</text:h>
      <text:p text:style-name="Text_20_body">Objetivo:<text:line-break/>Preparar el siguiente arco.</text:p>
      <text:p text:style-name="Text_20_body">Elara comienza a encontrar referencias dispersas.</text:p>
      <text:p text:style-name="Text_20_body">Fragmentos.</text:p>
      <text:p text:style-name="Text_20_body">Citas.</text:p>
      <text:p text:style-name="Text_20_body">Anotaciones.</text:p>
      <text:p text:style-name="Text_20_body">Todas apuntan a algo.</text:p>
      <text:p text:style-name="Text_20_body">No a una persona.</text:p>
      <text:p text:style-name="Text_20_body">No a una ciudad.</text:p>
      <text:p text:style-name="Text_20_body">No a una religión.</text:p>
      <text:p text:style-name="Text_20_body">A un libro.</text:p>
      <text:p text:style-name="Text_20_body">Un libro que parece haber sido conocido por autores de épocas distintas.</text:p>
      <text:p text:style-name="Text_20_body">Un libro que ya no existe.</text:p>
      <text:p text:style-name="Horizontal_20_Line"/>
      <text:h text:style-name="Heading_20_2" text:outline-level="2"><text:soft-page-break/>Capítulo 8: El nombre</text:h>
      <text:p text:style-name="Text_20_body">Objetivo:<text:line-break/>Cliffhanger final.</text:p>
      <text:p text:style-name="Text_20_body">Finalmente Elara encuentra el nombre.</text:p>
      <text:p text:style-name="Text_20_body">No una explicación.</text:p>
      <text:p text:style-name="Text_20_body">Solo el nombre.</text:p>
      <text:p text:style-name="Text_20_body">Un nombre que aparece una y otra vez.</text:p>
      <text:p text:style-name="Text_20_body">Un libro legendario.</text:p>
      <text:p text:style-name="Text_20_body">Un libro perdido.</text:p>
      <text:p text:style-name="Text_20_body">El códice.</text:p>
      <text:p text:style-name="Text_20_body">La serie termina con Elara comprendiendo que la biblioteca más grande que ha visto jamás no contiene las respuestas que busca.</text:p>
      <text:p text:style-name="Text_20_body">Pero sí contiene algo mucho más importante:</text:p>
      <text:p text:style-name="Text_20_body">La prueba de que alguien, en algún momento, creyó haberlas encontrado.</text:p>
      <text:p text:style-name="Horizontal_20_Line"/>
      <text:p text:style-name="Text_20_body">Creo que esta estructura tiene una ventaja importante: no convierte la biblioteca en una parada temporal. La convierte en una etapa fundamental del viaje de Elara.</text:p>
      <text:p text:style-name="Text_20_body">La biblioteca le enseña algo esencial:</text:p>
      <text:p text:style-name="Quotations">El problema no es la falta de conocimiento.</text:p>
      <text:p text:style-name="Quotations">El problema es que incluso los sabios más grandes parecen haber llegado hasta un mismo límite.</text:p>
      <text:p text:style-name="Text_20_body">Y precisamente por eso la búsqueda del códice se vuelve necesari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07T18:33:14.057000000</meta:creation-date>
    <dc:date>2026-06-07T18:34:10.148000000</dc:date>
    <meta:editing-duration>PT56S</meta:editing-duration>
    <meta:editing-cycles>1</meta:editing-cycles>
    <meta:document-statistic meta:table-count="0" meta:image-count="0" meta:object-count="0" meta:page-count="5" meta:paragraph-count="106" meta:word-count="637" meta:character-count="4207" meta:non-whitespace-character-count="3676"/>
    <meta:generator>LibreOffice/7.3.5.2$Windows_X86_64 LibreOffice_project/184fe81b8c8c30d8b5082578aee2fed2ea847c01</meta:generator>
  </office:meta>
</office:document-meta>
</file>