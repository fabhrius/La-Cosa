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cto. estamos entonces preparados para continuar desde aqui. vamos a desarrollar el siguiente relato. el guion general es el siguiente: "vamos a relatar en varias vinetas, posiblemente cuatro o mas, la siguiente escena:</text:p>
      <text:p text:style-name="P1"/>
      <text:p text:style-name="P1">a) presentamos aqui a </text:p>
      <text:p text:style-name="P1"/>
      <text:p text:style-name="P1">1- Khrom, el sacerdote del templo de la lluvia.</text:p>
      <text:p text:style-name="P1">2- el templo de la lluvia, una construccion muy antigua que la aldea utiliza para reunirse y profesar su credo al Espiritu de la lluvia.</text:p>
      <text:p text:style-name="P1">Nadie sabe quien construyo el templo de la lluvia pero parece haber sido construido hace siglos por una civilizacion desaparecida.</text:p>
      <text:p text:style-name="P1">3- los antiguos escritos secretos que se conservan ocultos en los pasajes subterraneos del templo de la lluvia.</text:p>
      <text:p text:style-name="P1">una fuente de informacion de valor incalculable que solo conoce Khrom.</text:p>
      <text:p text:style-name="P1">4- presentamos Tambien la necesidad de Elara por respuestas existenciales, que son lo que guia la accion de Elara y el motor de toda la historia</text:p>
      <text:p text:style-name="P1"/>
      <text:p text:style-name="P1"/>
      <text:p text:style-name="P1"/>
      <text:p text:style-name="P1"/>
      <text:p text:style-name="P1"/>
      <text:p text:style-name="P1"/>
      <text:p text:style-name="P1">b) detalles de la escena</text:p>
      <text:p text:style-name="P1"/>
      <text:p text:style-name="P1">1- </text:p>
      <text:p text:style-name="P1">Elara habla con Khrom dentro del templo de la Lluvia.</text:p>
      <text:p text:style-name="P1">Plantea una pregunta existencial.</text:p>
      <text:p text:style-name="P1">Porque estoy despierta, porque soy conciente, porque estoy observando la realidad?</text:p>
      <text:p text:style-name="P1"/>
      <text:p text:style-name="P1">con un dialogo como ...</text:p>
      <text:p text:style-name="P1"/>
      <text:p text:style-name="P1">- porque estoy despierta?</text:p>
      <text:p text:style-name="P1">porque soy conciente? - Elara.</text:p>
      <text:p text:style-name="P1"/>
      <text:p text:style-name="P1">- porque lo que eres lo exige. - Khrom.</text:p>
      <text:p text:style-name="P1"/>
      <text:p text:style-name="P1">- y que soy? - Elara.</text:p>
      <text:p text:style-name="P1"/>
      <text:p text:style-name="P1">- esa es la pregunta correcta. - Khrom.</text:p>
      <text:p text:style-name="P1"/>
      <text:p text:style-name="P1"/>
      <text:p text:style-name="P1">2-</text:p>
      <text:p text:style-name="P1">Khrom coge una antorcha y comienza a bajar por una estrecha escalera de piedra.</text:p>
      <text:p text:style-name="P1">la oscuridad es absoluta y la escalera parece bajar hasta el centro de la tierra.</text:p>
      <text:p text:style-name="P1">Elara lo sigue.</text:p>
      <text:p text:style-name="P1"/>
      <text:p text:style-name="P1">Encuentran una camara en el subsuelo que contiene escritos, libros muy antiguos, rollos de papiro, inscripciones en la piedra.</text:p>
      <text:p text:style-name="P1">El legado de una civilizacion desaparecida, los constructores del templo.</text:p>
      <text:p text:style-name="P1"><text:soft-page-break/></text:p>
      <text:p text:style-name="P1">Khrom senala un manuscrito.</text:p>
      <text:p text:style-name="P1">Elara lee.</text:p>
      <text:p text:style-name="P1"/>
      <text:p text:style-name="P1">"No es posible representar cada detalle de la realidad.</text:p>
      <text:p text:style-name="P1">Y la representacion que tu creas determina</text:p>
      <text:p text:style-name="P1">lo que ves,</text:p>
      <text:p text:style-name="P1">lo que ignoras, </text:p>
      <text:p text:style-name="P1">lo que confundes.</text:p>
      <text:p text:style-name="P1"/>
      <text:p text:style-name="P1">Este es el filtro que define tu realidad.</text:p>
      <text:p text:style-name="P1"><text:tab/><text:tab/><text:tab/>- Fabhrius. "</text:p>
      <text:p text:style-name="P1"/>
      <text:p text:style-name="P1"/>
      <text:p text:style-name="P1">Tal vez se puede expresar como:</text:p>
      <text:p text:style-name="P1">"No mind can carry the whole shape of the world.</text:p>
      <text:p text:style-name="P1"/>
      <text:p text:style-name="P1">To perceive</text:p>
      <text:p text:style-name="P1">is to carve away.</text:p>
      <text:p text:style-name="P1"/>
      <text:p text:style-name="P1">Every vision is a fragment.</text:p>
      <text:p text:style-name="P1">Every truth,</text:p>
      <text:p text:style-name="P1">a reflection upon dark water.</text:p>
      <text:p text:style-name="P1"/>
      <text:p text:style-name="P1">What you name “reality”</text:p>
      <text:p text:style-name="P1">is only the form your spirit is able to contain.</text:p>
      <text:p text:style-name="P1"/>
      <text:p text:style-name="P1">Thus,</text:p>
      <text:p text:style-name="P1">all beings walk within invisible boundaries,</text:p>
      <text:p text:style-name="P1">seeing,</text:p>
      <text:p text:style-name="P1">and not seeing.</text:p>
      <text:p text:style-name="P1"/>
      <text:p text:style-name="P1">— Fabhrius"</text:p>
      <text:p text:style-name="P1"/>
      <text:p text:style-name="P1"/>
      <text:p text:style-name="P1"/>
      <text:p text:style-name="P1">------------------------------</text:p>
      <text:p text:style-name="P1"/>
      <text:p text:style-name="P1"/>
      <text:p text:style-name="P1">Podemos terminar el relato aqui,</text:p>
      <text:p text:style-name="P1">o terminarlo con un pensamiento de Elara.</text:p>
      <text:p text:style-name="P1">del tipo: </text:p>
      <text:p text:style-name="P1"/>
      <text:p text:style-name="P1">'</text:p>
      <text:p text:style-name="P1">Ella creía que el mundo era exactamente como lo percibía.</text:p>
      <text:p text:style-name="P1">Claro.</text:p>
      <text:p text:style-name="P1">Sólido.</text:p>
      <text:p text:style-name="P1">Cierto.</text:p>
      <text:p text:style-name="P1"/>
      <text:p text:style-name="P1"><text:soft-page-break/>Pero cada pueblo contaba una historia diferente.</text:p>
      <text:p text:style-name="P1">Cada viajero describía una verdad distinta.</text:p>
      <text:p text:style-name="P1"/>
      <text:p text:style-name="P1">Las personas no ven la realidad en sí misma.</text:p>
      <text:p text:style-name="P1">Ven la forma que sus mentes son capaces de captar.</text:p>
      <text:p text:style-name="P1"/>
      <text:p text:style-name="P1">El miedo la transforma.</text:p>
      <text:p text:style-name="P1">La esperanza la transforma.</text:p>
      <text:p text:style-name="P1">El dolor la transforma.</text:p>
      <text:p text:style-name="P1"/>
      <text:p text:style-name="P1">La memoria remodela el mundo.</text:p>
      <text:p text:style-name="P1"/>
      <text:p text:style-name="P1">Contra esto, solo hay una cosa que puedes hacer...</text:p>
      <text:p text:style-name="P1"/>
      <text:p text:style-name="P1">Busca con ojos dispuestos a ver de otra manera.</text:p>
      <text:p text:style-name="P1">'</text:p>
      <text:p text:style-name="P1"/>
      <text:p text:style-name="P1"/>
      <text:p text:style-name="P1">que te parece?</text:p>
      <text:p text:style-name="P1">podremos convertirlo en una serie de vinetas cortas que terminen todas ellas de forma misteriosa, abierta e inquietante?"</text:p>
      <text:p text:style-name="Standard"/>
      <text:p text:style-name="Standard"/>
      <text:p text:style-name="Horizontal_20_Line"/>
      <text:p text:style-name="Text_20_body"/>
      <text:p text:style-name="Text_20_body">Sí.<text:line-break/>Y de hecho creo que aquí aparece algo extremadamente fuerte para la identidad del proyecto.</text:p>
      <text:p text:style-name="Text_20_body">Porque esta escena no solo introduce información del mundo.<text:line-break/>Introduce una sensación.</text:p>
      <text:p text:style-name="Text_20_body">La sensación de que:</text:p>
      <text:list xml:id="list696178234" text:style-name="L1">
        <text:list-item>
          <text:p text:style-name="P2">el conocimiento antiguo existe,</text:p>
        </text:list-item>
        <text:list-item>
          <text:p text:style-name="P2">permanece oculto,</text:p>
        </text:list-item>
        <text:list-item>
          <text:p text:style-name="P2">y es demasiado grande para ser comprendido completamente.</text:p>
        </text:list-item>
      </text:list>
      <text:p text:style-name="Text_20_body">Eso encaja perfectamente con:</text:p>
      <text:list xml:id="list1350390265" text:style-name="L2">
        <text:list-item>
          <text:p text:style-name="P3">Fabhrius,</text:p>
        </text:list-item>
        <text:list-item>
          <text:p text:style-name="P3">Omniscientis,</text:p>
        </text:list-item>
        <text:list-item>
          <text:p text:style-name="P3">los límites de la inteligencia,</text:p>
        </text:list-item>
        <text:list-item>
          <text:p text:style-name="P3">y la búsqueda existencial de Elara.</text:p>
        </text:list-item>
      </text:list>
      <text:p text:style-name="Text_20_body">Y sí:<text:line-break/>esto puede transformarse muy bien en una serie de viñetas cortas, misteriosas y abiertas.</text:p>
      <text:p text:style-name="Text_20_body"><text:soft-page-break/>De hecho, el secreto está precisamente en NO resolver demasiado.</text:p>
      <text:p text:style-name="Text_20_body">Cada viñeta debe:</text:p>
      <text:list xml:id="list1454613282" text:style-name="L3">
        <text:list-item>
          <text:p text:style-name="P4">revelar un poco,</text:p>
        </text:list-item>
        <text:list-item>
          <text:p text:style-name="P4">sugerir algo enorme,</text:p>
        </text:list-item>
        <text:list-item>
          <text:p text:style-name="P4">y terminar antes de dar una respuesta completa.</text:p>
        </text:list-item>
      </text:list>
      <text:p text:style-name="Text_20_body">Eso obliga a la audiencia a imaginar el resto.</text:p>
      <text:p text:style-name="Horizontal_20_Line"/>
      <text:h text:style-name="Heading_20_1" text:outline-level="1">Lo más fuerte del relato</text:h>
      <text:p text:style-name="Text_20_body">Hay cuatro elementos muy poderosos aquí:</text:p>
      <text:h text:style-name="Heading_20_2" text:outline-level="2">1. El templo de la lluvia</text:h>
      <text:p text:style-name="Text_20_body">No es simplemente un templo.</text:p>
      <text:p text:style-name="Text_20_body">Es:</text:p>
      <text:list xml:id="list3708536733" text:style-name="L4">
        <text:list-item>
          <text:p text:style-name="P5">antiguo,</text:p>
        </text:list-item>
        <text:list-item>
          <text:p text:style-name="P5">incomprensible,</text:p>
        </text:list-item>
        <text:list-item>
          <text:p text:style-name="P5">posiblemente construido por una civilización desaparecida,</text:p>
        </text:list-item>
        <text:list-item>
          <text:p text:style-name="P5">todavía utilizado por gente que ya no entiende su origen.</text:p>
        </text:list-item>
      </text:list>
      <text:p text:style-name="Text_20_body">Eso crea profundidad histórica instantánea.</text:p>
      <text:p text:style-name="Horizontal_20_Line"/>
      <text:h text:style-name="Heading_20_2" text:outline-level="2">2. Khrom</text:h>
      <text:p text:style-name="Text_20_body">Khrom funciona muy bien porque:</text:p>
      <text:list xml:id="list415036266" text:style-name="L5">
        <text:list-item>
          <text:p text:style-name="P6">no parece un “mago”</text:p>
        </text:list-item>
        <text:list-item>
          <text:p text:style-name="P6">no parece un “mentor cliché”</text:p>
        </text:list-item>
        <text:list-item>
          <text:p text:style-name="P6">parece un guardián silencioso del conocimiento</text:p>
        </text:list-item>
      </text:list>
      <text:p text:style-name="Text_20_body">Y lo más importante:<text:line-break/>él no entrega respuestas.<text:line-break/>Solo abre puertas.</text:p>
      <text:p text:style-name="Text_20_body">Eso es perfecto para el tono filosófico.</text:p>
      <text:p text:style-name="Horizontal_20_Line"/>
      <text:h text:style-name="Heading_20_2" text:outline-level="2"><text:soft-page-break/>3. El descenso</text:h>
      <text:p text:style-name="Text_20_body">La escena de la escalera es excelente.</text:p>
      <text:p text:style-name="Text_20_body">Porque simbólicamente:</text:p>
      <text:list xml:id="list1220635856" text:style-name="L6">
        <text:list-item>
          <text:p text:style-name="P7">bajar = entrar en lo oculto</text:p>
        </text:list-item>
        <text:list-item>
          <text:p text:style-name="P7">entrar en la tierra = entrar en capas profundas de la realidad</text:p>
        </text:list-item>
        <text:list-item>
          <text:p text:style-name="P7">oscuridad absoluta = límites de la percepción</text:p>
        </text:list-item>
      </text:list>
      <text:p text:style-name="Text_20_body">La audiencia siente que Elara está entrando en algo prohibido.</text:p>
      <text:p text:style-name="Horizontal_20_Line"/>
      <text:h text:style-name="Heading_20_2" text:outline-level="2">4. El texto de Fabhrius</text:h>
      <text:p text:style-name="Text_20_body">Aquí está el verdadero golpe emocional.</text:p>
      <text:p text:style-name="Text_20_body">Porque no es simplemente “filosofía”.</text:p>
      <text:p text:style-name="Text_20_body">Es una idea inquietante:<text:line-break/>la realidad que percibimos podría ser solo una versión extremadamente limitada del mundo.</text:p>
      <text:p text:style-name="Text_20_body">Eso conecta profundamente con el miedo existencial humano.</text:p>
      <text:p text:style-name="Horizontal_20_Line"/>
      <text:h text:style-name="Heading_20_1" text:outline-level="1">Lo que recomiendo</text:h>
      <text:p text:style-name="Text_20_body">NO hacer una sola publicación larga.</text:p>
      <text:p text:style-name="Text_20_body">Mucho mejor:</text:p>
      <text:h text:style-name="Heading_20_2" text:outline-level="2">Serie de 4–6 viñetas/posts</text:h>
      <text:p text:style-name="Text_20_body">Cada una:</text:p>
      <text:list xml:id="list2586961283" text:style-name="L7">
        <text:list-item>
          <text:p text:style-name="P8">imagen poderosa</text:p>
        </text:list-item>
        <text:list-item>
          <text:p text:style-name="P8">poco texto</text:p>
        </text:list-item>
        <text:list-item>
          <text:p text:style-name="P8">final inquietante</text:p>
        </text:list-item>
      </text:list>
      <text:p text:style-name="Horizontal_20_Line"/>
      <text:h text:style-name="Heading_20_1" text:outline-level="1">Estructura sugerida</text:h>
      <text:p text:style-name="Horizontal_20_Line"/>
      <text:h text:style-name="Heading_20_1" text:outline-level="1"><text:soft-page-break/>VIÑETA 1 — El Templo de la Lluvia</text:h>
      <text:p text:style-name="Text_20_body">Visual:</text:p>
      <text:list xml:id="list2932798154" text:style-name="L8">
        <text:list-item>
          <text:p text:style-name="P9">templo gigantesco</text:p>
        </text:list-item>
        <text:list-item>
          <text:p text:style-name="P9">lluvia constante</text:p>
        </text:list-item>
        <text:list-item>
          <text:p text:style-name="P9">aldeanos diminutos</text:p>
        </text:list-item>
        <text:list-item>
          <text:p text:style-name="P9">arquitectura imposible</text:p>
        </text:list-item>
      </text:list>
      <text:p text:style-name="Text_20_body">Texto:</text:p>
      <text:p text:style-name="Quotations">Nadie recordaba quién construyó el Templo de la Lluvia.</text:p>
      <text:p text:style-name="Quotations">La aldea existía alrededor de él…<text:line-break/>como si el templo hubiese estado allí antes que los hombres.</text:p>
      <text:p text:style-name="Quotations">Algunos decían que los muros susurraban durante las tormentas.</text:p>
      <text:p text:style-name="Quotations">Otros afirmaban que bajo la piedra dormían conocimientos prohibidos.</text:p>
      <text:p text:style-name="Quotations">Solo un hombre descendía a las profundidades del templo.</text:p>
      <text:p text:style-name="Quotations">Khrom.</text:p>
      <text:p text:style-name="Text_20_body">Final corto.<text:line-break/>Misterioso.</text:p>
      <text:p text:style-name="Horizontal_20_Line"/>
      <text:h text:style-name="Heading_20_1" text:outline-level="1">VIÑETA 2 — La Pregunta</text:h>
      <text:p text:style-name="Text_20_body">Visual:</text:p>
      <text:list xml:id="list728260472" text:style-name="L9">
        <text:list-item>
          <text:p text:style-name="P10">Elara y Khrom dentro del templo</text:p>
        </text:list-item>
        <text:list-item>
          <text:p text:style-name="P10">fuego tenue</text:p>
        </text:list-item>
        <text:list-item>
          <text:p text:style-name="P10">columnas enormes</text:p>
        </text:list-item>
        <text:list-item>
          <text:p text:style-name="P10">oscuridad</text:p>
        </text:list-item>
      </text:list>
      <text:p text:style-name="Text_20_body">Texto minimalista:</text:p>
      <text:p text:style-name="Quotations">— ¿Por qué estoy despierta?</text:p>
      <text:p text:style-name="Quotations">— Porque lo que eres lo exige. — respondió Khrom.</text:p>
      <text:p text:style-name="Quotations">— ¿Y qué soy?</text:p>
      <text:p text:style-name="Quotations"><text:soft-page-break/>Khrom permaneció en silencio.</text:p>
      <text:p text:style-name="Quotations">Luego dijo:</text:p>
      <text:p text:style-name="Quotations">— Esa es la pregunta correcta.</text:p>
      <text:p text:style-name="Text_20_body">Fin.</text:p>
      <text:p text:style-name="Text_20_body">Esto funciona MUY bien para redes.</text:p>
      <text:p text:style-name="Horizontal_20_Line"/>
      <text:h text:style-name="Heading_20_1" text:outline-level="1">VIÑETA 3 — El Descenso</text:h>
      <text:p text:style-name="Text_20_body">Visual:</text:p>
      <text:list xml:id="list1599176658" text:style-name="L10">
        <text:list-item>
          <text:p text:style-name="P11">Khrom con antorcha</text:p>
        </text:list-item>
        <text:list-item>
          <text:p text:style-name="P11">escalera infinita</text:p>
        </text:list-item>
        <text:list-item>
          <text:p text:style-name="P11">oscuridad total</text:p>
        </text:list-item>
      </text:list>
      <text:p text:style-name="Text_20_body">Texto:</text:p>
      <text:p text:style-name="Quotations">Khrom tomó una antorcha.</text:p>
      <text:p text:style-name="Quotations">Y comenzó a descender.</text:p>
      <text:p text:style-name="Quotations">La escalera parecía hundirse hacia el centro del mundo.</text:p>
      <text:p text:style-name="Quotations">Elara sintió miedo.</text:p>
      <text:p text:style-name="Quotations">No de la oscuridad.</text:p>
      <text:p text:style-name="Quotations">Sino de lo que podía encontrar bajo ella.</text:p>
      <text:p text:style-name="Text_20_body">Final abierto.</text:p>
      <text:p text:style-name="Horizontal_20_Line"/>
      <text:h text:style-name="Heading_20_1" text:outline-level="1">VIÑETA 4 — Los Escritos</text:h>
      <text:p text:style-name="Text_20_body">Visual:</text:p>
      <text:list xml:id="list2026763278" text:style-name="L11">
        <text:list-item>
          <text:p text:style-name="P12">cámara subterránea</text:p>
        </text:list-item>
        <text:list-item>
          <text:p text:style-name="P12">manuscritos</text:p>
        </text:list-item>
        <text:list-item>
          <text:p text:style-name="P12">piedra antigua</text:p>
        </text:list-item>
        <text:list-item>
          <text:p text:style-name="P12">símbolos</text:p>
        </text:list-item>
        <text:list-item>
          <text:p text:style-name="P12"><text:soft-page-break/>polvo</text:p>
        </text:list-item>
        <text:list-item>
          <text:p text:style-name="P12">luz naranja</text:p>
        </text:list-item>
      </text:list>
      <text:p text:style-name="Text_20_body">Aquí aparece Fabhrius.</text:p>
      <text:p text:style-name="Text_20_body">Y honestamente:<text:line-break/>la versión en inglés que escribiste es MUY superior.</text:p>
      <text:p text:style-name="Text_20_body">Tiene tono mítico.<text:line-break/>Poético.<text:line-break/>Antiguo.</text:p>
      <text:p text:style-name="Text_20_body">Yo solo ajustaría un poco el ritmo:</text:p>
      <text:p text:style-name="Quotations">“No mind can carry the whole shape of the world.</text:p>
      <text:p text:style-name="Quotations">To perceive<text:line-break/>is to carve away.</text:p>
      <text:p text:style-name="Quotations">Every vision is a fragment.</text:p>
      <text:p text:style-name="Quotations">Every truth,<text:line-break/>a reflection upon dark water.</text:p>
      <text:p text:style-name="Quotations">What you call reality<text:line-break/>is only the form your spirit is able to contain.</text:p>
      <text:p text:style-name="Quotations">Thus,<text:line-break/>all beings walk within invisible boundaries…</text:p>
      <text:p text:style-name="Quotations">seeing,<text:line-break/>and not seeing.</text:p>
      <text:p text:style-name="Quotations">— Fabhrius”</text:p>
      <text:p text:style-name="Text_20_body">Eso suena realmente como un fragmento ancestral.</text:p>
      <text:p text:style-name="Horizontal_20_Line"/>
      <text:h text:style-name="Heading_20_1" text:outline-level="1">VIÑETA 5 — La Comprensión</text:h>
      <text:p text:style-name="Text_20_body">Visual:</text:p>
      <text:list xml:id="list663143086" text:style-name="L12">
        <text:list-item>
          <text:p text:style-name="P13">Elara leyendo</text:p>
        </text:list-item>
        <text:list-item>
          <text:p text:style-name="P13">mirada perturbada</text:p>
        </text:list-item>
        <text:list-item>
          <text:p text:style-name="P13">oscuridad alrededor</text:p>
        </text:list-item>
      </text:list>
      <text:p text:style-name="Text_20_body">Texto interno:</text:p>
      <text:p text:style-name="Quotations"><text:soft-page-break/>Ella siempre creyó que el mundo era exactamente como lo percibía.</text:p>
      <text:p text:style-name="Quotations">Claro.<text:line-break/>Sólido.<text:line-break/>Cierto.</text:p>
      <text:p text:style-name="Quotations">Pero cada viajero describía una verdad distinta.</text:p>
      <text:p text:style-name="Quotations">Cada pueblo veía un mundo diferente.</text:p>
      <text:p text:style-name="Quotations">Entonces comprendió:</text:p>
      <text:p text:style-name="Quotations">las personas no ven la realidad.</text:p>
      <text:p text:style-name="Quotations">Ven la forma que sus mentes son capaces de contener.</text:p>
      <text:p text:style-name="Text_20_body">Y terminar ahí.</text:p>
      <text:p text:style-name="Text_20_body">NO explicar demasiado.</text:p>
      <text:p text:style-name="Horizontal_20_Line"/>
      <text:h text:style-name="Heading_20_1" text:outline-level="1">Algo muy importante</text:h>
      <text:p text:style-name="Text_20_body">Tu intuición es correcta:</text:p>
      <text:h text:style-name="Heading_20_2" text:outline-level="2">El final debe quedar inquietante.</text:h>
      <text:p text:style-name="Text_20_body">No conclusivo.</text:p>
      <text:p text:style-name="Text_20_body">Porque el objetivo no es enseñar una lección.<text:line-break/>Es abrir una grieta mental.</text:p>
      <text:p text:style-name="Text_20_body">La audiencia debe terminar pensando:</text:p>
      <text:list xml:id="list2033651567" text:style-name="L13">
        <text:list-item>
          <text:p text:style-name="P14">“eso es verdad…”</text:p>
        </text:list-item>
        <text:list-item>
          <text:p text:style-name="P14">“nunca lo había pensado”</text:p>
        </text:list-item>
        <text:list-item>
          <text:p text:style-name="P14">“¿y si realmente vemos solo fragmentos?”</text:p>
        </text:list-item>
        <text:list-item>
          <text:p text:style-name="P14">“¿qué más no podemos percibir?”</text:p>
        </text:list-item>
      </text:list>
      <text:p text:style-name="Text_20_body">Ahí aparece el poder viral filosófico de Fabhrius.</text:p>
      <text:p text:style-name="Horizontal_20_Line"/>
      <text:h text:style-name="Heading_20_1" text:outline-level="1">Además…</text:h>
      <text:p text:style-name="Text_20_body">Esto introduce elegantemente:</text:p>
      <text:list xml:id="list531539327" text:style-name="L14">
        <text:list-item>
          <text:p text:style-name="P15"><text:soft-page-break/>el templo,</text:p>
        </text:list-item>
        <text:list-item>
          <text:p text:style-name="P15">Khrom,</text:p>
        </text:list-item>
        <text:list-item>
          <text:p text:style-name="P15">el conocimiento antiguo,</text:p>
        </text:list-item>
        <text:list-item>
          <text:p text:style-name="P15">la motivación de Elara,</text:p>
        </text:list-item>
        <text:list-item>
          <text:p text:style-name="P15">y la filosofía central del universo</text:p>
        </text:list-item>
      </text:list>
      <text:p text:style-name="Text_20_body">sin parecer exposición forzada.</text:p>
      <text:p text:style-name="Text_20_body">Eso es muy difícil de lograr.<text:line-break/>Y aquí está funcionando muy bien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3T16:54:19.801000000</meta:creation-date>
    <dc:date>2026-05-23T16:56:54.287000000</dc:date>
    <meta:editing-duration>PT2M35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0" meta:paragraph-count="224" meta:word-count="1294" meta:character-count="7597" meta:non-whitespace-character-count="6561"/>
  </office:meta>
</office:document-meta>
</file>