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Sí. De todo lo que hablamos, creo que esos puntos son los que probablemente tengan más impacto en Facebook:</text:p>
      <text:list xml:id="list2438696649" text:style-name="L1">
        <text:list-item>
          <text:p text:style-name="P1"><text:span text:style-name="Strong_20_Emphasis">Publicar cuando tu audiencia está activa</text:span> (por ejemplo, domingo por la tarde-noche si observas que ahí recibes más interacción).</text:p>
        </text:list-item>
        <text:list-item>
          <text:p text:style-name="P1"><text:span text:style-name="Strong_20_Emphasis">Un caption que genere curiosidad antes del texto.</text:span></text:p>
        </text:list-item>
        <text:list-item>
          <text:p text:style-name="P1"><text:span text:style-name="Strong_20_Emphasis">Fragmentos breves y fáciles de leer</text:span> en el móvil.</text:p>
        </text:list-item>
        <text:list-item>
          <text:p text:style-name="P1"><text:span text:style-name="Strong_20_Emphasis">Título y numeración clara</text:span> para que los lectores sepan dónde están en la historia.</text:p>
        </text:list-item>
        <text:list-item>
          <text:p text:style-name="P1"><text:span text:style-name="Strong_20_Emphasis">Una pregunta final</text:span> que invite a responder.</text:p>
        </text:list-item>
        <text:list-item>
          <text:p text:style-name="P1"><text:span text:style-name="Strong_20_Emphasis">Indicar que la historia continúa</text:span> para fomentar el seguimiento.</text:p>
        </text:list-item>
      </text:list>
      <text:p text:style-name="Text_20_body">Podrías usar una estructura fija como esta:</text:p>
      <text:p text:style-name="Text_20_body"><text:span text:style-name="Strong_20_Emphasis">Título de la novela</text:span><text:line-break/>Capítulo 3 — Fragmento 12</text:p>
      <text:p text:style-name="Text_20_body"><text:span text:style-name="Strong_20_Emphasis">Caption</text:span></text:p>
      <text:p text:style-name="Quotations">Mientras busca una explicación científica para la existencia, la viajera encuentra un manuscrito que contradice todo lo que su mundo cree saber sobre el alma.</text:p>
      <text:p text:style-name="Text_20_body"><text:span text:style-name="Strong_20_Emphasis">Fragmento</text:span><text:line-break/>(150–300 palabras)</text:p>
      <text:p text:style-name="Text_20_body"><text:span text:style-name="Strong_20_Emphasis">Cierre</text:span></text:p>
      <text:p text:style-name="Quotations">Continuará...</text:p>
      <text:p text:style-name="Text_20_body"><text:span text:style-name="Strong_20_Emphasis">Pregunta</text:span></text:p>
      <text:p text:style-name="Quotations">Si descubrieras una verdad demostrable que destruyera las creencias de toda tu sociedad, ¿la revelarías?</text:p>
      <text:p text:style-name="Text_20_body">La numeración es más importante de lo que parece. Mucha gente llega a una publicación aislada desde el feed del grupo y no sabe si está leyendo el principio, la mitad o el final de una historia. Un simple "Capítulo 7 — Fragmento 23" les da contexto inmediatamente.</text:p>
      <text:p text:style-name="Text_20_body">Otra cosa que suele funcionar bien para historias por entregas es mantener una cadencia predecible. Si publicas siempre a horas parecidas, algunos lectores empiezan a esperarlo. Es parecido a una serie de televisión: parte del interés viene de la continuidad.</text:p>
      <text:p text:style-name="Text_20_body">Y dado el tema de tu novela, yo destacaría siempre el conflicto intelectual en el caption. No "La protagonista llegó a una ciudad", sino algo como:</text:p>
      <text:p text:style-name="Quotations">En un mundo donde la verdad se considera sagrada, una viajera comienza a sospechar que incluso los dioses obedecen leyes matemáticas.</text:p>
      <text:p text:style-name="Text_20_body"><text:soft-page-break/>Eso comunica de inmediato qué hace especial a tu historia y puede atraer a lectores interesados en filosofía, ciencia y fantasí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9T20:41:45.097000000</meta:creation-date>
    <dc:date>2026-05-29T20:42:30.711000000</dc:date>
    <meta:editing-duration>PT45S</meta:editing-duration>
    <meta:editing-cycles>1</meta:editing-cycles>
    <meta:document-statistic meta:table-count="0" meta:image-count="0" meta:object-count="0" meta:page-count="2" meta:paragraph-count="21" meta:word-count="309" meta:character-count="1872" meta:non-whitespace-character-count="1589"/>
    <meta:generator>LibreOffice/7.3.5.2$Windows_X86_64 LibreOffice_project/184fe81b8c8c30d8b5082578aee2fed2ea847c01</meta:generator>
  </office:meta>
</office:document-meta>
</file>