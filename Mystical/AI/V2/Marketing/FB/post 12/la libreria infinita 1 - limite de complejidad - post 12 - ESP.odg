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CFD9FAEA94A2342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Lucida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aebae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1" style:font-size-asian="15pt" style:font-style-asian="normal" style:font-weight-asian="normal" style:font-name-complex="Lucida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de78a" loext:opacity="100%" style:font-name="Script MT Bold" fo:font-size="15pt" style:font-size-asian="15pt" style:font-size-complex="15pt"/>
    </style:style>
    <style:style style:name="T10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8.715cm" svg:height="26.265cm" svg:x="1.217cm" svg:y="1.017cm">
          <draw:text-box>
            <text:p text:style-name="P1"><text:span text:style-name="T1">( Omniscientis — Fragmento XII </text:span><text:span text:style-name="T2">— El Templo de la Lluvia — Parte VI )</text:span></text:p>
            <text:p text:style-name="P2"><text:span text:style-name="T3"><text:tab/></text:span><text:span text:style-name="T3"><text:tab/></text:span><text:span text:style-name="T3"><text:tab/></text:span><text:span text:style-name="T4">E</text:span><text:span text:style-name="T5">lara siguió a Khrom a través de los pasajes del Templo de la Lluvia. Esperaba encontrar algunos textos antiguos. Nada la había preparado para lo que vio.</text:span></text:p>
            <text:p text:style-name="P2"><text:span text:style-name="T5"/></text:p>
            <text:p><text:span text:style-name="T5">Pasillos interminables se perdían en la oscuridad. Puentes de piedra conectaban galerías excavadas en la roca.</text:span></text:p>
            <text:p><text:span text:style-name="T5">Miles. Decenas de miles. Quizá más. Una ciudad de libros.</text:span></text:p>
            <text:p><text:span text:style-name="T5"/></text:p>
            <text:p text:style-name="P3"><text:span text:style-name="T5">Una biblioteca infinita.</text:span></text:p>
            <text:p><text:span text:style-name="T5"/></text:p>
            <text:p text:style-name="P4"><text:span text:style-name="T5">Elara permaneció inmóvil.</text:span></text:p>
            <text:p text:style-name="P4"><text:span text:style-name="T5">—</text:span><text:span text:style-name="T5">¿Quién escribió todo esto? —preguntó.</text:span></text:p>
            <text:p text:style-name="P4"><text:span text:style-name="T5">Volvió a observar la inmensidad que se extendía ante ella.</text:span></text:p>
            <text:p text:style-name="P3"><text:span text:style-name="T5">La leyenda era verdad.</text:span></text:p>
            <text:p><text:span text:style-name="T5"/></text:p>
            <text:p><text:span text:style-name="T5">Si los antiguos Acquahrkai 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habían reunido allí su conocimiento…</text:span></text:p>
            <text:p><text:span text:style-name="T5"/></text:p>
            <text:p><text:span text:style-name="T5">entonces las respuestas que había buscado durante toda su vida podían encontrarse en alguna parte de aquella oscuridad.</text:span><text:span text:style-name="T6"><text:tab/></text:span><text:span text:style-name="T6"><text:tab/>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ontinuará</text:span><text:span text:style-name="T9">…</text:span></text:p>
            <text:p text:style-name="P1"><text:span text:style-name="T1">( De</text:span><text:span text:style-name="T10"> “Omniscientis”, 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CFD9FAEA94A2342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09T17:56:31.483000000</dc:date>
    <meta:editing-duration>PT6H4M27S</meta:editing-duration>
    <meta:editing-cycles>39</meta:editing-cycles>
    <meta:generator>LibreOffice/7.3.5.2$Windows_X86_64 LibreOffice_project/184fe81b8c8c30d8b5082578aee2fed2ea847c01</meta:generator>
    <meta:document-statistic meta:object-count="1"/>
  </office:meta>
</office:document-meta>
</file>