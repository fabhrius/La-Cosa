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ara siguió a Khrom a través de los antiguos pasajes del Templo de la Lluvia.</text:p>
      <text:p text:style-name="Text_20_body">Esperaba encontrar algunos textos antiguos.</text:p>
      <text:p text:style-name="Text_20_body">Nada la había preparado para lo que vio.</text:p>
      <text:p text:style-name="Text_20_body">Pasillos interminables se perdían en la oscuridad.</text:p>
      <text:p text:style-name="Text_20_body">Puentes de piedra conectaban galerías excavadas en la roca.</text:p>
      <text:p text:style-name="Text_20_body">Miles.</text:p>
      <text:p text:style-name="Text_20_body">Decenas de miles.</text:p>
      <text:p text:style-name="Text_20_body">Quizá más.</text:p>
      <text:p text:style-name="Text_20_body">Una ciudad de libros.</text:p>
      <text:p text:style-name="Text_20_body">Una biblioteca infinita.</text:p>
      <text:p text:style-name="Text_20_body">Elara permaneció inmóvil.</text:p>
      <text:p text:style-name="Text_20_body">—¿Quién escribió todo esto? —preguntó.</text:p>
      <text:p text:style-name="Text_20_body">Volvió a observar la inmensidad que se extendía ante ella.</text:p>
      <text:p text:style-name="Text_20_body">La leyenda era verdad.</text:p>
      <text:p text:style-name="Text_20_body">Si los antiguos Acquahrkai habían reunido allí su conocimiento...</text:p>
      <text:p text:style-name="Text_20_body">entonces las respuestas que había buscado durante toda su vida podían encontrarse en alguna parte de aquella oscuridad.</text:p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Elara followed Khrom through the ancient passages beneath the Temple of Rain.</text:p>
      <text:p text:style-name="Text_20_body">She expected to find a few old texts.</text:p>
      <text:p text:style-name="Text_20_body">Nothing had prepared her for what she saw.</text:p>
      <text:p text:style-name="Text_20_body">Endless corridors vanished into the darkness.</text:p>
      <text:p text:style-name="Text_20_body">Stone bridges connected galleries carved deep into the rock.</text:p>
      <text:p text:style-name="Text_20_body">Thousands.</text:p>
      <text:p text:style-name="Text_20_body">Tens of thousands.</text:p>
      <text:p text:style-name="Text_20_body">Perhaps more.</text:p>
      <text:p text:style-name="Text_20_body">A city of books.</text:p>
      <text:p text:style-name="Text_20_body">An infinite library.</text:p>
      <text:p text:style-name="Text_20_body">Elara stood motionless.</text:p>
      <text:p text:style-name="Text_20_body">“Who wrote all of this?” she asked.</text:p>
      <text:p text:style-name="Text_20_body">She looked once more at the vast expanse stretching before her.</text:p>
      <text:p text:style-name="Text_20_body">The legend was true.</text:p>
      <text:p text:style-name="Text_20_body">If the ancient Acquahrkai had gathered their knowledge here...</text:p>
      <text:p text:style-name="Text_20_body">then the answers she had been searching for her entire life might be hidden somewhere within that darknes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9T17:06:38.876000000</meta:creation-date>
    <dc:date>2026-06-09T19:59:49.274000000</dc:date>
    <meta:editing-duration>PT1H6M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2" meta:word-count="214" meta:character-count="1323" meta:non-whitespace-character-count="1141"/>
  </office:meta>
</office:document-meta>
</file>