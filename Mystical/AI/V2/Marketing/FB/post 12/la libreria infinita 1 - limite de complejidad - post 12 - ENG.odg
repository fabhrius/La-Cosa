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CFD9FAEA94A2342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10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2pt" style:font-size-asian="22pt" style:font-size-complex="22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1" style:font-size-asian="22pt" style:font-style-asian="normal" style:font-weight-asian="normal" style:font-name-complex="Lucida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1" style:font-size-asian="15pt" style:font-style-asian="normal" style:font-weight-asian="normal" style:font-name-complex="Lucida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aebae" loext:opacity="100%" style:font-name="Script MT Bold" fo:font-size="15pt" style:font-size-asian="15pt" style:font-size-complex="15pt"/>
    </style:style>
    <style:style style:name="T8" style:family="text">
      <style:text-properties fo:color="#fde78a" loext:opacity="100%" style:font-name="Script MT Bold" fo:font-size="15pt" style:font-size-asian="15pt" style:font-size-complex="15pt"/>
    </style:style>
    <style:style style:name="T9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8.932cm" svg:height="26.38cm" svg:x="1cm" svg:y="0.917cm">
          <draw:text-box>
            <text:p text:style-name="P1"><text:span text:style-name="T1">( Omniscientis — Fragment XII </text:span><text:span text:style-name="T2">— The Temple of Rain — Part VI )</text:span></text:p>
            <text:p text:style-name="P2"><text:span text:style-name="T3"><text:tab/></text:span><text:span text:style-name="T3"><text:tab/></text:span><text:span text:style-name="T4">E</text:span><text:span text:style-name="T5">lara followed Khrom through the ancient passages beneath the Temple of Rain. She expected to find a few old texts. Nothing had prepared her for what she saw.</text:span></text:p>
            <text:p text:style-name="P2"><text:span text:style-name="T5"/></text:p>
            <text:p text:style-name="P2"><text:span text:style-name="T5">Endless corridors vanished into the darkness. Stone bridges connected galleries carved deep into the rock. </text:span></text:p>
            <text:p text:style-name="P2"><text:span text:style-name="T5">Thousands. Tens of thousands. Perhaps more. A city of books.</text:span></text:p>
            <text:p text:style-name="P2"><text:span text:style-name="T5"/></text:p>
            <text:p text:style-name="P1"><text:span text:style-name="T5">An infinite library.</text:span></text:p>
            <text:p text:style-name="P2"><text:span text:style-name="T5"/></text:p>
            <text:p text:style-name="P3"><text:span text:style-name="T5">Elara stood motionless.</text:span></text:p>
            <text:p text:style-name="P3"><text:span text:style-name="T5">—</text:span><text:span text:style-name="T5">Who wrote all of this?— she asked.</text:span></text:p>
            <text:p text:style-name="P3"><text:span text:style-name="T5">She looked once more at the vast expanse stretching before her.</text:span></text:p>
            <text:p text:style-name="P1"><text:span text:style-name="T5">The legend was true.</text:span></text:p>
            <text:p text:style-name="P2"><text:span text:style-name="T5"/></text:p>
            <text:p text:style-name="P2"><text:span text:style-name="T5">If the ancient Acquahrkai 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had gathered their knowledge here…</text:span></text:p>
            <text:p text:style-name="P2"><text:span text:style-name="T5"/></text:p>
            <text:p text:style-name="P2"><text:span text:style-name="T5">then the answers she had been searching for her entire life might be hidden somewhere within that darkness. 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To be continued</text:span><text:span text:style-name="T8">…</text:span></text:p>
            <text:p text:style-name="P1"><text:span text:style-name="T1">(From</text:span><text:span text:style-name="T9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600CFD9FAEA94A2342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09T18:29:21.110000000</dc:date>
    <meta:editing-duration>PT3H46M3S</meta:editing-duration>
    <meta:editing-cycles>36</meta:editing-cycles>
    <meta:generator>LibreOffice/7.3.5.2$Windows_X86_64 LibreOffice_project/184fe81b8c8c30d8b5082578aee2fed2ea847c01</meta:generator>
    <meta:document-statistic meta:object-count="1"/>
  </office:meta>
</office:document-meta>
</file>