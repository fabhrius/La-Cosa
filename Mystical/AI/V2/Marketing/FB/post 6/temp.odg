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40051921403A9A999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2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6.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style:writing-mode="lr-tb"/>
      <style:text-properties fo:color="#fde78a" loext:opacity="100%"/>
    </style:style>
    <style:style style:name="T1" style:family="text">
      <style:text-properties fo:color="#fde78a" loext:opacity="100%" style:font-name="Sans Serif Collection" fo:font-size="12pt" style:font-size-asian="12pt" style:font-size-complex="12pt"/>
    </style:style>
    <style:style style:name="T2" style:family="text">
      <style:text-properties fo:color="#fde78a" loext:opacity="100%" style:font-name="EB Garamond" fo:font-size="24pt" style:font-size-asian="24pt" style:font-size-complex="24pt"/>
    </style:style>
    <style:style style:name="T3" style:family="text">
      <style:text-properties fo:color="#fde78a" loext:opacity="100%" style:font-name="Script MT Bol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4cm" svg:height="17.292cm" svg:x="1cm" svg:y="1.006cm">
          <draw:image xlink:href="Pictures/10000000000006000000040051921403A9A999FB.png" xlink:type="simple" xlink:show="embed" xlink:actuate="onLoad" draw:mime-type="image/png">
            <text:p/>
          </draw:image>
        </draw:frame>
        <draw:frame draw:style-name="gr2" draw:text-style-name="P3" draw:layer="layout" svg:width="25.4cm" svg:height="16.572cm" svg:x="1.317cm" svg:y="1.317cm">
          <draw:text-box>
            <text:p text:style-name="P2"><text:span text:style-name="T1">( Omniscientis — Fragment VI )</text:span></text:p>
            <text:p text:style-name="P2"><text:span text:style-name="T1"/></text:p>
            <text:p text:style-name="P2"><text:span text:style-name="T2">Beyond the valleys of Lluviara,</text:span></text:p>
            <text:p text:style-name="P2"><text:span text:style-name="T2">buried beneath ruins older than memory,</text:span></text:p>
            <text:p text:style-name="P2"><text:span text:style-name="T2">the forgotten knowledge of a vanished world still endured.</text:span></text:p>
            <text:p text:style-name="P2"><text:span text:style-name="T2"/></text:p>
            <text:p text:style-name="P2"><text:span text:style-name="T2">Silent.</text:span></text:p>
            <text:p text:style-name="P2"><text:span text:style-name="T2"/></text:p>
            <text:p text:style-name="P2"><text:span text:style-name="T2">As if, for centuries,</text:span></text:p>
            <text:p text:style-name="P2"><text:span text:style-name="T2">it had been waiting…</text:span></text:p>
            <text:p text:style-name="P2"><text:span text:style-name="T2"/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for her.</text:span></text:p>
            <text:p text:style-name="P2"><text:span text:style-name="T3"/></text:p>
            <text:p text:style-name="P2"><text:span text:style-name="T3"><text:tab/>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o be continued…</text:span></text:p>
            <text:p text:style-name="P2"><text:span text:style-name="T1">(From “Omniscientis”, the lost codex of Lluviara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cript MT Bold" svg:font-family="'Script MT Bold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5-19T19:38:06.143000000</dc:date>
    <meta:editing-duration>PT31M11S</meta:editing-duration>
    <meta:editing-cycles>3</meta:editing-cycles>
    <meta:generator>LibreOffice/7.3.5.2$Windows_X86_64 LibreOffice_project/184fe81b8c8c30d8b5082578aee2fed2ea847c01</meta:generator>
    <meta:document-statistic meta:object-count="2"/>
  </office:meta>
</office:document-meta>
</file>