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51921403A9A999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5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 style:writing-mode="lr-tb"/>
      <style:text-properties fo:color="#faebae" loext:opacity="100%"/>
    </style:style>
    <style:style style:name="T1" style:family="text">
      <style:text-properties fo:color="#fde78a" loext:opacity="100%" style:font-name="Sans Serif Collection" fo:font-size="12pt" style:font-size-asian="12pt" style:font-size-complex="12pt"/>
    </style:style>
    <style:style style:name="T2" style:family="text">
      <style:text-properties fo:color="#fde78a" loext:opacity="100%" style:font-name="EB Garamond" fo:font-size="24pt" style:font-size-asian="24pt" style:font-size-complex="24pt"/>
    </style:style>
    <style:style style:name="T3" style:family="text">
      <style:text-properties fo:color="#fde78a" loext:opacity="100%"/>
    </style:style>
    <style:style style:name="T4" style:family="text">
      <style:text-properties fo:color="#fde78a" loext:opacity="100%" style:font-name="Script MT Bold" fo:font-size="15pt" style:font-size-asian="15pt" style:font-size-complex="15pt"/>
    </style:style>
    <style:style style:name="T5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5.939cm" svg:height="17.292cm" svg:x="1.061cm" svg:y="3.075cm">
          <draw:image xlink:href="Pictures/10000000000006000000040051921403A9A999FB.png" xlink:type="simple" xlink:show="embed" xlink:actuate="onLoad" draw:mime-type="image/png">
            <text:p text:style-name="P1"><text:span text:style-name="T1">( Omniscientis — Fragment VI )</text:span></text:p>
            <text:p text:style-name="P2"><text:span text:style-name="T2"/></text:p>
            <text:p text:style-name="P1"><text:span text:style-name="T2">Beyond the valleys of Lluviara,</text:span></text:p>
            <text:p text:style-name="P1"><text:span text:style-name="T2">buried beneath ruins older than memory,</text:span></text:p>
            <text:p text:style-name="P1"><text:span text:style-name="T2">the knowledge of a vanished world still endured.</text:span></text:p>
            <text:p text:style-name="P1"><text:span text:style-name="T2"/></text:p>
            <text:p text:style-name="P1"><text:span text:style-name="T2">Silent.</text:span></text:p>
            <text:p text:style-name="P1"><text:span text:style-name="T2"/></text:p>
            <text:p text:style-name="P1"><text:span text:style-name="T2">As if, for centuries,</text:span></text:p>
            <text:p text:style-name="P1"><text:span text:style-name="T2">it had been waiting…</text:span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or her.</text:span></text:p>
            <text:p text:style-name="P1"><text:span text:style-name="T3"/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To be continued…</text:span></text:p>
            <text:p text:style-name="P1"><text:span text:style-name="T1">(From “Omniscientis”, the lost codex of Lluviara)</text:span><text:span text:style-name="T5"><text:tab/>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10T18:39:13.472000000</meta:creation-date>
    <dc:date>2026-05-17T18:04:16.466000000</dc:date>
    <meta:editing-duration>PT41M35S</meta:editing-duration>
    <meta:editing-cycles>10</meta:editing-cycles>
    <meta:generator>LibreOffice/7.3.5.2$Windows_X86_64 LibreOffice_project/184fe81b8c8c30d8b5082578aee2fed2ea847c01</meta:generator>
    <meta:document-statistic meta:object-count="1"/>
  </office:meta>
</office:document-meta>
</file>