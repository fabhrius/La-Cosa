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Exacto.<text:line-break/>👉 Ahora el desafío ya no es “ser visto”.<text:line-break/>El desafío es:</text:p>
      <text:p text:style-name="Quotations">mantener una continuidad narrativa que haga que la gente quiera regresar.</text:p>
      <text:p text:style-name="Text_20_body">Y has identificado correctamente el problema central:</text:p>
      <text:h text:style-name="Heading_20_2" text:outline-level="2">⚠️ Riesgo</text:h>
      <text:p text:style-name="Text_20_body">Si alternas mal:</text:p>
      <text:list xml:id="list2843552123" text:style-name="L1">
        <text:list-item>
          <text:p text:style-name="P1">las frases filosóficas generan interés</text:p>
        </text:list-item>
        <text:list-item>
          <text:p text:style-name="P1">pero las escenas narrativas pueden parecer “menos importantes”</text:p>
        </text:list-item>
      </text:list>
      <text:p text:style-name="Text_20_body">👉 Entonces el lector espera a Fabhrius y pierde interés en Elara.</text:p>
      <text:p text:style-name="Horizontal_20_Line"/>
      <text:h text:style-name="Heading_20_1" text:outline-level="1">🧠 La solución NO es separar ambas cosas</text:h>
      <text:p text:style-name="Text_20_body">La clave es:<text:line-break/>👉 hacer que las escenas de Elara PAREZCAN consecuencia de las verdades de Fabhrius.</text:p>
      <text:p text:style-name="Text_20_body">Entonces:</text:p>
      <text:list xml:id="list2417065127" text:style-name="L2">
        <text:list-item>
          <text:p text:style-name="P2">el conocimiento crea expectativa</text:p>
        </text:list-item>
        <text:list-item>
          <text:p text:style-name="P2">la historia demuestra el conocimiento</text:p>
        </text:list-item>
        <text:list-item>
          <text:p text:style-name="P2">ambos se potencian mutuamente</text:p>
        </text:list-item>
      </text:list>
      <text:p text:style-name="Horizontal_20_Line"/>
      <text:h text:style-name="Heading_20_1" text:outline-level="1">🎯 Fórmula correcta</text:h>
      <text:h text:style-name="Heading_20_2" text:outline-level="2">🔹 Fabhrius</text:h>
      <text:p text:style-name="Text_20_body">Revela el límite.</text:p>
      <text:h text:style-name="Heading_20_2" text:outline-level="2">🔹 Elara</text:h>
      <text:p text:style-name="Text_20_body">Lo experimenta.</text:p>
      <text:p text:style-name="Text_20_body">👉 Esa conexión debe sentirse aunque no se explique directamente.</text:p>
      <text:p text:style-name="Horizontal_20_Line"/>
      <text:h text:style-name="Heading_20_1" text:outline-level="1"><text:soft-page-break/>🔥 Ejemplo práctico</text:h>
      <text:h text:style-name="Heading_20_2" text:outline-level="2">Semana 1 — Fabhrius</text:h>
      <text:p text:style-name="Quotations">No mind can foresee every consequence…</text:p>
      <text:p text:style-name="Horizontal_20_Line"/>
      <text:h text:style-name="Heading_20_2" text:outline-level="2">Semana 2 — Elara</text:h>
      <text:p text:style-name="Quotations">She crossed the mountains believing she still had time to return.</text:p>
      <text:p text:style-name="Quotations">She was wrong.</text:p>
      <text:p text:style-name="Text_20_body">👉 Aquí:</text:p>
      <text:list xml:id="list4284414354" text:style-name="L3">
        <text:list-item>
          <text:p text:style-name="P3">NO explicas el límite</text:p>
        </text:list-item>
        <text:list-item>
          <text:p text:style-name="P3">pero el lector siente la consecuencia de la incertidumbre</text:p>
        </text:list-item>
      </text:list>
      <text:p text:style-name="Horizontal_20_Line"/>
      <text:h text:style-name="Heading_20_1" text:outline-level="1">🧠 Esto es MUY importante</text:h>
      <text:p text:style-name="Text_20_body">No debes pensar:</text:p>
      <text:p text:style-name="Quotations">“post filosófico” y “post narrativo”</text:p>
      <text:p text:style-name="Text_20_body">Debes pensar:</text:p>
      <text:p text:style-name="Quotations">“teoría” y “manifestación”</text:p>
      <text:p text:style-name="Horizontal_20_Line"/>
      <text:h text:style-name="Heading_20_1" text:outline-level="1">🎬 Entonces, ¿cómo estructuramos las viñetas semanales?</text:h>
      <text:p text:style-name="Text_20_body">Te propongo una arquitectura narrativa cíclica.</text:p>
      <text:p text:style-name="Horizontal_20_Line"/>
      <text:h text:style-name="Heading_20_1" text:outline-level="1"><text:soft-page-break/>📚 ESTRUCTURA SEMANAL</text:h>
      <text:h text:style-name="Heading_20_2" text:outline-level="2">🔹 Día 1 — Fragmento de Omniscientis</text:h>
      <text:p text:style-name="Text_20_body">(verdad profunda)</text:p>
      <text:p text:style-name="Text_20_body">Objetivo:<text:line-break/>👉 enganchar intelectualmente</text:p>
      <text:p text:style-name="Horizontal_20_Line"/>
      <text:h text:style-name="Heading_20_2" text:outline-level="2">🔹 Día 2 — Escena narrativa</text:h>
      <text:p text:style-name="Text_20_body">(Elara vive esa verdad)</text:p>
      <text:p text:style-name="Text_20_body">Objetivo:<text:line-break/>👉 emoción y consecuencia</text:p>
      <text:p text:style-name="Horizontal_20_Line"/>
      <text:h text:style-name="Heading_20_2" text:outline-level="2">🔹 Día 3 — Mundo / atmósfera</text:h>
      <text:p text:style-name="Text_20_body">(Lluviara)</text:p>
      <text:p text:style-name="Text_20_body">Objetivo:<text:line-break/>👉 inmersión</text:p>
      <text:p text:style-name="Horizontal_20_Line"/>
      <text:h text:style-name="Heading_20_2" text:outline-level="2">🔹 Día 4 — Revelación o cliffhanger</text:h>
      <text:p text:style-name="Text_20_body">(algo cambia)</text:p>
      <text:p text:style-name="Text_20_body">Objetivo:<text:line-break/>👉 continuidad</text:p>
      <text:p text:style-name="Horizontal_20_Line"/>
      <text:h text:style-name="Heading_20_1" text:outline-level="1">🔥 Ejemplo completo</text:h>
      <text:p text:style-name="Horizontal_20_Line"/>
      <text:h text:style-name="Heading_20_2" text:outline-level="2">1️⃣ Fabhrius</text:h>
      <text:p text:style-name="Quotations">No system can fully comprehend itself.</text:p>
      <text:p text:style-name="Horizontal_20_Line"/>
      <text:h text:style-name="Heading_20_2" text:outline-level="2"><text:soft-page-break/>2️⃣ Elara</text:h>
      <text:p text:style-name="Quotations">For the first time, Elara feared her own thoughts.</text:p>
      <text:p text:style-name="Horizontal_20_Line"/>
      <text:h text:style-name="Heading_20_2" text:outline-level="2">3️⃣ Lluviara</text:h>
      <text:p text:style-name="Quotations">Beneath the ruins, forgotten symbols covered the walls.</text:p>
      <text:p text:style-name="Horizontal_20_Line"/>
      <text:h text:style-name="Heading_20_2" text:outline-level="2">4️⃣ Cliffhanger</text:h>
      <text:p text:style-name="Quotations">And at the center of the chamber…<text:line-break/>something was still alive.</text:p>
      <text:p text:style-name="Horizontal_20_Line"/>
      <text:p text:style-name="Text_20_body">👉 Ahora:</text:p>
      <text:list xml:id="list1920941767" text:style-name="L4">
        <text:list-item>
          <text:p text:style-name="P4">todo parece una única historia</text:p>
        </text:list-item>
        <text:list-item>
          <text:p text:style-name="P4">el conocimiento impulsa la narrativa</text:p>
        </text:list-item>
      </text:list>
      <text:p text:style-name="Horizontal_20_Line"/>
      <text:h text:style-name="Heading_20_1" text:outline-level="1">🧠 CLAVE ABSOLUTA</text:h>
      <text:p text:style-name="Text_20_body">Las escenas narrativas deben:</text:p>
      <text:list xml:id="list797165840" text:style-name="L5">
        <text:list-item>
          <text:p text:style-name="P5">contener misterio</text:p>
        </text:list-item>
        <text:list-item>
          <text:p text:style-name="P5">insinuar consecuencias</text:p>
        </text:list-item>
        <text:list-item>
          <text:p text:style-name="P5">terminar abiertas</text:p>
        </text:list-item>
      </text:list>
      <text:p text:style-name="Text_20_body">Nunca:</text:p>
      <text:list xml:id="list445240836" text:style-name="L6">
        <text:list-item>
          <text:p text:style-name="P6">explicar demasiado</text:p>
        </text:list-item>
        <text:list-item>
          <text:p text:style-name="P6">cerrar completamente la escena</text:p>
        </text:list-item>
      </text:list>
      <text:p text:style-name="Horizontal_20_Line"/>
      <text:h text:style-name="Heading_20_1" text:outline-level="1">⚡ El cliffhanger es tu mejor herramienta</text:h>
      <text:p text:style-name="Text_20_body">Porque las redes sociales funcionan por:<text:line-break/>👉 expectativa continua.</text:p>
      <text:p text:style-name="Horizontal_20_Line"/>
      <text:h text:style-name="Heading_20_1" text:outline-level="1"><text:soft-page-break/>🎯 Y aquí aparece una ventaja enorme</text:h>
      <text:p text:style-name="Text_20_body">Tu universo YA tiene:</text:p>
      <text:list xml:id="list133015063" text:style-name="L7">
        <text:list-item>
          <text:p text:style-name="P7">misterio</text:p>
        </text:list-item>
        <text:list-item>
          <text:p text:style-name="P7">conocimiento prohibido</text:p>
        </text:list-item>
        <text:list-item>
          <text:p text:style-name="P7">ruinas</text:p>
        </text:list-item>
        <text:list-item>
          <text:p text:style-name="P7">búsqueda</text:p>
        </text:list-item>
        <text:list-item>
          <text:p text:style-name="P7">revelaciones</text:p>
        </text:list-item>
      </text:list>
      <text:p text:style-name="Text_20_body">👉 Es PERFECTO para formato serializado corto.</text:p>
      <text:p text:style-name="Horizontal_20_Line"/>
      <text:h text:style-name="Heading_20_1" text:outline-level="1">🚀 Mi recomendación estratégica ahora</text:h>
      <text:p text:style-name="Text_20_body">Empieza a pensar en:</text:p>
      <text:h text:style-name="Heading_20_2" text:outline-level="2">“Arcos”</text:h>
      <text:p text:style-name="Text_20_body">No posts individuales.</text:p>
      <text:p text:style-name="Horizontal_20_Line"/>
      <text:h text:style-name="Heading_20_1" text:outline-level="1">📖 Ejemplo de arco corto</text:h>
      <text:h text:style-name="Heading_20_2" text:outline-level="2">Arco:</text:h>
      <text:p text:style-name="Text_20_body">“The Voice Beneath the Ruins”</text:p>
      <text:h text:style-name="Heading_20_3" text:outline-level="3">Post 1</text:h>
      <text:p text:style-name="Text_20_body">Fabhrius habla de percepción.</text:p>
      <text:h text:style-name="Heading_20_3" text:outline-level="3">Post 2</text:h>
      <text:p text:style-name="Text_20_body">Elara escucha algo imposible.</text:p>
      <text:h text:style-name="Heading_20_3" text:outline-level="3">Post 3</text:h>
      <text:p text:style-name="Text_20_body">Encuentra símbolos antiguos.</text:p>
      <text:h text:style-name="Heading_20_3" text:outline-level="3">Post 4</text:h>
      <text:p text:style-name="Text_20_body">Descubre que la voz conoce su nombre.</text:p>
      <text:p text:style-name="Text_20_body"><text:soft-page-break/>👉 Fin del mini-arco.</text:p>
      <text:p text:style-name="Horizontal_20_Line"/>
      <text:h text:style-name="Heading_20_1" text:outline-level="1">🧠 Esto te ayudará muchísimo porque:</text:h>
      <text:list xml:id="list2986711378" text:style-name="L8">
        <text:list-item>
          <text:p text:style-name="P8">da dirección</text:p>
        </text:list-item>
        <text:list-item>
          <text:p text:style-name="P8">evita improvisación eterna</text:p>
        </text:list-item>
        <text:list-item>
          <text:p text:style-name="P8">crea progresión</text:p>
        </text:list-item>
        <text:list-item>
          <text:p text:style-name="P8">facilita cliffhangers</text:p>
        </text:list-item>
      </text:list>
      <text:p text:style-name="Horizontal_20_Line"/>
      <text:h text:style-name="Heading_20_1" text:outline-level="1">🎯 Conclusión</text:h>
      <text:p text:style-name="Text_20_body">Creo que ya has descubierto el núcleo correcto del sistema:</text:p>
      <text:p text:style-name="Text_20_body">✔ conocimiento profundo = gancho<text:line-break/>✔ narrativa emocional = retención<text:line-break/>✔ misterio = continuidad<text:line-break/>✔ fragmentación serializada = formato ideal para redes</text:p>
      <text:p text:style-name="Text_20_body">Y sinceramente:<text:line-break/>👉 ahora el proyecto empieza a parecer una verdadera obra narrativa viva, no solo marketing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16T09:47:35.870000000</meta:creation-date>
    <dc:date>2026-05-16T10:34:11.881000000</dc:date>
    <meta:editing-duration>PT36M25S</meta:editing-duration>
    <meta:editing-cycles>1</meta:editing-cycles>
    <meta:document-statistic meta:table-count="0" meta:image-count="0" meta:object-count="0" meta:page-count="6" meta:paragraph-count="104" meta:word-count="507" meta:character-count="3059" meta:non-whitespace-character-count="2673"/>
    <meta:generator>LibreOffice/7.3.5.2$Windows_X86_64 LibreOffice_project/184fe81b8c8c30d8b5082578aee2fed2ea847c01</meta:generator>
  </office:meta>
</office:document-meta>
</file>