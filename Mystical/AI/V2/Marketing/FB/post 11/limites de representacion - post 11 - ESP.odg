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F00000601637341D36E283FD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fo:min-height="26.01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Old English Text MT" fo:font-size="48pt" style:font-size-asian="48pt" style:font-size-complex="48pt"/>
    </style:style>
    <style:style style:name="T4" style:family="text">
      <style:text-properties fo:color="#fde78a" loext:opacity="100%" style:font-name="Old English Text MT" fo:font-size="60pt" style:font-size-asian="60pt" style:font-size-complex="60pt"/>
    </style:style>
    <style:style style:name="T5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italic" fo:text-shadow="none" style:text-underline-style="none" fo:font-weight="bold" style:letter-kerning="true" style:font-name-asian="Microsoft YaHei" style:font-size-asian="22pt" style:font-style-asian="italic" style:font-weight-asian="bold" style:font-name-complex="Lucida Sans" style:font-size-complex="22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af1ce" loext:opacity="100%" style:text-outline="false" style:text-line-through-style="none" style:text-line-through-type="none" style:font-name="Cinzel Decorative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EB Garamond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aebae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de78a" loext:opacity="100%" style:font-name="Script MT Bold" fo:font-size="15pt" style:font-size-asian="15pt" style:font-size-complex="15pt"/>
    </style:style>
    <style:style style:name="T11" style:family="text">
      <style:text-properties fo:font-variant="normal" fo:text-transform="none" fo:color="#faebae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715cm" svg:height="26.265cm" svg:x="1.117cm" svg:y="1.017cm">
          <draw:text-box>
            <text:p text:style-name="P1"><text:span text:style-name="T1">( Omniscientis — Fragmento XI </text:span><text:span text:style-name="T2">— El Templo de la Lluvia — Parte V )</text:span></text:p>
            <text:p text:style-name="P2"><text:span text:style-name="T3"><text:tab/></text:span><text:span text:style-name="T3"><text:tab/></text:span><text:span text:style-name="T3"><text:tab/></text:span><text:span text:style-name="T4">L</text:span><text:span text:style-name="T5">as palabras de Fabhrius la estremecieron.</text:span></text:p>
            <text:p text:style-name="P2"><text:span text:style-name="T5">Parecían estar hablándole directamente a ella, </text:span></text:p>
            <text:p text:style-name="P2"><text:span text:style-name="T5">atravesando la distancia de los siglos.</text:span></text:p>
            <text:p text:style-name="P2"><text:span text:style-name="T5">Volvió a observar la sala. Los libros. Las paredes. La luz temblando sobre la piedra.</text:span></text:p>
            <text:p text:style-name="P2"><text:span text:style-name="T5">Todo parecía igual.</text:span></text:p>
            <text:p text:style-name="P2"><text:span text:style-name="T5">Y sin embargo… algo había cambiado.</text:span></text:p>
            <text:p text:style-name="P2"><text:span text:style-name="T5">La realidad siempre había estado allí. Delante de sus ojos. Pero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ver no es lo mismo que comprender</text:span><text:span text:style-name="T5">.</text:span></text:p>
            <text:p text:style-name="P2"><text:span text:style-name="T5"/></text:p>
            <text:p text:style-name="P2"><text:span text:style-name="T5">Y si toda visión es un fragmento, quizás 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cada persona ve un mundo diferente</text:span><text:span text:style-name="T5">.</text:span></text:p>
            <text:p text:style-name="P2"><text:span text:style-name="T5"/></text:p>
            <text:p text:style-name="P2"><text:span text:style-name="T5">Así, no será posible alcanzar el conocimiento </text:span></text:p>
            <text:p text:style-name="P2"><text:span text:style-name="T5">sin aprender primero a 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cuestionar nuestras propias certezas</text:span><text:span text:style-name="T5">.</text:span></text:p>
            <text:p text:style-name="P2"><text:span text:style-name="T5"/></text:p>
            <text:p text:style-name="P2"><text:span text:style-name="T5">Porque tal vez una parte importante de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el misterio no está en el mundo</text:span><text:span text:style-name="T5">.</text:span></text:p>
            <text:p text:style-name="P2"><text:span text:style-name="T5"/></text:p>
            <text:p text:style-name="P2"><text:span text:style-name="T5">Sino dentro de quien observa.</text:span><text:span text:style-name="T7"><text:tab/></text:span><text:span text:style-name="T7"><text:tab/></text:span></text:p>
            <text:p text:style-name="P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Continuará</text:span><text:span text:style-name="T10">…</text:span></text:p>
            <text:p text:style-name="P1"><text:span text:style-name="T1">( De</text:span><text:span text:style-name="T11"> “Omniscientis”, el códice perdido de Lluviara 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FF00000601637341D36E283FD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3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3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4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6-07T10:47:45.771000000</dc:date>
    <meta:editing-duration>PT5H57M52S</meta:editing-duration>
    <meta:editing-cycles>37</meta:editing-cycles>
    <meta:generator>LibreOffice/7.3.5.2$Windows_X86_64 LibreOffice_project/184fe81b8c8c30d8b5082578aee2fed2ea847c01</meta:generator>
    <meta:document-statistic meta:object-count="1"/>
  </office:meta>
</office:document-meta>
</file>