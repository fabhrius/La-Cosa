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F00000601637341D36E283FD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26.01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EB Garamond" fo:font-size="22pt" style:font-size-asian="22pt" style:font-size-complex="22pt"/>
    </style:style>
    <style:style style:name="T4" style:family="text">
      <style:text-properties fo:color="#fde78a" loext:opacity="100%" style:font-name="Old English Text MT" fo:font-size="60pt" style:font-size-asian="60pt" style:font-size-complex="60pt"/>
    </style:style>
    <style:style style:name="T5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normal" style:letter-kerning="true" style:font-name-asian="Microsoft YaHei1" style:font-size-asian="22pt" style:font-style-asian="normal" style:font-weight-asian="normal" style:font-name-complex="Lucida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italic" fo:text-shadow="none" style:text-underline-style="none" fo:font-weight="bold" style:letter-kerning="true" style:font-name-asian="Microsoft YaHei1" style:font-size-asian="22pt" style:font-style-asian="italic" style:font-weight-asian="bold" style:font-name-complex="Lucida Sans3" style:font-size-complex="22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bold" style:letter-kerning="true" style:font-name-asian="Microsoft YaHei1" style:font-size-asian="22pt" style:font-style-asian="normal" style:font-weight-asian="bold" style:font-name-complex="Lucida Sans3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af1ce" loext:opacity="100%" style:text-outline="false" style:text-line-through-style="none" style:text-line-through-type="none" style:font-name="Cinzel Decorative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EB Garamond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af1ce" loext:opacity="100%" style:text-outline="false" style:text-line-through-style="none" style:text-line-through-type="none" style:font-name="Cinzel Decorative" fo:font-size="24pt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EB Garamon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1" style:font-size-asian="15pt" style:font-style-asian="normal" style:font-weight-asian="normal" style:font-name-complex="Lucida 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aebae" loext:opacity="100%" style:font-name="Script MT Bold" fo:font-size="15pt" style:font-size-asian="15pt" style:font-size-complex="15pt"/>
    </style:style>
    <style:style style:name="T12" style:family="text">
      <style:text-properties fo:color="#fde78a" loext:opacity="100%" style:font-name="Script MT Bold" fo:font-size="15pt" style:font-size-asian="15pt" style:font-size-complex="15pt"/>
    </style:style>
    <style:style style:name="T13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715cm" svg:height="26.359cm" svg:x="1.117cm" svg:y="0.917cm">
          <draw:text-box>
            <text:p text:style-name="P1"><text:span text:style-name="T1">( Omniscientis — Fragment XI </text:span><text:span text:style-name="T2">— The Temple of Rain — Part V )</text:span></text:p>
            <text:p text:style-name="P1"><text:span text:style-name="T2"/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4">T</text:span><text:span text:style-name="T5">he words of Fabhrius shook her.</text:span></text:p>
            <text:p text:style-name="P2"><text:span text:style-name="T5">It felt as though he were speaking directly to her </text:span></text:p>
            <text:p text:style-name="P2"><text:span text:style-name="T5">across the distance of centuries.</text:span></text:p>
            <text:p text:style-name="P2"><text:span text:style-name="T5">She looked around the chamber once more. The books. </text:span></text:p>
            <text:p text:style-name="P2"><text:span text:style-name="T5">The walls. The torchlight trembling upon the stone.</text:span></text:p>
            <text:p text:style-name="P2"><text:span text:style-name="T5">Everything seemed the same. </text:span></text:p>
            <text:p text:style-name="P2"><text:span text:style-name="T5">And yet… something had changed.</text:span></text:p>
            <text:p text:style-name="P2"><text:span text:style-name="T5">Reality had always been there. Before her eyes. But 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seeing is not the same as understanding</text:span><text:span text:style-name="T5">.</text:span></text:p>
            <text:p text:style-name="P2"><text:span text:style-name="T5"/></text:p>
            <text:p text:style-name="P2"><text:span text:style-name="T5">And if every vision is a fragment, then perhaps 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each person sees a different world</text:span><text:span text:style-name="T7">.</text:span></text:p>
            <text:p text:style-name="P2"><text:span text:style-name="T7"/></text:p>
            <text:p text:style-name="P2"><text:span text:style-name="T5">Thus, knowledge cannot be attained without first learning to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question your own certainties</text:span><text:span text:style-name="T5">.</text:span></text:p>
            <text:p text:style-name="P2"><text:span text:style-name="T5"/></text:p>
            <text:p text:style-name="P2"><text:span text:style-name="T5">Because perhaps an important part of 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the mystery is not in the world</text:span><text:span text:style-name="T5">.</text:span></text:p>
            <text:p text:style-name="P2"><text:span text:style-name="T5"/></text:p>
            <text:p text:style-name="P2"><text:span text:style-name="T5"><text:tab/></text:span><text:span text:style-name="T5"><text:tab/></text:span><text:span text:style-name="T5"><text:tab/></text:span><text:span text:style-name="T5">But within the one who observes.</text:span><text:span text:style-name="T8"><text:tab/></text:span><text:span text:style-name="T8"><text:tab/></text:span><text:span text:style-name="T9"><text:tab/></text:span><text:span text:style-name="T9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To be continued</text:span><text:span text:style-name="T12">…</text:span></text:p>
            <text:p text:style-name="P1"><text:span text:style-name="T1">(From</text:span><text:span text:style-name="T13"> “Omniscientis”, the lost codex of Lluviara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FF00000601637341D36E283FD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6-06T20:56:59.494000000</dc:date>
    <meta:editing-duration>PT3H31M57S</meta:editing-duration>
    <meta:editing-cycles>34</meta:editing-cycles>
    <meta:generator>LibreOffice/7.3.5.2$Windows_X86_64 LibreOffice_project/184fe81b8c8c30d8b5082578aee2fed2ea847c01</meta:generator>
    <meta:document-statistic meta:object-count="1"/>
  </office:meta>
</office:document-meta>
</file>