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Creo que no debemos generar frases todavía.</text:p>
      <text:p text:style-name="Text_20_body">Primero debemos generar la <text:span text:style-name="Strong_20_Emphasis">materia prima</text:span> de la que saldrán cientos de frases.</text:p>
      <text:p text:style-name="Text_20_body">Si observamos tus mejores captions, todos nacen de una pregunta fundamental.</text:p>
      <text:p text:style-name="Text_20_body">La frase es solo la presentación.</text:p>
      <text:p text:style-name="Text_20_body">La pregunta es el verdadero producto.</text:p>
      <text:p text:style-name="Text_20_body">Empecemos creando una biblioteca.</text:p>
      <text:p text:style-name="Text_20_body">BIBLIOTECA DE PREGUNTAS FUNDAMENTALES</text:p>
      <text:p text:style-name="Text_20_body">EXISTENCIA</text:p>
      <text:p text:style-name="Text_20_body">¿Por qué existe algo en lugar de nada?</text:p>
      <text:p text:style-name="Text_20_body">¿Por qué existe la realidad?</text:p>
      <text:p text:style-name="Text_20_body">¿Por qué existe un universo?</text:p>
      <text:p text:style-name="Text_20_body">¿Podría no haber existido nada?</text:p>
      <text:p text:style-name="Text_20_body">¿Por qué hay leyes en lugar de caos?</text:p>
      <text:p text:style-name="Text_20_body">¿Por qué existe el orden?</text:p>
      <text:p text:style-name="Text_20_body">¿Por qué existe la complejidad?</text:p>
      <text:p text:style-name="Text_20_body">¿Por qué existe la vida?</text:p>
      <text:p text:style-name="Text_20_body">¿Por qué existe la conciencia?</text:p>
      <text:p text:style-name="Text_20_body">¿Por qué existe la inteligencia?</text:p>
      <text:p text:style-name="Text_20_body">REALIDAD</text:p>
      <text:p text:style-name="Text_20_body">¿Qué es realmente la realidad?</text:p>
      <text:p text:style-name="Text_20_body">¿La realidad es como la percibimos?</text:p>
      <text:p text:style-name="Text_20_body">¿Cómo sabemos que algo es real?</text:p>
      <text:p text:style-name="Text_20_body">¿Existe algo fuera de nuestra percepción?</text:p>
      <text:p text:style-name="Text_20_body">¿La realidad tiene límites?</text:p>
      <text:p text:style-name="Text_20_body">¿Dónde está el universo?</text:p>
      <text:p text:style-name="Text_20_body">¿Qué hay fuera del universo?</text:p>
      <text:p text:style-name="Text_20_body">¿Puede existir el vacío?</text:p>
      <text:p text:style-name="Text_20_body">¿Existe la nada?</text:p>
      <text:p text:style-name="Text_20_body">¿La realidad tuvo un comienzo?</text:p>
      <text:p text:style-name="Text_20_body">CONCIENCIA</text:p>
      <text:p text:style-name="Text_20_body"><text:soft-page-break/>¿Por qué soy consciente?</text:p>
      <text:p text:style-name="Text_20_body">¿Por qué existe un observador?</text:p>
      <text:p text:style-name="Text_20_body">¿Quién experimenta mis pensamientos?</text:p>
      <text:p text:style-name="Text_20_body">¿Por qué experimento esta vida y no otra?</text:p>
      <text:p text:style-name="Text_20_body">¿Dónde ocurre la experiencia consciente?</text:p>
      <text:p text:style-name="Text_20_body">¿La conciencia tiene un propósito?</text:p>
      <text:p text:style-name="Text_20_body">¿Puede existir una realidad sin observadores?</text:p>
      <text:p text:style-name="Text_20_body">¿Qué significa ser yo?</text:p>
      <text:p text:style-name="Text_20_body">CONOCIMIENTO</text:p>
      <text:p text:style-name="Text_20_body">¿Qué significa comprender?</text:p>
      <text:p text:style-name="Text_20_body">¿Es posible comprender completamente algo?</text:p>
      <text:p text:style-name="Text_20_body">¿Cuánto de lo que creemos es cierto?</text:p>
      <text:p text:style-name="Text_20_body">¿Toda explicación elimina información?</text:p>
      <text:p text:style-name="Text_20_body">¿Podemos conocer la realidad directamente?</text:p>
      <text:p text:style-name="Text_20_body">¿Cómo sabemos que estamos en lo correcto?</text:p>
      <text:p text:style-name="Text_20_body">¿Existe el conocimiento absoluto?</text:p>
      <text:p text:style-name="Text_20_body">¿Toda respuesta genera nuevas preguntas?</text:p>
      <text:p text:style-name="Text_20_body">COMPLEJIDAD</text:p>
      <text:p text:style-name="Text_20_body">¿Por qué es tan compleja la realidad?</text:p>
      <text:p text:style-name="Text_20_body">¿Cómo se orienta una mente limitada en un universo ilimitado?</text:p>
      <text:p text:style-name="Text_20_body">¿Cómo sabemos qué es importante?</text:p>
      <text:p text:style-name="Text_20_body">¿Cómo elegimos entre infinitas posibilidades?</text:p>
      <text:p text:style-name="Text_20_body">¿Qué debemos ignorar?</text:p>
      <text:p text:style-name="Text_20_body">¿Cómo encontramos el siguiente paso?</text:p>
      <text:p text:style-name="Text_20_body">¿Cómo resolvemos problemas más grandes que nosotros?</text:p>
      <text:p text:style-name="Text_20_body">¿Por qué la simplicidad parece insuficiente?</text:p>
      <text:p text:style-name="Text_20_body">VIDA</text:p>
      <text:p text:style-name="Text_20_body">¿Qué está intentando hacer la vida?</text:p>
      <text:p text:style-name="Text_20_body">¿Por qué luchamos por sobrevivir?</text:p>
      <text:p text:style-name="Text_20_body">¿Por qué debemos morir?</text:p>
      <text:p text:style-name="Text_20_body"><text:soft-page-break/>¿Por qué envejecemos?</text:p>
      <text:p text:style-name="Text_20_body">¿Por qué nos reproducimos?</text:p>
      <text:p text:style-name="Text_20_body">¿Qué permanece cuando todo cambia?</text:p>
      <text:p text:style-name="Text_20_body">¿Por qué importa tanto existir?</text:p>
      <text:p text:style-name="Text_20_body">¿Qué significa estar vivo?</text:p>
      <text:p text:style-name="Text_20_body">TIEMPO</text:p>
      <text:p text:style-name="Text_20_body">¿Qué es el tiempo?</text:p>
      <text:p text:style-name="Text_20_body">¿Existe el pasado?</text:p>
      <text:p text:style-name="Text_20_body">¿Existe el futuro?</text:p>
      <text:p text:style-name="Text_20_body">¿Dónde ocurre el presente?</text:p>
      <text:p text:style-name="Text_20_body">¿Por qué el tiempo avanza?</text:p>
      <text:p text:style-name="Text_20_body">¿Por qué recordamos el pasado pero no el futuro?</text:p>
      <text:p text:style-name="Text_20_body">¿Podría el tiempo detenerse?</text:p>
      <text:p text:style-name="Text_20_body">¿El cambio crea el tiempo?</text:p>
      <text:p text:style-name="Text_20_body">INTELIGENCIA</text:p>
      <text:p text:style-name="Text_20_body">¿Tiene la inteligencia un propósito?</text:p>
      <text:p text:style-name="Text_20_body">¿Por qué buscamos respuestas?</text:p>
      <text:p text:style-name="Text_20_body">¿Por qué hacemos preguntas?</text:p>
      <text:p text:style-name="Text_20_body">¿La inteligencia resuelve problemas o crea nuevos?</text:p>
      <text:p text:style-name="Text_20_body">¿Cuánto puede comprender una mente?</text:p>
      <text:p text:style-name="Text_20_body">¿Existe un límite para el conocimiento?</text:p>
      <text:p text:style-name="Text_20_body">¿Qué hace una inteligencia cuando ya lo entiende todo?</text:p>
      <text:p text:style-name="Text_20_body">IDENTIDAD</text:p>
      <text:p text:style-name="Text_20_body">¿Qué me convierte en mí?</text:p>
      <text:p text:style-name="Text_20_body">¿Qué parte de mí permanece?</text:p>
      <text:p text:style-name="Text_20_body">¿Soy mi cuerpo?</text:p>
      <text:p text:style-name="Text_20_body">¿Soy mis recuerdos?</text:p>
      <text:p text:style-name="Text_20_body">¿Soy mis pensamientos?</text:p>
      <text:p text:style-name="Text_20_body">¿Podría existir otro yo?</text:p>
      <text:p text:style-name="Text_20_body">¿Dónde termina una persona y comienza el mundo?</text:p>
      <text:p text:style-name="Text_20_body"><text:soft-page-break/>Ahora viene la parte importante.</text:p>
      <text:p text:style-name="Text_20_body">No todas estas preguntas son igual de buenas para Facebook.</text:p>
      <text:p text:style-name="Text_20_body">Las mejores son las que cumplen tres condiciones:</text:p>
      <text:list xml:id="list665073574" text:style-name="L1">
        <text:list-item>
          <text:p text:style-name="P1">Se entienden en tres segundos.</text:p>
        </text:list-item>
        <text:list-item>
          <text:p text:style-name="P1">Parecen simples.</text:p>
        </text:list-item>
        <text:list-item>
          <text:p text:style-name="P1">Son imposibles de responder completamente.</text:p>
        </text:list-item>
      </text:list>
      <text:p text:style-name="Text_20_body">Por ejemplo:</text:p>
      <text:list xml:id="list3433894084" text:style-name="L2">
        <text:list-item>
          <text:p text:style-name="P2">¿Por qué existe algo en lugar de nada?</text:p>
        </text:list-item>
        <text:list-item>
          <text:p text:style-name="P2">¿Cómo sabemos que algo es real?</text:p>
        </text:list-item>
        <text:list-item>
          <text:p text:style-name="P2">¿Por qué soy consciente?</text:p>
        </text:list-item>
        <text:list-item>
          <text:p text:style-name="P2">¿Por qué debemos morir?</text:p>
        </text:list-item>
        <text:list-item>
          <text:p text:style-name="P2">¿Dónde está el universo?</text:p>
        </text:list-item>
        <text:list-item>
          <text:p text:style-name="P2">¿Qué hace una inteligencia cuando ya lo entiende todo?</text:p>
        </text:list-item>
        <text:list-item>
          <text:p text:style-name="P2">¿Cómo encontramos el siguiente paso?</text:p>
        </text:list-item>
        <text:list-item>
          <text:p text:style-name="P2">¿Por qué es tan compleja la realidad?</text:p>
        </text:list-item>
      </text:list>
      <text:p text:style-name="Text_20_body">Yo empezaría marcando unas <text:span text:style-name="Strong_20_Emphasis">20 preguntas maestras</text:span>. Luego cada caption diario sería simplemente una variación de una de ellas. Ahí es donde aparece la escalabilidad que estás buscand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1T15:48:40.027000000</meta:creation-date>
    <dc:date>2026-06-21T15:49:02.852000000</dc:date>
    <meta:editing-duration>PT23S</meta:editing-duration>
    <meta:editing-cycles>1</meta:editing-cycles>
    <meta:document-statistic meta:table-count="0" meta:image-count="0" meta:object-count="0" meta:page-count="4" meta:paragraph-count="106" meta:word-count="561" meta:character-count="3503" meta:non-whitespace-character-count="3059"/>
    <meta:generator>LibreOffice/7.3.5.2$Windows_X86_64 LibreOffice_project/184fe81b8c8c30d8b5082578aee2fed2ea847c01</meta:generator>
  </office:meta>
</office:document-meta>
</file>