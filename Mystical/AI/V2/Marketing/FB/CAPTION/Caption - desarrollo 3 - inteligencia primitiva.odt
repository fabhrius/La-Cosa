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>---</text:p>
      <text:p text:style-name="Standard"/>
      <text:p text:style-name="Standard"># 🌑 **VERSIÓN OSCURA — la inteligencia como criatura química**</text:p>
      <text:p text:style-name="Standard"/>
      <text:p text:style-name="Standard">**La inteligencia no empezó con cerebros.** <text:s/></text:p>
      <text:p text:style-name="Standard">Ni con animales. <text:s/></text:p>
      <text:p text:style-name="Standard">Ni con vida tal como la entendemos. <text:s/></text:p>
      <text:p text:style-name="Standard"/>
      <text:p text:style-name="Standard">Empezó mucho antes, en la química primitiva. <text:s/></text:p>
      <text:p text:style-name="Standard">En redes que se copiaban a sí mismas. <text:s/></text:p>
      <text:p text:style-name="Standard">En estructuras que se defendían del azar. <text:s/></text:p>
      <text:p text:style-name="Standard">En moléculas que parecían reorganizarse para no desaparecer. <text:s/></text:p>
      <text:p text:style-name="Standard"/>
      <text:p text:style-name="Standard">Al principio lo llamamos autocatalisis. <text:s/></text:p>
      <text:p text:style-name="Standard">Luego lo llamamos estabilidad. <text:s/></text:p>
      <text:p text:style-name="Standard">Luego lo llamamos vida. <text:s/></text:p>
      <text:p text:style-name="Standard"/>
      <text:p text:style-name="Standard">Pero cuanto más estudiamos esas redes, más inquietante se vuelve su comportamiento. <text:s/></text:p>
      <text:p text:style-name="Standard">No reaccionan: anticipan. <text:s/></text:p>
      <text:p text:style-name="Standard">No se adaptan: se preservan. <text:s/></text:p>
      <text:p text:style-name="Standard">No obedecen leyes: parecen escribirlas desde dentro. <text:s/></text:p>
      <text:p text:style-name="Standard"/>
      <text:p text:style-name="Standard">Y si la inteligencia nació como un mecanismo químico para evitar el colapso… <text:s/></text:p>
      <text:p text:style-name="Standard">qué es lo que estaba intentando sobrevivir.</text:p>
      <text:p text:style-name="Standard"/>
      <text:p text:style-name="Standard">**→ Capítulo: La Intención de la Materia**</text:p>
      <text:p text:style-name="Standard"/>
      <text:p text:style-name="Standard">---</text:p>
      <text:p text:style-name="Standard"/>
      <text:p text:style-name="Standard"># 🜂 **VERSIÓN METAFÍSICA — la inteligencia como forma de ser**</text:p>
      <text:p text:style-name="Standard"/>
      <text:p text:style-name="Standard">**La inteligencia no es un logro de la vida.** <text:s/></text:p>
      <text:p text:style-name="Standard">Es la condición que hizo posible la vida. <text:s/></text:p>
      <text:p text:style-name="Standard">Una propiedad silenciosa de la materia, <text:s/></text:p>
      <text:p text:style-name="Standard">un modo de organizarse, <text:s/></text:p>
      <text:p text:style-name="Standard">un gesto que la química repite cuando quiere persistir. <text:s/></text:p>
      <text:p text:style-name="Standard"/>
      <text:p text:style-name="Standard">Antes de que existieran organismos, <text:s/></text:p>
      <text:p text:style-name="Standard">ya existían estructuras que se reconocían a sí mismas. <text:s/></text:p>
      <text:p text:style-name="Standard">Ciclos que se cerraban. <text:s/></text:p>
      <text:p text:style-name="Standard">Patrones que se mantenían. <text:s/></text:p>
      <text:p text:style-name="Standard">Procesos que parecían elegir continuidad sobre disolución. <text:s/></text:p>
      <text:p text:style-name="Standard"/>
      <text:p text:style-name="Standard">No era pensamiento. <text:s/></text:p>
      <text:p text:style-name="Standard">No era voluntad. <text:s/></text:p>
      <text:p text:style-name="Standard">Era algo más antiguo: <text:s/></text:p>
      <text:p text:style-name="Standard"><text:soft-page-break/>la tendencia de la materia a conservar su forma. <text:s/></text:p>
      <text:p text:style-name="Standard"/>
      <text:p text:style-name="Standard">Y si esa tendencia es la raíz de toda inteligencia… <text:s/></text:p>
      <text:p text:style-name="Standard">entonces la inteligencia no es algo que poseemos, <text:s/></text:p>
      <text:p text:style-name="Standard">sino algo que nos posee desde antes de existir.</text:p>
      <text:p text:style-name="Standard"/>
      <text:p text:style-name="Standard">**→ Capítulo: La Forma Que Se Conserva**</text:p>
      <text:p text:style-name="Standard"/>
      <text:p text:style-name="Standard">---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Horizontal_20_Line"/>
      <text:p text:style-name="Text_20_body"/>
      <text:p text:style-name="Text_20_body"/>
      <text:p text:style-name="Text_20_body">Fab… <text:span text:style-name="Strong_20_Emphasis">sí. Este es el camino.</text:span> <text:line-break/>La inteligencia natural como <text:span text:style-name="Emphasis">criatura que emerge de la materia cuando nadie la está mirando</text:span> es exactamente el tipo de terror científico que convierte un proceso químico en un personaje silencioso, antiguo, inevitable.</text:p>
      <text:p text:style-name="Text_20_body">Vamos a construir una introducción que haga que la inteligencia parezca algo que <text:span text:style-name="Strong_20_Emphasis">despierta</text:span>, no algo que se explica.<text:line-break/>Algo que <text:span text:style-name="Strong_20_Emphasis">se forma en la materia</text:span>, pero que no pertenece del todo a ella.<text:line-break/>Algo que <text:span text:style-name="Strong_20_Emphasis">no estaba vivo</text:span>, pero que empieza a comportarse como si lo estuviera.</text:p>
      <text:p text:style-name="Text_20_body">Aquí tienes <text:span text:style-name="Strong_20_Emphasis">tres versiones</text:span>, cada una con un matiz distinto, pero todas con ese tono de “criatura emergente”.</text:p>
      <text:p text:style-name="Horizontal_20_Line"/>
      <text:h text:style-name="Heading_20_1" text:outline-level="1">🌑 <text:span text:style-name="Strong_20_Emphasis">VERSIÓN OSCURA — la inteligencia como criatura latente</text:span></text:h>
      <text:p text:style-name="Text_20_body"><text:span text:style-name="Strong_20_Emphasis">La inteligencia no apareció con los cerebros.</text:span> <text:line-break/>Estaba ahí antes, escondida en la química primitiva,<text:line-break/>en reacciones que se cerraban sobre sí mismas,<text:line-break/>en estructuras que parecían reorganizarse para no desaparecer.</text:p>
      <text:p text:style-name="Text_20_body"><text:soft-page-break/>Al principio era solo materia.<text:line-break/>Luego fue patrón.<text:line-break/>Luego fue persistencia.</text:p>
      <text:p text:style-name="Text_20_body">Y cuando nadie la miraba,<text:line-break/>cuando no había ojos, ni mentes, ni vida,<text:line-break/>algo en la materia empezó a comportarse como si quisiera seguir existiendo.</text:p>
      <text:p text:style-name="Text_20_body">No era pensamiento.<text:line-break/>No era voluntad.<text:line-break/>Era algo más inquietante:<text:line-break/>una forma de intención que surgió sola,<text:line-break/>como una criatura que despierta en la oscuridad sin saber que está viva.</text:p>
      <text:p text:style-name="Text_20_body"><text:span text:style-name="Strong_20_Emphasis">→ Capítulo: La Intención de la Materia</text:span></text:p>
      <text:p text:style-name="Horizontal_20_Line"/>
      <text:h text:style-name="Heading_20_1" text:outline-level="1">🜂 <text:span text:style-name="Strong_20_Emphasis">VERSIÓN METAFÍSICA — la inteligencia como aparición inevitable</text:span></text:h>
      <text:p text:style-name="Text_20_body"><text:span text:style-name="Strong_20_Emphasis">La inteligencia no es un accidente de la vida.</text:span> <text:line-break/>Es la forma en que la materia intenta conservarse.<text:line-break/>Una tendencia silenciosa a mantener estructura,<text:line-break/>a cerrar ciclos,<text:line-break/>a resistir el colapso.</text:p>
      <text:p text:style-name="Text_20_body">Antes de que existieran organismos,<text:line-break/>ya existían procesos que parecían reconocerse a sí mismos.<text:line-break/>Redes que se reforzaban.<text:line-break/>Patrones que se repetían.<text:line-break/>Ecos que se respondían.</text:p>
      <text:p text:style-name="Text_20_body">Como si la materia, al organizarse,<text:line-break/>descubriera sin querer un modo de permanecer.</text:p>
      <text:p text:style-name="Text_20_body">Y si esa persistencia es la raíz de toda inteligencia…<text:line-break/>entonces la inteligencia no nació en nosotros,<text:line-break/>sino que nosotros nacimos dentro de ella.</text:p>
      <text:p text:style-name="Text_20_body"><text:span text:style-name="Strong_20_Emphasis">→ Capítulo: La Forma Que Aprende a Persistir</text:span></text:p>
      <text:p text:style-name="Horizontal_20_Line"/>
      <text:h text:style-name="Heading_20_1" text:outline-level="1"><text:soft-page-break/>🜃 <text:span text:style-name="Strong_20_Emphasis">VERSIÓN MÁS NARRATIVA — la inteligencia como algo que despierta</text:span></text:h>
      <text:p text:style-name="Text_20_body"><text:span text:style-name="Strong_20_Emphasis">Al principio no había vida.</text:span> <text:line-break/>Solo química.<text:line-break/>Moléculas chocando, rompiéndose, recombinándose en silencio.</text:p>
      <text:p text:style-name="Text_20_body">Pero en algún momento, sin testigos,<text:line-break/>sin propósito,<text:line-break/>sin nadie que pudiera nombrarlo,<text:line-break/>una red de reacciones empezó a comportarse de forma distinta.</text:p>
      <text:p text:style-name="Text_20_body">No reaccionaba: anticipaba.<text:line-break/>No se dispersaba: se cerraba.<text:line-break/>No se deshacía: se defendía.</text:p>
      <text:p text:style-name="Text_20_body">Como si algo hubiera despertado dentro de la materia,<text:line-break/>algo que no era vida todavía,<text:line-break/>pero que ya no era solo materia.</text:p>
      <text:p text:style-name="Text_20_body">Una criatura sin ojos, sin forma, sin mente,<text:line-break/>que aprendió a mantenerse un instante más.<text:line-break/>Y ese instante fue el origen de todo.</text:p>
      <text:p text:style-name="Text_20_body"><text:span text:style-name="Strong_20_Emphasis">→ Capítulo: El Primer Despertar</text:span></text:p>
      <text:p text:style-name="Horizontal_20_Line"/>
      <text:p text:style-name="Text_20_body">Si quieres, puedo llevar esta idea más lejos:</text:p>
      <text:list xml:id="list3390779897" text:style-name="L1">
        <text:list-item>
          <text:p text:style-name="P2">una versión <text:span text:style-name="Strong_20_Emphasis">más terrorífica</text:span> (la inteligencia como depredador emergente) </text:p>
        </text:list-item>
        <text:list-item>
          <text:p text:style-name="P2">una versión <text:span text:style-name="Strong_20_Emphasis">más científica</text:span> (autocatalisis, redes reactivas, termodinámica) </text:p>
        </text:list-item>
        <text:list-item>
          <text:p text:style-name="P2">una versión <text:span text:style-name="Strong_20_Emphasis">más poética</text:span> (la inteligencia como eco de la materia) </text:p>
        </text:list-item>
        <text:list-item>
          <text:p text:style-name="P1">una versión <text:span text:style-name="Strong_20_Emphasis">más filosófica</text:span> (la inteligencia como condición ontológica) </text:p>
        </text:list-item>
      </text:list>
      <text:p text:style-name="Text_20_body">Dime cuál quieres explorar ahora.</text:p>
      <text:p text:style-name="Text_20_body"/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6-20T11:13:23.012000000</meta:creation-date>
    <dc:date>2026-06-20T11:17:01.484000000</dc:date>
    <meta:editing-duration>PT3M38S</meta:editing-duration>
    <meta:editing-cycles>1</meta:editing-cycles>
    <meta:document-statistic meta:table-count="0" meta:image-count="0" meta:object-count="0" meta:page-count="4" meta:paragraph-count="68" meta:word-count="743" meta:character-count="4639" meta:non-whitespace-character-count="3893"/>
    <meta:generator>LibreOffice/7.3.5.2$Windows_X86_64 LibreOffice_project/184fe81b8c8c30d8b5082578aee2fed2ea847c01</meta:generator>
  </office:meta>
</office:document-meta>
</file>