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reo que aquí has descubierto algo importante.</text:p>
      <text:p text:style-name="Text_20_body">La frase:</text:p>
      <text:p text:style-name="Quotations">"Perhaps existence is only an illusion."</text:p>
      <text:p text:style-name="Text_20_body">funciona porque no es una idea filosófica cualquiera.</text:p>
      <text:p text:style-name="Text_20_body">Toca simultáneamente:</text:p>
      <text:list xml:id="list2658544512" text:style-name="L1">
        <text:list-item>
          <text:p text:style-name="P1">identidad,</text:p>
        </text:list-item>
        <text:list-item>
          <text:p text:style-name="P1">conciencia,</text:p>
        </text:list-item>
        <text:list-item>
          <text:p text:style-name="P1">realidad,</text:p>
        </text:list-item>
        <text:list-item>
          <text:p text:style-name="P1">muerte,</text:p>
        </text:list-item>
        <text:list-item>
          <text:p text:style-name="P1">percepción,</text:p>
        </text:list-item>
        <text:list-item>
          <text:p text:style-name="P1">existencia.</text:p>
        </text:list-item>
      </text:list>
      <text:p text:style-name="Text_20_body">Es decir, toca preguntas que prácticamente cualquier ser humano se ha hecho alguna vez.</text:p>
      <text:p text:style-name="Text_20_body">Si queremos construir una colección de captions similares, yo intentaría agruparlos por grandes temas existenciales.</text:p>
      <text:p text:style-name="Text_20_body">TEMA: REALIDAD</text:p>
      <text:p text:style-name="Text_20_body">Perhaps reality is not what we see.</text:p>
      <text:p text:style-name="Text_20_body">But if reality exists beyond our perception...</text:p>
      <text:p text:style-name="Text_20_body">what exactly are we looking at?</text:p>
      <text:p text:style-name="Horizontal_20_Line"/>
      <text:p text:style-name="Text_20_body">Perhaps the world is far larger than the part we can perceive.</text:p>
      <text:p text:style-name="Text_20_body">What remains hidden beyond the limits of our minds?</text:p>
      <text:p text:style-name="Horizontal_20_Line"/>
      <text:p text:style-name="Text_20_body">What if reality has never changed?</text:p>
      <text:p text:style-name="Text_20_body">And only our way of seeing it does?</text:p>
      <text:p text:style-name="Horizontal_20_Line"/>
      <text:p text:style-name="Text_20_body">TEMA: CONCIENCIA</text:p>
      <text:p text:style-name="Text_20_body">Why are you the one looking through your eyes?</text:p>
      <text:p text:style-name="Text_20_body">Why not someone else's?</text:p>
      <text:p text:style-name="Horizontal_20_Line"/>
      <text:p text:style-name="Text_20_body"><text:soft-page-break/>Before you were born,<text:line-break/>where was the observer that now calls itself "you"?</text:p>
      <text:p text:style-name="Horizontal_20_Line"/>
      <text:p text:style-name="Text_20_body">You know that you exist.</text:p>
      <text:p text:style-name="Text_20_body">But how do you know what it is that exists?</text:p>
      <text:p text:style-name="Horizontal_20_Line"/>
      <text:p text:style-name="Text_20_body">TEMA: IDENTIDAD</text:p>
      <text:p text:style-name="Text_20_body">If every memory disappeared tomorrow...</text:p>
      <text:p text:style-name="Text_20_body">would you still be you?</text:p>
      <text:p text:style-name="Horizontal_20_Line"/>
      <text:p text:style-name="Text_20_body">How much of what you call "yourself"<text:line-break/>was chosen by you?</text:p>
      <text:p text:style-name="Horizontal_20_Line"/>
      <text:p text:style-name="Text_20_body">If your thoughts can be observed...</text:p>
      <text:p text:style-name="Text_20_body">who is the observer?</text:p>
      <text:p text:style-name="Horizontal_20_Line"/>
      <text:p text:style-name="Text_20_body">TEMA: TIEMPO</text:p>
      <text:p text:style-name="Text_20_body">Yesterday exists only in memory.</text:p>
      <text:p text:style-name="Text_20_body">Tomorrow exists only in imagination.</text:p>
      <text:p text:style-name="Text_20_body">So where does your life actually happen?</text:p>
      <text:p text:style-name="Horizontal_20_Line"/>
      <text:p text:style-name="Text_20_body">Have you ever wondered why time moves only in one direction?</text:p>
      <text:p text:style-name="Horizontal_20_Line"/>
      <text:p text:style-name="Text_20_body">What if the past is not gone?</text:p>
      <text:p text:style-name="Text_20_body">And the future is not yet absent?</text:p>
      <text:p text:style-name="Horizontal_20_Line"/>
      <text:p text:style-name="Text_20_body">TEMA: MUERTE</text:p>
      <text:p text:style-name="Text_20_body">If death is the end...</text:p>
      <text:p text:style-name="Text_20_body">why does existence begin at all?</text:p>
      <text:p text:style-name="Horizontal_20_Line"/>
      <text:p text:style-name="Text_20_body">Before birth there was silence.</text:p>
      <text:p text:style-name="Text_20_body"><text:soft-page-break/>After death there may be silence.</text:p>
      <text:p text:style-name="Text_20_body">What is it that appears between the two?</text:p>
      <text:p text:style-name="Horizontal_20_Line"/>
      <text:p text:style-name="Text_20_body">If consciousness can emerge once...</text:p>
      <text:p text:style-name="Text_20_body">why are we so certain it cannot emerge again?</text:p>
      <text:p text:style-name="Horizontal_20_Line"/>
      <text:p text:style-name="Text_20_body">TEMA: PERCEPCIÓN</text:p>
      <text:p text:style-name="Text_20_body">Everything you know about reality<text:line-break/>arrives through your senses.</text:p>
      <text:p text:style-name="Text_20_body">But how much reality never arrives?</text:p>
      <text:p text:style-name="Horizontal_20_Line"/>
      <text:p text:style-name="Text_20_body">What if perception is not a window...</text:p>
      <text:p text:style-name="Text_20_body">but a filter?</text:p>
      <text:p text:style-name="Horizontal_20_Line"/>
      <text:p text:style-name="Text_20_body">How much of the universe remains invisible,<text:line-break/>not because it is hidden,<text:line-break/>but because we are unable to see it?</text:p>
      <text:p text:style-name="Text_20_body">De todas estas categorías, creo que para Omniscientis las más fuertes son:</text:p>
      <text:list xml:id="list4073550279" text:style-name="L2">
        <text:list-item>
          <text:p text:style-name="P2">Percepción.</text:p>
        </text:list-item>
        <text:list-item>
          <text:p text:style-name="P2">Conciencia.</text:p>
        </text:list-item>
        <text:list-item>
          <text:p text:style-name="P2">Identidad.</text:p>
        </text:list-item>
      </text:list>
      <text:p text:style-name="Text_20_body">Porque conectan directamente con:</text:p>
      <text:list xml:id="list1707370910" text:style-name="L3">
        <text:list-item>
          <text:p text:style-name="P3">Elara.</text:p>
        </text:list-item>
        <text:list-item>
          <text:p text:style-name="P3">Fabhrius.</text:p>
        </text:list-item>
        <text:list-item>
          <text:p text:style-name="P3">Los límites de la representación.</text:p>
        </text:list-item>
        <text:list-item>
          <text:p text:style-name="P3">La pregunta "¿qué soy?"</text:p>
        </text:list-item>
      </text:list>
      <text:p text:style-name="Text_20_body">Y además enlazan perfectamente con el texto que vas a publicar mañana sobre Fabhrius y la imposibilidad de representar la realidad completa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Text_20_body">Creo que has identificado algo muy inteligente.</text:p>
      <text:p text:style-name="Text_20_body">Si el post contiene la revelación de Fabhrius, el caption no debería competir con ella.</text:p>
      <text:p text:style-name="Text_20_body">Debería preparar emocionalmente al lector.</text:p>
      <text:p text:style-name="Text_20_body">Es decir:</text:p>
      <text:list xml:id="list1827701865" text:style-name="L4">
        <text:list-item>
          <text:p text:style-name="P4">el post responde,</text:p>
        </text:list-item>
        <text:list-item>
          <text:p text:style-name="P4">el caption pregunta.</text:p>
        </text:list-item>
      </text:list>
      <text:p text:style-name="Text_20_body">Y además, como dices, el caption debería partir de la situación narrativa actual:</text:p>
      <text:p text:style-name="Quotations">Elara ha preguntado "¿qué soy?"</text:p>
      <text:p text:style-name="Quotations">Khrom no responde.</text:p>
      <text:p text:style-name="Quotations">Decide mostrarle algo.</text:p>
      <text:p text:style-name="Text_20_body">Eso es interesante porque sugiere algo implícito:</text:p>
      <text:p text:style-name="Quotations">Algunas preguntas no pueden responderse directamente.</text:p>
      <text:p text:style-name="Text_20_body">Y creo que ahí hay una veta muy fértil para los captions.</text:p>
      <text:p text:style-name="Text_20_body">Por ejemplo:</text:p>
      <text:p text:style-name="Text_20_body">Some questions are simple.</text:p>
      <text:p text:style-name="Text_20_body">Others can change the course of a life.</text:p>
      <text:p text:style-name="Text_20_body">And then there are questions so profound...</text:p>
      <text:p text:style-name="Text_20_body">that no answer seems enough.</text:p>
      <text:p text:style-name="Text_20_body">What question would you ask,<text:line-break/>if you could know the truth?</text:p>
      <text:p text:style-name="Horizontal_20_Line"/>
      <text:p text:style-name="Text_20_body">O algo más cercano a la escena:</text:p>
      <text:p text:style-name="Text_20_body">Most people spend their lives searching for answers.</text:p>
      <text:p text:style-name="Text_20_body">But perhaps the answers are not the difficult part.</text:p>
      <text:p text:style-name="Text_20_body">Perhaps the real challenge...</text:p>
      <text:p text:style-name="Text_20_body">is finding the right question.</text:p>
      <text:p text:style-name="Text_20_body">What is the question you most want answered?</text:p>
      <text:p text:style-name="Horizontal_20_Line"/>
      <text:p text:style-name="Text_20_body">Esta segunda conecta directamente con:</text:p>
      <text:p text:style-name="Quotations"><text:soft-page-break/>"That is the right question."</text:p>
      <text:p text:style-name="Text_20_body">Y además invita a comentar.</text:p>
      <text:p text:style-name="Horizontal_20_Line"/>
      <text:p text:style-name="Text_20_body">Otra posibilidad más existencial:</text:p>
      <text:p text:style-name="Text_20_body">Have you ever wondered why you are the one looking through your eyes?</text:p>
      <text:p text:style-name="Text_20_body">Not someone else.</text:p>
      <text:p text:style-name="Text_20_body">Not another mind.</text:p>
      <text:p text:style-name="Text_20_body">You.</text:p>
      <text:p text:style-name="Text_20_body">Why this life?</text:p>
      <text:p text:style-name="Text_20_body">Why this point of view?</text:p>
      <text:p text:style-name="Text_20_body">Why this observer?</text:p>
      <text:p text:style-name="Text_20_body">Esta me gusta mucho porque:</text:p>
      <text:list xml:id="list271644033" text:style-name="L5">
        <text:list-item>
          <text:p text:style-name="P5">conecta con conciencia,</text:p>
        </text:list-item>
        <text:list-item>
          <text:p text:style-name="P5">identidad,</text:p>
        </text:list-item>
        <text:list-item>
          <text:p text:style-name="P5">existencia,</text:p>
        </text:list-item>
        <text:list-item>
          <text:p text:style-name="P5">y no adelanta nada de Fabhrius.</text:p>
        </text:list-item>
      </text:list>
      <text:p text:style-name="Horizontal_20_Line"/>
      <text:p text:style-name="Text_20_body">Pero si pienso específicamente en la serie del Templo de la Lluvia, creo que la más fuerte podría ser una variación de esta idea:</text:p>
      <text:p text:style-name="Text_20_body">There are questions that seek information.</text:p>
      <text:p text:style-name="Text_20_body">And there are questions that seek understanding.</text:p>
      <text:p text:style-name="Text_20_body">But once in a while...</text:p>
      <text:p text:style-name="Text_20_body">a question appears that changes everything.</text:p>
      <text:p text:style-name="Text_20_body">What is it that you most wish to understand?</text:p>
      <text:p text:style-name="Text_20_body">Porque encaja perfectamente con lo que acaba de ocurrir:</text:p>
      <text:p text:style-name="Text_20_body">Elara no pregunta:</text:p>
      <text:p text:style-name="Quotations">"¿Cómo funciona el mundo?"</text:p>
      <text:p text:style-name="Text_20_body">Pregunta:</text:p>
      <text:p text:style-name="Quotations">"¿Qué soy?"</text:p>
      <text:p text:style-name="Text_20_body"><text:soft-page-break/>Y esa diferencia es precisamente la razón por la que Khrom decide llevarla hasta los escritos de Fabhriu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1T09:47:36.403000000</meta:creation-date>
    <dc:date>2026-05-31T09:59:00.603000000</dc:date>
    <meta:editing-duration>PT1M49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17" meta:word-count="723" meta:character-count="4204" meta:non-whitespace-character-count="3617"/>
  </office:meta>
</office:document-meta>
</file>