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PLANTILLA OMNISCIENTIS</text:p>
      <text:list xml:id="list1591915606" text:style-name="L1">
        <text:list-item>
          <text:p text:style-name="P1">GANCHO</text:p>
        </text:list-item>
      </text:list>
      <text:p text:style-name="Text_20_body">Una afirmación o pregunta extraña.</text:p>
      <text:p text:style-name="Text_20_body">Debe generar una pequeña ruptura mental.</text:p>
      <text:p text:style-name="Text_20_body">Ejemplos:</text:p>
      <text:p text:style-name="Text_20_body">¿Por qué es tan compleja la realidad?</text:p>
      <text:p text:style-name="Text_20_body">¿Por qué existe algo en lugar de nada?</text:p>
      <text:p text:style-name="Text_20_body">¿Tiene la inteligencia un propósito?</text:p>
      <text:p text:style-name="Text_20_body">¿Por qué debemos morir?</text:p>
      <text:p text:style-name="Text_20_body">¿Dónde está el universo?</text:p>
      <text:p text:style-name="Text_20_body">¿Cómo sabemos que algo es real?</text:p>
      <text:list xml:id="list3644852448" text:style-name="L2">
        <text:list-item>
          <text:p text:style-name="P2">OBSERVACIÓN</text:p>
        </text:list-item>
      </text:list>
      <text:p text:style-name="Text_20_body">Una idea simple y cercana.</text:p>
      <text:p text:style-name="Text_20_body">Algo que cualquier persona pueda aceptar.</text:p>
      <text:p text:style-name="Text_20_body">Ejemplos:</text:p>
      <text:p text:style-name="Text_20_body">Cada respuesta genera nuevas preguntas.</text:p>
      <text:p text:style-name="Text_20_body">Vivimos tomando decisiones.</text:p>
      <text:p text:style-name="Text_20_body">Todo lo que conocemos ocurre dentro de nuestra mente.</text:p>
      <text:p text:style-name="Text_20_body">La realidad parece más grande de lo que podemos comprender.</text:p>
      <text:p text:style-name="Text_20_body">Nadie puede verlo todo.</text:p>
      <text:list xml:id="list1966955195" text:style-name="L3">
        <text:list-item>
          <text:p text:style-name="P3">GIRO MISTERIOSO</text:p>
        </text:list-item>
      </text:list>
      <text:p text:style-name="Text_20_body">Introducir una idea extraña.</text:p>
      <text:p text:style-name="Text_20_body">No una respuesta.</text:p>
      <text:p text:style-name="Text_20_body">Una complicación.</text:p>
      <text:p text:style-name="Text_20_body">Ejemplos:</text:p>
      <text:p text:style-name="Text_20_body">Algunos dicen que la complejidad protege al universo.</text:p>
      <text:p text:style-name="Text_20_body">Algunos creen que la realidad es una representación.</text:p>
      <text:p text:style-name="Text_20_body">Quizás la inteligencia no fue creada para comprenderlo todo.</text:p>
      <text:p text:style-name="Text_20_body">Quizás la simplicidad no puede sobrevivir.</text:p>
      <text:list xml:id="list1984625156" text:style-name="L4">
        <text:list-item>
          <text:p text:style-name="P4"><text:soft-page-break/>PROBLEMA</text:p>
        </text:list-item>
      </text:list>
      <text:p text:style-name="Text_20_body">Transformar la reflexión en un desafío.</text:p>
      <text:p text:style-name="Text_20_body">Ejemplos:</text:p>
      <text:p text:style-name="Text_20_body">Entonces estamos en problemas.</text:p>
      <text:p text:style-name="Text_20_body">Eso crea una dificultad.</text:p>
      <text:p text:style-name="Text_20_body">Pero eso no responde la pregunta.</text:p>
      <text:p text:style-name="Text_20_body">Y ahí aparece el verdadero misterio.</text:p>
      <text:list xml:id="list3232022481" text:style-name="L5">
        <text:list-item>
          <text:p text:style-name="P5">PREGUNTA FINAL</text:p>
        </text:list-item>
      </text:list>
      <text:p text:style-name="Text_20_body">La pregunta que se entrega al lector.</text:p>
      <text:p text:style-name="Text_20_body">Debe ser difícil.</text:p>
      <text:p text:style-name="Text_20_body">Debe quedar abierta.</text:p>
      <text:p text:style-name="Text_20_body">Ejemplos:</text:p>
      <text:p text:style-name="Text_20_body">¿Cómo sabemos qué hacer a continuación?</text:p>
      <text:p text:style-name="Text_20_body">¿Cómo distinguimos lo real de nuestra representación?</text:p>
      <text:p text:style-name="Text_20_body">¿Cómo encuentra una mente limitada el siguiente paso?</text:p>
      <text:p text:style-name="Text_20_body">¿Cómo sabemos qué es importante?</text:p>
      <text:p text:style-name="Text_20_body">¿Cómo sabemos que no hemos pasado por alto algo esencial?</text:p>
      <text:p text:style-name="Text_20_body">Y creo que hay una segunda observación aún más importante.</text:p>
      <text:p text:style-name="Text_20_body">Tus captions parecen funcionar mejor cuando pertenecen a una de estas cinco familias:</text:p>
      <text:list xml:id="list3027700713" text:style-name="L6">
        <text:list-item>
          <text:p text:style-name="P6">EXISTENCIA</text:p>
          <text:list>
            <text:list-item>
              <text:p text:style-name="P6">¿Por qué existe algo?</text:p>
            </text:list-item>
            <text:list-item>
              <text:p text:style-name="P6">¿Por qué estamos aquí?</text:p>
            </text:list-item>
          </text:list>
        </text:list-item>
        <text:list-item>
          <text:p text:style-name="P6">REALIDAD</text:p>
          <text:list>
            <text:list-item>
              <text:p text:style-name="P6">¿Qué es real?</text:p>
            </text:list-item>
            <text:list-item>
              <text:p text:style-name="P6">¿Cómo lo sabemos?</text:p>
            </text:list-item>
          </text:list>
        </text:list-item>
        <text:list-item>
          <text:p text:style-name="P6">CONCIENCIA</text:p>
          <text:list>
            <text:list-item>
              <text:p text:style-name="P6">¿Por qué existe un observador?</text:p>
            </text:list-item>
            <text:list-item>
              <text:p text:style-name="P6">¿Quién experimenta la realidad?</text:p>
            </text:list-item>
          </text:list>
        </text:list-item>
        <text:list-item>
          <text:p text:style-name="P6">COMPLEJIDAD</text:p>
          <text:list>
            <text:list-item>
              <text:p text:style-name="P6">¿Cómo actuamos en un universo demasiado grande para comprender?</text:p>
            </text:list-item>
          </text:list>
        </text:list-item>
        <text:list-item>
          <text:p text:style-name="P6"><text:soft-page-break/>CONOCIMIENTO</text:p>
          <text:list>
            <text:list-item>
              <text:p text:style-name="P6">¿Cómo sabemos algo?</text:p>
            </text:list-item>
            <text:list-item>
              <text:p text:style-name="P6">¿Qué significa comprender?</text:p>
            </text:list-item>
          </text:list>
        </text:list-item>
      </text:list>
      <text:p text:style-name="Text_20_body">Mi impresión es que el problema no es encontrar frases nuevas.</text:p>
      <text:p text:style-name="Text_20_body">El problema es que todavía no tienes un catálogo de 30 o 40 <text:span text:style-name="Strong_20_Emphasis">preguntas fundamentales</text:span>.</text:p>
      <text:p text:style-name="Text_20_body">Una vez tengas esa lista, cada día solo tendrás que:</text:p>
      <text:list xml:id="list1526671378" text:style-name="L7">
        <text:list-item>
          <text:p text:style-name="P7">Elegir una pregunta.</text:p>
        </text:list-item>
        <text:list-item>
          <text:p text:style-name="P7">Aplicar la plantilla.</text:p>
        </text:list-item>
        <text:list-item>
          <text:p text:style-name="P7">Relacionarla vagamente con la viñeta.</text:p>
        </text:list-item>
      </text:list>
      <text:p text:style-name="Text_20_body">Y el caption saldrá en cinco minutos en lugar de una hor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1T15:46:11.850000000</meta:creation-date>
    <dc:date>2026-06-21T15:47:15.064000000</dc:date>
    <meta:editing-duration>PT1M4S</meta:editing-duration>
    <meta:editing-cycles>1</meta:editing-cycles>
    <meta:document-statistic meta:table-count="0" meta:image-count="0" meta:object-count="0" meta:page-count="3" meta:paragraph-count="69" meta:word-count="363" meta:character-count="2193" meta:non-whitespace-character-count="1921"/>
    <meta:generator>LibreOffice/7.3.5.2$Windows_X86_64 LibreOffice_project/184fe81b8c8c30d8b5082578aee2fed2ea847c01</meta:generator>
  </office:meta>
</office:document-meta>
</file>