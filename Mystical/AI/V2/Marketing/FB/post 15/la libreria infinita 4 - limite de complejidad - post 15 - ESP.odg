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60054B8DF3DF2A2C6F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cript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automatic-styles>
    <style:style style:name="dp1" style:family="drawing-page">
      <style:drawing-page-properties draw:fill="bitmap" draw:fill-image-name="Bitmap_20_100" style:repeat="stretch"/>
    </style:style>
    <style:style style:name="gr1" style:family="graphic" style:parent-style-name="standard">
      <style:graphic-properties draw:stroke="none" svg:stroke-color="#000000" draw:fill="none" draw:fill-color="#ffffff" fo:min-height="26.50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margin-left="0cm" fo:margin-right="0cm" fo:margin-top="0cm" fo:margin-bottom="0cm" fo:line-height="100%" fo:text-align="end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de78a" loext:opacity="100%"/>
    </style:style>
    <style:style style:name="T1" style:family="text">
      <style:text-properties fo:font-variant="normal" fo:text-transform="none" fo:color="#fde78a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de78a" loext:opacity="100%" style:font-name="Sans Serif Collection" fo:font-size="12pt" style:font-size-asian="12pt" style:font-size-complex="12pt"/>
    </style:style>
    <style:style style:name="T3" style:family="text">
      <style:text-properties fo:color="#fde78a" loext:opacity="100%" style:font-name="Old English Text MT" fo:font-size="48pt" style:font-size-asian="48pt" style:font-size-complex="48pt"/>
    </style:style>
    <style:style style:name="T4" style:family="text">
      <style:text-properties fo:color="#fde78a" loext:opacity="100%" style:font-name="Old English Text MT" fo:font-size="60pt" style:font-size-asian="60pt" style:font-size-complex="60pt"/>
    </style:style>
    <style:style style:name="T5" style:family="text">
      <style:text-properties fo:font-variant="normal" fo:text-transform="none" fo:color="#fde78a" loext:opacity="100%" style:text-outline="false" style:text-line-through-style="none" style:text-line-through-type="none" style:font-name="EB Garamond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de78a" loext:opacity="100%" style:text-outline="false" style:text-line-through-style="none" style:text-line-through-type="none" style:font-name="EB Garamond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af1ce" loext:opacity="100%" style:text-outline="false" style:text-line-through-style="none" style:text-line-through-type="none" style:font-name="Cinzel Decorative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EB Garamond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de78a" loext:opacity="100%" style:text-outline="false" style:text-line-through-style="none" style:text-line-through-type="none" style:font-name="Script MT Bold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aebae" loext:opacity="100%" style:text-outline="false" style:text-line-through-style="none" style:text-line-through-type="none" style:font-name="Script MT Bold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de78a" loext:opacity="100%" style:font-name="Script MT Bold" fo:font-size="15pt" style:font-size-asian="15pt" style:font-size-complex="15pt"/>
    </style:style>
    <style:style style:name="T11" style:family="text">
      <style:text-properties fo:font-variant="normal" fo:text-transform="none" fo:color="#faebae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5" draw:layer="layout" svg:width="18.932cm" svg:height="26.753cm" svg:x="1cm" svg:y="0.717cm">
          <draw:text-box>
            <text:p text:style-name="P1"><text:span text:style-name="T1">( Omniscientis — Fragmento XV </text:span><text:span text:style-name="T2">— El Templo de la Lluvia — Parte IX )</text:span></text:p>
            <text:p text:style-name="P2"><text:span text:style-name="T3"><text:tab/></text:span><text:span text:style-name="T4">R</text:span><text:span text:style-name="T5">odeada por interminables estanterías, </text:span></text:p>
            <text:p text:style-name="P3"><text:span text:style-name="T5">Elara comprendió por fin </text:span></text:p>
            <text:p text:style-name="P3"><text:span text:style-name="T5">por qué la biblioteca había derrotado a tantos buscadores.</text:span></text:p>
            <text:p text:style-name="P2"><text:span text:style-name="T5"/></text:p>
            <text:p text:style-name="P1"><text:span text:style-name="T6">El problema no era la ausencia de respuestas.</text:span></text:p>
            <text:p text:style-name="P1"><text:span text:style-name="T6">El problema era su abundancia.</text:span></text:p>
            <text:p text:style-name="P2"><text:span text:style-name="T5"/></text:p>
            <text:p text:style-name="P3"><text:span text:style-name="T5">Cada libro abría un nuevo camino. Cada respuesta daba origen a nuevas preguntas. Nadie podía examinar todos los volúmenes. Ninguna vida era lo bastante larga.</text:span></text:p>
            <text:p text:style-name="P2"><text:span text:style-name="T5">Por un momento, la tarea pareció imposible.</text:span></text:p>
            <text:p text:style-name="P2"><text:span text:style-name="T5">Entonces recordó las palabras de Fabhrius.</text:span></text:p>
            <text:p text:style-name="P2"><text:span text:style-name="T5"/></text:p>
            <text:p text:style-name="P1"><text:span text:style-name="T5">Tal vez la sabiduría comienza al </text:span><text:span text:style-name="T6">elegir</text:span><text:span text:style-name="T5">.</text:span></text:p>
            <text:p text:style-name="P1"><text:span text:style-name="T5">Decidir qué ignorar.</text:span></text:p>
            <text:p text:style-name="P1"><text:span text:style-name="T6">Decidir</text:span><text:span text:style-name="T5"> qué perseguir.</text:span></text:p>
            <text:p text:style-name="P2"><text:span text:style-name="T5"/></text:p>
            <text:p text:style-name="P2"><text:span text:style-name="T5">Tal vez, cuando las posibilidades se vuelven infinitas,</text:span></text:p>
            <text:p text:style-name="P3"><text:span text:style-name="T5">la mejor estrategia no consiste en explorarlo todo.</text:span></text:p>
            <text:p text:style-name="P2"><text:span text:style-name="T5"/></text:p>
            <text:p text:style-name="P1"><text:span text:style-name="T5">Sino en </text:span><text:span text:style-name="T6">descubrir</text:span><text:span text:style-name="T5"> qué caminos merecen ser recorridos.</text:span><text:span text:style-name="T7"><text:tab/></text:span></text:p>
            <text:p><text:span text:style-name="T7"/></text:p>
            <text:p text:style-name="P4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Continuará</text:span><text:span text:style-name="T10">…</text:span></text:p>
            <text:p text:style-name="P1"><text:span text:style-name="T1">( De</text:span><text:span text:style-name="T11"> “Omniscientis”, el códice perdido de Lluviara 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cript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00" draw:display-name="Bitmap 100" xlink:href="Pictures/10000000000004000000060054B8DF3DF2A2C6F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3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3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6-23T10:57:01.618000000</dc:date>
    <meta:editing-duration>PT7H36M35S</meta:editing-duration>
    <meta:editing-cycles>52</meta:editing-cycles>
    <meta:generator>LibreOffice/7.3.5.2$Windows_X86_64 LibreOffice_project/184fe81b8c8c30d8b5082578aee2fed2ea847c01</meta:generator>
    <meta:document-statistic meta:object-count="1"/>
  </office:meta>
</office:document-meta>
</file>