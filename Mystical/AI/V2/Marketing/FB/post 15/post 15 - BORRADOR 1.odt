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Fabhrius hablaba de algo que Elara conocía, aunque nunca le había puesto nombre.</text:p>
      <text:p text:style-name="Text_20_body">La necesidad de elegir.</text:p>
      <text:p text:style-name="Text_20_body">Elegir un camino significaba abandonar otros.</text:p>
      <text:p text:style-name="Text_20_body"><text:s/>significaba renunciar a muchas posibilidades.</text:p>
      <text:p text:style-name="Text_20_body">Y cada vez que una pregunta encontraba respuesta...</text:p>
      <text:p text:style-name="Text_20_body">aparecían otras nuevas.</text:p>
      <text:p text:style-name="Text_20_body">Quizá aquel era el verdadero problema.</text:p>
      <text:p text:style-name="Text_20_body">No la falta de conocimiento.</text:p>
      <text:p text:style-name="Text_20_body">Sino la inmensidad del mundo.</text:p>
      <text:p text:style-name="Text_20_body">demasiado grande para recorrerlo todo.</text:p>
      <text:p text:style-name="Text_20_body">Entonces...</text:p>
      <text:p text:style-name="Text_20_body">¿qué sentido tenía empezar?</text:p>
      <text:p text:style-name="Text_20_body">Elara volvió a leer las palabras de Fabhrius.</text:p>
      <text:p text:style-name="Text_20_body">Tal vez el propósito de la búsqueda nunca fue recorrer todos los caminos.</text:p>
      <text:p text:style-name="Text_20_body">Tal vez consistía en descubrir cuáles merecían ser recorrid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0T10:43:33.624000000</meta:creation-date>
    <dc:date>2026-06-20T10:46:33.935000000</dc:date>
    <meta:editing-duration>PT3M1S</meta:editing-duration>
    <meta:editing-cycles>1</meta:editing-cycles>
    <meta:document-statistic meta:table-count="0" meta:image-count="0" meta:object-count="0" meta:page-count="1" meta:paragraph-count="15" meta:word-count="95" meta:character-count="619" meta:non-whitespace-character-count="538"/>
    <meta:generator>LibreOffice/7.3.5.2$Windows_X86_64 LibreOffice_project/184fe81b8c8c30d8b5082578aee2fed2ea847c01</meta:generator>
  </office:meta>
</office:document-meta>
</file>