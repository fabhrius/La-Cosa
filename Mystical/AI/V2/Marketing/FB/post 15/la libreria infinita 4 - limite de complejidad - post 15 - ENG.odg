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60054B8DF3DF2A2C6F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F" svg:font-family="" style:font-family-generic="roman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iberation Sans3" svg:font-family="'Liberation Sans'" style:font-family-generic="roman" style:font-pitch="variable"/>
    <style:font-face style:name="Liberation Sans4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Lucida Sans3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pitch="variable"/>
    <style:font-face style:name="Segoe UI1" svg:font-family="'Segoe UI'" style:font-family-generic="roman" style:font-pitch="variable"/>
    <style:font-face style:name="Segoe UI2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000000" draw:fill="none" draw:fill-color="#ffffff" fo:min-height="26.1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de78a" loext:opacity="100%"/>
    </style:style>
    <style:style style:name="T1" style:family="text">
      <style:text-properties fo:font-variant="normal" fo:text-transform="none" fo:color="#fde78a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de78a" loext:opacity="100%" style:font-name="Sans Serif Collection" fo:font-size="12pt" style:font-size-asian="12pt" style:font-size-complex="12pt"/>
    </style:style>
    <style:style style:name="T3" style:family="text">
      <style:text-properties fo:color="#fde78a" loext:opacity="100%" style:font-name="EB Garamond" fo:font-size="22pt" style:font-size-asian="22pt" style:font-size-complex="22pt"/>
    </style:style>
    <style:style style:name="T4" style:family="text">
      <style:text-properties fo:color="#fde78a" loext:opacity="100%" style:font-name="Old English Text MT" fo:font-size="60pt" style:font-size-asian="60pt" style:font-size-complex="60pt"/>
    </style:style>
    <style:style style:name="T5" style:family="text">
      <style:text-properties fo:font-variant="normal" fo:text-transform="none" fo:color="#fde78a" loext:opacity="100%" style:text-outline="false" style:text-line-through-style="none" style:text-line-through-type="none" style:font-name="EB Garamond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de78a" loext:opacity="100%" style:text-outline="false" style:text-line-through-style="none" style:text-line-through-type="none" style:font-name="EB Garamond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de78a" loext:opacity="100%" style:text-outline="false" style:text-line-through-style="none" style:text-line-through-type="none" style:font-name="Script MT Bold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aebae" loext:opacity="100%" style:font-name="Script MT Bold" fo:font-size="15pt" style:font-size-asian="15pt" style:font-size-complex="15pt"/>
    </style:style>
    <style:style style:name="T9" style:family="text">
      <style:text-properties fo:color="#fde78a" loext:opacity="100%" style:font-name="Script MT Bold" fo:font-size="15pt" style:font-size-asian="15pt" style:font-size-complex="15pt"/>
    </style:style>
    <style:style style:name="T10" style:family="text">
      <style:text-properties fo:color="#faebae" loext:opacity="100%" style:font-name="Sans Serif Collectio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5" draw:layer="layout" svg:width="19cm" svg:height="26.38cm" svg:x="1cm" svg:y="0.917cm">
          <draw:text-box>
            <text:p text:style-name="P1"><text:span text:style-name="T1">( Omniscientis — Fragment XV </text:span><text:span text:style-name="T2">— The Temple of Rain — Part IX )</text:span></text:p>
            <text:p text:style-name="P2"><text:span text:style-name="T3"><text:tab/></text:span><text:span text:style-name="T4">S</text:span><text:span text:style-name="T5">tanding among endless shelves, Elara finally understood why the library defeated so many seekers.</text:span></text:p>
            <text:p text:style-name="P2"><text:span text:style-name="T5"/></text:p>
            <text:p text:style-name="P3"><text:span text:style-name="T6">The problem was not the absence of answers.</text:span></text:p>
            <text:p text:style-name="P3"><text:span text:style-name="T6">The problem was the abundance of them.</text:span></text:p>
            <text:p><text:span text:style-name="T5"/></text:p>
            <text:p text:style-name="P4"><text:span text:style-name="T5">Every book opened a new path. </text:span></text:p>
            <text:p text:style-name="P4"><text:span text:style-name="T5">Every answer gave birth to new questions.</text:span></text:p>
            <text:p><text:span text:style-name="T5">No mind could examine every volume.</text:span></text:p>
            <text:p text:style-name="P4"><text:span text:style-name="T5">No life was long enough.</text:span></text:p>
            <text:p><text:span text:style-name="T5">For a moment, the task seemed hopeless.</text:span></text:p>
            <text:p><text:span text:style-name="T5">Then she remembered the words of Fabhrius.</text:span></text:p>
            <text:p><text:span text:style-name="T5"/></text:p>
            <text:p text:style-name="P3"><text:span text:style-name="T5">Perhaps wisdom begins with choosing.</text:span></text:p>
            <text:p text:style-name="P3"><text:span text:style-name="T5">Deciding what to ignore.</text:span></text:p>
            <text:p text:style-name="P3"><text:span text:style-name="T5">Deciding what to pursue.</text:span></text:p>
            <text:p><text:span text:style-name="T5"/></text:p>
            <text:p><text:span text:style-name="T5">Perhaps, when possibilities become endless, </text:span></text:p>
            <text:p text:style-name="P4"><text:span text:style-name="T5">the best strategy is not to search everywhere.</text:span></text:p>
            <text:p><text:span text:style-name="T5"/></text:p>
            <text:p text:style-name="P3"><text:span text:style-name="T5">But to </text:span><text:span text:style-name="T6">choose</text:span><text:span text:style-name="T5"> carefully where to look next.</text:span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<text:p text:style-name="P2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To be continued</text:span><text:span text:style-name="T9">…</text:span></text:p>
            <text:p text:style-name="P1"><text:span text:style-name="T1">(From</text:span><text:span text:style-name="T10"> “Omniscientis”, the lost codex of Lluviara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F" svg:font-family="" style:font-family-generic="roman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iberation Sans3" svg:font-family="'Liberation Sans'" style:font-family-generic="roman" style:font-pitch="variable"/>
    <style:font-face style:name="Liberation Sans4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Lucida Sans3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pitch="variable"/>
    <style:font-face style:name="Segoe UI1" svg:font-family="'Segoe UI'" style:font-family-generic="roman" style:font-pitch="variable"/>
    <style:font-face style:name="Segoe UI2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4000000060054B8DF3DF2A2C6F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Lucida Sans3" style:font-family-complex="'Lucida Sans'" style:font-pitch-complex="variable" style:font-size-complex="12pt" style:language-complex="hi" style:country-complex="IN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4" style:font-family-complex="'Liberation Sans', Arial" style:font-family-generic-complex="swiss" style:font-pitch-complex="variable" style:font-size-complex="14pt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6-21T10:33:04.520000000</dc:date>
    <meta:editing-duration>PT5H15M10S</meta:editing-duration>
    <meta:editing-cycles>49</meta:editing-cycles>
    <meta:generator>LibreOffice/7.3.5.2$Windows_X86_64 LibreOffice_project/184fe81b8c8c30d8b5082578aee2fed2ea847c01</meta:generator>
    <meta:document-statistic meta:object-count="1"/>
  </office:meta>
</office:document-meta>
</file>