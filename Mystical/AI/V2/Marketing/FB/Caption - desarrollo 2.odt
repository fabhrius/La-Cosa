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esa decisión puede ser muy importante para el proyecto.</text:p>
      <text:p text:style-name="Text_20_body">Hasta ahora tenemos dos voces distintas:</text:p>
      <text:p text:style-name="Text_20_body"><text:span text:style-name="Strong_20_Emphasis">1. La historia (Elara, Khrom, Fabhrius)</text:span></text:p>
      <text:list xml:id="list2739270495" text:style-name="L1">
        <text:list-item>
          <text:p text:style-name="P1">Vive dentro del universo de Omniscientis.</text:p>
        </text:list-item>
        <text:list-item>
          <text:p text:style-name="P1">Habla mediante símbolos, misterio, revelaciones y experiencias.</text:p>
        </text:list-item>
      </text:list>
      <text:p text:style-name="Text_20_body"><text:span text:style-name="Strong_20_Emphasis">2. El caption</text:span></text:p>
      <text:list xml:id="list865319129" text:style-name="L2">
        <text:list-item>
          <text:p text:style-name="P2">Vive fuera de la historia.</text:p>
        </text:list-item>
        <text:list-item>
          <text:p text:style-name="P2">Es la voz del lector.</text:p>
        </text:list-item>
        <text:list-item>
          <text:p text:style-name="P2">Se hace preguntas reales.</text:p>
        </text:list-item>
        <text:list-item>
          <text:p text:style-name="P2">No pretende conocer las respuestas.</text:p>
        </text:list-item>
      </text:list>
      <text:p text:style-name="Text_20_body">Eso crea un puente entre el lector y la ficción.</text:p>
      <text:p text:style-name="Horizontal_20_Line"/>
      <text:p text:style-name="Text_20_body">Si seguimos esa línea, los captions no deberían explicar nada.</text:p>
      <text:p text:style-name="Text_20_body">Deberían plantear preguntas que cualquier persona pueda hacerse mirando al techo antes de dormir.</text:p>
      <text:p text:style-name="Text_20_body">Por ejemplo, podríamos explorar estos temas:</text:p>
      <text:h text:style-name="Heading_20_3" text:outline-level="3">El origen</text:h>
      <text:list xml:id="list2036080158" text:style-name="L3">
        <text:list-item>
          <text:p text:style-name="P3">¿Por qué existe algo en lugar de nada?</text:p>
        </text:list-item>
        <text:list-item>
          <text:p text:style-name="P3">¿Puede la nada existir?</text:p>
        </text:list-item>
        <text:list-item>
          <text:p text:style-name="P3">¿Tuvo la realidad un comienzo?</text:p>
        </text:list-item>
        <text:list-item>
          <text:p text:style-name="P3">Si tuvo un comienzo, ¿qué había antes?</text:p>
        </text:list-item>
        <text:list-item>
          <text:p text:style-name="P3">Si no lo tuvo, ¿por qué pensamos que debería tenerlo?</text:p>
        </text:list-item>
      </text:list>
      <text:p text:style-name="Horizontal_20_Line"/>
      <text:h text:style-name="Heading_20_3" text:outline-level="3">La conciencia</text:h>
      <text:list xml:id="list35067434" text:style-name="L4">
        <text:list-item>
          <text:p text:style-name="P4">¿Por qué hay alguien observando?</text:p>
        </text:list-item>
        <text:list-item>
          <text:p text:style-name="P4">¿Qué es exactamente aquello que observa?</text:p>
        </text:list-item>
        <text:list-item>
          <text:p text:style-name="P4">¿Dónde termina el cuerpo y comienza el "yo"?</text:p>
        </text:list-item>
        <text:list-item>
          <text:p text:style-name="P4">¿Eres la misma persona que hace diez años?</text:p>
        </text:list-item>
        <text:list-item>
          <text:p text:style-name="P4">Si todos tus recuerdos desaparecieran, ¿seguirías siendo tú?</text:p>
        </text:list-item>
      </text:list>
      <text:p text:style-name="Horizontal_20_Line"/>
      <text:h text:style-name="Heading_20_3" text:outline-level="3"><text:soft-page-break/>El tiempo</text:h>
      <text:list xml:id="list1625514549" text:style-name="L5">
        <text:list-item>
          <text:p text:style-name="P5">¿El pasado sigue existiendo en algún lugar?</text:p>
        </text:list-item>
        <text:list-item>
          <text:p text:style-name="P5">¿O desaparece para siempre?</text:p>
        </text:list-item>
        <text:list-item>
          <text:p text:style-name="P5">¿El futuro ya existe?</text:p>
        </text:list-item>
        <text:list-item>
          <text:p text:style-name="P5">¿O está siendo creado ahora mismo?</text:p>
        </text:list-item>
      </text:list>
      <text:p text:style-name="Horizontal_20_Line"/>
      <text:h text:style-name="Heading_20_3" text:outline-level="3">La identidad</text:h>
      <text:list xml:id="list1658347727" text:style-name="L6">
        <text:list-item>
          <text:p text:style-name="P6">¿Qué somos realmente?</text:p>
        </text:list-item>
        <text:list-item>
          <text:p text:style-name="P6">¿Una mente?</text:p>
        </text:list-item>
        <text:list-item>
          <text:p text:style-name="P6">¿Una historia?</text:p>
        </text:list-item>
        <text:list-item>
          <text:p text:style-name="P6">¿Un recuerdo?</text:p>
        </text:list-item>
        <text:list-item>
          <text:p text:style-name="P6">¿Un proceso?</text:p>
        </text:list-item>
      </text:list>
      <text:p text:style-name="Horizontal_20_Line"/>
      <text:h text:style-name="Heading_20_3" text:outline-level="3">La percepción</text:h>
      <text:list xml:id="list1416391674" text:style-name="L7">
        <text:list-item>
          <text:p text:style-name="P7">¿Cuánto de lo que vemos pertenece al mundo?</text:p>
        </text:list-item>
        <text:list-item>
          <text:p text:style-name="P7">¿Y cuánto pertenece a nosotros?</text:p>
        </text:list-item>
        <text:list-item>
          <text:p text:style-name="P7">¿Es posible ver algo sin interpretarlo?</text:p>
        </text:list-item>
        <text:list-item>
          <text:p text:style-name="P7">¿Dos personas observan el mismo mundo?</text:p>
        </text:list-item>
      </text:list>
      <text:p text:style-name="Horizontal_20_Line"/>
      <text:h text:style-name="Heading_20_3" text:outline-level="3">La vida</text:h>
      <text:list xml:id="list1628335740" text:style-name="L8">
        <text:list-item>
          <text:p text:style-name="P8">¿Por qué la materia comenzó a vivir?</text:p>
        </text:list-item>
        <text:list-item>
          <text:p text:style-name="P8">¿Por qué la vida lucha por continuar?</text:p>
        </text:list-item>
        <text:list-item>
          <text:p text:style-name="P8">¿Por qué nos importa sobrevivir?</text:p>
        </text:list-item>
      </text:list>
      <text:p text:style-name="Horizontal_20_Line"/>
      <text:h text:style-name="Heading_20_3" text:outline-level="3">Lo trascendente</text:h>
      <text:list xml:id="list445763343" text:style-name="L9">
        <text:list-item>
          <text:p text:style-name="P9">Si existe una inteligencia detrás de la vida...<text:line-break/>¿forma parte del universo?<text:line-break/>¿o el universo forma parte de ella?</text:p>
        </text:list-item>
        <text:list-item>
          <text:p text:style-name="P9">Si existe un creador...<text:line-break/>¿quién creó al creador?</text:p>
        </text:list-item>
      </text:list>
      <text:p text:style-name="Horizontal_20_Line"><text:soft-page-break/></text:p>
      <text:h text:style-name="Heading_20_3" text:outline-level="3">Las paradojas</text:h>
      <text:p text:style-name="Text_20_body">Estas suelen funcionar especialmente bien porque obligan a detenerse.</text:p>
      <text:list xml:id="list516155236" text:style-name="L10">
        <text:list-item>
          <text:p text:style-name="P10">If everything needs a creator, who created the creator?</text:p>
        </text:list-item>
        <text:list-item>
          <text:p text:style-name="P10">If nothing can come from nothing, where did the first thing come from?</text:p>
        </text:list-item>
        <text:list-item>
          <text:p text:style-name="P10">If existence requires a cause, does the cause require one too?</text:p>
        </text:list-item>
        <text:list-item>
          <text:p text:style-name="P10">If reality is a dream, does the dream exist?</text:p>
        </text:list-item>
      </text:list>
      <text:p text:style-name="Horizontal_20_Line"/>
      <text:h text:style-name="Heading_20_3" text:outline-level="3">Preguntas pequeñas con profundidad oculta</text:h>
      <text:p text:style-name="Text_20_body">Estas me parecen especialmente adecuadas para Facebook porque son breves:</text:p>
      <text:p text:style-name="Quotations">What was the first thing that ever happened?</text:p>
      <text:p text:style-name="Quotations">Can nothingness exist?</text:p>
      <text:p text:style-name="Quotations">Why is there an observer?</text:p>
      <text:p text:style-name="Quotations">Does the universe know that it exists?</text:p>
      <text:p text:style-name="Quotations">If reality has no purpose, why do we search for one?</text:p>
      <text:p text:style-name="Quotations">Are we discovering reality, or inventing it?</text:p>
      <text:p text:style-name="Quotations">If you remove every memory, what remains?</text:p>
      <text:p text:style-name="Quotations">What is older than time?</text:p>
      <text:p text:style-name="Quotations">Why does existence seem normal?</text:p>
      <text:p text:style-name="Quotations">Could the greatest mystery be the fact that we are here at all?</text:p>
      <text:p text:style-name="Horizontal_20_Line"/>
      <text:p text:style-name="Text_20_body">De todas estas familias de preguntas, creo que las que mejor encajan con Omniscientis son las que empiezan con:</text:p>
      <text:p text:style-name="Quotations"><text:span text:style-name="Strong_20_Emphasis">"Why is there an observer?"</text:span></text:p>
      <text:p text:style-name="Text_20_body">porque conectan directamente con la obsesión de Elara:</text:p>
      <text:p text:style-name="Quotations"><text:span text:style-name="Emphasis">¿Por qué estoy aquí observando la realidad?</text:span></text:p>
      <text:p text:style-name="Text_20_body">Esa pregunta es tan simple que un niño puede formularla.</text:p>
      <text:p text:style-name="Text_20_body"><text:soft-page-break/>Y tan profunda que probablemente podría sostener todo el libr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6T19:21:52.634000000</meta:creation-date>
    <dc:date>2026-06-06T19:22:20.643000000</dc:date>
    <meta:editing-duration>PT28S</meta:editing-duration>
    <meta:editing-cycles>1</meta:editing-cycles>
    <meta:document-statistic meta:table-count="0" meta:image-count="0" meta:object-count="0" meta:page-count="4" meta:paragraph-count="73" meta:word-count="520" meta:character-count="2908" meta:non-whitespace-character-count="2499"/>
    <meta:generator>LibreOffice/7.3.5.2$Windows_X86_64 LibreOffice_project/184fe81b8c8c30d8b5082578aee2fed2ea847c01</meta:generator>
  </office:meta>
</office:document-meta>
</file>