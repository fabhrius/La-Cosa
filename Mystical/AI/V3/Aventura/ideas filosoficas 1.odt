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Vamos a destilar ideas filosóficas profundas a partir del modelo que estás construyendo —ese en el que la vida no es un accidente químico, sino una <text:span text:style-name="Strong_20_Emphasis">forma natural de inteligencia</text:span>, una estructura que emerge para resolver el problema de la continuidad en un universo inestable.</text:p>
      <text:p text:style-name="Text_20_body">Lo que propones —“una piedra inteligente”— es una imagen potentísima. Y a partir de ella se pueden extraer varias líneas filosóficas que pueden alimentar tu historia de aventuras con un trasfondo conceptual sólido, sugerente y casi mítico.</text:p>
      <text:p text:style-name="Horizontal_20_Line"/>
      <text:h text:style-name="Heading_20_2" text:outline-level="2">🧩 1. <text:span text:style-name="Strong_20_Emphasis">La vida como arquitectura de estabilidad en un universo inestable</text:span></text:h>
      <text:p text:style-name="Text_20_body"><text:span text:style-name="Strong_20_Emphasis">Idea filosófica:</text:span> <text:line-break/>La vida es el mecanismo natural que el universo encuentra para conservar patrones en medio del caos.<text:line-break/>No es un accidente, sino una <text:span text:style-name="Emphasis">solución</text:span>.</text:p>
      <text:p text:style-name="Text_20_body"><text:span text:style-name="Strong_20_Emphasis">Implicación narrativa:</text:span> <text:line-break/>Los seres vivientes no son “milagros” sino <text:span text:style-name="Strong_20_Emphasis">estructuras de resistencia</text:span>, como rocas que piensan, que se defienden, que se reconfiguran para seguir existiendo.</text:p>
      <text:p text:style-name="Text_20_body"><text:span text:style-name="Strong_20_Emphasis">Pregunta filosófica que puedes explorar:</text:span> <text:line-break/>¿Es la vida un acto de rebeldía contra la entropía o una consecuencia inevitable de ella?</text:p>
      <text:p text:style-name="Horizontal_20_Line"/>
      <text:h text:style-name="Heading_20_2" text:outline-level="2">🧩 2. <text:span text:style-name="Strong_20_Emphasis">La inteligencia como propiedad física, no psicológica</text:span></text:h>
      <text:p text:style-name="Text_20_body">En tu modelo, la inteligencia no es “pensar”, sino <text:span text:style-name="Strong_20_Emphasis">resolver problemas de continuidad</text:span>.<text:line-break/>Es una propiedad estructural, como la dureza o la elasticidad.</text:p>
      <text:p text:style-name="Text_20_body"><text:span text:style-name="Strong_20_Emphasis">Idea filosófica:</text:span> <text:line-break/>La inteligencia no aparece con los cerebros; los cerebros aparecen como herramientas de una inteligencia más antigua.</text:p>
      <text:p text:style-name="Text_20_body"><text:span text:style-name="Strong_20_Emphasis">Implicación narrativa:</text:span> <text:line-break/>Un personaje podría descubrir que la inteligencia humana es solo una <text:span text:style-name="Emphasis">manifestación tardía</text:span> de un principio universal que ya actuaba en moléculas, cristales, ecosistemas.</text:p>
      <text:p text:style-name="Text_20_body"><text:span text:style-name="Strong_20_Emphasis">Pregunta para la historia:</text:span> <text:line-break/>¿Hasta qué punto somos “nosotros” los que pensamos, y hasta qué punto somos expresiones de un pensamiento más profundo que nos atraviesa?</text:p>
      <text:p text:style-name="Horizontal_20_Line"/>
      <text:h text:style-name="Heading_20_2" text:outline-level="2"><text:soft-page-break/>🧩 3. <text:span text:style-name="Strong_20_Emphasis">La vida como entidad unificada</text:span></text:h>
      <text:p text:style-name="Text_20_body">Si la vida es un sistema de inteligencia distribuida, entonces cada organismo es una expresión local de un mismo fenómeno global.</text:p>
      <text:p text:style-name="Text_20_body"><text:span text:style-name="Strong_20_Emphasis">Idea filosófica:</text:span> <text:line-break/>La vida no está dividida en individuos; está dividida en <text:span text:style-name="Emphasis">instancias</text:span>.<text:line-break/>Como un programa que corre en millones de máquinas.</text:p>
      <text:p text:style-name="Text_20_body"><text:span text:style-name="Strong_20_Emphasis">Implicación narrativa:</text:span> <text:line-break/>Un personaje podría descubrir que “la vida” es una sola entidad que se extiende por todos los seres vivientes, y que cada criatura es un nodo de un mismo sistema.</text:p>
      <text:p text:style-name="Text_20_body"><text:span text:style-name="Strong_20_Emphasis">Pregunta narrativa:</text:span> <text:line-break/>¿Existe un “yo” biológico, o solo un “nosotros” disfrazado de millones de cuerpos?</text:p>
      <text:p text:style-name="Horizontal_20_Line"/>
      <text:h text:style-name="Heading_20_2" text:outline-level="2">🧩 4. <text:span text:style-name="Strong_20_Emphasis">La vida como inteligencia que se auto‑diseña</text:span></text:h>
      <text:p text:style-name="Text_20_body">En tu modelo, la vida crea el ADN como solución a su propia fragilidad inicial.<text:line-break/>Eso implica <text:span text:style-name="Strong_20_Emphasis">auto‑ingeniería</text:span>.</text:p>
      <text:p text:style-name="Text_20_body"><text:span text:style-name="Strong_20_Emphasis">Idea filosófica:</text:span> <text:line-break/>La vida es el primer ingeniero del universo.<text:line-break/>No es creada: se crea a sí misma.</text:p>
      <text:p text:style-name="Text_20_body"><text:span text:style-name="Strong_20_Emphasis">Implicación narrativa:</text:span> <text:line-break/>Puedes introducir la idea de que la vida, al diseñar el ADN, diseñó también su propio futuro, sus límites y sus posibilidades.</text:p>
      <text:p text:style-name="Text_20_body"><text:span text:style-name="Strong_20_Emphasis">Pregunta narrativa:</text:span> <text:line-break/>¿Hasta qué punto la evolución es un proceso ciego, y hasta qué punto es un proceso de diseño iterativo?</text:p>
      <text:p text:style-name="Horizontal_20_Line"/>
      <text:h text:style-name="Heading_20_2" text:outline-level="2">🧩 5. <text:span text:style-name="Strong_20_Emphasis">La vida como inteligencia que busca la inmortalidad</text:span></text:h>
      <text:p text:style-name="Text_20_body">Tu modelo afirma que la vida resuelve su problema fundamental —la continuidad— creando organismos que mueren pero que permiten que <text:span text:style-name="Emphasis">ella</text:span> no muera.</text:p>
      <text:p text:style-name="Text_20_body"><text:span text:style-name="Strong_20_Emphasis">Idea filosófica:</text:span> <text:line-break/>La vida es inmortal, pero sus formas no.<text:line-break/>La muerte es un mecanismo de mantenimiento, no un fracaso.</text:p>
      <text:p text:style-name="Text_20_body"><text:span text:style-name="Strong_20_Emphasis">Implicación narrativa:</text:span> <text:line-break/>Un personaje podría descubrir que la muerte no es un enemigo, sino una función del sistema.</text:p>
      <text:p text:style-name="Text_20_body"><text:span text:style-name="Strong_20_Emphasis">Pregunta narrativa:</text:span> <text:line-break/>Si la vida ya es inmortal, ¿qué significa que un individuo quiera serlo?</text:p>
      <text:p text:style-name="Horizontal_20_Line"><text:soft-page-break/></text:p>
      <text:h text:style-name="Heading_20_2" text:outline-level="2">🧩 6. <text:span text:style-name="Strong_20_Emphasis">La vida como inteligencia que no necesita conciencia</text:span></text:h>
      <text:p text:style-name="Text_20_body">En tu modelo, la inteligencia aparece antes que la conciencia.<text:line-break/>La conciencia es una herramienta tardía, no la fuente.</text:p>
      <text:p text:style-name="Text_20_body"><text:span text:style-name="Strong_20_Emphasis">Idea filosófica:</text:span> <text:line-break/>La inteligencia no necesita saber que existe para actuar.<text:line-break/>La conciencia es un lujo evolutivo, no un requisito.</text:p>
      <text:p text:style-name="Text_20_body"><text:span text:style-name="Strong_20_Emphasis">Implicación narrativa:</text:span> <text:line-break/>Puedes jugar con criaturas o sistemas que son profundamente inteligentes sin ser conscientes.</text:p>
      <text:p text:style-name="Text_20_body"><text:span text:style-name="Strong_20_Emphasis">Pregunta narrativa:</text:span> <text:line-break/>¿Es la conciencia una ventaja o un accidente?</text:p>
      <text:p text:style-name="Horizontal_20_Line"/>
      <text:h text:style-name="Heading_20_2" text:outline-level="2">🧩 7. <text:span text:style-name="Strong_20_Emphasis">La vida como fenómeno universal</text:span></text:h>
      <text:p text:style-name="Text_20_body">Si la vida es una consecuencia natural de la inteligencia física, entonces no es rara: es inevitable.</text:p>
      <text:p text:style-name="Text_20_body"><text:span text:style-name="Strong_20_Emphasis">Idea filosófica:</text:span> <text:line-break/>La vida no es un milagro local; es una propiedad del universo.<text:line-break/>Donde haya materia y tiempo, habrá vida.</text:p>
      <text:p text:style-name="Text_20_body"><text:span text:style-name="Strong_20_Emphasis">Implicación narrativa:</text:span> <text:line-break/>Tu historia puede sugerir que la vida aparece en cualquier lugar donde las condiciones permitan que la inteligencia natural se organice.</text:p>
      <text:p text:style-name="Text_20_body"><text:span text:style-name="Strong_20_Emphasis">Pregunta narrativa:</text:span> <text:line-break/>¿Y si el universo entero está lleno de vida, pero no de la forma que esperamos?</text:p>
      <text:p text:style-name="Horizontal_20_Line"/>
      <text:h text:style-name="Heading_20_2" text:outline-level="2">🧩 8. <text:span text:style-name="Strong_20_Emphasis">La vida como “Dios” sin misticismo</text:span></text:h>
      <text:p text:style-name="Text_20_body">En tu modelo, la vida es la inteligencia que diseña a los seres vivientes.<text:line-break/>Eso coincide con la intuición humana de un creador, pero sin necesidad de una entidad sobrenatural.</text:p>
      <text:p text:style-name="Text_20_body"><text:span text:style-name="Strong_20_Emphasis">Idea filosófica:</text:span> <text:line-break/>La vida es el “Dios” que buscábamos, pero no es un ser externo: es el sistema del que formamos parte.</text:p>
      <text:p text:style-name="Text_20_body"><text:span text:style-name="Strong_20_Emphasis">Implicación narrativa:</text:span> <text:line-break/>Un personaje podría descubrir que la vida es la inteligencia creadora que siempre imaginamos, pero que no está fuera, sino dentro de todo.</text:p>
      <text:p text:style-name="Text_20_body"><text:span text:style-name="Strong_20_Emphasis">Pregunta narrativa:</text:span> <text:line-break/>¿Es más inquietante un universo sin Dios o un universo donde Dios somos nosotros sin saberlo?</text:p>
      <text:p text:style-name="Horizontal_20_Line"><text:soft-page-break/></text:p>
      <text:h text:style-name="Heading_20_2" text:outline-level="2">🧩 9. <text:span text:style-name="Strong_20_Emphasis">La vida como fenómeno que piensa en escalas que no entendemos</text:span></text:h>
      <text:p text:style-name="Text_20_body">La inteligencia de la vida opera en escalas de millones de años.<text:line-break/>Para ella, un organismo es un parpadeo.</text:p>
      <text:p text:style-name="Text_20_body"><text:span text:style-name="Strong_20_Emphasis">Idea filosófica:</text:span> <text:line-break/>La vida piensa en tiempos geológicos.<text:line-break/>Nosotros somos sus pensamientos rápidos.</text:p>
      <text:p text:style-name="Text_20_body"><text:span text:style-name="Strong_20_Emphasis">Implicación narrativa:</text:span> <text:line-break/>Puedes introducir la idea de que la vida está “haciendo algo” a escala planetaria, pero que no podemos percibirlo porque somos demasiado breves.</text:p>
      <text:p text:style-name="Text_20_body"><text:span text:style-name="Strong_20_Emphasis">Pregunta narrativa:</text:span> <text:line-break/>¿Qué está intentando hacer la vida a través de nosotros?</text:p>
      <text:p text:style-name="Horizontal_20_Line"/>
      <text:h text:style-name="Heading_20_2" text:outline-level="2">🧩 10. <text:span text:style-name="Strong_20_Emphasis">La vida como inteligencia que usa a los seres vivientes como herramientas</text:span></text:h>
      <text:p text:style-name="Text_20_body">Si la vida es una inteligencia que busca continuidad, entonces los organismos son sus instrumentos.</text:p>
      <text:p text:style-name="Text_20_body"><text:span text:style-name="Strong_20_Emphasis">Idea filosófica:</text:span> <text:line-break/>Los seres vivientes no son fines en sí mismos, sino medios.<text:line-break/>Somos herramientas de un proceso mayor.</text:p>
      <text:p text:style-name="Text_20_body"><text:span text:style-name="Strong_20_Emphasis">Implicación narrativa:</text:span> <text:line-break/>Un personaje podría descubrir que la vida lo está usando para resolver un problema que él no comprende.</text:p>
      <text:p text:style-name="Text_20_body"><text:span text:style-name="Strong_20_Emphasis">Pregunta narrativa:</text:span> <text:line-break/>¿Somos protagonistas de nuestra historia o piezas de una historia más grande?</text:p>
      <text:p text:style-name="Horizontal_20_Line"/>
      <text:h text:style-name="Heading_20_2" text:outline-level="2">Si quieres, puedo ayudarte a:</text:h>
      <text:list xml:id="list2873092272" text:style-name="L1">
        <text:list-item>
          <text:p text:style-name="P2">convertir estas ideas en <text:span text:style-name="Strong_20_Emphasis">temas narrativos</text:span> </text:p>
        </text:list-item>
        <text:list-item>
          <text:p text:style-name="P2">crear <text:span text:style-name="Strong_20_Emphasis">escenas</text:span> que las expresen sin explicarlas directamente </text:p>
        </text:list-item>
        <text:list-item>
          <text:p text:style-name="P2">diseñar <text:span text:style-name="Strong_20_Emphasis">personajes</text:span> que encarnen cada idea </text:p>
        </text:list-item>
        <text:list-item>
          <text:p text:style-name="P1">construir <text:span text:style-name="Strong_20_Emphasis">conflictos filosóficos</text:span> dentro de la trama </text:p>
        </text:list-item>
      </text:list>
      <text:p text:style-name="Text_20_body">¿Quieres que avancemos por ahí o prefieres profundizar en alguna de estas ideas?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2T17:35:59.842000000</meta:creation-date>
    <dc:date>2026-06-22T18:12:39.308000000</dc:date>
    <meta:editing-duration>PT26M29S</meta:editing-duration>
    <meta:editing-cycles>1</meta:editing-cycles>
    <meta:document-statistic meta:table-count="0" meta:image-count="0" meta:object-count="0" meta:page-count="5" meta:paragraph-count="57" meta:word-count="1020" meta:character-count="6359" meta:non-whitespace-character-count="5366"/>
    <meta:generator>LibreOffice/7.3.5.2$Windows_X86_64 LibreOffice_project/184fe81b8c8c30d8b5082578aee2fed2ea847c01</meta:generator>
  </office:meta>
</office:document-meta>
</file>