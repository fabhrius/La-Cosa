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va una propuesta sólida, clara y profundamente integrada con tu modelo lógico y el problema del laberinto —pero escrita para que cualquier lector, incluso sin formación científica, pueda sentir que entiende qué es <text:span text:style-name="Emphasis">autonomía</text:span> y por qué es un rasgo esencial de la inteligencia viva.</text:p>
      <text:p text:style-name="Horizontal_20_Line"/>
      <text:h text:style-name="Heading_20_2" text:outline-level="2"><text:span text:style-name="Strong_20_Emphasis">Capítulo: Autonomía — La inteligencia que se sostiene a sí misma</text:span></text:h>
      <text:h text:style-name="Heading_20_3" text:outline-level="3"><text:span text:style-name="Strong_20_Emphasis">Idea central en una frase</text:span></text:h>
      <text:p text:style-name="Text_20_body">La autonomía es la capacidad de un sistema para <text:span text:style-name="Emphasis">mantenerse vivo, operativo y resolutivo sin depender de instrucciones externas</text:span>, y en el modelo del laberinto esto se revela como una propiedad emergente, no programada.</text:p>
      <text:p text:style-name="Horizontal_20_Line"/>
      <text:h text:style-name="Heading_20_2" text:outline-level="2"><text:span text:style-name="Strong_20_Emphasis">1. Por qué la autonomía importa</text:span></text:h>
      <text:p text:style-name="Text_20_body">Para un lector general, “autonomía” suele sonar a independencia o libertad. Pero aquí queremos mostrar algo más profundo:</text:p>
      <text:list xml:id="list3088603282" text:style-name="L1">
        <text:list-item>
          <text:p text:style-name="P2">Un sistema autónomo <text:span text:style-name="Strong_20_Emphasis">no necesita que alguien lo guíe paso a paso</text:span>. </text:p>
        </text:list-item>
        <text:list-item>
          <text:p text:style-name="P2">Puede <text:span text:style-name="Strong_20_Emphasis">detectar problemas</text:span>, <text:span text:style-name="Strong_20_Emphasis">corregirse</text:span>, <text:span text:style-name="Strong_20_Emphasis">mantener su funcionamiento</text:span> y <text:span text:style-name="Strong_20_Emphasis">seguir avanzando</text:span> incluso cuando el entorno cambia. </text:p>
        </text:list-item>
        <text:list-item>
          <text:p text:style-name="P1">Y lo más importante: <text:span text:style-name="Strong_20_Emphasis">puede generar sus propias condiciones de supervivencia</text:span>. </text:p>
        </text:list-item>
      </text:list>
      <text:p text:style-name="Text_20_body">La vida, en todas sus formas, es autónoma porque <text:span text:style-name="Strong_20_Emphasis">se sostiene a sí misma</text:span>.<text:line-break/>Una inteligencia artificial convencional, en cambio, suele depender de instrucciones externas, mantenimiento externo, energía externa, actualizaciones externas.</text:p>
      <text:p text:style-name="Text_20_body">Tu capítulo debe mostrar que la autonomía no es un “extra”, sino un <text:span text:style-name="Strong_20_Emphasis">criterio fundamental</text:span> para distinguir inteligencias superficiales de inteligencias profundas.</text:p>
      <text:p text:style-name="Horizontal_20_Line"/>
      <text:h text:style-name="Heading_20_2" text:outline-level="2"><text:span text:style-name="Strong_20_Emphasis">2. Cómo aparece la autonomía en el modelo lógico</text:span></text:h>
      <text:p text:style-name="Text_20_body">Aquí es donde el lector debe sentir que lo que vio en el laberinto cobra un nuevo significado.</text:p>
      <text:p text:style-name="Text_20_body">En tu modelo:</text:p>
      <text:list xml:id="list3717102089" text:style-name="L2">
        <text:list-item>
          <text:p text:style-name="P4">No hay un “cerebro central” que controle todo. </text:p>
        </text:list-item>
        <text:list-item>
          <text:p text:style-name="P4">No hay un plan maestro. </text:p>
        </text:list-item>
        <text:list-item>
          <text:p text:style-name="P3">No hay un programador que diga “haz esto ahora”. </text:p>
        </text:list-item>
      </text:list>
      <text:p text:style-name="Text_20_body">Lo que hay es:</text:p>
      <text:list xml:id="list373586785" text:style-name="L3">
        <text:list-item>
          <text:p text:style-name="P6">Individuos simples. </text:p>
        </text:list-item>
        <text:list-item>
          <text:p text:style-name="P6"><text:soft-page-break/>Reglas locales. </text:p>
        </text:list-item>
        <text:list-item>
          <text:p text:style-name="P6">Un ciclo de vida que se repite. </text:p>
        </text:list-item>
        <text:list-item>
          <text:p text:style-name="P6">Un entorno que ofrece desafíos. </text:p>
        </text:list-item>
        <text:list-item>
          <text:p text:style-name="P5">Y una dinámica que se autoorganiza. </text:p>
        </text:list-item>
      </text:list>
      <text:p text:style-name="Text_20_body">La autonomía emerge porque <text:span text:style-name="Strong_20_Emphasis">el sistema no necesita supervisión</text:span>.<text:line-break/>Una vez puesto en marcha, <text:span text:style-name="Strong_20_Emphasis">se mantiene vivo por sí mismo</text:span>.</text:p>
      <text:p text:style-name="Text_20_body">Esto es clave:<text:line-break/><text:span text:style-name="Strong_20_Emphasis">La autonomía no se programó. Apareció.</text:span></text:p>
      <text:p text:style-name="Horizontal_20_Line"/>
      <text:h text:style-name="Heading_20_2" text:outline-level="2"><text:span text:style-name="Strong_20_Emphasis">3. El laberinto como prueba de autonomía</text:span></text:h>
      <text:p text:style-name="Text_20_body">Aquí puedes usar escenas concretas que el lector ya conoce:</text:p>
      <text:list xml:id="list560977381" text:style-name="L4">
        <text:list-item>
          <text:p text:style-name="P8">Cuando un individuo muere, el sistema sigue. </text:p>
        </text:list-item>
        <text:list-item>
          <text:p text:style-name="P8">Cuando un camino se bloquea, el sistema encuentra otro. </text:p>
        </text:list-item>
        <text:list-item>
          <text:p text:style-name="P8">Cuando una solución parcial falla, el sistema se reorganiza. </text:p>
        </text:list-item>
        <text:list-item>
          <text:p text:style-name="P7">Cuando el entorno cambia, la población se adapta. </text:p>
        </text:list-item>
      </text:list>
      <text:p text:style-name="Text_20_body">El lector debe sentir que el sistema:</text:p>
      <text:list xml:id="list3114716374" text:style-name="L5">
        <text:list-item>
          <text:p text:style-name="P10"><text:span text:style-name="Strong_20_Emphasis">No espera órdenes</text:span>. </text:p>
        </text:list-item>
        <text:list-item>
          <text:p text:style-name="P10"><text:span text:style-name="Strong_20_Emphasis">No necesita ser reiniciado</text:span>. </text:p>
        </text:list-item>
        <text:list-item>
          <text:p text:style-name="P10"><text:span text:style-name="Strong_20_Emphasis">No depende de un operador externo</text:span>. </text:p>
        </text:list-item>
        <text:list-item>
          <text:p text:style-name="P9"><text:span text:style-name="Strong_20_Emphasis">No se detiene ante lo inesperado</text:span>. </text:p>
        </text:list-item>
      </text:list>
      <text:p text:style-name="Text_20_body">Esto lo diferencia radicalmente de una máquina tradicional.</text:p>
      <text:p text:style-name="Horizontal_20_Line"/>
      <text:h text:style-name="Heading_20_2" text:outline-level="2"><text:span text:style-name="Strong_20_Emphasis">4. Qué significa autonomía en términos lógicos</text:span></text:h>
      <text:p text:style-name="Text_20_body">Aquí introduces la formalización, pero sin tecnicismos:</text:p>
      <text:p text:style-name="Text_20_body">Una inteligencia autónoma debe cumplir tres funciones:</text:p>
      <text:list xml:id="list4081829870" text:style-name="L6">
        <text:list-item>
          <text:p text:style-name="P12"><text:span text:style-name="Strong_20_Emphasis">Autopercepción mínima</text:span>: detectar su propio estado (energía, posición, éxito, fracaso). </text:p>
        </text:list-item>
        <text:list-item>
          <text:p text:style-name="P12"><text:span text:style-name="Strong_20_Emphasis">Autocorrección</text:span>: modificar su comportamiento sin intervención externa. </text:p>
        </text:list-item>
        <text:list-item>
          <text:p text:style-name="P11"><text:span text:style-name="Strong_20_Emphasis">Autopersistencia</text:span>: mantener su ciclo vital incluso bajo perturbaciones. </text:p>
        </text:list-item>
      </text:list>
      <text:p text:style-name="Text_20_body">En tu modelo:</text:p>
      <text:list xml:id="list2663570121" text:style-name="L7">
        <text:list-item>
          <text:p text:style-name="P14">La autopercepción es la capacidad de cada individuo de evaluar su situación local. </text:p>
        </text:list-item>
        <text:list-item>
          <text:p text:style-name="P14">La autocorrección es la dinámica de selección y reproducción. </text:p>
        </text:list-item>
        <text:list-item>
          <text:p text:style-name="P13">La autopersistencia es el ciclo de vida completo. </text:p>
        </text:list-item>
      </text:list>
      <text:p text:style-name="Text_20_body">El lector debe sentir que la autonomía es un <text:span text:style-name="Emphasis">mecanismo</text:span>, no una metáfora.</text:p>
      <text:p text:style-name="Horizontal_20_Line"><text:soft-page-break/></text:p>
      <text:h text:style-name="Heading_20_2" text:outline-level="2"><text:span text:style-name="Strong_20_Emphasis">5. Comparación intuitiva con otras inteligencias</text:span></text:h>
      <text:p text:style-name="Text_20_body">Sin entrar en tecnicismos:</text:p>
      <text:list xml:id="list49853537" text:style-name="L8">
        <text:list-item>
          <text:p text:style-name="P16">Un robot industrial es muy inteligente en su tarea, pero <text:span text:style-name="Strong_20_Emphasis">no es autónomo</text:span>: si algo cambia, se detiene. </text:p>
        </text:list-item>
        <text:list-item>
          <text:p text:style-name="P16">Un algoritmo de navegación es eficiente, pero <text:span text:style-name="Strong_20_Emphasis">no es autónomo</text:span>: necesita mapas, energía, mantenimiento. </text:p>
        </text:list-item>
        <text:list-item>
          <text:p text:style-name="P15">Un animal en un bosque <text:span text:style-name="Strong_20_Emphasis">sí es autónomo</text:span>: se adapta, aprende, sobrevive. </text:p>
        </text:list-item>
      </text:list>
      <text:p text:style-name="Text_20_body">Tu modelo se parece más al animal que al robot.</text:p>
      <text:p text:style-name="Horizontal_20_Line"/>
      <text:h text:style-name="Heading_20_2" text:outline-level="2"><text:span text:style-name="Strong_20_Emphasis">6. La autonomía como límite superior</text:span></text:h>
      <text:p text:style-name="Text_20_body">Aquí conectas con el objetivo del Acto 4:</text:p>
      <text:p text:style-name="Text_20_body">La autonomía es uno de los rasgos que muestran que la vida opera cerca del límite máximo de inteligencia posible.</text:p>
      <text:p text:style-name="Text_20_body">¿Por qué?</text:p>
      <text:p text:style-name="Text_20_body">Porque un sistema que:</text:p>
      <text:list xml:id="list1296294263" text:style-name="L9">
        <text:list-item>
          <text:p text:style-name="P18">se mantiene vivo, </text:p>
        </text:list-item>
        <text:list-item>
          <text:p text:style-name="P18">se repara, </text:p>
        </text:list-item>
        <text:list-item>
          <text:p text:style-name="P18">se adapta, </text:p>
        </text:list-item>
        <text:list-item>
          <text:p text:style-name="P18">se reorganiza, </text:p>
        </text:list-item>
        <text:list-item>
          <text:p text:style-name="P17">y sigue resolviendo problemas… </text:p>
        </text:list-item>
      </text:list>
      <text:p text:style-name="Text_20_body">…sin depender de nadie más, está demostrando un nivel de inteligencia que ninguna máquina diseñada por humanos ha alcanzado.</text:p>
      <text:p text:style-name="Text_20_body">La vida no solo resuelve problemas:<text:line-break/><text:span text:style-name="Strong_20_Emphasis">se resuelve a sí misma</text:span>.</text:p>
      <text:p text:style-name="Horizontal_20_Line"/>
      <text:h text:style-name="Heading_20_2" text:outline-level="2"><text:span text:style-name="Strong_20_Emphasis">7. Cierre narrativo</text:span></text:h>
      <text:p text:style-name="Text_20_body">Puedes cerrar con una imagen potente:</text:p>
      <text:p text:style-name="Quotations">“En el laberinto, la vida no solo encuentra la salida.<text:line-break/>Encuentra la forma de seguir existiendo mientras la busca.”</text:p>
      <text:p text:style-name="Text_20_body">Esto deja al lector con la sensación de que la autonomía no es un atributo técnico, sino una cualidad existencial.</text:p>
      <text:p text:style-name="Horizontal_20_Line"><text:soft-page-break/></text:p>
      <text:h text:style-name="Heading_20_2" text:outline-level="2"><text:span text:style-name="Strong_20_Emphasis">Siguiente paso sugerido</text:span></text:h>
      <text:p text:style-name="Text_20_body">Si quieres, puedo ayudarte a convertir esta estructura en:</text:p>
      <text:list xml:id="list762177271" text:style-name="L10">
        <text:list-item>
          <text:p text:style-name="P20">un capítulo completo, </text:p>
        </text:list-item>
        <text:list-item>
          <text:p text:style-name="P20">un guion narrativo, </text:p>
        </text:list-item>
        <text:list-item>
          <text:p text:style-name="P20">un esquema visual, </text:p>
        </text:list-item>
        <text:list-item>
          <text:p text:style-name="P19">o una versión más poética para cerrar el acto. </text:p>
        </text:list-item>
      </text:list>
      <text:p text:style-name="Text_20_body">¿Quieres que lo expandamos en forma de capítulo ya redactado o prefieres pulir primero la estructu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4T18:11:10.441000000</meta:creation-date>
    <dc:date>2026-04-24T18:14:10.696000000</dc:date>
    <meta:editing-duration>PT3M</meta:editing-duration>
    <meta:editing-cycles>1</meta:editing-cycles>
    <meta:document-statistic meta:table-count="0" meta:image-count="0" meta:object-count="0" meta:page-count="4" meta:paragraph-count="77" meta:word-count="771" meta:character-count="4671" meta:non-whitespace-character-count="3976"/>
    <meta:generator>LibreOffice/7.3.5.2$Windows_X86_64 LibreOffice_project/184fe81b8c8c30d8b5082578aee2fed2ea847c01</meta:generator>
  </office:meta>
</office:document-meta>
</file>