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a entrar en <text:span text:style-name="Strong_20_Emphasis">potencia</text:span>, que es el capítulo más ambicioso de todo el Acto IV.<text:line-break/>Aquí ya no hablamos de <text:span text:style-name="Emphasis">cómo</text:span> resuelve, ni de <text:span text:style-name="Emphasis">cuánto cuesta</text:span> resolver, sino de <text:span text:style-name="Strong_20_Emphasis">qué clase de problemas puede abordar un sistema construido con el modelo lógico de la vida</text:span>.</text:p>
      <text:p text:style-name="Text_20_body">Voy a darte una estructura clara, profunda y con resonancia conceptual, para que puedas convertirla directamente en un capítulo sólido.</text:p>
      <text:p text:style-name="Horizontal_20_Line"/>
      <text:h text:style-name="Heading_20_2" text:outline-level="2">🧩 <text:span text:style-name="Strong_20_Emphasis">Idea central: la potencia del sistema de vida es ilimitada en el sentido computacional, pero acotada por las leyes físicas</text:span></text:h>
      <text:p text:style-name="Text_20_body"><text:span text:style-name="Strong_20_Emphasis">Takeaway inicial:</text:span> <text:line-break/>La vida, como sistema lógico, tiene <text:span text:style-name="Strong_20_Emphasis">potencia universal</text:span>: puede aproximarse a cualquier solución computable, puede explorar espacios de búsqueda arbitrariamente grandes, y puede hacerlo de forma distribuida, paralela y autoexpansiva.<text:line-break/>Pero su potencia está limitada únicamente por <text:span text:style-name="Strong_20_Emphasis">las leyes físicas que rigen la materia, la energía y el tiempo</text:span>.</text:p>
      <text:p text:style-name="Text_20_body">Esto la coloca en la cúspide de los sistemas inteligentes posibles dentro del universo físico.</text:p>
      <text:p text:style-name="Horizontal_20_Line"/>
      <text:h text:style-name="Heading_20_2" text:outline-level="2">🔍 <text:span text:style-name="Strong_20_Emphasis">1. Qué significa “potencia” en este contexto</text:span></text:h>
      <text:p text:style-name="Text_20_body">Aquí conviene distinguir tres niveles:</text:p>
      <text:list xml:id="list2851302591" text:style-name="L1">
        <text:list-item>
          <text:p text:style-name="P1"><text:span text:style-name="Strong_20_Emphasis">Potencia computacional formal</text:span> <text:line-break/>Qué clase de funciones puede computar el sistema en principio.</text:p>
        </text:list-item>
        <text:list-item>
          <text:p text:style-name="P1"><text:span text:style-name="Strong_20_Emphasis">Potencia exploratoria</text:span> <text:line-break/>Qué tan grande puede ser el espacio de soluciones que puede recorrer.</text:p>
        </text:list-item>
        <text:list-item>
          <text:p text:style-name="P1"><text:span text:style-name="Strong_20_Emphasis">Potencia adaptativa</text:span> <text:line-break/>Qué tan bien puede ajustar su comportamiento para seguir resolviendo problemas incluso cuando el entorno cambia.</text:p>
        </text:list-item>
      </text:list>
      <text:p text:style-name="Text_20_body">Tu sistema de vida es potente en los tres niveles.</text:p>
      <text:p text:style-name="Horizontal_20_Line"/>
      <text:h text:style-name="Heading_20_2" text:outline-level="2">🧠 <text:span text:style-name="Strong_20_Emphasis">2. Potencia computacional: un sistema evolutivo es Turing-completo</text:span></text:h>
      <text:p text:style-name="Text_20_body">Este es el primer pilar fuerte.</text:p>
      <text:p text:style-name="Text_20_body">Un sistema basado en:</text:p>
      <text:list xml:id="list1686840079" text:style-name="L2">
        <text:list-item>
          <text:p text:style-name="P3">individuos, </text:p>
        </text:list-item>
        <text:list-item>
          <text:p text:style-name="P3"><text:soft-page-break/>reproducción, </text:p>
        </text:list-item>
        <text:list-item>
          <text:p text:style-name="P3">variación, </text:p>
        </text:list-item>
        <text:list-item>
          <text:p text:style-name="P3">selección, </text:p>
        </text:list-item>
        <text:list-item>
          <text:p text:style-name="P2">memoria heredada, </text:p>
        </text:list-item>
      </text:list>
      <text:p text:style-name="Text_20_body">es <text:span text:style-name="Strong_20_Emphasis">Turing-completo</text:span>.<text:line-break/>Puede implementar cualquier algoritmo computable, dado suficiente tiempo y recursos.</text:p>
      <text:p text:style-name="Text_20_body">Esto no es una metáfora:<text:line-break/>la evolución puede simular una máquina de Turing, y una máquina de Turing puede simular un proceso evolutivo.</text:p>
      <text:p text:style-name="Text_20_body"><text:span text:style-name="Strong_20_Emphasis">Conclusión:</text:span> <text:line-break/>En términos de potencia computacional formal, la vida ya está en el máximo nivel posible:<text:line-break/><text:span text:style-name="Strong_20_Emphasis">no existe un sistema más potente que “Turing-completo”</text:span>.</text:p>
      <text:p text:style-name="Horizontal_20_Line"/>
      <text:h text:style-name="Heading_20_2" text:outline-level="2">🌌 <text:span text:style-name="Strong_20_Emphasis">3. Potencia exploratoria: la vida escala con el universo</text:span></text:h>
      <text:p text:style-name="Text_20_body">Aquí es donde tu modelo brilla más que cualquier computadora convencional.</text:p>
      <text:p text:style-name="Text_20_body">Un computador clásico:</text:p>
      <text:list xml:id="list45927747" text:style-name="L3">
        <text:list-item>
          <text:p text:style-name="P5">tiene un número fijo de procesadores, </text:p>
        </text:list-item>
        <text:list-item>
          <text:p text:style-name="P5">una memoria fija, </text:p>
        </text:list-item>
        <text:list-item>
          <text:p text:style-name="P4">y un límite físico de expansión. </text:p>
        </text:list-item>
      </text:list>
      <text:p text:style-name="Text_20_body">La vida:</text:p>
      <text:list xml:id="list264525988" text:style-name="L4">
        <text:list-item>
          <text:p text:style-name="P7"><text:span text:style-name="Strong_20_Emphasis">crece</text:span>, </text:p>
        </text:list-item>
        <text:list-item>
          <text:p text:style-name="P7"><text:span text:style-name="Strong_20_Emphasis">se multiplica</text:span>, </text:p>
        </text:list-item>
        <text:list-item>
          <text:p text:style-name="P7"><text:span text:style-name="Strong_20_Emphasis">se distribuye</text:span>, </text:p>
        </text:list-item>
        <text:list-item>
          <text:p text:style-name="P7"><text:span text:style-name="Strong_20_Emphasis">se paraleliza</text:span>, </text:p>
        </text:list-item>
        <text:list-item>
          <text:p text:style-name="P6"><text:span text:style-name="Strong_20_Emphasis">se expande mientras computa</text:span>. </text:p>
        </text:list-item>
      </text:list>
      <text:p text:style-name="Text_20_body">Esto significa que su potencia exploratoria no está fijada por diseño, sino por <text:span text:style-name="Strong_20_Emphasis">la disponibilidad de materia y energía en el universo</text:span>.</text:p>
      <text:p text:style-name="Text_20_body">En otras palabras:</text:p>
      <text:p text:style-name="Quotations">La vida no tiene un límite interno de potencia.<text:line-break/>Su límite es el cosmos.</text:p>
      <text:p text:style-name="Text_20_body">Esto es radicalmente distinto a cualquier arquitectura artificial.</text:p>
      <text:p text:style-name="Horizontal_20_Line"/>
      <text:h text:style-name="Heading_20_2" text:outline-level="2"><text:soft-page-break/>🔁 <text:span text:style-name="Strong_20_Emphasis">4. Potencia adaptativa: computación que se reescribe a sí misma</text:span></text:h>
      <text:p text:style-name="Text_20_body">La vida no solo computa:<text:line-break/><text:span text:style-name="Strong_20_Emphasis">reescribe el algoritmo mientras lo ejecuta</text:span>.</text:p>
      <text:p text:style-name="Text_20_body">Esto le da una ventaja que ningún sistema estático puede igualar:</text:p>
      <text:list xml:id="list2006810197" text:style-name="L5">
        <text:list-item>
          <text:p text:style-name="P9">cambia su estructura, </text:p>
        </text:list-item>
        <text:list-item>
          <text:p text:style-name="P9">cambia sus reglas, </text:p>
        </text:list-item>
        <text:list-item>
          <text:p text:style-name="P9">cambia sus estrategias, </text:p>
        </text:list-item>
        <text:list-item>
          <text:p text:style-name="P9">cambia sus objetivos, </text:p>
        </text:list-item>
        <text:list-item>
          <text:p text:style-name="P8">cambia su forma de representar el problema. </text:p>
        </text:list-item>
      </text:list>
      <text:p text:style-name="Text_20_body">Es computación evolutiva de segundo orden.</text:p>
      <text:p text:style-name="Text_20_body">Esto la convierte en un sistema capaz de:</text:p>
      <text:list xml:id="list1136211222" text:style-name="L6">
        <text:list-item>
          <text:p text:style-name="P11">escapar de óptimos locales, </text:p>
        </text:list-item>
        <text:list-item>
          <text:p text:style-name="P11">rediseñar su propia arquitectura, </text:p>
        </text:list-item>
        <text:list-item>
          <text:p text:style-name="P10">inventar nuevas formas de resolver problemas. </text:p>
        </text:list-item>
      </text:list>
      <text:p text:style-name="Text_20_body">Ningún computador clásico puede hacer esto sin intervención externa.</text:p>
      <text:p text:style-name="Horizontal_20_Line"/>
      <text:h text:style-name="Heading_20_2" text:outline-level="2">🧮 <text:span text:style-name="Strong_20_Emphasis">5. Potencia en términos de complejidad de problemas</text:span></text:h>
      <text:p text:style-name="Text_20_body">Aquí es donde conectamos con la teoría de complejidad.</text:p>
      <text:p text:style-name="Text_20_body">Tu sistema puede abordar:</text:p>
      <text:list xml:id="list824039025" text:style-name="L7">
        <text:list-item>
          <text:p text:style-name="P13"><text:span text:style-name="Strong_20_Emphasis">Problemas P</text:span>: triviales para cualquier máquina. </text:p>
        </text:list-item>
        <text:list-item>
          <text:p text:style-name="P13"><text:span text:style-name="Strong_20_Emphasis">Problemas NP</text:span>: exploración masiva de soluciones en paralelo. </text:p>
        </text:list-item>
        <text:list-item>
          <text:p text:style-name="P13"><text:span text:style-name="Strong_20_Emphasis">Problemas EXPTIME</text:span>: crecimiento exponencial de recursos mediante reproducción. </text:p>
        </text:list-item>
        <text:list-item>
          <text:p text:style-name="P12"><text:span text:style-name="Strong_20_Emphasis">Problemas no acotados</text:span>: mientras haya materia y energía, puede seguir expandiendo la búsqueda. </text:p>
        </text:list-item>
      </text:list>
      <text:p text:style-name="Text_20_body">La clave es esta:</text:p>
      <text:p text:style-name="Quotations">La vida convierte problemas intratables en problemas tratables mediante <text:span text:style-name="Strong_20_Emphasis">expansión física del sistema</text:span>.</text:p>
      <text:p text:style-name="Text_20_body">Esto es exactamente lo que hace en el laberinto:<text:line-break/>no reduce la complejidad del problema, sino que <text:span text:style-name="Strong_20_Emphasis">la disuelve en un ejército de exploradores</text:span>.</text:p>
      <text:p text:style-name="Horizontal_20_Line"/>
      <text:h text:style-name="Heading_20_2" text:outline-level="2"><text:soft-page-break/>🧱 <text:span text:style-name="Strong_20_Emphasis">6. ¿Puede existir un sistema más potente que la vida?</text:span></text:h>
      <text:p text:style-name="Text_20_body">Aquí está la pregunta filosófica y técnica que quieres responder.</text:p>
      <text:p text:style-name="Text_20_body">La respuesta, bien argumentada, es:</text:p>
      <text:h text:style-name="Heading_20_3" text:outline-level="3"><text:span text:style-name="Strong_20_Emphasis">No, no dentro de las leyes físicas conocidas.</text:span></text:h>
      <text:p text:style-name="Text_20_body">Razones:</text:p>
      <text:list xml:id="list937837133" text:style-name="L8">
        <text:list-item>
          <text:p text:style-name="P14"><text:span text:style-name="Strong_20_Emphasis">No existe un modelo de computación más potente que Turing.</text:span> <text:line-break/>La vida ya alcanza ese límite.</text:p>
        </text:list-item>
        <text:list-item>
          <text:p text:style-name="P14"><text:span text:style-name="Strong_20_Emphasis">No existe un sistema que pueda expandirse más rápido que uno basado en reproducción exponencial.</text:span> <text:line-break/>La vida ya lo hace.</text:p>
        </text:list-item>
        <text:list-item>
          <text:p text:style-name="P14"><text:span text:style-name="Strong_20_Emphasis">No existe un sistema que pueda adaptarse más profundamente que uno que reescribe su propio código genético.</text:span> <text:line-break/>La vida ya lo hace.</text:p>
        </text:list-item>
        <text:list-item>
          <text:p text:style-name="P14"><text:span text:style-name="Strong_20_Emphasis">No existe un sistema que pueda paralelizarse más que uno distribuido en individuos autónomos.</text:span> <text:line-break/>La vida ya lo hace.</text:p>
        </text:list-item>
        <text:list-item>
          <text:p text:style-name="P14"><text:span text:style-name="Strong_20_Emphasis">No existe un sistema que pueda aprovechar mejor la energía disponible que uno sometido a selección natural.</text:span> <text:line-break/>La vida ya lo hace.</text:p>
        </text:list-item>
        <text:list-item>
          <text:p text:style-name="P14"><text:span text:style-name="Strong_20_Emphasis">No existe un sistema que pueda sobrevivir a más entornos que uno que evoluciona.</text:span> <text:line-break/>La vida ya lo hace.</text:p>
        </text:list-item>
      </text:list>
      <text:p text:style-name="Text_20_body">En resumen:</text:p>
      <text:p text:style-name="Quotations">La vida no es solo un sistema inteligente.<text:line-break/>Es el <text:span text:style-name="Strong_20_Emphasis">límite físico de la inteligencia posible</text:span> en un universo regido por leyes locales, energía finita y causalidad.</text:p>
      <text:p text:style-name="Horizontal_20_Line"/>
      <text:h text:style-name="Heading_20_2" text:outline-level="2">🌱 <text:span text:style-name="Strong_20_Emphasis">7. Cómo cerrar el capítulo con resonancia</text:span></text:h>
      <text:p text:style-name="Text_20_body">Puedes terminar con una frase que conecte con tu tono poético-místico:</text:p>
      <text:p text:style-name="Quotations">La vida es la inteligencia que el universo puede sostener.<text:line-break/>No porque sea perfecta, sino porque es la única capaz de crecer con él.</text:p>
      <text:p text:style-name="Horizontal_20_Line"/>
      <text:h text:style-name="Heading_20_2" text:outline-level="2"><text:soft-page-break/>Pregunta para avanzar el siguiente paso</text:h>
      <text:p text:style-name="Text_20_body">¿Quieres que desarrollemos este capítulo como un texto narrativo completo, o prefieres que lo estructuremos primero como un esquema formal con subsecciones y argumento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1T18:45:16.162000000</meta:creation-date>
    <dc:date>2026-04-21T18:54:23.189000000</dc:date>
    <meta:editing-duration>PT9M7S</meta:editing-duration>
    <meta:editing-cycles>1</meta:editing-cycles>
    <meta:document-statistic meta:table-count="0" meta:image-count="0" meta:object-count="0" meta:page-count="5" meta:paragraph-count="80" meta:word-count="882" meta:character-count="5435" meta:non-whitespace-character-count="4631"/>
    <meta:generator>LibreOffice/7.3.5.2$Windows_X86_64 LibreOffice_project/184fe81b8c8c30d8b5082578aee2fed2ea847c01</meta:generator>
  </office:meta>
</office:document-meta>
</file>