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diseñar un capítulo de <text:span text:style-name="Strong_20_Emphasis">Escalabilidad</text:span> que sea claro para el público general, fiel al modelo lógico de la vida y profundamente conectado con el ejemplo del laberinto. Te propongo una estructura que mantiene tu tono: riguroso, accesible, filosófico, y siempre anclado en mecanismos reales.</text:p>
      <text:p text:style-name="Horizontal_20_Line"/>
      <text:h text:style-name="Heading_20_2" text:outline-level="2">🧩 Capítulo: <text:span text:style-name="Emphasis">Escalabilidad — Cuando crecer no rompe el sistema</text:span></text:h>
      <text:h text:style-name="Heading_20_3" text:outline-level="3"><text:span text:style-name="Strong_20_Emphasis">Idea central (una frase)</text:span></text:h>
      <text:p text:style-name="Text_20_body">La escalabilidad es la capacidad de una inteligencia para crecer —en tamaño, complejidad o número de unidades— sin colapsar, sin volverse más lenta, y sin perder su capacidad de resolver problemas.</text:p>
      <text:p text:style-name="Horizontal_20_Line"/>
      <text:h text:style-name="Heading_20_2" text:outline-level="2">1. <text:span text:style-name="Strong_20_Emphasis">Por qué la escalabilidad importa</text:span></text:h>
      <text:p text:style-name="Text_20_body">Aquí explicamos al lector que muchas inteligencias funcionan bien mientras son pequeñas, pero se vuelven ineficientes o inestables cuando crecen.<text:line-break/>Ejemplos cotidianos que cualquiera entiende:</text:p>
      <text:list xml:id="list988088406" text:style-name="L1">
        <text:list-item>
          <text:p text:style-name="P2">Un grupo de 5 personas puede coordinarse fácilmente; un grupo de 5.000 no. </text:p>
        </text:list-item>
        <text:list-item>
          <text:p text:style-name="P2">Un ordenador puede resolver un problema pequeño; si el problema crece 1.000 veces, puede quedarse sin memoria o tardar años. </text:p>
        </text:list-item>
        <text:list-item>
          <text:p text:style-name="P1">Un hormiguero pequeño funciona; uno gigantesco necesita nuevas reglas para no colapsar. </text:p>
        </text:list-item>
      </text:list>
      <text:p text:style-name="Text_20_body"><text:span text:style-name="Strong_20_Emphasis">La vida, sin embargo, escala.</text:span> <text:line-break/>Desde una bacteria hasta un bosque, desde una célula hasta un cerebro, desde un organismo hasta un ecosistema.</text:p>
      <text:p text:style-name="Horizontal_20_Line"/>
      <text:h text:style-name="Heading_20_2" text:outline-level="2">2. <text:span text:style-name="Strong_20_Emphasis">Cómo se ve la escalabilidad en el laberinto</text:span></text:h>
      <text:p text:style-name="Text_20_body">Aquí conectamos con el modelo lógico.</text:p>
      <text:p text:style-name="Text_20_body">La máquina que construimos para resolver el laberinto tiene una propiedad clave:<text:line-break/><text:span text:style-name="Strong_20_Emphasis">puede aumentar el número de unidades que exploran sin necesidad de cambiar sus reglas internas.</text:span></text:p>
      <text:list xml:id="list270281831" text:style-name="L2">
        <text:list-item>
          <text:p text:style-name="P4">Si el laberinto es pequeño, basta con pocas unidades. </text:p>
        </text:list-item>
        <text:list-item>
          <text:p text:style-name="P4">Si el laberinto crece, podemos añadir más unidades sin reescribir el sistema. </text:p>
        </text:list-item>
        <text:list-item>
          <text:p text:style-name="P3">Si el laberinto es gigantesco, podemos distribuir la exploración entre miles de unidades. </text:p>
        </text:list-item>
      </text:list>
      <text:p text:style-name="Text_20_body">El lector debe sentir que la escalabilidad no es magia: es una consecuencia natural de la arquitectura.</text:p>
      <text:p text:style-name="Horizontal_20_Line"/>
      <text:h text:style-name="Heading_20_2" text:outline-level="2"><text:soft-page-break/>3. <text:span text:style-name="Strong_20_Emphasis">El mecanismo lógico que permite escalar</text:span></text:h>
      <text:p text:style-name="Text_20_body">Aquí explicamos el <text:span text:style-name="Emphasis">por qué</text:span> sin tecnicismos:</text:p>
      <text:list xml:id="list1578123826" text:style-name="L3">
        <text:list-item>
          <text:p text:style-name="P6"><text:span text:style-name="Strong_20_Emphasis">Reglas simples</text:span> → fáciles de replicar. </text:p>
        </text:list-item>
        <text:list-item>
          <text:p text:style-name="P6"><text:span text:style-name="Strong_20_Emphasis">Unidades autónomas</text:span> → no necesitan un “jefe” central. </text:p>
        </text:list-item>
        <text:list-item>
          <text:p text:style-name="P6"><text:span text:style-name="Strong_20_Emphasis">Comunicación mínima</text:span> → no saturan el sistema. </text:p>
        </text:list-item>
        <text:list-item>
          <text:p text:style-name="P6"><text:span text:style-name="Strong_20_Emphasis">Memoria distribuida</text:span> → no hay un único punto de fallo. </text:p>
        </text:list-item>
        <text:list-item>
          <text:p text:style-name="P5"><text:span text:style-name="Strong_20_Emphasis">Redundancia natural</text:span> → si una unidad falla, otra toma su lugar. </text:p>
        </text:list-item>
      </text:list>
      <text:p text:style-name="Text_20_body">La idea clave:<text:line-break/><text:span text:style-name="Strong_20_Emphasis">Un sistema escala cuando cada nueva unidad no añade complejidad, sino capacidad.</text:span></text:p>
      <text:p text:style-name="Text_20_body">Esto es exactamente lo que hace la vida: cada célula nueva no complica el organismo; lo fortalece.</text:p>
      <text:p text:style-name="Horizontal_20_Line"/>
      <text:h text:style-name="Heading_20_2" text:outline-level="2">4. <text:span text:style-name="Strong_20_Emphasis">Qué ocurre cuando un sistema NO escala</text:span></text:h>
      <text:p text:style-name="Text_20_body">Para que el lector entienda el contraste:</text:p>
      <text:list xml:id="list1260023307" text:style-name="L4">
        <text:list-item>
          <text:p text:style-name="P8">Sistemas centralizados → se saturan. </text:p>
        </text:list-item>
        <text:list-item>
          <text:p text:style-name="P8">Sistemas con reglas complejas → difíciles de replicar. </text:p>
        </text:list-item>
        <text:list-item>
          <text:p text:style-name="P8">Sistemas que dependen de un único punto de control → frágiles. </text:p>
        </text:list-item>
        <text:list-item>
          <text:p text:style-name="P7">Sistemas que requieren coordinación constante → lentos. </text:p>
        </text:list-item>
      </text:list>
      <text:p text:style-name="Text_20_body">Aquí puedes usar una metáfora suave:<text:line-break/>“Un cerebro con una sola neurona que lo controla todo sería imposible; la vida eligió otra vía.”</text:p>
      <text:p text:style-name="Horizontal_20_Line"/>
      <text:h text:style-name="Heading_20_2" text:outline-level="2">5. <text:span text:style-name="Strong_20_Emphasis">Escalabilidad en la vida real</text:span></text:h>
      <text:p text:style-name="Text_20_body">Conectar con biología sin tecnicismos:</text:p>
      <text:list xml:id="list1070285238" text:style-name="L5">
        <text:list-item>
          <text:p text:style-name="P10">Un organismo multicelular es una versión escalada de una célula. </text:p>
        </text:list-item>
        <text:list-item>
          <text:p text:style-name="P10">Un bosque es una versión escalada de un árbol. </text:p>
        </text:list-item>
        <text:list-item>
          <text:p text:style-name="P10">Una colonia de hormigas es una inteligencia escalada. </text:p>
        </text:list-item>
        <text:list-item>
          <text:p text:style-name="P9">El sistema inmunitario escala automáticamente cuando hay más invasores. </text:p>
        </text:list-item>
      </text:list>
      <text:p text:style-name="Text_20_body">La vida no solo escala: <text:span text:style-name="Strong_20_Emphasis">escala sin perder eficiencia, potencia, robustez ni autonomía</text:span>.<text:line-break/>Esto prepara el terreno para el capítulo final del Acto 4.</text:p>
      <text:p text:style-name="Horizontal_20_Line"/>
      <text:h text:style-name="Heading_20_2" text:outline-level="2">6. <text:span text:style-name="Strong_20_Emphasis">Escalabilidad como límite físico</text:span></text:h>
      <text:p text:style-name="Text_20_body">Aquí introduces la idea filosófica:</text:p>
      <text:list xml:id="list8191368" text:style-name="L6">
        <text:list-item>
          <text:p text:style-name="P12">Toda inteligencia tiene un límite de escalabilidad. </text:p>
        </text:list-item>
        <text:list-item>
          <text:p text:style-name="P12"><text:soft-page-break/>La vida, gracias a su arquitectura lógica, empuja ese límite más lejos que cualquier diseño artificial conocido. </text:p>
        </text:list-item>
        <text:list-item>
          <text:p text:style-name="P11">La escalabilidad no es un lujo: es una condición para sobrevivir en un universo cambiante. </text:p>
        </text:list-item>
      </text:list>
      <text:p text:style-name="Horizontal_20_Line"/>
      <text:h text:style-name="Heading_20_2" text:outline-level="2">7. <text:span text:style-name="Strong_20_Emphasis">Cierre poético-filosófico</text:span></text:h>
      <text:p text:style-name="Text_20_body">Algo en esta línea:</text:p>
      <text:p text:style-name="Quotations">“Un sistema que no puede crecer está condenado a desaparecer.<text:line-break/>La vida eligió un diseño que no solo resuelve problemas, sino que se multiplica para enfrentarlos.<text:line-break/>Escalar no es una opción: es la forma en que la vida se vuelve infinita.”</text:p>
      <text:p text:style-name="Horizontal_20_Line"/>
      <text:h text:style-name="Heading_20_2" text:outline-level="2">Pregunta para avanzar</text:h>
      <text:p text:style-name="Text_20_body">¿Quieres que desarrollemos este capítulo en <text:span text:style-name="Strong_20_Emphasis">prosa completa</text:span>, como los anteriores, o prefieres que primero lo transformemos en un <text:span text:style-name="Strong_20_Emphasis">esquema más detallado</text:span> con subsecciones, ejemplos y metáforas específica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3T18:39:23.637000000</meta:creation-date>
    <dc:date>2026-04-23T18:44:52.069000000</dc:date>
    <meta:editing-duration>PT5M28S</meta:editing-duration>
    <meta:editing-cycles>1</meta:editing-cycles>
    <meta:document-statistic meta:table-count="0" meta:image-count="0" meta:object-count="0" meta:page-count="3" meta:paragraph-count="50" meta:word-count="662" meta:character-count="4090" meta:non-whitespace-character-count="3476"/>
    <meta:generator>LibreOffice/7.3.5.2$Windows_X86_64 LibreOffice_project/184fe81b8c8c30d8b5082578aee2fed2ea847c01</meta:generator>
  </office:meta>
</office:document-meta>
</file>