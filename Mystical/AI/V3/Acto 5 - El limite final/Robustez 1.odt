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1">
      <style:paragraph-properties fo:margin-top="0in" fo:margin-bottom="0in" style:contextual-spacing="false"/>
    </style:style>
    <style:style style:name="P3" style:family="paragraph" style:parent-style-name="Text_20_body" style:list-style-name="L2"/>
    <style:style style:name="P4" style:family="paragraph" style:parent-style-name="Text_20_body" style:list-style-name="L2">
      <style:paragraph-properties fo:margin-top="0in" fo:margin-bottom="0in" style:contextual-spacing="false"/>
    </style:style>
    <style:style style:name="P5" style:family="paragraph" style:parent-style-name="Text_20_body" style:list-style-name="L3"/>
    <style:style style:name="P6" style:family="paragraph" style:parent-style-name="Text_20_body" style:list-style-name="L3">
      <style:paragraph-properties fo:margin-top="0in" fo:margin-bottom="0in" style:contextual-spacing="false"/>
    </style:style>
    <style:style style:name="P7" style:family="paragraph" style:parent-style-name="Text_20_body" style:list-style-name="L4"/>
    <style:style style:name="P8" style:family="paragraph" style:parent-style-name="Text_20_body" style:list-style-name="L4">
      <style:paragraph-properties fo:margin-top="0in" fo:margin-bottom="0in" style:contextual-spacing="false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Perfecto, Fab. Vamos a diseñar <text:span text:style-name="Strong_20_Emphasis">el capítulo de Robustez</text:span> de forma que sea claro, intuitivo, narrativo y, al mismo tiempo, rigurosamente anclado en el modelo lógico y en el experimento del laberinto.<text:line-break/>Este capítulo tiene un enorme potencial dramático: es donde el lector descubre que la vida no solo es eficiente y potente, sino <text:span text:style-name="Strong_20_Emphasis">prácticamente indestructible</text:span> en su capacidad de seguir resolviendo problemas.</text:p>
      <text:p text:style-name="Text_20_body">A continuación te propongo <text:span text:style-name="Strong_20_Emphasis">la estructura, el enfoque narrativo y el desarrollo conceptual</text:span> del capítulo, listo para integrarse en el Acto 4.</text:p>
      <text:p text:style-name="Horizontal_20_Line"/>
      <text:h text:style-name="Heading_20_2" text:outline-level="2">🌑 Capítulo: Robustez — La inteligencia que no se rompe</text:h>
      <text:h text:style-name="Heading_20_3" text:outline-level="3"><text:span text:style-name="Strong_20_Emphasis">1. La idea central (apertura narrativa)</text:span></text:h>
      <text:p text:style-name="Text_20_body">Empiezas con una afirmación sencilla y poderosa:</text:p>
      <text:p text:style-name="Quotations">“Una inteligencia no es solo lo que puede hacer cuando todo va bien, sino lo que sigue pudiendo hacer cuando todo va mal.”</text:p>
      <text:p text:style-name="Text_20_body">El lector entiende inmediatamente que “robustez” no es un tecnicismo, sino una cualidad vital:<text:line-break/><text:span text:style-name="Strong_20_Emphasis">la capacidad de seguir funcionando bajo daño, ruido, fallos, incertidumbre o pérdida de información.</text:span></text:p>
      <text:p text:style-name="Text_20_body">Aquí puedes conectar con la experiencia humana:<text:line-break/>– cuando enfermamos,<text:line-break/>– cuando perdemos recursos,<text:line-break/>– cuando el entorno cambia,<text:line-break/>– cuando cometemos errores.</text:p>
      <text:p text:style-name="Text_20_body">La vida sigue.<text:line-break/>Y no solo sigue: <text:span text:style-name="Strong_20_Emphasis">se adapta, reconfigura, improvisa, persiste</text:span>.</text:p>
      <text:p text:style-name="Horizontal_20_Line"/>
      <text:h text:style-name="Heading_20_2" text:outline-level="2"><text:span text:style-name="Strong_20_Emphasis">2. Qué significa robustez en el modelo lógico</text:span></text:h>
      <text:p text:style-name="Text_20_body">Ahora llevamos esa intuición al terreno del modelo.</text:p>
      <text:p text:style-name="Text_20_body">En el modelo lógico que venimos desarrollando, la robustez se puede entender como:</text:p>
      <text:list xml:id="list3965043125" text:style-name="L1">
        <text:list-item>
          <text:p text:style-name="P2"><text:span text:style-name="Strong_20_Emphasis">Capacidad de mantener la función</text:span> aunque partes del sistema fallen. </text:p>
        </text:list-item>
        <text:list-item>
          <text:p text:style-name="P2"><text:span text:style-name="Strong_20_Emphasis">Capacidad de encontrar soluciones alternativas</text:span> cuando la ruta óptima se bloquea. </text:p>
        </text:list-item>
        <text:list-item>
          <text:p text:style-name="P2"><text:span text:style-name="Strong_20_Emphasis">Capacidad de recuperarse</text:span> tras errores o perturbaciones. </text:p>
        </text:list-item>
        <text:list-item>
          <text:p text:style-name="P1"><text:span text:style-name="Strong_20_Emphasis">Capacidad de seguir avanzando</text:span> incluso con información incompleta o degradada. </text:p>
        </text:list-item>
      </text:list>
      <text:p text:style-name="Text_20_body">La clave es que <text:span text:style-name="Strong_20_Emphasis">la robustez no es un añadido</text:span>, sino una consecuencia natural de la arquitectura lógica de la vida:<text:line-break/>un sistema distribuido, redundante, descentralizado, auto-reparador y auto-correctivo.</text:p>
      <text:p text:style-name="Horizontal_20_Line"><text:soft-page-break/></text:p>
      <text:h text:style-name="Heading_20_2" text:outline-level="2"><text:span text:style-name="Strong_20_Emphasis">3. El laberinto como escenario de estrés</text:span></text:h>
      <text:p text:style-name="Text_20_body">Aquí introduces el experimento del laberinto como un “campo de pruebas”.</text:p>
      <text:p text:style-name="Text_20_body">Ya no lo usamos para ver si la máquina encuentra la salida.<text:line-break/>Eso ya lo hizo.<text:line-break/>Ahora lo usamos para ver <text:span text:style-name="Strong_20_Emphasis">qué pasa cuando la golpeamos</text:span>.</text:p>
      <text:p text:style-name="Text_20_body">Puedes plantearlo casi como un pequeño relato:</text:p>
      <text:list xml:id="list1678396962" text:style-name="L2">
        <text:list-item>
          <text:p text:style-name="P4">¿Qué ocurre si borramos parte del mapa interno? </text:p>
        </text:list-item>
        <text:list-item>
          <text:p text:style-name="P4">¿Qué ocurre si bloqueamos un pasillo a mitad del recorrido? </text:p>
        </text:list-item>
        <text:list-item>
          <text:p text:style-name="P4">¿Qué ocurre si introducimos ruido en las señales? </text:p>
        </text:list-item>
        <text:list-item>
          <text:p text:style-name="P4">¿Qué ocurre si la máquina pierde energía o recursos? </text:p>
        </text:list-item>
        <text:list-item>
          <text:p text:style-name="P3">¿Qué ocurre si la obligamos a retroceder? </text:p>
        </text:list-item>
      </text:list>
      <text:p text:style-name="Text_20_body">Cada una de estas perturbaciones permite mostrar un aspecto distinto de la robustez.</text:p>
      <text:p text:style-name="Horizontal_20_Line"/>
      <text:h text:style-name="Heading_20_2" text:outline-level="2"><text:span text:style-name="Strong_20_Emphasis">4. Ejemplos concretos dentro del modelo lógico</text:span></text:h>
      <text:h text:style-name="Heading_20_3" text:outline-level="3"><text:span text:style-name="Strong_20_Emphasis">a) Pérdida de información</text:span></text:h>
      <text:p text:style-name="Text_20_body">Si eliminamos parte de la memoria del sistema, no colapsa.<text:line-break/>¿Por qué?<text:line-break/>Porque su estrategia no depende de un único plan perfecto, sino de <text:span text:style-name="Strong_20_Emphasis">un ciclo continuo de prueba, corrección y avance</text:span>.</text:p>
      <text:p text:style-name="Text_20_body">El lector ve que la vida no necesita saberlo todo para seguir avanzando.</text:p>
      <text:h text:style-name="Heading_20_3" text:outline-level="3"><text:span text:style-name="Strong_20_Emphasis">b) Bloqueo del camino</text:span></text:h>
      <text:p text:style-name="Text_20_body">Si cerramos un pasillo del laberinto, la máquina no se queda paralizada.<text:line-break/>Explora, retrocede, reevalúa, busca rutas alternativas.<text:line-break/>Esto permite introducir la idea de <text:span text:style-name="Strong_20_Emphasis">plasticidad</text:span>.</text:p>
      <text:h text:style-name="Heading_20_3" text:outline-level="3"><text:span text:style-name="Strong_20_Emphasis">c) Ruido en las señales</text:span></text:h>
      <text:p text:style-name="Text_20_body">Si las señales son confusas, el sistema no se desorienta de forma fatal.<text:line-break/>Su comportamiento es estadístico, iterativo, acumulativo.<text:line-break/>No depende de una única lectura perfecta.</text:p>
      <text:h text:style-name="Heading_20_3" text:outline-level="3"><text:soft-page-break/><text:span text:style-name="Strong_20_Emphasis">d) Daño parcial del sistema</text:span></text:h>
      <text:p text:style-name="Text_20_body">Si “apagamos” módulos internos, el sistema sigue funcionando porque la arquitectura es <text:span text:style-name="Strong_20_Emphasis">distribuida y redundante</text:span>.<text:line-break/>No hay un “punto único de fallo”.</text:p>
      <text:p text:style-name="Text_20_body">Aquí puedes hacer un paralelismo con organismos reales:<text:line-break/>– una célula puede morir, pero el organismo sigue;<text:line-break/>– un órgano puede fallar parcialmente, pero el sistema se reorganiza;<text:line-break/>– una colonia de hormigas puede perder cientos de individuos y seguir funcionando.</text:p>
      <text:p text:style-name="Horizontal_20_Line"/>
      <text:h text:style-name="Heading_20_2" text:outline-level="2"><text:span text:style-name="Strong_20_Emphasis">5. La robustez como consecuencia de la arquitectura óptima</text:span></text:h>
      <text:p text:style-name="Text_20_body">Este es el momento de conectar con el capítulo anterior sobre arquitecturas.</text:p>
      <text:p text:style-name="Text_20_body">La robustez no es magia.<text:line-break/>Es el resultado de decisiones estructurales:</text:p>
      <text:list xml:id="list3650979316" text:style-name="L3">
        <text:list-item>
          <text:p text:style-name="P6"><text:span text:style-name="Strong_20_Emphasis">Distribución</text:span> en lugar de centralización. </text:p>
        </text:list-item>
        <text:list-item>
          <text:p text:style-name="P6"><text:span text:style-name="Strong_20_Emphasis">Redundancia funcional</text:span> en lugar de minimalismo extremo. </text:p>
        </text:list-item>
        <text:list-item>
          <text:p text:style-name="P6"><text:span text:style-name="Strong_20_Emphasis">Ciclos de retroalimentación</text:span> en lugar de rutas lineales. </text:p>
        </text:list-item>
        <text:list-item>
          <text:p text:style-name="P6"><text:span text:style-name="Strong_20_Emphasis">Exploración continua</text:span> en lugar de planificación rígida. </text:p>
        </text:list-item>
        <text:list-item>
          <text:p text:style-name="P5"><text:span text:style-name="Strong_20_Emphasis">Corrección iterativa</text:span> en lugar de predicción perfecta. </text:p>
        </text:list-item>
      </text:list>
      <text:p text:style-name="Text_20_body">Aquí puedes mostrar que la vida, como arquitectura, <text:span text:style-name="Strong_20_Emphasis">no apuesta por la perfección</text:span>, sino por la <text:span text:style-name="Strong_20_Emphasis">persistencia</text:span>.</text:p>
      <text:p text:style-name="Horizontal_20_Line"/>
      <text:h text:style-name="Heading_20_2" text:outline-level="2"><text:span text:style-name="Strong_20_Emphasis">6. Comparación con inteligencias no robustas</text:span></text:h>
      <text:p text:style-name="Text_20_body">Sin atacar a nadie, puedes mostrar contrastes intuitivos:</text:p>
      <text:list xml:id="list931664589" text:style-name="L4">
        <text:list-item>
          <text:p text:style-name="P8">Un sistema que depende de un único plan colapsa si ese plan falla. </text:p>
        </text:list-item>
        <text:list-item>
          <text:p text:style-name="P8">Un sistema que depende de un único módulo crítico muere si ese módulo se daña. </text:p>
        </text:list-item>
        <text:list-item>
          <text:p text:style-name="P8">Un sistema que necesita información perfecta se paraliza ante el ruido. </text:p>
        </text:list-item>
        <text:list-item>
          <text:p text:style-name="P7">Un sistema que no puede retroceder queda atrapado. </text:p>
        </text:list-item>
      </text:list>
      <text:p text:style-name="Text_20_body">El lector entiende que la robustez no es un lujo:<text:line-break/>es la diferencia entre <text:span text:style-name="Strong_20_Emphasis">seguir vivo</text:span> y <text:span text:style-name="Strong_20_Emphasis">desaparecer</text:span>.</text:p>
      <text:p text:style-name="Horizontal_20_Line"/>
      <text:h text:style-name="Heading_20_2" text:outline-level="2"><text:span text:style-name="Strong_20_Emphasis">7. Conclusión narrativa: la vida como inteligencia que resiste</text:span></text:h>
      <text:p text:style-name="Text_20_body">Cierra el capítulo con una idea potente:</text:p>
      <text:p text:style-name="Text_20_body"><text:soft-page-break/>La vida no es la inteligencia más robusta porque sea fuerte, sino porque es <text:span text:style-name="Strong_20_Emphasis">flexible</text:span>.<text:line-break/>No porque sea perfecta, sino porque es <text:span text:style-name="Strong_20_Emphasis">capaz de fallar sin romperse</text:span>.<text:line-break/>No porque lo sepa todo, sino porque <text:span text:style-name="Strong_20_Emphasis">puede aprenderlo todo de nuevo</text:span>.</text:p>
      <text:p text:style-name="Text_20_body">La robustez es la firma de la vida.<text:line-break/>Es lo que le permite persistir durante miles de millones de años, atravesar catástrofes, mutar, adaptarse, reinventarse.</text:p>
      <text:p text:style-name="Text_20_body">Y en el modelo lógico, esa robustez no es un misterio biológico:<text:line-break/>es una consecuencia inevitable de su estructura.</text:p>
      <text:p text:style-name="Horizontal_20_Line"/>
      <text:h text:style-name="Heading_20_2" text:outline-level="2"><text:span text:style-name="Strong_20_Emphasis">¿Quieres que ahora escriba el capítulo completo (800–1000 palabras) con tono narrativo y accesible, como hicimos con eficiencia y potencia?</text:span></text:h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6-04-22T18:40:03.893000000</meta:creation-date>
    <dc:date>2026-04-22T18:45:25.886000000</dc:date>
    <meta:editing-duration>PT5M22S</meta:editing-duration>
    <meta:editing-cycles>1</meta:editing-cycles>
    <meta:document-statistic meta:table-count="0" meta:image-count="0" meta:object-count="0" meta:page-count="4" meta:paragraph-count="60" meta:word-count="872" meta:character-count="5454" meta:non-whitespace-character-count="4635"/>
    <meta:generator>LibreOffice/7.3.5.2$Windows_X86_64 LibreOffice_project/184fe81b8c8c30d8b5082578aee2fed2ea847c01</meta:generator>
  </office:meta>
</office:document-meta>
</file>