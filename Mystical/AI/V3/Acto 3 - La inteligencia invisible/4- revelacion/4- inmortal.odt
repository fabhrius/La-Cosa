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<text:line-break/>Aquí tienes el <text:span text:style-name="Strong_20_Emphasis">apartado 4</text:span>, escrito con la misma disciplina conceptual que los anteriores: enfocado, sin solapamientos, sin mencionar inteligencia (ya lo hicimos), sin hablar de entidad (ya está establecido), y sin introducir ideas nuevas fuera del alcance.<text:line-break/>Este texto se centra exclusivamente en <text:span text:style-name="Strong_20_Emphasis">la inmortalidad del proceso</text:span>, en contraste con la mortalidad de los individuos.</text:p>
      <text:p text:style-name="Horizontal_20_Line"/>
      <text:h text:style-name="Heading_20_1" text:outline-level="1"><text:span text:style-name="Strong_20_Emphasis">4. La vida es un organismo inmortal</text:span></text:h>
      <text:p text:style-name="Text_20_body">En el experimento, cada individuo cumple un ciclo de vida breve y perfectamente definido: nace, se reproduce y muere. Su existencia es un instante dentro del proceso. Ninguno permanece. Ninguno acompaña al sistema más allá de su propio paso. La muerte no es un accidente ni una interrupción: es parte esencial del funcionamiento. El individuo desaparece para que el proceso pueda continuar.</text:p>
      <text:p text:style-name="Text_20_body">Y sin embargo, a pesar de la desaparición constante de individuos, el proceso no se detiene.<text:line-break/>Al contrario: <text:span text:style-name="Strong_20_Emphasis">avanza</text:span>.</text:p>
      <text:p text:style-name="Text_20_body">Cada muerte es seguida por nuevos nacimientos.<text:line-break/>Cada generación reemplaza a la anterior.<text:line-break/>Cada individuo entrega su fragmento del cálculo y deja paso al siguiente.<text:line-break/>El flujo continúa sin interrupción, como una corriente que nunca se detiene aunque cada gota sea distinta.</text:p>
      <text:p text:style-name="Text_20_body">Lo que observamos es que la mortalidad de los individuos no afecta la continuidad del sistema.<text:line-break/>El proceso sigue adelante, indiferente a la duración de cada vida particular.<text:line-break/>La desaparición de un individuo no detiene el cálculo, no lo ralentiza, no lo amenaza.<text:line-break/>El sistema no depende de la permanencia de ninguno de sus componentes.</text:p>
      <text:p text:style-name="Text_20_body">Esto revela una característica esencial de la vida:<text:line-break/><text:span text:style-name="Strong_20_Emphasis">la vida, como proceso, no muere.</text:span></text:p>
      <text:p text:style-name="Text_20_body">Los individuos son efímeros, pero la vida no lo es.<text:line-break/>Los individuos tienen un comienzo y un final, pero el proceso no tiene límite inherente.<text:line-break/>La vida fluye a través de cuerpos que aparecen y desaparecen, pero ella misma no aparece ni desaparece: continúa.</text:p>
      <text:p text:style-name="Text_20_body">En el experimento, esta continuidad es evidente.<text:line-break/>Desde el primer individuo hasta el último, el sistema mantiene su identidad funcional.<text:line-break/>No importa cuántos individuos hayan existido, ni cuántos hayan muerto.<text:line-break/>El proceso es uno y es continuo.<text:line-break/>No tiene interrupciones, no tiene pausas, no tiene un final programado.</text:p>
      <text:p text:style-name="Text_20_body">La vida real funciona de la misma manera.<text:line-break/>Cada organismo que ha existido ha vivido solo un instante dentro de un proceso que comenzó hace <text:soft-page-break/>miles de millones de años y que no se ha detenido desde entonces.<text:line-break/>La vida ha atravesado catástrofes, cambios climáticos, extinciones masivas, transformaciones profundas del planeta.<text:line-break/>Y sin embargo, continúa.<text:line-break/>No porque los individuos sobrevivan, sino porque el proceso no depende de ellos.</text:p>
      <text:p text:style-name="Text_20_body">La vida es un organismo inmortal no porque sus componentes duren para siempre, sino porque su continuidad no está ligada a la duración de ninguno de ellos.<text:line-break/>La vida no es un individuo gigantesco que nunca muere; es un proceso que nunca se interrumpe.<text:line-break/>Su inmortalidad no es biológica, sino estructural.<text:line-break/>No reside en la permanencia de sus partes, sino en la continuidad de su funcionamiento.</text:p>
      <text:p text:style-name="Text_20_body">El experimento nos muestra que la muerte de los individuos no es una amenaza para la vida, sino una condición de su existencia.<text:line-break/>Los individuos mueren para que el proceso pueda avanzar.<text:line-break/>La vida continúa porque no está hecha de individuos permanentes, sino de un flujo incesante de individuos temporales.</text:p>
      <text:p text:style-name="Text_20_body">Así, la vida aparece como un organismo inmortal que se expresa a través de seres mortales.<text:line-break/>Un proceso continuo que utiliza cuerpos efímeros para sostener su existencia.<text:line-break/>Una entidad cuya duración no está limitada por la duración de sus componentes.</text:p>
      <text:p text:style-name="Text_20_body">Con esto, las cuatro revelaciones quedan completas:<text:line-break/>la vida no es solo individuos; es una entidad; es una inteligencia; y es inmortal.</text:p>
      <text:p text:style-name="Horizontal_20_Line"/>
      <text:p text:style-name="Text_20_body">Si quieres, ahora puedo preparar una <text:span text:style-name="Strong_20_Emphasis">sección de cierre</text:span> que conecte las cuatro revelaciones en un párrafo final, o podemos avanzar al siguiente capítulo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4T17:28:10.305000000</meta:creation-date>
    <dc:date>2026-05-24T17:29:36.749000000</dc:date>
    <meta:editing-duration>PT1M26S</meta:editing-duration>
    <meta:editing-cycles>1</meta:editing-cycles>
    <meta:document-statistic meta:table-count="0" meta:image-count="0" meta:object-count="0" meta:page-count="2" meta:paragraph-count="15" meta:word-count="619" meta:character-count="3823" meta:non-whitespace-character-count="3219"/>
    <meta:generator>LibreOffice/7.3.5.2$Windows_X86_64 LibreOffice_project/184fe81b8c8c30d8b5082578aee2fed2ea847c01</meta:generator>
  </office:meta>
</office:document-meta>
</file>