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tienes un desarrollo de unas 600 palabras, centrado exclusivamente en el punto <text:span text:style-name="Strong_20_Emphasis">“La vida no es solo individuos: hay algo más”</text:span>, con tono reflexivo, claro y profundo, adecuado para tu capítulo <text:span text:style-name="Emphasis">Revelación</text:span>.<text:line-break/>No es un resumen: es un texto ya listo para integrarse en el libro.</text:p>
      <text:p text:style-name="Horizontal_20_Line"/>
      <text:h text:style-name="Heading_20_1" text:outline-level="1"><text:span text:style-name="Strong_20_Emphasis">La vida no es solo individuos: hay algo más</text:span></text:h>
      <text:p text:style-name="Text_20_body">Cuando observamos la vida desde nuestra escala cotidiana, lo que vemos son individuos. Animales, plantas, personas, organismos que nacen, actúan y mueren. Todo parece ocurrir dentro de los límites de cada cuerpo. La vida, tal como la percibimos, parece ser una propiedad de los individuos: algo que “ellos” tienen, algo que “ellos” son. Esta intuición es tan fuerte que rara vez la cuestionamos. Sin embargo, el experimento realizado con la máquina lógica revela algo completamente distinto. Muestra que esta visión es superficial, incompleta, y que detrás de la multiplicidad de individuos existe una entidad mayor, un sistema que los contiene a todos y que es, en realidad, el verdadero sujeto del proceso vital.</text:p>
      <text:p text:style-name="Text_20_body">En el experimento, cada individuo cumple un ciclo de vida extremadamente simple: nacer, reproducirse, morir. Ninguno de ellos conoce el problema que el sistema está resolviendo. Ninguno sabe que existe un objetivo, ni que forma parte de un cálculo. Ninguno tiene conciencia del proceso global. Desde su perspectiva, si la tuvieran, su existencia sería un instante aislado: un pequeño tramo de vida que se agota en sí mismo. Y sin embargo, cuando observamos el sistema desde fuera, vemos que todos esos individuos, actuando de manera local y limitada, están participando en un proceso mayor que los trasciende. El sistema, no los individuos, es quien resuelve el problema.</text:p>
      <text:p text:style-name="Text_20_body">Esto nos obliga a replantear la noción misma de “vida”. Porque si la inteligencia que encuentra la solución no pertenece a ningún individuo, si ningún individuo comprende el proceso, si ninguno puede modificarlo o dirigirlo, entonces la vida no puede ser entendida como la suma de individuos aislados. La vida es una entidad distinta, una estructura que utiliza a los individuos como componentes, del mismo modo que un organismo utiliza células. Los individuos son partes; la vida es el todo.</text:p>
      <text:p text:style-name="Text_20_body">Esta idea se vuelve aún más clara cuando observamos que, aunque nacen miles de individuos, el proceso que avanza es uno solo. La multiplicidad no implica fragmentación. Cada individuo es un paso, un instante, una expresión temporal del sistema. Pero el sistema es continuo, coherente, indivisible. Es él quien avanza, él quien explora, él quien encuentra la solución. Los individuos aparecen y desaparecen, pero el sistema permanece. Los individuos son mortales; el sistema no.</text:p>
      <text:p text:style-name="Text_20_body">La vida real funciona exactamente igual. Millones de especies, trillones de organismos, incontables generaciones… y sin embargo, un solo proceso evolutivo, una sola historia genética, una sola expansión de la vida sobre la Tierra. La vida no se interrumpe cuando muere un organismo, ni cuando desaparece una especie. La vida continúa, porque la vida no es el organismo: es el sistema que lo contiene.</text:p>
      <text:p text:style-name="Text_20_body"><text:soft-page-break/>El experimento también revela por qué esta entidad mayor es invisible desde dentro. Un individuo no puede percibir el proceso global porque su existencia es demasiado breve, demasiado local, demasiado limitada. Su perspectiva está confinada a su propio ciclo de vida. No puede ver más allá de sí mismo. Y sin embargo, su existencia tiene sentido solo dentro del sistema. Su función, su estructura, su comportamiento, todo está determinado por la lógica del proceso mayor. El individuo es una pieza que no conoce el mecanismo del que forma parte.</text:p>
      <text:p text:style-name="Text_20_body">Así, lo que llamamos “vida” no es una propiedad de los individuos, sino una propiedad del sistema que los genera. La vida es una entidad mayor, inteligente e inmortal, que utiliza individuos mortales para ejecutar su proceso. Los individuos son expresiones temporales de una inteligencia que no reside en ellos, sino en la estructura que los contiene.</text:p>
      <text:p text:style-name="Text_20_body">La vida no son los individuos.<text:line-break/>Los individuos son la forma en que la vida se despliega.</text:p>
      <text:p text:style-name="Horizontal_20_Line"/>
      <text:p text:style-name="Text_20_body">¿Quieres que pasemos al punto número d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7T10:29:30.766000000</meta:creation-date>
    <dc:date>2026-05-17T10:33:31.823000000</dc:date>
    <meta:editing-duration>PT4M1S</meta:editing-duration>
    <meta:editing-cycles>1</meta:editing-cycles>
    <meta:document-statistic meta:table-count="0" meta:image-count="0" meta:object-count="0" meta:page-count="2" meta:paragraph-count="11" meta:word-count="664" meta:character-count="4095" meta:non-whitespace-character-count="3442"/>
    <meta:generator>LibreOffice/7.3.5.2$Windows_X86_64 LibreOffice_project/184fe81b8c8c30d8b5082578aee2fed2ea847c01</meta:generator>
  </office:meta>
</office:document-meta>
</file>