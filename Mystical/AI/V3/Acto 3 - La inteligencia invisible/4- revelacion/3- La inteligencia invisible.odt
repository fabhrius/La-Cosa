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Este punto —<text:span text:style-name="Strong_20_Emphasis">la inteligencia invisible</text:span>— es el corazón conceptual del experimento. Es la revelación que transforma todo lo que creemos saber sobre la vida, el diseño, la intención y la inteligencia. Aquí tienes un desarrollo profundo, claro y narrativo de unas ~600 palabras, listo para integrarse en tu capítulo.</text:p>
      <text:p text:style-name="Horizontal_20_Line"/>
      <text:h text:style-name="Heading_20_1" text:outline-level="1"><text:span text:style-name="Strong_20_Emphasis">La inteligencia invisible</text:span></text:h>
      <text:p text:style-name="Text_20_body">Desde que existen seres humanos, existe la intuición de que la vida parece diseñada. Las criaturas vivientes muestran una complejidad, una precisión y una coherencia que resultan difíciles de atribuir al azar. Cada órgano parece cumplir una función, cada estructura parece responder a una necesidad, cada forma parece optimizada para sobrevivir. Esta sensación es tan poderosa que ha acompañado a todas las culturas: la idea de que debe haber “algo” detrás del diseño, una inteligencia que lo ha hecho posible. Pero cuando buscamos esa inteligencia, no la encontramos. No está en los individuos, no está en las especies, no está en ningún lugar visible. La vida parece diseñada, pero no hay diseñador.</text:p>
      <text:p text:style-name="Text_20_body">El experimento con la máquina lógica ilumina este misterio de una manera sorprendente. Muestra que la inteligencia que resuelve el problema no está en ningún individuo. Ninguno de ellos sabe qué está ocurriendo. Ninguno conoce el objetivo. Ninguno comprende el proceso. Ninguno tiene una visión global. Cada individuo vive su vida de manera local, limitada, ciega. Y sin embargo, el sistema encuentra la solución. La inteligencia aparece, pero no pertenece a nadie. Es una inteligencia sin sujeto individual, una inteligencia distribuida, una inteligencia que emerge del proceso mismo.</text:p>
      <text:p text:style-name="Text_20_body">Esto es profundamente revelador, porque muestra que la inteligencia puede existir sin un pensador. Puede existir sin conciencia, sin intención personal, sin planificación. Puede ser una propiedad del sistema, no de los componentes. En el experimento, la inteligencia que resuelve el problema no está en los individuos, sino en la estructura que los conecta. Es el sistema quien piensa, aunque ninguno de sus elementos lo haga.</text:p>
      <text:p text:style-name="Text_20_body">Esta idea cambia por completo nuestra comprensión de la vida. Porque en la vida real ocurre exactamente lo mismo. Los organismos no diseñan sus propios cuerpos. No eligen sus características. No deciden cómo deben funcionar sus órganos. No planifican su estructura. Y sin embargo, la vida produce diseños extraordinarios: ojos, alas, cerebros, sistemas inmunológicos, ecosistemas completos. La inteligencia que produce estos diseños no está en los individuos, sino en el proceso evolutivo que los atraviesa. Es una inteligencia invisible, porque no reside en ningún ser particular. Es una inteligencia sin rostro, sin voz, sin identidad individual.</text:p>
      <text:p text:style-name="Text_20_body">El experimento muestra por qué esta inteligencia es tan difícil de ver. Desde dentro del sistema, cada individuo solo percibe su propia existencia. Su vida es demasiado breve, su perspectiva demasiado estrecha, su experiencia demasiado limitada. No puede ver el proceso global, del mismo modo que una célula no puede comprender al organismo del que forma parte. La inteligencia del sistema es invisible para los individuos porque opera en una escala que ellos no pueden percibir. Es una inteligencia que se despliega a través de generaciones, no dentro de una sola vida.</text:p>
      <text:p text:style-name="Text_20_body"><text:soft-page-break/>Y sin embargo, esa inteligencia está ahí. Es la que dirige el proceso, la que selecciona las formas que funcionan, la que descarta las que no, la que avanza paso a paso hacia soluciones cada vez más complejas. No es una inteligencia consciente, pero es una inteligencia real. No piensa como nosotros, pero resuelve problemas. No tiene intención personal, pero produce resultados que parecen intencionales. No tiene un cuerpo propio, pero utiliza los cuerpos de los individuos para ejecutarse.</text:p>
      <text:p text:style-name="Text_20_body">Así, el experimento revela que la vida posee una inteligencia que no pertenece a ningún individuo, sino al sistema completo. Una inteligencia que no se ve porque no está localizada en un punto, sino distribuida en el proceso. Una inteligencia que no se manifiesta en pensamientos, sino en resultados. Una inteligencia que no necesita conciencia para existir. Una inteligencia que ha estado siempre ahí, operando silenciosamente detrás de la apariencia de los seres vivos.</text:p>
      <text:p text:style-name="Text_20_body">La vida parece diseñada porque lo está.<text:line-break/>Pero el diseñador no es un individuo: es la vida misma.</text:p>
      <text:p text:style-name="Horizontal_20_Line"/>
      <text:p text:style-name="Text_20_body">¿Quieres que avancemos al punto cuatr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17T13:53:14.522000000</meta:creation-date>
    <dc:date>2026-05-17T13:59:06.122000000</dc:date>
    <meta:editing-duration>PT5M51S</meta:editing-duration>
    <meta:editing-cycles>1</meta:editing-cycles>
    <meta:document-statistic meta:table-count="0" meta:image-count="0" meta:object-count="0" meta:page-count="2" meta:paragraph-count="11" meta:word-count="685" meta:character-count="4378" meta:non-whitespace-character-count="3704"/>
    <meta:generator>LibreOffice/7.3.5.2$Windows_X86_64 LibreOffice_project/184fe81b8c8c30d8b5082578aee2fed2ea847c01</meta:generator>
  </office:meta>
</office:document-meta>
</file>