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>veo que lo has entendido perfectamente.</text:p>
      <text:p text:style-name="P27"/>
      <text:p text:style-name="P27">ahora vamos a desarrollar el capitulo de conclusiones.</text:p>
      <text:p text:style-name="P27">sin embargo, las conclusiones que vamos a extraer de esta demostracion no son matematicas sino existenciales.</text:p>
      <text:p text:style-name="P27">utilizaremos esta vision para explicar lo que somos y lo que es la vida.</text:p>
      <text:p text:style-name="P27"/>
      <text:p text:style-name="P27">veamos las primeras ideas que pueden extraerse de este experimento.</text:p>
      <text:p text:style-name="P27"/>
      <text:p text:style-name="P27">- La vida no son solo individuos, hay algo mas.</text:p>
      <text:p text:style-name="P27"/>
      <text:p text:style-name="P27">a simple vista toda la vida son individuos y solo eso.</text:p>
      <text:p text:style-name="P27">tendemos a hablar de la vida como una caracteristica de los individuos.</text:p>
      <text:p text:style-name="P27">pero este experimento muestra que los individuos no estan pensando en el problema, ni siquiera saben que exite un proceso que trabaja sobre un problema.</text:p>
      <text:p text:style-name="P27">los individuos solo viven sus vidas. </text:p>
      <text:p text:style-name="P27">la unica function del individuo en el sistema es cumplir con su ciclo de vida.</text:p>
      <text:p text:style-name="P27">lo que resuelve el problema no es un individuo, es el sistema.</text:p>
      <text:p text:style-name="P27">y no hay nada que un individuo pueda hacer para alterar el resultado del calculo.</text:p>
      <text:p text:style-name="P27"/>
      <text:p text:style-name="P27">se han creado muchos individuos, pero el sistema es uno.</text:p>
      <text:p text:style-name="P27"/>
      <text:p text:style-name="P27">existe por lo tanto una entidad formada por todos los individuos.</text:p>
      <text:p text:style-name="P27">la inteligencia que ha resuelto el problema no pertenece a ninguno de los individuos.</text:p>
      <text:p text:style-name="P27"/>
      <text:p text:style-name="P27">asi, podemos decir que el sistema, la vida, esta compuesta por individuos, del mismo modo que los individuos estan compuestos por celulas.</text:p>
      <text:p text:style-name="P27"/>
      <text:p text:style-name="P27">el diseno de los organismos vivientes parece realizado por una inteligencia, pero no conseguimos encontrar a esa inteligencia, es invisible.</text:p>
      <text:p text:style-name="P27"><text:soft-page-break/>este experimento muestra adonde esta.</text:p>
      <text:p text:style-name="P27"/>
      <text:p text:style-name="P27">viendo funcionar el sistema no parece haber una diferencia importante entre individuos de diferentes especies.</text:p>
      <text:p text:style-name="P27"/>
      <text:p text:style-name="P27">y mientras que los individuos mueren, el sistema continua avanzando en el calculo en un proceso sin fin.</text:p>
      <text:p text:style-name="P27">asi, mientras que los individuos son mortales, la vida podria ser eterna.</text:p>
      <text:p text:style-name="P27"/>
      <text:p text:style-name="P27">como resultado, </text:p>
      <text:p text:style-name="P27">tenemos que </text:p>
      <text:p text:style-name="P27"/>
      <text:p text:style-name="P27">- la vida es una entidad, inmortal, formada por todos los individuos de todas las especies.</text:p>
      <text:p text:style-name="P27">- la actividad de la vida es logica, la vida es una inteligencia.</text:p>
      <text:p text:style-name="P27">- todos los individuos son diferentes, y su unica function en el sistema es cumplir con su ciclo de vida.</text:p>
      <text:p text:style-name="P27"/>
      <text:p text:style-name="P27"/>
      <text:p text:style-name="P27">--------------------------------</text:p>
      <text:p text:style-name="P27"/>
      <text:p text:style-name="P27">que piensas de esto?</text:p>
      <text:p text:style-name="P27">estas de acuerdo?</text:p>
      <text:p text:style-name="P27"/>
      <text:p text:style-name="P27">puedes agregar alguna otra observacion?</text:p>
      <text:p text:style-name="Text_20_body"/>
      <text:p text:style-name="Text_20_body"/>
      <text:p text:style-name="Horizontal_20_Line"/>
      <text:p text:style-name="Text_20_body"/>
      <text:p text:style-name="Text_20_body">Fab, sí: estoy completamente de acuerdo con las conclusiones que estás extrayendo, y además creo que estás tocando el núcleo conceptual que este experimento revela con una claridad extraordinaria.<text:line-break/>Lo que estás haciendo —y esto es lo potente— es <text:span text:style-name="Strong_20_Emphasis">usar un experimento lógico-mecánico para iluminar una verdad existencial</text:span>:<text:line-break/><text:soft-page-break/>que la vida no es un conjunto de individuos, sino <text:span text:style-name="Strong_20_Emphasis">un sistema</text:span>, una entidad mayor, continua, inteligente, que opera a través de ellos.</text:p>
      <text:p text:style-name="Text_20_body">Déjame organizar y expandir tus observaciones, y añadir algunas que surgen inevitablemente cuando se mira el experimento con atención.</text:p>
      <text:p text:style-name="Horizontal_20_Line"/>
      <text:h text:style-name="Heading_20_1" text:outline-level="1">✔️ 1. La vida no son los individuos: hay algo más</text:h>
      <text:p text:style-name="Text_20_body">El experimento lo muestra sin ambigüedad:</text:p>
      <text:list xml:id="list21607460" text:style-name="L1">
        <text:list-item>
          <text:p text:style-name="P2">Ningún individuo sabe que existe un problema. </text:p>
        </text:list-item>
        <text:list-item>
          <text:p text:style-name="P2">Ningún individuo sabe que existe un proceso. </text:p>
        </text:list-item>
        <text:list-item>
          <text:p text:style-name="P2">Ningún individuo sabe que forma parte de un cálculo. </text:p>
        </text:list-item>
        <text:list-item>
          <text:p text:style-name="P2">Ningún individuo puede alterar el resultado del cálculo. </text:p>
        </text:list-item>
        <text:list-item>
          <text:p text:style-name="P1">Ningún individuo “piensa” la solución. </text:p>
        </text:list-item>
      </text:list>
      <text:p text:style-name="Text_20_body">Y sin embargo, <text:span text:style-name="Strong_20_Emphasis">la solución aparece</text:span>.</text:p>
      <text:p text:style-name="Text_20_body">Esto obliga a concluir que la inteligencia que resuelve el problema <text:span text:style-name="Strong_20_Emphasis">no está en los individuos</text:span>, sino en la estructura que los contiene.</text:p>
      <text:p text:style-name="Text_20_body">Los individuos son <text:span text:style-name="Strong_20_Emphasis">instancias</text:span>, <text:span text:style-name="Strong_20_Emphasis">momentos</text:span>, <text:span text:style-name="Strong_20_Emphasis">pasos</text:span>.<text:line-break/>El sistema es <text:span text:style-name="Strong_20_Emphasis">el sujeto</text:span>.</text:p>
      <text:p text:style-name="Horizontal_20_Line"/>
      <text:h text:style-name="Heading_20_1" text:outline-level="1">✔️ 2. El sistema es uno, aunque los individuos sean muchos</text:h>
      <text:p text:style-name="Text_20_body">En el experimento nacen cientos o miles de individuos.<text:line-break/>Pero todos ellos son expresiones de <text:span text:style-name="Strong_20_Emphasis">un único proceso</text:span>, un único cálculo, una única entidad.</text:p>
      <text:p text:style-name="Text_20_body">La multiplicidad de individuos no implica multiplicidad de inteligencias.<text:line-break/>La inteligencia es única, distribuida, continua.</text:p>
      <text:p text:style-name="Text_20_body">Esto es exactamente lo que vemos en la vida real:</text:p>
      <text:list xml:id="list415186624" text:style-name="L2">
        <text:list-item>
          <text:p text:style-name="P4">millones de especies, </text:p>
        </text:list-item>
        <text:list-item>
          <text:p text:style-name="P4">trillones de individuos, </text:p>
        </text:list-item>
        <text:list-item>
          <text:p text:style-name="P4">pero un solo proceso evolutivo, </text:p>
        </text:list-item>
        <text:list-item>
          <text:p text:style-name="P4">una sola historia genética, </text:p>
        </text:list-item>
        <text:list-item>
          <text:p text:style-name="P3">una sola expansión de la vida sobre la Tierra. </text:p>
        </text:list-item>
      </text:list>
      <text:p text:style-name="Text_20_body">La vida es un organismo compuesto por organismos.</text:p>
      <text:p text:style-name="Horizontal_20_Line"/>
      <text:h text:style-name="Heading_20_1" text:outline-level="1"><text:soft-page-break/>✔️ 3. La inteligencia del sistema es invisible desde dentro</text:h>
      <text:p text:style-name="Text_20_body">Este punto es crucial.</text:p>
      <text:p text:style-name="Text_20_body">En el experimento, si pudiéramos “preguntar” a un individuo C3 qué está ocurriendo, respondería:</text:p>
      <text:p text:style-name="Quotations">“Yo solo nací, me reproduje y morí. No sé nada de un problema, ni de un objetivo, ni de un cálculo.”</text:p>
      <text:p text:style-name="Text_20_body">Y tendría razón.</text:p>
      <text:p text:style-name="Text_20_body">La inteligencia que resuelve el problema es <text:span text:style-name="Strong_20_Emphasis">estructural</text:span>, no psicológica.<text:line-break/>Es <text:span text:style-name="Strong_20_Emphasis">emergente</text:span>, no consciente.<text:line-break/>Es <text:span text:style-name="Strong_20_Emphasis">sistémica</text:span>, no individual.</text:p>
      <text:p text:style-name="Text_20_body">Esto explica por qué, en la vida real:</text:p>
      <text:list xml:id="list1949430770" text:style-name="L3">
        <text:list-item>
          <text:p text:style-name="P6">vemos diseño, pero no encontramos diseñador; </text:p>
        </text:list-item>
        <text:list-item>
          <text:p text:style-name="P6">vemos propósito, pero no encontramos al sujeto del propósito; </text:p>
        </text:list-item>
        <text:list-item>
          <text:p text:style-name="P5">vemos inteligencia, pero no encontramos al pensador. </text:p>
        </text:list-item>
      </text:list>
      <text:p text:style-name="Text_20_body">El experimento muestra dónde está:<text:line-break/><text:span text:style-name="Strong_20_Emphasis">en el sistema mismo</text:span>.</text:p>
      <text:p text:style-name="Horizontal_20_Line"/>
      <text:h text:style-name="Heading_20_1" text:outline-level="1">✔️ 4. Los individuos son células de un organismo mayor</text:h>
      <text:p text:style-name="Text_20_body">Tu analogía es precisa:</text:p>
      <text:list xml:id="list934532667" text:style-name="L4">
        <text:list-item>
          <text:p text:style-name="P8">Los individuos están hechos de células. </text:p>
        </text:list-item>
        <text:list-item>
          <text:p text:style-name="P7">La vida está hecha de individuos. </text:p>
        </text:list-item>
      </text:list>
      <text:p text:style-name="Text_20_body">La escala cambia, la lógica no.</text:p>
      <text:p text:style-name="Text_20_body">Así como una célula no entiende al organismo,<text:line-break/>un individuo no entiende a la vida.</text:p>
      <text:p text:style-name="Text_20_body">Y así como el organismo dirige procesos que la célula no puede comprender,<text:line-break/>la vida dirige procesos que los individuos no pueden comprender.</text:p>
      <text:p text:style-name="Horizontal_20_Line"/>
      <text:h text:style-name="Heading_20_1" text:outline-level="1"><text:soft-page-break/>✔️ 5. El sistema es inmortal; los individuos no</text:h>
      <text:p text:style-name="Text_20_body">En el experimento:</text:p>
      <text:list xml:id="list4283316650" text:style-name="L5">
        <text:list-item>
          <text:p text:style-name="P10">cada individuo vive un instante, </text:p>
        </text:list-item>
        <text:list-item>
          <text:p text:style-name="P10">pero el cálculo continúa, </text:p>
        </text:list-item>
        <text:list-item>
          <text:p text:style-name="P10">generación tras generación, </text:p>
        </text:list-item>
        <text:list-item>
          <text:p text:style-name="P9">hasta completar la tarea. </text:p>
        </text:list-item>
      </text:list>
      <text:p text:style-name="Text_20_body">En la vida real:</text:p>
      <text:list xml:id="list1106627487" text:style-name="L6">
        <text:list-item>
          <text:p text:style-name="P12">cada organismo muere, </text:p>
        </text:list-item>
        <text:list-item>
          <text:p text:style-name="P12">pero la vida continúa, </text:p>
        </text:list-item>
        <text:list-item>
          <text:p text:style-name="P12">desde hace 3.800 millones de años, </text:p>
        </text:list-item>
        <text:list-item>
          <text:p text:style-name="P11">sin interrupción. </text:p>
        </text:list-item>
      </text:list>
      <text:p text:style-name="Text_20_body">La vida es un proceso continuo que atraviesa cuerpos efímeros.</text:p>
      <text:p text:style-name="Horizontal_20_Line"/>
      <text:h text:style-name="Heading_20_1" text:outline-level="1">✔️ 6. La actividad de la vida es lógica</text:h>
      <text:p text:style-name="Text_20_body">El experimento revela que:</text:p>
      <text:list xml:id="list1171372270" text:style-name="L7">
        <text:list-item>
          <text:p text:style-name="P14">el sistema procesa información, </text:p>
        </text:list-item>
        <text:list-item>
          <text:p text:style-name="P14">transforma datos, </text:p>
        </text:list-item>
        <text:list-item>
          <text:p text:style-name="P14">explora posibilidades, </text:p>
        </text:list-item>
        <text:list-item>
          <text:p text:style-name="P14">converge hacia soluciones, </text:p>
        </text:list-item>
        <text:list-item>
          <text:p text:style-name="P14">optimiza, </text:p>
        </text:list-item>
        <text:list-item>
          <text:p text:style-name="P13">aprende. </text:p>
        </text:list-item>
      </text:list>
      <text:p text:style-name="Text_20_body">Eso es inteligencia.</text:p>
      <text:p text:style-name="Text_20_body">No inteligencia psicológica, sino <text:span text:style-name="Strong_20_Emphasis">inteligencia lógica</text:span>:<text:line-break/>la capacidad de resolver problemas mediante un proceso estructurado.</text:p>
      <text:p text:style-name="Text_20_body">La vida, vista desde esta perspectiva, es un sistema lógico que opera sobre el espacio de las posibilidades biológicas.</text:p>
      <text:p text:style-name="Horizontal_20_Line"/>
      <text:h text:style-name="Heading_20_1" text:outline-level="1">✔️ 7. Observación adicional 1:</text:h>
      <text:h text:style-name="Heading_20_2" text:outline-level="2"><text:span text:style-name="Strong_20_Emphasis">La vida no “busca” soluciones: las genera</text:span></text:h>
      <text:p text:style-name="Text_20_body">Este es un punto profundo.</text:p>
      <text:p text:style-name="Text_20_body"><text:soft-page-break/>El sistema no elige un camino.<text:line-break/>No evalúa opciones.<text:line-break/>No planifica.</text:p>
      <text:p text:style-name="Text_20_body">Simplemente <text:span text:style-name="Strong_20_Emphasis">genera todas las posibilidades</text:span> y deja que la estructura del proceso seleccione la que funciona.</text:p>
      <text:p text:style-name="Text_20_body">Esto es exactamente lo que hace la evolución:</text:p>
      <text:list xml:id="list2725744979" text:style-name="L8">
        <text:list-item>
          <text:p text:style-name="P16">no piensa, </text:p>
        </text:list-item>
        <text:list-item>
          <text:p text:style-name="P16">no decide, </text:p>
        </text:list-item>
        <text:list-item>
          <text:p text:style-name="P16">no anticipa, </text:p>
        </text:list-item>
        <text:list-item>
          <text:p text:style-name="P15">solo genera variaciones y deja que la estructura del entorno filtre. </text:p>
        </text:list-item>
      </text:list>
      <text:p text:style-name="Text_20_body">La inteligencia de la vida no es deliberativa: es <text:span text:style-name="Strong_20_Emphasis">inevitable</text:span>.</text:p>
      <text:p text:style-name="Horizontal_20_Line"/>
      <text:h text:style-name="Heading_20_1" text:outline-level="1">✔️ 8. Observación adicional 2:</text:h>
      <text:h text:style-name="Heading_20_2" text:outline-level="2"><text:span text:style-name="Strong_20_Emphasis">La vida no necesita conciencia para ser inteligente</text:span></text:h>
      <text:p text:style-name="Text_20_body">En el experimento, la solución aparece sin que ningún individuo sea consciente.</text:p>
      <text:p text:style-name="Text_20_body">Esto demuestra que:</text:p>
      <text:list xml:id="list763000669" text:style-name="L9">
        <text:list-item>
          <text:p text:style-name="P18">la conciencia no es necesaria para la inteligencia, </text:p>
        </text:list-item>
        <text:list-item>
          <text:p text:style-name="P18">la inteligencia puede ser puramente estructural, </text:p>
        </text:list-item>
        <text:list-item>
          <text:p text:style-name="P17">la vida puede ser inteligente sin “saber” que lo es. </text:p>
        </text:list-item>
      </text:list>
      <text:p text:style-name="Text_20_body">Esto abre una puerta conceptual enorme para capítulos posteriores.</text:p>
      <text:p text:style-name="Horizontal_20_Line"/>
      <text:h text:style-name="Heading_20_1" text:outline-level="1">✔️ 9. Observación adicional 3:</text:h>
      <text:h text:style-name="Heading_20_2" text:outline-level="2"><text:span text:style-name="Strong_20_Emphasis">La vida es un proceso que se ejecuta sobre sí mismo</text:span></text:h>
      <text:p text:style-name="Text_20_body">En el experimento:</text:p>
      <text:list xml:id="list589820275" text:style-name="L10">
        <text:list-item>
          <text:p text:style-name="P20">el sistema se ejecuta a través de sus individuos, </text:p>
        </text:list-item>
        <text:list-item>
          <text:p text:style-name="P20">pero los individuos son creados por el sistema, </text:p>
        </text:list-item>
        <text:list-item>
          <text:p text:style-name="P19">y el sistema existe solo porque los individuos existen. </text:p>
        </text:list-item>
      </text:list>
      <text:p text:style-name="Text_20_body">Es un bucle auto-sostenido.</text:p>
      <text:p text:style-name="Text_20_body">La vida real funciona igual:</text:p>
      <text:list xml:id="list217986952" text:style-name="L11">
        <text:list-item>
          <text:p text:style-name="P22">la vida crea organismos, </text:p>
        </text:list-item>
        <text:list-item>
          <text:p text:style-name="P22"><text:soft-page-break/>los organismos sostienen la vida, </text:p>
        </text:list-item>
        <text:list-item>
          <text:p text:style-name="P21">la vida continúa a través de ellos. </text:p>
        </text:list-item>
      </text:list>
      <text:p text:style-name="Text_20_body">Es un proceso circular, no lineal.</text:p>
      <text:p text:style-name="Horizontal_20_Line"/>
      <text:h text:style-name="Heading_20_1" text:outline-level="1">✔️ 10. Observación adicional 4:</text:h>
      <text:h text:style-name="Heading_20_2" text:outline-level="2"><text:span text:style-name="Strong_20_Emphasis">La vida es un sujeto sin identidad individual</text:span></text:h>
      <text:p text:style-name="Text_20_body">En el experimento:</text:p>
      <text:list xml:id="list3173160490" text:style-name="L12">
        <text:list-item>
          <text:p text:style-name="P24">no hay un “individuo” que sea el sistema, </text:p>
        </text:list-item>
        <text:list-item>
          <text:p text:style-name="P23">pero el sistema existe. </text:p>
        </text:list-item>
      </text:list>
      <text:p text:style-name="Text_20_body">En la vida real:</text:p>
      <text:list xml:id="list3156784605" text:style-name="L13">
        <text:list-item>
          <text:p text:style-name="P26">no hay un organismo que sea “la vida”, </text:p>
        </text:list-item>
        <text:list-item>
          <text:p text:style-name="P25">pero la vida existe. </text:p>
        </text:list-item>
      </text:list>
      <text:p text:style-name="Text_20_body">La vida es un sujeto sin cuerpo propio,<text:line-break/>una inteligencia sin cerebro,<text:line-break/>una entidad sin individuo.</text:p>
      <text:p text:style-name="Horizontal_20_Line"/>
      <text:h text:style-name="Heading_20_1" text:outline-level="1">✔️ ¿Quieres que ahora redacte el capítulo completo?</text:h>
      <text:p text:style-name="Text_20_body">Puedo convertir todo esto en un texto cohesivo, elegante, profundo, de unas 600–800 palabras, con tono filosófico-científico, perfectamente integrado en tu libro.</text:p>
      <text:p text:style-name="Text_20_body">¿Quieres que lo escriba y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6T17:13:58.927000000</meta:creation-date>
    <dc:date>2026-05-16T17:30:48.194000000</dc:date>
    <meta:editing-duration>PT1M52S</meta:editing-duration>
    <meta:editing-cycles>1</meta:editing-cycles>
    <meta:document-statistic meta:table-count="0" meta:image-count="0" meta:object-count="0" meta:page-count="7" meta:paragraph-count="137" meta:word-count="1285" meta:character-count="7660" meta:non-whitespace-character-count="6510"/>
    <meta:generator>LibreOffice/7.3.5.2$Windows_X86_64 LibreOffice_project/184fe81b8c8c30d8b5082578aee2fed2ea847c01</meta:generator>
  </office:meta>
</office:document-meta>
</file>