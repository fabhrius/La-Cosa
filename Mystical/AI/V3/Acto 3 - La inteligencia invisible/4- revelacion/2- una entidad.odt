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Fab.<text:line-break/>Ahora que el primer apartado ya está limpio, enfocado y sin anticipar nada, podemos avanzar al <text:span text:style-name="Strong_20_Emphasis">apartado 2</text:span>, que debe cumplir una función muy específica:</text:p>
      <text:list xml:id="list2275991432" text:style-name="L1">
        <text:list-item>
          <text:p text:style-name="P2"><text:span text:style-name="Strong_20_Emphasis">Responder al misterio planteado en el punto 1</text:span> (“hay algo más”). </text:p>
        </text:list-item>
        <text:list-item>
          <text:p text:style-name="P2"><text:span text:style-name="Strong_20_Emphasis">Revelar qué es ese ‘algo más’</text:span>: un sistema único, un proceso continuo. </text:p>
        </text:list-item>
        <text:list-item>
          <text:p text:style-name="P2"><text:span text:style-name="Strong_20_Emphasis">Sin hablar todavía de inteligencia ni de inmortalidad.</text:span> </text:p>
        </text:list-item>
        <text:list-item>
          <text:p text:style-name="P2"><text:span text:style-name="Strong_20_Emphasis">Sin mencionar diseño, propósito o actividad lógica.</text:span> </text:p>
        </text:list-item>
        <text:list-item>
          <text:p text:style-name="P1"><text:span text:style-name="Strong_20_Emphasis">Solo unidad. Solo entidad.</text:span> </text:p>
        </text:list-item>
      </text:list>
      <text:p text:style-name="Text_20_body">Aquí tienes el texto, completamente depurado y coherente con esa intención.</text:p>
      <text:p text:style-name="Horizontal_20_Line"/>
      <text:h text:style-name="Heading_20_1" text:outline-level="1"><text:span text:style-name="Strong_20_Emphasis">2. La vida es una entidad</text:span></text:h>
      <text:p text:style-name="Text_20_body">En el apartado anterior descubrimos que la vida no puede reducirse a los individuos que la componen. Los individuos participan en el proceso, pero ninguno contiene la inteligencia que aparece en el experimento. Ninguno puede resolver el problema por sí solo. Ninguno tiene acceso al cálculo completo. Esto nos obliga a buscar dónde se encuentra realmente aquello que está actuando.</text:p>
      <text:p text:style-name="Text_20_body">La respuesta surge cuando dejamos de observar a los individuos por separado y empezamos a observar el proceso en su conjunto.</text:p>
      <text:p text:style-name="Text_20_body">En el experimento, aunque nacen muchos individuos, todos ellos forman parte de <text:span text:style-name="Strong_20_Emphasis">un único flujo continuo</text:span>. Cada individuo aparece, cumple su función y desaparece, pero el proceso no se interrumpe. El primer individuo da lugar al segundo, el segundo al tercero, y así sucesivamente. No son vidas aisladas, sino una secuencia encadenada. No son muchos procesos independientes, sino un solo proceso que se despliega a través de ellos.</text:p>
      <text:p text:style-name="Text_20_body">Lo que vemos no es una multitud de sistemas trabajando en paralelo, sino <text:span text:style-name="Strong_20_Emphasis">un solo sistema</text:span> que utiliza a muchos individuos para avanzar. Cada individuo es un paso del mismo cálculo. Cada generación es una continuación directa de la anterior. Cada vida es un fragmento de un proceso mayor que la incluye. El sistema no se divide cuando aparecen nuevos individuos, ni se multiplica cuando se reproducen. Permanece uno.</text:p>
      <text:p text:style-name="Text_20_body">Esta continuidad es lo que convierte al sistema en una entidad.<text:line-break/>No es una metáfora ni una interpretación simbólica.<text:line-break/>Es una descripción literal del funcionamiento observado.</text:p>
      <text:p text:style-name="Text_20_body">Una entidad es algo que existe como un todo coherente, aunque esté compuesto por partes. En el experimento, el sistema cumple exactamente con esta definición. Tiene una estructura, un funcionamiento, una dirección. No depende de la identidad de cada individuo, porque su continuidad no se rompe cuando uno desaparece. El proceso sigue adelante, como un río que fluye a través de gotas que nunca son las mismas.</text:p>
      <text:p text:style-name="Text_20_body"><text:soft-page-break/>Los individuos son necesarios, pero no son el sujeto del proceso.<text:line-break/>El sujeto es el sistema completo.</text:p>
      <text:p text:style-name="Text_20_body">Esta idea cambia por completo la forma en que entendemos la vida. En lugar de verla como una colección de seres aislados, empezamos a verla como <text:span text:style-name="Strong_20_Emphasis">una entidad que se expresa a través de ellos</text:span>. Los individuos no son unidades independientes, sino componentes funcionales de un organismo mayor. No son sistemas completos, sino partes de un sistema único.</text:p>
      <text:p text:style-name="Text_20_body">Nada de esto niega la existencia ni la importancia de los individuos. Cada uno cumple un papel esencial dentro del proceso. Pero su papel solo tiene sentido dentro del conjunto. Un individuo aislado no puede ejecutar el proceso completo. Un individuo separado del flujo no puede continuar la operación. Su existencia adquiere significado únicamente dentro de la entidad mayor que lo contiene.</text:p>
      <text:p text:style-name="Text_20_body">El experimento nos muestra, con una claridad imposible de ignorar, que la vida no es una suma de individuos, sino <text:span text:style-name="Strong_20_Emphasis">una entidad real</text:span>, un sistema único que se despliega a través de generaciones sucesivas. Los individuos son momentos; la entidad es la continuidad. Los individuos son partes; la entidad es el todo.</text:p>
      <text:p text:style-name="Text_20_body">A partir de aquí, podemos avanzar hacia la siguiente revelación:<text:line-break/>si la vida es una entidad, ¿qué tipo de actividad realiza esa entidad?</text:p>
      <text:p text:style-name="Horizontal_20_Line"/>
      <text:p text:style-name="Text_20_body">Si estás conforme con este tono y esta estructura, paso al <text:span text:style-name="Strong_20_Emphasis">apartado 3: “La vida es una inteligencia”</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4T15:02:38.092000000</meta:creation-date>
    <dc:date>2026-05-24T15:06:50.672000000</dc:date>
    <meta:editing-duration>PT4M12S</meta:editing-duration>
    <meta:editing-cycles>1</meta:editing-cycles>
    <meta:document-statistic meta:table-count="0" meta:image-count="0" meta:object-count="0" meta:page-count="2" meta:paragraph-count="20" meta:word-count="632" meta:character-count="3855" meta:non-whitespace-character-count="3243"/>
    <meta:generator>LibreOffice/7.3.5.2$Windows_X86_64 LibreOffice_project/184fe81b8c8c30d8b5082578aee2fed2ea847c01</meta:generator>
  </office:meta>
</office:document-meta>
</file>