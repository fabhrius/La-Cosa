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Aquí tienes el <text:span text:style-name="Strong_20_Emphasis">apartado 3</text:span>, escrito con el mismo rigor conceptual y la misma disciplina estructural que los dos anteriores.<text:line-break/>Este texto <text:span text:style-name="Strong_20_Emphasis">solo</text:span> desarrolla la idea de que <text:span text:style-name="Emphasis">la vida es una inteligencia</text:span>, sin mencionar inmortalidad, sin hablar de entidad (más allá de lo ya establecido), y sin solaparse con los otros puntos.</text:p>
      <text:p text:style-name="Horizontal_20_Line"/>
      <text:h text:style-name="Heading_20_1" text:outline-level="1"><text:span text:style-name="Strong_20_Emphasis">3. La vida es una inteligencia</text:span></text:h>
      <text:p text:style-name="Text_20_body">Una vez que reconocemos que la vida no puede reducirse a los individuos, y que el proceso completo funciona como una entidad única, surge una pregunta inevitable:<text:line-break/><text:span text:style-name="Strong_20_Emphasis">¿qué tipo de actividad realiza esa entidad?</text:span></text:p>
      <text:p text:style-name="Text_20_body">El experimento nos da una respuesta clara.<text:line-break/>Cuando observamos el sistema en funcionamiento, vemos que su actividad consiste en transformar información. Cada individuo recibe un estado parcial del problema, lo modifica siguiendo un método preciso y lo transmite a la siguiente generación. El proceso avanza paso a paso, explorando posibilidades, descartando caminos que no conducen a la meta y extendiéndose hacia aquellos que sí lo hacen. Con el tiempo, el sistema converge hacia la solución.</text:p>
      <text:p text:style-name="Text_20_body">Nada de esto requiere que los individuos comprendan lo que están haciendo.<text:line-break/>La inteligencia no está en ellos.<text:line-break/>La inteligencia está en el proceso.</text:p>
      <text:p text:style-name="Text_20_body">Lo que vemos es una operación lógica:<text:line-break/>una secuencia ordenada de transformaciones que, acumuladas, resuelven un problema que ningún individuo podría resolver por sí solo. El sistema actúa como un mecanismo de cálculo distribuido, donde cada individuo ejecuta una parte mínima de la operación total. Ninguno tiene la visión completa, pero el conjunto sí la tiene. Ninguno puede avanzar más de un paso, pero el conjunto avanza hasta el final.</text:p>
      <text:p text:style-name="Text_20_body">Esta capacidad de transformar información de manera estructurada es lo que llamamos inteligencia.<text:line-break/>No es necesario que exista conciencia, intención o planificación.<text:line-break/>La inteligencia no depende de un sujeto que “piense”, sino de un proceso que <text:span text:style-name="Strong_20_Emphasis">resuelve</text:span>.</text:p>
      <text:p text:style-name="Text_20_body">En el experimento, el sistema resuelve un problema concreto: encontrar un camino sobre un tablero. Pero lo importante no es el problema en sí, sino la forma en que se resuelve. El sistema:</text:p>
      <text:list xml:id="list3590223444" text:style-name="L1">
        <text:list-item>
          <text:p text:style-name="P2">recibe información, </text:p>
        </text:list-item>
        <text:list-item>
          <text:p text:style-name="P2">la transforma, </text:p>
        </text:list-item>
        <text:list-item>
          <text:p text:style-name="P2">la transmite, </text:p>
        </text:list-item>
        <text:list-item>
          <text:p text:style-name="P2">la acumula, </text:p>
        </text:list-item>
        <text:list-item>
          <text:p text:style-name="P1">y avanza hacia un resultado coherente. </text:p>
        </text:list-item>
      </text:list>
      <text:p text:style-name="Text_20_body"><text:soft-page-break/>Esto es inteligencia en su forma más esencial:<text:line-break/>la capacidad de producir soluciones mediante un proceso ordenado.</text:p>
      <text:p text:style-name="Text_20_body">La vida, entendida como el sistema completo que se despliega a través de generaciones, realiza exactamente este tipo de actividad. Su funcionamiento no es caótico ni aleatorio. Es un proceso estructurado que transforma información biológica, explora posibilidades y produce resultados funcionales. No necesita que los individuos comprendan lo que ocurre. No necesita que nadie dirija el proceso desde dentro. La inteligencia no reside en los componentes, sino en la estructura que los conecta.</text:p>
      <text:p text:style-name="Text_20_body">Esta revelación es importante porque redefine lo que entendemos por inteligencia.<text:line-break/>La inteligencia de la vida no es psicológica.<text:line-break/>No es consciente.<text:line-break/>No es personal.<text:line-break/>Es lógica.</text:p>
      <text:p text:style-name="Text_20_body">Es la inteligencia de un proceso que opera de manera continua, que utiliza a los individuos como pasos de un cálculo mayor, y que avanza sin detenerse hacia configuraciones cada vez más complejas. La vida no “piensa” como pensamos nosotros, pero actúa como actúa una inteligencia: resuelve problemas, encuentra soluciones, se adapta, explora, converge.</text:p>
      <text:p text:style-name="Text_20_body">Así, el experimento nos muestra que la vida, como entidad, <text:span text:style-name="Strong_20_Emphasis">es una inteligencia</text:span>.<text:line-break/>Una inteligencia que no pertenece a ningún individuo, sino al proceso completo.<text:line-break/>Una inteligencia que no necesita conciencia para existir.<text:line-break/>Una inteligencia que se manifiesta en la capacidad de transformar información y avanzar hacia resultados coherentes.</text:p>
      <text:p text:style-name="Text_20_body">En el siguiente apartado veremos otra característica esencial de esta entidad:<text:line-break/>mientras los individuos mueren, la vida continúa.</text:p>
      <text:p text:style-name="Horizontal_20_Line"/>
      <text:p text:style-name="Text_20_body">¿Quieres que avancemos al apartado 4?</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4T17:21:44.922000000</meta:creation-date>
    <dc:date>2026-05-24T17:25:51.545000000</dc:date>
    <meta:editing-duration>PT4M7S</meta:editing-duration>
    <meta:editing-cycles>1</meta:editing-cycles>
    <meta:document-statistic meta:table-count="0" meta:image-count="0" meta:object-count="0" meta:page-count="2" meta:paragraph-count="20" meta:word-count="597" meta:character-count="3810" meta:non-whitespace-character-count="3233"/>
    <meta:generator>LibreOffice/7.3.5.2$Windows_X86_64 LibreOffice_project/184fe81b8c8c30d8b5082578aee2fed2ea847c01</meta:generator>
  </office:meta>
</office:document-meta>
</file>