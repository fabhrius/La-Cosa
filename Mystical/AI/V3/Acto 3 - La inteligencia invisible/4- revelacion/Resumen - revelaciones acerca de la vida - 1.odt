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Aquí tienes un <text:span text:style-name="Strong_20_Emphasis">resumen limpio, preciso y conceptual</text:span> de los cuatro puntos, tal como los has redefinido: sin contradicciones, sin afirmaciones innecesarias, sin extendernos más allá de lo que queremos revelar en esta etapa del libro.<text:line-break/>Este texto sirve como <text:span text:style-name="Strong_20_Emphasis">discusión inicial y punto de partida</text:span> para desarrollar cada apartado después.</text:p>
      <text:p text:style-name="Horizontal_20_Line"/>
      <text:h text:style-name="Heading_20_1" text:outline-level="1"><text:span text:style-name="Strong_20_Emphasis">Resumen de las cuatro revelaciones fundamentales</text:span></text:h>
      <text:h text:style-name="Heading_20_2" text:outline-level="2"><text:span text:style-name="Strong_20_Emphasis">1. La vida no es solo un conjunto de individuos: hay algo más</text:span></text:h>
      <text:p text:style-name="Text_20_body">El experimento muestra que, aunque los individuos participan en el proceso, ninguno de ellos posee la inteligencia que resuelve el problema. Cada individuo cumple su ciclo —nacer, reproducirse, morir— sin comprender el objetivo ni el cálculo en curso. Ninguno puede, por sí solo, encontrar la solución.<text:line-break/>La inteligencia que aparece no pertenece a los individuos.<text:line-break/>Esto revela que la vida no puede reducirse a ellos: <text:span text:style-name="Strong_20_Emphasis">hay algo más que los trasciende</text:span>.</text:p>
      <text:p text:style-name="Horizontal_20_Line"/>
      <text:h text:style-name="Heading_20_2" text:outline-level="2"><text:span text:style-name="Strong_20_Emphasis">2. La vida es una entidad: un sistema único</text:span></text:h>
      <text:p text:style-name="Text_20_body">Aunque el sistema está compuesto por muchos individuos, todos ellos forman parte de un único proceso continuo. Desde el primer individuo hasta el último, todos participan en la misma operación lógica.<text:line-break/>No son muchos sistemas trabajando en paralelo: es <text:span text:style-name="Strong_20_Emphasis">un solo sistema</text:span>, una sola máquina, un solo flujo.<text:line-break/>La vida, vista desde esta perspectiva, no es una colección de seres aislados, sino <text:span text:style-name="Strong_20_Emphasis">una entidad coherente</text:span>, un organismo lógico que se expresa a través de individuos sucesivos.</text:p>
      <text:p text:style-name="Horizontal_20_Line"/>
      <text:h text:style-name="Heading_20_2" text:outline-level="2"><text:span text:style-name="Strong_20_Emphasis">3. La vida es una inteligencia</text:span></text:h>
      <text:p text:style-name="Text_20_body">La actividad del sistema es puramente lógica: transformar información, explorar posibilidades, avanzar paso a paso hacia una solución.<text:line-break/>No hay nada más que el proceso y los mecanismos que lo sostienen.<text:line-break/>La inteligencia no surge de la conciencia de los individuos, sino de la estructura del sistema.<text:line-break/>La vida, entendida como este proceso continuo, <text:span text:style-name="Strong_20_Emphasis">es una forma de inteligencia</text:span>, aunque no se parezca a la inteligencia psicológica que asociamos a los seres conscientes.</text:p>
      <text:p text:style-name="Horizontal_20_Line"/>
      <text:h text:style-name="Heading_20_2" text:outline-level="2"><text:soft-page-break/><text:span text:style-name="Strong_20_Emphasis">4. La vida es un organismo inmortal</text:span></text:h>
      <text:p text:style-name="Text_20_body">En el experimento, los individuos mueren como parte esencial de su función. Su desaparición no detiene el proceso; al contrario, lo hace avanzar.<text:line-break/>Mientras los individuos son efímeros, el sistema continúa sin interrupción.<text:line-break/>La vida, como proceso, no tiene límite inherente: no nace y muere como los individuos, sino que fluye a través de ellos.<text:line-break/>Por eso podemos decir que la vida es <text:span text:style-name="Strong_20_Emphasis">un organismo inmortal</text:span>, cuya existencia no depende de la duración de sus componentes.</text:p>
      <text:p text:style-name="Horizontal_20_Line"/>
      <text:h text:style-name="Heading_20_1" text:outline-level="1"><text:span text:style-name="Strong_20_Emphasis">Síntesis general</text:span></text:h>
      <text:p text:style-name="Text_20_body">Estas cuatro revelaciones forman un único mensaje:</text:p>
      <text:list xml:id="list3406067935" text:style-name="L1">
        <text:list-item>
          <text:p text:style-name="P2">La vida no se agota en los individuos. </text:p>
        </text:list-item>
        <text:list-item>
          <text:p text:style-name="P2">La vida es una entidad real, un sistema único. </text:p>
        </text:list-item>
        <text:list-item>
          <text:p text:style-name="P2">Su actividad es inteligencia pura, ejecutada a través de generaciones. </text:p>
        </text:list-item>
        <text:list-item>
          <text:p text:style-name="P1">Y mientras los individuos mueren, la vida continúa: es inmortal. </text:p>
        </text:list-item>
      </text:list>
      <text:p text:style-name="Text_20_body">Este es el núcleo conceptual que el experimento nos permite ver con claridad.<text:line-break/>A partir de aquí, podemos desarrollar cada punto con profundidad, uno por uno.</text:p>
      <text:p text:style-name="Horizontal_20_Line"/>
      <text:p text:style-name="Text_20_body">¿Quieres que pasemos ahora a desarrollar el primer apartado en su versión definitiv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4T14:21:09.869000000</meta:creation-date>
    <dc:date>2026-05-24T14:26:14.538000000</dc:date>
    <meta:editing-duration>PT5M5S</meta:editing-duration>
    <meta:editing-cycles>1</meta:editing-cycles>
    <meta:document-statistic meta:table-count="0" meta:image-count="0" meta:object-count="0" meta:page-count="2" meta:paragraph-count="18" meta:word-count="479" meta:character-count="2943" meta:non-whitespace-character-count="2482"/>
    <meta:generator>LibreOffice/7.3.5.2$Windows_X86_64 LibreOffice_project/184fe81b8c8c30d8b5082578aee2fed2ea847c01</meta:generator>
  </office:meta>
</office:document-meta>
</file>