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text:line-break/>Aquí tienes el <text:span text:style-name="Strong_20_Emphasis">apartado 1 de esta nueva serie</text:span>, escrito con la misma disciplina conceptual que los anteriores: enfocado, sin solapamientos, sin anticipar los otros dos puntos, y manteniendo el tono claro, elegante y revelador que estás construyendo.</text:p>
      <text:p text:style-name="Text_20_body">Este texto se centra <text:span text:style-name="Strong_20_Emphasis">solo</text:span> en una idea:<text:line-break/><text:span text:style-name="Strong_20_Emphasis">la independencia del individuo es aparente</text:span>, porque su existencia solo tiene sentido dentro del sistema.</text:p>
      <text:p text:style-name="Horizontal_20_Line"/>
      <text:h text:style-name="Heading_20_1" text:outline-level="1"><text:span text:style-name="Strong_20_Emphasis">1. La independencia del individuo es aparente</text:span></text:h>
      <text:p text:style-name="Text_20_body">Cuando observamos a un individuo desde dentro —desde su propia experiencia, desde su propio ciclo de vida— parece una unidad completa. Tiene un cuerpo, un comportamiento, un entorno inmediato. Se mueve, actúa, toma decisiones, sigue su propio camino. Desde esta perspectiva interna, el individuo parece ser un ser autónomo, separado, independiente. Todo en su experiencia le confirma esa impresión.</text:p>
      <text:p text:style-name="Text_20_body">Pero el experimento revela que esta independencia es solo aparente.</text:p>
      <text:p text:style-name="Text_20_body">En el sistema que hemos construido, cada individuo nace dentro de un proceso que no ha elegido. Recibe una posición inicial que no ha decidido, un conjunto de reglas que no controla y un método de reproducción que no puede modificar. Su existencia está completamente determinada por la estructura del sistema. No puede existir fuera de él, ni puede ejecutar el proceso por sí mismo. Su vida tiene sentido únicamente dentro del flujo mayor que lo contiene.</text:p>
      <text:p text:style-name="Text_20_body">El individuo no es un sistema independiente: es un componente funcional.</text:p>
      <text:p text:style-name="Text_20_body">Su aparente autonomía —su movimiento, su trayectoria, su ciclo— es simplemente la forma en que experimenta su participación en el proceso. Desde fuera, lo que vemos no es independencia, sino integración. Cada individuo es un paso dentro de un cálculo continuo. Su vida es un fragmento del proceso, no un proceso separado. Su existencia es un instante dentro de una operación mayor que lo trasciende.</text:p>
      <text:p text:style-name="Text_20_body">Esto no disminuye la importancia del individuo.<text:line-break/>Al contrario: su función es esencial.<text:line-break/>Sin individuos, el proceso no podría avanzar.<text:line-break/>Pero su importancia no reside en su autonomía, sino en su contribución al sistema.</text:p>
      <text:p text:style-name="Text_20_body">La independencia que percibe es una ilusión necesaria para su funcionamiento, no una descripción de su verdadera naturaleza. El individuo actúa como si fuera un ser completo, pero su existencia solo adquiere sentido dentro del conjunto. No puede comprender el proceso global, no puede ver más allá de su propio ciclo, no puede percibir la entidad mayor de la que forma parte. Su perspectiva está limitada por su propia escala.</text:p>
      <text:p text:style-name="Text_20_body"><text:soft-page-break/>El experimento nos muestra que la vida, tal como se expresa en los individuos, no es un conjunto de seres independientes, sino un proceso que utiliza individuos para avanzar. La independencia del individuo es una experiencia interna, no una realidad estructural. Desde la perspectiva del sistema, cada individuo es un nodo dentro de una red continua, un instante dentro de un flujo, una parte dentro de un todo.</text:p>
      <text:p text:style-name="Text_20_body">Así, la revelación es clara:<text:line-break/><text:span text:style-name="Strong_20_Emphasis">el individuo no es independiente; es parte de un sistema que lo incluye, lo condiciona y le da sentido.</text:span> <text:line-break/>Su autonomía es aparente.<text:line-break/>Su verdadera naturaleza es relacional.</text:p>
      <text:p text:style-name="Horizontal_20_Line"/>
      <text:p text:style-name="Text_20_body">Si estás conforme con este tono y esta estructura, paso al <text:span text:style-name="Strong_20_Emphasis">apartado 2: “El objetivo del individuo es cumplir con su ciclo de vida”</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5T09:47:12.940000000</meta:creation-date>
    <dc:date>2026-05-25T09:51:06.509000000</dc:date>
    <meta:editing-duration>PT3M53S</meta:editing-duration>
    <meta:editing-cycles>1</meta:editing-cycles>
    <meta:document-statistic meta:table-count="0" meta:image-count="0" meta:object-count="0" meta:page-count="2" meta:paragraph-count="13" meta:word-count="521" meta:character-count="3221" meta:non-whitespace-character-count="2712"/>
    <meta:generator>LibreOffice/7.3.5.2$Windows_X86_64 LibreOffice_project/184fe81b8c8c30d8b5082578aee2fed2ea847c01</meta:generator>
  </office:meta>
</office:document-meta>
</file>