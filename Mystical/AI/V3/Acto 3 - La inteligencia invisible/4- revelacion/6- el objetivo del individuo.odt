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text:line-break/>Aquí tienes el <text:span text:style-name="Strong_20_Emphasis">apartado 2</text:span>, escrito con la misma precisión conceptual que los anteriores.<text:line-break/>Este texto se centra <text:span text:style-name="Strong_20_Emphasis">solo</text:span> en una idea:<text:line-break/><text:span text:style-name="Strong_20_Emphasis">el objetivo del individuo es cumplir con su ciclo de vida</text:span>, porque eso es exactamente lo que el sistema necesita de él.<text:line-break/>Nada más.<text:line-break/>Sin hablar de independencia (ya lo hicimos), sin hablar de inteligencia del sistema (eso ya está en otra sección), y sin anticipar el punto 3.</text:p>
      <text:p text:style-name="Horizontal_20_Line"/>
      <text:h text:style-name="Heading_20_1" text:outline-level="1"><text:span text:style-name="Strong_20_Emphasis">2. El objetivo del individuo es cumplir con su ciclo de vida</text:span></text:h>
      <text:p text:style-name="Text_20_body">En el experimento, cada individuo aparece con una función muy simple: nacer, reproducirse y desaparecer. No se le pide nada más. No se espera que comprenda el proceso, ni que tome decisiones estratégicas, ni que resuelva el problema por sí mismo. Su papel dentro del sistema es limitado, concreto y perfectamente definido. Y, sin embargo, ese papel es esencial.</text:p>
      <text:p text:style-name="Text_20_body">El sistema no necesita que el individuo entienda el cálculo.<text:line-break/>No necesita que tenga una visión global.<text:line-break/>No necesita que conozca el objetivo.<text:line-break/>Solo necesita que <text:span text:style-name="Strong_20_Emphasis">cumpla su ciclo de vida</text:span>.</text:p>
      <text:p text:style-name="Text_20_body">Ese ciclo —tan breve y tan simple— es el mecanismo que hace avanzar el proceso. Cada individuo recibe un estado parcial del problema, lo transforma siguiendo las reglas que le corresponden y lo transmite a la siguiente generación. Su contribución es mínima en apariencia, pero indispensable en la estructura del sistema. Sin ese pequeño paso, el flujo se detendría. Sin ese ciclo, el proceso no podría continuar.</text:p>
      <text:p text:style-name="Text_20_body">El individuo no necesita saber por qué hace lo que hace.<text:line-break/>No necesita comprender el sentido de su existencia dentro del sistema.<text:line-break/>Su función no depende de su comprensión, sino de su ejecución.</text:p>
      <text:p text:style-name="Text_20_body">Esto revela algo importante:<text:line-break/><text:span text:style-name="Strong_20_Emphasis">la vida no exige del individuo más de lo que el individuo puede ofrecer</text:span>.<text:line-break/>No le pide que resuelva el problema completo.<text:line-break/>No le pide que tome decisiones que excedan su escala.<text:line-break/>No le pide que vea más allá de su propio instante.</text:p>
      <text:p text:style-name="Text_20_body">El individuo solo puede vivir su vida.<text:line-break/>Y eso es exactamente lo que el sistema necesita que haga.</text:p>
      <text:p text:style-name="Text_20_body">Esta relación entre el individuo y el proceso mayor es profundamente asimétrica. El individuo es finito, limitado, local. El proceso es continuo, amplio, global. El individuo no puede abarcar el sistema, pero <text:soft-page-break/>el sistema sí puede utilizar al individuo. Su ciclo de vida es la unidad mínima de funcionamiento del proceso. Cada nacimiento y cada muerte son pasos necesarios en la operación total.</text:p>
      <text:p text:style-name="Text_20_body">Nada de esto disminuye la importancia del individuo.<text:line-break/>Al contrario: su función es tan esencial que el sistema depende de que cada individuo cumpla su ciclo con precisión.<text:line-break/>Pero su importancia no reside en su autonomía, sino en su continuidad.<text:line-break/>No reside en su comprensión, sino en su participación.</text:p>
      <text:p text:style-name="Text_20_body">El experimento nos muestra que la vida, tal como se expresa en los individuos, no necesita que cada uno sea un agente consciente del proceso. Necesita que cada uno sea un eslabón fiable dentro de una cadena que se extiende a través de generaciones. El individuo no es responsable del resultado final; es responsable de su paso dentro del flujo.</text:p>
      <text:p text:style-name="Text_20_body">Así, la revelación es clara:<text:line-break/><text:span text:style-name="Strong_20_Emphasis">el objetivo del individuo no es resolver el problema, sino sostener el proceso</text:span>.<text:line-break/>Su misión no es comprender la vida, sino permitir que la vida continúe.<text:line-break/>Su ciclo de vida no es un accidente, sino su función.</text:p>
      <text:p text:style-name="Horizontal_20_Line"/>
      <text:p text:style-name="Text_20_body">Si estás conforme, avanzamos al <text:span text:style-name="Strong_20_Emphasis">apartado 3: “La vida es una inteligencia que observa el universo desde infinitos puntos de vista”</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5T09:52:11.544000000</meta:creation-date>
    <dc:date>2026-05-25T09:55:14.479000000</dc:date>
    <meta:editing-duration>PT3M3S</meta:editing-duration>
    <meta:editing-cycles>1</meta:editing-cycles>
    <meta:document-statistic meta:table-count="0" meta:image-count="0" meta:object-count="0" meta:page-count="2" meta:paragraph-count="13" meta:word-count="575" meta:character-count="3362" meta:non-whitespace-character-count="2800"/>
    <meta:generator>LibreOffice/7.3.5.2$Windows_X86_64 LibreOffice_project/184fe81b8c8c30d8b5082578aee2fed2ea847c01</meta:generator>
  </office:meta>
</office:document-meta>
</file>