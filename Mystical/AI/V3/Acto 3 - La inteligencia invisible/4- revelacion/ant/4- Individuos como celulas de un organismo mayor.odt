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Aquí tienes el desarrollo del <text:span text:style-name="Strong_20_Emphasis">punto cuatro: “Los individuos son las células de un organismo mayor”</text:span>, escrito con la profundidad conceptual que exige esta idea, y con el tono revelador que estás construyendo en el capítulo. Este punto es crucial porque transforma la noción de vida en una entidad real, un sujeto, un organismo planetario.</text:p>
      <text:p text:style-name="Horizontal_20_Line"/>
      <text:h text:style-name="Heading_20_1" text:outline-level="1"><text:span text:style-name="Strong_20_Emphasis">Los individuos son las células de un organismo mayor</text:span></text:h>
      <text:p text:style-name="Text_20_body">El experimento nos obliga a replantear la relación entre los individuos y la vida. Hasta ahora, solemos pensar que la vida está “dentro” de los individuos, como si cada organismo fuera una unidad completa, autónoma, autosuficiente. Pero el comportamiento del sistema lógico revela algo muy distinto: los individuos no son unidades independientes, sino componentes funcionales de un proceso mayor. Son células de un organismo más grande. Y ese organismo es la vida misma.</text:p>
      <text:p text:style-name="Text_20_body">En el experimento, cada individuo cumple una función extremadamente simple: nacer, reproducirse, morir. Ninguno de ellos contiene el proceso completo. Ninguno tiene la inteligencia que resuelve el problema. Ninguno posee la continuidad del cálculo. Cada uno es solo un instante, un paso, una expresión temporal del sistema. Pero cuando los observamos en conjunto, cuando dejamos de mirar a cada individuo y contemplamos el proceso completo, descubrimos que todos ellos forman un único organismo lógico: una entidad que se despliega a través de generaciones, que explora posibilidades, que avanza hacia una solución. El sistema es el organismo; los individuos son sus células.</text:p>
      <text:p text:style-name="Text_20_body">Esta idea tiene una consecuencia profunda: <text:span text:style-name="Strong_20_Emphasis">la vida no es la suma de los individuos, sino la entidad que los contiene a todos</text:span>. La vida no está “dentro” de los organismos; los organismos están dentro de la vida. Son partes de su cuerpo, expresiones de su funcionamiento, herramientas de su inteligencia. La vida es una estructura mayor que utiliza individuos para ejecutar su proceso, del mismo modo que un organismo utiliza células para ejecutar sus funciones.</text:p>
      <text:p text:style-name="Text_20_body">Cuando trasladamos esta idea a la vida real, la revelación es aún más sorprendente. Toda la materia orgánica que cubre la Tierra —plantas, animales, hongos, bacterias, seres humanos— no son entidades separadas, sino partes de un único proceso continuo que comenzó hace miles de millones de años. La vida en la Tierra no ha dejado de existir ni un solo instante desde su origen. Ha cambiado de forma, ha mutado, ha diversificado sus expresiones, pero nunca se ha detenido. Cada organismo es una manifestación temporal de un proceso que lo trasciende. Cada individuo es una célula de un organismo planetario.</text:p>
      <text:p text:style-name="Text_20_body">Este organismo mayor —la vida— posee características que ningún individuo tiene. Es inmortal: ha sobrevivido a catástrofes, extinciones masivas, cambios climáticos extremos. Es inteligente: ha producido estructuras complejas, soluciones adaptativas, diseños funcionales que ningún individuo podría concebir. Es autónomo: dirige su propio proceso evolutivo sin depender de la conciencia de sus componentes. Y, sobre todo, es uno: una única entidad que se expresa en millones de formas distintas.</text:p>
      <text:p text:style-name="Text_20_body"><text:soft-page-break/>La vida, entendida así, es una criatura que despertó hace miles de millones de años y que continúa existiendo a través de nosotros. No es una metáfora; es una descripción literal del proceso. La vida tiene un cuerpo —toda la materia orgánica del planeta— y tiene una actividad —el proceso evolutivo que se ejecuta generación tras generación—. Los individuos son células que nacen, cumplen su función y desaparecen, mientras el organismo mayor continúa avanzando.</text:p>
      <text:p text:style-name="Text_20_body">Esta perspectiva también explica por qué la inteligencia de la vida es tan difícil de percibir. Una célula no puede comprender al organismo del que forma parte. Su existencia es demasiado breve, su perspectiva demasiado limitada. Del mismo modo, un individuo no puede comprender la vida como entidad. Solo puede ver su propia existencia, su propio ciclo, su propio mundo. Pero desde fuera, desde la perspectiva del observador, es evidente que todos los individuos forman parte de un único cuerpo, un único proceso, una única inteligencia.</text:p>
      <text:p text:style-name="Text_20_body">Así, el experimento nos revela que la vida no es una colección de seres aislados, sino un organismo mayor que utiliza individuos como células. Una entidad inmortal que se expresa a través de cuerpos mortales. Una inteligencia que opera a través de seres que no la perciben. Una criatura planetaria que lleva miles de millones de años despierta.</text:p>
      <text:p text:style-name="Horizontal_20_Line"/>
      <text:p text:style-name="Text_20_body">¿Quieres que avancemos al punto cinc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5-17T14:14:28.748000000</meta:creation-date>
    <dc:date>2026-05-17T14:19:24.911000000</dc:date>
    <meta:editing-duration>PT4M56S</meta:editing-duration>
    <meta:editing-cycles>1</meta:editing-cycles>
    <meta:document-statistic meta:table-count="0" meta:image-count="0" meta:object-count="0" meta:page-count="2" meta:paragraph-count="11" meta:word-count="707" meta:character-count="4474" meta:non-whitespace-character-count="3779"/>
    <meta:generator>LibreOffice/7.3.5.2$Windows_X86_64 LibreOffice_project/184fe81b8c8c30d8b5082578aee2fed2ea847c01</meta:generator>
  </office:meta>
</office:document-meta>
</file>