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 Aquí tienes un <text:span text:style-name="Strong_20_Emphasis">resumen claro, estructurado y completo</text:span> de todos los temas que hemos comentado hasta ahora, tal como los hemos ido descubriendo a partir del experimento con la máquina lógica.</text:p>
      <text:p text:style-name="Text_20_body">Lo presento como un mapa conceptual que luego podremos convertir en un capítulo fluido.</text:p>
      <text:p text:style-name="Horizontal_20_Line"/>
      <text:h text:style-name="Heading_20_1" text:outline-level="1"><text:span text:style-name="Strong_20_Emphasis">Resumen de ideas extraídas del experimento</text:span></text:h>
      <text:h text:style-name="Heading_20_2" text:outline-level="2"><text:span text:style-name="Strong_20_Emphasis">1. La vida no son los individuos: hay algo más</text:span></text:h>
      <text:list xml:id="list2943169053" text:style-name="L1">
        <text:list-item>
          <text:p text:style-name="P2">A primera vista, la vida parece estar compuesta únicamente por individuos. </text:p>
        </text:list-item>
        <text:list-item>
          <text:p text:style-name="P2">El experimento muestra que los individuos <text:span text:style-name="Strong_20_Emphasis">no resuelven el problema</text:span>:<text:line-break/>no piensan, no planifican, no conocen el objetivo. </text:p>
        </text:list-item>
        <text:list-item>
          <text:p text:style-name="P2">La inteligencia que resuelve el problema <text:span text:style-name="Strong_20_Emphasis">no pertenece a ningún individuo</text:span>, sino al sistema completo. </text:p>
        </text:list-item>
        <text:list-item>
          <text:p text:style-name="P1">Por lo tanto, la vida debe entenderse como <text:span text:style-name="Strong_20_Emphasis">una entidad formada por todos los individuos</text:span>, del mismo modo que un organismo está formado por células. </text:p>
        </text:list-item>
      </text:list>
      <text:p text:style-name="Horizontal_20_Line"/>
      <text:h text:style-name="Heading_20_2" text:outline-level="2"><text:span text:style-name="Strong_20_Emphasis">2. El sistema es uno, aunque los individuos sean muchos</text:span></text:h>
      <text:list xml:id="list371404395" text:style-name="L2">
        <text:list-item>
          <text:p text:style-name="P4">Se crean miles de individuos, pero el proceso que avanza es único. </text:p>
        </text:list-item>
        <text:list-item>
          <text:p text:style-name="P4">La multiplicidad de individuos no implica multiplicidad de inteligencias. </text:p>
        </text:list-item>
        <text:list-item>
          <text:p text:style-name="P3">La vida real funciona igual:<text:line-break/>una sola historia evolutiva, un solo proceso, una sola entidad continua. </text:p>
        </text:list-item>
      </text:list>
      <text:p text:style-name="Horizontal_20_Line"/>
      <text:h text:style-name="Heading_20_2" text:outline-level="2"><text:span text:style-name="Strong_20_Emphasis">3. La inteligencia del sistema es invisible desde dentro</text:span></text:h>
      <text:list xml:id="list4180492302" text:style-name="L3">
        <text:list-item>
          <text:p text:style-name="P6">Si los individuos fueran conscientes, no podrían percibir el cálculo global. </text:p>
        </text:list-item>
        <text:list-item>
          <text:p text:style-name="P6">Verían solo su vida, su instante, su acción. </text:p>
        </text:list-item>
        <text:list-item>
          <text:p text:style-name="P6">El diseño parece venir de “alguna inteligencia”, pero no se encuentra en ningún individuo. </text:p>
        </text:list-item>
        <text:list-item>
          <text:p text:style-name="P5">El experimento muestra dónde está: <text:span text:style-name="Strong_20_Emphasis">en el sistema mismo</text:span>. </text:p>
        </text:list-item>
      </text:list>
      <text:p text:style-name="Horizontal_20_Line"/>
      <text:h text:style-name="Heading_20_2" text:outline-level="2"><text:span text:style-name="Strong_20_Emphasis">4. El sistema es inmortal; los individuos no</text:span></text:h>
      <text:list xml:id="list4170938997" text:style-name="L4">
        <text:list-item>
          <text:p text:style-name="P8">Cada individuo vive un instante y desaparece. </text:p>
        </text:list-item>
        <text:list-item>
          <text:p text:style-name="P8">Pero el cálculo continúa generación tras generación. </text:p>
        </text:list-item>
        <text:list-item>
          <text:p text:style-name="P7"><text:soft-page-break/>En la vida real ocurre lo mismo:<text:line-break/>los organismos mueren, la vida continúa sin interrupción desde hace miles de millones de años. </text:p>
        </text:list-item>
      </text:list>
      <text:p text:style-name="Horizontal_20_Line"/>
      <text:h text:style-name="Heading_20_2" text:outline-level="2"><text:span text:style-name="Strong_20_Emphasis">5. La actividad de la vida es lógica</text:span></text:h>
      <text:list xml:id="list4179093196" text:style-name="L5">
        <text:list-item>
          <text:p text:style-name="P10">El sistema procesa información, transforma datos, explora posibilidades, converge hacia soluciones. </text:p>
        </text:list-item>
        <text:list-item>
          <text:p text:style-name="P10">Esto es inteligencia, aunque no sea consciente. </text:p>
        </text:list-item>
        <text:list-item>
          <text:p text:style-name="P9">La vida es un proceso lógico que opera sobre el espacio de las posibilidades biológicas. </text:p>
        </text:list-item>
      </text:list>
      <text:p text:style-name="Horizontal_20_Line"/>
      <text:h text:style-name="Heading_20_2" text:outline-level="2"><text:span text:style-name="Strong_20_Emphasis">6. La independencia del individuo es solo aparente</text:span></text:h>
      <text:list xml:id="list868164088" text:style-name="L6">
        <text:list-item>
          <text:p text:style-name="P12">El individuo nace en un lugar que no eligió. </text:p>
        </text:list-item>
        <text:list-item>
          <text:p text:style-name="P12">Con un ADN que no eligió. </text:p>
        </text:list-item>
        <text:list-item>
          <text:p text:style-name="P12">Con un método que no eligió. </text:p>
        </text:list-item>
        <text:list-item>
          <text:p text:style-name="P12">En un sistema que no eligió. </text:p>
        </text:list-item>
        <text:list-item>
          <text:p text:style-name="P12">Su función está determinada: nacer, reproducirse, morir. </text:p>
        </text:list-item>
        <text:list-item>
          <text:p text:style-name="P11">La independencia es una ilusión interna, no una propiedad real. </text:p>
        </text:list-item>
      </text:list>
      <text:p text:style-name="Horizontal_20_Line"/>
      <text:h text:style-name="Heading_20_2" text:outline-level="2"><text:span text:style-name="Strong_20_Emphasis">7. El libre albedrío como sensación, no como capacidad</text:span></text:h>
      <text:list xml:id="list2363187555" text:style-name="L7">
        <text:list-item>
          <text:p text:style-name="P14">Si los individuos fueran conscientes, sentirían que “deciden”. </text:p>
        </text:list-item>
        <text:list-item>
          <text:p text:style-name="P14">Pero sus decisiones estarían completamente determinadas por la estructura del sistema. </text:p>
        </text:list-item>
        <text:list-item>
          <text:p text:style-name="P14">El libre albedrío sería una experiencia subjetiva, no un poder real. </text:p>
        </text:list-item>
        <text:list-item>
          <text:p text:style-name="P13">En la vida real ocurre lo mismo:<text:line-break/>sentimos libertad, pero actuamos dentro de límites biológicos y evolutivos que no controlamos. </text:p>
        </text:list-item>
      </text:list>
      <text:p text:style-name="Horizontal_20_Line"/>
      <text:h text:style-name="Heading_20_2" text:outline-level="2"><text:span text:style-name="Strong_20_Emphasis">8. El individuo existe solo dentro del sistema</text:span></text:h>
      <text:list xml:id="list2947331213" text:style-name="L8">
        <text:list-item>
          <text:p text:style-name="P16">Un individuo aislado no tiene función ni continuidad. </text:p>
        </text:list-item>
        <text:list-item>
          <text:p text:style-name="P16">Su sentido existe únicamente dentro del proceso mayor. </text:p>
        </text:list-item>
        <text:list-item>
          <text:p text:style-name="P15">El individuo es un nodo, no un origen. </text:p>
        </text:list-item>
      </text:list>
      <text:p text:style-name="Horizontal_20_Line"/>
      <text:h text:style-name="Heading_20_2" text:outline-level="2"><text:span text:style-name="Strong_20_Emphasis">9. La libertad como impulso interno</text:span></text:h>
      <text:list xml:id="list1691691696" text:style-name="L9">
        <text:list-item>
          <text:p text:style-name="P18">La sensación de libertad impulsa al individuo a actuar, pero no le permite alterar el sistema. </text:p>
        </text:list-item>
        <text:list-item>
          <text:p text:style-name="P18">Es un mecanismo adaptativo, no una capacidad metafísica. </text:p>
        </text:list-item>
        <text:list-item>
          <text:p text:style-name="P17"><text:soft-page-break/>La vida utiliza la experiencia subjetiva para dirigir la conducta. </text:p>
        </text:list-item>
      </text:list>
      <text:p text:style-name="Horizontal_20_Line"/>
      <text:h text:style-name="Heading_20_2" text:outline-level="2"><text:span text:style-name="Strong_20_Emphasis">10. La conciencia como actividad paralela sin impacto en el sistema</text:span></text:h>
      <text:list xml:id="list2135810408" text:style-name="L10">
        <text:list-item>
          <text:p text:style-name="P20">Si los individuos fueran conscientes, podrían crear arte, estudiar álgebra, imaginar mundos. </text:p>
        </text:list-item>
        <text:list-item>
          <text:p text:style-name="P20">Pero nada de eso alteraría el cálculo fundamental. </text:p>
        </text:list-item>
        <text:list-item>
          <text:p text:style-name="P20">La conciencia sería un fenómeno interno, no funcional para el sistema. </text:p>
        </text:list-item>
        <text:list-item>
          <text:p text:style-name="P19">Esto sugiere que la conciencia humana podría ser un subproducto, no el centro del proceso. </text:p>
        </text:list-item>
      </text:list>
      <text:p text:style-name="Horizontal_20_Line"/>
      <text:h text:style-name="Heading_20_2" text:outline-level="2"><text:span text:style-name="Strong_20_Emphasis">11. El individuo es un ejecutor, no un autor</text:span></text:h>
      <text:list xml:id="list2089371737" text:style-name="L11">
        <text:list-item>
          <text:p text:style-name="P22">El individuo ejecuta un paso del cálculo, pero no lo diseña. </text:p>
        </text:list-item>
        <text:list-item>
          <text:p text:style-name="P22">No elige el método, ni el objetivo, ni la estructura. </text:p>
        </text:list-item>
        <text:list-item>
          <text:p text:style-name="P21">En la vida real, los organismos ejecutan procesos evolutivos que no controlan. </text:p>
        </text:list-item>
      </text:list>
      <text:p text:style-name="Horizontal_20_Line"/>
      <text:h text:style-name="Heading_20_2" text:outline-level="2"><text:span text:style-name="Strong_20_Emphasis">12. La vida como procesador paralelo masivo</text:span></text:h>
      <text:list xml:id="list1411927889" text:style-name="L12">
        <text:list-item>
          <text:p text:style-name="P24">El sistema utiliza millones de individuos para explorar posibilidades. </text:p>
        </text:list-item>
        <text:list-item>
          <text:p text:style-name="P23">La vida real funciona igual:<text:line-break/>un supercomputador distribuido que explora el espacio de las formas posibles. </text:p>
        </text:list-item>
      </text:list>
      <text:p text:style-name="Horizontal_20_Line"/>
      <text:h text:style-name="Heading_20_2" text:outline-level="2"><text:span text:style-name="Strong_20_Emphasis">13. Conclusión general</text:span></text:h>
      <text:p text:style-name="Text_20_body">De todo esto se desprende que:</text:p>
      <text:list xml:id="list2260863234" text:style-name="L13">
        <text:list-item>
          <text:p text:style-name="P26"><text:span text:style-name="Strong_20_Emphasis">La vida es una entidad inmortal formada por todos los individuos de todas las especies.</text:span> </text:p>
        </text:list-item>
        <text:list-item>
          <text:p text:style-name="P26"><text:span text:style-name="Strong_20_Emphasis">La vida es una inteligencia lógica, no consciente, que opera a través de los individuos.</text:span> </text:p>
        </text:list-item>
        <text:list-item>
          <text:p text:style-name="P26"><text:span text:style-name="Strong_20_Emphasis">Los individuos son diferentes, finitos, y su única función esencial es cumplir con su ciclo de vida.</text:span> </text:p>
        </text:list-item>
        <text:list-item>
          <text:p text:style-name="P26"><text:span text:style-name="Strong_20_Emphasis">La independencia y el libre albedrío son experiencias internas, no capacidades reales.</text:span> </text:p>
        </text:list-item>
        <text:list-item>
          <text:p text:style-name="P25"><text:span text:style-name="Strong_20_Emphasis">La conciencia, si existe, es paralela al proceso y no lo dirige.</text:span> </text:p>
        </text:list-item>
      </text:list>
      <text:p text:style-name="Horizontal_20_Line"/>
      <text:p text:style-name="Text_20_body">Si quieres, puedo convertir este resumen en un capítulo completo, con tono narrativo, reflexivo y filosófico, perfectamente integrado en tu libr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17T10:21:30.789000000</meta:creation-date>
    <dc:date>2026-05-17T10:21:57.653000000</dc:date>
    <meta:editing-duration>PT27S</meta:editing-duration>
    <meta:editing-cycles>1</meta:editing-cycles>
    <meta:document-statistic meta:table-count="0" meta:image-count="0" meta:object-count="0" meta:page-count="3" meta:paragraph-count="65" meta:word-count="777" meta:character-count="4643" meta:non-whitespace-character-count="3931"/>
    <meta:generator>LibreOffice/7.3.5.2$Windows_X86_64 LibreOffice_project/184fe81b8c8c30d8b5082578aee2fed2ea847c01</meta:generator>
  </office:meta>
</office:document-meta>
</file>