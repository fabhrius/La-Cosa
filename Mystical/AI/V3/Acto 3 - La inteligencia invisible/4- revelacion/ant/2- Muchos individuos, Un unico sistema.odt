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ext_20_body">Perfecto, Fab. Aquí tienes el desarrollo del <text:span text:style-name="Strong_20_Emphasis">punto número dos: “Muchos individuos, un único sistema”</text:span>, en unas ~600 palabras, con el mismo tono reflexivo y revelador del punto anterior, y manteniendo coherencia conceptual con tu modelo.</text:p>
      <text:p text:style-name="Horizontal_20_Line"/>
      <text:h text:style-name="Heading_20_1" text:outline-level="1"><text:span text:style-name="Strong_20_Emphasis">Muchos individuos, un único sistema</text:span></text:h>
      <text:p text:style-name="Text_20_body">Cuando observamos el experimento desde fuera, lo primero que llama la atención es la enorme cantidad de individuos que aparecen y desaparecen a lo largo del proceso. Cada generación multiplica el número de seres que existen en un momento dado. El tablero se llena de vidas breves, de trayectorias efímeras, de instantes que se consumen en un solo acto: reproducirse y desaparecer. A simple vista, parece un caos de individuos, una multitud sin centro ni dirección. Pero cuando ampliamos la perspectiva, cuando dejamos de mirar a cada individuo y observamos el proceso completo, descubrimos algo sorprendente: <text:span text:style-name="Strong_20_Emphasis">no hay muchos sistemas, solo uno</text:span>.</text:p>
      <text:p text:style-name="Text_20_body">La multiplicidad de individuos no implica multiplicidad de inteligencias. Aunque existan miles de seres simultáneamente, todos ellos están ejecutando partes distintas de un único cálculo. No hay competencia entre ellos, ni coordinación consciente, ni comunicación. Y sin embargo, el proceso avanza de manera coherente, ordenada, inevitable. Cada individuo es un paso, una rama, una posibilidad explorada. Pero el sistema es uno: una única entidad que se despliega a través de todos ellos.</text:p>
      <text:p text:style-name="Text_20_body">Esta idea es profundamente contraintuitiva, porque estamos acostumbrados a pensar que cada individuo es un centro autónomo, un sujeto separado. Pero el experimento muestra que esta percepción es engañosa. Los individuos no son centros; son nodos. No son sistemas; son componentes. No son inteligencias independientes; son expresiones locales de una inteligencia mayor. La verdadera unidad no está en el individuo, sino en el proceso que los contiene.</text:p>
      <text:p text:style-name="Text_20_body">La clave está en comprender que el sistema no es la suma de los individuos, sino la estructura que los genera. Los individuos nacen, actúan y mueren, pero el sistema permanece. Cada individuo es reemplazado por otros, pero el proceso continúa sin interrupción. La identidad del sistema no depende de la identidad de sus componentes. Es una continuidad que atraviesa generaciones, que fluye a través de cuerpos distintos sin detenerse nunca. En este sentido, el sistema es inmortal, mientras que los individuos son efímeros.</text:p>
      <text:p text:style-name="Text_20_body">Esta relación entre lo múltiple y lo uno tiene un paralelo directo en la vida real. La biosfera está formada por millones de especies y trillones de organismos, pero todos ellos participan en un único proceso evolutivo. La vida en la Tierra no es una colección de seres aislados, sino una única entidad que se expresa en formas diversas. Cada organismo es una manifestación temporal de un proceso continuo que comenzó hace miles de millones de años y que no ha dejado de avanzar desde entonces. La vida no se fragmenta cuando aparecen nuevas especies, ni se detiene cuando desaparecen otras. La vida es una, aunque sus expresiones sean innumerables.</text:p>
      <text:p text:style-name="Text_20_body">El experimento también revela que esta unidad no es visible desde dentro. Si los individuos fueran conscientes, cada uno se percibiría como un ser separado, con su propia existencia, su propio destino, <text:soft-page-break/>su propio mundo. No podrían ver el sistema completo, porque su vida sería demasiado breve y su perspectiva demasiado limitada. Desde su punto de vista, solo existirían ellos mismos y, quizá, algunos otros individuos cercanos. Pero desde fuera, desde la perspectiva del observador, es evidente que todos forman parte de un único proceso.</text:p>
      <text:p text:style-name="Text_20_body">Esta diferencia entre la perspectiva interna y la externa es esencial para comprender la naturaleza de la vida. Desde dentro, cada organismo se siente único, independiente, completo. Desde fuera, cada organismo es una parte, un instante, una expresión del sistema mayor. La vida no está en el individuo; está en la continuidad que los une. La vida no es la historia de cada ser; es la historia del proceso que los atraviesa a todos.</text:p>
      <text:p text:style-name="Text_20_body">Así, el experimento nos revela una verdad profunda:<text:line-break/><text:span text:style-name="Strong_20_Emphasis">la vida es una unidad que se manifiesta a través de la multiplicidad.</text:span> <text:line-break/>Los individuos son muchos, pero el sistema es uno.<text:line-break/>Y es ese sistema —no los individuos— quien posee la inteligencia, la continuidad y el propósito del proceso vital.</text:p>
      <text:p text:style-name="Horizontal_20_Line"/>
      <text:p text:style-name="Text_20_body">¿Avanzamos al punto número tre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5-17T13:44:01.440000000</meta:creation-date>
    <dc:date>2026-05-17T13:46:54.608000000</dc:date>
    <meta:editing-duration>PT2M53S</meta:editing-duration>
    <meta:editing-cycles>1</meta:editing-cycles>
    <meta:document-statistic meta:table-count="0" meta:image-count="0" meta:object-count="0" meta:page-count="2" meta:paragraph-count="11" meta:word-count="689" meta:character-count="4312" meta:non-whitespace-character-count="3633"/>
    <meta:generator>LibreOffice/7.3.5.2$Windows_X86_64 LibreOffice_project/184fe81b8c8c30d8b5082578aee2fed2ea847c01</meta:generator>
  </office:meta>
</office:document-meta>
</file>