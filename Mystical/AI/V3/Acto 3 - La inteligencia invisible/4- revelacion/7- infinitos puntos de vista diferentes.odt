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text:line-break/>Aquí tienes el <text:span text:style-name="Strong_20_Emphasis">apartado 3</text:span>, escrito con la misma precisión conceptual que los anteriores, sin solaparse con ellos y sin introducir ideas que pertenezcan a otras secciones.<text:line-break/>Este texto desarrolla <text:span text:style-name="Strong_20_Emphasis">solo</text:span> una revelación:<text:line-break/><text:span text:style-name="Strong_20_Emphasis">la vida observa el universo desde infinitos puntos de vista a través de los individuos.</text:span></text:p>
      <text:p text:style-name="Horizontal_20_Line"/>
      <text:h text:style-name="Heading_20_1" text:outline-level="1"><text:span text:style-name="Strong_20_Emphasis">3. La vida observa el universo desde infinitos puntos de vista</text:span></text:h>
      <text:p text:style-name="Text_20_body">En el experimento, cada individuo ocupa un lugar distinto en el espacio y en el tiempo. Cada uno nace en una posición diferente, sigue un camino particular y experimenta un fragmento único del entorno. Ninguno ve lo mismo que los demás. Ninguno recorre exactamente la misma trayectoria. Cada individuo explora una región distinta del espacio de posibilidades.</text:p>
      <text:p text:style-name="Text_20_body">Desde la perspectiva del individuo, esto es simplemente su vida: su camino, su experiencia, su entorno inmediato. Pero desde la perspectiva del sistema, esta diversidad de trayectorias no es un accidente: es una característica esencial del proceso. Cada individuo aporta una exploración distinta del problema. Cada uno recorre un camino que otros no recorrerán. Cada uno aporta información que el sistema no podría obtener de otra manera.</text:p>
      <text:p text:style-name="Text_20_body">Lo que el experimento revela es que la vida, como entidad, <text:span text:style-name="Strong_20_Emphasis">observa el universo a través de todos los individuos que genera</text:span>. No tiene un único punto de vista centralizado. No tiene una perspectiva única. Su visión del entorno es distribuida, múltiple, simultánea. Cada individuo es un punto de observación. Cada trayectoria es una exploración. Cada ciclo de vida es una ventana abierta sobre una parte del mundo.</text:p>
      <text:p text:style-name="Text_20_body">La vida no “ve” en el sentido psicológico del término. No necesita conciencia para percibir. Su percepción es estructural: se manifiesta en la información que cada individuo aporta al proceso. Cada movimiento, cada interacción, cada variación en el entorno se incorpora al flujo del sistema a través de los individuos que lo experimentan. La vida no observa desde un centro, sino desde una red de experiencias distribuidas.</text:p>
      <text:p text:style-name="Text_20_body">Esta multiplicidad de puntos de vista es una de las razones por las que la vida necesita tantos individuos. No es redundancia; es exploración. No es exceso; es alcance. Cada individuo amplía el campo de percepción del sistema. Cada uno recorre un camino que podría contener la clave para avanzar. Cada uno aporta una pieza del mapa que la entidad está construyendo.</text:p>
      <text:p text:style-name="Text_20_body">El individuo no es consciente de esta función.<text:line-break/>No sabe que su trayectoria forma parte de una exploración mayor.<text:line-break/>No percibe que su experiencia es una contribución al proceso.<text:line-break/>Pero el sistema sí la utiliza.<text:line-break/>La información que el individuo genera —su posición, su movimiento, su interacción con el entorno— se integra en el flujo y modifica el estado del proceso.</text:p>
      <text:p text:style-name="Text_20_body"><text:soft-page-break/>Así, la vida se convierte en una inteligencia que observa el universo desde infinitos puntos de vista simultáneos. No porque cada individuo sea inteligente por sí mismo, sino porque cada uno aporta una perspectiva única que el sistema incorpora. La inteligencia de la vida no reside en un centro, sino en la suma estructurada de todas estas exploraciones.</text:p>
      <text:p text:style-name="Text_20_body">Esta revelación transforma nuestra comprensión del individuo.<text:line-break/>Su vida no es solo suya: es una parte de la percepción global de la entidad.<text:line-break/>Su trayectoria no es un camino aislado: es una exploración que la vida utiliza.<text:line-break/>Su experiencia no es un accidente: es un punto de vista que contribuye al proceso.</text:p>
      <text:p text:style-name="Text_20_body">La vida mira el mundo a través de todos los seres que genera.<text:line-break/>Cada individuo es un ojo.<text:line-break/>Cada trayectoria es una mirada.<text:line-break/>Cada ciclo de vida es una forma distinta de explorar el universo.</text:p>
      <text:p text:style-name="Horizontal_20_Line"/>
      <text:p text:style-name="Text_20_body">Si quieres, ahora puedo redactar una <text:span text:style-name="Strong_20_Emphasis">sección de cierre</text:span> que conecte estas tres revelaciones sobre el individuo, o podemos avanzar al siguiente bloque del capítu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25T09:56:43.799000000</meta:creation-date>
    <dc:date>2026-05-25T10:00:42.924000000</dc:date>
    <meta:editing-duration>PT3M59S</meta:editing-duration>
    <meta:editing-cycles>1</meta:editing-cycles>
    <meta:document-statistic meta:table-count="0" meta:image-count="0" meta:object-count="0" meta:page-count="2" meta:paragraph-count="12" meta:word-count="613" meta:character-count="3737" meta:non-whitespace-character-count="3136"/>
    <meta:generator>LibreOffice/7.3.5.2$Windows_X86_64 LibreOffice_project/184fe81b8c8c30d8b5082578aee2fed2ea847c01</meta:generator>
  </office:meta>
</office:document-meta>
</file>