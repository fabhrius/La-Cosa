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Fab. Aquí tienes el <text:span text:style-name="Strong_20_Emphasis">apartado 1 completamente reescrito</text:span>, limpio, enfocado y sin anticipar ninguna de las otras revelaciones.<text:line-break/>Este texto se limita estrictamente a una sola idea: <text:span text:style-name="Strong_20_Emphasis">la vida no puede ser solo individuos</text:span>, porque los individuos no contienen la inteligencia que aparece en el experimento.<text:line-break/>Nada más.<text:line-break/>Así dejamos espacio para que los otros apartados brillen por separado.</text:p>
      <text:p text:style-name="Horizontal_20_Line"/>
      <text:h text:style-name="Heading_20_1" text:outline-level="1"><text:span text:style-name="Strong_20_Emphasis">1. La vida no es solo un conjunto de individuos: hay algo más</text:span></text:h>
      <text:p text:style-name="Text_20_body">Cuando observamos la vida desde nuestra experiencia cotidiana, lo que vemos son individuos. Cada organismo parece ser una unidad completa: nace, actúa, se relaciona, se reproduce, muere. Todo parece ocurrir dentro de los límites de su cuerpo. Esta impresión es tan fuerte que solemos identificar la vida con los individuos mismos, como si la vida fuera simplemente la suma de todos ellos.</text:p>
      <text:p text:style-name="Text_20_body">Pero el experimento que hemos realizado muestra que esta visión es insuficiente. En él, cada individuo cumple un ciclo de vida extremadamente simple: nacer, reproducirse, morir. Ninguno de ellos conoce el problema que el sistema está resolviendo. Ninguno sabe que existe un objetivo. Ninguno tiene acceso al proceso global. Cada uno vive su existencia de manera local, limitada, sin comprender qué ocurre más allá de su propio instante.</text:p>
      <text:p text:style-name="Text_20_body">Y sin embargo, el problema se resuelve.</text:p>
      <text:p text:style-name="Text_20_body">Esto es lo sorprendente: <text:span text:style-name="Strong_20_Emphasis">la solución aparece sin que ningún individuo la haya encontrado</text:span>. Ninguno de ellos posee la información completa. Ninguno tiene la perspectiva necesaria. Ninguno puede, por sí solo, avanzar más de un paso. Cada individuo aporta un fragmento minúsculo del proceso, pero ninguno contiene el proceso entero.</text:p>
      <text:p text:style-name="Text_20_body">Esto nos obliga a reconocer algo fundamental:<text:line-break/><text:span text:style-name="Strong_20_Emphasis">la inteligencia que observamos no pertenece a los individuos</text:span>.</text:p>
      <text:p text:style-name="Text_20_body">Los individuos participan, sí. Son necesarios, sí. Pero no son el sujeto del proceso. Ninguno de ellos puede reclamar la autoría de la solución. Ninguno puede decir “yo resolví el problema”. Ninguno tiene la capacidad de comprender lo que está ocurriendo más allá de su propio ciclo de vida.</text:p>
      <text:p text:style-name="Text_20_body">Por lo tanto, la vida no puede reducirse a los individuos que la componen.<text:line-break/>Hay algo más.</text:p>
      <text:p text:style-name="Text_20_body">Ese “algo más” no es una metáfora ni una interpretación poética. Es una conclusión lógica que surge directamente del funcionamiento del sistema. Si los individuos no contienen la inteligencia que aparece, entonces la vida no puede ser entendida como una colección de seres aislados. Los individuos son parte del fenómeno, pero no lo explican por completo.</text:p>
      <text:p text:style-name="Text_20_body"><text:soft-page-break/>El experimento nos muestra que la vida, tal como la vemos en los organismos, es solo una expresión parcial de un proceso mayor. Los individuos son necesarios para que el proceso avance, pero no lo definen. Son momentos del flujo, no el flujo mismo. Son pasos del cálculo, no el cálculo completo.</text:p>
      <text:p text:style-name="Text_20_body">Nada de esto niega la importancia de los individuos. Su existencia es esencial para que el proceso pueda ejecutarse. Sin individuos no habría movimiento, ni transformación, ni avance. Pero su importancia no reside en lo que son por separado, sino en lo que permiten cuando se los observa en conjunto.</text:p>
      <text:p text:style-name="Text_20_body">El experimento revela, con una claridad imposible de ignorar, que la vida no puede ser entendida únicamente desde la perspectiva del individuo. Los individuos son parte del fenómeno, pero no lo agotan. Hay algo más allá de ellos, algo que los incluye, los utiliza y los trasciende.</text:p>
      <text:p text:style-name="Text_20_body">Ese “algo más” es lo que comenzamos a explorar a partir de aquí.</text:p>
      <text:p text:style-name="Horizontal_20_Line"/>
      <text:p text:style-name="Text_20_body">Si estás conforme con este tono y esta estructura, paso al <text:span text:style-name="Strong_20_Emphasis">apartado 2: “La vida es una entidad”</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5-24T14:58:53.453000000</meta:creation-date>
    <dc:date>2026-05-24T15:00:46.716000000</dc:date>
    <meta:editing-duration>PT1M53S</meta:editing-duration>
    <meta:editing-cycles>1</meta:editing-cycles>
    <meta:document-statistic meta:table-count="0" meta:image-count="0" meta:object-count="0" meta:page-count="2" meta:paragraph-count="15" meta:word-count="578" meta:character-count="3515" meta:non-whitespace-character-count="2952"/>
    <meta:generator>LibreOffice/7.3.5.2$Windows_X86_64 LibreOffice_project/184fe81b8c8c30d8b5082578aee2fed2ea847c01</meta:generator>
  </office:meta>
</office:document-meta>
</file>