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5T10:50:34.806000000</meta:creation-date>
    <meta:generator>LibreOffice/7.3.5.2$Windows_X86_64 LibreOffice_project/184fe81b8c8c30d8b5082578aee2fed2ea847c01</meta:generator>
    <dc:date>2026-04-25T17:28:29.171000000</dc:date>
    <meta:editing-duration>PT1M5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