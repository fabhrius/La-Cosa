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text-properties fo:color="#c9211e" loext:opacity="100%" officeooo:rsid="000ff34c" officeooo:paragraph-rsid="000ff34c"/>
    </style:style>
    <style:style style:name="P10" style:family="paragraph" style:parent-style-name="Text_20_body">
      <style:text-properties fo:color="#c9211e" loext:opacity="100%"/>
    </style:style>
    <style:style style:name="P11" style:family="paragraph" style:parent-style-name="Text_20_body">
      <style:text-properties fo:color="#c9211e" loext:opacity="100%" officeooo:rsid="00113729" officeooo:paragraph-rsid="0011372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Horizontal_20_Line"/>
      <text:h text:style-name="Heading_20_1" text:outline-level="1"><text:span text:style-name="Strong_20_Emphasis">El ciclo de vida: el patrón universal de la existencia</text:span></text:h>
      <text:h text:style-name="Heading_20_2" text:outline-level="2"><text:span text:style-name="Strong_20_Emphasis">1. Qué es el ciclo de vida</text:span></text:h>
      <text:p text:style-name="Text_20_body">En la naturaleza observamos un patrón que se repite en todos los seres vivientes.<text:line-break/>Un patrón simple, reconocible, constante: <text:span text:style-name="Strong_20_Emphasis">nacer, reproducirse y morir</text:span>.<text:line-break/>A este patrón lo llamamos <text:span text:style-name="Emphasis">ciclo de vida</text:span>.</text:p>
      <text:p text:style-name="Text_20_body">No es un objeto.<text:line-break/>No es una sustancia.<text:line-break/>No es algo que podamos aislar en un laboratorio.<text:line-break/>Es un <text:span text:style-name="Strong_20_Emphasis">patrón de actividad</text:span>, una secuencia de estados que todos los organismos atraviesan.<text:line-break/>Es un comportamiento universal de la vida, tan característico como el ADN o la reproducción.</text:p>
      <text:p text:style-name="Text_20_body">El ciclo de vida es exclusivo de los seres vivos.<text:line-break/>No existe nada parecido en la materia inerte.<text:line-break/>Las rocas no nacen.<text:line-break/>Los ríos no se reproducen.<text:line-break/>Las montañas no mueren.<text:line-break/>Solo los seres vivientes muestran este patrón.</text:p>
      <text:p text:style-name="Text_20_body">Y al mismo tiempo, <text:span text:style-name="Strong_20_Emphasis">todos los seres vivientes</text:span>, sin excepción, lo cumplen.<text:line-break/>No hay organismos sin ciclo de vida.<text:line-break/>No hay vida sin esta secuencia.</text:p>
      <text:p text:style-name="Horizontal_20_Line"/>
      <text:h text:style-name="Heading_20_2" text:outline-level="2"><text:span text:style-name="Strong_20_Emphasis">2. Todos los seres vivientes cumplen con un ciclo de vida</text:span></text:h>
      <text:p text:style-name="Text_20_body">Si observamos un bosque, un arrecife, un charco de agua o un cuerpo humano, veremos individuos en distintas etapas de su ciclo.<text:line-break/>Algunos acaban de aparecer.<text:line-break/>Otros están creciendo.<text:line-break/>Otros se están reproduciendo.<text:line-break/>Otros están llegando al final de su existencia.</text:p>
      <text:p text:style-name="Text_20_body">La diversidad de formas no altera el patrón.<text:line-break/>Una bacteria, un árbol, un insecto, un hongo, un pez, un ser humano: todos cumplen con un ciclo de vida.</text:p>
      <text:p text:style-name="Text_20_body"><text:soft-page-break/>Este patrón no es una interpretación humana.<text:line-break/>Es un hecho observable.<text:line-break/>Es la forma en que la vida se despliega en el tiempo.</text:p>
      <text:p text:style-name="Horizontal_20_Line"/>
      <text:h text:style-name="Heading_20_2" text:outline-level="2"><text:span text:style-name="Strong_20_Emphasis">3. El ciclo de vida como función</text:span></text:h>
      <text:p text:style-name="Text_20_body">Hasta ahora hemos hablado del ADN como una molécula, un objeto físico.<text:line-break/>Y hemos hablado de la reproducción como algo que el ADN hace.<text:line-break/>La reproducción no es un objeto: es una <text:span text:style-name="Strong_20_Emphasis">función</text:span>.<text:line-break/>Una actividad.<text:line-break/>Un proceso.<text:line-break/>Una idea que se manifiesta en la materia, pero que no es materia.</text:p>
      <text:p text:style-name="Text_20_body">El ciclo de vida pertenece a la misma categoría.<text:line-break/>No es un objeto.<text:line-break/>No es una estructura.<text:line-break/>No es una parte del cuerpo.<text:line-break/>Es una <text:span text:style-name="Strong_20_Emphasis">función</text:span> que realiza el ADN.</text:p>
      <text:p text:style-name="Text_20_body">El ADN nace, se reproduce y se degrada.<text:line-break/>Y esta secuencia se refleja en todos los seres vivientes.<text:line-break/>El ciclo de vida es, por lo tanto, una función del ADN.<text:line-break/>Una consecuencia inevitable de su naturaleza física.</text:p>
      <text:p text:style-name="Text_20_body">El ADN es materia.<text:line-break/>La reproducción es una función.<text:line-break/>El ciclo de vida es otra función.<text:line-break/>Ambas son elementos lógicos: conceptos, ideas, actividades que la materia ejecuta.</text:p>
      <text:p text:style-name="Horizontal_20_Line"/>
      <text:h text:style-name="Heading_20_2" text:outline-level="2"><text:span text:style-name="Strong_20_Emphasis">4. Está implícito en la naturaleza del ADN</text:span></text:h>
      <text:p text:style-name="Text_20_body">El ciclo de vida no fue diseñado.<text:line-break/>No fue planificado.<text:line-break/>No fue creado con intención.<text:line-break/>Es una consecuencia natural de las propiedades físicas del ADN.</text:p>
      <text:p text:style-name="Text_20_body">El ADN se reproduce porque su estructura lo permite.<text:line-break/>Sus dos hebras complementarias pueden separarse y servir como molde para formar nuevas hebras.<text:line-break/>Este proceso ocurre de manera natural, sin necesidad de propósito.</text:p>
      <text:p text:style-name="Text_20_body"/>
      <text:p text:style-name="Horizontal_20_Line"/>
      <text:p text:style-name="Text_20_body"><text:soft-page-break/></text:p>
      <text:p text:style-name="P9">(reformulacion del parrafo anterior)</text:p>
      <text:p text:style-name="P10">*El ciclo de vida no fue diseñado por una mente ni planificado desde fuera. Surge como consecuencia natural de las propiedades físicas del ADN: sus hebras complementarias pueden separarse y servir de molde para nuevas copias, y este proceso ocurre sin necesidad de propósito consciente.</text:p>
      <text:p text:style-name="P10">Sin embargo, el ADN mismo no es un accidente. Es el resultado de un proceso inteligente previo, en el que redes autocatalíticas primitivas exploraron configuraciones hasta converger en una estructura capaz de perpetuar su dinámica.</text:p>
      <text:p text:style-name="P10">Así, la vida no es casual: es la forma estable que adopta un proceso inteligente cuando encuentra una solución para persistir.*</text:p>
      <text:p text:style-name="Horizontal_20_Line"/>
      <text:p text:style-name="P10"><text:span text:style-name="Emphasis">La reproducción no fue diseñada, pero tampoco es accidental.</text:span> <text:span text:style-name="Emphasis">Es la propiedad natural de una estructura que emergió porque permitía al proceso continuar.</text:span> <text:span text:style-name="Emphasis">El ADN no se reproduce por intención, sino por química;</text:span> <text:span text:style-name="Emphasis">pero la química del ADN no habría aparecido sin la presión de un proceso inteligente que buscaba continuidad.</text:span> <text:span text:style-name="Emphasis">La reproducción es, por tanto, la consecuencia inevitable de una solución no casual.</text:span> </text:p>
      <text:p text:style-name="P11">----------------</text:p>
      <text:p text:style-name="P11"/>
      <text:p text:style-name="P11"><text:span text:style-name="Strong_20_Emphasis">La reproducción del ADN no es casual, porque la estructura del ADN no es casual.</text:span> <text:span text:style-name="Strong_20_Emphasis">Pero la reproducción tampoco es intencional, porque una vez existe el ADN, se replica automáticamente por sus propiedades físico‑químicas.</text:span> <text:span text:style-name="Strong_20_Emphasis">La reproducción es una consecuencia necesaria de la solución que el proceso inteligente encontró para persistir.</text:span> </text:p>
      <text:p text:style-name="Text_20_body"/>
      <text:p text:style-name="Horizontal_20_Line"/>
      <text:p text:style-name="Text_20_body">Pero el ADN también se degrada.<text:line-break/>No es eterno.<text:line-break/>Está formado por átomos unidos por enlaces químicos que pueden romperse.<text:line-break/>La radiación, la temperatura, el tiempo, los procesos celulares: todo contribuye a su deterioro.</text:p>
      <text:p text:style-name="Text_20_body">Por lo tanto, el ADN tiene:</text:p>
      <text:list xml:id="list4258410136" text:style-name="L1">
        <text:list-item>
          <text:p text:style-name="P2">un momento de creación, </text:p>
        </text:list-item>
        <text:list-item>
          <text:p text:style-name="P2">un momento de reproducción, </text:p>
        </text:list-item>
        <text:list-item>
          <text:p text:style-name="P1">un momento de degradación. </text:p>
        </text:list-item>
      </text:list>
      <text:p text:style-name="Text_20_body">Esta secuencia —creación, reproducción, destrucción— está inscrita en la naturaleza de la molécula.<text:line-break/>No es una decisión.<text:line-break/>No es una estrategia.<text:line-break/>Es una consecuencia física.</text:p>
      <text:p text:style-name="Text_20_body"><text:soft-page-break/>Y sin embargo, este ciclo tiene efectos profundos sobre el sistema de la vida.</text:p>
      <text:p text:style-name="Horizontal_20_Line"/>
      <text:h text:style-name="Heading_20_2" text:outline-level="2"><text:span text:style-name="Strong_20_Emphasis">5. Impacto del ciclo de vida en el resultado del sistema</text:span></text:h>
      <text:p text:style-name="Text_20_body">La reproducción modifica la información contenida en el ADN.<text:line-break/>Cada copia introduce pequeñas variaciones.<text:line-break/>Estas variaciones son la materia prima del aprendizaje y de la evolución.</text:p>
      <text:p text:style-name="Text_20_body">Pero la reproducción, por sí sola, no basta.<text:line-break/>Si solo existiera reproducción, el sistema se estancaría.<text:line-break/>La reproducción sin límite produciría acumulación, saturación, asfixia.<text:line-break/>No habría espacio para la variación significativa.<text:line-break/>No habría renovación.<text:line-break/>No habría avance.</text:p>
      <text:p text:style-name="Text_20_body">El ciclo de vida introduce los límites necesarios para que el sistema funcione.<text:line-break/>La muerte del individuo no es un acto funcional, pero sí es un límite físico que permite que el proceso continúe en otros individuos.</text:p>
      <text:p text:style-name="Text_20_body">El ciclo de vida impone un <text:span text:style-name="Strong_20_Emphasis">bucle de ejecución</text:span>:</text:p>
      <text:list xml:id="list3936188387" text:style-name="L2">
        <text:list-item>
          <text:p text:style-name="P4">cada individuo nace, </text:p>
        </text:list-item>
        <text:list-item>
          <text:p text:style-name="P4">ejecuta su función, </text:p>
        </text:list-item>
        <text:list-item>
          <text:p text:style-name="P4">transmite su información, </text:p>
        </text:list-item>
        <text:list-item>
          <text:p text:style-name="P3">y desaparece. </text:p>
        </text:list-item>
      </text:list>
      <text:p text:style-name="Text_20_body">Este bucle tiene una dirección única: hacia adelante.<text:line-break/>No retrocede.<text:line-break/>No se detiene.<text:line-break/>No se repite en el mismo individuo.<text:line-break/>Cada ciclo es nuevo, pero todos siguen la misma estructura.</text:p>
      <text:p text:style-name="Text_20_body">El ciclo de vida convierte la reproducción en un proceso dinámico.<text:line-break/>Evita el estancamiento.<text:line-break/>Permite el avance.<text:line-break/>Hace posible el aprendizaje acumulado.</text:p>
      <text:p text:style-name="Text_20_body">Sin ciclo de vida, la reproducción sería un mecanismo sin dirección.<text:line-break/>Con ciclo de vida, la reproducción se convierte en un motor.</text:p>
      <text:p text:style-name="Horizontal_20_Line"/>
      <text:h text:style-name="Heading_20_2" text:outline-level="2"><text:soft-page-break/><text:span text:style-name="Strong_20_Emphasis">6. El ciclo de vida como estructura universal</text:span></text:h>
      <text:p text:style-name="Text_20_body">El ciclo de vida no es una característica opcional.<text:line-break/>No es un rasgo particular de algunas especies.<text:line-break/>Es una estructura universal de la vida.</text:p>
      <text:p text:style-name="Text_20_body">Todos los seres vivientes:</text:p>
      <text:list xml:id="list1603554989" text:style-name="L3">
        <text:list-item>
          <text:p text:style-name="P6">aparecen, </text:p>
        </text:list-item>
        <text:list-item>
          <text:p text:style-name="P6">se desarrollan, </text:p>
        </text:list-item>
        <text:list-item>
          <text:p text:style-name="P6">se reproducen, </text:p>
        </text:list-item>
        <text:list-item>
          <text:p text:style-name="P5">desaparecen. </text:p>
        </text:list-item>
      </text:list>
      <text:p text:style-name="Text_20_body">La duración del ciclo puede variar enormemente:<text:line-break/>minutos en una bacteria,<text:line-break/>décadas en un árbol,<text:line-break/>siglos en algunos organismos.<text:line-break/>Pero la estructura es la misma.</text:p>
      <text:p text:style-name="Text_20_body">Esta universalidad es una pista importante.<text:line-break/>Sugiere que el ciclo de vida no es un fenómeno superficial, sino un componente esencial del sistema de la vida.</text:p>
      <text:p text:style-name="Horizontal_20_Line"/>
      <text:h text:style-name="Heading_20_2" text:outline-level="2"><text:span text:style-name="Strong_20_Emphasis">7. El ciclo de vida como puente entre individuos</text:span></text:h>
      <text:p text:style-name="Text_20_body">Cada individuo vive un ciclo completo.<text:line-break/>Pero el ciclo no pertenece al individuo: pertenece a la vida.</text:p>
      <text:p text:style-name="Text_20_body">El individuo es temporal.<text:line-break/>El ciclo es permanente.<text:line-break/>El individuo es una ejecución.<text:line-break/>El ciclo es la estructura que se ejecuta.</text:p>
      <text:p text:style-name="Text_20_body">La vida no se conserva en los cuerpos, sino en los ciclos.<text:line-break/>Cada ciclo transmite información a la siguiente generación.<text:line-break/>Cada ciclo es un eslabón en una cadena que no se ha roto desde el origen de la vida.</text:p>
      <text:p text:style-name="Text_20_body">El ciclo de vida es el mecanismo que conecta individuos entre sí.<text:line-break/>Es la forma en que la vida se extiende en el tiempo.</text:p>
      <text:p text:style-name="Horizontal_20_Line"/>
      <text:h text:style-name="Heading_20_2" text:outline-level="2"><text:span text:style-name="Strong_20_Emphasis">8. El ciclo de vida como preparación para el modelo lógico</text:span></text:h>
      <text:p text:style-name="Text_20_body">Aunque todavía no lo mostraremos, el ciclo de vida es un elemento clave del modelo lógico que presentaremos más adelante.</text:p>
      <text:p text:style-name="Text_20_body"><text:soft-page-break/>El ciclo de vida:</text:p>
      <text:list xml:id="list484971563" text:style-name="L4">
        <text:list-item>
          <text:p text:style-name="P8">define un bucle, </text:p>
        </text:list-item>
        <text:list-item>
          <text:p text:style-name="P8">impone límites, </text:p>
        </text:list-item>
        <text:list-item>
          <text:p text:style-name="P8">crea dirección, </text:p>
        </text:list-item>
        <text:list-item>
          <text:p text:style-name="P8">permite la acumulación de información, </text:p>
        </text:list-item>
        <text:list-item>
          <text:p text:style-name="P8">organiza el flujo del sistema, </text:p>
        </text:list-item>
        <text:list-item>
          <text:p text:style-name="P7">y convierte la reproducción en un proceso dinámico. </text:p>
        </text:list-item>
      </text:list>
      <text:p text:style-name="Text_20_body">Desde el punto de vista lógico, el ciclo de vida es una función que estructura el comportamiento del ADN.<text:line-break/>Es un componente esencial del sistema inteligente que la vida constituye.</text:p>
      <text:p text:style-name="Text_20_body">Pero por ahora, basta con observarlo desde la biología:<text:line-break/>un patrón universal, inevitable, exclusivo de los seres vivos, que organiza la existencia de cada individuo y sostiene la continuidad del proceso vital.</text:p>
      <text:p text:style-name="Horizontal_20_Line"/>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1T13:30:07.295000000</meta:creation-date>
    <dc:date>2026-04-26T18:05:09.202000000</dc:date>
    <meta:editing-duration>PT53M13S</meta:editing-duration>
    <meta:editing-cycles>3</meta:editing-cycles>
    <meta:generator>LibreOffice/7.3.5.2$Windows_X86_64 LibreOffice_project/184fe81b8c8c30d8b5082578aee2fed2ea847c01</meta:generator>
    <meta:document-statistic meta:table-count="0" meta:image-count="0" meta:object-count="0" meta:page-count="6" meta:paragraph-count="69" meta:word-count="1335" meta:character-count="7939" meta:non-whitespace-character-count="6671"/>
  </office:meta>
</office:document-meta>
</file>