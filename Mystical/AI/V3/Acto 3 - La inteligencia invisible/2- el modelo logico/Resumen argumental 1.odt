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4c4d"/>
    </style:style>
    <style:style style:name="P2" style:family="paragraph" style:parent-style-name="Standard">
      <style:text-properties officeooo:rsid="00194c4d" officeooo:paragraph-rsid="001ae35f"/>
    </style:style>
    <style:style style:name="P3" style:family="paragraph" style:parent-style-name="Standard">
      <style:text-properties officeooo:rsid="001ae35f" officeooo:paragraph-rsid="001ae35f"/>
    </style:style>
    <style:style style:name="P4" style:family="paragraph" style:parent-style-name="Standard">
      <style:text-properties officeooo:rsid="001ae35f" officeooo:paragraph-rsid="001ae3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2-</text:p>
      <text:p text:style-name="P1">a- El modelo Logico Matematico. Introduccion</text:p>
      <text:p text:style-name="P1"/>
      <text:p text:style-name="P3">que es el modelo logico?</text:p>
      <text:p text:style-name="P3"/>
      <text:p text:style-name="P3">cual es la diferencia con el modelo biologico?</text:p>
      <text:p text:style-name="P2"><text:s/></text:p>
      <text:p text:style-name="P1"/>
      <text:p text:style-name="P1">b- los elementos principales de la vida en este modelo.</text:p>
      <text:p text:style-name="P1"/>
      <text:p text:style-name="P3">ADN - reproduccion - ciclo de vida - individuo</text:p>
      <text:p text:style-name="P3"/>
      <text:p text:style-name="P1">c- lo que podemos hacer con estos elementos.</text:p>
      <text:p text:style-name="P1"/>
      <text:p text:style-name="P3">los elementos del <text:s/>modelo logico forman </text:p>
      <text:p text:style-name="P3">una maquina que ejecuta un proceso de calculo.</text:p>
      <text:p text:style-name="P3">un sistema inteligente de gran potencia.</text:p>
      <text:p text:style-name="P3"/>
      <text:p text:style-name="P3"/>
      <text:p text:style-name="P1">d- la inteligencia.</text:p>
      <text:p text:style-name="P1"/>
      <text:p text:style-name="P1"/>
      <text:p text:style-name="P1">e- el proceso de calculo.</text:p>
      <text:p text:style-name="P1"/>
      <text:p text:style-name="P1">f- un sistema inteligente</text:p>
      <text:p text:style-name="P1"/>
      <text:p text:style-name="P1">g- Revelacion: la vida como un sistema inteligente.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25T10:50:34.806000000</meta:creation-date>
    <meta:generator>LibreOffice/7.3.5.2$Windows_X86_64 LibreOffice_project/184fe81b8c8c30d8b5082578aee2fed2ea847c01</meta:generator>
    <dc:date>2026-04-25T19:28:03.047000000</dc:date>
    <meta:editing-duration>PT27M22S</meta:editing-duration>
    <meta:editing-cycles>3</meta:editing-cycles>
    <meta:document-statistic meta:table-count="0" meta:image-count="0" meta:object-count="0" meta:page-count="1" meta:paragraph-count="15" meta:word-count="87" meta:character-count="509" meta:non-whitespace-character-count="432"/>
  </office:meta>
</office:document-meta>
</file>