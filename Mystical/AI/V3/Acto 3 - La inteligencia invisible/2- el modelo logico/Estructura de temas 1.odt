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7efc4"/>
    </style:style>
    <style:style style:name="P2" style:family="paragraph" style:parent-style-name="Standard">
      <style:text-properties officeooo:paragraph-rsid="001837e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>2-</text:p>
      <text:p text:style-name="Standard">a- El modelo Logico Matematico. Introduccion</text:p>
      <text:p text:style-name="Standard"/>
      <text:p text:style-name="P2">d- la inteligencia.</text:p>
      <text:p text:style-name="Standard"/>
      <text:p text:style-name="Standard">b- los elementos principales de la vida en este modelo.</text:p>
      <text:p text:style-name="Standard"/>
      <text:p text:style-name="Standard">c- lo que podemos hacer con estos elementos.</text:p>
      <text:p text:style-name="Standard"/>
      <text:p text:style-name="Standard"/>
      <text:p text:style-name="Standard"/>
      <text:p text:style-name="Standard">e- el proceso de calculo.</text:p>
      <text:p text:style-name="Standard"/>
      <text:p text:style-name="Standard">f- un sistema inteligente</text:p>
      <text:p text:style-name="Standard"/>
      <text:p text:style-name="Standard">g- Revelacion: la vida como un sistema inteligente. </text:p>
      <text:p text:style-name="P1"/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6-04-25T10:50:34.806000000</meta:creation-date>
    <meta:generator>LibreOffice/7.3.5.2$Windows_X86_64 LibreOffice_project/184fe81b8c8c30d8b5082578aee2fed2ea847c01</meta:generator>
    <dc:date>2026-04-26T10:08:30.067000000</dc:date>
    <meta:editing-duration>PT3M14S</meta:editing-duration>
    <meta:editing-cycles>3</meta:editing-cycles>
    <meta:document-statistic meta:table-count="0" meta:image-count="0" meta:object-count="0" meta:page-count="1" meta:paragraph-count="8" meta:word-count="45" meta:character-count="266" meta:non-whitespace-character-count="228"/>
  </office:meta>
</office:document-meta>
</file>