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text-properties officeooo:rsid="000a4691" officeooo:paragraph-rsid="000a4691"/>
    </style:style>
    <style:style style:name="T1" style:family="text">
      <style:text-properties fo:color="#c9211e"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span text:style-name="Strong_20_Emphasis">Apertura del capítulo: El modelo lógico</text:span></text:h>
      <text:p text:style-name="Text_20_body">Durante siglos, la vida ha sido observada desde la materia. La biología, con admirable precisión, ha descrito células, tejidos, moléculas, órganos, ecosistemas. Ha cartografiado cada rincón del organismo vivo, desde la estructura del ADN hasta la complejidad del cerebro humano. Pero incluso con todo ese conocimiento acumulado, persiste una pregunta más profunda, casi incómoda:<text:line-break/><text:span text:style-name="Strong_20_Emphasis">¿qué es la vida cuando dejamos de mirar la materia y empezamos a mirar la lógica que la sostiene?</text:span></text:p>
      <text:p text:style-name="Text_20_body">El <text:span text:style-name="Strong_20_Emphasis">modelo lógico</text:span> nace precisamente de ese desplazamiento de perspectiva. No pretende reemplazar al modelo biológico, ni competir con él, ni corregirlo. Lo que hace es algo más radical: <text:span text:style-name="Strong_20_Emphasis">cambia el nivel de observación</text:span>. La biología describe <text:span text:style-name="Emphasis">cómo está hecha</text:span> la vida; el modelo lógico describe <text:span text:style-name="Emphasis">cómo funciona</text:span> la vida en su esencia más abstracta, más universal, más independiente de cualquier soporte físico.</text:p>
      <text:p text:style-name="P6">Este modelo es una abstraccion que intenta mostrar lo que la vida hace y como.</text:p>
      <text:p text:style-name="P6">Si decimos que la vida evoluciona, como exactamente se produce ese proceso?</text:p>
      <text:p text:style-name="Text_20_body">En este modelo, la vida no es un conjunto de sustancias, sino un <text:span text:style-name="Strong_20_Emphasis">proceso de información</text:span>. No es carbono, agua y proteínas, sino <text:span text:style-name="Strong_20_Emphasis">estructura, copia, variación y continuidad</text:span>. La vida aparece como un patrón que se sostiene a sí mismo a través del tiempo, un algoritmo que explora posibilidades, aprende de sus errores y conserva lo que funciona. Un sistema que, sin necesidad de intención consciente, desarrolla una forma <text:span text:style-name="T1">primitiva pero</text:span> poderosa de inteligencia: la capacidad de resolver problemas.</text:p>
      <text:p text:style-name="Text_20_body">Para comprender este modelo, basta con identificar sus cuatro elementos fundamentales. No son partes físicas, sino <text:span text:style-name="Strong_20_Emphasis">funciones lógicas</text:span> que cualquier sistema vivo —real o hipotético— debe poseer para existir:</text:p>
      <text:list xml:id="list1556461275" text:style-name="L1">
        <text:list-item>
          <text:p text:style-name="P2"><text:span text:style-name="Strong_20_Emphasis">ADN</text:span>: no como molécula, sino como <text:span text:style-name="Emphasis">información heredable</text:span>, un plano que define la estructura del individuo y que puede copiarse. </text:p>
        </text:list-item>
        <text:list-item>
          <text:p text:style-name="P2"><text:span text:style-name="Strong_20_Emphasis">Reproducción</text:span>: el mecanismo que permite que esa información se duplique y se proyecte hacia el futuro. </text:p>
        </text:list-item>
        <text:list-item>
          <text:p text:style-name="P2"><text:span text:style-name="Strong_20_Emphasis">Ciclo de vida</text:span>: el proceso que conecta nacimiento, desarrollo, reproducción y muerte, garantizando que la información fluya a través del tiempo. </text:p>
        </text:list-item>
        <text:list-item>
          <text:p text:style-name="P1"><text:span text:style-name="Strong_20_Emphasis">Individuos</text:span>: instancias concretas de esa información, expresiones temporales del diseño que el ADN contiene. </text:p>
        </text:list-item>
      </text:list>
      <text:p text:style-name="Text_20_body">Estos cuatro elementos forman una arquitectura mínima, una <text:span text:style-name="T1">especie de</text:span> “máquina lógica” capaz de generar continuidad, variación y selección. No importa si la implementación es química, digital, extraterrestre o completamente desconocida: mientras existan estos cuatro elementos, existe vida en el sentido funcional del término.</text:p>
      <text:p text:style-name="Text_20_body">El contraste con el modelo biológico es revelador. La biología observa células; el modelo lógico observa <text:span text:style-name="Strong_20_Emphasis">individuos como unidades de información</text:span>. La biología estudia la replicación molecular; el <text:soft-page-break/>modelo lógico estudia <text:span text:style-name="Strong_20_Emphasis">la reproducción como operación abstracta</text:span>. La biología describe el metabolismo; el modelo lógico describe <text:span text:style-name="Strong_20_Emphasis">el ciclo vital como flujo de información</text:span>. La biología analiza el ADN como molécula; el modelo lógico lo trata como <text:span text:style-name="Strong_20_Emphasis">código</text:span>, como estructura formal que puede copiarse, modificarse y seleccionarse.</text:p>
      <text:p text:style-name="Text_20_body">En cierto modo, ambos modelos hablan de lo mismo, pero desde ángulos completamente distintos. El modelo biológico es el mapa físico; el modelo lógico es el mapa conceptual. Uno describe el hardware; el otro, el software. Uno detalla los mecanismos; el otro, las reglas. Uno explica la vida tal como la vemos; el otro explica la vida tal como funciona.</text:p>
      <text:p text:style-name="Text_20_body">Y es precisamente en esa diferencia donde surge la potencia del modelo lógico. Porque al abstraer la vida de su soporte material, descubrimos algo sorprendente: <text:span text:style-name="Strong_20_Emphasis">la vida no es un fenómeno químico, sino un fenómeno informacional</text:span>. La química es la implementación que la Tierra encontró para ejecutarlo, pero no es la esencia del proceso. La esencia es la lógica que permite que un sistema:</text:p>
      <text:list xml:id="list2397681994" text:style-name="L2">
        <text:list-item>
          <text:p text:style-name="P4">se copie, </text:p>
        </text:list-item>
        <text:list-item>
          <text:p text:style-name="P4">se modifique, </text:p>
        </text:list-item>
        <text:list-item>
          <text:p text:style-name="P4">se seleccione, </text:p>
        </text:list-item>
        <text:list-item>
          <text:p text:style-name="P3">y acumule conocimiento a lo largo de generaciones. </text:p>
        </text:list-item>
      </text:list>
      <text:p text:style-name="Text_20_body">Desde esta perspectiva, la vida es un algoritmo que se ejecuta sobre la materia, igual que un programa se ejecuta sobre un ordenador. El ADN es el código; los individuos, las instancias; la reproducción, la operación de copia; el ciclo vital, el bucle que mantiene el proceso en marcha. Y la evolución —ese fenómeno que durante millones de años ha producido organismos cada vez más complejos— no es más que la consecuencia inevitable de este algoritmo ejecutándose sin interrupción.</text:p>
      <text:p text:style-name="Text_20_body">El modelo lógico nos permite ver algo que la biología, por su propia naturaleza descriptiva, no puede mostrar con la misma claridad: <text:span text:style-name="Strong_20_Emphasis">la vida es un sistema de resolución de problemas</text:span>. Cada individuo es una propuesta, una hipótesis, una variación del diseño. Cada reproducción es un experimento. Cada ciclo vital es una prueba. Y cada generación es un paso más en un proceso de aprendizaje distribuido, lento pero implacable, que acumula información útil para sobrevivir.</text:p>
      <text:p text:style-name="Text_20_body">La vida, entendida así, no es un accidente químico, sino una estructura lógica que emerge cuando un sistema de información se reproduce con variación y está sometido a selección. No necesita intención, ni propósito, ni diseño previo. Basta con que exista un mecanismo que copie información, que introduzca pequeñas modificaciones y que elimine las configuraciones que no funcionan. El resto —la complejidad, la diversidad, la inteligencia— es consecuencia inevitable.</text:p>
      <text:p text:style-name="Text_20_body">Al confrontar el modelo biológico con el modelo lógico, descubrimos que ambos son necesarios. La biología nos dice <text:span text:style-name="Emphasis">cómo</text:span> la vida se implementa en nuestro planeta. El modelo lógico nos dice <text:span text:style-name="Emphasis">por qué</text:span> la vida funciona como funciona, y qué propiedades son esenciales para cualquier forma de vida, en cualquier lugar del universo. La biología nos muestra la materia; la lógica, la estructura. La biología nos enseña los detalles; la lógica, los principios.</text:p>
      <text:p text:style-name="Text_20_body">Y es precisamente esa combinación —la materia y la lógica, el mecanismo y la función— la que nos permite comprender la vida en toda su profundidad. Porque la vida no es solo lo que vemos, sino <text:soft-page-break/>también lo que no vemos: la arquitectura invisible que sostiene el proceso, la lógica que permite que un sistema persista, aprenda y evolucione.</text:p>
      <text:p text:style-name="Text_20_body">El modelo lógico es, en última instancia, una invitación a mirar la vida desde otro ángulo. A ver en cada organismo no solo un cuerpo, sino un flujo de información. A ver en cada reproducción no solo un acto biológico, sino una operación lógica. A ver en cada ciclo vital no solo una historia individual, sino un paso más en un proceso que comenzó hace miles de millones de años y que continúa, silencioso y persistente, en cada ser vivo.</text:p>
      <text:p text:style-name="Text_20_body">Es una forma de comprender que, más allá de la biología, la vida es un patrón que se repite, una estructura que se conserva, una lógica que se ejecuta. Y que en esa lógica —simple, elegante, universal— reside la verdadera esencia de lo que significa estar viv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25T19:11:19.020000000</meta:creation-date>
    <dc:date>2026-04-25T19:27:22.616000000</dc:date>
    <meta:editing-duration>PT16M3S</meta:editing-duration>
    <meta:editing-cycles>2</meta:editing-cycles>
    <meta:generator>LibreOffice/7.3.5.2$Windows_X86_64 LibreOffice_project/184fe81b8c8c30d8b5082578aee2fed2ea847c01</meta:generator>
    <meta:document-statistic meta:table-count="0" meta:image-count="0" meta:object-count="0" meta:page-count="3" meta:paragraph-count="26" meta:word-count="1095" meta:character-count="6828" meta:non-whitespace-character-count="5759"/>
  </office:meta>
</office:document-meta>
</file>