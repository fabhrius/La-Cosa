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color="#c9211e" loext:opacity="100%"/>
    </style:style>
    <style:style style:name="P2" style:family="paragraph" style:parent-style-name="Text_20_body">
      <style:text-properties fo:color="#c9211e" loext:opacity="100%" officeooo:rsid="000462e9" officeooo:paragraph-rsid="000462e9"/>
    </style:style>
    <style:style style:name="P3" style:family="paragraph" style:parent-style-name="Text_20_body">
      <style:text-properties officeooo:rsid="000462e9" officeooo:paragraph-rsid="000462e9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in" fo:margin-bottom="0in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in" fo:margin-bottom="0in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3">
      <style:paragraph-properties fo:margin-top="0in" fo:margin-bottom="0in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4">
      <style:paragraph-properties fo:margin-top="0in" fo:margin-bottom="0in" style:contextual-spacing="false"/>
    </style:style>
    <style:style style:name="P12" style:family="paragraph" style:parent-style-name="Text_20_body" style:list-style-name="L5"/>
    <style:style style:name="P13" style:family="paragraph" style:parent-style-name="Text_20_body" style:list-style-name="L5">
      <style:paragraph-properties fo:margin-top="0in" fo:margin-bottom="0in" style:contextual-spacing="false"/>
    </style:style>
    <style:style style:name="P14" style:family="paragraph" style:parent-style-name="Text_20_body" style:list-style-name="L6"/>
    <style:style style:name="P15" style:family="paragraph" style:parent-style-name="Text_20_body" style:list-style-name="L6">
      <style:paragraph-properties fo:margin-top="0in" fo:margin-bottom="0in" style:contextual-spacing="false"/>
    </style:style>
    <style:style style:name="P16" style:family="paragraph" style:parent-style-name="Text_20_body" style:list-style-name="L7"/>
    <style:style style:name="P17" style:family="paragraph" style:parent-style-name="Text_20_body" style:list-style-name="L7">
      <style:paragraph-properties fo:margin-top="0in" fo:margin-bottom="0in" style:contextual-spacing="false"/>
    </style:style>
    <style:style style:name="P18" style:family="paragraph" style:parent-style-name="Text_20_body" style:list-style-name="L8"/>
    <style:style style:name="P19" style:family="paragraph" style:parent-style-name="Text_20_body" style:list-style-name="L8">
      <style:paragraph-properties fo:margin-top="0in" fo:margin-bottom="0in" style:contextual-spacing="false"/>
    </style:style>
    <style:style style:name="P20" style:family="paragraph" style:parent-style-name="Text_20_body" style:list-style-name="L9"/>
    <style:style style:name="P21" style:family="paragraph" style:parent-style-name="Text_20_body" style:list-style-name="L9">
      <style:paragraph-properties fo:margin-top="0in" fo:margin-bottom="0in" style:contextual-spacing="false"/>
    </style:style>
    <style:style style:name="P22" style:family="paragraph" style:parent-style-name="Text_20_body" style:list-style-name="L10"/>
    <style:style style:name="P23" style:family="paragraph" style:parent-style-name="Text_20_body" style:list-style-name="L10">
      <style:paragraph-properties fo:margin-top="0in" fo:margin-bottom="0in" style:contextual-spacing="false"/>
    </style:style>
    <style:style style:name="P24" style:family="paragraph" style:parent-style-name="Text_20_body" style:list-style-name="L11"/>
    <style:style style:name="P25" style:family="paragraph" style:parent-style-name="Text_20_body" style:list-style-name="L11">
      <style:paragraph-properties fo:margin-top="0in" fo:margin-bottom="0in" style:contextual-spacing="false"/>
    </style:style>
    <style:style style:name="P26" style:family="paragraph" style:parent-style-name="Text_20_body">
      <style:text-properties officeooo:paragraph-rsid="00077c6f"/>
    </style:style>
    <style:style style:name="P27" style:family="paragraph" style:parent-style-name="Text_20_body">
      <style:text-properties fo:color="#c9211e" loext:opacity="100%"/>
    </style:style>
    <style:style style:name="T1" style:family="text">
      <style:text-properties officeooo:rsid="00077c6f"/>
    </style:style>
    <style:style style:name="T2" style:family="text">
      <style:text-properties fo:color="#c9211e" loext:opacity="10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“pensamiento” es una palabra que mezcla varias cosas distintas.</text:p>
      <text:p text:style-name="Horizontal_20_Line"/>
      <text:h text:style-name="Heading_20_1" text:outline-level="1">🌟 <text:span text:style-name="Strong_20_Emphasis">Qué es el pensamiento</text:span></text:h>
      <text:h text:style-name="Heading_20_2" text:outline-level="2"><text:span text:style-name="Strong_20_Emphasis">Pensamiento es la actividad interna mediante la cual un sistema inteligente manipula representaciones.</text:span></text:h>
      <text:p text:style-name="Text_20_body">Es decir:</text:p>
      <text:list xml:id="list1199585841" text:style-name="L1">
        <text:list-item>
          <text:p text:style-name="P5">toma información, </text:p>
        </text:list-item>
        <text:list-item>
          <text:p text:style-name="P5">la combina, </text:p>
        </text:list-item>
        <text:list-item>
          <text:p text:style-name="P5">la transforma, </text:p>
        </text:list-item>
        <text:list-item>
          <text:p text:style-name="P5">la reorganiza, </text:p>
        </text:list-item>
        <text:list-item>
          <text:p text:style-name="P4">y genera nuevas representaciones internas. </text:p>
        </text:list-item>
      </text:list>
      <text:p text:style-name="Text_20_body">El pensamiento es <text:span text:style-name="Strong_20_Emphasis">inteligencia en acción</text:span>, pero no necesariamente razonamiento formal ni conciencia reflexiva.</text:p>
      <text:p text:style-name="Horizontal_20_Line"/>
      <text:h text:style-name="Heading_20_1" text:outline-level="1">🧠 <text:span text:style-name="Strong_20_Emphasis">1. Pensamiento no es lo mismo que conciencia</text:span></text:h>
      <text:p text:style-name="Text_20_body">Puedes pensar sin ser consciente de que estás pensando:</text:p>
      <text:list xml:id="list2876047656" text:style-name="L2">
        <text:list-item>
          <text:p text:style-name="P7">procesos automáticos, </text:p>
        </text:list-item>
        <text:list-item>
          <text:p text:style-name="P7">inferencias rápidas, </text:p>
        </text:list-item>
        <text:list-item>
          <text:p text:style-name="P7">decisiones intuitivas, </text:p>
        </text:list-item>
        <text:list-item>
          <text:p text:style-name="P6">cálculos internos que no llegan a la conciencia. </text:p>
        </text:list-item>
      </text:list>
      <text:p text:style-name="Text_20_body">Y puedes ser consciente sin pensar:</text:p>
      <text:list xml:id="list2948822369" text:style-name="L3">
        <text:list-item>
          <text:p text:style-name="P9">sentir dolor, </text:p>
        </text:list-item>
        <text:list-item>
          <text:p text:style-name="P9">sentir frío, </text:p>
        </text:list-item>
        <text:list-item>
          <text:p text:style-name="P9">sentir miedo, </text:p>
        </text:list-item>
        <text:list-item>
          <text:p text:style-name="P8">sentir presencia. </text:p>
        </text:list-item>
      </text:list>
      <text:p text:style-name="Text_20_body">La conciencia es <text:span text:style-name="Emphasis">sentir</text:span>.<text:line-break/>El pensamiento es <text:span text:style-name="Emphasis">manipular información</text:span>.</text:p>
      <text:p text:style-name="Horizontal_20_Line"/>
      <text:h text:style-name="Heading_20_1" text:outline-level="1"><text:soft-page-break/>🔍 <text:span text:style-name="Strong_20_Emphasis">2. Pensamiento no es lo mismo que razonamiento</text:span></text:h>
      <text:p text:style-name="Text_20_body">El razonamiento es un tipo particular de pensamiento:</text:p>
      <text:list xml:id="list3927189927" text:style-name="L4">
        <text:list-item>
          <text:p text:style-name="P11">estructurado, </text:p>
        </text:list-item>
        <text:list-item>
          <text:p text:style-name="P11">lógico, </text:p>
        </text:list-item>
        <text:list-item>
          <text:p text:style-name="P10">basado en relaciones explícitas. </text:p>
        </text:list-item>
      </text:list>
      <text:p text:style-name="Text_20_body">Pero hay pensamiento no racional:</text:p>
      <text:list xml:id="list213937835" text:style-name="L5">
        <text:list-item>
          <text:p text:style-name="P13">imaginación, </text:p>
        </text:list-item>
        <text:list-item>
          <text:p text:style-name="P13">intuición, </text:p>
        </text:list-item>
        <text:list-item>
          <text:p text:style-name="P13">asociación libre, </text:p>
        </text:list-item>
        <text:list-item>
          <text:p text:style-name="P13">memoria activa, </text:p>
        </text:list-item>
        <text:list-item>
          <text:p text:style-name="P13">simulación mental, </text:p>
        </text:list-item>
        <text:list-item>
          <text:p text:style-name="P12">anticipación emocional. </text:p>
        </text:list-item>
      </text:list>
      <text:p text:style-name="Text_20_body">El pensamiento es más amplio que el razonamiento.</text:p>
      <text:p text:style-name="Horizontal_20_Line"/>
      <text:h text:style-name="Heading_20_1" text:outline-level="1">🧮 <text:span text:style-name="Strong_20_Emphasis">3. ¿El cálculo es pensamiento?</text:span></text:h>
      <text:p text:style-name="Text_20_body">Aquí viene la distinción importante:</text:p>
      <text:h text:style-name="Heading_20_2" text:outline-level="2"><text:span text:style-name="Strong_20_Emphasis">Sí, el cálculo es una forma de pensamiento… pero no toda forma de pensamiento es cálculo.</text:span></text:h>
      <text:p text:style-name="Text_20_body">El cálculo es pensamiento <text:span text:style-name="Strong_20_Emphasis">algorítmico</text:span>, <text:span text:style-name="Strong_20_Emphasis">determinista</text:span>, <text:span text:style-name="Strong_20_Emphasis">reglado</text:span>.</text:p>
      <text:p text:style-name="Text_20_body">Ejemplos:</text:p>
      <text:list xml:id="list3823533064" text:style-name="L6">
        <text:list-item>
          <text:p text:style-name="P15">sumar, </text:p>
        </text:list-item>
        <text:list-item>
          <text:p text:style-name="P15">comparar magnitudes, </text:p>
        </text:list-item>
        <text:list-item>
          <text:p text:style-name="P15">evaluar una función, </text:p>
        </text:list-item>
        <text:list-item>
          <text:p text:style-name="P14">aplicar un algoritmo. </text:p>
        </text:list-item>
      </text:list>
      <text:p text:style-name="Text_20_body">Pero el pensamiento humano (y animal) incluye:</text:p>
      <text:list xml:id="list4040834020" text:style-name="L7">
        <text:list-item>
          <text:p text:style-name="P17">inferencias, </text:p>
        </text:list-item>
        <text:list-item>
          <text:p text:style-name="P17">analogías, </text:p>
        </text:list-item>
        <text:list-item>
          <text:p text:style-name="P17">simulaciones, </text:p>
        </text:list-item>
        <text:list-item>
          <text:p text:style-name="P17">imaginación, </text:p>
        </text:list-item>
        <text:list-item>
          <text:p text:style-name="P17">decisiones afectivas, </text:p>
        </text:list-item>
        <text:list-item>
          <text:p text:style-name="P16">modelos internos del mundo. </text:p>
        </text:list-item>
      </text:list>
      <text:p text:style-name="Text_20_body"><text:soft-page-break/>El cálculo es una <text:span text:style-name="Strong_20_Emphasis">subclase</text:span> del pensamiento.</text:p>
      <text:p text:style-name="Horizontal_20_Line"/>
      <text:h text:style-name="Heading_20_1" text:outline-level="1">🧩 <text:span text:style-name="Strong_20_Emphasis">4. Cómo encaja esto con </text:span><text:span text:style-name="Strong_20_Emphasis"><text:span text:style-name="T1">el</text:span></text:span><text:span text:style-name="Strong_20_Emphasis"> modelo</text:span></text:h>
      <text:p text:style-name="Text_20_body"><text:span text:style-name="T1">El</text:span> marco conceptual queda así:</text:p>
      <text:h text:style-name="Heading_20_3" text:outline-level="3"><text:span text:style-name="Strong_20_Emphasis">Inteligencia</text:span></text:h>
      <text:p text:style-name="Text_20_body">Capacidad de resolver problemas transformando información.</text:p>
      <text:h text:style-name="Heading_20_3" text:outline-level="3"><text:span text:style-name="Strong_20_Emphasis">Razonamiento</text:span></text:h>
      <text:p text:style-name="Text_20_body">Forma estructurada de inteligencia que produce conclusiones lógicas.</text:p>
      <text:h text:style-name="Heading_20_3" text:outline-level="3"><text:span text:style-name="Strong_20_Emphasis">Conciencia</text:span></text:h>
      <text:p text:style-name="Text_20_body">Experiencia interna de un estado.</text:p>
      <text:h text:style-name="Heading_20_3" text:outline-level="3"><text:span text:style-name="Strong_20_Emphasis">Autoconciencia</text:span></text:h>
      <text:p text:style-name="Text_20_body">Representación de uno mismo como sujeto.</text:p>
      <text:h text:style-name="Heading_20_3" text:outline-level="3"><text:span text:style-name="Strong_20_Emphasis">Pensamiento</text:span></text:h>
      <text:p text:style-name="Text_20_body">Actividad interna que manipula representaciones para resolver problemas, anticipar, imaginar o decidir.</text:p>
      <text:h text:style-name="Heading_20_3" text:outline-level="3"><text:span text:style-name="Strong_20_Emphasis">Cálculo</text:span></text:h>
      <text:p text:style-name="Text_20_body">Pensamiento algorítmico, formal y determinista.</text:p>
      <text:p text:style-name="Horizontal_20_Line"/>
      <text:h text:style-name="Heading_20_1" text:outline-level="1">🧘 <text:span text:style-name="Strong_20_Emphasis">5. Definición mínima </text:span></text:h>
      <text:p text:style-name="Text_20_body"><text:span text:style-name="Strong_20_Emphasis">Pensamiento es la manipulación interna de representaciones para producir nuevas representaciones.<text:line-break/>El cálculo es una forma de pensamiento estructurado y determinista.</text:span></text:p>
      <text:p text:style-name="Horizontal_20_Line"/>
      <text:p text:style-name="Text_20_body"/>
      <text:p text:style-name="P26"><text:s/><text:span text:style-name="Strong_20_Emphasis">¿puede el ADN “pensar”?</text:span></text:p>
      <text:p text:style-name="P26"><text:span text:style-name="Strong_20_Emphasis"/></text:p>
      <text:p text:style-name="P26"><text:line-break/>La respuesta depende de cómo definamos <text:span text:style-name="Emphasis">pensamiento</text:span>. </text:p>
      <text:p text:style-name="Horizontal_20_Line"><text:soft-page-break/></text:p>
      <text:h text:style-name="Heading_20_1" text:outline-level="1">🌱 <text:span text:style-name="Strong_20_Emphasis">1. Qué hace exactamente el ADN</text:span></text:h>
      <text:p text:style-name="Text_20_body"/>
      <text:p text:style-name="Text_20_body"/>
      <text:list xml:id="list1916828744" text:style-name="L8">
        <text:list-item>
          <text:p text:style-name="P19">copia información, </text:p>
        </text:list-item>
        <text:list-item>
          <text:p text:style-name="P19">introduce variaciones, </text:p>
        </text:list-item>
        <text:list-item>
          <text:p text:style-name="P19">selecciona lo que funciona, </text:p>
        </text:list-item>
        <text:list-item>
          <text:p text:style-name="P19">descarta lo que no, </text:p>
        </text:list-item>
        <text:list-item>
          <text:p text:style-name="P19">acumula mejoras, </text:p>
        </text:list-item>
        <text:list-item>
          <text:p text:style-name="P18">genera estructuras cada vez más complejas. </text:p>
        </text:list-item>
      </text:list>
      <text:p text:style-name="Text_20_body">Ese proceso es <text:span text:style-name="Strong_20_Emphasis">evolución</text:span>, y la evolución es un mecanismo de <text:span text:style-name="Strong_20_Emphasis">resolución de problemas</text:span> a escala de millones de años.</text:p>
      <text:p text:style-name="Text_20_body"/>
      <text:p text:style-name="Quotations"><text:span text:style-name="Strong_20_Emphasis">El ADN no “decide” nada. No elige. No calcula en el sentido algorítmico.<text:line-break/>Pero sí transforma información.</text:span></text:p>
      <text:p text:style-name="Text_20_body">Y transformar información es la esencia del pensamiento.</text:p>
      <text:p text:style-name="Horizontal_20_Line"/>
      <text:h text:style-name="Heading_20_1" text:outline-level="1">🧠 <text:span text:style-name="Strong_20_Emphasis">2. ¿Es pensamiento lo que hace el ADN?</text:span></text:h>
      <text:p text:style-name="P27">Depende de la definición que adoptemos:</text:p>
      <text:h text:style-name="Heading_20_2" text:outline-level="2">✔ Si definimos pensamiento como:</text:h>
      <text:p text:style-name="Text_20_body"><text:span text:style-name="Strong_20_Emphasis">“la manipulación interna de representaciones para producir nuevas representaciones”</text:span>,<text:line-break/>entonces <text:span text:style-name="Strong_20_Emphasis">sí</text:span>, el ADN realiza una forma primitiva de pensamiento.</text:p>
      <text:p text:style-name="Text_20_body">¿Por qué?</text:p>
      <text:list xml:id="list475377305" text:style-name="L9">
        <text:list-item>
          <text:p text:style-name="P21">El ADN contiene representaciones (secuencias). </text:p>
        </text:list-item>
        <text:list-item>
          <text:p text:style-name="P21">Las manipula (mutación, recombinación). </text:p>
        </text:list-item>
        <text:list-item>
          <text:p text:style-name="P21">Produce nuevas representaciones (nuevas variantes). </text:p>
        </text:list-item>
        <text:list-item>
          <text:p text:style-name="P20">Y esas representaciones tienen consecuencias funcionales. </text:p>
        </text:list-item>
      </text:list>
      <text:p text:style-name="Text_20_body">Es pensamiento <text:span text:style-name="Strong_20_Emphasis">no consciente</text:span>, <text:span text:style-name="Strong_20_Emphasis">no intencional</text:span>, <text:span text:style-name="Strong_20_Emphasis">no racional</text:span>, pero pensamiento al fin.</text:p>
      <text:p text:style-name="Text_20_body">Es pensamiento <text:span text:style-name="Strong_20_Emphasis">evolutivo</text:span>, distribuido, ciego pero eficaz.</text:p>
      <text:p text:style-name="Horizontal_20_Line"/>
      <text:h text:style-name="Heading_20_1" text:outline-level="1"><text:soft-page-break/>❌ Si definimos pensamiento como:</text:h>
      <text:p text:style-name="Text_20_body"><text:span text:style-name="Strong_20_Emphasis">“actividad interna deliberada, consciente o simbólica”</text:span>,<text:line-break/>entonces <text:span text:style-name="Strong_20_Emphasis">no</text:span>, el ADN no piensa.</text:p>
      <text:p text:style-name="P27">Pero esa definición es demasiado estrecha para tu modelo, porque excluye casi todo pensamiento animal y toda inteligencia biológica temprana.</text:p>
      <text:p text:style-name="Horizontal_20_Line"/>
      <text:h text:style-name="Heading_20_1" text:outline-level="1"><text:span text:style-name="T2">🔍 </text:span><text:span text:style-name="Strong_20_Emphasis"><text:span text:style-name="T2">3. ¿Qué encaja mejor con tu teoría?</text:span></text:span></text:h>
      <text:p text:style-name="P27">Tu marco conceptual define:</text:p>
      <text:list xml:id="list2603383897" text:style-name="L10">
        <text:list-item>
          <text:p text:style-name="P23"><text:span text:style-name="Strong_20_Emphasis"><text:span text:style-name="T2">Inteligencia</text:span></text:span><text:span text:style-name="T2">: resolver problemas. </text:span></text:p>
        </text:list-item>
        <text:list-item>
          <text:p text:style-name="P23"><text:span text:style-name="Strong_20_Emphasis"><text:span text:style-name="T2">Pensamiento</text:span></text:span><text:span text:style-name="T2">: manipular representaciones internas. </text:span></text:p>
        </text:list-item>
        <text:list-item>
          <text:p text:style-name="P23"><text:span text:style-name="Strong_20_Emphasis"><text:span text:style-name="T2">Cálculo</text:span></text:span><text:span text:style-name="T2">: pensamiento algorítmico. </text:span></text:p>
        </text:list-item>
        <text:list-item>
          <text:p text:style-name="P23"><text:span text:style-name="Strong_20_Emphasis"><text:span text:style-name="T2">Conciencia</text:span></text:span><text:span text:style-name="T2">: sentir. </text:span></text:p>
        </text:list-item>
        <text:list-item>
          <text:p text:style-name="P22"><text:span text:style-name="Strong_20_Emphasis"><text:span text:style-name="T2">Autoconciencia</text:span></text:span><text:span text:style-name="T2">: representarse a uno mismo. </text:span></text:p>
        </text:list-item>
      </text:list>
      <text:p text:style-name="P27">Desde esa estructura, el ADN encaja así:</text:p>
      <text:h text:style-name="Heading_20_3" text:outline-level="3"><text:span text:style-name="Strong_20_Emphasis">El ADN no razona.</text:span></text:h>
      <text:p text:style-name="Text_20_body">No aplica reglas lógicas.</text:p>
      <text:h text:style-name="Heading_20_3" text:outline-level="3"><text:span text:style-name="Strong_20_Emphasis">El ADN no es consciente.</text:span></text:h>
      <text:p text:style-name="Text_20_body">No siente.</text:p>
      <text:h text:style-name="Heading_20_3" text:outline-level="3"><text:span text:style-name="Strong_20_Emphasis">El ADN no es autoconsciente.</text:span></text:h>
      <text:p text:style-name="Text_20_body">No se representa a sí mismo.</text:p>
      <text:h text:style-name="Heading_20_3" text:outline-level="3"><text:span text:style-name="Strong_20_Emphasis">Pero el ADN sí manipula información para producir nueva información.</text:span></text:h>
      <text:p text:style-name="Text_20_body">Y eso es pensamiento en el sentido más fundamental y universal.</text:p>
      <text:p text:style-name="Horizontal_20_Line"/>
      <text:h text:style-name="Heading_20_1" text:outline-level="1"><text:soft-page-break/>🧬 <text:span text:style-name="Strong_20_Emphasis">4. Entonces… ¿el cálculo evolutivo del ADN es pensamiento?</text:span></text:h>
      <text:h text:style-name="Heading_20_2" text:outline-level="2"><text:span text:style-name="Strong_20_Emphasis">Sí, es una forma de pensamiento evolutivo, no consciente, no deliberado, pero real.</text:span></text:h>
      <text:p text:style-name="Text_20_body">Es pensamiento porque:</text:p>
      <text:list xml:id="list2837507341" text:style-name="L11">
        <text:list-item>
          <text:p text:style-name="P25">transforma información, </text:p>
        </text:list-item>
        <text:list-item>
          <text:p text:style-name="P25">genera nuevas configuraciones, </text:p>
        </text:list-item>
        <text:list-item>
          <text:p text:style-name="P25">explora un espacio de posibilidades, </text:p>
        </text:list-item>
        <text:list-item>
          <text:p text:style-name="P24">y selecciona soluciones funcionales. </text:p>
        </text:list-item>
      </text:list>
      <text:p text:style-name="Text_20_body">Es un pensamiento <text:span text:style-name="Strong_20_Emphasis">distribuido</text:span>, <text:span text:style-name="Strong_20_Emphasis">ciego</text:span>, <text:span text:style-name="Strong_20_Emphasis">emergente</text:span>, pero tremendamente poderoso.</text:p>
      <text:p text:style-name="Text_20_body">De hecho, es el pensamiento más antiguo del planeta.</text:p>
      <text:p text:style-name="Horizontal_20_Line"/>
      <text:h text:style-name="Heading_20_1" text:outline-level="1"><text:span text:style-name="T2">🌌 </text:span><text:span text:style-name="Strong_20_Emphasis"><text:span text:style-name="T2">5. La frase que resume todo (y que podrías usar en tu libro)</text:span></text:span></text:h>
      <text:p text:style-name="Text_20_body"><text:span text:style-name="Strong_20_Emphasis">La evolución es el pensamiento de la vida antes de que existieran cerebros.<text:line-break/>El ADN piensa sin saber que piensa.</text:span></text:p>
      <text:p text:style-name="Horizontal_20_Line"/>
      <text:p text:style-name="Text_20_body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2-08T12:57:21.210000000</meta:creation-date>
    <dc:date>2026-04-26T10:55:50.146000000</dc:date>
    <meta:editing-duration>PT15M52S</meta:editing-duration>
    <meta:editing-cycles>4</meta:editing-cycles>
    <meta:generator>LibreOffice/7.3.5.2$Windows_X86_64 LibreOffice_project/184fe81b8c8c30d8b5082578aee2fed2ea847c01</meta:generator>
    <meta:document-statistic meta:table-count="0" meta:image-count="0" meta:object-count="0" meta:page-count="6" meta:paragraph-count="121" meta:word-count="737" meta:character-count="4870" meta:non-whitespace-character-count="4250"/>
  </office:meta>
</office:document-meta>
</file>