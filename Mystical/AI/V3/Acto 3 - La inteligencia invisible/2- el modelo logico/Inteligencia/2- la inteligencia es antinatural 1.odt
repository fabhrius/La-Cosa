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la inteligencia es antinatural:</text:p>
      <text:p text:style-name="Standard"/>
      <text:p text:style-name="Standard"><text:tab/>La inteligencia es detectable porque observamos un resultado que no se produciría por sí solo.</text:p>
      <text:p text:style-name="Standard"/>
      <text:p text:style-name="Standard"/>
      <text:p text:style-name="Standard">en el ejemplo anterior de una particula que se desprende del muro se mueve de forma irregular, nuestra vista la detecta al instante y nos hace reaccionar.</text:p>
      <text:p text:style-name="Standard">lo que detectamos es algo que no deberia suceder.</text:p>
      <text:p text:style-name="Standard">un movimiento que parece desafiar las leyes naturales.</text:p>
      <text:p text:style-name="Standard">sube en vez de caer, desafiando la gravedad, o se mueve con un movimiento irregular, o se acelera repentinamente sin una causa aparente.</text:p>
      <text:p text:style-name="Standard"/>
      <text:p text:style-name="Standard">las hojas que se mueven con el viento no nos sorprenden.</text:p>
      <text:p text:style-name="Standard">porque el <text:s/>movimiento es uniforme y la causa es evidente.</text:p>
      <text:p text:style-name="Standard">pero algo que se mueve repentinamente delante de nosotros sin una causa hara que lo analicemos con atencion.</text:p>
      <text:p text:style-name="Standard"/>
      <text:p text:style-name="Standard"/>
      <text:p text:style-name="Standard">de algun modo el movimiento inteligente se percibe como un movimiento antinatural.</text:p>
      <text:p text:style-name="Standard">la trayectoria va en contra del viento, contra la corriente del rio, sube en vez de caer, se acelera repentinamente, o sigue una trayectoria irregular y calculada.</text:p>
      <text:p text:style-name="Standard"/>
      <text:p text:style-name="Standard">Claramente este movimiento no es el resultado de la mera accion de las fuerzas naturales, hay algo mas, ese algo mas es inteligencia.</text:p>
      <text:p text:style-name="Standard">La inteligencia actúa para producir un resultado que no se obtiene de forma natural.</text:p>
      <text:p text:style-name="Standard"/>
      <text:p text:style-name="Standard">No significa que la inteligencia “viola” las leyes físicas.</text:p>
      <text:p text:style-name="Standard">Significa que no se limita a lo que ocurriría por inercia, no es pasiva, no es el resultado trivial de la termodinámica. </text:p>
      <text:p text:style-name="Standard">La inteligencia interviene en el flujo natural de los acontecimientos.</text:p>
      <text:p text:style-name="Standard"/>
      <text:p text:style-name="Standard">O dicho de otro modo, la inteligencia produce resultados que no ocurrirían sin ella.</text:p>
      <text:p text:style-name="Standard"/>
      <text:p text:style-name="Standard">Inteligencia implica acción. Y esta acción altera de algún modo el proceso natural.</text:p>
      <text:p text:style-name="Standard">La inteligencia es acción informada.</text:p>
      <text:p text:style-name="Standard"/>
      <text:p text:style-name="Standard">No es inercia, azar, o simple causalidad física. </text:p>
      <text:p text:style-name="Standard">Es causalidad dirigida por información.</text:p>
      <text:p text:style-name="Standard">Eso es lo que la distingue de la caída de una roca, o la formación de un remolino. </text:p>
      <text:p text:style-name="Standard"/>
      <text:p text:style-name="Standard"/>
      <text:p text:style-name="Standard">La inteligencia genera un resultado diferente del que se obtiene por la simple acción del tiempo sobre la materia.</text:p>
      <text:p text:style-name="Standard">La inteligencia es desviación, intervención, dirección, estructura, propósito. </text:p>
      <text:p text:style-name="Standard">Es la forma en que un sistema rompe la pasividad de la materia y produce un resultado que no surgiría solo por evolución física.</text:p>
      <text:p text:style-name="Standard"/>
      <text:p text:style-name="Standard"/>
      <text:p text:style-name="Standard"><text:soft-page-break/>Un resultado que no se produciría por sí solo.</text:p>
      <text:p text:style-name="Standard">La inteligencia interviene, desvía el curso natural, y produce un resultado que no surge por inercia física. </text:p>
      <text:p text:style-name="Standard">Es la causa de un resultado no trivial.</text:p>
      <text:p text:style-name="Standard">Un resultado que no aparece por azar, por simple causalidad física, por evolución espontánea de la materia. </text:p>
      <text:p text:style-name="Standard">Aparece porque un sistema procesó información y actuó.</text:p>
      <text:p text:style-name="Standard"/>
      <text:p text:style-name="Standard">La inteligencia introduce causalidad informada.</text:p>
      <text:p text:style-name="Standard"/>
      <text:p text:style-name="Standard">Es por eso que lo percibimos como algo "antinatural".</text:p>
      <text:p text:style-name="Standard">Y sin embargo, la inteligencia es una formacion natural.</text:p>
      <text:p text:style-name="Standard"/>
      <text:p text:style-name="Standard">Las leyes de la fisica actuando sobre la <text:s/>materia producen inteligencia.</text:p>
      <text:p text:style-name="Standard">Veremos como sucede esto mas adelant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26T10:26:51.567000000</meta:creation-date>
    <dc:date>2026-04-26T10:27:30.120000000</dc:date>
    <meta:editing-duration>PT38S</meta:editing-duration>
    <meta:editing-cycles>1</meta:editing-cycles>
    <meta:document-statistic meta:table-count="0" meta:image-count="0" meta:object-count="0" meta:page-count="2" meta:paragraph-count="35" meta:word-count="455" meta:character-count="2769" meta:non-whitespace-character-count="2340"/>
    <meta:generator>LibreOffice/7.3.5.2$Windows_X86_64 LibreOffice_project/184fe81b8c8c30d8b5082578aee2fed2ea847c01</meta:generator>
  </office:meta>
</office:document-meta>
</file>