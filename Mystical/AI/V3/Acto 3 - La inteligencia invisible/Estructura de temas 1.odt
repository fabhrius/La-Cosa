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0- Objetivos e introduccion al acto 3</text:p>
      <text:p text:style-name="Standard"/>
      <text:p text:style-name="Standard">1- la necesidad de un nuevo modelo</text:p>
      <text:p text:style-name="Standard"/>
      <text:p text:style-name="Standard">2- el modelo logico</text:p>
      <text:p text:style-name="Standard"/>
      <text:p text:style-name="Standard">3- practica</text:p>
      <text:p text:style-name="Standard"/>
      <text:p text:style-name="Standard">4- revelacion</text:p>
      <text:p text:style-name="Standard"/>
      <text:p text:style-name="Standard">5- conclusion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5T10:50:34.806000000</meta:creation-date>
    <meta:generator>LibreOffice/7.3.5.2$Windows_X86_64 LibreOffice_project/184fe81b8c8c30d8b5082578aee2fed2ea847c01</meta:generator>
    <dc:date>2026-04-25T10:52:27.008000000</dc:date>
    <meta:editing-duration>PT1M52S</meta:editing-duration>
    <meta:editing-cycles>1</meta:editing-cycles>
    <meta:document-statistic meta:table-count="0" meta:image-count="0" meta:object-count="0" meta:page-count="1" meta:paragraph-count="6" meta:word-count="24" meta:character-count="127" meta:non-whitespace-character-count="109"/>
  </office:meta>
</office:document-meta>
</file>