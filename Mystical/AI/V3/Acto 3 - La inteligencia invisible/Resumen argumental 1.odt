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364" officeooo:paragraph-rsid="001a6364"/>
    </style:style>
    <style:style style:name="P2" style:family="paragraph" style:parent-style-name="Standard">
      <style:text-properties officeooo:rsid="001a6364" officeooo:paragraph-rsid="001a6364"/>
    </style:style>
    <style:style style:name="P3" style:family="paragraph" style:parent-style-name="Standard">
      <style:text-properties officeooo:rsid="001b91b4" officeooo:paragraph-rsid="001b91b4"/>
    </style:style>
    <style:style style:name="P4" style:family="paragraph" style:parent-style-name="Standard">
      <style:text-properties officeooo:rsid="001c8c9e" officeooo:paragraph-rsid="001c8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0- Objetivos e introduccion al acto 3</text:p>
      <text:p text:style-name="Standard"/>
      <text:p text:style-name="P1">explica que para responder a las preguntas acerca de nuestra existencia debemos entender primero lo que es la vida.</text:p>
      <text:p text:style-name="P3">y que con este objetivo construiremos un modelo de vida orientado a mostrar su actividad.</text:p>
      <text:p text:style-name="P3"/>
      <text:p text:style-name="P1"/>
      <text:p text:style-name="Standard">1- la necesidad de un nuevo modelo</text:p>
      <text:p text:style-name="Standard"/>
      <text:p text:style-name="P3">el modelo actual basado en la biologia muestra la composicion de la vida a traves de la quimica de la materia organica y el estudio de los organismos vivientes.</text:p>
      <text:p text:style-name="P3">Pero no consigue mostrar claramente su actividad logica.</text:p>
      <text:p text:style-name="P3">y este es el objetivo del modelo que utilizaremos aqui.</text:p>
      <text:p text:style-name="P3">mostrar su actividad logica.</text:p>
      <text:p text:style-name="P3">en otras palabras, hablamos de inteligencia.</text:p>
      <text:p text:style-name="P3"/>
      <text:p text:style-name="Standard"/>
      <text:p text:style-name="Standard">2- el modelo logico</text:p>
      <text:p text:style-name="Standard"/>
      <text:p text:style-name="P4">Introduccion</text:p>
      <text:p text:style-name="P4">sus partes</text:p>
      <text:p text:style-name="P4"/>
      <text:p text:style-name="Standard">3- practica</text:p>
      <text:p text:style-name="Standard"/>
      <text:p text:style-name="Standard">4- revelacion</text:p>
      <text:p text:style-name="Standard"/>
      <text:p text:style-name="Standard">5- conclusion</text:p>
      <text:p text:style-name="Standard"/>
      <text:p text:style-name="Standard"/>
      <text:p text:style-name="P4">--------------------------------------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5T10:50:34.806000000</meta:creation-date>
    <meta:generator>LibreOffice/7.3.5.2$Windows_X86_64 LibreOffice_project/184fe81b8c8c30d8b5082578aee2fed2ea847c01</meta:generator>
    <dc:date>2026-04-26T10:05:39.170000000</dc:date>
    <meta:editing-duration>PT22M6S</meta:editing-duration>
    <meta:editing-cycles>4</meta:editing-cycles>
    <meta:document-statistic meta:table-count="0" meta:image-count="0" meta:object-count="0" meta:page-count="1" meta:paragraph-count="16" meta:word-count="119" meta:character-count="734" meta:non-whitespace-character-count="631"/>
  </office:meta>
</office:document-meta>
</file>