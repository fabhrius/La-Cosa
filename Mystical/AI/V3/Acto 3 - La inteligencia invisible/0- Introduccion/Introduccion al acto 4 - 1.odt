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text:span text:style-name="Strong_20_Emphasis">versión completamente reescrita, ampliada, estructurada y pulida</text:span> de tu introducción al Acto 4 —unas <text:span text:style-name="Strong_20_Emphasis">1500 palabras</text:span>, tono literario‑filosófico, con ritmo narrativo y claridad conceptual, diseñada para atrapar al lector desde la primera línea y preparar el terreno para el modelo lógico de la vida.</text:p>
      <text:p text:style-name="Horizontal_20_Line"/>
      <text:h text:style-name="Heading_20_1" text:outline-level="1">**Acto 4 — Introducción</text:h>
      <text:p text:style-name="Text_20_body">La vida como inteligencia**</text:p>
      <text:p text:style-name="Text_20_body">Hay preguntas que nos acompañan desde que existimos. Preguntas que no se disipan con el tiempo, ni con la ciencia, ni con la experiencia acumulada de generaciones enteras. Preguntas que regresan una y otra vez, como si fueran parte de la estructura misma de nuestra conciencia:<text:line-break/><text:span text:style-name="Strong_20_Emphasis">¿Qué somos? ¿Por qué existimos? ¿Qué es aquello que continúa cuando el cuerpo deja de hacerlo? ¿Qué es la vida? ¿Qué es la inteligencia?</text:span></text:p>
      <text:p text:style-name="Text_20_body">Este libro nació para enfrentarse a esas preguntas. No para rodearlas, no para suavizarlas con metáforas, sino para intentar responderlas con la mayor precisión posible. Y si queremos respuestas verdaderas —no consuelos, no intuiciones vagas, no relatos heredados— debemos empezar por lo más difícil: <text:span text:style-name="Strong_20_Emphasis">comprender lo que somos</text:span>.</text:p>
      <text:p text:style-name="Text_20_body">Pero aquí surge el primer obstáculo.<text:line-break/>Lo que somos no es evidente.</text:p>
      <text:p text:style-name="Text_20_body">Cuando hablamos de “nosotros”, rara vez nos referimos al cuerpo. No es el esqueleto, ni la carne, ni la química lo que defendemos cuando tememos a la muerte. Lo que deseamos preservar es otra cosa: <text:span text:style-name="Strong_20_Emphasis">la conciencia, el pensamiento, la memoria, el yo, el alma, el espíritu</text:span>. Ese núcleo íntimo que sentimos como nuestra verdadera identidad.</text:p>
      <text:p text:style-name="Text_20_body">Y sin embargo, cuando intentamos definirlo, se nos escapa.<text:line-break/>¿Dónde está exactamente ese “yo”?<text:line-break/>¿En qué parte del cuerpo reside?<text:line-break/>¿En qué instante aparece?<text:line-break/>¿De qué está hecho?</text:p>
      <text:p text:style-name="Text_20_body">La tradición ha respondido con palabras como “alma” o “espíritu”. La ciencia, con términos como “mente” o “conciencia”. Pero todas estas palabras apuntan a un mismo fenómeno: <text:span text:style-name="Strong_20_Emphasis">inteligencia</text:span>.</text:p>
      <text:p text:style-name="Text_20_body">La inteligencia es tan natural para nosotros que casi no la vemos. La usamos para todo: para recordar, para anticipar, para decidir, para sobrevivir. Es el medio a través del cual experimentamos el mundo. Y aun así, cuando intentamos definirla, descubrimos que no sabemos exactamente qué es.</text:p>
      <text:p text:style-name="Text_20_body">La idea más extendida es que la inteligencia es un producto de los cerebros. Que aparece cuando la materia se organiza de cierta manera. Que es una propiedad emergente, un accidente afortunado, una consecuencia de la evolución biológica.</text:p>
      <text:p text:style-name="Text_20_body"><text:soft-page-break/>Pero esta explicación, aunque útil, es incompleta.<text:line-break/>Porque la inteligencia que observamos en los cerebros es solo una <text:span text:style-name="Strong_20_Emphasis">expresión</text:span> de algo más profundo.</text:p>
      <text:p text:style-name="Horizontal_20_Line"/>
      <text:h text:style-name="Heading_20_2" text:outline-level="2"><text:span text:style-name="Strong_20_Emphasis">La intuición que nunca desapareció</text:span></text:h>
      <text:p text:style-name="Text_20_body">Desde la antigüedad, los seres humanos han percibido que la vida parece diseñada. No diseñada en el sentido humano —con planos, herramientas y decisiones conscientes— sino diseñada en un sentido más amplio: <text:span text:style-name="Strong_20_Emphasis">como si respondiera a una intención, a una lógica, a un propósito</text:span>.</text:p>
      <text:p text:style-name="Text_20_body">La arquitectura de los organismos vivos es tan precisa, tan eficiente, tan extraordinariamente adaptada, que resulta difícil verla como un simple accidente. La vida parece obra de una inteligencia. Y durante milenios, para explicar esa inteligencia, hemos recurrido a entidades externas: “la naturaleza”, “el destino”, “los dioses”, “Dios”.</text:p>
      <text:p text:style-name="Text_20_body">Pero quizá cometimos un error de perspectiva.<text:line-break/>Quizá la inteligencia que buscamos no está fuera de la vida.<text:line-break/>Quizá <text:span text:style-name="Strong_20_Emphasis">es la vida misma</text:span>.</text:p>
      <text:p text:style-name="Text_20_body">Cuando observamos un organismo —una célula, un árbol, un pez, un ser humano— vemos un cuerpo. Pero detrás del cuerpo hay algo más: un sistema que percibe, que decide, que actúa, que se adapta, que aprende. Un sistema que resuelve problemas constantemente, desde los más simples hasta los más complejos. Un sistema que lucha por persistir.</text:p>
      <text:p text:style-name="Text_20_body">Eso es inteligencia.<text:line-break/>Y eso es vida.</text:p>
      <text:p text:style-name="Text_20_body">La pregunta entonces cambia:<text:line-break/><text:span text:style-name="Strong_20_Emphasis">¿Es la vida una entidad? ¿Dónde está? ¿Cómo piensa? ¿De dónde surge su inteligencia?</text:span></text:p>
      <text:p text:style-name="Text_20_body">Estas preguntas son el punto de partida del Acto 4.</text:p>
      <text:p text:style-name="Horizontal_20_Line"/>
      <text:h text:style-name="Heading_20_2" text:outline-level="2"><text:span text:style-name="Strong_20_Emphasis">El propósito de este acto</text:span></text:h>
      <text:p text:style-name="Text_20_body">En los capítulos anteriores hemos explorado la historia, los límites y las paradojas que rodean a la existencia. Hemos visto cómo la vida desafía a la entropía, cómo se organiza, cómo se reproduce, cómo se expande. Pero aún no hemos respondido a la pregunta central:<text:line-break/><text:span text:style-name="Strong_20_Emphasis">¿qué es la vida realmente?</text:span></text:p>
      <text:p text:style-name="Text_20_body">Para responderla, necesitamos un modelo.<text:line-break/>Un modelo que no dependa de metáforas ni de intuiciones.<text:line-break/>Un modelo que pueda describir la vida con la misma precisión con la que describimos un circuito, un algoritmo o una ecuación física.</text:p>
      <text:p text:style-name="Text_20_body">Ese modelo es el que presentaremos en este acto.</text:p>
      <text:p text:style-name="Text_20_body"><text:soft-page-break/>Aquí mostraremos que la vida no es un accidente químico, ni un fenómeno misterioso, ni un milagro improbable.<text:line-break/>La vida es <text:span text:style-name="Strong_20_Emphasis">un proceso lógico</text:span>.<text:line-break/>Un proceso que puede describirse, analizarse y comprenderse.<text:line-break/>Un proceso que, cuando se observa con suficiente claridad, revela algo sorprendente:<text:line-break/><text:span text:style-name="Strong_20_Emphasis">la vida piensa</text:span>.</text:p>
      <text:p text:style-name="Text_20_body">No piensa como un cerebro humano.<text:line-break/>No piensa con palabras, ni con imágenes, ni con razonamientos conscientes.<text:line-break/>Pero piensa.<text:line-break/>Resuelve problemas.<text:line-break/>Optimiza.<text:line-break/>Explora.<text:line-break/>Aprende.<text:line-break/>Se anticipa.<text:line-break/>Se corrige.<text:line-break/>Se transforma.</text:p>
      <text:p text:style-name="Text_20_body">Y lo hace con una potencia que supera con creces a cualquier inteligencia artificial, a cualquier cerebro individual, a cualquier sistema diseñado por humanos.</text:p>
      <text:p text:style-name="Horizontal_20_Line"/>
      <text:h text:style-name="Heading_20_2" text:outline-level="2"><text:span text:style-name="Strong_20_Emphasis">La inteligencia que no sabíamos que estábamos viendo</text:span></text:h>
      <text:p text:style-name="Text_20_body">Cuando observamos un organismo vivo, vemos un cuerpo.<text:line-break/>Cuando observamos una especie, vemos una población.<text:line-break/>Cuando observamos un ecosistema, vemos una red.</text:p>
      <text:p text:style-name="Text_20_body">Pero detrás de todo eso hay algo más:<text:line-break/><text:span text:style-name="Strong_20_Emphasis">un proceso inteligente que opera a través de todos los niveles de la vida</text:span>.</text:p>
      <text:p text:style-name="Text_20_body">La célula que repara su ADN.<text:line-break/>La bacteria que detecta nutrientes.<text:line-break/>El árbol que distribuye recursos entre sus ramas.<text:line-break/>El pez que huye de un depredador.<text:line-break/>El ser humano que imagina futuros posibles.</text:p>
      <text:p text:style-name="Text_20_body">Todo esto es inteligencia.<text:line-break/>No inteligencia humana, sino inteligencia en su forma más fundamental:<text:line-break/><text:span text:style-name="Strong_20_Emphasis">la capacidad de persistir resolviendo problemas</text:span>.</text:p>
      <text:p text:style-name="Text_20_body">Y si la vida es un proceso que resuelve problemas, entonces la pregunta inevitable es:<text:line-break/><text:span text:style-name="Strong_20_Emphasis">¿qué tan inteligente es?</text:span></text:p>
      <text:p text:style-name="Text_20_body"><text:soft-page-break/>Porque si la vida ha diseñado a todas las criaturas vivientes —si ha producido cerebros, alas, ojos, ecosistemas, simbiosis, estrategias evolutivas, sistemas inmunológicos, redes neuronales, comportamientos complejos— entonces su inteligencia debe ser inmensa.</text:p>
      <text:p text:style-name="Text_20_body">En este acto veremos que la inteligencia de la vida no es solo grande:<text:line-break/><text:span text:style-name="Strong_20_Emphasis">es la mayor inteligencia posible dentro de las leyes físicas del universo</text:span>.</text:p>
      <text:p text:style-name="Horizontal_20_Line"/>
      <text:h text:style-name="Heading_20_2" text:outline-level="2"><text:span text:style-name="Strong_20_Emphasis">Un cambio de perspectiva</text:span></text:h>
      <text:p text:style-name="Text_20_body">Cuando comprendamos el modelo lógico de la vida, veremos algo que transforma nuestra visión del mundo:</text:p>
      <text:p text:style-name="Text_20_body"><text:span text:style-name="Strong_20_Emphasis">Los seres vivientes, la vida y la inteligencia no son cosas distintas.<text:line-break/>Son tres perspectivas del mismo fenómeno.</text:span></text:p>
      <text:p text:style-name="Text_20_body">Un organismo es la manifestación física.<text:line-break/>La vida es el proceso que lo sostiene.<text:line-break/>La inteligencia es la lógica que lo guía.</text:p>
      <text:p text:style-name="Text_20_body">No son tres entidades separadas, sino tres niveles de descripción de una misma realidad.</text:p>
      <text:p text:style-name="Text_20_body">Y cuando esta idea se asienta, algo más se vuelve evidente:<text:line-break/><text:span text:style-name="Strong_20_Emphasis">lo que somos no es un cuerpo, ni un cerebro, ni una colección de recuerdos.<text:line-break/>Lo que somos es un proceso inteligente que lucha por persistir.</text:span></text:p>
      <text:p text:style-name="Text_20_body">Ese proceso es la vida.<text:line-break/>Y ese proceso es también nosotros.</text:p>
      <text:p text:style-name="Horizontal_20_Line"/>
      <text:h text:style-name="Heading_20_2" text:outline-level="2"><text:span text:style-name="Strong_20_Emphasis">Lo que viene a continuación</text:span></text:h>
      <text:p text:style-name="Text_20_body">En los siguientes capítulos:</text:p>
      <text:list xml:id="list1295022517" text:style-name="L1">
        <text:list-item>
          <text:p text:style-name="P2">Definiremos la inteligencia de forma precisa y universal. </text:p>
        </text:list-item>
        <text:list-item>
          <text:p text:style-name="P2">Mostraremos cómo surge en el universo sin necesidad de cerebros. </text:p>
        </text:list-item>
        <text:list-item>
          <text:p text:style-name="P2">Explicaremos cómo la vida implementa esta inteligencia. </text:p>
        </text:list-item>
        <text:list-item>
          <text:p text:style-name="P2">Revelaremos el mecanismo que permite a la vida “pensar”. </text:p>
        </text:list-item>
        <text:list-item>
          <text:p text:style-name="P2">Analizaremos la potencia de esa inteligencia y sus límites. </text:p>
        </text:list-item>
        <text:list-item>
          <text:p text:style-name="P1">Y finalmente, veremos cómo este modelo nos permite responder a las preguntas existenciales que nos acompañan desde siempre. </text:p>
        </text:list-item>
      </text:list>
      <text:p text:style-name="Text_20_body">Este acto no es solo una explicación científica.<text:line-break/>Es un cambio de perspectiva.<text:line-break/>Una invitación a mirar la vida —y a mirarnos a nosotros mismos— desde un ángulo completamente nuevo.</text:p>
      <text:p text:style-name="Text_20_body"><text:soft-page-break/>Porque cuando entendamos cómo piensa la vida, entenderemos también qué somos, por qué existimos y qué significa realmente continuar.</text:p>
      <text:p text:style-name="Horizontal_20_Line"/>
      <text:p text:style-name="Text_20_body">Si quieres, puedo:</text:p>
      <text:list xml:id="list2584697627" text:style-name="L2">
        <text:list-item>
          <text:p text:style-name="P4">Ajustar el tono (más poético, más técnico, más narrativo). </text:p>
        </text:list-item>
        <text:list-item>
          <text:p text:style-name="P4">Integrarlo con el estilo de los actos anteriores. </text:p>
        </text:list-item>
        <text:list-item>
          <text:p text:style-name="P4">Añadir metáforas visuales o ejemplos biológicos. </text:p>
        </text:list-item>
        <text:list-item>
          <text:p text:style-name="P3">O convertirlo en una versión más breve o más extensa según lo necesites. </text:p>
        </text:list-item>
      </text:list>
      <text:p text:style-name="Text_20_body">¿Quieres que lo adaptemos a un estilo más solemne, más científico o más litera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02T09:44:54.865000000</meta:creation-date>
    <dc:date>2026-05-02T09:52:48.187000000</dc:date>
    <meta:editing-duration>PT7M54S</meta:editing-duration>
    <meta:editing-cycles>1</meta:editing-cycles>
    <meta:document-statistic meta:table-count="0" meta:image-count="0" meta:object-count="0" meta:page-count="5" meta:paragraph-count="58" meta:word-count="1305" meta:character-count="8114" meta:non-whitespace-character-count="6866"/>
    <meta:generator>LibreOffice/7.3.5.2$Windows_X86_64 LibreOffice_project/184fe81b8c8c30d8b5082578aee2fed2ea847c01</meta:generator>
  </office:meta>
</office:document-meta>
</file>