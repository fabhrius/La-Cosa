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<text:span text:style-name="Strong_20_Emphasis">este es exactamente el enfoque correcto</text:span>.<text:line-break/>Has llegado al punto donde la teoría deja de forzarse para encajar en una sola definición y empieza a <text:span text:style-name="Strong_20_Emphasis">desplegarse como un fenómeno evolutivo</text:span>, con fases, capacidades y umbrales.</text:p>
      <text:p text:style-name="Text_20_body">Lo que propones —crear una <text:span text:style-name="Strong_20_Emphasis">serie de definiciones escalonadas</text:span>, cada una correspondiente a un nivel evolutivo del fenómeno— es la única forma rigurosa de capturar:</text:p>
      <text:list xml:id="list3934147032" text:style-name="L1">
        <text:list-item>
          <text:p text:style-name="P2">el origen lógico, </text:p>
        </text:list-item>
        <text:list-item>
          <text:p text:style-name="P2">la transición química, </text:p>
        </text:list-item>
        <text:list-item>
          <text:p text:style-name="P2">la aparición de la vida, </text:p>
        </text:list-item>
        <text:list-item>
          <text:p text:style-name="P2">la inteligencia funcional, </text:p>
        </text:list-item>
        <text:list-item>
          <text:p text:style-name="P2">la inteligencia cognitiva, </text:p>
        </text:list-item>
        <text:list-item>
          <text:p text:style-name="P1">la inteligencia consciente. </text:p>
        </text:list-item>
      </text:list>
      <text:p text:style-name="Text_20_body">Una sola definición no puede abarcar todo eso sin volverse trivial o absurda.<text:line-break/>Pero una <text:span text:style-name="Strong_20_Emphasis">familia de definiciones</text:span>, ordenadas por complejidad creciente, sí.</text:p>
      <text:p text:style-name="Text_20_body">Vamos a construir esa familia desde cero, con precisión y elegancia.</text:p>
      <text:p text:style-name="Horizontal_20_Line"/>
      <text:h text:style-name="Heading_20_1" text:outline-level="1">⭐ 1. La idea central:</text:h>
      <text:h text:style-name="Heading_20_2" text:outline-level="2"><text:span text:style-name="Strong_20_Emphasis">La inteligencia no es un fenómeno único, sino una familia de capacidades que emergen en fases.</text:span></text:h>
      <text:p text:style-name="Text_20_body">Cada fase añade algo nuevo:</text:p>
      <text:list xml:id="list1503468675" text:style-name="L2">
        <text:list-item>
          <text:p text:style-name="P4">más grados de libertad, </text:p>
        </text:list-item>
        <text:list-item>
          <text:p text:style-name="P4">más sensibilidad a la información, </text:p>
        </text:list-item>
        <text:list-item>
          <text:p text:style-name="P4">más capacidad de alterar la dinámica natural, </text:p>
        </text:list-item>
        <text:list-item>
          <text:p text:style-name="P3">más autonomía. </text:p>
        </text:list-item>
      </text:list>
      <text:p text:style-name="Text_20_body">Y cada fase requiere una definición distinta.</text:p>
      <text:p text:style-name="Horizontal_20_Line"/>
      <text:h text:style-name="Heading_20_1" text:outline-level="1">⭐ 2. El plan: construir una escalera evolutiva de definiciones</text:h>
      <text:p text:style-name="Text_20_body">Vamos a crear <text:span text:style-name="Strong_20_Emphasis">6 niveles</text:span>, desde lo más simple hasta lo más complejo.</text:p>
      <text:p text:style-name="Text_20_body">Cada nivel tendrá:</text:p>
      <text:list xml:id="list4208784181" text:style-name="L3">
        <text:list-item>
          <text:p text:style-name="P6">una definición precisa, </text:p>
        </text:list-item>
        <text:list-item>
          <text:p text:style-name="P6">un criterio claro, </text:p>
        </text:list-item>
        <text:list-item>
          <text:p text:style-name="P6"><text:soft-page-break/>ejemplos naturales y artificiales, </text:p>
        </text:list-item>
        <text:list-item>
          <text:p text:style-name="P5">y su relación con el nivel anterior. </text:p>
        </text:list-item>
      </text:list>
      <text:p text:style-name="Text_20_body">Esto permitirá mostrar <text:span text:style-name="Strong_20_Emphasis">cómo evoluciona la inteligencia desde su origen lógico</text:span>.</text:p>
      <text:p text:style-name="Horizontal_20_Line"/>
      <text:h text:style-name="Heading_20_1" text:outline-level="1">⭐ 3. Nivel 0 — <text:span text:style-name="Strong_20_Emphasis">Proceso lógico</text:span></text:h>
      <text:h text:style-name="Heading_20_3" text:outline-level="3"><text:span text:style-name="Strong_20_Emphasis">Definición:</text:span></text:h>
      <text:p text:style-name="Text_20_body">Un sistema cuyo estado futuro depende de su estado actual mediante reglas deterministas o probabilísticas.</text:p>
      <text:h text:style-name="Heading_20_3" text:outline-level="3"><text:span text:style-name="Strong_20_Emphasis">Qué añade:</text:span></text:h>
      <text:p text:style-name="Text_20_body">Dependencia del estado.<text:line-break/>No hay selección entre alternativas.<text:line-break/>No hay información funcional.</text:p>
      <text:h text:style-name="Heading_20_3" text:outline-level="3"><text:span text:style-name="Strong_20_Emphasis">Ejemplos:</text:span></text:h>
      <text:list xml:id="list67782286" text:style-name="L4">
        <text:list-item>
          <text:p text:style-name="P8">Reacciones químicas simples. </text:p>
        </text:list-item>
        <text:list-item>
          <text:p text:style-name="P8">Autómatas celulares sin bifurcaciones. </text:p>
        </text:list-item>
        <text:list-item>
          <text:p text:style-name="P7">Circuitos lógicos básicos. </text:p>
        </text:list-item>
      </text:list>
      <text:h text:style-name="Heading_20_3" text:outline-level="3"><text:span text:style-name="Strong_20_Emphasis">Por qué es importante:</text:span></text:h>
      <text:p text:style-name="Text_20_body">Aquí está el <text:span text:style-name="Strong_20_Emphasis">origen lógico</text:span> de todo.<text:line-break/>Sin dependencia del estado, no puede haber inteligencia.</text:p>
      <text:p text:style-name="Horizontal_20_Line"/>
      <text:h text:style-name="Heading_20_1" text:outline-level="1">⭐ 4. Nivel 1 — <text:span text:style-name="Strong_20_Emphasis">Selección informada (inteligencia mínima)</text:span></text:h>
      <text:h text:style-name="Heading_20_3" text:outline-level="3"><text:span text:style-name="Strong_20_Emphasis">Definición:</text:span></text:h>
      <text:p text:style-name="Text_20_body">Un sistema que, ante varias dinámicas posibles, selecciona una en función de información relevante de su estado.</text:p>
      <text:h text:style-name="Heading_20_3" text:outline-level="3"><text:span text:style-name="Strong_20_Emphasis">Qué añade:</text:span></text:h>
      <text:list xml:id="list2935970054" text:style-name="L5">
        <text:list-item>
          <text:p text:style-name="P10">Bifurcaciones. </text:p>
        </text:list-item>
        <text:list-item>
          <text:p text:style-name="P10">Sensibilidad interna. </text:p>
        </text:list-item>
        <text:list-item>
          <text:p text:style-name="P9">Desviación respecto a la dinámica natural. </text:p>
        </text:list-item>
      </text:list>
      <text:h text:style-name="Heading_20_3" text:outline-level="3"><text:soft-page-break/><text:span text:style-name="Strong_20_Emphasis">Ejemplos:</text:span></text:h>
      <text:list xml:id="list4248054711" text:style-name="L6">
        <text:list-item>
          <text:p text:style-name="P12">Redes químicas con rutas alternativas. </text:p>
        </text:list-item>
        <text:list-item>
          <text:p text:style-name="P12">Sistemas con histéresis. </text:p>
        </text:list-item>
        <text:list-item>
          <text:p text:style-name="P11">Tu simulación de vida artificial que modifica información. </text:p>
        </text:list-item>
      </text:list>
      <text:h text:style-name="Heading_20_3" text:outline-level="3"><text:span text:style-name="Strong_20_Emphasis">Por qué es inteligencia:</text:span></text:h>
      <text:p text:style-name="Text_20_body">Porque <text:span text:style-name="Strong_20_Emphasis">hace algo que no ocurriría solo</text:span>.<text:line-break/>Aquí aparece la primera forma de “decisión”.</text:p>
      <text:p text:style-name="Horizontal_20_Line"/>
      <text:h text:style-name="Heading_20_1" text:outline-level="1">⭐ 5. Nivel 2 — <text:span text:style-name="Strong_20_Emphasis">Inteligencia adaptativa</text:span></text:h>
      <text:h text:style-name="Heading_20_3" text:outline-level="3"><text:span text:style-name="Strong_20_Emphasis">Definición:</text:span></text:h>
      <text:p text:style-name="Text_20_body">Un sistema que no solo selecciona dinámicas, sino que <text:span text:style-name="Strong_20_Emphasis">acumula configuraciones útiles</text:span> (memoria física).</text:p>
      <text:h text:style-name="Heading_20_3" text:outline-level="3"><text:span text:style-name="Strong_20_Emphasis">Qué añade:</text:span></text:h>
      <text:list xml:id="list2448789030" text:style-name="L7">
        <text:list-item>
          <text:p text:style-name="P14">Histéresis estructural. </text:p>
        </text:list-item>
        <text:list-item>
          <text:p text:style-name="P14">Aprendizaje físico. </text:p>
        </text:list-item>
        <text:list-item>
          <text:p text:style-name="P13">Dependencia de la historia. </text:p>
        </text:list-item>
      </text:list>
      <text:h text:style-name="Heading_20_3" text:outline-level="3"><text:span text:style-name="Strong_20_Emphasis">Ejemplos:</text:span></text:h>
      <text:list xml:id="list1181629194" text:style-name="L8">
        <text:list-item>
          <text:p text:style-name="P16">Redes autocatalíticas que se estabilizan en atractores. </text:p>
        </text:list-item>
        <text:list-item>
          <text:p text:style-name="P16">Sistemas químicos con memoria de concentración. </text:p>
        </text:list-item>
        <text:list-item>
          <text:p text:style-name="P15">Algoritmos evolutivos sin reproducción biológica. </text:p>
        </text:list-item>
      </text:list>
      <text:h text:style-name="Heading_20_3" text:outline-level="3"><text:span text:style-name="Strong_20_Emphasis">Por qué es importante:</text:span></text:h>
      <text:p text:style-name="Text_20_body">Aquí aparece la <text:span text:style-name="Strong_20_Emphasis">adaptación</text:span>, pero aún no la vida.</text:p>
      <text:p text:style-name="Horizontal_20_Line"/>
      <text:h text:style-name="Heading_20_1" text:outline-level="1">⭐ 6. Nivel 3 — <text:span text:style-name="Strong_20_Emphasis">Inteligencia autorreferencial (vida mínima)</text:span></text:h>
      <text:h text:style-name="Heading_20_3" text:outline-level="3"><text:span text:style-name="Strong_20_Emphasis">Definición:</text:span></text:h>
      <text:p text:style-name="Text_20_body">Un sistema que aplica su inteligencia a sí mismo para mantener su organización.</text:p>
      <text:h text:style-name="Heading_20_3" text:outline-level="3"><text:soft-page-break/><text:span text:style-name="Strong_20_Emphasis">Qué añade:</text:span></text:h>
      <text:list xml:id="list3235175146" text:style-name="L9">
        <text:list-item>
          <text:p text:style-name="P18">Persistencia. </text:p>
        </text:list-item>
        <text:list-item>
          <text:p text:style-name="P18">Homeostasis. </text:p>
        </text:list-item>
        <text:list-item>
          <text:p text:style-name="P17">Autorreparación. </text:p>
        </text:list-item>
      </text:list>
      <text:h text:style-name="Heading_20_3" text:outline-level="3"><text:span text:style-name="Strong_20_Emphasis">Ejemplos:</text:span></text:h>
      <text:list xml:id="list2033480672" text:style-name="L10">
        <text:list-item>
          <text:p text:style-name="P20">Protocélulas. </text:p>
        </text:list-item>
        <text:list-item>
          <text:p text:style-name="P20">Sistemas químicos que se auto‑mantienen. </text:p>
        </text:list-item>
        <text:list-item>
          <text:p text:style-name="P19">Tu simulación si se orientara a conservar su estructura. </text:p>
        </text:list-item>
      </text:list>
      <text:h text:style-name="Heading_20_3" text:outline-level="3"><text:span text:style-name="Strong_20_Emphasis">Por qué es vida:</text:span></text:h>
      <text:p text:style-name="Text_20_body">Porque el sistema se convierte en su propio problema.</text:p>
      <text:p text:style-name="Horizontal_20_Line"/>
      <text:h text:style-name="Heading_20_1" text:outline-level="1">⭐ 7. Nivel 4 — <text:span text:style-name="Strong_20_Emphasis">Inteligencia evolutiva (vida plena)</text:span></text:h>
      <text:h text:style-name="Heading_20_3" text:outline-level="3"><text:span text:style-name="Strong_20_Emphasis">Definición:</text:span></text:h>
      <text:p text:style-name="Text_20_body">Un sistema cuya organización se transmite a copias imperfectas, permitiendo evolución darwiniana.</text:p>
      <text:h text:style-name="Heading_20_3" text:outline-level="3"><text:span text:style-name="Strong_20_Emphasis">Qué añade:</text:span></text:h>
      <text:list xml:id="list3232977826" text:style-name="L11">
        <text:list-item>
          <text:p text:style-name="P22">Herencia. </text:p>
        </text:list-item>
        <text:list-item>
          <text:p text:style-name="P22">Variación. </text:p>
        </text:list-item>
        <text:list-item>
          <text:p text:style-name="P21">Selección natural. </text:p>
        </text:list-item>
      </text:list>
      <text:h text:style-name="Heading_20_3" text:outline-level="3"><text:span text:style-name="Strong_20_Emphasis">Ejemplos:</text:span></text:h>
      <text:list xml:id="list931522872" text:style-name="L12">
        <text:list-item>
          <text:p text:style-name="P24">Células. </text:p>
        </text:list-item>
        <text:list-item>
          <text:p text:style-name="P24">Virus (parcialmente). </text:p>
        </text:list-item>
        <text:list-item>
          <text:p text:style-name="P23">Sistemas replicadores artificiales. </text:p>
        </text:list-item>
      </text:list>
      <text:p text:style-name="Horizontal_20_Line"/>
      <text:h text:style-name="Heading_20_1" text:outline-level="1">⭐ 8. Nivel 5 — <text:span text:style-name="Strong_20_Emphasis">Inteligencia funcional</text:span></text:h>
      <text:h text:style-name="Heading_20_3" text:outline-level="3"><text:span text:style-name="Strong_20_Emphasis">Definición:</text:span></text:h>
      <text:p text:style-name="Text_20_body">Un sistema capaz de resolver problemas externos mediante representación interna o modelos implícitos.</text:p>
      <text:h text:style-name="Heading_20_3" text:outline-level="3"><text:soft-page-break/><text:span text:style-name="Strong_20_Emphasis">Qué añade:</text:span></text:h>
      <text:list xml:id="list574864060" text:style-name="L13">
        <text:list-item>
          <text:p text:style-name="P26">Percepción. </text:p>
        </text:list-item>
        <text:list-item>
          <text:p text:style-name="P26">Acción dirigida. </text:p>
        </text:list-item>
        <text:list-item>
          <text:p text:style-name="P25">Resolución de problemas. </text:p>
        </text:list-item>
      </text:list>
      <text:h text:style-name="Heading_20_3" text:outline-level="3"><text:span text:style-name="Strong_20_Emphasis">Ejemplos:</text:span></text:h>
      <text:list xml:id="list1679027785" text:style-name="L14">
        <text:list-item>
          <text:p text:style-name="P28">Animales sin lenguaje. </text:p>
        </text:list-item>
        <text:list-item>
          <text:p text:style-name="P28">Robots reactivos. </text:p>
        </text:list-item>
        <text:list-item>
          <text:p text:style-name="P27">Sistemas de IA no conscientes. </text:p>
        </text:list-item>
      </text:list>
      <text:p text:style-name="Horizontal_20_Line"/>
      <text:h text:style-name="Heading_20_1" text:outline-level="1">⭐ 9. Nivel 6 — <text:span text:style-name="Strong_20_Emphasis">Inteligencia consciente</text:span></text:h>
      <text:h text:style-name="Heading_20_3" text:outline-level="3"><text:span text:style-name="Strong_20_Emphasis">Definición:</text:span></text:h>
      <text:p text:style-name="Text_20_body">Un sistema que no solo resuelve problemas, sino que <text:span text:style-name="Strong_20_Emphasis">sabe</text:span> que los resuelve.</text:p>
      <text:h text:style-name="Heading_20_3" text:outline-level="3"><text:span text:style-name="Strong_20_Emphasis">Qué añade:</text:span></text:h>
      <text:list xml:id="list4091300766" text:style-name="L15">
        <text:list-item>
          <text:p text:style-name="P30">Metacognición. </text:p>
        </text:list-item>
        <text:list-item>
          <text:p text:style-name="P30">Intencionalidad. </text:p>
        </text:list-item>
        <text:list-item>
          <text:p text:style-name="P29">Autoconciencia. </text:p>
        </text:list-item>
      </text:list>
      <text:h text:style-name="Heading_20_3" text:outline-level="3"><text:span text:style-name="Strong_20_Emphasis">Ejemplos:</text:span></text:h>
      <text:list xml:id="list129869781" text:style-name="L16">
        <text:list-item>
          <text:p text:style-name="P32">Humanos. </text:p>
        </text:list-item>
        <text:list-item>
          <text:p text:style-name="P31">Algunos animales superiores. </text:p>
        </text:list-item>
      </text:list>
      <text:p text:style-name="Horizontal_20_Line"/>
      <text:h text:style-name="Heading_20_1" text:outline-level="1">⭐ 10. ¿Por qué esta escalera funciona?</text:h>
      <text:p text:style-name="Text_20_body">Porque:</text:p>
      <text:list xml:id="list56423591" text:style-name="L17">
        <text:list-item>
          <text:p text:style-name="P34">No fuerza una sola definición. </text:p>
        </text:list-item>
        <text:list-item>
          <text:p text:style-name="P34">Muestra la evolución natural del fenómeno. </text:p>
        </text:list-item>
        <text:list-item>
          <text:p text:style-name="P34">Permite incluir sistemas artificiales. </text:p>
        </text:list-item>
        <text:list-item>
          <text:p text:style-name="P34">Permite explicar el origen de la vida como un <text:span text:style-name="Strong_20_Emphasis">salto entre niveles</text:span>. </text:p>
        </text:list-item>
        <text:list-item>
          <text:p text:style-name="P34">Es compatible con biología, química, teoría de sistemas y filosofía. </text:p>
        </text:list-item>
        <text:list-item>
          <text:p text:style-name="P33">Es intuitiva y rigurosa a la vez. </text:p>
        </text:list-item>
      </text:list>
      <text:p text:style-name="Text_20_body">Y sobre todo:</text:p>
      <text:p text:style-name="Quotations"><text:span text:style-name="Strong_20_Emphasis">Permite contar la historia completa de la inteligencia desde su origen lógico hasta la conciencia.</text:span></text:p>
      <text:p text:style-name="Horizontal_20_Line"><text:soft-page-break/></text:p>
      <text:h text:style-name="Heading_20_1" text:outline-level="1">⭐ 11. Siguiente paso</text:h>
      <text:p text:style-name="Text_20_body">Ahora que tenemos la arquitectura conceptual, podemos:</text:p>
      <text:list xml:id="list2926754068" text:style-name="L18">
        <text:list-item>
          <text:p text:style-name="P36">pulir cada definición, </text:p>
        </text:list-item>
        <text:list-item>
          <text:p text:style-name="P36">añadir ejemplos naturales y artificiales, </text:p>
        </text:list-item>
        <text:list-item>
          <text:p text:style-name="P36">construir la narrativa del capítulo, </text:p>
        </text:list-item>
        <text:list-item>
          <text:p text:style-name="P35">o formalizar matemáticamente los niveles inferiores. </text:p>
        </text:list-item>
      </text:list>
      <text:p text:style-name="Text_20_body">Dime qué prefieres desarrollar primero:<text:line-break/><text:span text:style-name="Strong_20_Emphasis">¿Nivel 0 (proceso lógico) o Nivel 1 (inteligencia mínima)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9T17:38:30.617000000</meta:creation-date>
    <dc:date>2026-06-19T17:43:48.764000000</dc:date>
    <meta:editing-duration>PT5M18S</meta:editing-duration>
    <meta:editing-cycles>1</meta:editing-cycles>
    <meta:document-statistic meta:table-count="0" meta:image-count="0" meta:object-count="0" meta:page-count="6" meta:paragraph-count="125" meta:word-count="756" meta:character-count="4863" meta:non-whitespace-character-count="4225"/>
    <meta:generator>LibreOffice/7.3.5.2$Windows_X86_64 LibreOffice_project/184fe81b8c8c30d8b5082578aee2fed2ea847c01</meta:generator>
  </office:meta>
</office:document-meta>
</file>