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officeooo:rsid="00070f58" officeooo:paragraph-rsid="00070f58"/>
    </style:style>
    <style:style style:name="P5" style:family="paragraph" style:parent-style-name="Text_20_body" style:list-style-name="L4"/>
    <style:style style:name="P6" style:family="paragraph" style:parent-style-name="Text_20_body">
      <style:text-properties fo:color="#c9211e" loext:opacity="100%"/>
    </style:style>
    <style:style style:name="P7" style:family="paragraph" style:parent-style-name="Text_20_body">
      <style:text-properties fo:color="#c9211e" loext:opacity="100%" officeooo:rsid="00070f58" officeooo:paragraph-rsid="00070f5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6">no es la vida la evolucion natural de la inteligencia quimica?</text:p>
      <text:p text:style-name="Text_20_body"/>
      <text:p text:style-name="Horizontal_20_Line"/>
      <text:p text:style-name="Text_20_body"/>
      <text:p text:style-name="Text_20_body"/>
      <text:p text:style-name="Text_20_body">Esa es una hipótesis filosófica y científica bastante plausible, aunque no es la visión dominante en biología.</text:p>
      <text:p text:style-name="Text_20_body">La explicación más común es:</text:p>
      <text:p text:style-name="Quotations">materia → química compleja → vida → inteligencia</text:p>
      <text:p text:style-name="Text_20_body">En ese esquema, la inteligencia aparece mucho después de la vida.</text:p>
      <text:p text:style-name="Text_20_body">Pero existe otra forma de verlo:</text:p>
      <text:p text:style-name="Quotations">materia → sistemas que procesan información → inteligencia química → vida → inteligencia biológica</text:p>
      <text:p text:style-name="Text_20_body">Aquí la vida no sería el origen de la inteligencia, sino una etapa avanzada de una tendencia más fundamental de ciertos sistemas físicos a organizar información y adaptarse.</text:p>
      <text:p text:style-name="Text_20_body">La idea gana fuerza cuando observamos que muchos rasgos que asociamos con la inteligencia tienen versiones prebiológicas:</text:p>
      <text:list xml:id="list1031477001" text:style-name="L1">
        <text:list-item>
          <text:p text:style-name="P1">Las redes químicas pueden almacenar información en sus concentraciones y estructuras.</text:p>
        </text:list-item>
        <text:list-item>
          <text:p text:style-name="P1">Los sistemas autocatalíticos pueden amplificar ciertas configuraciones y suprimir otras.</text:p>
        </text:list-item>
        <text:list-item>
          <text:p text:style-name="P1">Algunos sistemas químicos muestran memoria, histéresis y dependencia de la historia previa.</text:p>
        </text:list-item>
        <text:list-item>
          <text:p text:style-name="P1">La selección entre atractores puede funcionar como una forma elemental de toma de decisiones.</text:p>
        </text:list-item>
        <text:list-item>
          <text:p text:style-name="P1">La autoorganización permite respuestas adaptativas a perturbaciones externas.</text:p>
        </text:list-item>
      </text:list>
      <text:p text:style-name="Text_20_body">Desde esta perspectiva, la aparición de la vida podría interpretarse como un salto en la capacidad de un sistema para conservar y utilizar información sobre sí mismo.</text:p>
      <text:p text:style-name="Text_20_body">Lo que llamamos "vida" añadiría varias capacidades nuevas:</text:p>
      <text:list xml:id="list1812387669" text:style-name="L2">
        <text:list-item>
          <text:p text:style-name="P2">autorreproducción,</text:p>
        </text:list-item>
        <text:list-item>
          <text:p text:style-name="P2">herencia estable,</text:p>
        </text:list-item>
        <text:list-item>
          <text:p text:style-name="P2">evolución darwiniana,</text:p>
        </text:list-item>
        <text:list-item>
          <text:p text:style-name="P2">mantenimiento activo de la organización interna.</text:p>
        </text:list-item>
      </text:list>
      <text:p text:style-name="Text_20_body"><text:soft-page-break/>En ese sentido, la vida podría verse como una forma particularmente exitosa de inteligencia química, capaz de persistir y complejizarse a lo largo del tiempo.</text:p>
      <text:p text:style-name="Text_20_body">Algunos investigadores han defendido ideas cercanas. Por ejemplo, Stuart Kauffman ha estudiado redes autocatalíticas como posibles precursores de la vida. Terrence Deacon ha argumentado que la agencia y la organización biológica emergen gradualmente de procesos físico-químicos. Y Jeremy England ha explorado cómo ciertas estructuras materiales pueden adaptarse a flujos de energía de maneras que recuerdan aspectos de los sistemas vivos.</text:p>
      <text:p text:style-name="Text_20_body">La pregunta profunda es si la vida es:</text:p>
      <text:list xml:id="list50335468" text:style-name="L3">
        <text:list-item>
          <text:p text:style-name="P3">una consecuencia accidental de la química compleja, o</text:p>
        </text:list-item>
        <text:list-item>
          <text:p text:style-name="P3">la cristalización de una tendencia más general de la materia a procesar información y construir organización persistente.</text:p>
        </text:list-item>
      </text:list>
      <text:p text:style-name="Text_20_body">Si adoptas la segunda postura, entonces sí: la vida puede entenderse como la evolución natural de una forma de "inteligencia química". La dificultad está en que la palabra "inteligencia" suele reservarse para sistemas mucho más sofisticados, por lo que muchos científicos preferirían hablar de <text:span text:style-name="Strong_20_Emphasis">procesamiento de información adaptativo</text:span>, <text:span text:style-name="Strong_20_Emphasis">agencia mínima</text:span> o <text:span text:style-name="Strong_20_Emphasis">cognición basal</text:span> antes que de inteligencia propiamente dicha.</text:p>
      <text:p text:style-name="Text_20_body">En cierto modo, la diferencia es conceptual: ¿consideramos la inteligencia como algo que apareció tarde en la evolución biológica, o como una propiedad emergente que ya estaba presente, en forma rudimentaria, en la dinámica de ciertos sistemas químicos antes de que existieran las primeras células? Esa sigue siendo una cuestión abierta.</text:p>
      <text:p text:style-name="Standard"/>
      <text:p text:style-name="Standard"/>
      <text:p text:style-name="Horizontal_20_Line"/>
      <text:p text:style-name="Text_20_body"/>
      <text:p text:style-name="P7">que es inteligencia?</text:p>
      <text:p text:style-name="P4"/>
      <text:p text:style-name="Horizontal_20_Line"/>
      <text:p text:style-name="Text_20_body"/>
      <text:p text:style-name="Text_20_body"/>
      <text:p text:style-name="Text_20_body">No existe una definición universalmente aceptada, y la definición mínima depende mucho del marco teórico que adoptes.</text:p>
      <text:p text:style-name="Text_20_body">Algunas posibilidades, ordenadas de más exigentes a más generales:</text:p>
      <text:h text:style-name="Heading_20_3" text:outline-level="3">1. Inteligencia como resolución de problemas</text:h>
      <text:p text:style-name="Text_20_body">Una definición clásica sería:</text:p>
      <text:p text:style-name="Quotations">La capacidad de alcanzar objetivos en una variedad de entornos.</text:p>
      <text:p text:style-name="Text_20_body"><text:soft-page-break/>Esta idea está asociada a investigadores como Legg and Hutter. Bajo esta definición, una bacteria, un animal y un sistema de IA pueden poseer distintos grados de inteligencia.</text:p>
      <text:h text:style-name="Heading_20_3" text:outline-level="3">2. Inteligencia como adaptación</text:h>
      <text:p text:style-name="Text_20_body">Una definición más mínima:</text:p>
      <text:p text:style-name="Quotations">La capacidad de modificar el comportamiento en respuesta a información relevante del entorno.</text:p>
      <text:p text:style-name="Text_20_body">Aquí ya entran organismos muy simples e incluso algunos sistemas artificiales.</text:p>
      <text:h text:style-name="Heading_20_3" text:outline-level="3">3. Inteligencia como procesamiento de información orientado a la persistencia</text:h>
      <text:p text:style-name="Text_20_body">Si te interesan las redes autocatalíticas, podrías definirla como:</text:p>
      <text:p text:style-name="Quotations">La capacidad de usar información para mantener o mejorar la propia organización frente a perturbaciones.</text:p>
      <text:p text:style-name="Text_20_body">Esta definición conecta inteligencia con supervivencia, homeostasis y autoorganización.</text:p>
      <text:h text:style-name="Heading_20_3" text:outline-level="3">4. Inteligencia como selección de acciones entre alternativas</text:h>
      <text:p text:style-name="Text_20_body">Una definición aún más elemental:</text:p>
      <text:p text:style-name="Quotations">La capacidad de seleccionar entre múltiples estados o respuestas en función de información disponible.</text:p>
      <text:p text:style-name="Text_20_body">El problema es que esta definición puede incluir sistemas muy simples, como termostatos o ciertos circuitos químicos, por lo que algunos la consideran demasiado amplia.</text:p>
      <text:h text:style-name="Heading_20_3" text:outline-level="3">5. La definición más mínima posible</text:h>
      <text:p text:style-name="Text_20_body">Si buscamos el límite inferior absoluto, podríamos decir:</text:p>
      <text:p text:style-name="Quotations">Inteligencia es la capacidad de que el estado futuro de un sistema dependa de información sobre su situación actual de una manera que no sea completamente aleatoria.</text:p>
      <text:p text:style-name="Text_20_body">Pero aquí casi cualquier sistema de control entraría en la categoría, y la palabra "inteligencia" pierde gran parte de su significado habitual.</text:p>
      <text:p text:style-name="Horizontal_20_Line"/>
      <text:p text:style-name="Text_20_body">Para la línea de pensamiento que has venido explorando (atractores, redes autocatalíticas y origen de la vida), una definición interesante podría ser:</text:p>
      <text:p text:style-name="Quotations"><text:span text:style-name="Strong_20_Emphasis">La inteligencia es la capacidad de un sistema para utilizar información interna y externa para seleccionar dinámicas que favorezcan la continuidad de su organización.</text:span></text:p>
      <text:p text:style-name="Text_20_body">Con esta definición:</text:p>
      <text:list xml:id="list932601546" text:style-name="L4">
        <text:list-item>
          <text:p text:style-name="P5">un cristal no sería inteligente;</text:p>
        </text:list-item>
        <text:list-item>
          <text:p text:style-name="P5"><text:soft-page-break/>una red autocatalítica adaptativa podría exhibir inteligencia mínima;</text:p>
        </text:list-item>
        <text:list-item>
          <text:p text:style-name="P5">una célula tendría más inteligencia;</text:p>
        </text:list-item>
        <text:list-item>
          <text:p text:style-name="P5">un cerebro sería una forma extremadamente desarrollada de la misma propiedad fundamental.</text:p>
        </text:list-item>
      </text:list>
      <text:p text:style-name="Text_20_body">La cuestión crucial es si exiges <text:span text:style-name="Strong_20_Emphasis">representación</text:span>, <text:span text:style-name="Strong_20_Emphasis">aprendizaje</text:span> o <text:span text:style-name="Strong_20_Emphasis">objetivos explícitos</text:span>. Si los exiges, la inteligencia aparece bastante tarde en la evolución. Si no los exiges y te basta con la selección adaptativa basada en información, entonces la inteligencia podría preceder a la vida y la vida sería una de sus manifestaciones más complejas. Esa es una posición minoritaria, pero filosóficamente coherente.</text:p>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17T20:10:47.494000000</meta:creation-date>
    <dc:date>2026-06-17T20:15:06.892000000</dc:date>
    <meta:editing-duration>PT4M19S</meta:editing-duration>
    <meta:editing-cycles>1</meta:editing-cycles>
    <meta:document-statistic meta:table-count="0" meta:image-count="0" meta:object-count="0" meta:page-count="4" meta:paragraph-count="58" meta:word-count="869" meta:character-count="5885" meta:non-whitespace-character-count="5089"/>
    <meta:generator>LibreOffice/7.3.5.2$Windows_X86_64 LibreOffice_project/184fe81b8c8c30d8b5082578aee2fed2ea847c01</meta:generator>
  </office:meta>
</office:document-meta>
</file>