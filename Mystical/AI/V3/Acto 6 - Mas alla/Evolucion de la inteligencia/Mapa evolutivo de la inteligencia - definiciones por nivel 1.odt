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hora sí entramos en la parte <text:span text:style-name="Strong_20_Emphasis">crítica</text:span>: crear <text:span text:style-name="Strong_20_Emphasis">definiciones de inteligencia específicas para cada nivel</text:span>, usando nombres distintos para evitar confusiones y capturar la evolución real del fenómeno.</text:p>
      <text:p text:style-name="Text_20_body">Voy a mantener <text:span text:style-name="Strong_20_Emphasis">exactamente</text:span> los niveles que fijamos, sin cambiar nombres ni estructura.<text:line-break/>Lo único que añadimos ahora son <text:span text:style-name="Strong_20_Emphasis">definiciones de inteligencia para cada nivel</text:span>, coherentes, progresivas y no contradictorias.</text:p>
      <text:p text:style-name="Text_20_body">Aquí tienes la <text:span text:style-name="Strong_20_Emphasis">primera versión completa del mapa</text:span>, con definiciones adaptadas a cada fase.</text:p>
      <text:p text:style-name="Horizontal_20_Line"/>
      <text:h text:style-name="Heading_20_1" text:outline-level="1">⭐ <text:span text:style-name="Strong_20_Emphasis">MAPA EVOLUTIVO DE LA INTELIGENCIA</text:span></text:h>
      <text:p text:style-name="Text_20_body"><text:span text:style-name="Emphasis">(versión estable, con definiciones por nivel)</text:span></text:p>
      <text:p text:style-name="Horizontal_20_Line"/>
      <text:h text:style-name="Heading_20_1" text:outline-level="1"><text:span text:style-name="Strong_20_Emphasis">Nivel 0 — Dinámica física</text:span></text:h>
      <text:h text:style-name="Heading_20_3" text:outline-level="3"><text:span text:style-name="Strong_20_Emphasis">Tipo de “inteligencia”: ninguna (pre‑inteligencia)</text:span></text:h>
      <text:h text:style-name="Heading_20_3" text:outline-level="3"><text:span text:style-name="Strong_20_Emphasis">Definición:</text:span></text:h>
      <text:p text:style-name="Text_20_body">No existe inteligencia. El sistema evoluciona únicamente según leyes físicas sin sensibilidad al estado ni selección entre alternativas.</text:p>
      <text:h text:style-name="Heading_20_3" text:outline-level="3"><text:span text:style-name="Strong_20_Emphasis">Fenómeno:</text:span></text:h>
      <text:p text:style-name="Text_20_body">Evolución hacia equilibrio; dinámica única.</text:p>
      <text:h text:style-name="Heading_20_3" text:outline-level="3"><text:span text:style-name="Strong_20_Emphasis">Ejemplos:</text:span></text:h>
      <text:p text:style-name="Text_20_body">Difusión, reacciones simples, caída libre.</text:p>
      <text:p text:style-name="Horizontal_20_Line"/>
      <text:h text:style-name="Heading_20_1" text:outline-level="1"><text:span text:style-name="Strong_20_Emphasis">1. Materia organizada → Proto‑agencia</text:span></text:h>
      <text:h text:style-name="Heading_20_3" text:outline-level="3"><text:span text:style-name="Strong_20_Emphasis">Tipo de inteligencia:</text:span> <text:span text:style-name="Strong_20_Emphasis">proto‑inteligencia</text:span></text:h>
      <text:h text:style-name="Heading_20_3" text:outline-level="3"><text:span text:style-name="Strong_20_Emphasis">Definición:</text:span></text:h>
      <text:p text:style-name="Text_20_body">Capacidad de un sistema organizado para <text:span text:style-name="Strong_20_Emphasis">mantener una dinámica activa</text:span> mientras recibe energía, sin seleccionar entre alternativas.</text:p>
      <text:h text:style-name="Heading_20_3" text:outline-level="3"><text:soft-page-break/><text:span text:style-name="Strong_20_Emphasis">Fenómeno:</text:span></text:h>
      <text:p text:style-name="Text_20_body">Persistencia reactiva: el sistema se sostiene mientras el entorno lo permite.</text:p>
      <text:h text:style-name="Heading_20_3" text:outline-level="3"><text:span text:style-name="Strong_20_Emphasis">Ejemplos:</text:span></text:h>
      <text:p text:style-name="Text_20_body">Ciclos químicos simples, remolinos, estructuras disipativas.</text:p>
      <text:h text:style-name="Heading_20_3" text:outline-level="3"><text:span text:style-name="Strong_20_Emphasis">Estado de la inteligencia:</text:span></text:h>
      <text:p text:style-name="Text_20_body">Aquí no hay “decisiones”, pero sí aparece <text:span text:style-name="Strong_20_Emphasis">una forma primitiva de comportamiento sostenido</text:span>.<text:line-break/>Es la base sobre la que luego podrá surgir la selección.</text:p>
      <text:p text:style-name="Horizontal_20_Line"/>
      <text:h text:style-name="Heading_20_1" text:outline-level="1"><text:span text:style-name="Strong_20_Emphasis">2. Redes químicas → Inteligencia mínima</text:span></text:h>
      <text:h text:style-name="Heading_20_3" text:outline-level="3"><text:span text:style-name="Strong_20_Emphasis">Tipo de inteligencia:</text:span> <text:span text:style-name="Strong_20_Emphasis">inteligencia mínima</text:span></text:h>
      <text:h text:style-name="Heading_20_3" text:outline-level="3"><text:span text:style-name="Strong_20_Emphasis">Definición:</text:span></text:h>
      <text:p text:style-name="Text_20_body">Capacidad de un sistema para <text:span text:style-name="Strong_20_Emphasis">usar información de su estado interno</text:span> para <text:span text:style-name="Strong_20_Emphasis">seleccionar una dinámica entre varias posibles</text:span>.</text:p>
      <text:h text:style-name="Heading_20_3" text:outline-level="3"><text:span text:style-name="Strong_20_Emphasis">Fenómeno:</text:span></text:h>
      <text:p text:style-name="Text_20_body">Bifurcaciones químicas; rutas alternativas.</text:p>
      <text:h text:style-name="Heading_20_3" text:outline-level="3"><text:span text:style-name="Strong_20_Emphasis">Ejemplos:</text:span></text:h>
      <text:p text:style-name="Text_20_body">Redes químicas con rutas dependientes de concentración; tu simulación lógica.</text:p>
      <text:h text:style-name="Heading_20_3" text:outline-level="3"><text:span text:style-name="Strong_20_Emphasis">Estado de la inteligencia:</text:span></text:h>
      <text:p text:style-name="Text_20_body">Aquí aparece la <text:span text:style-name="Strong_20_Emphasis">primera forma real de inteligencia</text:span>:<text:line-break/>una desviación informada respecto a la dinámica natural.</text:p>
      <text:p text:style-name="Horizontal_20_Line"/>
      <text:h text:style-name="Heading_20_1" text:outline-level="1"><text:soft-page-break/><text:span text:style-name="Strong_20_Emphasis">3. Redes autocatalíticas → Inteligencia adaptativa</text:span></text:h>
      <text:h text:style-name="Heading_20_3" text:outline-level="3"><text:span text:style-name="Strong_20_Emphasis">Tipo de inteligencia:</text:span> <text:span text:style-name="Strong_20_Emphasis">inteligencia adaptativa prebiológica</text:span></text:h>
      <text:h text:style-name="Heading_20_3" text:outline-level="3"><text:span text:style-name="Strong_20_Emphasis">Definición:</text:span></text:h>
      <text:p text:style-name="Text_20_body">Capacidad de un sistema para <text:span text:style-name="Strong_20_Emphasis">modificar su propia estructura</text:span> en función de su historia, reforzando configuraciones que funcionan.</text:p>
      <text:h text:style-name="Heading_20_3" text:outline-level="3"><text:span text:style-name="Strong_20_Emphasis">Fenómeno:</text:span></text:h>
      <text:p text:style-name="Text_20_body">Autocatálisis, atractores, histéresis, memoria física.</text:p>
      <text:h text:style-name="Heading_20_3" text:outline-level="3"><text:span text:style-name="Strong_20_Emphasis">Ejemplos:</text:span></text:h>
      <text:p text:style-name="Text_20_body">Redes autocatalíticas de Kauffman, sistemas con múltiples estados estables.</text:p>
      <text:h text:style-name="Heading_20_3" text:outline-level="3"><text:span text:style-name="Strong_20_Emphasis">Estado de la inteligencia:</text:span></text:h>
      <text:p text:style-name="Text_20_body">Aquí aparece el <text:span text:style-name="Strong_20_Emphasis">aprendizaje físico</text:span>:<text:line-break/>el sistema no solo elige rutas, sino que <text:span text:style-name="Strong_20_Emphasis">adapta su estructura</text:span> según resultados previos.</text:p>
      <text:p text:style-name="Horizontal_20_Line"/>
      <text:h text:style-name="Heading_20_1" text:outline-level="1"><text:span text:style-name="Strong_20_Emphasis">4. Protocélulas → Vida mínima</text:span></text:h>
      <text:h text:style-name="Heading_20_3" text:outline-level="3"><text:span text:style-name="Strong_20_Emphasis">Tipo de inteligencia:</text:span> <text:span text:style-name="Strong_20_Emphasis">inteligencia autorreferencial mínima</text:span></text:h>
      <text:h text:style-name="Heading_20_3" text:outline-level="3"><text:span text:style-name="Strong_20_Emphasis">Definición:</text:span></text:h>
      <text:p text:style-name="Text_20_body">Capacidad de un sistema para <text:span text:style-name="Strong_20_Emphasis">aplicar su inteligencia adaptativa a sí mismo</text:span>, manteniendo su organización y generando copias imperfectas.</text:p>
      <text:h text:style-name="Heading_20_3" text:outline-level="3"><text:span text:style-name="Strong_20_Emphasis">Fenómeno:</text:span></text:h>
      <text:p text:style-name="Text_20_body">Compartimentalización, auto‑mantenimiento, herencia imperfecta.</text:p>
      <text:h text:style-name="Heading_20_3" text:outline-level="3"><text:span text:style-name="Strong_20_Emphasis">Ejemplos:</text:span></text:h>
      <text:p text:style-name="Text_20_body">Protocélulas lipídicas, replicadores químicos encapsulados.</text:p>
      <text:h text:style-name="Heading_20_3" text:outline-level="3"><text:span text:style-name="Strong_20_Emphasis">Estado de la inteligencia:</text:span></text:h>
      <text:p text:style-name="Text_20_body">La inteligencia deja de ser externa y se vuelve <text:span text:style-name="Strong_20_Emphasis">autorreferencial</text:span>:<text:line-break/>el sistema se convierte en su propio problema.</text:p>
      <text:p text:style-name="Horizontal_20_Line"/>
      <text:h text:style-name="Heading_20_1" text:outline-level="1"><text:soft-page-break/><text:span text:style-name="Strong_20_Emphasis">5. Células → Vida organizada</text:span></text:h>
      <text:h text:style-name="Heading_20_3" text:outline-level="3"><text:span text:style-name="Strong_20_Emphasis">Tipo de inteligencia:</text:span> <text:span text:style-name="Strong_20_Emphasis">inteligencia evolutiva plena</text:span></text:h>
      <text:h text:style-name="Heading_20_3" text:outline-level="3"><text:span text:style-name="Strong_20_Emphasis">Definición:</text:span></text:h>
      <text:p text:style-name="Text_20_body">Capacidad de un sistema vivo para <text:span text:style-name="Strong_20_Emphasis">regular su organización interna</text:span>, metabolizar energía y evolucionar mediante variación y selección.</text:p>
      <text:h text:style-name="Heading_20_3" text:outline-level="3"><text:span text:style-name="Strong_20_Emphasis">Fenómeno:</text:span></text:h>
      <text:p text:style-name="Text_20_body">Metabolismo, regulación, robustez, evolución darwiniana.</text:p>
      <text:h text:style-name="Heading_20_3" text:outline-level="3"><text:span text:style-name="Strong_20_Emphasis">Ejemplos:</text:span></text:h>
      <text:p text:style-name="Text_20_body">Células procariotas y eucariotas.</text:p>
      <text:h text:style-name="Heading_20_3" text:outline-level="3"><text:span text:style-name="Strong_20_Emphasis">Estado de la inteligencia:</text:span></text:h>
      <text:p text:style-name="Text_20_body">La inteligencia autorreferencial se vuelve <text:span text:style-name="Strong_20_Emphasis">sistémica y robusta</text:span>:<text:line-break/>la célula es una máquina de persistencia y exploración evolutiva.</text:p>
      <text:p text:style-name="Horizontal_20_Line"/>
      <text:h text:style-name="Heading_20_1" text:outline-level="1"><text:span text:style-name="Strong_20_Emphasis">6. Organismos → Inteligencia biológica</text:span></text:h>
      <text:h text:style-name="Heading_20_3" text:outline-level="3"><text:span text:style-name="Strong_20_Emphasis">Tipo de inteligencia:</text:span> <text:span text:style-name="Strong_20_Emphasis">inteligencia funcional / cognitiva</text:span></text:h>
      <text:h text:style-name="Heading_20_3" text:outline-level="3"><text:span text:style-name="Strong_20_Emphasis">Definición:</text:span></text:h>
      <text:p text:style-name="Text_20_body">Capacidad de un organismo para <text:span text:style-name="Strong_20_Emphasis">representar su entorno</text:span>, <text:span text:style-name="Strong_20_Emphasis">resolver problemas</text:span>, <text:span text:style-name="Strong_20_Emphasis">planificar acciones</text:span> y <text:span text:style-name="Strong_20_Emphasis">perseguir objetivos implícitos</text:span>.</text:p>
      <text:h text:style-name="Heading_20_3" text:outline-level="3"><text:span text:style-name="Strong_20_Emphasis">Fenómeno:</text:span></text:h>
      <text:p text:style-name="Text_20_body">Percepción, acción dirigida, sistemas nerviosos, comportamiento complejo.</text:p>
      <text:h text:style-name="Heading_20_3" text:outline-level="3"><text:span text:style-name="Strong_20_Emphasis">Ejemplos:</text:span></text:h>
      <text:p text:style-name="Text_20_body">Animales, humanos, robots avanzados.</text:p>
      <text:h text:style-name="Heading_20_3" text:outline-level="3"><text:span text:style-name="Strong_20_Emphasis">Estado de la inteligencia:</text:span></text:h>
      <text:p text:style-name="Text_20_body">Aquí aparece lo que comúnmente llamamos “inteligencia”:<text:line-break/>resolución de problemas, modelos internos, planificación.</text:p>
      <text:p text:style-name="Horizontal_20_Line"/>
      <text:h text:style-name="Heading_20_1" text:outline-level="1"><text:soft-page-break/>⭐ <text:span text:style-name="Strong_20_Emphasis">Resumen de las definiciones de inteligencia por nivel</text:span></text:h>
      <text:list xml:id="list3305535038" text:style-name="L1">
        <text:list-item>
          <text:p text:style-name="P2"><text:span text:style-name="Strong_20_Emphasis">Proto‑inteligencia:</text:span> mantener actividad sin selección. </text:p>
        </text:list-item>
        <text:list-item>
          <text:p text:style-name="P2"><text:span text:style-name="Strong_20_Emphasis">Inteligencia mínima:</text:span> seleccionar dinámicas según información. </text:p>
        </text:list-item>
        <text:list-item>
          <text:p text:style-name="P2"><text:span text:style-name="Strong_20_Emphasis">Inteligencia adaptativa:</text:span> modificar estructura según experiencia. </text:p>
        </text:list-item>
        <text:list-item>
          <text:p text:style-name="P2"><text:span text:style-name="Strong_20_Emphasis">Inteligencia autorreferencial:</text:span> aplicar la inteligencia a la propia continuidad. </text:p>
        </text:list-item>
        <text:list-item>
          <text:p text:style-name="P2"><text:span text:style-name="Strong_20_Emphasis">Inteligencia evolutiva:</text:span> regular, metabolizar, evolucionar. </text:p>
        </text:list-item>
        <text:list-item>
          <text:p text:style-name="P1"><text:span text:style-name="Strong_20_Emphasis">Inteligencia biológica:</text:span> representar, planificar, resolver problemas. </text:p>
        </text:list-item>
      </text:list>
      <text:p text:style-name="Horizontal_20_Line"/>
      <text:h text:style-name="Heading_20_1" text:outline-level="1">⭐ <text:span text:style-name="Strong_20_Emphasis">¿Qué sigue ahora?</text:span></text:h>
      <text:p text:style-name="Text_20_body">Con este mapa ya podemos:</text:p>
      <text:list xml:id="list2648669546" text:style-name="L2">
        <text:list-item>
          <text:p text:style-name="P4">escribir la <text:span text:style-name="Strong_20_Emphasis">sección del capítulo</text:span> que explica la evolución de la inteligencia, </text:p>
        </text:list-item>
        <text:list-item>
          <text:p text:style-name="P4">o profundizar en cada nivel con más detalle técnico, </text:p>
        </text:list-item>
        <text:list-item>
          <text:p text:style-name="P3">o empezar a construir la narrativa completa del ensayo. </text:p>
        </text:list-item>
      </text:list>
      <text:p text:style-name="Text_20_body">Dime si quieres:</text:p>
      <text:list xml:id="list1526484435" text:style-name="L3">
        <text:list-item>
          <text:p text:style-name="P6"><text:span text:style-name="Strong_20_Emphasis">Pulir las definiciones</text:span>, </text:p>
        </text:list-item>
        <text:list-item>
          <text:p text:style-name="P6"><text:span text:style-name="Strong_20_Emphasis">Añadir más niveles</text:span>, </text:p>
        </text:list-item>
        <text:list-item>
          <text:p text:style-name="P6"><text:span text:style-name="Strong_20_Emphasis">Añadir ejemplos más sofisticados</text:span>, </text:p>
        </text:list-item>
        <text:list-item>
          <text:p text:style-name="P5"><text:span text:style-name="Strong_20_Emphasis">O empezar a redactar la sección del capítulo</text:span> usando este mapa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1T19:48:35.586000000</meta:creation-date>
    <dc:date>2026-06-21T19:49:27.180000000</dc:date>
    <meta:editing-duration>PT51S</meta:editing-duration>
    <meta:editing-cycles>1</meta:editing-cycles>
    <meta:document-statistic meta:table-count="0" meta:image-count="0" meta:object-count="0" meta:page-count="5" meta:paragraph-count="90" meta:word-count="644" meta:character-count="4825" meta:non-whitespace-character-count="4270"/>
    <meta:generator>LibreOffice/7.3.5.2$Windows_X86_64 LibreOffice_project/184fe81b8c8c30d8b5082578aee2fed2ea847c01</meta:generator>
  </office:meta>
</office:document-meta>
</file>