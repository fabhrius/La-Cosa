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Vamos a desarrollar <text:span text:style-name="Strong_20_Emphasis">el Nivel 1 — Materia organizada → proto‑agencia</text:span> con el mismo estilo, rigor y claridad que en el Nivel 0, pero ahora entrando en el primer punto donde la materia empieza a mostrar <text:span text:style-name="Emphasis">comportamientos sostenidos</text:span>, aunque todavía <text:span text:style-name="Strong_20_Emphasis">no inteligentes</text:span>.</text:p>
      <text:p text:style-name="Text_20_body">Este nivel es delicado:</text:p>
      <text:list xml:id="list642705549" text:style-name="L1">
        <text:list-item>
          <text:p text:style-name="P2">no queremos atribuir inteligencia donde no la hay, </text:p>
        </text:list-item>
        <text:list-item>
          <text:p text:style-name="P1">pero sí queremos mostrar que aquí aparece <text:span text:style-name="Strong_20_Emphasis">la primera condición necesaria</text:span> para que la inteligencia pueda surgir después. </text:p>
        </text:list-item>
      </text:list>
      <text:p text:style-name="Text_20_body">Aquí tienes un <text:span text:style-name="Strong_20_Emphasis">primer borrador completo</text:span>, listo para pulir más adelante.</text:p>
      <text:p text:style-name="Horizontal_20_Line"/>
      <text:h text:style-name="Heading_20_1" text:outline-level="1">⭐ <text:span text:style-name="Strong_20_Emphasis">NIVEL 1 — MATERIA ORGANIZADA → PROTO‑AGENCIA</text:span></text:h>
      <text:p text:style-name="Text_20_body"><text:span text:style-name="Emphasis">(Borrador de desarrollo para el capítulo)</text:span></text:p>
      <text:h text:style-name="Heading_20_2" text:outline-level="2"><text:span text:style-name="Strong_20_Emphasis">1. Contexto histórico y ambiental</text:span></text:h>
      <text:p text:style-name="Text_20_body">Tras millones de años de dinámica física pura, la Tierra primitiva comenzó a mostrar algo nuevo: <text:span text:style-name="Strong_20_Emphasis">estructuras que se mantenían activas mientras existiera un flujo de energía</text:span>. No eran vivas, no eran inteligentes, pero tampoco eran simples reacciones que ocurren una vez y desaparecen.</text:p>
      <text:p text:style-name="Text_20_body">En los océanos calientes, en las fumarolas hidrotermales, en las superficies minerales y en los gradientes químicos, comenzaron a formarse:</text:p>
      <text:list xml:id="list4269777044" text:style-name="L2">
        <text:list-item>
          <text:p text:style-name="P4">ciclos químicos, </text:p>
        </text:list-item>
        <text:list-item>
          <text:p text:style-name="P4">estructuras disipativas, </text:p>
        </text:list-item>
        <text:list-item>
          <text:p text:style-name="P4">remolinos estables, </text:p>
        </text:list-item>
        <text:list-item>
          <text:p text:style-name="P4">osciladores, </text:p>
        </text:list-item>
        <text:list-item>
          <text:p text:style-name="P3">patrones auto‑organizados. </text:p>
        </text:list-item>
      </text:list>
      <text:p text:style-name="Text_20_body">Estas estructuras no “decidían” nada, pero <text:span text:style-name="Strong_20_Emphasis">persistían</text:span>.<text:line-break/>Y esa persistencia es el primer paso hacia la agencia.</text:p>
      <text:p text:style-name="Horizontal_20_Line"/>
      <text:h text:style-name="Heading_20_2" text:outline-level="2"><text:span text:style-name="Strong_20_Emphasis">2. Qué es la proto‑agencia</text:span></text:h>
      <text:p text:style-name="Text_20_body">La proto‑agencia es el nivel más simple de organización activa.<text:line-break/>No es inteligencia, pero es más que física pasiva.</text:p>
      <text:h text:style-name="Heading_20_3" text:outline-level="3"><text:soft-page-break/><text:span text:style-name="Strong_20_Emphasis">Definición (versión estable):</text:span></text:h>
      <text:p text:style-name="Quotations"><text:span text:style-name="Strong_20_Emphasis">Proto‑agencia es la capacidad de un sistema organizado para mantener una dinámica activa mediante realimentación interna, sin seleccionar entre alternativas ni usar información para modificar su evolución.</text:span></text:p>
      <text:p text:style-name="Text_20_body">Es decir:</text:p>
      <text:list xml:id="list1936256873" text:style-name="L3">
        <text:list-item>
          <text:p text:style-name="P6">hay <text:span text:style-name="Strong_20_Emphasis">bucle</text:span>, </text:p>
        </text:list-item>
        <text:list-item>
          <text:p text:style-name="P6">hay <text:span text:style-name="Strong_20_Emphasis">realimentación</text:span>, </text:p>
        </text:list-item>
        <text:list-item>
          <text:p text:style-name="P6">hay <text:span text:style-name="Strong_20_Emphasis">persistencia</text:span>, </text:p>
        </text:list-item>
        <text:list-item>
          <text:p text:style-name="P6">pero <text:span text:style-name="Strong_20_Emphasis">no hay selección</text:span>, </text:p>
        </text:list-item>
        <text:list-item>
          <text:p text:style-name="P6"><text:span text:style-name="Strong_20_Emphasis">no hay información funcional</text:span>, </text:p>
        </text:list-item>
        <text:list-item>
          <text:p text:style-name="P5"><text:span text:style-name="Strong_20_Emphasis">no hay decisiones</text:span>. </text:p>
        </text:list-item>
      </text:list>
      <text:p text:style-name="Text_20_body">El sistema se mantiene <text:span text:style-name="Strong_20_Emphasis">porque la física lo sostiene</text:span>, no porque él haga nada para sostenerse.</text:p>
      <text:p text:style-name="Horizontal_20_Line"/>
      <text:h text:style-name="Heading_20_2" text:outline-level="2"><text:span text:style-name="Strong_20_Emphasis">3. Fenómeno característico: persistencia reactiva</text:span></text:h>
      <text:p text:style-name="Text_20_body">La característica central de este nivel es la <text:span text:style-name="Strong_20_Emphasis">persistencia reactiva</text:span>:</text:p>
      <text:list xml:id="list2662729188" text:style-name="L4">
        <text:list-item>
          <text:p text:style-name="P8">el sistema se mantiene activo, </text:p>
        </text:list-item>
        <text:list-item>
          <text:p text:style-name="P8">pero solo mientras el entorno lo permita, </text:p>
        </text:list-item>
        <text:list-item>
          <text:p text:style-name="P8">sin corregir desviaciones, </text:p>
        </text:list-item>
        <text:list-item>
          <text:p text:style-name="P8">sin elegir rutas, </text:p>
        </text:list-item>
        <text:list-item>
          <text:p text:style-name="P7">sin oponerse a la entropía. </text:p>
        </text:list-item>
      </text:list>
      <text:p text:style-name="Text_20_body">Es un comportamiento sostenido, pero <text:span text:style-name="Strong_20_Emphasis">ciego</text:span>.</text:p>
      <text:p text:style-name="Horizontal_20_Line"/>
      <text:h text:style-name="Heading_20_2" text:outline-level="2"><text:span text:style-name="Strong_20_Emphasis">4. Ejemplos naturales</text:span></text:h>
      <text:h text:style-name="Heading_20_3" text:outline-level="3"><text:span text:style-name="Strong_20_Emphasis">4.1. Ciclos químicos simples</text:span></text:h>
      <text:p text:style-name="Text_20_body">Reacciones del tipo:</text:p>
      <text:p text:style-name="Text_20_body">A → B → C → A</text:p>
      <text:p text:style-name="Text_20_body">Mientras haya energía y reactivos, el ciclo continúa.<text:line-break/>No elige nada: simplemente sigue su estructura.</text:p>
      <text:h text:style-name="Heading_20_3" text:outline-level="3"><text:span text:style-name="Strong_20_Emphasis">4.2. Remolinos y torbellinos</text:span></text:h>
      <text:p text:style-name="Text_20_body">Un remolino se mantiene mientras exista un flujo.<text:line-break/>No corrige su forma, no decide su trayectoria.</text:p>
      <text:h text:style-name="Heading_20_3" text:outline-level="3"><text:soft-page-break/><text:span text:style-name="Strong_20_Emphasis">4.3. Estructuras disipativas</text:span></text:h>
      <text:p text:style-name="Text_20_body">Como las celdas de convección de Bénard:<text:line-break/>patrones térmicos que se mantienen mientras haya un gradiente.</text:p>
      <text:h text:style-name="Heading_20_3" text:outline-level="3"><text:span text:style-name="Strong_20_Emphasis">4.4. Osciladores químicos</text:span></text:h>
      <text:p text:style-name="Text_20_body">Como la reacción de Belousov–Zhabotinsky:<text:line-break/>sube y baja periódicamente sin seleccionar nada.</text:p>
      <text:p text:style-name="Horizontal_20_Line"/>
      <text:h text:style-name="Heading_20_2" text:outline-level="2"><text:span text:style-name="Strong_20_Emphasis">5. Ejemplos artificiales</text:span></text:h>
      <text:h text:style-name="Heading_20_3" text:outline-level="3"><text:span text:style-name="Strong_20_Emphasis">5.1. Osciladores electrónicos</text:span></text:h>
      <text:p text:style-name="Text_20_body">Un circuito RC o LC que oscila mientras recibe energía.</text:p>
      <text:h text:style-name="Heading_20_3" text:outline-level="3"><text:span text:style-name="Strong_20_Emphasis">5.2. Autómatas celulares con patrones fijos</text:span></text:h>
      <text:p text:style-name="Text_20_body">Reglas que generan ciclos repetitivos sin bifurcaciones.</text:p>
      <text:h text:style-name="Heading_20_3" text:outline-level="3"><text:span text:style-name="Strong_20_Emphasis">5.3. Sistemas reactivos simples</text:span></text:h>
      <text:p text:style-name="Text_20_body">Cualquier proceso que se mantiene por su estructura, no por decisiones.</text:p>
      <text:p text:style-name="Horizontal_20_Line"/>
      <text:h text:style-name="Heading_20_2" text:outline-level="2"><text:span text:style-name="Strong_20_Emphasis">6. Por qué este nivel NO es inteligencia</text:span></text:h>
      <text:p text:style-name="Text_20_body">Porque:</text:p>
      <text:list xml:id="list3399012474" text:style-name="L5">
        <text:list-item>
          <text:p text:style-name="P10">no hay alternativas, </text:p>
        </text:list-item>
        <text:list-item>
          <text:p text:style-name="P10">no hay selección, </text:p>
        </text:list-item>
        <text:list-item>
          <text:p text:style-name="P10">no hay sensibilidad al estado, </text:p>
        </text:list-item>
        <text:list-item>
          <text:p text:style-name="P10">no hay memoria, </text:p>
        </text:list-item>
        <text:list-item>
          <text:p text:style-name="P10">no hay desviación informada, </text:p>
        </text:list-item>
        <text:list-item>
          <text:p text:style-name="P9">no hay oposición a la dinámica natural. </text:p>
        </text:list-item>
      </text:list>
      <text:p text:style-name="Text_20_body">El sistema <text:span text:style-name="Strong_20_Emphasis">no altera</text:span> su destino.<text:line-break/>Solo lo sigue.</text:p>
      <text:p text:style-name="Horizontal_20_Line"/>
      <text:h text:style-name="Heading_20_2" text:outline-level="2"><text:span text:style-name="Strong_20_Emphasis">7. Importancia en la evolución del fenómeno</text:span></text:h>
      <text:p text:style-name="Text_20_body">Aunque no es inteligencia, este nivel es <text:span text:style-name="Strong_20_Emphasis">indispensable</text:span>.</text:p>
      <text:p text:style-name="Text_20_body">¿Por qué?</text:p>
      <text:p text:style-name="Text_20_body"><text:soft-page-break/>Porque la inteligencia —incluso en su forma más mínima— requiere:</text:p>
      <text:list xml:id="list1078703491" text:style-name="L6">
        <text:list-item>
          <text:p text:style-name="P12">bucles, </text:p>
        </text:list-item>
        <text:list-item>
          <text:p text:style-name="P12">realimentación, </text:p>
        </text:list-item>
        <text:list-item>
          <text:p text:style-name="P12">persistencia, </text:p>
        </text:list-item>
        <text:list-item>
          <text:p text:style-name="P11">estructuras que duren lo suficiente como para poder seleccionar rutas. </text:p>
        </text:list-item>
      </text:list>
      <text:p text:style-name="Text_20_body">La proto‑agencia es el primer punto donde la materia:</text:p>
      <text:list xml:id="list4146797421" text:style-name="L7">
        <text:list-item>
          <text:p text:style-name="P14">deja de ser efímera, </text:p>
        </text:list-item>
        <text:list-item>
          <text:p text:style-name="P14">empieza a sostener dinámicas, </text:p>
        </text:list-item>
        <text:list-item>
          <text:p text:style-name="P14">crea patrones estables, </text:p>
        </text:list-item>
        <text:list-item>
          <text:p text:style-name="P13">genera ciclos que pueden ser modificados más adelante. </text:p>
        </text:list-item>
      </text:list>
      <text:p text:style-name="Text_20_body">Es el <text:span text:style-name="Strong_20_Emphasis">suelo fértil</text:span> donde puede aparecer la selección informada.</text:p>
      <text:p text:style-name="Horizontal_20_Line"/>
      <text:h text:style-name="Heading_20_2" text:outline-level="2"><text:span text:style-name="Strong_20_Emphasis">8. Transición hacia el Nivel 2: inteligencia mínima</text:span></text:h>
      <text:p text:style-name="Text_20_body">En algún momento, ciertos sistemas dejaron de tener una única dinámica posible.<text:line-break/>Aparecieron <text:span text:style-name="Strong_20_Emphasis">bifurcaciones</text:span>:</text:p>
      <text:list xml:id="list1007755014" text:style-name="L8">
        <text:list-item>
          <text:p text:style-name="P16">rutas alternativas, </text:p>
        </text:list-item>
        <text:list-item>
          <text:p text:style-name="P16">caminos distintos, </text:p>
        </text:list-item>
        <text:list-item>
          <text:p text:style-name="P15">estados que conducen a comportamientos diferentes. </text:p>
        </text:list-item>
      </text:list>
      <text:p text:style-name="Text_20_body">Y cuando un sistema empieza a <text:span text:style-name="Strong_20_Emphasis">elegir</text:span> entre esas rutas según su estado interno, aparece por primera vez la <text:span text:style-name="Strong_20_Emphasis">inteligencia mínima</text:span>.</text:p>
      <text:p text:style-name="Text_20_body">La proto‑agencia prepara ese salto:</text:p>
      <text:list xml:id="list86265055" text:style-name="L9">
        <text:list-item>
          <text:p text:style-name="P18">ya hay bucles, </text:p>
        </text:list-item>
        <text:list-item>
          <text:p text:style-name="P18">ya hay persistencia, </text:p>
        </text:list-item>
        <text:list-item>
          <text:p text:style-name="P18">ya hay estructura, </text:p>
        </text:list-item>
        <text:list-item>
          <text:p text:style-name="P17">ya hay realimentación. </text:p>
        </text:list-item>
      </text:list>
      <text:p text:style-name="Text_20_body">Lo único que falta es <text:span text:style-name="Strong_20_Emphasis">selección</text:span>.<text:line-break/>Y eso es exactamente lo que ocurre en el Nivel 2.</text:p>
      <text:p text:style-name="Horizontal_20_Line"/>
      <text:h text:style-name="Heading_20_1" text:outline-level="1">⭐ ¿Continuamos con el Nivel 2 — Redes químicas → inteligencia mínima?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2T14:14:13.189000000</meta:creation-date>
    <dc:date>2026-06-22T14:21:29.138000000</dc:date>
    <meta:editing-duration>PT7M16S</meta:editing-duration>
    <meta:editing-cycles>1</meta:editing-cycles>
    <meta:document-statistic meta:table-count="0" meta:image-count="0" meta:object-count="0" meta:page-count="4" meta:paragraph-count="90" meta:word-count="714" meta:character-count="4506" meta:non-whitespace-character-count="3880"/>
    <meta:generator>LibreOffice/7.3.5.2$Windows_X86_64 LibreOffice_project/184fe81b8c8c30d8b5082578aee2fed2ea847c01</meta:generator>
  </office:meta>
</office:document-meta>
</file>