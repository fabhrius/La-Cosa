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⭐ <text:span text:style-name="Strong_20_Emphasis">NIVEL 2 — REDES QUÍMICAS → INTELIGENCIA MÍNIMA</text:span></text:h>
      <text:p text:style-name="Text_20_body"><text:span text:style-name="Emphasis">(Borrador de desarrollo para el capítulo)</text:span></text:p>
      <text:h text:style-name="Heading_20_2" text:outline-level="2"><text:span text:style-name="Strong_20_Emphasis">1. Contexto histórico y ambiental</text:span></text:h>
      <text:p text:style-name="Text_20_body">En la Tierra primitiva, las reacciones químicas no ocurrían aisladas.<text:line-break/>En ciertos entornos —superficies minerales, charcas secas y húmedas, fumarolas hidrotermales— comenzaron a formarse <text:span text:style-name="Strong_20_Emphasis">redes de reacciones interconectadas</text:span>.</text:p>
      <text:p text:style-name="Text_20_body">Estas redes no eran vida, pero ya no eran simples reacciones puntuales.<text:line-break/>Tenían:</text:p>
      <text:list xml:id="list4141598642" text:style-name="L5">
        <text:list-item>
          <text:p text:style-name="P10">múltiples rutas posibles, </text:p>
        </text:list-item>
        <text:list-item>
          <text:p text:style-name="P10">sensibilidad a concentraciones locales, </text:p>
        </text:list-item>
        <text:list-item>
          <text:p text:style-name="P10">bifurcaciones químicas, </text:p>
        </text:list-item>
        <text:list-item>
          <text:p text:style-name="P9">comportamientos dependientes del estado. </text:p>
        </text:list-item>
      </text:list>
      <text:p text:style-name="Text_20_body">Por primera vez, la materia <text:span text:style-name="Strong_20_Emphasis">no tenía un único futuro posible</text:span>.</text:p>
      <text:p text:style-name="Horizontal_20_Line"/>
      <text:h text:style-name="Heading_20_2" text:outline-level="2"><text:span text:style-name="Strong_20_Emphasis">2. Qué es la inteligencia mínima</text:span></text:h>
      <text:p text:style-name="Text_20_body">Este nivel marca el nacimiento real del fenómeno que queremos estudiar.</text:p>
      <text:h text:style-name="Heading_20_3" text:outline-level="3"><text:span text:style-name="Strong_20_Emphasis">Definición (versión estable):</text:span></text:h>
      <text:p text:style-name="Quotations"><text:span text:style-name="Strong_20_Emphasis">Inteligencia mínima es la capacidad de un sistema para usar información de su estado interno para seleccionar una dinámica entre varias posibles, produciendo una desviación no trivial respecto a la evolución natural.</text:span></text:p>
      <text:p text:style-name="Text_20_body">Aquí aparece la primera forma de “decisión” física.</text:p>
      <text:p text:style-name="Horizontal_20_Line"/>
      <text:h text:style-name="Heading_20_2" text:outline-level="2"><text:span text:style-name="Strong_20_Emphasis">3. Fenómeno característico: selección informada</text:span></text:h>
      <text:p text:style-name="Text_20_body">La característica central es la <text:span text:style-name="Strong_20_Emphasis">bifurcación</text:span>:</text:p>
      <text:list xml:id="list1075376673" text:style-name="L6">
        <text:list-item>
          <text:p text:style-name="P12">el sistema puede seguir la ruta A o la ruta B, </text:p>
        </text:list-item>
        <text:list-item>
          <text:p text:style-name="P11">y la elección depende del estado interno (concentraciones, energía, estructura local). </text:p>
        </text:list-item>
      </text:list>
      <text:p text:style-name="Text_20_body"><text:soft-page-break/>Esto es crucial:</text:p>
      <text:p text:style-name="Quotations"><text:span text:style-name="Strong_20_Emphasis">La dinámica ya no está completamente determinada por la física externa.<text:line-break/>El sistema influye en su propio destino.</text:span></text:p>
      <text:p text:style-name="Horizontal_20_Line"/>
      <text:h text:style-name="Heading_20_2" text:outline-level="2"><text:span text:style-name="Strong_20_Emphasis">4. Ejemplos naturales</text:span></text:h>
      <text:h text:style-name="Heading_20_3" text:outline-level="3"><text:span text:style-name="Strong_20_Emphasis">4.1. Redes químicas con rutas alternativas</text:span></text:h>
      <text:p text:style-name="Text_20_body">Reacciones donde:</text:p>
      <text:list xml:id="list768889860" text:style-name="L7">
        <text:list-item>
          <text:p text:style-name="P14">si la concentración de X es alta → se activa la ruta A, </text:p>
        </text:list-item>
        <text:list-item>
          <text:p text:style-name="P13">si es baja → se activa la ruta B. </text:p>
        </text:list-item>
      </text:list>
      <text:h text:style-name="Heading_20_3" text:outline-level="3"><text:span text:style-name="Strong_20_Emphasis">4.2. Sistemas con histéresis simple</text:span></text:h>
      <text:p text:style-name="Text_20_body">La respuesta depende del estado previo, aunque todavía no haya memoria estructural.</text:p>
      <text:h text:style-name="Heading_20_3" text:outline-level="3"><text:span text:style-name="Strong_20_Emphasis">4.3. Reacciones con inhibidores o activadores internos</text:span></text:h>
      <text:p text:style-name="Text_20_body">Pequeñas moléculas que desvían la ruta según su presencia.</text:p>
      <text:p text:style-name="Horizontal_20_Line"/>
      <text:h text:style-name="Heading_20_2" text:outline-level="2"><text:span text:style-name="Strong_20_Emphasis">5. Ejemplos artificiales</text:span></text:h>
      <text:h text:style-name="Heading_20_3" text:outline-level="3"><text:span text:style-name="Strong_20_Emphasis">5.1. Tu simulación de vida artificial</text:span></text:h>
      <text:p text:style-name="Text_20_body">El sistema decide qué hacer según su estado interno.<text:line-break/>Esto es inteligencia mínima pura.</text:p>
      <text:h text:style-name="Heading_20_3" text:outline-level="3"><text:span text:style-name="Strong_20_Emphasis">5.2. Autómatas celulares con reglas dependientes del contexto</text:span></text:h>
      <text:p text:style-name="Text_20_body">El estado futuro depende del vecindario.</text:p>
      <text:h text:style-name="Heading_20_3" text:outline-level="3"><text:span text:style-name="Strong_20_Emphasis">5.3. Circuitos lógicos con selección de modo</text:span></text:h>
      <text:p text:style-name="Text_20_body">Cambian de comportamiento según el estado interno.</text:p>
      <text:p text:style-name="Horizontal_20_Line"/>
      <text:h text:style-name="Heading_20_2" text:outline-level="2"><text:span text:style-name="Strong_20_Emphasis">6. Por qué este nivel SÍ es inteligencia</text:span></text:h>
      <text:p text:style-name="Text_20_body">Porque aquí aparece por primera vez:</text:p>
      <text:list xml:id="list3207091784" text:style-name="L8">
        <text:list-item>
          <text:p text:style-name="P16"><text:span text:style-name="Strong_20_Emphasis">selección</text:span>, </text:p>
        </text:list-item>
        <text:list-item>
          <text:p text:style-name="P16"><text:span text:style-name="Strong_20_Emphasis">información funcional</text:span>, </text:p>
        </text:list-item>
        <text:list-item>
          <text:p text:style-name="P16"><text:span text:style-name="Strong_20_Emphasis">alternativas</text:span>, </text:p>
        </text:list-item>
        <text:list-item>
          <text:p text:style-name="P16"><text:soft-page-break/><text:span text:style-name="Strong_20_Emphasis">desviación respecto a la dinámica natural</text:span>, </text:p>
        </text:list-item>
        <text:list-item>
          <text:p text:style-name="P15"><text:span text:style-name="Strong_20_Emphasis">comportamiento no trivial</text:span>. </text:p>
        </text:list-item>
      </text:list>
      <text:p text:style-name="Text_20_body">El sistema ya no es un remolino o un ciclo químico ciego.<text:line-break/>Es un sistema que <text:span text:style-name="Strong_20_Emphasis">elige</text:span>.</text:p>
      <text:p text:style-name="Horizontal_20_Line"/>
      <text:h text:style-name="Heading_20_2" text:outline-level="2"><text:span text:style-name="Strong_20_Emphasis">7. Importancia en la evolución del fenómeno</text:span></text:h>
      <text:p text:style-name="Text_20_body">Este nivel es el <text:span text:style-name="Strong_20_Emphasis">primer paso real hacia la inteligencia</text:span>:</text:p>
      <text:list xml:id="list895565871" text:style-name="L9">
        <text:list-item>
          <text:p text:style-name="P18">sin selección, no puede haber adaptación; </text:p>
        </text:list-item>
        <text:list-item>
          <text:p text:style-name="P18">sin adaptación, no puede haber vida; </text:p>
        </text:list-item>
        <text:list-item>
          <text:p text:style-name="P17">sin vida, no puede haber cognición. </text:p>
        </text:list-item>
      </text:list>
      <text:p text:style-name="Text_20_body">La inteligencia mínima es la semilla de todo lo que viene después.</text:p>
      <text:p text:style-name="Horizontal_20_Line"/>
      <text:h text:style-name="Heading_20_2" text:outline-level="2"><text:span text:style-name="Strong_20_Emphasis">8. Transición hacia el Nivel 3: inteligencia adaptativa</text:span></text:h>
      <text:p text:style-name="Text_20_body">Cuando estas redes químicas empiezan a:</text:p>
      <text:list xml:id="list93979061" text:style-name="L10">
        <text:list-item>
          <text:p text:style-name="P20">reforzar ciertas rutas, </text:p>
        </text:list-item>
        <text:list-item>
          <text:p text:style-name="P20">estabilizar configuraciones, </text:p>
        </text:list-item>
        <text:list-item>
          <text:p text:style-name="P20">crear atractores, </text:p>
        </text:list-item>
        <text:list-item>
          <text:p text:style-name="P19">recordar estados previos, </text:p>
        </text:list-item>
      </text:list>
      <text:p text:style-name="Text_20_body">entonces aparece la <text:span text:style-name="Strong_20_Emphasis">inteligencia adaptativa</text:span>.</text:p>
      <text:p text:style-name="Text_20_body">Ese es el salto del Nivel 2 al Nivel 3.</text:p>
      <text:p text:style-name="Horizontal_20_Line"/>
      <text:p text:style-name="Text_20_body"/>
      <text:p text:style-name="Text_20_body">Perfecto, Fab.<text:line-break/>Este es exactamente el punto donde tenemos que <text:span text:style-name="Strong_20_Emphasis">bajar a tierra</text:span> la explicación.<text:line-break/>Lo que tenemos ahora es conceptualmente correcto, pero demasiado abstracto para un lector sin formación científica. Necesitamos convertirlo en <text:span text:style-name="Strong_20_Emphasis">imágenes mentales</text:span>, ejemplos concretos, escenas físicas que cualquiera pueda visualizar.</text:p>
      <text:p text:style-name="Text_20_body">Vamos a rehacer el <text:span text:style-name="Strong_20_Emphasis">Nivel 2 — Redes químicas → inteligencia mínima</text:span> de forma clara, visual y comprensible, sin perder rigor.</text:p>
      <text:p text:style-name="Horizontal_20_Line"/>
      <text:h text:style-name="Heading_20_1" text:outline-level="1"><text:soft-page-break/>⭐ NIVEL 2 — REDES QUÍMICAS → INTELIGENCIA MÍNIMA</text:h>
      <text:p text:style-name="Text_20_body"><text:span text:style-name="Emphasis">(Versión comprensible para cualquier lector)</text:span></text:p>
      <text:h text:style-name="Heading_20_2" text:outline-level="2"><text:span text:style-name="Strong_20_Emphasis">1. ¿Qué estaba pasando en la Tierra en este momento?</text:span></text:h>
      <text:p text:style-name="Text_20_body">Imagina la Tierra hace unos 4.000 millones de años:</text:p>
      <text:list xml:id="list1171661341" text:style-name="L11">
        <text:list-item>
          <text:p text:style-name="P22">océanos calientes, </text:p>
        </text:list-item>
        <text:list-item>
          <text:p text:style-name="P22">charcas que se secan y se llenan una y otra vez, </text:p>
        </text:list-item>
        <text:list-item>
          <text:p text:style-name="P22">rocas ricas en minerales, </text:p>
        </text:list-item>
        <text:list-item>
          <text:p text:style-name="P22">volcanes expulsando gases reactivos, </text:p>
        </text:list-item>
        <text:list-item>
          <text:p text:style-name="P21">rayos, radiación ultravioleta, calor. </text:p>
        </text:list-item>
      </text:list>
      <text:p text:style-name="Text_20_body">En ese ambiente, las moléculas no estaban quietas.<text:line-break/>Se combinaban, se rompían, se reorganizaban.<text:line-break/>Pero lo importante es esto:</text:p>
      <text:p text:style-name="Quotations"><text:span text:style-name="Strong_20_Emphasis">Muchas reacciones no ocurrían aisladas.<text:line-break/>Empezaron a encadenarse unas con otras.</text:span></text:p>
      <text:p text:style-name="Text_20_body">Como fichas de dominó químicas.</text:p>
      <text:p text:style-name="Horizontal_20_Line"/>
      <text:h text:style-name="Heading_20_2" text:outline-level="2"><text:span text:style-name="Strong_20_Emphasis">2. ¿Qué es una “red de reacciones interconectadas”?</text:span></text:h>
      <text:p text:style-name="Text_20_body">Vamos a explicarlo sin química.</text:p>
      <text:p text:style-name="Text_20_body">Imagina que tienes:</text:p>
      <text:list xml:id="list3496290718" text:style-name="L12">
        <text:list-item>
          <text:p text:style-name="P24">una molécula A, </text:p>
        </text:list-item>
        <text:list-item>
          <text:p text:style-name="P24">que puede transformarse en B, </text:p>
        </text:list-item>
        <text:list-item>
          <text:p text:style-name="P24">y B puede transformarse en C, </text:p>
        </text:list-item>
        <text:list-item>
          <text:p text:style-name="P23">y C puede volver a A. </text:p>
        </text:list-item>
      </text:list>
      <text:p text:style-name="Text_20_body">Eso ya es un <text:span text:style-name="Strong_20_Emphasis">ciclo</text:span>.</text:p>
      <text:p text:style-name="Text_20_body">Pero ahora imagina que:</text:p>
      <text:list xml:id="list3389348711" text:style-name="L13">
        <text:list-item>
          <text:p text:style-name="P26">A también puede transformarse en D, </text:p>
        </text:list-item>
        <text:list-item>
          <text:p text:style-name="P26">y D puede transformarse en E, </text:p>
        </text:list-item>
        <text:list-item>
          <text:p text:style-name="P25">y E puede volver a B. </text:p>
        </text:list-item>
      </text:list>
      <text:p text:style-name="Text_20_body">Ahora ya no es un ciclo simple.<text:line-break/>Es una <text:span text:style-name="Strong_20_Emphasis">red</text:span>: un conjunto de caminos posibles.</text:p>
      <text:p text:style-name="Text_20_body">Visualízalo como un mapa de carreteras:</text:p>
      <text:list xml:id="list627181506" text:style-name="L14">
        <text:list-item>
          <text:p text:style-name="P28"><text:soft-page-break/>A → B → C → A </text:p>
        </text:list-item>
        <text:list-item>
          <text:p text:style-name="P27">A → D → E → B </text:p>
        </text:list-item>
      </text:list>
      <text:p text:style-name="Text_20_body">Hay <text:span text:style-name="Strong_20_Emphasis">dos rutas distintas</text:span> que llevan a B.</text:p>
      <text:p text:style-name="Text_20_body">Y aquí ocurre algo nuevo:</text:p>
      <text:p text:style-name="Quotations"><text:span text:style-name="Strong_20_Emphasis">La ruta que se toma depende de lo que haya en el entorno.</text:span></text:p>
      <text:p text:style-name="Text_20_body">Si hay mucha molécula X, se activa la ruta A → B → C → A.<text:line-break/>Si hay poca X, se activa la ruta A → D → E → B.</text:p>
      <text:p text:style-name="Text_20_body">Esto es lo que llamamos <text:span text:style-name="Strong_20_Emphasis">selección de rutas</text:span>.</text:p>
      <text:p text:style-name="Horizontal_20_Line"/>
      <text:h text:style-name="Heading_20_2" text:outline-level="2"><text:span text:style-name="Strong_20_Emphasis">3. ¿Por qué esto es importante?</text:span></text:h>
      <text:p text:style-name="Text_20_body">Porque por primera vez:</text:p>
      <text:list xml:id="list1545278159" text:style-name="L15">
        <text:list-item>
          <text:p text:style-name="P30">el sistema <text:span text:style-name="Strong_20_Emphasis">no tiene un único futuro</text:span>, </text:p>
        </text:list-item>
        <text:list-item>
          <text:p text:style-name="P30">hay <text:span text:style-name="Strong_20_Emphasis">alternativas</text:span>, </text:p>
        </text:list-item>
        <text:list-item>
          <text:p text:style-name="P29">y la elección depende del <text:span text:style-name="Strong_20_Emphasis">estado interno</text:span>. </text:p>
        </text:list-item>
      </text:list>
      <text:p text:style-name="Text_20_body">Esto es exactamente lo que distingue:</text:p>
      <text:list xml:id="list8175122" text:style-name="L16">
        <text:list-item>
          <text:p text:style-name="P32">un remolino (que siempre hace lo mismo), </text:p>
        </text:list-item>
        <text:list-item>
          <text:p text:style-name="P31">de una red química que <text:span text:style-name="Strong_20_Emphasis">elige</text:span> qué camino seguir. </text:p>
        </text:list-item>
      </text:list>
      <text:p text:style-name="Text_20_body">No es una elección consciente, claro.<text:line-break/>Pero sí es una <text:span text:style-name="Strong_20_Emphasis">elección física informada</text:span>.</text:p>
      <text:p text:style-name="Horizontal_20_Line"/>
      <text:h text:style-name="Heading_20_2" text:outline-level="2"><text:span text:style-name="Strong_20_Emphasis">4. ¿Qué significa “informada”?</text:span></text:h>
      <text:p text:style-name="Text_20_body">Significa que:</text:p>
      <text:list xml:id="list3679020430" text:style-name="L17">
        <text:list-item>
          <text:p text:style-name="P34">si cambia la concentración de una molécula, </text:p>
        </text:list-item>
        <text:list-item>
          <text:p text:style-name="P34">o la temperatura, </text:p>
        </text:list-item>
        <text:list-item>
          <text:p text:style-name="P34">o el pH, </text:p>
        </text:list-item>
        <text:list-item>
          <text:p text:style-name="P33">o la energía disponible, </text:p>
        </text:list-item>
      </text:list>
      <text:p text:style-name="Text_20_body">la red <text:span text:style-name="Strong_20_Emphasis">cambia de comportamiento</text:span>.</text:p>
      <text:p text:style-name="Text_20_body">No es azar.<text:line-break/>No es destino fijo.<text:line-break/>Es <text:span text:style-name="Strong_20_Emphasis">respuesta al estado</text:span>.</text:p>
      <text:p text:style-name="Text_20_body">Esto es inteligencia mínima.</text:p>
      <text:p text:style-name="Horizontal_20_Line"/>
      <text:h text:style-name="Heading_20_2" text:outline-level="2"><text:soft-page-break/><text:span text:style-name="Strong_20_Emphasis">5. Ejemplo concreto que cualquiera puede visualizar</text:span></text:h>
      <text:p text:style-name="Text_20_body">Imagina una olla con sopa.</text:p>
      <text:p text:style-name="Text_20_body">En esa sopa hay:</text:p>
      <text:list xml:id="list3458195010" text:style-name="L18">
        <text:list-item>
          <text:p text:style-name="P36">ingredientes que reaccionan entre sí, </text:p>
        </text:list-item>
        <text:list-item>
          <text:p text:style-name="P36">algunos caminos químicos rápidos, </text:p>
        </text:list-item>
        <text:list-item>
          <text:p text:style-name="P36">otros lentos, </text:p>
        </text:list-item>
        <text:list-item>
          <text:p text:style-name="P36">algunos que solo ocurren si hay suficiente sal, </text:p>
        </text:list-item>
        <text:list-item>
          <text:p text:style-name="P35">otros que solo ocurren si hay suficiente calor. </text:p>
        </text:list-item>
      </text:list>
      <text:p text:style-name="Text_20_body">Si subes la temperatura, la sopa “elige” un camino químico.<text:line-break/>Si la bajas, “elige” otro.</text:p>
      <text:p text:style-name="Text_20_body">La sopa no piensa.<text:line-break/>Pero <text:span text:style-name="Strong_20_Emphasis">su comportamiento depende de su estado</text:span>.</text:p>
      <text:p text:style-name="Text_20_body">Eso es una red química con selección de rutas.</text:p>
      <text:p text:style-name="Horizontal_20_Line"/>
      <text:h text:style-name="Heading_20_2" text:outline-level="2"><text:span text:style-name="Strong_20_Emphasis">6. ¿Por qué esto ya es inteligencia (aunque mínima)?</text:span></text:h>
      <text:p text:style-name="Text_20_body">Porque:</text:p>
      <text:p text:style-name="Quotations"><text:span text:style-name="Strong_20_Emphasis">El sistema altera su evolución según información interna.</text:span></text:p>
      <text:p text:style-name="Text_20_body">No sigue un único camino dictado por la física.<text:line-break/>No es un remolino ciego.<text:line-break/>No es un ciclo químico simple.</text:p>
      <text:p text:style-name="Text_20_body">Es un sistema que:</text:p>
      <text:list xml:id="list2773698439" text:style-name="L19">
        <text:list-item>
          <text:p text:style-name="P38">tiene alternativas, </text:p>
        </text:list-item>
        <text:list-item>
          <text:p text:style-name="P37">y toma una según su estado. </text:p>
        </text:list-item>
      </text:list>
      <text:p text:style-name="Text_20_body">Eso es la forma más simple de “decisión”.</text:p>
      <text:p text:style-name="Horizontal_20_Line"/>
      <text:h text:style-name="Heading_20_2" text:outline-level="2"><text:span text:style-name="Strong_20_Emphasis">7. ¿Qué NO es todavía?</text:span></text:h>
      <text:list xml:id="list4012767962" text:style-name="L20">
        <text:list-item>
          <text:p text:style-name="P40">No aprende. </text:p>
        </text:list-item>
        <text:list-item>
          <text:p text:style-name="P40">No recuerda. </text:p>
        </text:list-item>
        <text:list-item>
          <text:p text:style-name="P40">No se mantiene a sí mismo. </text:p>
        </text:list-item>
        <text:list-item>
          <text:p text:style-name="P40">No se repara. </text:p>
        </text:list-item>
        <text:list-item>
          <text:p text:style-name="P40">No se reproduce. </text:p>
        </text:list-item>
        <text:list-item>
          <text:p text:style-name="P39">No tiene objetivos. </text:p>
        </text:list-item>
      </text:list>
      <text:p text:style-name="Text_20_body"><text:soft-page-break/>Es inteligencia <text:span text:style-name="Strong_20_Emphasis">sin vida</text:span>.</text:p>
      <text:p text:style-name="Horizontal_20_Line"/>
      <text:h text:style-name="Heading_20_2" text:outline-level="2"><text:span text:style-name="Strong_20_Emphasis">8. ¿Por qué este nivel es crucial en la evolución?</text:span></text:h>
      <text:p text:style-name="Text_20_body">Porque sin selección:</text:p>
      <text:list xml:id="list1315581532" text:style-name="L21">
        <text:list-item>
          <text:p text:style-name="P42">no puede haber adaptación, </text:p>
        </text:list-item>
        <text:list-item>
          <text:p text:style-name="P42">sin adaptación no puede haber vida, </text:p>
        </text:list-item>
        <text:list-item>
          <text:p text:style-name="P42">sin vida no puede haber evolución, </text:p>
        </text:list-item>
        <text:list-item>
          <text:p text:style-name="P42">sin evolución no puede haber organismos, </text:p>
        </text:list-item>
        <text:list-item>
          <text:p text:style-name="P41">sin organismos no puede haber cerebros. </text:p>
        </text:list-item>
      </text:list>
      <text:p text:style-name="Text_20_body">Este nivel es la <text:span text:style-name="Strong_20_Emphasis">primera chispa</text:span> del fenómeno que más tarde llamaremos inteligencia.</text:p>
      <text:p text:style-name="Horizontal_20_Line"/>
      <text:h text:style-name="Heading_20_2" text:outline-level="2"><text:span text:style-name="Strong_20_Emphasis">9. Transición hacia el Nivel 3</text:span></text:h>
      <text:p text:style-name="Text_20_body">Cuando estas redes químicas:</text:p>
      <text:list xml:id="list3721314785" text:style-name="L22">
        <text:list-item>
          <text:p text:style-name="P44">empiezan a reforzar ciertos caminos, </text:p>
        </text:list-item>
        <text:list-item>
          <text:p text:style-name="P44">estabilizar configuraciones, </text:p>
        </text:list-item>
        <text:list-item>
          <text:p text:style-name="P44">crear memoria física, </text:p>
        </text:list-item>
        <text:list-item>
          <text:p text:style-name="P43">y reorganizarse según su historia, </text:p>
        </text:list-item>
      </text:list>
      <text:p text:style-name="Text_20_body">entonces aparece la <text:span text:style-name="Strong_20_Emphasis">inteligencia adaptativa</text:span>.</text:p>
      <text:p text:style-name="Text_20_body">Ese es el siguiente escalón.</text:p>
      <text:p text:style-name="Horizontal_20_Line"/>
      <text:p text:style-name="Text_20_body">Si quieres, ahora reescribo el <text:span text:style-name="Strong_20_Emphasis">Nivel 3 — Redes autocatalíticas → inteligencia adaptativa</text:span> con el mismo estilo claro y visual.</text:p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2T14:25:22.335000000</meta:creation-date>
    <dc:date>2026-06-22T14:45:53.110000000</dc:date>
    <meta:editing-duration>PT10M20S</meta:editing-duration>
    <meta:editing-cycles>1</meta:editing-cycles>
    <meta:document-statistic meta:table-count="0" meta:image-count="0" meta:object-count="0" meta:page-count="7" meta:paragraph-count="156" meta:word-count="1205" meta:character-count="7054" meta:non-whitespace-character-count="6001"/>
    <meta:generator>LibreOffice/7.3.5.2$Windows_X86_64 LibreOffice_project/184fe81b8c8c30d8b5082578aee2fed2ea847c01</meta:generator>
  </office:meta>
</office:document-meta>
</file>