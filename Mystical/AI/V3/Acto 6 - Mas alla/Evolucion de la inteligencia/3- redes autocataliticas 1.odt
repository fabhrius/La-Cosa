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in" fo:margin-bottom="0in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in" fo:margin-bottom="0in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7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Nivel 3 — Redes autocatalíticas → inteligencia adaptativa</text:h>
      <text:p text:style-name="Text_20_body"><text:span text:style-name="Emphasis">(versión clara, paso a paso, con ejemplos)</text:span></text:p>
      <text:p text:style-name="Horizontal_20_Line"/>
      <text:h text:style-name="Heading_20_4" text:outline-level="4">1. ¿En qué momento del “viaje” estamos?</text:h>
      <text:p text:style-name="Text_20_body">Ya no estamos en la fase en la que las reacciones químicas simplemente ocurren y se acaban (Nivel 0),<text:line-break/>ni en la fase en la que ciertos ciclos se mantienen mientras haya energía (proto‑agencia, Nivel 1),<text:line-break/>ni en la fase en la que las redes químicas pueden <text:span text:style-name="Strong_20_Emphasis">elegir rutas</text:span> según su estado (inteligencia mínima, Nivel 2).</text:p>
      <text:p text:style-name="Text_20_body">Ahora damos un paso más:<text:line-break/>las redes químicas empiezan no solo a elegir caminos, sino a <text:span text:style-name="Strong_20_Emphasis">reforzar algunos</text:span> y <text:span text:style-name="Strong_20_Emphasis">estabilizar configuraciones</text:span>.<text:line-break/>Es decir: empiezan a <text:span text:style-name="Strong_20_Emphasis">aprender físicamente</text:span>.</text:p>
      <text:p text:style-name="Horizontal_20_Line"/>
      <text:h text:style-name="Heading_20_4" text:outline-level="4">2. ¿Qué es una red autocatalítica?</text:h>
      <text:p text:style-name="Text_20_body">Vamos a aterrizarlo.</text:p>
      <text:p text:style-name="Text_20_body">Imagina de nuevo un mapa de carreteras químicas:</text:p>
      <text:list xml:id="list1832984505" text:style-name="L1">
        <text:list-item>
          <text:p text:style-name="P2">A se convierte en B </text:p>
        </text:list-item>
        <text:list-item>
          <text:p text:style-name="P2">B se convierte en C </text:p>
        </text:list-item>
        <text:list-item>
          <text:p text:style-name="P1">C ayuda a que A se forme más rápido </text:p>
        </text:list-item>
      </text:list>
      <text:p text:style-name="Text_20_body">Eso ya es un ciclo autocatalítico:<text:line-break/>el producto (C) favorece la producción de su propio origen (A).</text:p>
      <text:p text:style-name="Text_20_body">Ahora imagina que no es solo un ciclo, sino <text:span text:style-name="Strong_20_Emphasis">muchos ciclos conectados</text:span>:</text:p>
      <text:list xml:id="list3991167323" text:style-name="L2">
        <text:list-item>
          <text:p text:style-name="P4">A → B → C → A </text:p>
        </text:list-item>
        <text:list-item>
          <text:p text:style-name="P4">D → E → F → D </text:p>
        </text:list-item>
        <text:list-item>
          <text:p text:style-name="P4">C ayuda a formar D </text:p>
        </text:list-item>
        <text:list-item>
          <text:p text:style-name="P3">F ayuda a formar A </text:p>
        </text:list-item>
      </text:list>
      <text:p text:style-name="Text_20_body">Lo que tienes es una <text:span text:style-name="Strong_20_Emphasis">red</text:span> donde:</text:p>
      <text:list xml:id="list149405837" text:style-name="L3">
        <text:list-item>
          <text:p text:style-name="P6">unas reacciones alimentan a otras, </text:p>
        </text:list-item>
        <text:list-item>
          <text:p text:style-name="P6">los productos de unas favorecen otras, </text:p>
        </text:list-item>
        <text:list-item>
          <text:p text:style-name="P5">y el conjunto se refuerza a sí mismo. </text:p>
        </text:list-item>
      </text:list>
      <text:p text:style-name="Text_20_body">Es como un grupo de personas que se ayudan mutuamente a seguir trabajando:<text:line-break/>cada una hace algo que permite que las otras sigan.</text:p>
      <text:p text:style-name="Horizontal_20_Line"/>
      <text:h text:style-name="Heading_20_4" text:outline-level="4"><text:soft-page-break/>3. ¿Qué significa “autocatalítico” en términos simples?</text:h>
      <text:p text:style-name="Text_20_body">“Catalizar” es <text:span text:style-name="Strong_20_Emphasis">facilitar una reacción</text:span>.<text:line-break/>“Autocatalítico” significa que <text:span text:style-name="Strong_20_Emphasis">la propia red facilita su propia continuidad</text:span>.</text:p>
      <text:p text:style-name="Text_20_body">No es solo que las reacciones ocurran.<text:line-break/>Es que:</text:p>
      <text:list xml:id="list2287484025" text:style-name="L4">
        <text:list-item>
          <text:p text:style-name="P8">cuanto más avanza la red, </text:p>
        </text:list-item>
        <text:list-item>
          <text:p text:style-name="P7">más fácil le resulta seguir avanzando. </text:p>
        </text:list-item>
      </text:list>
      <text:p text:style-name="Text_20_body">Es un <text:span text:style-name="Strong_20_Emphasis">refuerzo interno</text:span>.</text:p>
      <text:p text:style-name="Horizontal_20_Line"/>
      <text:h text:style-name="Heading_20_4" text:outline-level="4">4. ¿Qué hace que esto sea distinto del nivel anterior?</text:h>
      <text:p text:style-name="Text_20_body">En el Nivel 2, la red química:</text:p>
      <text:list xml:id="list1319553623" text:style-name="L5">
        <text:list-item>
          <text:p text:style-name="P10">podía elegir rutas según su estado, </text:p>
        </text:list-item>
        <text:list-item>
          <text:p text:style-name="P9">pero no cambiaba su estructura de forma duradera. </text:p>
        </text:list-item>
      </text:list>
      <text:p text:style-name="Text_20_body">En el Nivel 3, ocurre algo nuevo:</text:p>
      <text:p text:style-name="Quotations"><text:span text:style-name="Strong_20_Emphasis">La red empieza a estabilizar ciertas configuraciones.<text:line-break/>Algunas formas de organización se vuelven más probables y más duraderas.</text:span></text:p>
      <text:p text:style-name="Text_20_body">Esto es lo que llamamos:</text:p>
      <text:list xml:id="list3920023490" text:style-name="L6">
        <text:list-item>
          <text:p text:style-name="P12">atractores (estados hacia los que el sistema tiende), </text:p>
        </text:list-item>
        <text:list-item>
          <text:p text:style-name="P12">memoria física (el sistema “recuerda” dónde ha estado), </text:p>
        </text:list-item>
        <text:list-item>
          <text:p text:style-name="P11">aprendizaje estructural (la red cambia según su historia). </text:p>
        </text:list-item>
      </text:list>
      <text:p text:style-name="Horizontal_20_Line"/>
      <text:h text:style-name="Heading_20_4" text:outline-level="4">5. Ejemplo intuitivo: la ciudad que se reorganiza</text:h>
      <text:p text:style-name="Text_20_body">Imagina una ciudad:</text:p>
      <text:list xml:id="list3775689719" text:style-name="L7">
        <text:list-item>
          <text:p text:style-name="P14">al principio, las calles están desordenadas, </text:p>
        </text:list-item>
        <text:list-item>
          <text:p text:style-name="P14">la gente va por cualquier camino, </text:p>
        </text:list-item>
        <text:list-item>
          <text:p text:style-name="P13">no hay rutas preferentes. </text:p>
        </text:list-item>
      </text:list>
      <text:p text:style-name="Text_20_body">Con el tiempo:</text:p>
      <text:list xml:id="list1646257820" text:style-name="L8">
        <text:list-item>
          <text:p text:style-name="P16">se construyen avenidas, </text:p>
        </text:list-item>
        <text:list-item>
          <text:p text:style-name="P16">se refuerzan ciertos caminos, </text:p>
        </text:list-item>
        <text:list-item>
          <text:p text:style-name="P16">aparecen zonas donde siempre hay tráfico, </text:p>
        </text:list-item>
        <text:list-item>
          <text:p text:style-name="P15">otras quedan casi vacías. </text:p>
        </text:list-item>
      </text:list>
      <text:p text:style-name="Text_20_body">La ciudad ha “aprendido” físicamente:</text:p>
      <text:list xml:id="list2640736551" text:style-name="L9">
        <text:list-item>
          <text:p text:style-name="P18">su estructura ha cambiado según el uso, </text:p>
        </text:list-item>
        <text:list-item>
          <text:p text:style-name="P18"><text:soft-page-break/>algunos caminos se han consolidado, </text:p>
        </text:list-item>
        <text:list-item>
          <text:p text:style-name="P17">otros han desaparecido. </text:p>
        </text:list-item>
      </text:list>
      <text:p text:style-name="Text_20_body">Una red autocatalítica hace algo parecido, pero con moléculas.</text:p>
      <text:p text:style-name="Horizontal_20_Line"/>
      <text:h text:style-name="Heading_20_4" text:outline-level="4">6. Definición de inteligencia adaptativa en este nivel</text:h>
      <text:p text:style-name="Quotations"><text:span text:style-name="Strong_20_Emphasis">Inteligencia adaptativa (prebiológica) es la capacidad de una red química para modificar su propia organización en función de su historia, reforzando configuraciones que se sostienen y debilitando las que no.</text:span></text:p>
      <text:p text:style-name="Text_20_body">No hay genes.<text:line-break/>No hay neuronas.<text:line-break/>No hay vida todavía.<text:line-break/>Pero sí hay:</text:p>
      <text:list xml:id="list1210262061" text:style-name="L10">
        <text:list-item>
          <text:p text:style-name="P20">refuerzo, </text:p>
        </text:list-item>
        <text:list-item>
          <text:p text:style-name="P20">memoria, </text:p>
        </text:list-item>
        <text:list-item>
          <text:p text:style-name="P19">aprendizaje físico. </text:p>
        </text:list-item>
      </text:list>
      <text:p text:style-name="Horizontal_20_Line"/>
      <text:h text:style-name="Heading_20_4" text:outline-level="4">7. ¿Por qué esto es importante en la evolución de la inteligencia?</text:h>
      <text:p text:style-name="Text_20_body">Porque aquí aparece por primera vez algo que se parece mucho a:</text:p>
      <text:list xml:id="list2845839413" text:style-name="L11">
        <text:list-item>
          <text:p text:style-name="P22"><text:span text:style-name="Strong_20_Emphasis">aprender</text:span>, </text:p>
        </text:list-item>
        <text:list-item>
          <text:p text:style-name="P22"><text:span text:style-name="Strong_20_Emphasis">adaptarse</text:span>, </text:p>
        </text:list-item>
        <text:list-item>
          <text:p text:style-name="P21"><text:span text:style-name="Strong_20_Emphasis">conservar lo que funciona</text:span>. </text:p>
        </text:list-item>
      </text:list>
      <text:p text:style-name="Text_20_body">Sin esta capacidad:</text:p>
      <text:list xml:id="list2129127304" text:style-name="L12">
        <text:list-item>
          <text:p text:style-name="P24">la red solo elegiría rutas (Nivel 2), </text:p>
        </text:list-item>
        <text:list-item>
          <text:p text:style-name="P24">pero no podría <text:span text:style-name="Strong_20_Emphasis">mejorar</text:span> su organización, </text:p>
        </text:list-item>
        <text:list-item>
          <text:p text:style-name="P24">ni <text:span text:style-name="Strong_20_Emphasis">explorar</text:span> configuraciones más estables, </text:p>
        </text:list-item>
        <text:list-item>
          <text:p text:style-name="P23">ni <text:span text:style-name="Strong_20_Emphasis">preparar el terreno</text:span> para la vida. </text:p>
        </text:list-item>
      </text:list>
      <text:p text:style-name="Text_20_body">La inteligencia adaptativa es el puente entre:</text:p>
      <text:list xml:id="list2942372491" text:style-name="L13">
        <text:list-item>
          <text:p text:style-name="P26">redes químicas que solo reaccionan y eligen, </text:p>
        </text:list-item>
        <text:list-item>
          <text:p text:style-name="P25">y sistemas que empiezan a <text:span text:style-name="Strong_20_Emphasis">mantenerse y evolucionar</text:span>. </text:p>
        </text:list-item>
      </text:list>
      <text:p text:style-name="Horizontal_20_Line"/>
      <text:h text:style-name="Heading_20_4" text:outline-level="4">8. Ejemplos naturales (simplificados)</text:h>
      <text:list xml:id="list667801873" text:style-name="L14">
        <text:list-item>
          <text:p text:style-name="P28">Redes químicas en superficies minerales donde ciertas patrones de reacción se repiten y se consolidan. </text:p>
        </text:list-item>
        <text:list-item>
          <text:p text:style-name="P27">Sistemas donde ciertas combinaciones de moléculas tienden a reaparecer porque favorecen su propia producción. </text:p>
        </text:list-item>
      </text:list>
      <text:p text:style-name="Text_20_body"><text:soft-page-break/>Aunque no podamos ver estas redes directamente, los modelos teóricos y experimentos sugieren que:</text:p>
      <text:p text:style-name="Quotations"><text:span text:style-name="Strong_20_Emphasis">antes de la vida, ya existían conjuntos de reacciones que se reforzaban a sí mismos.</text:span></text:p>
      <text:p text:style-name="Horizontal_20_Line"/>
      <text:h text:style-name="Heading_20_4" text:outline-level="4">9. Ejemplos artificiales</text:h>
      <text:list xml:id="list3652296523" text:style-name="L15">
        <text:list-item>
          <text:p text:style-name="P30">Simulaciones de redes químicas donde ciertas rutas se vuelven más probables con el tiempo. </text:p>
        </text:list-item>
        <text:list-item>
          <text:p text:style-name="P30">Modelos de autómatas donde ciertos patrones se consolidan como “atractores” del sistema. </text:p>
        </text:list-item>
        <text:list-item>
          <text:p text:style-name="P29">Algoritmos evolutivos muy simples donde soluciones que funcionan se refuerzan. </text:p>
        </text:list-item>
      </text:list>
      <text:p text:style-name="Horizontal_20_Line"/>
      <text:h text:style-name="Heading_20_4" text:outline-level="4">10. Transición hacia el siguiente nivel: protocélulas → vida mínima</text:h>
      <text:p text:style-name="Text_20_body">En este punto, tenemos:</text:p>
      <text:list xml:id="list2083961446" text:style-name="L16">
        <text:list-item>
          <text:p text:style-name="P32">redes que se refuerzan, </text:p>
        </text:list-item>
        <text:list-item>
          <text:p text:style-name="P32">que aprenden físicamente, </text:p>
        </text:list-item>
        <text:list-item>
          <text:p text:style-name="P31">que estabilizan configuraciones útiles. </text:p>
        </text:list-item>
      </text:list>
      <text:p text:style-name="Text_20_body">El siguiente salto es que estas redes:</text:p>
      <text:list xml:id="list3177380589" text:style-name="L17">
        <text:list-item>
          <text:p text:style-name="P34">queden <text:span text:style-name="Strong_20_Emphasis">encerradas</text:span> en compartimentos (vesículas, gotas, burbujas), </text:p>
        </text:list-item>
        <text:list-item>
          <text:p text:style-name="P34">empiecen a <text:span text:style-name="Strong_20_Emphasis">mantener su interior</text:span>, </text:p>
        </text:list-item>
        <text:list-item>
          <text:p text:style-name="P33">y puedan generar <text:span text:style-name="Strong_20_Emphasis">copias imperfectas</text:span> de sí mismas. </text:p>
        </text:list-item>
      </text:list>
      <text:p text:style-name="Text_20_body">Cuando eso ocurre, ya no hablamos solo de redes químicas:<text:line-break/>hablamos de <text:span text:style-name="Strong_20_Emphasis">protocélulas</text:span>.</text:p>
      <text:p text:style-name="Text_20_body">Y ahí empieza la <text:span text:style-name="Strong_20_Emphasis">vida mínima</text:span>.</text:p>
      <text:p text:style-name="Horizontal_20_Line"/>
      <text:p text:style-name="Text_20_body">Si quieres, ahora seguimos con el <text:span text:style-name="Strong_20_Emphasis">Nivel 4 — Protocélulas → vida mínima</text:span>, manteniendo este estilo:<text:line-break/>situar el momento, describir qué ocurre físicamente, explicar por qué es importante, y cómo empuja al siguiente escalón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2T14:47:52.617000000</meta:creation-date>
    <dc:date>2026-06-22T14:49:23.806000000</dc:date>
    <meta:editing-duration>PT1M31S</meta:editing-duration>
    <meta:editing-cycles>1</meta:editing-cycles>
    <meta:document-statistic meta:table-count="0" meta:image-count="0" meta:object-count="0" meta:page-count="4" meta:paragraph-count="93" meta:word-count="839" meta:character-count="4961" meta:non-whitespace-character-count="4213"/>
    <meta:generator>LibreOffice/7.3.5.2$Windows_X86_64 LibreOffice_project/184fe81b8c8c30d8b5082578aee2fed2ea847c01</meta:generator>
  </office:meta>
</office:document-meta>
</file>