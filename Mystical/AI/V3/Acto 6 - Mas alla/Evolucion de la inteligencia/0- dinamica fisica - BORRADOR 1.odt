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in" fo:margin-bottom="0in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in" fo:margin-bottom="0in" style:contextual-spacing="false"/>
    </style:style>
    <style:style style:name="P5" style:family="paragraph" style:parent-style-name="Text_20_body" style:list-style-name="L3"/>
    <style:style style:name="P6" style:family="paragraph" style:parent-style-name="Text_20_body" style:list-style-name="L3">
      <style:paragraph-properties fo:margin-top="0in" fo:margin-bottom="0in" style:contextual-spacing="false"/>
    </style:style>
    <style:style style:name="P7" style:family="paragraph" style:parent-style-name="Text_20_body" style:list-style-name="L4"/>
    <style:style style:name="P8" style:family="paragraph" style:parent-style-name="Text_20_body" style:list-style-name="L4">
      <style:paragraph-properties fo:margin-top="0in" fo:margin-bottom="0in" style:contextual-spacing="false"/>
    </style:style>
    <style:style style:name="P9" style:family="paragraph" style:parent-style-name="Text_20_body" style:list-style-name="L5"/>
    <style:style style:name="P10" style:family="paragraph" style:parent-style-name="Text_20_body" style:list-style-name="L5">
      <style:paragraph-properties fo:margin-top="0in" fo:margin-bottom="0in" style:contextual-spacing="false"/>
    </style:style>
    <style:style style:name="P11" style:family="paragraph" style:parent-style-name="Text_20_body" style:list-style-name="L6"/>
    <style:style style:name="P12" style:family="paragraph" style:parent-style-name="Text_20_body" style:list-style-name="L6">
      <style:paragraph-properties fo:margin-top="0in" fo:margin-bottom="0in" style:contextual-spacing="false"/>
    </style:style>
    <style:style style:name="P13" style:family="paragraph" style:parent-style-name="Text_20_body" style:list-style-name="L7"/>
    <style:style style:name="P14" style:family="paragraph" style:parent-style-name="Text_20_body" style:list-style-name="L7">
      <style:paragraph-properties fo:margin-top="0in" fo:margin-bottom="0in" style:contextual-spacing="false"/>
    </style:style>
    <style:style style:name="P15" style:family="paragraph" style:parent-style-name="Text_20_body" style:list-style-name="L8"/>
    <style:style style:name="P16" style:family="paragraph" style:parent-style-name="Text_20_body" style:list-style-name="L8">
      <style:paragraph-properties fo:margin-top="0in" fo:margin-bottom="0in" style:contextual-spacing="false"/>
    </style:style>
    <style:style style:name="P17" style:family="paragraph" style:parent-style-name="Text_20_body" style:list-style-name="L9"/>
    <style:style style:name="P18" style:family="paragraph" style:parent-style-name="Text_20_body" style:list-style-name="L9">
      <style:paragraph-properties fo:margin-top="0in" fo:margin-bottom="0in" style:contextual-spacing="false"/>
    </style:style>
    <style:style style:name="P19" style:family="paragraph" style:parent-style-name="Text_20_body" style:list-style-name="L10"/>
    <style:style style:name="P20" style:family="paragraph" style:parent-style-name="Text_20_body" style:list-style-name="L10">
      <style:paragraph-properties fo:margin-top="0in" fo:margin-bottom="0in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Text_20_body">Perfecto, Fab.<text:line-break/>Vamos a desarrollar <text:span text:style-name="Strong_20_Emphasis">el Nivel 0 — Dinámica física</text:span> con el tono, la profundidad y la estructura que necesitamos para el capítulo.<text:line-break/>Este es el primer escalón del mapa evolutivo, así que debe:</text:p>
      <text:list xml:id="list2312406179" text:style-name="L1">
        <text:list-item>
          <text:p text:style-name="P2">situar al lector en el contexto histórico y físico, </text:p>
        </text:list-item>
        <text:list-item>
          <text:p text:style-name="P2">explicar qué ocurre en este nivel, </text:p>
        </text:list-item>
        <text:list-item>
          <text:p text:style-name="P2">dejar claro por qué <text:span text:style-name="Strong_20_Emphasis">no hay inteligencia</text:span>, </text:p>
        </text:list-item>
        <text:list-item>
          <text:p text:style-name="P2">mostrar por qué este nivel es necesario para que la inteligencia pueda surgir después, </text:p>
        </text:list-item>
        <text:list-item>
          <text:p text:style-name="P1">y preparar la transición hacia la proto‑agencia. </text:p>
        </text:list-item>
      </text:list>
      <text:p text:style-name="Text_20_body">Aquí tienes un <text:span text:style-name="Strong_20_Emphasis">primer borrador sólido</text:span>, listo para pulir más adelante.</text:p>
      <text:p text:style-name="Horizontal_20_Line"/>
      <text:h text:style-name="Heading_20_1" text:outline-level="1">⭐ <text:span text:style-name="Strong_20_Emphasis">NIVEL 0 — DINÁMICA FÍSICA</text:span></text:h>
      <text:p text:style-name="Text_20_body"><text:span text:style-name="Emphasis">(Borrador de desarrollo para el capítulo)</text:span></text:p>
      <text:h text:style-name="Heading_20_2" text:outline-level="2"><text:span text:style-name="Strong_20_Emphasis">1. Contexto histórico y físico</text:span></text:h>
      <text:p text:style-name="Text_20_body">Mucho antes de que existieran células, moléculas complejas o redes químicas capaces de aprender, el universo estaba dominado por procesos simples: expansión, enfriamiento, agregación, ruptura, difusión. Durante cientos de millones de años, la materia obedeció únicamente a las leyes físicas fundamentales, sin estructuras capaces de mantener una forma estable ni de influir en su propio destino.</text:p>
      <text:p text:style-name="Text_20_body">En la Tierra primitiva —hace unos 4.300 a 4.000 millones de años— el escenario era caótico pero fértil:</text:p>
      <text:list xml:id="list2812617528" text:style-name="L2">
        <text:list-item>
          <text:p text:style-name="P4">océanos calientes, </text:p>
        </text:list-item>
        <text:list-item>
          <text:p text:style-name="P4">volcanes activos, </text:p>
        </text:list-item>
        <text:list-item>
          <text:p text:style-name="P4">descargas eléctricas, </text:p>
        </text:list-item>
        <text:list-item>
          <text:p text:style-name="P4">radiación ultravioleta intensa, </text:p>
        </text:list-item>
        <text:list-item>
          <text:p text:style-name="P4">minerales catalíticos, </text:p>
        </text:list-item>
        <text:list-item>
          <text:p text:style-name="P3">gradientes térmicos y químicos. </text:p>
        </text:list-item>
      </text:list>
      <text:p text:style-name="Text_20_body">Era un mundo sin vida, pero lleno de energía y de reacciones químicas espontáneas.<text:line-break/>En este entorno, la materia no “hacía” nada más que seguir la dinámica natural: reaccionar, dispersarse, equilibrarse.</text:p>
      <text:p text:style-name="Text_20_body">Este es el punto de partida de nuestro viaje.</text:p>
      <text:p text:style-name="Horizontal_20_Line"/>
      <text:h text:style-name="Heading_20_2" text:outline-level="2"><text:soft-page-break/><text:span text:style-name="Strong_20_Emphasis">2. Qué es la dinámica física</text:span></text:h>
      <text:p text:style-name="Text_20_body">La dinámica física es el comportamiento natural de un sistema cuando <text:span text:style-name="Strong_20_Emphasis">no existe ninguna estructura interna que modifique su evolución</text:span>.<text:line-break/>Es la forma más simple de cambio:</text:p>
      <text:list xml:id="list2812486791" text:style-name="L3">
        <text:list-item>
          <text:p text:style-name="P6">si hay un gradiente, fluye; </text:p>
        </text:list-item>
        <text:list-item>
          <text:p text:style-name="P6">si hay una diferencia de concentración, difunde; </text:p>
        </text:list-item>
        <text:list-item>
          <text:p text:style-name="P6">si hay energía disponible, se disipa; </text:p>
        </text:list-item>
        <text:list-item>
          <text:p text:style-name="P5">si hay una reacción posible, ocurre hasta el equilibrio. </text:p>
        </text:list-item>
      </text:list>
      <text:p text:style-name="Text_20_body">No hay decisiones.<text:line-break/>No hay alternativas.<text:line-break/>No hay información funcional.<text:line-break/>No hay memoria.<text:line-break/>No hay selección.</text:p>
      <text:p text:style-name="Text_20_body">Solo <text:span text:style-name="Strong_20_Emphasis">física pura</text:span>.</text:p>
      <text:p text:style-name="Horizontal_20_Line"/>
      <text:h text:style-name="Heading_20_2" text:outline-level="2"><text:span text:style-name="Strong_20_Emphasis">3. ¿Qué incluye este nivel?</text:span></text:h>
      <text:h text:style-name="Heading_20_3" text:outline-level="3"><text:span text:style-name="Strong_20_Emphasis">3.1. Procesos lógicos simples</text:span></text:h>
      <text:p text:style-name="Text_20_body">Aquí “lógico” no significa inteligente, sino <text:span text:style-name="Strong_20_Emphasis">determinístico</text:span>:<text:line-break/>el estado futuro depende del estado presente según reglas fijas.</text:p>
      <text:p text:style-name="Text_20_body">Ejemplos:</text:p>
      <text:list xml:id="list1565121336" text:style-name="L4">
        <text:list-item>
          <text:p text:style-name="P8">una reacción química que siempre produce los mismos productos, </text:p>
        </text:list-item>
        <text:list-item>
          <text:p text:style-name="P8">un autómata celular que siempre converge al mismo patrón, </text:p>
        </text:list-item>
        <text:list-item>
          <text:p text:style-name="P7">un circuito eléctrico lineal que responde igual ante el mismo estímulo. </text:p>
        </text:list-item>
      </text:list>
      <text:p text:style-name="Text_20_body">No hay bifurcaciones ni alternativas.</text:p>
      <text:h text:style-name="Heading_20_3" text:outline-level="3"><text:span text:style-name="Strong_20_Emphasis">3.2. Materia reactiva simple</text:span></text:h>
      <text:p text:style-name="Text_20_body">La materia reacciona, pero <text:span text:style-name="Strong_20_Emphasis">no se organiza</text:span>.<text:line-break/>Ejemplos:</text:p>
      <text:list xml:id="list938942139" text:style-name="L5">
        <text:list-item>
          <text:p text:style-name="P10">moléculas que se combinan y luego se dispersan, </text:p>
        </text:list-item>
        <text:list-item>
          <text:p text:style-name="P10">compuestos que se forman y se degradan sin ciclos, </text:p>
        </text:list-item>
        <text:list-item>
          <text:p text:style-name="P9">reacciones que se agotan y no dejan estructura persistente. </text:p>
        </text:list-item>
      </text:list>
      <text:p text:style-name="Text_20_body">Aquí no hay bucles, no hay realimentación, no hay persistencia.</text:p>
      <text:p text:style-name="Horizontal_20_Line"/>
      <text:h text:style-name="Heading_20_2" text:outline-level="2"><text:soft-page-break/><text:span text:style-name="Strong_20_Emphasis">4. Por qué este nivel NO es inteligencia</text:span></text:h>
      <text:p text:style-name="Text_20_body">Porque:</text:p>
      <text:list xml:id="list1041416355" text:style-name="L6">
        <text:list-item>
          <text:p text:style-name="P12">no hay selección entre rutas, </text:p>
        </text:list-item>
        <text:list-item>
          <text:p text:style-name="P12">no hay sensibilidad al estado interno, </text:p>
        </text:list-item>
        <text:list-item>
          <text:p text:style-name="P12">no hay desviación informada, </text:p>
        </text:list-item>
        <text:list-item>
          <text:p text:style-name="P12">no hay auto‑mantenimiento, </text:p>
        </text:list-item>
        <text:list-item>
          <text:p text:style-name="P12">no hay resolución de problemas, </text:p>
        </text:list-item>
        <text:list-item>
          <text:p text:style-name="P11">no hay estructura que influya en su propio destino. </text:p>
        </text:list-item>
      </text:list>
      <text:p text:style-name="Text_20_body">El sistema <text:span text:style-name="Strong_20_Emphasis">no altera</text:span> la dinámica natural:<text:line-break/>la sigue.</text:p>
      <text:p text:style-name="Text_20_body">Este nivel es completamente <text:span text:style-name="Strong_20_Emphasis">pre‑inteligente</text:span>.</text:p>
      <text:p text:style-name="Horizontal_20_Line"/>
      <text:h text:style-name="Heading_20_2" text:outline-level="2"><text:span text:style-name="Strong_20_Emphasis">5. ¿Por qué este nivel es importante en la evolución del fenómeno?</text:span></text:h>
      <text:p text:style-name="Text_20_body">Porque la inteligencia no surge de la nada.<text:line-break/>Para que exista inteligencia —incluso en su forma más mínima— deben existir:</text:p>
      <text:list xml:id="list2211067426" text:style-name="L7">
        <text:list-item>
          <text:p text:style-name="P14">estructuras, </text:p>
        </text:list-item>
        <text:list-item>
          <text:p text:style-name="P14">bucles, </text:p>
        </text:list-item>
        <text:list-item>
          <text:p text:style-name="P14">realimentación, </text:p>
        </text:list-item>
        <text:list-item>
          <text:p text:style-name="P14">persistencia, </text:p>
        </text:list-item>
        <text:list-item>
          <text:p text:style-name="P14">rutas alternativas, </text:p>
        </text:list-item>
        <text:list-item>
          <text:p text:style-name="P13">sensibilidad al estado. </text:p>
        </text:list-item>
      </text:list>
      <text:p text:style-name="Text_20_body">Nada de eso existe en la dinámica física pura.<text:line-break/>Pero <text:span text:style-name="Strong_20_Emphasis">la dinámica física crea las condiciones</text:span> para que aparezcan:</text:p>
      <text:list xml:id="list3897777934" text:style-name="L8">
        <text:list-item>
          <text:p text:style-name="P16">moléculas, </text:p>
        </text:list-item>
        <text:list-item>
          <text:p text:style-name="P16">reacciones, </text:p>
        </text:list-item>
        <text:list-item>
          <text:p text:style-name="P16">gradientes, </text:p>
        </text:list-item>
        <text:list-item>
          <text:p text:style-name="P16">ciclos, </text:p>
        </text:list-item>
        <text:list-item>
          <text:p text:style-name="P15">estructuras disipativas. </text:p>
        </text:list-item>
      </text:list>
      <text:p text:style-name="Text_20_body">Es decir:</text:p>
      <text:p text:style-name="Quotations"><text:span text:style-name="Strong_20_Emphasis">La dinámica física es el terreno donde la materia empieza a organizarse.<text:line-break/>Y esa organización es el primer paso hacia la inteligencia.</text:span></text:p>
      <text:p text:style-name="Text_20_body">Sin este nivel, no habría nada que pudiera evolucionar hacia formas más complejas.</text:p>
      <text:p text:style-name="Horizontal_20_Line"/>
      <text:h text:style-name="Heading_20_2" text:outline-level="2"><text:soft-page-break/><text:span text:style-name="Strong_20_Emphasis">6. Transición hacia el siguiente nivel: proto‑agencia</text:span></text:h>
      <text:p text:style-name="Text_20_body">En algún momento, ciertos procesos físicos dejaron de ser simples reacciones aisladas y comenzaron a formar <text:span text:style-name="Strong_20_Emphasis">ciclos</text:span>.<text:line-break/>Un ciclo químico que se repite mientras haya energía ya no es una reacción puntual:<text:line-break/>es una <text:span text:style-name="Strong_20_Emphasis">estructura dinámica</text:span>.</text:p>
      <text:p text:style-name="Text_20_body">Y aunque todavía no es inteligencia, sí es:</text:p>
      <text:list xml:id="list1893590168" text:style-name="L9">
        <text:list-item>
          <text:p text:style-name="P18">persistencia, </text:p>
        </text:list-item>
        <text:list-item>
          <text:p text:style-name="P18">realimentación, </text:p>
        </text:list-item>
        <text:list-item>
          <text:p text:style-name="P18">auto‑sostenimiento, </text:p>
        </text:list-item>
        <text:list-item>
          <text:p text:style-name="P17">un embrión de organización. </text:p>
        </text:list-item>
      </text:list>
      <text:p text:style-name="Text_20_body">Ese es el salto hacia el <text:span text:style-name="Strong_20_Emphasis">Nivel 1 — Materia organizada → proto‑agencia</text:span>.</text:p>
      <text:p text:style-name="Horizontal_20_Line"/>
      <text:h text:style-name="Heading_20_1" text:outline-level="1">⭐ ¿Siguiente paso?</text:h>
      <text:p text:style-name="Text_20_body">Si estás de acuerdo con este borrador, avanzamos al <text:span text:style-name="Strong_20_Emphasis">Nivel 1 — Materia organizada → proto‑agencia</text:span>, donde ya aparece:</text:p>
      <text:list xml:id="list1134066674" text:style-name="L10">
        <text:list-item>
          <text:p text:style-name="P20">persistencia reactiva, </text:p>
        </text:list-item>
        <text:list-item>
          <text:p text:style-name="P20">bucles, </text:p>
        </text:list-item>
        <text:list-item>
          <text:p text:style-name="P20">realimentación, </text:p>
        </text:list-item>
        <text:list-item>
          <text:p text:style-name="P20">estructuras que se mantienen, </text:p>
        </text:list-item>
        <text:list-item>
          <text:p text:style-name="P19">pero todavía sin selección. </text:p>
        </text:list-item>
      </text:list>
      <text:p text:style-name="Text_20_body">¿Continuamos con el Nivel 1?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6-21T19:40:49.065000000</meta:creation-date>
    <dc:date>2026-06-21T19:45:55.496000000</dc:date>
    <meta:editing-duration>PT5M6S</meta:editing-duration>
    <meta:editing-cycles>1</meta:editing-cycles>
    <meta:document-statistic meta:table-count="0" meta:image-count="0" meta:object-count="0" meta:page-count="4" meta:paragraph-count="85" meta:word-count="734" meta:character-count="4549" meta:non-whitespace-character-count="3896"/>
    <meta:generator>LibreOffice/7.3.5.2$Windows_X86_64 LibreOffice_project/184fe81b8c8c30d8b5082578aee2fed2ea847c01</meta:generator>
  </office:meta>
</office:document-meta>
</file>