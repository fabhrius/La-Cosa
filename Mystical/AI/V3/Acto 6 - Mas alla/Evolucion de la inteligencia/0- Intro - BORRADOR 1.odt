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text:line-break/>Vamos a escribir <text:span text:style-name="Strong_20_Emphasis">un primer borrador de la introducción</text:span>, con el tono adecuado para abrir un capítulo que explica la evolución de la inteligencia desde su origen más simple hasta sus formas más complejas.</text:p>
      <text:p text:style-name="Text_20_body">Esta introducción debe:</text:p>
      <text:list xml:id="list1081623919" text:style-name="L1">
        <text:list-item>
          <text:p text:style-name="P2">preparar al lector, </text:p>
        </text:list-item>
        <text:list-item>
          <text:p text:style-name="P2">aclarar qué entendemos por “inteligencia”, </text:p>
        </text:list-item>
        <text:list-item>
          <text:p text:style-name="P2">mostrar que no existe una única forma del fenómeno, </text:p>
        </text:list-item>
        <text:list-item>
          <text:p text:style-name="P2">explicar que la inteligencia surge de la materia, </text:p>
        </text:list-item>
        <text:list-item>
          <text:p text:style-name="P1">y presentar el viaje evolutivo que vamos a recorrer. </text:p>
        </text:list-item>
      </text:list>
      <text:p text:style-name="Text_20_body">Aquí tienes un <text:span text:style-name="Strong_20_Emphasis">primer borrador</text:span>, claro, elegante y sin tecnicismos innecesarios.</text:p>
      <text:p text:style-name="Horizontal_20_Line"/>
      <text:h text:style-name="Heading_20_1" text:outline-level="1">⭐ <text:span text:style-name="Strong_20_Emphasis">BORRADOR DE INTRODUCCIÓN AL CAPÍTULO</text:span></text:h>
      <text:p text:style-name="Text_20_body">La palabra <text:span text:style-name="Emphasis">inteligencia</text:span> suele evocar imágenes de cerebros, decisiones conscientes, estrategias, planes y razonamientos complejos. Sin embargo, estas son solo las manifestaciones más avanzadas de un fenómeno mucho más antiguo y profundo. La inteligencia no aparece de repente con los animales, ni con los cerebros, ni siquiera con la vida. Surge gradualmente, como una propiedad emergente de ciertas formas de organización material.</text:p>
      <text:p text:style-name="Text_20_body">En su esencia más simple, la inteligencia es <text:span text:style-name="Strong_20_Emphasis">la capacidad de producir una acción no trivial</text:span>, una acción que no es la consecuencia inevitable de la dinámica natural. Reconocemos inteligencia cuando vemos que un sistema hace algo que <text:span text:style-name="Emphasis">no habría ocurrido solo</text:span>, algo que desvía el curso natural de los acontecimientos. Un circuito electrónico que frena un coche cuando detecta un obstáculo, un programa que resuelve un problema lógico, una célula que repara un daño, un animal que evita un peligro: todos ellos alteran la evolución natural de su entorno mediante información.</text:p>
      <text:p text:style-name="Text_20_body">Pero esta capacidad no aparece de golpe. No existe un único tipo de inteligencia, sino <text:span text:style-name="Strong_20_Emphasis">una familia de capacidades que evolucionan en complejidad</text:span>. Desde las formas más simples, donde apenas hay selección entre alternativas, hasta las formas más elaboradas, donde un organismo puede planificar, anticipar y aprender. La inteligencia no es un bloque indivisible, sino un fenómeno que crece, se transforma y se diversifica a lo largo de la historia de la materia.</text:p>
      <text:p text:style-name="Text_20_body">Para comprender su origen, debemos retroceder mucho más allá de la vida. Debemos observar cómo ciertos sistemas químicos comienzan a seleccionar rutas, cómo algunas redes se refuerzan a sí mismas, cómo aparecen ciclos que se mantienen, cómo surgen estructuras que aprenden físicamente de su historia. Y, finalmente, cómo estas capacidades se vuelven autorreferenciales, dando lugar a los primeros sistemas vivos.</text:p>
      <text:p text:style-name="Text_20_body"><text:soft-page-break/>Este capítulo es un viaje a través de esa evolución. Desde la dinámica física más simple, pasando por las primeras formas de selección informada, hasta llegar a la vida, la cognición y la inteligencia biológica. Cada etapa añade algo nuevo: más sensibilidad a la información, más capacidad de alterar la dinámica natural, más autonomía, más complejidad.</text:p>
      <text:p text:style-name="Text_20_body">Lo que llamamos “inteligencia” no es un fenómeno único, sino una secuencia de transformaciones. Y entender esa secuencia nos permite ver la vida —y la inteligencia humana— no como excepciones misteriosas, sino como el resultado natural de un proceso que comenzó mucho antes de que existieran células, cerebros o pensamientos.</text:p>
      <text:p text:style-name="Horizontal_20_Line"/>
      <text:p text:style-name="Text_20_body">Si quieres, ahora podemos:</text:p>
      <text:list xml:id="list4171215913" text:style-name="L2">
        <text:list-item>
          <text:p text:style-name="P4"><text:span text:style-name="Strong_20_Emphasis">pulir el estilo</text:span>, </text:p>
        </text:list-item>
        <text:list-item>
          <text:p text:style-name="P4">hacerlo más narrativo o más técnico, </text:p>
        </text:list-item>
        <text:list-item>
          <text:p text:style-name="P4">hacerlo más breve o más extenso, </text:p>
        </text:list-item>
        <text:list-item>
          <text:p text:style-name="P3">o pasar directamente a desarrollar el <text:span text:style-name="Strong_20_Emphasis">primer nivel del mapa evolutivo</text:span>. </text:p>
        </text:list-item>
      </text:list>
      <text:p text:style-name="Text_20_body">Tú decides cómo segui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1T18:44:15.634000000</meta:creation-date>
    <dc:date>2026-06-21T18:48:05.815000000</dc:date>
    <meta:editing-duration>PT3M50S</meta:editing-duration>
    <meta:editing-cycles>1</meta:editing-cycles>
    <meta:document-statistic meta:table-count="0" meta:image-count="0" meta:object-count="0" meta:page-count="2" meta:paragraph-count="21" meta:word-count="526" meta:character-count="3343" meta:non-whitespace-character-count="2838"/>
    <meta:generator>LibreOffice/7.3.5.2$Windows_X86_64 LibreOffice_project/184fe81b8c8c30d8b5082578aee2fed2ea847c01</meta:generator>
  </office:meta>
</office:document-meta>
</file>