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Aquí tienes <text:span text:style-name="Strong_20_Emphasis">el bloque de la escritura</text:span>, uno de los más trascendentes de toda la historia de la inteligencia.<text:line-break/>Este es el momento en que el lenguaje —que ya permitía pensar juntos— se libera de su mayor limitación: <text:span text:style-name="Strong_20_Emphasis">el tiempo</text:span>.<text:line-break/>La inteligencia deja de depender de la memoria humana y se vuelve <text:span text:style-name="Strong_20_Emphasis">permanente, acumulativa y expansiva</text:span>.</text:p>
      <text:p text:style-name="Text_20_body">Este es el nacimiento de la escritura.</text:p>
      <text:p text:style-name="Horizontal_20_Line"/>
      <text:h text:style-name="Heading_20_1" text:outline-level="1"><text:span text:style-name="Strong_20_Emphasis">17. La escritura: cuando el lenguaje se independiza del tiempo</text:span></text:h>
      <text:h text:style-name="Heading_20_2" text:outline-level="2"><text:span text:style-name="Strong_20_Emphasis">17.1 El lenguaje ya permite pensar juntos… pero sigue siendo frágil</text:span></text:h>
      <text:p text:style-name="Text_20_body">El lenguaje resolvió un problema enorme:</text:p>
      <text:list xml:id="list3461085403" text:style-name="L1">
        <text:list-item>
          <text:p text:style-name="P2">permitió compartir ideas, </text:p>
        </text:list-item>
        <text:list-item>
          <text:p text:style-name="P2">permitió coordinar grupos, </text:p>
        </text:list-item>
        <text:list-item>
          <text:p text:style-name="P2">permitió transmitir conocimiento, </text:p>
        </text:list-item>
        <text:list-item>
          <text:p text:style-name="P1">permitió crear mundos simbólicos. </text:p>
        </text:list-item>
      </text:list>
      <text:p text:style-name="Text_20_body">Pero el lenguaje hablado tiene límites muy claros:</text:p>
      <text:list xml:id="list2574629812" text:style-name="L2">
        <text:list-item>
          <text:p text:style-name="P4">desaparece en el instante en que se pronuncia, </text:p>
        </text:list-item>
        <text:list-item>
          <text:p text:style-name="P4">depende de la memoria humana, </text:p>
        </text:list-item>
        <text:list-item>
          <text:p text:style-name="P4">se distorsiona al transmitirse, </text:p>
        </text:list-item>
        <text:list-item>
          <text:p text:style-name="P4">no puede viajar lejos, </text:p>
        </text:list-item>
        <text:list-item>
          <text:p text:style-name="P3">no puede durar generaciones. </text:p>
        </text:list-item>
      </text:list>
      <text:p text:style-name="Text_20_body">La cultura existe,<text:line-break/>pero es volátil.</text:p>
      <text:p text:style-name="Text_20_body">Para que la inteligencia dé su siguiente salto,<text:line-break/>hace falta un sistema capaz de <text:span text:style-name="Strong_20_Emphasis">fijar el pensamiento en el mundo</text:span>.</text:p>
      <text:p text:style-name="Text_20_body">Ese sistema será la escritura.</text:p>
      <text:p text:style-name="Horizontal_20_Line"/>
      <text:h text:style-name="Heading_20_2" text:outline-level="2"><text:span text:style-name="Strong_20_Emphasis">17.2 El problema que aparece con sociedades complejas</text:span></text:h>
      <text:p text:style-name="Text_20_body">A medida que las sociedades humanas crecen, surge un desafío nuevo:</text:p>
      <text:p text:style-name="Quotations"><text:soft-page-break/><text:span text:style-name="Strong_20_Emphasis">¿cómo mantener conocimiento, leyes, acuerdos, historias y técnicas<text:line-break/>cuando la memoria humana ya no basta?</text:span></text:p>
      <text:p text:style-name="Text_20_body">Los grupos necesitan:</text:p>
      <text:list xml:id="list3743294155" text:style-name="L3">
        <text:list-item>
          <text:p text:style-name="P6">registrar transacciones, </text:p>
        </text:list-item>
        <text:list-item>
          <text:p text:style-name="P6">almacenar información, </text:p>
        </text:list-item>
        <text:list-item>
          <text:p text:style-name="P6">transmitir instrucciones precisas, </text:p>
        </text:list-item>
        <text:list-item>
          <text:p text:style-name="P6">preservar mitos y genealogías, </text:p>
        </text:list-item>
        <text:list-item>
          <text:p text:style-name="P5">coordinar actividades a gran escala. </text:p>
        </text:list-item>
      </text:list>
      <text:p text:style-name="Text_20_body">La oralidad no puede sostener sociedades complejas.<text:line-break/>Hace falta un soporte externo.</text:p>
      <text:p text:style-name="Horizontal_20_Line"/>
      <text:h text:style-name="Heading_20_2" text:outline-level="2"><text:span text:style-name="Strong_20_Emphasis">17.3 La escritura como memoria externa</text:span></text:h>
      <text:p text:style-name="Text_20_body">La escritura no es solo “poner palabras en símbolos”.<text:line-break/>Es algo mucho más profundo:</text:p>
      <text:p text:style-name="Quotations"><text:span text:style-name="Strong_20_Emphasis">la escritura es un sistema para almacenar pensamiento fuera del cerebro.</text:span></text:p>
      <text:p text:style-name="Text_20_body">Esto es revolucionario.</text:p>
      <text:p text:style-name="Text_20_body">Con la escritura, la inteligencia:</text:p>
      <text:list xml:id="list1519880432" text:style-name="L4">
        <text:list-item>
          <text:p text:style-name="P8">deja de depender de la memoria biológica, </text:p>
        </text:list-item>
        <text:list-item>
          <text:p text:style-name="P8">se vuelve estable, </text:p>
        </text:list-item>
        <text:list-item>
          <text:p text:style-name="P8">se vuelve transportable, </text:p>
        </text:list-item>
        <text:list-item>
          <text:p text:style-name="P8">se vuelve acumulativa, </text:p>
        </text:list-item>
        <text:list-item>
          <text:p text:style-name="P7">se vuelve corregible. </text:p>
        </text:list-item>
      </text:list>
      <text:p text:style-name="Text_20_body">La escritura es la primera forma de <text:span text:style-name="Strong_20_Emphasis">inteligencia externa</text:span>.</text:p>
      <text:p text:style-name="Horizontal_20_Line"/>
      <text:h text:style-name="Heading_20_2" text:outline-level="2"><text:span text:style-name="Strong_20_Emphasis">17.4 Cómo aparece la escritura</text:span></text:h>
      <text:p text:style-name="Text_20_body">La escritura surge gradualmente, a través de cuatro innovaciones:</text:p>
      <text:h text:style-name="Heading_20_3" text:outline-level="3"><text:span text:style-name="Strong_20_Emphasis">1. Marcas contables</text:span></text:h>
      <text:p text:style-name="Text_20_body">Rayas, piedras, nudos, tablillas.<text:line-break/>Sirven para contar:</text:p>
      <text:list xml:id="list2673936747" text:style-name="L5">
        <text:list-item>
          <text:p text:style-name="P10">ganado, </text:p>
        </text:list-item>
        <text:list-item>
          <text:p text:style-name="P10">granos, </text:p>
        </text:list-item>
        <text:list-item>
          <text:p text:style-name="P9">deudas. </text:p>
        </text:list-item>
      </text:list>
      <text:p text:style-name="Text_20_body"><text:soft-page-break/>Es escritura en su forma más primitiva.</text:p>
      <text:h text:style-name="Heading_20_3" text:outline-level="3"><text:span text:style-name="Strong_20_Emphasis">2. Pictogramas</text:span></text:h>
      <text:p text:style-name="Text_20_body">Símbolos que representan objetos:</text:p>
      <text:list xml:id="list1179639258" text:style-name="L6">
        <text:list-item>
          <text:p text:style-name="P12">un sol, </text:p>
        </text:list-item>
        <text:list-item>
          <text:p text:style-name="P12">un pez, </text:p>
        </text:list-item>
        <text:list-item>
          <text:p text:style-name="P11">una casa. </text:p>
        </text:list-item>
      </text:list>
      <text:p text:style-name="Text_20_body">Permiten registrar eventos simples.</text:p>
      <text:h text:style-name="Heading_20_3" text:outline-level="3"><text:span text:style-name="Strong_20_Emphasis">3. Ideogramas</text:span></text:h>
      <text:p text:style-name="Text_20_body">Símbolos que representan ideas:</text:p>
      <text:list xml:id="list3886898948" text:style-name="L7">
        <text:list-item>
          <text:p text:style-name="P14">“reino”, </text:p>
        </text:list-item>
        <text:list-item>
          <text:p text:style-name="P14">“guerra”, </text:p>
        </text:list-item>
        <text:list-item>
          <text:p text:style-name="P13">“tributo”. </text:p>
        </text:list-item>
      </text:list>
      <text:p text:style-name="Text_20_body">La abstracción comienza.</text:p>
      <text:h text:style-name="Heading_20_3" text:outline-level="3"><text:span text:style-name="Strong_20_Emphasis">4. Escritura fonética</text:span></text:h>
      <text:p text:style-name="Text_20_body">Símbolos que representan sonidos.<text:line-break/>Permiten escribir cualquier palabra,<text:line-break/>cualquier idea,<text:line-break/>cualquier historia.</text:p>
      <text:p text:style-name="Text_20_body">La escritura fonética es el inicio de la literatura, la ciencia y la historia.</text:p>
      <text:p text:style-name="Horizontal_20_Line"/>
      <text:h text:style-name="Heading_20_2" text:outline-level="2"><text:span text:style-name="Strong_20_Emphasis">17.5 Qué hace realmente la escritura</text:span></text:h>
      <text:p text:style-name="Text_20_body">La escritura permite algo que ningún sistema anterior podía hacer:</text:p>
      <text:h text:style-name="Heading_20_3" text:outline-level="3"><text:span text:style-name="Strong_20_Emphasis">1. Fijar conocimiento</text:span></text:h>
      <text:p text:style-name="Text_20_body">Lo que se escribe no se pierde.</text:p>
      <text:h text:style-name="Heading_20_3" text:outline-level="3"><text:span text:style-name="Strong_20_Emphasis">2. Transmitir información precisa</text:span></text:h>
      <text:p text:style-name="Text_20_body">Sin distorsión, sin olvido, sin ambigüedad.</text:p>
      <text:h text:style-name="Heading_20_3" text:outline-level="3"><text:span text:style-name="Strong_20_Emphasis">3. Acumular inteligencia</text:span></text:h>
      <text:p text:style-name="Text_20_body">Cada generación puede aprender de todas las anteriores.</text:p>
      <text:h text:style-name="Heading_20_3" text:outline-level="3"><text:soft-page-break/><text:span text:style-name="Strong_20_Emphasis">4. Expandir la cultura</text:span></text:h>
      <text:p text:style-name="Text_20_body">Las ideas viajan más lejos que las personas.</text:p>
      <text:h text:style-name="Heading_20_3" text:outline-level="3"><text:span text:style-name="Strong_20_Emphasis">5. Crear instituciones complejas</text:span></text:h>
      <text:p text:style-name="Text_20_body">Leyes, contratos, tratados, religiones organizadas.</text:p>
      <text:p text:style-name="Text_20_body">La escritura convierte la inteligencia colectiva en <text:span text:style-name="Strong_20_Emphasis">inteligencia histórica</text:span>.</text:p>
      <text:p text:style-name="Horizontal_20_Line"/>
      <text:h text:style-name="Heading_20_2" text:outline-level="2"><text:span text:style-name="Strong_20_Emphasis">17.6 La escritura como herramienta evolutiva</text:span></text:h>
      <text:p text:style-name="Text_20_body">La escritura no aparece para crear literatura.<text:line-break/>Aparece porque resuelve problemas concretos:</text:p>
      <text:list xml:id="list486463007" text:style-name="L8">
        <text:list-item>
          <text:p text:style-name="P16">administrar recursos, </text:p>
        </text:list-item>
        <text:list-item>
          <text:p text:style-name="P16">coordinar ciudades, </text:p>
        </text:list-item>
        <text:list-item>
          <text:p text:style-name="P16">mantener registros, </text:p>
        </text:list-item>
        <text:list-item>
          <text:p text:style-name="P16">transmitir técnicas, </text:p>
        </text:list-item>
        <text:list-item>
          <text:p text:style-name="P16">preservar conocimiento, </text:p>
        </text:list-item>
        <text:list-item>
          <text:p text:style-name="P15">organizar sociedades complejas. </text:p>
        </text:list-item>
      </text:list>
      <text:p text:style-name="Text_20_body">La escritura es una herramienta de supervivencia civilizatoria.</text:p>
      <text:p text:style-name="Horizontal_20_Line"/>
      <text:h text:style-name="Heading_20_2" text:outline-level="2"><text:span text:style-name="Strong_20_Emphasis">17.7 Qué aporta la escritura a la historia de la inteligencia</text:span></text:h>
      <text:p text:style-name="Text_20_body">La escritura introduce capacidades que ningún sistema anterior tenía:</text:p>
      <text:h text:style-name="Heading_20_3" text:outline-level="3"><text:span text:style-name="Strong_20_Emphasis">1. Permanencia</text:span></text:h>
      <text:p text:style-name="Text_20_body">El pensamiento deja de morir con el hablante.</text:p>
      <text:h text:style-name="Heading_20_3" text:outline-level="3"><text:span text:style-name="Strong_20_Emphasis">2. Precisión</text:span></text:h>
      <text:p text:style-name="Text_20_body">El lenguaje se vuelve exacto.</text:p>
      <text:h text:style-name="Heading_20_3" text:outline-level="3"><text:span text:style-name="Strong_20_Emphasis">3. Escalabilidad</text:span></text:h>
      <text:p text:style-name="Text_20_body">La inteligencia puede crecer sin límites.</text:p>
      <text:h text:style-name="Heading_20_3" text:outline-level="3"><text:span text:style-name="Strong_20_Emphasis">4. Corrección</text:span></text:h>
      <text:p text:style-name="Text_20_body">Las ideas pueden revisarse, compararse, mejorarse.</text:p>
      <text:h text:style-name="Heading_20_3" text:outline-level="3"><text:span text:style-name="Strong_20_Emphasis">5. Universalidad</text:span></text:h>
      <text:p text:style-name="Text_20_body">El conocimiento puede viajar a través del espacio y del tiempo.</text:p>
      <text:p text:style-name="Text_20_body"><text:soft-page-break/>En términos funcionales:</text:p>
      <text:p text:style-name="Quotations"><text:span text:style-name="Strong_20_Emphasis">La escritura es la inteligencia que se vuelve permanente.</text:span></text:p>
      <text:p text:style-name="Horizontal_20_Line"/>
      <text:h text:style-name="Heading_20_2" text:outline-level="2"><text:span text:style-name="Strong_20_Emphasis">17.8 La frase que resume este bloque</text:span></text:h>
      <text:p text:style-name="Quotations"><text:span text:style-name="Strong_20_Emphasis">El lenguaje permitió pensar juntos.<text:line-break/>La escritura permitió pensar más allá del tiempo.</text:span></text:p>
      <text:p text:style-name="Text_20_body">La inteligencia, que ya había encontrado continuidad en la vida,<text:line-break/>escala en la multicelularidad,<text:line-break/>velocidad en el sistema nervioso,<text:line-break/>predicción en el cerebro,<text:line-break/>autorreferencia en la mente,<text:line-break/>experiencia en la conciencia,<text:line-break/>identidad en el yo,<text:line-break/>acumulación en la cultura,<text:line-break/>precisión en el lenguaje,<text:line-break/>ahora encuentra <text:span text:style-name="Strong_20_Emphasis">permanencia</text:span> en la escritura.</text:p>
      <text:p text:style-name="Text_20_body">Este es el inicio de la civilización.</text:p>
      <text:p text:style-name="Horizontal_20_Line"/>
      <text:p text:style-name="Text_20_body">Si quieres, avanzamos al siguiente bloque:<text:line-break/><text:span text:style-name="Strong_20_Emphasis">La ciencia: cuando la escritura se convierte en un método para corregir y expandir la inteligencia colectiva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3T18:34:34.533000000</meta:creation-date>
    <dc:date>2026-06-13T18:39:53.420000000</dc:date>
    <meta:editing-duration>PT5M19S</meta:editing-duration>
    <meta:editing-cycles>1</meta:editing-cycles>
    <meta:document-statistic meta:table-count="0" meta:image-count="0" meta:object-count="0" meta:page-count="5" meta:paragraph-count="103" meta:word-count="719" meta:character-count="4667" meta:non-whitespace-character-count="4051"/>
    <meta:generator>LibreOffice/7.3.5.2$Windows_X86_64 LibreOffice_project/184fe81b8c8c30d8b5082578aee2fed2ea847c01</meta:generator>
  </office:meta>
</office:document-meta>
</file>