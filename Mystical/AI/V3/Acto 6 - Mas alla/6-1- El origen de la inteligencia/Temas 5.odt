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esta es una pregunta clave, porque <text:span text:style-name="Strong_20_Emphasis">la ubicación del concepto “proceso lógico” determina toda la arquitectura conceptual del capítulo</text:span>. Y tienes razón en sospechar que no debe aparecer “dentro” de la materia reactiva, sino <text:span text:style-name="Strong_20_Emphasis">antes</text:span>, como un marco más general.</text:p>
      <text:p text:style-name="Text_20_body">Déjame explicarlo con precisión y luego proponerte la estructura óptima.</text:p>
      <text:p text:style-name="Horizontal_20_Line"/>
      <text:h text:style-name="Heading_20_1" text:outline-level="1">🧩 <text:span text:style-name="Strong_20_Emphasis">1. ¿Qué es un proceso lógico en tu modelo?</text:span></text:h>
      <text:p text:style-name="Text_20_body">En tu marco conceptual —que comparto— un <text:span text:style-name="Strong_20_Emphasis">proceso lógico</text:span> es:</text:p>
      <text:list xml:id="list514848888" text:style-name="L1">
        <text:list-item>
          <text:p text:style-name="P2">una transformación de estados, </text:p>
        </text:list-item>
        <text:list-item>
          <text:p text:style-name="P2">gobernada por reglas internas, </text:p>
        </text:list-item>
        <text:list-item>
          <text:p text:style-name="P2">que produce un resultado determinado por la estructura del sistema, </text:p>
        </text:list-item>
        <text:list-item>
          <text:p text:style-name="P1">independientemente de que haya o no intención. </text:p>
        </text:list-item>
      </text:list>
      <text:p text:style-name="Text_20_body">Esto significa que:</text:p>
      <text:list xml:id="list2641703263" text:style-name="L2">
        <text:list-item>
          <text:p text:style-name="P4">una reacción química es un proceso lógico, </text:p>
        </text:list-item>
        <text:list-item>
          <text:p text:style-name="P4">una red autocatalítica es un proceso lógico, </text:p>
        </text:list-item>
        <text:list-item>
          <text:p text:style-name="P4">la replicación del ARN es un proceso lógico, </text:p>
        </text:list-item>
        <text:list-item>
          <text:p text:style-name="P4">la expresión génica es un proceso lógico, </text:p>
        </text:list-item>
        <text:list-item>
          <text:p text:style-name="P3">una neurona disparando es un proceso lógico. </text:p>
        </text:list-item>
      </text:list>
      <text:p text:style-name="Text_20_body">La <text:span text:style-name="Strong_20_Emphasis">inteligencia</text:span> aparece cuando esos procesos lógicos adquieren:</text:p>
      <text:list xml:id="list3182346126" text:style-name="L3">
        <text:list-item>
          <text:p text:style-name="P6">continuidad, </text:p>
        </text:list-item>
        <text:list-item>
          <text:p text:style-name="P6">memoria, </text:p>
        </text:list-item>
        <text:list-item>
          <text:p text:style-name="P6">selección, </text:p>
        </text:list-item>
        <text:list-item>
          <text:p text:style-name="P6">dirección, </text:p>
        </text:list-item>
        <text:list-item>
          <text:p text:style-name="P6">capacidad de mantener su forma, </text:p>
        </text:list-item>
        <text:list-item>
          <text:p text:style-name="P5">y capacidad de modificar su propio futuro. </text:p>
        </text:list-item>
      </text:list>
      <text:p text:style-name="Text_20_body">Por eso dices —con razón— que <text:span text:style-name="Strong_20_Emphasis">el proceso lógico es la semilla de la inteligencia</text:span>.</text:p>
      <text:p text:style-name="Horizontal_20_Line"/>
      <text:h text:style-name="Heading_20_1" text:outline-level="1">🧱 <text:span text:style-name="Strong_20_Emphasis">2. ¿Dónde debe aparecer el concepto de proceso lógico en el capítulo?</text:span></text:h>
      <text:p text:style-name="Text_20_body">No debe aparecer dentro de “materia reactiva”, porque:</text:p>
      <text:list xml:id="list1841145864" text:style-name="L4">
        <text:list-item>
          <text:p text:style-name="P8">la materia reactiva es un caso particular de proceso lógico, </text:p>
        </text:list-item>
        <text:list-item>
          <text:p text:style-name="P8">pero no agota el concepto, </text:p>
        </text:list-item>
        <text:list-item>
          <text:p text:style-name="P7">y no explica su importancia. </text:p>
        </text:list-item>
      </text:list>
      <text:p text:style-name="Text_20_body"><text:soft-page-break/>Tampoco debe aparecer recién en las redes autocatalíticas, porque ahí ya estamos en un nivel más complejo.</text:p>
      <text:p text:style-name="Text_20_body">El lugar correcto es <text:span text:style-name="Strong_20_Emphasis">un apartado inicial</text:span>, antes de todo lo demás.</text:p>
      <text:p text:style-name="Text_20_body">Ese apartado debe establecer:</text:p>
      <text:list xml:id="list2397199993" text:style-name="L5">
        <text:list-item>
          <text:p text:style-name="P10">qué es un proceso lógico, </text:p>
        </text:list-item>
        <text:list-item>
          <text:p text:style-name="P10">por qué existe desde el origen del universo, </text:p>
        </text:list-item>
        <text:list-item>
          <text:p text:style-name="P10">por qué no es inteligencia, </text:p>
        </text:list-item>
        <text:list-item>
          <text:p text:style-name="P9">y por qué es la base necesaria para que la inteligencia pueda aparecer. </text:p>
        </text:list-item>
      </text:list>
      <text:p text:style-name="Text_20_body">Esto te permite construir una narrativa limpia:</text:p>
      <text:list xml:id="list3801523709" text:style-name="L6">
        <text:list-item>
          <text:p text:style-name="P12"><text:span text:style-name="Strong_20_Emphasis">Primero</text:span>: aparece la lógica (universal, indiferente, sin intención). </text:p>
        </text:list-item>
        <text:list-item>
          <text:p text:style-name="P12"><text:span text:style-name="Strong_20_Emphasis">Después</text:span>: aparece la materia reactiva (lógica sin memoria). </text:p>
        </text:list-item>
        <text:list-item>
          <text:p text:style-name="P12"><text:span text:style-name="Strong_20_Emphasis">Luego</text:span>: aparecen las redes autocatalíticas (lógica que se mantiene). </text:p>
        </text:list-item>
        <text:list-item>
          <text:p text:style-name="P12"><text:span text:style-name="Strong_20_Emphasis">Más tarde</text:span>: aparece la reproducción (lógica que se copia). </text:p>
        </text:list-item>
        <text:list-item>
          <text:p text:style-name="P12"><text:span text:style-name="Strong_20_Emphasis">Después</text:span>: ARN (lógica que se ejecuta a sí misma). </text:p>
        </text:list-item>
        <text:list-item>
          <text:p text:style-name="P12"><text:span text:style-name="Strong_20_Emphasis">Luego</text:span>: ADN (lógica que se estabiliza). </text:p>
        </text:list-item>
        <text:list-item>
          <text:p text:style-name="P12"><text:span text:style-name="Strong_20_Emphasis">Después</text:span>: célula (lógica que decide). </text:p>
        </text:list-item>
        <text:list-item>
          <text:p text:style-name="P11"><text:span text:style-name="Strong_20_Emphasis">Finalmente</text:span>: cerebro (lógica que siente). </text:p>
        </text:list-item>
      </text:list>
      <text:p text:style-name="Text_20_body">Es una escalera perfecta.</text:p>
      <text:p text:style-name="Horizontal_20_Line"/>
      <text:h text:style-name="Heading_20_1" text:outline-level="1">🧭 <text:span text:style-name="Strong_20_Emphasis">3. Propuesta de estructura revisada (con el nuevo apartado inicial)</text:span></text:h>
      <text:h text:style-name="Heading_20_2" text:outline-level="2"><text:span text:style-name="Strong_20_Emphasis">0. Procesos lógicos: la estructura fundamental del universo</text:span></text:h>
      <text:list xml:id="list3313235628" text:style-name="L7">
        <text:list-item>
          <text:p text:style-name="P14">Qué es un proceso lógico. </text:p>
        </text:list-item>
        <text:list-item>
          <text:p text:style-name="P14">Por qué existe desde el origen. </text:p>
        </text:list-item>
        <text:list-item>
          <text:p text:style-name="P14">Por qué no es inteligencia. </text:p>
        </text:list-item>
        <text:list-item>
          <text:p text:style-name="P13">Por qué es la semilla necesaria. </text:p>
        </text:list-item>
      </text:list>
      <text:h text:style-name="Heading_20_2" text:outline-level="2"><text:span text:style-name="Strong_20_Emphasis">1. Materia reactiva</text:span></text:h>
      <text:list xml:id="list1120318295" text:style-name="L8">
        <text:list-item>
          <text:p text:style-name="P16">Lógica sin memoria. </text:p>
        </text:list-item>
        <text:list-item>
          <text:p text:style-name="P16">Reacciones sin historia. </text:p>
        </text:list-item>
        <text:list-item>
          <text:p text:style-name="P15">Orden sin intención. </text:p>
        </text:list-item>
      </text:list>
      <text:h text:style-name="Heading_20_2" text:outline-level="2"><text:span text:style-name="Strong_20_Emphasis">2. Red autocatalítica</text:span></text:h>
      <text:list xml:id="list3461300655" text:style-name="L9">
        <text:list-item>
          <text:p text:style-name="P18">Lógica que se mantiene. </text:p>
        </text:list-item>
        <text:list-item>
          <text:p text:style-name="P17"><text:soft-page-break/>Primer “sí mismo” químico. </text:p>
        </text:list-item>
      </text:list>
      <text:h text:style-name="Heading_20_2" text:outline-level="2"><text:span text:style-name="Strong_20_Emphasis">3. Reproducción y evolución</text:span></text:h>
      <text:list xml:id="list3141254066" text:style-name="L10">
        <text:list-item>
          <text:p text:style-name="P20">Lógica que se copia. </text:p>
        </text:list-item>
        <text:list-item>
          <text:p text:style-name="P19">Optimización sin intención. </text:p>
        </text:list-item>
      </text:list>
      <text:h text:style-name="Heading_20_2" text:outline-level="2"><text:span text:style-name="Strong_20_Emphasis">4. ARN</text:span></text:h>
      <text:list xml:id="list1543855067" text:style-name="L11">
        <text:list-item>
          <text:p text:style-name="P22">Lógica que almacena, ejecuta y se replica. </text:p>
        </text:list-item>
        <text:list-item>
          <text:p text:style-name="P21">Primer sistema lógico completo. </text:p>
        </text:list-item>
      </text:list>
      <text:h text:style-name="Heading_20_2" text:outline-level="2"><text:span text:style-name="Strong_20_Emphasis">5. ADN</text:span></text:h>
      <text:list xml:id="list401575589" text:style-name="L12">
        <text:list-item>
          <text:p text:style-name="P24">Lógica que se estabiliza y se vuelve duradera. </text:p>
        </text:list-item>
        <text:list-item>
          <text:p text:style-name="P23">La inteligencia profunda. </text:p>
        </text:list-item>
      </text:list>
      <text:h text:style-name="Heading_20_2" text:outline-level="2"><text:span text:style-name="Strong_20_Emphasis">6. Célula</text:span></text:h>
      <text:list xml:id="list3057632658" text:style-name="L13">
        <text:list-item>
          <text:p text:style-name="P26">Lógica que decide. </text:p>
        </text:list-item>
        <text:list-item>
          <text:p text:style-name="P25">Primer agente. </text:p>
        </text:list-item>
      </text:list>
      <text:h text:style-name="Heading_20_2" text:outline-level="2"><text:span text:style-name="Strong_20_Emphasis">7. Redes de células</text:span></text:h>
      <text:list xml:id="list4094802263" text:style-name="L14">
        <text:list-item>
          <text:p text:style-name="P28">Lógica distribuida. </text:p>
        </text:list-item>
        <text:list-item>
          <text:p text:style-name="P27">Especialización y cooperación. </text:p>
        </text:list-item>
      </text:list>
      <text:h text:style-name="Heading_20_2" text:outline-level="2"><text:span text:style-name="Strong_20_Emphasis">8. Sistemas nerviosos y cerebros</text:span></text:h>
      <text:list xml:id="list3732181312" text:style-name="L15">
        <text:list-item>
          <text:p text:style-name="P30">Lógica que siente. </text:p>
        </text:list-item>
        <text:list-item>
          <text:p text:style-name="P29">Modelos internos y experiencia subjetiva. </text:p>
        </text:list-item>
      </text:list>
      <text:p text:style-name="Horizontal_20_Line"/>
      <text:h text:style-name="Heading_20_1" text:outline-level="1">🌱 <text:span text:style-name="Strong_20_Emphasis">4. Por qué este orden es filosóficamente potente</text:span></text:h>
      <text:p text:style-name="Text_20_body">Porque muestra que:</text:p>
      <text:list xml:id="list3682298030" text:style-name="L16">
        <text:list-item>
          <text:p text:style-name="P32">La inteligencia no aparece “de repente”. </text:p>
        </text:list-item>
        <text:list-item>
          <text:p text:style-name="P32">No es un milagro. </text:p>
        </text:list-item>
        <text:list-item>
          <text:p text:style-name="P32">No es un accidente. </text:p>
        </text:list-item>
        <text:list-item>
          <text:p text:style-name="P32">No es un privilegio humano. </text:p>
        </text:list-item>
        <text:list-item>
          <text:p text:style-name="P32">Es una <text:span text:style-name="Strong_20_Emphasis">continuidad lógica</text:span> que se construye a sí misma. </text:p>
        </text:list-item>
        <text:list-item>
          <text:p text:style-name="P32"><text:soft-page-break/>Cada nivel añade una propiedad que el nivel anterior no tenía. </text:p>
        </text:list-item>
        <text:list-item>
          <text:p text:style-name="P31">Y el ADN no es casual: es la solución necesaria a un problema lógico. </text:p>
        </text:list-item>
      </text:list>
      <text:p text:style-name="Text_20_body">Este marco te permite sostener la tesis central del libro:</text:p>
      <text:p text:style-name="Quotations"><text:span text:style-name="Strong_20_Emphasis">La inteligencia es un proceso que emerge cuando la lógica adquiere memoria, continuidad y capacidad de dirigirse a sí misma.</text:span></text:p>
      <text:p text:style-name="Horizontal_20_Line"/>
      <text:h text:style-name="Heading_20_1" text:outline-level="1">📌 ¿Quieres que escriba ahora el apartado “Procesos lógicos: la estructura fundamental del universo”?</text:h>
      <text:p text:style-name="Text_20_body">Ese sería el primer bloque del capítulo, y es crucial para que todo lo demás tenga coherenci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19:08:03.994000000</meta:creation-date>
    <dc:date>2026-05-30T19:08:42.529000000</dc:date>
    <meta:editing-duration>PT38S</meta:editing-duration>
    <meta:editing-cycles>1</meta:editing-cycles>
    <meta:document-statistic meta:table-count="0" meta:image-count="0" meta:object-count="0" meta:page-count="4" meta:paragraph-count="88" meta:word-count="664" meta:character-count="3869" meta:non-whitespace-character-count="3293"/>
    <meta:generator>LibreOffice/7.3.5.2$Windows_X86_64 LibreOffice_project/184fe81b8c8c30d8b5082578aee2fed2ea847c01</meta:generator>
  </office:meta>
</office:document-meta>
</file>