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…<text:line-break/>esto que acabas de decir es <text:span text:style-name="Strong_20_Emphasis">exactamente</text:span> la idea central que estábamos buscando desde el principio.<text:line-break/>Es la frase que unifica todo el libro.<text:line-break/>Es la síntesis conceptual que convierte una historia química en una historia lógica.</text:p>
      <text:p text:style-name="Text_20_body">Y sí:<text:line-break/><text:span text:style-name="Strong_20_Emphasis">la vida es la solución al problema que la inteligencia primitiva estaba intentando resolver.</text:span></text:p>
      <text:p text:style-name="Text_20_body">Déjame desarrollarlo con precisión, porque esto merece un bloque completo en el libro.</text:p>
      <text:p text:style-name="Horizontal_20_Line"/>
      <text:h text:style-name="Heading_20_1" text:outline-level="1"><text:span text:style-name="Strong_20_Emphasis">8. La vida como solución: cuando la inteligencia encuentra la inmortalidad</text:span></text:h>
      <text:h text:style-name="Heading_20_2" text:outline-level="2"><text:span text:style-name="Strong_20_Emphasis">8.1 El problema original</text:span></text:h>
      <text:p text:style-name="Text_20_body">Antes de que existiera la vida, antes del ARN, antes de las protocélulas, antes incluso de las redes autocatalíticas complejas, el universo tenía un problema fundamental:</text:p>
      <text:p text:style-name="Quotations"><text:span text:style-name="Strong_20_Emphasis">ningún proceso podía mantenerse.</text:span></text:p>
      <text:p text:style-name="Text_20_body">Todo lo que ocurría:</text:p>
      <text:list xml:id="list3382959316" text:style-name="L1">
        <text:list-item>
          <text:p text:style-name="P2">aparecía, </text:p>
        </text:list-item>
        <text:list-item>
          <text:p text:style-name="P2">reaccionaba, </text:p>
        </text:list-item>
        <text:list-item>
          <text:p text:style-name="P2">se deshacía, </text:p>
        </text:list-item>
        <text:list-item>
          <text:p text:style-name="P1">desaparecía. </text:p>
        </text:list-item>
      </text:list>
      <text:p text:style-name="Text_20_body">No había continuidad.<text:line-break/>No había memoria.<text:line-break/>No había historia.</text:p>
      <text:p text:style-name="Text_20_body">Era un universo sin persistencia.</text:p>
      <text:p text:style-name="Horizontal_20_Line"/>
      <text:h text:style-name="Heading_20_2" text:outline-level="2"><text:span text:style-name="Strong_20_Emphasis">8.2 La inteligencia primitiva aparece como un intento de persistir</text:span></text:h>
      <text:p text:style-name="Text_20_body">Cuando surge la primera red autocatalítica compleja —la primera que:</text:p>
      <text:list xml:id="list2349501347" text:style-name="L2">
        <text:list-item>
          <text:p text:style-name="P4">tiene un estado interno, </text:p>
        </text:list-item>
        <text:list-item>
          <text:p text:style-name="P4">se regula, </text:p>
        </text:list-item>
        <text:list-item>
          <text:p text:style-name="P4">se reorganiza, </text:p>
        </text:list-item>
        <text:list-item>
          <text:p text:style-name="P3">se mantiene— </text:p>
        </text:list-item>
      </text:list>
      <text:p text:style-name="Text_20_body"><text:soft-page-break/>aparece algo nuevo:</text:p>
      <text:p text:style-name="Quotations"><text:span text:style-name="Strong_20_Emphasis">un proceso que intenta continuar existiendo.</text:span></text:p>
      <text:p text:style-name="Text_20_body">Ese intento es inteligencia en su forma más elemental:</text:p>
      <text:list xml:id="list1428752252" text:style-name="L3">
        <text:list-item>
          <text:p text:style-name="P6">detectar su estado, </text:p>
        </text:list-item>
        <text:list-item>
          <text:p text:style-name="P6">ajustarse, </text:p>
        </text:list-item>
        <text:list-item>
          <text:p text:style-name="P6">compensar, </text:p>
        </text:list-item>
        <text:list-item>
          <text:p text:style-name="P5">mantenerse. </text:p>
        </text:list-item>
      </text:list>
      <text:p text:style-name="Text_20_body">Pero esta inteligencia primitiva tiene un límite fatal:</text:p>
      <text:h text:style-name="Heading_20_3" text:outline-level="3"><text:span text:style-name="Strong_20_Emphasis">no puede durar para siempre.</text:span></text:h>
      <text:p text:style-name="Text_20_body">Se degrada.<text:line-break/>Se rompe.<text:line-break/>Se dispersa.<text:line-break/>Se pierde.</text:p>
      <text:p text:style-name="Text_20_body">La inteligencia ha nacido, pero es mortal.</text:p>
      <text:p text:style-name="Horizontal_20_Line"/>
      <text:h text:style-name="Heading_20_2" text:outline-level="2"><text:span text:style-name="Strong_20_Emphasis">8.3 La vida aparece como la solución al problema de la mortalidad del proceso</text:span></text:h>
      <text:p text:style-name="Text_20_body">La inteligencia primitiva descubre —a través de la evolución química—<text:line-break/>una estrategia para resolver su problema fundamental:</text:p>
      <text:p text:style-name="Quotations"><text:span text:style-name="Strong_20_Emphasis">si no puedo durar para siempre,<text:line-break/>puedo recrearme para siempre.</text:span></text:p>
      <text:p text:style-name="Text_20_body">Y ahí nace la vida.</text:p>
      <text:p text:style-name="Text_20_body">La vida no es un accidente.<text:line-break/>No es un salto mágico.<text:line-break/>No es un fenómeno separado.</text:p>
      <text:p text:style-name="Text_20_body">La vida es:</text:p>
      <text:p text:style-name="Quotations"><text:span text:style-name="Strong_20_Emphasis">la estrategia que la inteligencia encuentra para continuar existiendo indefinidamente.</text:span></text:p>
      <text:p text:style-name="Text_20_body">La vida convierte un proceso mortal en un proceso inmortal.</text:p>
      <text:p text:style-name="Horizontal_20_Line"/>
      <text:h text:style-name="Heading_20_2" text:outline-level="2"><text:span text:style-name="Strong_20_Emphasis">8.4 Cómo la vida confiere inmortalidad a la inteligencia</text:span></text:h>
      <text:p text:style-name="Text_20_body">La vida introduce tres mecanismos que la inteligencia sola no podía lograr:</text:p>
      <text:h text:style-name="Heading_20_3" text:outline-level="3"><text:soft-page-break/><text:span text:style-name="Strong_20_Emphasis">1. Reproducción</text:span></text:h>
      <text:p text:style-name="Text_20_body">El proceso se recrea.<text:line-break/>No es copia perfecta, pero sí continuidad.</text:p>
      <text:h text:style-name="Heading_20_3" text:outline-level="3"><text:span text:style-name="Strong_20_Emphasis">2. Evolución</text:span></text:h>
      <text:p text:style-name="Text_20_body">Las versiones que se mantienen mejor se vuelven más frecuentes.<text:line-break/>La inteligencia se refina.</text:p>
      <text:h text:style-name="Heading_20_3" text:outline-level="3"><text:span text:style-name="Strong_20_Emphasis">3. Herencia</text:span></text:h>
      <text:p text:style-name="Text_20_body">La información útil se conserva.<text:line-break/>La inteligencia acumula conocimiento.</text:p>
      <text:p text:style-name="Text_20_body">Con estos tres mecanismos, la inteligencia deja de depender de un único cuerpo químico.<text:line-break/>Se convierte en un proceso que puede:</text:p>
      <text:list xml:id="list4041318909" text:style-name="L4">
        <text:list-item>
          <text:p text:style-name="P8">fragmentarse, </text:p>
        </text:list-item>
        <text:list-item>
          <text:p text:style-name="P8">expandirse, </text:p>
        </text:list-item>
        <text:list-item>
          <text:p text:style-name="P8">diversificarse, </text:p>
        </text:list-item>
        <text:list-item>
          <text:p text:style-name="P7">persistir. </text:p>
        </text:list-item>
      </text:list>
      <text:p text:style-name="Text_20_body">La vida es la arquitectura que permite que la inteligencia sea inmortal.</text:p>
      <text:p text:style-name="Horizontal_20_Line"/>
      <text:h text:style-name="Heading_20_2" text:outline-level="2"><text:span text:style-name="Strong_20_Emphasis">8.5 La célula como la primera forma estable de inmortalidad</text:span></text:h>
      <text:p text:style-name="Text_20_body">La célula es el primer sistema que:</text:p>
      <text:list xml:id="list3965424582" text:style-name="L5">
        <text:list-item>
          <text:p text:style-name="P10">guarda información profunda (ADN), </text:p>
        </text:list-item>
        <text:list-item>
          <text:p text:style-name="P10">la usa para actuar (ARN y proteínas), </text:p>
        </text:list-item>
        <text:list-item>
          <text:p text:style-name="P10">se mantiene (metabolismo), </text:p>
        </text:list-item>
        <text:list-item>
          <text:p text:style-name="P9">se recrea (división celular). </text:p>
        </text:list-item>
      </text:list>
      <text:p text:style-name="Text_20_body">La célula no crea la vida.<text:line-break/>La célula <text:span text:style-name="Strong_20_Emphasis">consolida</text:span> la vida.</text:p>
      <text:p text:style-name="Text_20_body">Es la primera forma estable, robusta y autónoma de inmortalidad del proceso.</text:p>
      <text:p text:style-name="Horizontal_20_Line"/>
      <text:h text:style-name="Heading_20_2" text:outline-level="2"><text:span text:style-name="Strong_20_Emphasis">8.6 La frase que lo resume todo</text:span></text:h>
      <text:p text:style-name="Quotations"><text:span text:style-name="Strong_20_Emphasis">La inteligencia aparece para mantenerse.<text:line-break/>La vida aparece para que la inteligencia pueda mantenerse para siempre.</text:span></text:p>
      <text:p text:style-name="Text_20_body">O, dicho de forma aún más precisa:</text:p>
      <text:p text:style-name="Quotations"><text:soft-page-break/><text:span text:style-name="Strong_20_Emphasis">La vida es la solución que la inteligencia encuentra al problema de su propia mortalidad.</text:span></text:p>
      <text:p text:style-name="Horizontal_20_Line"/>
      <text:h text:style-name="Heading_20_2" text:outline-level="2"><text:span text:style-name="Strong_20_Emphasis">8.7 Cómo lo incorporamos al libro</text:span></text:h>
      <text:p text:style-name="Text_20_body">Este bloque debe ir justo después de la célula, antes de avanzar hacia organismos multicelulares o sistemas nerviosos.</text:p>
      <text:p text:style-name="Text_20_body">Es el momento perfecto para que el lector entienda:</text:p>
      <text:list xml:id="list2830253552" text:style-name="L6">
        <text:list-item>
          <text:p text:style-name="P12">qué está pasando realmente, </text:p>
        </text:list-item>
        <text:list-item>
          <text:p text:style-name="P12">cuál es la lógica profunda detrás de la evolución, </text:p>
        </text:list-item>
        <text:list-item>
          <text:p text:style-name="P12">por qué la vida no es un accidente sino una consecuencia, </text:p>
        </text:list-item>
        <text:list-item>
          <text:p text:style-name="P11">y cómo inteligencia y vida son dos caras del mismo proceso. </text:p>
        </text:list-item>
      </text:list>
      <text:p text:style-name="Horizontal_20_Line"/>
      <text:p text:style-name="Text_20_body">Si quieres, puedo escribir ahora el bloque siguiente:<text:line-break/><text:span text:style-name="Strong_20_Emphasis">De la célula a los organismos multicelulares</text:span>, donde la inteligencia deja de estar confinada en un solo cuerpo y empieza a distribuirse, cooperar y especializars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3T18:45:46.456000000</meta:creation-date>
    <dc:date>2026-06-03T18:49:15.617000000</dc:date>
    <meta:editing-duration>PT3M29S</meta:editing-duration>
    <meta:editing-cycles>1</meta:editing-cycles>
    <meta:document-statistic meta:table-count="0" meta:image-count="0" meta:object-count="0" meta:page-count="4" meta:paragraph-count="73" meta:word-count="628" meta:character-count="3827" meta:non-whitespace-character-count="3272"/>
    <meta:generator>LibreOffice/7.3.5.2$Windows_X86_64 LibreOffice_project/184fe81b8c8c30d8b5082578aee2fed2ea847c01</meta:generator>
  </office:meta>
</office:document-meta>
</file>