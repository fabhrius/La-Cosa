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l lenguaje</text:span>, uno de los más decisivos de toda la historia de la inteligencia.<text:line-break/>Este es el momento en que la cultura —que ya permitía compartir información— encuentra un canal capaz de transmitir pensamiento con una precisión, velocidad y fidelidad que ningún otro sistema biológico había logrado jamás.</text:p>
      <text:p text:style-name="Text_20_body">Este es el nacimiento del lenguaje.</text:p>
      <text:p text:style-name="Horizontal_20_Line"/>
      <text:h text:style-name="Heading_20_1" text:outline-level="1"><text:span text:style-name="Strong_20_Emphasis">16. El lenguaje: cuando la cultura encuentra un canal para transmitir pensamiento</text:span></text:h>
      <text:h text:style-name="Heading_20_2" text:outline-level="2"><text:span text:style-name="Strong_20_Emphasis">16.1 La cultura ya existe… pero es lenta y limitada</text:span></text:h>
      <text:p text:style-name="Text_20_body">En el capítulo anterior vimos cómo la cultura surge cuando muchos “yo” pueden:</text:p>
      <text:list xml:id="list370644065" text:style-name="L1">
        <text:list-item>
          <text:p text:style-name="P2">imitar, </text:p>
        </text:list-item>
        <text:list-item>
          <text:p text:style-name="P2">enseñar, </text:p>
        </text:list-item>
        <text:list-item>
          <text:p text:style-name="P2">transmitir normas, </text:p>
        </text:list-item>
        <text:list-item>
          <text:p text:style-name="P1">compartir estrategias. </text:p>
        </text:list-item>
      </text:list>
      <text:p text:style-name="Text_20_body">Pero la cultura temprana tiene límites muy claros:</text:p>
      <text:list xml:id="list3857163879" text:style-name="L2">
        <text:list-item>
          <text:p text:style-name="P4">depende de la observación directa, </text:p>
        </text:list-item>
        <text:list-item>
          <text:p text:style-name="P4">es imprecisa, </text:p>
        </text:list-item>
        <text:list-item>
          <text:p text:style-name="P4">se transmite lentamente, </text:p>
        </text:list-item>
        <text:list-item>
          <text:p text:style-name="P4">se pierde fácilmente, </text:p>
        </text:list-item>
        <text:list-item>
          <text:p text:style-name="P3">no permite expresar ideas complejas. </text:p>
        </text:list-item>
      </text:list>
      <text:p text:style-name="Text_20_body">La inteligencia colectiva existe,<text:line-break/>pero está atrapada en un canal pobre.</text:p>
      <text:p text:style-name="Text_20_body">Para que la inteligencia dé su siguiente salto,<text:line-break/>hace falta un sistema capaz de transmitir <text:span text:style-name="Strong_20_Emphasis">conceptos</text:span>, no solo comportamientos.</text:p>
      <text:p text:style-name="Text_20_body">Ese sistema será el lenguaje.</text:p>
      <text:p text:style-name="Horizontal_20_Line"/>
      <text:h text:style-name="Heading_20_2" text:outline-level="2"><text:span text:style-name="Strong_20_Emphasis">16.2 El problema que aparece con sociedades complejas</text:span></text:h>
      <text:p text:style-name="Text_20_body">A medida que los grupos sociales crecen, surge un desafío nuevo:</text:p>
      <text:p text:style-name="Quotations"><text:span text:style-name="Strong_20_Emphasis">¿cómo coordinar acciones, compartir conocimiento y mantener cohesión<text:line-break/>cuando la información relevante ya no cabe en la observación directa?</text:span></text:p>
      <text:p text:style-name="Text_20_body"><text:soft-page-break/>Los animales sociales necesitan:</text:p>
      <text:list xml:id="list3430109166" text:style-name="L3">
        <text:list-item>
          <text:p text:style-name="P6">comunicar peligros, </text:p>
        </text:list-item>
        <text:list-item>
          <text:p text:style-name="P6">coordinar movimientos, </text:p>
        </text:list-item>
        <text:list-item>
          <text:p text:style-name="P6">compartir descubrimientos, </text:p>
        </text:list-item>
        <text:list-item>
          <text:p text:style-name="P6">transmitir reglas, </text:p>
        </text:list-item>
        <text:list-item>
          <text:p text:style-name="P5">negociar conflictos. </text:p>
        </text:list-item>
      </text:list>
      <text:p text:style-name="Text_20_body">La comunicación emocional (gestos, sonidos, posturas) no basta.<text:line-break/>Hace falta un sistema simbólico.</text:p>
      <text:p text:style-name="Horizontal_20_Line"/>
      <text:h text:style-name="Heading_20_2" text:outline-level="2"><text:span text:style-name="Strong_20_Emphasis">16.3 El lenguaje como sistema simbólico</text:span></text:h>
      <text:p text:style-name="Text_20_body">El lenguaje no es solo hablar.<text:line-break/>No es solo emitir sonidos.</text:p>
      <text:p text:style-name="Text_20_body">El lenguaje es:</text:p>
      <text:p text:style-name="Quotations"><text:span text:style-name="Strong_20_Emphasis">un sistema de símbolos que permite representar ideas<text:line-break/>y transmitirlas con precisión a otros.</text:span></text:p>
      <text:p text:style-name="Text_20_body">Un símbolo es algo que:</text:p>
      <text:list xml:id="list2627927239" text:style-name="L4">
        <text:list-item>
          <text:p text:style-name="P8">no es la cosa, </text:p>
        </text:list-item>
        <text:list-item>
          <text:p text:style-name="P7">pero la representa. </text:p>
        </text:list-item>
      </text:list>
      <text:p text:style-name="Text_20_body">Esto es revolucionario.</text:p>
      <text:p text:style-name="Text_20_body">Con símbolos, un organismo puede:</text:p>
      <text:list xml:id="list2386796679" text:style-name="L5">
        <text:list-item>
          <text:p text:style-name="P10">hablar de lo que no está presente, </text:p>
        </text:list-item>
        <text:list-item>
          <text:p text:style-name="P10">hablar de lo que no existe aún, </text:p>
        </text:list-item>
        <text:list-item>
          <text:p text:style-name="P10">hablar de lo que podría existir, </text:p>
        </text:list-item>
        <text:list-item>
          <text:p text:style-name="P9">hablar de lo que existió. </text:p>
        </text:list-item>
      </text:list>
      <text:p text:style-name="Text_20_body">El lenguaje es la primera forma de <text:span text:style-name="Strong_20_Emphasis">pensamiento compartido</text:span>.</text:p>
      <text:p text:style-name="Horizontal_20_Line"/>
      <text:h text:style-name="Heading_20_2" text:outline-level="2"><text:span text:style-name="Strong_20_Emphasis">16.4 Cómo aparece el lenguaje</text:span></text:h>
      <text:p text:style-name="Text_20_body">El lenguaje surge gradualmente, a través de cuatro innovaciones:</text:p>
      <text:h text:style-name="Heading_20_3" text:outline-level="3"><text:span text:style-name="Strong_20_Emphasis">1. Señales intencionales</text:span></text:h>
      <text:p text:style-name="Text_20_body">Sonidos o gestos que no solo expresan emoción,<text:line-break/>sino que comunican información específica:</text:p>
      <text:list xml:id="list2718448714" text:style-name="L6">
        <text:list-item>
          <text:p text:style-name="P12">“peligro”, </text:p>
        </text:list-item>
        <text:list-item>
          <text:p text:style-name="P12"><text:soft-page-break/>“aquí”, </text:p>
        </text:list-item>
        <text:list-item>
          <text:p text:style-name="P11">“ven”. </text:p>
        </text:list-item>
      </text:list>
      <text:h text:style-name="Heading_20_3" text:outline-level="3"><text:span text:style-name="Strong_20_Emphasis">2. Referencia</text:span></text:h>
      <text:p text:style-name="Text_20_body">Un sonido empieza a referirse consistentemente a un objeto o acción:</text:p>
      <text:list xml:id="list1691042029" text:style-name="L7">
        <text:list-item>
          <text:p text:style-name="P14">“agua”, </text:p>
        </text:list-item>
        <text:list-item>
          <text:p text:style-name="P14">“comida”, </text:p>
        </text:list-item>
        <text:list-item>
          <text:p text:style-name="P13">“enemigo”. </text:p>
        </text:list-item>
      </text:list>
      <text:p text:style-name="Text_20_body">Esto ya es lenguaje en su forma más simple.</text:p>
      <text:h text:style-name="Heading_20_3" text:outline-level="3"><text:span text:style-name="Strong_20_Emphasis">3. Combinación</text:span></text:h>
      <text:p text:style-name="Text_20_body">Los símbolos se combinan para crear significados nuevos:</text:p>
      <text:list xml:id="list3406369944" text:style-name="L8">
        <text:list-item>
          <text:p text:style-name="P16">“comida allí”, </text:p>
        </text:list-item>
        <text:list-item>
          <text:p text:style-name="P16">“ven rápido”, </text:p>
        </text:list-item>
        <text:list-item>
          <text:p text:style-name="P15">“cuidado arriba”. </text:p>
        </text:list-item>
      </text:list>
      <text:p text:style-name="Text_20_body">La combinatoria multiplica la capacidad expresiva.</text:p>
      <text:h text:style-name="Heading_20_3" text:outline-level="3"><text:span text:style-name="Strong_20_Emphasis">4. Sintaxis</text:span></text:h>
      <text:p text:style-name="Text_20_body">El orden de los símbolos cambia el significado:</text:p>
      <text:list xml:id="list578495710" text:style-name="L9">
        <text:list-item>
          <text:p text:style-name="P18">“el perro muerde al hombre” </text:p>
        </text:list-item>
        <text:list-item>
          <text:p text:style-name="P17">“el hombre muerde al perro” </text:p>
        </text:list-item>
      </text:list>
      <text:p text:style-name="Text_20_body">La sintaxis es la estructura profunda del lenguaje.</text:p>
      <text:p text:style-name="Horizontal_20_Line"/>
      <text:h text:style-name="Heading_20_2" text:outline-level="2"><text:span text:style-name="Strong_20_Emphasis">16.5 Qué hace realmente el lenguaje</text:span></text:h>
      <text:p text:style-name="Text_20_body">El lenguaje permite algo que ningún sistema anterior podía hacer:</text:p>
      <text:h text:style-name="Heading_20_3" text:outline-level="3"><text:span text:style-name="Strong_20_Emphasis">1. Compartir conceptos</text:span></text:h>
      <text:p text:style-name="Text_20_body">No solo acciones, sino ideas.</text:p>
      <text:h text:style-name="Heading_20_3" text:outline-level="3"><text:span text:style-name="Strong_20_Emphasis">2. Transmitir conocimiento acumulado</text:span></text:h>
      <text:p text:style-name="Text_20_body">La cultura deja de depender de la memoria individual.</text:p>
      <text:h text:style-name="Heading_20_3" text:outline-level="3"><text:span text:style-name="Strong_20_Emphasis">3. Coordinar acciones complejas</text:span></text:h>
      <text:p text:style-name="Text_20_body">Caza cooperativa, rituales, planificación.</text:p>
      <text:h text:style-name="Heading_20_3" text:outline-level="3"><text:soft-page-break/><text:span text:style-name="Strong_20_Emphasis">4. Construir instituciones</text:span></text:h>
      <text:p text:style-name="Text_20_body">Reglas, roles, acuerdos.</text:p>
      <text:h text:style-name="Heading_20_3" text:outline-level="3"><text:span text:style-name="Strong_20_Emphasis">5. Crear mundos simbólicos</text:span></text:h>
      <text:p text:style-name="Text_20_body">Mitos, historias, explicaciones, teorías.</text:p>
      <text:p text:style-name="Text_20_body">El lenguaje convierte la inteligencia colectiva en <text:span text:style-name="Strong_20_Emphasis">inteligencia simbólica</text:span>.</text:p>
      <text:p text:style-name="Horizontal_20_Line"/>
      <text:h text:style-name="Heading_20_2" text:outline-level="2"><text:span text:style-name="Strong_20_Emphasis">16.6 El lenguaje como herramienta evolutiva</text:span></text:h>
      <text:p text:style-name="Text_20_body">El lenguaje no aparece para escribir poesía.<text:line-break/>Aparece porque resuelve problemas concretos:</text:p>
      <text:list xml:id="list2253819307" text:style-name="L10">
        <text:list-item>
          <text:p text:style-name="P20">coordinar grupos grandes, </text:p>
        </text:list-item>
        <text:list-item>
          <text:p text:style-name="P20">transmitir información vital, </text:p>
        </text:list-item>
        <text:list-item>
          <text:p text:style-name="P20">enseñar técnicas complejas, </text:p>
        </text:list-item>
        <text:list-item>
          <text:p text:style-name="P20">negociar conflictos, </text:p>
        </text:list-item>
        <text:list-item>
          <text:p text:style-name="P20">planificar a largo plazo, </text:p>
        </text:list-item>
        <text:list-item>
          <text:p text:style-name="P19">mantener cohesión social. </text:p>
        </text:list-item>
      </text:list>
      <text:p text:style-name="Text_20_body">El lenguaje es una herramienta de supervivencia colectiva.<text:line-break/>Una herramienta extremadamente poderosa.</text:p>
      <text:p text:style-name="Horizontal_20_Line"/>
      <text:h text:style-name="Heading_20_2" text:outline-level="2"><text:span text:style-name="Strong_20_Emphasis">16.7 Qué aporta el lenguaje a la historia de la inteligencia</text:span></text:h>
      <text:p text:style-name="Text_20_body">El lenguaje introduce capacidades que ningún sistema anterior tenía:</text:p>
      <text:h text:style-name="Heading_20_3" text:outline-level="3"><text:span text:style-name="Strong_20_Emphasis">1. Pensamiento compartido</text:span></text:h>
      <text:p text:style-name="Text_20_body">La mente individual se amplifica con la mente del grupo.</text:p>
      <text:h text:style-name="Heading_20_3" text:outline-level="3"><text:span text:style-name="Strong_20_Emphasis">2. Memoria externa</text:span></text:h>
      <text:p text:style-name="Text_20_body">El conocimiento puede almacenarse fuera del cerebro.</text:p>
      <text:h text:style-name="Heading_20_3" text:outline-level="3"><text:span text:style-name="Strong_20_Emphasis">3. Abstracción</text:span></text:h>
      <text:p text:style-name="Text_20_body">Se pueden expresar conceptos que no tienen forma física.</text:p>
      <text:h text:style-name="Heading_20_3" text:outline-level="3"><text:span text:style-name="Strong_20_Emphasis">4. Narrativa compleja</text:span></text:h>
      <text:p text:style-name="Text_20_body">Se pueden construir historias que organizan la experiencia colectiva.</text:p>
      <text:h text:style-name="Heading_20_3" text:outline-level="3"><text:soft-page-break/><text:span text:style-name="Strong_20_Emphasis">5. Evolución cultural acelerada</text:span></text:h>
      <text:p text:style-name="Text_20_body">Las ideas evolucionan más rápido que los genes.</text:p>
      <text:p text:style-name="Text_20_body">En términos funcionales:</text:p>
      <text:p text:style-name="Quotations"><text:span text:style-name="Strong_20_Emphasis">El lenguaje es la inteligencia que se vuelve simbólica.</text:span></text:p>
      <text:p text:style-name="Horizontal_20_Line"/>
      <text:h text:style-name="Heading_20_2" text:outline-level="2"><text:span text:style-name="Strong_20_Emphasis">16.8 La frase que resume este bloque</text:span></text:h>
      <text:p text:style-name="Quotations"><text:span text:style-name="Strong_20_Emphasis">La cultura permitió compartir.<text:line-break/>El lenguaje permitió pensar juntos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ahora encuentra <text:span text:style-name="Strong_20_Emphasis">precisión infinita</text:span> en el lenguaje.</text:p>
      <text:p text:style-name="Text_20_body">Este es el inicio del pensamiento simbólico.</text:p>
      <text:p text:style-name="Horizontal_20_Line"/>
      <text:p text:style-name="Text_20_body">Si quieres, avanzamos al siguiente bloque:<text:line-break/><text:span text:style-name="Strong_20_Emphasis">La escritura: cuando el lenguaje se independiza del tiempo y la inteligencia se vuelve permanente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1T09:17:24.828000000</meta:creation-date>
    <dc:date>2026-06-11T09:21:58.251000000</dc:date>
    <meta:editing-duration>PT4M34S</meta:editing-duration>
    <meta:editing-cycles>1</meta:editing-cycles>
    <meta:document-statistic meta:table-count="0" meta:image-count="0" meta:object-count="0" meta:page-count="5" meta:paragraph-count="107" meta:word-count="756" meta:character-count="4885" meta:non-whitespace-character-count="4236"/>
    <meta:generator>LibreOffice/7.3.5.2$Windows_X86_64 LibreOffice_project/184fe81b8c8c30d8b5082578aee2fed2ea847c01</meta:generator>
  </office:meta>
</office:document-meta>
</file>