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r supuesto, Fab.<text:line-break/>Aquí tienes <text:span text:style-name="Strong_20_Emphasis">la versión redactada para el libro</text:span>, clara, narrativa y reveladora, explicada directamente al lector.<text:line-break/>La he escrito como un bloque autónomo que puedes insertar justo después de introducir la multicelularidad.</text:p>
      <text:p text:style-name="Horizontal_20_Line"/>
      <text:h text:style-name="Heading_20_1" text:outline-level="1"><text:span text:style-name="Strong_20_Emphasis">Cómo un accidente se convierte en un organismo: el origen real de la multicelularidad</text:span></text:h>
      <text:p text:style-name="Text_20_body">Hasta ahora hemos seguido la historia de la vida desde la química simple hasta la primera célula.<text:line-break/>Pero el siguiente paso —pasar de una célula a un organismo formado por muchas— es tan profundo que merece una explicación detallada.<text:line-break/>No es obvio.<text:line-break/>No es intuitivo.<text:line-break/>Y, sin embargo, es uno de los momentos más decisivos de toda la evolución.</text:p>
      <text:p text:style-name="Text_20_body">La pregunta es simple:</text:p>
      <text:p text:style-name="Quotations"><text:span text:style-name="Strong_20_Emphasis">¿Cómo puede un accidente —dos células que quedan pegadas— convertirse en un organismo multicelular capaz de reproducirse como unidad?</text:span></text:p>
      <text:p text:style-name="Text_20_body">La respuesta es sorprendente, elegante y completamente lógica.</text:p>
      <text:p text:style-name="Horizontal_20_Line"/>
      <text:h text:style-name="Heading_20_2" text:outline-level="2"><text:span text:style-name="Strong_20_Emphasis">1. El accidente inicial: dos células que no se separan</text:span></text:h>
      <text:p text:style-name="Text_20_body">Todo comienza con algo trivial.</text:p>
      <text:p text:style-name="Text_20_body">Una célula se divide en dos, como siempre.<text:line-break/>Pero esta vez, por un pequeño fallo físico o químico, <text:span text:style-name="Strong_20_Emphasis">las dos células hijas no se separan del todo</text:span>.<text:line-break/>Quedan unidas por un puente de membrana, por proteínas de superficie o por restos de pared celular.</text:p>
      <text:p text:style-name="Text_20_body">Esto no es un organismo multicelular.<text:line-break/>Es solo un accidente.</text:p>
      <text:p text:style-name="Text_20_body">Pero es un accidente con potencial.</text:p>
      <text:p text:style-name="Horizontal_20_Line"/>
      <text:h text:style-name="Heading_20_2" text:outline-level="2"><text:span text:style-name="Strong_20_Emphasis">2. La clave evolutiva: la adhesión se vuelve heredable</text:span></text:h>
      <text:p text:style-name="Text_20_body">Para que este accidente tenga consecuencias evolutivas, debe cumplir una condición crucial:</text:p>
      <text:p text:style-name="Quotations"><text:span text:style-name="Strong_20_Emphasis">la tendencia a quedarse unidas debe transmitirse a las células hijas.</text:span></text:p>
      <text:p text:style-name="Text_20_body"><text:soft-page-break/>Esto ocurre cuando la adhesión depende de moléculas producidas por la propia célula:</text:p>
      <text:list xml:id="list1597338995" text:style-name="L1">
        <text:list-item>
          <text:p text:style-name="P2">proteínas de superficie, </text:p>
        </text:list-item>
        <text:list-item>
          <text:p text:style-name="P2">polisacáridos pegajosos, </text:p>
        </text:list-item>
        <text:list-item>
          <text:p text:style-name="P1">mecanismos incompletos de separación. </text:p>
        </text:list-item>
      </text:list>
      <text:p text:style-name="Text_20_body">Si estas moléculas están codificadas en el ADN, entonces <text:span text:style-name="Strong_20_Emphasis">todas las células descendientes</text:span> tendrán la misma tendencia a permanecer unidas.</text:p>
      <text:p text:style-name="Text_20_body">El accidente se convierte en un rasgo.<text:line-break/>El rasgo se convierte en herencia.<text:line-break/>La herencia se convierte en evolución.</text:p>
      <text:p text:style-name="Horizontal_20_Line"/>
      <text:h text:style-name="Heading_20_2" text:outline-level="2"><text:span text:style-name="Strong_20_Emphasis">3. División sin separación: el mecanismo que crea un “cuerpo”</text:span></text:h>
      <text:p text:style-name="Text_20_body">Una vez que la adhesión es heredable, ocurre algo extraordinario:</text:p>
      <text:p text:style-name="Text_20_body">Cada célula del grupo:</text:p>
      <text:list xml:id="list1136248227" text:style-name="L2">
        <text:list-item>
          <text:p text:style-name="P4">se divide, </text:p>
        </text:list-item>
        <text:list-item>
          <text:p text:style-name="P4">pero no se separa, </text:p>
        </text:list-item>
        <text:list-item>
          <text:p text:style-name="P3">y las células hijas quedan unidas al conjunto. </text:p>
        </text:list-item>
      </text:list>
      <text:p text:style-name="Text_20_body">Este simple mecanismo —división incompleta— es suficiente para que el grupo crezca como una unidad coherente.</text:p>
      <text:p text:style-name="Text_20_body">Ya no son células pegadas por azar.<text:line-break/>Son <text:span text:style-name="Strong_20_Emphasis">un organismo multicelular primitivo</text:span>, porque:</text:p>
      <text:list xml:id="list1214397593" text:style-name="L3">
        <text:list-item>
          <text:p text:style-name="P6">crece como conjunto, </text:p>
        </text:list-item>
        <text:list-item>
          <text:p text:style-name="P6">se reproduce como conjunto, </text:p>
        </text:list-item>
        <text:list-item>
          <text:p text:style-name="P6">mantiene su forma general, </text:p>
        </text:list-item>
        <text:list-item>
          <text:p text:style-name="P5">transmite su organización a la siguiente generación. </text:p>
        </text:list-item>
      </text:list>
      <text:p text:style-name="Text_20_body">La multicelularidad ha nacido.</text:p>
      <text:p text:style-name="Horizontal_20_Line"/>
      <text:h text:style-name="Heading_20_2" text:outline-level="2"><text:span text:style-name="Strong_20_Emphasis">4. La cooperación aparece sin intención</text:span></text:h>
      <text:p text:style-name="Text_20_body">Una vez que las células permanecen unidas generación tras generación, empiezan a compartir:</text:p>
      <text:list xml:id="list2523822537" text:style-name="L4">
        <text:list-item>
          <text:p text:style-name="P8">nutrientes, </text:p>
        </text:list-item>
        <text:list-item>
          <text:p text:style-name="P8">señales químicas, </text:p>
        </text:list-item>
        <text:list-item>
          <text:p text:style-name="P8">desechos, </text:p>
        </text:list-item>
        <text:list-item>
          <text:p text:style-name="P7">riesgos. </text:p>
        </text:list-item>
      </text:list>
      <text:p text:style-name="Text_20_body">Esto crea gradientes internos:</text:p>
      <text:list xml:id="list3433005458" text:style-name="L5">
        <text:list-item>
          <text:p text:style-name="P10"><text:soft-page-break/>las células externas reciben más luz o nutrientes, </text:p>
        </text:list-item>
        <text:list-item>
          <text:p text:style-name="P9">las internas reciben menos. </text:p>
        </text:list-item>
      </text:list>
      <text:p text:style-name="Text_20_body">Estas diferencias activan genes distintos en cada posición.<text:line-break/>Y sin que nadie lo planifique, aparece la primera <text:span text:style-name="Strong_20_Emphasis">diferenciación celular</text:span>.</text:p>
      <text:p text:style-name="Text_20_body">La especialización no surge por diseño.<text:line-break/>Surge por física.</text:p>
      <text:p text:style-name="Horizontal_20_Line"/>
      <text:h text:style-name="Heading_20_2" text:outline-level="2"><text:span text:style-name="Strong_20_Emphasis">5. El grupo se convierte en un organismo</text:span></text:h>
      <text:p text:style-name="Text_20_body">Con el tiempo, estos grupos multicelulares desarrollan:</text:p>
      <text:list xml:id="list3159280961" text:style-name="L6">
        <text:list-item>
          <text:p text:style-name="P12">patrones de crecimiento, </text:p>
        </text:list-item>
        <text:list-item>
          <text:p text:style-name="P12">comunicación interna, </text:p>
        </text:list-item>
        <text:list-item>
          <text:p text:style-name="P12">división del trabajo, </text:p>
        </text:list-item>
        <text:list-item>
          <text:p text:style-name="P11">estructuras simples. </text:p>
        </text:list-item>
      </text:list>
      <text:p text:style-name="Text_20_body">El conjunto ya no es una colección de células.<text:line-break/>Es un <text:span text:style-name="Strong_20_Emphasis">cuerpo</text:span>.</text:p>
      <text:p text:style-name="Text_20_body">Un cuerpo primitivo, sí, pero un cuerpo al fin y al cabo:</text:p>
      <text:list xml:id="list2221217682" text:style-name="L7">
        <text:list-item>
          <text:p text:style-name="P14">con partes externas e internas, </text:p>
        </text:list-item>
        <text:list-item>
          <text:p text:style-name="P14">con funciones distribuidas, </text:p>
        </text:list-item>
        <text:list-item>
          <text:p text:style-name="P13">con continuidad generacional. </text:p>
        </text:list-item>
      </text:list>
      <text:p text:style-name="Text_20_body">La inteligencia, que antes vivía en una sola célula, ahora vive en una red de células cooperando.</text:p>
      <text:p text:style-name="Horizontal_20_Line"/>
      <text:h text:style-name="Heading_20_2" text:outline-level="2"><text:span text:style-name="Strong_20_Emphasis">6. La idea central</text:span></text:h>
      <text:p text:style-name="Quotations"><text:span text:style-name="Strong_20_Emphasis">La multicelularidad no nace cuando dos células se pegan,<text:line-break/>sino cuando la adhesión se vuelve heredable.</text:span></text:p>
      <text:p text:style-name="Text_20_body">Ese es el momento en que un accidente se convierte en evolución.<text:line-break/>Ese es el momento en que la inteligencia encuentra una nueva estrategia para continuar existiendo:<text:line-break/><text:span text:style-name="Strong_20_Emphasis">crecer más allá de los límites de un solo cuerpo celular.</text:span></text:p>
      <text:p text:style-name="Horizontal_20_Line"/>
      <text:p text:style-name="Text_20_body">Si quieres, ahora podemos avanzar al siguiente bloque:<text:line-break/><text:span text:style-name="Strong_20_Emphasis">El sistema nervioso: cuando la inteligencia distribuida aprende a integrarse y coordinarse en tiempo real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7T18:49:51.841000000</meta:creation-date>
    <dc:date>2026-06-07T18:53:08.641000000</dc:date>
    <meta:editing-duration>PT3M16S</meta:editing-duration>
    <meta:editing-cycles>1</meta:editing-cycles>
    <meta:document-statistic meta:table-count="0" meta:image-count="0" meta:object-count="0" meta:page-count="3" meta:paragraph-count="60" meta:word-count="645" meta:character-count="4001" meta:non-whitespace-character-count="3416"/>
    <meta:generator>LibreOffice/7.3.5.2$Windows_X86_64 LibreOffice_project/184fe81b8c8c30d8b5082578aee2fed2ea847c01</meta:generator>
  </office:meta>
</office:document-meta>
</file>