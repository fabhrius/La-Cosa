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Ahora que ya establecimos <text:span text:style-name="Strong_20_Emphasis">dónde nace realmente la inteligencia</text:span> —en las redes autocatalíticas complejas que se regulan a sí mismas— podemos presentar el ARN como lo que verdaderamente es en esta historia:</text:p>
      <text:p text:style-name="Text_20_body"><text:span text:style-name="Strong_20_Emphasis">la primera forma estable, portátil y ampliable de esa inteligencia primitiva.</text:span></text:p>
      <text:p text:style-name="Text_20_body">Aquí tienes el bloque completo, escrito para el libro, con la estructura clara que venimos usando.</text:p>
      <text:p text:style-name="Horizontal_20_Line"/>
      <text:h text:style-name="Heading_20_1" text:outline-level="1"><text:span text:style-name="Strong_20_Emphasis">5. El ARN: la primera memoria activa del universo</text:span></text:h>
      <text:h text:style-name="Heading_20_2" text:outline-level="2"><text:span text:style-name="Strong_20_Emphasis">5.1 Qué es el ARN (definición clara)</text:span></text:h>
      <text:p text:style-name="Text_20_body">El ARN es una molécula larga formada por piezas más pequeñas llamadas nucleótidos.<text:line-break/>Pero para entender su importancia no hace falta saber química.</text:p>
      <text:p text:style-name="Text_20_body">Lo esencial es esto:</text:p>
      <text:p text:style-name="Quotations"><text:span text:style-name="Strong_20_Emphasis">El ARN es la primera molécula capaz de guardar información, recrearse y actuar.</text:span></text:p>
      <text:p text:style-name="Text_20_body">Tres funciones en una sola estructura:</text:p>
      <text:list xml:id="list4013249424" text:style-name="L1">
        <text:list-item>
          <text:p text:style-name="P1"><text:span text:style-name="Strong_20_Emphasis">Memoria</text:span> <text:line-break/>El ARN puede almacenar un patrón, como una receta.</text:p>
        </text:list-item>
        <text:list-item>
          <text:p text:style-name="P1"><text:span text:style-name="Strong_20_Emphasis">Recreación</text:span> <text:line-break/>Puede formar nuevas copias siguiendo ese patrón.</text:p>
        </text:list-item>
        <text:list-item>
          <text:p text:style-name="P1"><text:span text:style-name="Strong_20_Emphasis">Acción</text:span> <text:line-break/>Algunas formas de ARN pueden doblarse y funcionar como pequeñas herramientas químicas que aceleran reacciones.</text:p>
        </text:list-item>
      </text:list>
      <text:p text:style-name="Text_20_body">En otras palabras:</text:p>
      <text:p text:style-name="Quotations"><text:span text:style-name="Strong_20_Emphasis">El ARN es información que hace cosas.</text:span></text:p>
      <text:p text:style-name="Horizontal_20_Line"/>
      <text:h text:style-name="Heading_20_2" text:outline-level="2"><text:span text:style-name="Strong_20_Emphasis">5.2 Contexto: el universo justo antes del ARN</text:span></text:h>
      <text:p text:style-name="Text_20_body">Antes del ARN ya existían:</text:p>
      <text:list xml:id="list859946901" text:style-name="L2">
        <text:list-item>
          <text:p text:style-name="P3">redes autocatalíticas simples, </text:p>
        </text:list-item>
        <text:list-item>
          <text:p text:style-name="P3">redes autocatalíticas complejas, </text:p>
        </text:list-item>
        <text:list-item>
          <text:p text:style-name="P3">inteligencia primitiva basada en realimentación interna, </text:p>
        </text:list-item>
        <text:list-item>
          <text:p text:style-name="P3"><text:soft-page-break/>reproducción rudimentaria, </text:p>
        </text:list-item>
        <text:list-item>
          <text:p text:style-name="P2">evolución química. </text:p>
        </text:list-item>
      </text:list>
      <text:p text:style-name="Text_20_body">Pero todo esto tenía un límite importante:</text:p>
      <text:h text:style-name="Heading_20_3" text:outline-level="3"><text:span text:style-name="Strong_20_Emphasis">La información no estaba escrita en ningún sitio.</text:span></text:h>
      <text:p text:style-name="Text_20_body">El patrón de funcionamiento de una red autocatalítica:</text:p>
      <text:list xml:id="list2992541304" text:style-name="L3">
        <text:list-item>
          <text:p text:style-name="P5">existía solo mientras la red estaba activa, </text:p>
        </text:list-item>
        <text:list-item>
          <text:p text:style-name="P5">dependía del flujo químico del momento, </text:p>
        </text:list-item>
        <text:list-item>
          <text:p text:style-name="P5">podía perderse si el sistema se deshacía, </text:p>
        </text:list-item>
        <text:list-item>
          <text:p text:style-name="P4">no tenía un soporte estable que lo preservara. </text:p>
        </text:list-item>
      </text:list>
      <text:p text:style-name="Text_20_body">Era como una tradición oral sin escritura:</text:p>
      <text:list xml:id="list2783759404" text:style-name="L4">
        <text:list-item>
          <text:p text:style-name="P7">mientras alguien la recuerda, existe, </text:p>
        </text:list-item>
        <text:list-item>
          <text:p text:style-name="P6">si se pierde la memoria, desaparece. </text:p>
        </text:list-item>
      </text:list>
      <text:p text:style-name="Text_20_body">El universo necesitaba una forma de <text:span text:style-name="Strong_20_Emphasis">guardar la información</text:span> para que la inteligencia primitiva pudiera avanzar.</text:p>
      <text:p text:style-name="Text_20_body">El ARN es esa forma.</text:p>
      <text:p text:style-name="Horizontal_20_Line"/>
      <text:h text:style-name="Heading_20_2" text:outline-level="2"><text:span text:style-name="Strong_20_Emphasis">5.3 Qué aporta el ARN: la primera memoria estable</text:span></text:h>
      <text:p text:style-name="Text_20_body">Con el ARN aparece algo completamente nuevo:</text:p>
      <text:p text:style-name="Quotations"><text:span text:style-name="Strong_20_Emphasis">La información deja de ser un proceso y se convierte en una estructura.</text:span></text:p>
      <text:p text:style-name="Text_20_body">Esto cambia todo.</text:p>
      <text:p text:style-name="Text_20_body">El ARN permite:</text:p>
      <text:list xml:id="list634476915" text:style-name="L5">
        <text:list-item>
          <text:p text:style-name="P9">conservar un patrón, </text:p>
        </text:list-item>
        <text:list-item>
          <text:p text:style-name="P9">recrearlo con variaciones, </text:p>
        </text:list-item>
        <text:list-item>
          <text:p text:style-name="P9">transmitirlo a otro lugar, </text:p>
        </text:list-item>
        <text:list-item>
          <text:p text:style-name="P9">combinarlo con otros patrones, </text:p>
        </text:list-item>
        <text:list-item>
          <text:p text:style-name="P8">mantenerlo incluso cuando el sistema se fragmenta. </text:p>
        </text:list-item>
      </text:list>
      <text:p text:style-name="Text_20_body">Por primera vez, la herencia tiene un soporte físico claro.</text:p>
      <text:p text:style-name="Text_20_body">La inteligencia primitiva —la capacidad de mantenerse y recrearse—<text:line-break/>encuentra aquí su primera herramienta estable.</text:p>
      <text:p text:style-name="Horizontal_20_Line"/>
      <text:h text:style-name="Heading_20_2" text:outline-level="2"><text:soft-page-break/><text:span text:style-name="Strong_20_Emphasis">5.4 El ARN como sistema completo</text:span></text:h>
      <text:p text:style-name="Text_20_body">El ARN reúne tres funciones que antes estaban dispersas:</text:p>
      <text:list xml:id="list1488233983" text:style-name="L6">
        <text:list-item>
          <text:p text:style-name="P11"><text:span text:style-name="Strong_20_Emphasis">Memoria</text:span>: guarda información en su secuencia. </text:p>
        </text:list-item>
        <text:list-item>
          <text:p text:style-name="P11"><text:span text:style-name="Strong_20_Emphasis">Recreación</text:span>: puede formar nuevas cadenas siguiendo su propio patrón. </text:p>
        </text:list-item>
        <text:list-item>
          <text:p text:style-name="P10"><text:span text:style-name="Strong_20_Emphasis">Acción</text:span>: puede doblarse y catalizar reacciones. </text:p>
        </text:list-item>
      </text:list>
      <text:p text:style-name="Text_20_body">Antes del ARN:</text:p>
      <text:list xml:id="list3298486656" text:style-name="L7">
        <text:list-item>
          <text:p text:style-name="P13">la memoria era débil, </text:p>
        </text:list-item>
        <text:list-item>
          <text:p text:style-name="P13">la reproducción era imprecisa, </text:p>
        </text:list-item>
        <text:list-item>
          <text:p text:style-name="P12">la acción dependía del entorno. </text:p>
        </text:list-item>
      </text:list>
      <text:p text:style-name="Text_20_body">Con el ARN:</text:p>
      <text:list xml:id="list2202715062" text:style-name="L8">
        <text:list-item>
          <text:p text:style-name="P15">la memoria se vuelve interna, </text:p>
        </text:list-item>
        <text:list-item>
          <text:p text:style-name="P15">la reproducción se vuelve más fiable, </text:p>
        </text:list-item>
        <text:list-item>
          <text:p text:style-name="P14">la acción se vuelve programable. </text:p>
        </text:list-item>
      </text:list>
      <text:p text:style-name="Text_20_body">Es la primera vez que un sistema químico puede <text:span text:style-name="Strong_20_Emphasis">representarse a sí mismo</text:span> y <text:span text:style-name="Strong_20_Emphasis">actuar según esa representación</text:span>.</text:p>
      <text:p text:style-name="Horizontal_20_Line"/>
      <text:h text:style-name="Heading_20_2" text:outline-level="2"><text:span text:style-name="Strong_20_Emphasis">5.5 Por qué el ARN es un hito en la historia de la inteligencia</text:span></text:h>
      <text:p text:style-name="Text_20_body">El ARN marca un salto cualitativo porque introduce:</text:p>
      <text:h text:style-name="Heading_20_3" text:outline-level="3"><text:span text:style-name="Strong_20_Emphasis">1. Continuidad real</text:span></text:h>
      <text:p text:style-name="Text_20_body">La información ya no depende del estado momentáneo de una red química.<text:line-break/>Está escrita en una molécula que puede viajar, persistir y combinarse.</text:p>
      <text:h text:style-name="Heading_20_3" text:outline-level="3"><text:span text:style-name="Strong_20_Emphasis">2. Evolución acelerada</text:span></text:h>
      <text:p text:style-name="Text_20_body">Las variaciones en el ARN producen nuevas funciones.<text:line-break/>Las funciones útiles se mantienen.<text:line-break/>La evolución se vuelve más rápida y más creativa.</text:p>
      <text:h text:style-name="Heading_20_3" text:outline-level="3"><text:span text:style-name="Strong_20_Emphasis">3. Autonomía creciente</text:span></text:h>
      <text:p text:style-name="Text_20_body">El ARN puede:</text:p>
      <text:list xml:id="list270020491" text:style-name="L9">
        <text:list-item>
          <text:p text:style-name="P17">construir partes de sí mismo, </text:p>
        </text:list-item>
        <text:list-item>
          <text:p text:style-name="P17">catalizar reacciones, </text:p>
        </text:list-item>
        <text:list-item>
          <text:p text:style-name="P16">generar nuevas combinaciones. </text:p>
        </text:list-item>
      </text:list>
      <text:p text:style-name="Text_20_body">Es un sistema que empieza a <text:span text:style-name="Strong_20_Emphasis">dirigir su propia continuidad</text:span>.</text:p>
      <text:h text:style-name="Heading_20_3" text:outline-level="3"><text:soft-page-break/><text:span text:style-name="Strong_20_Emphasis">4. Inteligencia molecular estable</text:span></text:h>
      <text:p text:style-name="Text_20_body">No es pensamiento.<text:line-break/>No es conciencia.<text:line-break/>Pero sí es:</text:p>
      <text:p text:style-name="Quotations"><text:span text:style-name="Strong_20_Emphasis">un proceso que guarda información, la usa para recrearse<text:line-break/>y mejora con el tiempo.</text:span></text:p>
      <text:p text:style-name="Text_20_body">La inteligencia ya existía antes, en forma de auto-regulación química.<text:line-break/>Pero con el ARN aparece <text:span text:style-name="Strong_20_Emphasis">la primera forma estable, portátil y heredable de esa inteligencia</text:span>.</text:p>
      <text:p text:style-name="Horizontal_20_Line"/>
      <text:h text:style-name="Heading_20_2" text:outline-level="2"><text:span text:style-name="Strong_20_Emphasis">5.6 El ARN como puente hacia el ADN</text:span></text:h>
      <text:p text:style-name="Text_20_body">El ARN es poderoso, pero frágil:</text:p>
      <text:list xml:id="list2668477888" text:style-name="L10">
        <text:list-item>
          <text:p text:style-name="P19">se degrada con facilidad, </text:p>
        </text:list-item>
        <text:list-item>
          <text:p text:style-name="P19">comete errores, </text:p>
        </text:list-item>
        <text:list-item>
          <text:p text:style-name="P18">es químicamente inestable. </text:p>
        </text:list-item>
      </text:list>
      <text:p text:style-name="Text_20_body">La evolución —ese refinamiento continuo—<text:line-break/>termina encontrando una solución más robusta para guardar información:<text:line-break/>el ADN.</text:p>
      <text:p text:style-name="Text_20_body">Pero el ADN no aparece de golpe.<text:line-break/>Es una mejora del sistema que el ARN inauguró.</text:p>
      <text:p text:style-name="Text_20_body">El ARN es el primer gran arquitecto de la vida.<text:line-break/>El ADN es su obra maestra de estabilidad.</text:p>
      <text:p text:style-name="Horizontal_20_Line"/>
      <text:p text:style-name="Text_20_body">Si quieres, avanzamos al siguiente bloque: <text:span text:style-name="Strong_20_Emphasis">El ADN</text:span>, donde la inteligencia molecular encuentra una forma de memoria profunda, duradera y extraordinariamente precis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31T18:03:21.776000000</meta:creation-date>
    <dc:date>2026-05-31T18:09:41.553000000</dc:date>
    <meta:editing-duration>PT6M20S</meta:editing-duration>
    <meta:editing-cycles>1</meta:editing-cycles>
    <meta:document-statistic meta:table-count="0" meta:image-count="0" meta:object-count="0" meta:page-count="4" meta:paragraph-count="84" meta:word-count="736" meta:character-count="4499" meta:non-whitespace-character-count="3847"/>
    <meta:generator>LibreOffice/7.3.5.2$Windows_X86_64 LibreOffice_project/184fe81b8c8c30d8b5082578aee2fed2ea847c01</meta:generator>
  </office:meta>
</office:document-meta>
</file>