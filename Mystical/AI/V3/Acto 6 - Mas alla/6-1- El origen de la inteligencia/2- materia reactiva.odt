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Vamos a entrar en <text:span text:style-name="Strong_20_Emphasis">Materia reactiva</text:span>, el segundo bloque del capítulo, justo después de haber establecido que el universo está hecho de procesos lógicos.<text:line-break/>Este apartado es crucial porque muestra el primer nivel donde la lógica se encarna en la materia… pero todavía sin ninguna de las propiedades que harán posible la inteligencia.</text:p>
      <text:p text:style-name="Text_20_body">Aquí tienes el texto desarrollado, con el tono conceptual, claro y filosófico que estás buscando.</text:p>
      <text:p text:style-name="Horizontal_20_Line"/>
      <text:h text:style-name="Heading_20_1" text:outline-level="1"><text:span text:style-name="Strong_20_Emphasis">Materia reactiva: la lógica sin memoria</text:span></text:h>
      <text:p text:style-name="Text_20_body">Una vez que entendemos que el universo está tejido por procesos lógicos —transiciones de estado gobernadas por reglas internas— podemos descender al primer nivel donde esa lógica se manifiesta físicamente: <text:span text:style-name="Strong_20_Emphasis">la materia reactiva</text:span>.</text:p>
      <text:p text:style-name="Text_20_body">La materia reactiva es la materia que <text:span text:style-name="Strong_20_Emphasis">responde</text:span>, pero no <text:span text:style-name="Strong_20_Emphasis">recuerda</text:span>.<text:line-break/>Es la materia que <text:span text:style-name="Strong_20_Emphasis">cambia</text:span>, pero no <text:span text:style-name="Strong_20_Emphasis">se conserva</text:span>.<text:line-break/>Es la materia que <text:span text:style-name="Strong_20_Emphasis">obedece</text:span>, pero no <text:span text:style-name="Strong_20_Emphasis">decide</text:span>.</text:p>
      <text:p text:style-name="Text_20_body">Aquí comienza la historia física de la inteligencia, pero todavía no la inteligencia misma.</text:p>
      <text:p text:style-name="Horizontal_20_Line"/>
      <text:h text:style-name="Heading_20_2" text:outline-level="2"><text:span text:style-name="Strong_20_Emphasis">1. Reacciones que ocurren, pero no permanecen</text:span></text:h>
      <text:p text:style-name="Text_20_body">En este nivel, la materia se transforma siguiendo leyes químicas y físicas.<text:line-break/>Cada reacción es un proceso lógico:</text:p>
      <text:list xml:id="list573554902" text:style-name="L1">
        <text:list-item>
          <text:p text:style-name="P2">tiene un estado inicial, </text:p>
        </text:list-item>
        <text:list-item>
          <text:p text:style-name="P2">un estado final, </text:p>
        </text:list-item>
        <text:list-item>
          <text:p text:style-name="P1">y una regla que conecta ambos. </text:p>
        </text:list-item>
      </text:list>
      <text:p text:style-name="Text_20_body">Pero estas reacciones son <text:span text:style-name="Strong_20_Emphasis">eventos sin historia</text:span>.<text:line-break/>No dejan huella.<text:line-break/>No acumulan información.<text:line-break/>No generan continuidad.</text:p>
      <text:p text:style-name="Text_20_body">Una molécula reacciona y desaparece.<text:line-break/>Un enlace se forma y se rompe.<text:line-break/>Un patrón surge y se disipa.</text:p>
      <text:p text:style-name="Text_20_body">Nada se conserva porque nada se considera valioso.</text:p>
      <text:p text:style-name="Horizontal_20_Line"/>
      <text:h text:style-name="Heading_20_2" text:outline-level="2"><text:soft-page-break/><text:span text:style-name="Strong_20_Emphasis">2. Orden sin intención</text:span></text:h>
      <text:p text:style-name="Text_20_body">La materia reactiva puede formar estructuras bellas y complejas:</text:p>
      <text:list xml:id="list978720976" text:style-name="L2">
        <text:list-item>
          <text:p text:style-name="P4">cristales, </text:p>
        </text:list-item>
        <text:list-item>
          <text:p text:style-name="P4">fractales, </text:p>
        </text:list-item>
        <text:list-item>
          <text:p text:style-name="P4">patrones de difusión, </text:p>
        </text:list-item>
        <text:list-item>
          <text:p text:style-name="P4">remolinos, </text:p>
        </text:list-item>
        <text:list-item>
          <text:p text:style-name="P3">agregados espontáneos. </text:p>
        </text:list-item>
      </text:list>
      <text:p text:style-name="Text_20_body">Pero este orden no es inteligencia.<text:line-break/>Es simplemente el resultado de:</text:p>
      <text:list xml:id="list1658058389" text:style-name="L3">
        <text:list-item>
          <text:p text:style-name="P6">simetrías, </text:p>
        </text:list-item>
        <text:list-item>
          <text:p text:style-name="P6">energías mínimas, </text:p>
        </text:list-item>
        <text:list-item>
          <text:p text:style-name="P6">condiciones iniciales, </text:p>
        </text:list-item>
        <text:list-item>
          <text:p text:style-name="P5">y leyes físicas. </text:p>
        </text:list-item>
      </text:list>
      <text:p text:style-name="Text_20_body">El universo puede producir formas, pero no <text:span text:style-name="Strong_20_Emphasis">propósitos</text:span>.</text:p>
      <text:p text:style-name="Text_20_body">Un cristal no se repara.<text:line-break/>Una fractura no se corrige.<text:line-break/>Un patrón no se defiende de su destrucción.</text:p>
      <text:p text:style-name="Text_20_body">La materia reactiva <text:span text:style-name="Strong_20_Emphasis">no lucha por existir</text:span>.</text:p>
      <text:p text:style-name="Horizontal_20_Line"/>
      <text:h text:style-name="Heading_20_2" text:outline-level="2"><text:span text:style-name="Strong_20_Emphasis">3. Lógica sin interior</text:span></text:h>
      <text:p text:style-name="Text_20_body">En este nivel no existe la noción de “sí mismo”.<text:line-break/>No hay sistemas que se distingan del entorno.<text:line-break/>No hay fronteras funcionales.<text:line-break/>No hay identidad.</text:p>
      <text:p text:style-name="Text_20_body">La materia reactiva no tiene un interior que proteger ni un exterior que evitar.<text:line-break/>No hay agentes.<text:line-break/>No hay sistemas que digan “yo”.</text:p>
      <text:p text:style-name="Text_20_body">La lógica está ahí, pero no está organizada en torno a ninguna continuidad.</text:p>
      <text:p text:style-name="Horizontal_20_Line"/>
      <text:h text:style-name="Heading_20_2" text:outline-level="2"><text:span text:style-name="Strong_20_Emphasis">4. El límite de la materia reactiva</text:span></text:h>
      <text:p text:style-name="Text_20_body">La materia reactiva puede:</text:p>
      <text:list xml:id="list2090853660" text:style-name="L4">
        <text:list-item>
          <text:p text:style-name="P8">reaccionar, </text:p>
        </text:list-item>
        <text:list-item>
          <text:p text:style-name="P8">combinarse, </text:p>
        </text:list-item>
        <text:list-item>
          <text:p text:style-name="P7">formar estructuras temporales. </text:p>
        </text:list-item>
      </text:list>
      <text:p text:style-name="Text_20_body"><text:soft-page-break/>Pero no puede:</text:p>
      <text:list xml:id="list3886581383" text:style-name="L5">
        <text:list-item>
          <text:p text:style-name="P10"><text:span text:style-name="Strong_20_Emphasis">mantenerse</text:span>, </text:p>
        </text:list-item>
        <text:list-item>
          <text:p text:style-name="P10"><text:span text:style-name="Strong_20_Emphasis">multiplicarse</text:span>, </text:p>
        </text:list-item>
        <text:list-item>
          <text:p text:style-name="P10"><text:span text:style-name="Strong_20_Emphasis">corregirse</text:span>, </text:p>
        </text:list-item>
        <text:list-item>
          <text:p text:style-name="P10"><text:span text:style-name="Strong_20_Emphasis">competir</text:span>, </text:p>
        </text:list-item>
        <text:list-item>
          <text:p text:style-name="P10"><text:span text:style-name="Strong_20_Emphasis">evolucionar</text:span>, </text:p>
        </text:list-item>
        <text:list-item>
          <text:p text:style-name="P9"><text:span text:style-name="Strong_20_Emphasis">dirigirse</text:span>. </text:p>
        </text:list-item>
      </text:list>
      <text:p text:style-name="Text_20_body">Y sin estas capacidades, la inteligencia es imposible.</text:p>
      <text:p text:style-name="Text_20_body">La inteligencia requiere:</text:p>
      <text:list xml:id="list1480024261" text:style-name="L6">
        <text:list-item>
          <text:p text:style-name="P12">memoria, </text:p>
        </text:list-item>
        <text:list-item>
          <text:p text:style-name="P12">estabilidad, </text:p>
        </text:list-item>
        <text:list-item>
          <text:p text:style-name="P12">selección, </text:p>
        </text:list-item>
        <text:list-item>
          <text:p text:style-name="P12">dirección, </text:p>
        </text:list-item>
        <text:list-item>
          <text:p text:style-name="P12">resistencia al cambio, </text:p>
        </text:list-item>
        <text:list-item>
          <text:p text:style-name="P11">capacidad de preservar una forma frente al entorno. </text:p>
        </text:list-item>
      </text:list>
      <text:p text:style-name="Text_20_body">Nada de esto existe todavía.</text:p>
      <text:p text:style-name="Horizontal_20_Line"/>
      <text:h text:style-name="Heading_20_2" text:outline-level="2"><text:span text:style-name="Strong_20_Emphasis">5. Por qué este nivel es esencial en la historia</text:span></text:h>
      <text:p text:style-name="Text_20_body">Porque aquí estableces la primera frontera conceptual:</text:p>
      <text:p text:style-name="Quotations"><text:span text:style-name="Strong_20_Emphasis">La materia reactiva es lógica sin continuidad.<text:line-break/>La inteligencia es lógica con continuidad.</text:span></text:p>
      <text:p text:style-name="Text_20_body">La materia reactiva es el universo antes de la vida.<text:line-break/>Un universo donde todo ocurre, pero nada persiste.<text:line-break/>Donde hay procesos, pero no hay sistemas.<text:line-break/>Donde hay cambios, pero no hay historia.</text:p>
      <text:p text:style-name="Text_20_body">Es el escenario previo a la aparición de algo radicalmente nuevo:<text:line-break/><text:span text:style-name="Strong_20_Emphasis">la materia que se organiza para mantenerse</text:span>,<text:line-break/>que será el tema del siguiente apartado: <text:span text:style-name="Strong_20_Emphasis">las redes autocatalíticas</text:span>.</text:p>
      <text:p text:style-name="Horizontal_20_Line"/>
      <text:p text:style-name="Text_20_body">Si quieres, avanzamos ahora al siguiente bloque: <text:span text:style-name="Strong_20_Emphasis">Red autocatalítica</text:span>, donde aparece por primera vez algo que se parece a un “sí mismo” químic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0T19:17:35.182000000</meta:creation-date>
    <dc:date>2026-05-30T19:44:10.428000000</dc:date>
    <meta:editing-duration>PT16M25S</meta:editing-duration>
    <meta:editing-cycles>1</meta:editing-cycles>
    <meta:document-statistic meta:table-count="0" meta:image-count="0" meta:object-count="0" meta:page-count="3" meta:paragraph-count="60" meta:word-count="565" meta:character-count="3448" meta:non-whitespace-character-count="2943"/>
    <meta:generator>LibreOffice/7.3.5.2$Windows_X86_64 LibreOffice_project/184fe81b8c8c30d8b5082578aee2fed2ea847c01</meta:generator>
  </office:meta>
</office:document-meta>
</file>