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 la conciencia</text:span>, escrito para el libro con la misma claridad, profundidad y continuidad conceptual que venimos construyendo.<text:line-break/>Este es uno de los momentos más delicados y trascendentes de toda la historia: <text:span text:style-name="Strong_20_Emphasis">cuando la mente deja de ser solo un modelo interno y se convierte en experiencia</text:span>.</text:p>
      <text:p text:style-name="Text_20_body">Este es el nacimiento de la conciencia.</text:p>
      <text:p text:style-name="Horizontal_20_Line"/>
      <text:h text:style-name="Heading_20_1" text:outline-level="1"><text:span text:style-name="Strong_20_Emphasis">13. La conciencia: cuando la mente se convierte en experiencia</text:span></text:h>
      <text:h text:style-name="Heading_20_2" text:outline-level="2"><text:span text:style-name="Strong_20_Emphasis">13.1 La mente ya puede representarse… pero aún no “siente”</text:span></text:h>
      <text:p text:style-name="Text_20_body">En el capítulo anterior vimos cómo la mente surge cuando el cerebro:</text:p>
      <text:list xml:id="list2081817586" text:style-name="L1">
        <text:list-item>
          <text:p text:style-name="P2">integra información, </text:p>
        </text:list-item>
        <text:list-item>
          <text:p text:style-name="P2">modela el mundo, </text:p>
        </text:list-item>
        <text:list-item>
          <text:p text:style-name="P2">modela el cuerpo, </text:p>
        </text:list-item>
        <text:list-item>
          <text:p text:style-name="P1">modela su propia actividad. </text:p>
        </text:list-item>
      </text:list>
      <text:p text:style-name="Text_20_body">Pero todo esto puede ocurrir sin que exista <text:span text:style-name="Strong_20_Emphasis">experiencia</text:span>.<text:line-break/>Un sistema puede:</text:p>
      <text:list xml:id="list3279084033" text:style-name="L2">
        <text:list-item>
          <text:p text:style-name="P4">percibir, </text:p>
        </text:list-item>
        <text:list-item>
          <text:p text:style-name="P4">decidir, </text:p>
        </text:list-item>
        <text:list-item>
          <text:p text:style-name="P4">aprender, </text:p>
        </text:list-item>
        <text:list-item>
          <text:p text:style-name="P3">planificar, </text:p>
        </text:list-item>
      </text:list>
      <text:p text:style-name="Text_20_body">sin sentir nada.</text:p>
      <text:p text:style-name="Text_20_body">La conciencia requiere algo más profundo.</text:p>
      <text:p text:style-name="Horizontal_20_Line"/>
      <text:h text:style-name="Heading_20_2" text:outline-level="2"><text:span text:style-name="Strong_20_Emphasis">13.2 El problema que aparece con mentes complejas</text:span></text:h>
      <text:p text:style-name="Text_20_body">A medida que los cerebros crecen y las mentes se vuelven más sofisticadas, surge un nuevo desafío:</text:p>
      <text:p text:style-name="Quotations"><text:span text:style-name="Strong_20_Emphasis">¿cómo un organismo puede coordinar miles de procesos internos<text:line-break/>sin perder la unidad del comportamiento?</text:span></text:p>
      <text:p text:style-name="Text_20_body">El cerebro está lleno de:</text:p>
      <text:list xml:id="list2376139284" text:style-name="L3">
        <text:list-item>
          <text:p text:style-name="P6">impulsos, </text:p>
        </text:list-item>
        <text:list-item>
          <text:p text:style-name="P6">motivaciones, </text:p>
        </text:list-item>
        <text:list-item>
          <text:p text:style-name="P6"><text:soft-page-break/>memorias, </text:p>
        </text:list-item>
        <text:list-item>
          <text:p text:style-name="P6">percepciones, </text:p>
        </text:list-item>
        <text:list-item>
          <text:p text:style-name="P6">predicciones, </text:p>
        </text:list-item>
        <text:list-item>
          <text:p text:style-name="P6">emociones, </text:p>
        </text:list-item>
        <text:list-item>
          <text:p text:style-name="P5">planes. </text:p>
        </text:list-item>
      </text:list>
      <text:p text:style-name="Text_20_body">Todos compiten por influir en la acción.</text:p>
      <text:p text:style-name="Text_20_body">Para mantener coherencia, el sistema necesita un mecanismo que:</text:p>
      <text:list xml:id="list3109606064" text:style-name="L4">
        <text:list-item>
          <text:p text:style-name="P8">unifique, </text:p>
        </text:list-item>
        <text:list-item>
          <text:p text:style-name="P8">priorice, </text:p>
        </text:list-item>
        <text:list-item>
          <text:p text:style-name="P8">seleccione, </text:p>
        </text:list-item>
        <text:list-item>
          <text:p text:style-name="P7">integre. </text:p>
        </text:list-item>
      </text:list>
      <text:p text:style-name="Text_20_body">Ese mecanismo será la conciencia.</text:p>
      <text:p text:style-name="Horizontal_20_Line"/>
      <text:h text:style-name="Heading_20_2" text:outline-level="2"><text:span text:style-name="Strong_20_Emphasis">13.3 La conciencia como unificación de la mente</text:span></text:h>
      <text:p text:style-name="Text_20_body">La conciencia no es una “luz interior”.<text:line-break/>No es una sustancia.<text:line-break/>No es un alma.<text:line-break/>No es un misterio sobrenatural.</text:p>
      <text:p text:style-name="Text_20_body">La conciencia es:</text:p>
      <text:p text:style-name="Quotations"><text:span text:style-name="Strong_20_Emphasis">el espacio unificado donde la mente integra la información relevante<text:line-break/>para guiar la acción en tiempo real.</text:span></text:p>
      <text:p text:style-name="Text_20_body">Es un “escenario” interno donde:</text:p>
      <text:list xml:id="list826442241" text:style-name="L5">
        <text:list-item>
          <text:p text:style-name="P10">percepciones, </text:p>
        </text:list-item>
        <text:list-item>
          <text:p text:style-name="P10">emociones, </text:p>
        </text:list-item>
        <text:list-item>
          <text:p text:style-name="P10">recuerdos, </text:p>
        </text:list-item>
        <text:list-item>
          <text:p text:style-name="P9">intenciones, </text:p>
        </text:list-item>
      </text:list>
      <text:p text:style-name="Text_20_body">aparecen juntas, en un mismo marco.</text:p>
      <text:p text:style-name="Text_20_body">La conciencia es la <text:span text:style-name="Strong_20_Emphasis">pantalla global</text:span> donde la inteligencia se organiza.</text:p>
      <text:p text:style-name="Horizontal_20_Line"/>
      <text:h text:style-name="Heading_20_2" text:outline-level="2"><text:span text:style-name="Strong_20_Emphasis">13.4 Cómo aparece este espacio unificado</text:span></text:h>
      <text:p text:style-name="Text_20_body">La conciencia surge cuando el cerebro desarrolla tres capacidades nuevas:</text:p>
      <text:h text:style-name="Heading_20_3" text:outline-level="3"><text:soft-page-break/><text:span text:style-name="Strong_20_Emphasis">1. Integración global</text:span></text:h>
      <text:p text:style-name="Text_20_body">Distintas áreas del cerebro pueden compartir información rápidamente.</text:p>
      <text:h text:style-name="Heading_20_3" text:outline-level="3"><text:span text:style-name="Strong_20_Emphasis">2. Acceso común</text:span></text:h>
      <text:p text:style-name="Text_20_body">Las representaciones internas pueden influir en múltiples sistemas:</text:p>
      <text:list xml:id="list1278515580" text:style-name="L6">
        <text:list-item>
          <text:p text:style-name="P12">movimiento, </text:p>
        </text:list-item>
        <text:list-item>
          <text:p text:style-name="P12">atención, </text:p>
        </text:list-item>
        <text:list-item>
          <text:p text:style-name="P12">memoria, </text:p>
        </text:list-item>
        <text:list-item>
          <text:p text:style-name="P11">emoción. </text:p>
        </text:list-item>
      </text:list>
      <text:h text:style-name="Heading_20_3" text:outline-level="3"><text:span text:style-name="Strong_20_Emphasis">3. Selección prioritaria</text:span></text:h>
      <text:p text:style-name="Text_20_body">El sistema elige qué información entra en el espacio consciente<text:line-break/>y cuál queda fuera.</text:p>
      <text:p text:style-name="Text_20_body">Cuando estas tres capacidades se combinan, aparece un fenómeno nuevo:</text:p>
      <text:p text:style-name="Quotations"><text:span text:style-name="Strong_20_Emphasis">una experiencia unificada del mundo y del yo.</text:span></text:p>
      <text:p text:style-name="Horizontal_20_Line"/>
      <text:h text:style-name="Heading_20_2" text:outline-level="2"><text:span text:style-name="Strong_20_Emphasis">13.5 Qué es realmente la experiencia consciente</text:span></text:h>
      <text:p text:style-name="Text_20_body">La experiencia consciente no es un “algo” que flota.<text:line-break/>Es un proceso dinámico.</text:p>
      <text:p text:style-name="Text_20_body">Es:</text:p>
      <text:list xml:id="list3328595654" text:style-name="L7">
        <text:list-item>
          <text:p text:style-name="P14">la integración, </text:p>
        </text:list-item>
        <text:list-item>
          <text:p text:style-name="P14">la selección, </text:p>
        </text:list-item>
        <text:list-item>
          <text:p text:style-name="P14">la priorización, </text:p>
        </text:list-item>
        <text:list-item>
          <text:p text:style-name="P13">la unificación, </text:p>
        </text:list-item>
      </text:list>
      <text:p text:style-name="Text_20_body">de la actividad cerebral en un solo flujo coherente.</text:p>
      <text:p text:style-name="Text_20_body">La experiencia es:</text:p>
      <text:list xml:id="list3420577840" text:style-name="L8">
        <text:list-item>
          <text:p text:style-name="P16">sentir, </text:p>
        </text:list-item>
        <text:list-item>
          <text:p text:style-name="P16">percibir, </text:p>
        </text:list-item>
        <text:list-item>
          <text:p text:style-name="P16">recordar, </text:p>
        </text:list-item>
        <text:list-item>
          <text:p text:style-name="P16">imaginar, </text:p>
        </text:list-item>
        <text:list-item>
          <text:p text:style-name="P16">desear, </text:p>
        </text:list-item>
        <text:list-item>
          <text:p text:style-name="P16">temer, </text:p>
        </text:list-item>
        <text:list-item>
          <text:p text:style-name="P15">decidir. </text:p>
        </text:list-item>
      </text:list>
      <text:p text:style-name="Text_20_body">La conciencia es la inteligencia <text:span text:style-name="Strong_20_Emphasis">hecha vivencia</text:span>.</text:p>
      <text:p text:style-name="Horizontal_20_Line"/>
      <text:h text:style-name="Heading_20_2" text:outline-level="2"><text:soft-page-break/><text:span text:style-name="Strong_20_Emphasis">13.6 La conciencia como herramienta evolutiva</text:span></text:h>
      <text:p text:style-name="Text_20_body">La conciencia no aparece para contemplar el universo.<text:line-break/>Aparece porque resuelve problemas concretos:</text:p>
      <text:h text:style-name="Heading_20_3" text:outline-level="3"><text:span text:style-name="Strong_20_Emphasis">1. Coherencia</text:span></text:h>
      <text:p text:style-name="Text_20_body">Mantiene la unidad del comportamiento.</text:p>
      <text:h text:style-name="Heading_20_3" text:outline-level="3"><text:span text:style-name="Strong_20_Emphasis">2. Prioridad</text:span></text:h>
      <text:p text:style-name="Text_20_body">Selecciona lo más relevante para la supervivencia.</text:p>
      <text:h text:style-name="Heading_20_3" text:outline-level="3"><text:span text:style-name="Strong_20_Emphasis">3. Flexibilidad</text:span></text:h>
      <text:p text:style-name="Text_20_body">Permite cambiar de estrategia rápidamente.</text:p>
      <text:h text:style-name="Heading_20_3" text:outline-level="3"><text:span text:style-name="Strong_20_Emphasis">4. Aprendizaje profundo</text:span></text:h>
      <text:p text:style-name="Text_20_body">Asocia experiencias con emociones y consecuencias.</text:p>
      <text:h text:style-name="Heading_20_3" text:outline-level="3"><text:span text:style-name="Strong_20_Emphasis">5. Simulación rica</text:span></text:h>
      <text:p text:style-name="Text_20_body">Permite imaginar escenarios complejos antes de actuar.</text:p>
      <text:p text:style-name="Text_20_body">La conciencia es una herramienta de supervivencia.<text:line-break/>Una herramienta extremadamente poderosa.</text:p>
      <text:p text:style-name="Horizontal_20_Line"/>
      <text:h text:style-name="Heading_20_2" text:outline-level="2"><text:span text:style-name="Strong_20_Emphasis">13.7 Qué aporta la conciencia a la historia de la inteligencia</text:span></text:h>
      <text:p text:style-name="Text_20_body">La conciencia introduce capacidades que ningún sistema anterior tenía:</text:p>
      <text:h text:style-name="Heading_20_3" text:outline-level="3"><text:span text:style-name="Strong_20_Emphasis">1. Experiencia subjetiva</text:span></text:h>
      <text:p text:style-name="Text_20_body">El mundo ya no solo se percibe: se siente.</text:p>
      <text:h text:style-name="Heading_20_3" text:outline-level="3"><text:span text:style-name="Strong_20_Emphasis">2. Intencionalidad</text:span></text:h>
      <text:p text:style-name="Text_20_body">Las acciones ya no solo ocurren: se desean.</text:p>
      <text:h text:style-name="Heading_20_3" text:outline-level="3"><text:span text:style-name="Strong_20_Emphasis">3. Narrativa</text:span></text:h>
      <text:p text:style-name="Text_20_body">La mente organiza la experiencia en historias.</text:p>
      <text:h text:style-name="Heading_20_3" text:outline-level="3"><text:span text:style-name="Strong_20_Emphasis">4. Identidad</text:span></text:h>
      <text:p text:style-name="Text_20_body">El sistema mantiene un sentido estable de “yo”.</text:p>
      <text:h text:style-name="Heading_20_3" text:outline-level="3"><text:soft-page-break/><text:span text:style-name="Strong_20_Emphasis">5. Libertad funcional</text:span></text:h>
      <text:p text:style-name="Text_20_body">Puede elegir entre múltiples cursos de acción.</text:p>
      <text:p text:style-name="Text_20_body">En términos funcionales:</text:p>
      <text:p text:style-name="Quotations"><text:span text:style-name="Strong_20_Emphasis">La conciencia es la inteligencia que se vuelve experiencia.</text:span></text:p>
      <text:p text:style-name="Horizontal_20_Line"/>
      <text:h text:style-name="Heading_20_2" text:outline-level="2"><text:span text:style-name="Strong_20_Emphasis">13.8 La frase que resume este bloque</text:span></text:h>
      <text:p text:style-name="Quotations"><text:span text:style-name="Strong_20_Emphasis">La mente permitió comprender.<text:line-break/>La conciencia permitió sentir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ahora encuentra <text:span text:style-name="Strong_20_Emphasis">experiencia</text:span> en la conciencia.</text:p>
      <text:p text:style-name="Text_20_body">Este es el inicio del mundo interior.</text:p>
      <text:p text:style-name="Horizontal_20_Line"/>
      <text:p text:style-name="Text_20_body">Si quieres, avanzamos al siguiente bloque:<text:line-break/><text:span text:style-name="Strong_20_Emphasis">El yo: cuando la conciencia aprende a reconocerse como sujeto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0T19:24:45.199000000</meta:creation-date>
    <dc:date>2026-06-10T19:25:21.549000000</dc:date>
    <meta:editing-duration>PT36S</meta:editing-duration>
    <meta:editing-cycles>1</meta:editing-cycles>
    <meta:document-statistic meta:table-count="0" meta:image-count="0" meta:object-count="0" meta:page-count="5" meta:paragraph-count="108" meta:word-count="676" meta:character-count="4296" meta:non-whitespace-character-count="3728"/>
    <meta:generator>LibreOffice/7.3.5.2$Windows_X86_64 LibreOffice_project/184fe81b8c8c30d8b5082578aee2fed2ea847c01</meta:generator>
  </office:meta>
</office:document-meta>
</file>