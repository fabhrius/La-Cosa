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<text:line-break/>Vamos a construir <text:span text:style-name="Strong_20_Emphasis">el bloque del ARN</text:span> con la misma claridad, precisión y elegancia conceptual que ya logramos en los anteriores.<text:line-break/>Este es un punto crítico del capítulo: aquí aparece la primera molécula capaz de <text:span text:style-name="Strong_20_Emphasis">guardar información</text:span>, <text:span text:style-name="Strong_20_Emphasis">recrearse</text:span> y <text:span text:style-name="Strong_20_Emphasis">actuar</text:span>.<text:line-break/>Es el primer sistema donde la inteligencia primitiva adquiere una forma concreta.</text:p>
      <text:p text:style-name="Text_20_body">Aquí tienes el bloque completo, siguiendo la estructura:</text:p>
      <text:list xml:id="list2091530250" text:style-name="L1">
        <text:list-item>
          <text:p text:style-name="P2"><text:span text:style-name="Strong_20_Emphasis">Definición clara</text:span> </text:p>
        </text:list-item>
        <text:list-item>
          <text:p text:style-name="P2"><text:span text:style-name="Strong_20_Emphasis">Contexto del universo en ese momento</text:span> </text:p>
        </text:list-item>
        <text:list-item>
          <text:p text:style-name="P1"><text:span text:style-name="Strong_20_Emphasis">Por qué importa para la historia de la inteligencia</text:span> </text:p>
        </text:list-item>
      </text:list>
      <text:p text:style-name="Horizontal_20_Line"/>
      <text:h text:style-name="Heading_20_1" text:outline-level="1"><text:span text:style-name="Strong_20_Emphasis">5. El ARN</text:span></text:h>
      <text:h text:style-name="Heading_20_2" text:outline-level="2"><text:span text:style-name="Strong_20_Emphasis">5.1 Qué es el ARN (definición clara)</text:span></text:h>
      <text:p text:style-name="Text_20_body">El ARN es una molécula formada por una cadena de unidades más pequeñas llamadas nucleótidos.<text:line-break/>Pero para un lector sin formación científica, lo importante no es su composición, sino <text:span text:style-name="Strong_20_Emphasis">lo que puede hacer</text:span>.</text:p>
      <text:p text:style-name="Text_20_body">El ARN es especial porque combina tres capacidades en una sola estructura:</text:p>
      <text:list xml:id="list524726545" text:style-name="L2">
        <text:list-item>
          <text:p text:style-name="P3"><text:span text:style-name="Strong_20_Emphasis">Puede guardar información</text:span> <text:line-break/>Como una receta escrita en un papel.</text:p>
        </text:list-item>
        <text:list-item>
          <text:p text:style-name="P3"><text:span text:style-name="Strong_20_Emphasis">Puede recrearse</text:span> <text:line-break/>Puede formar nuevas cadenas siguiendo su propio patrón.</text:p>
        </text:list-item>
        <text:list-item>
          <text:p text:style-name="P3"><text:span text:style-name="Strong_20_Emphasis">Puede actuar</text:span> <text:line-break/>Algunas formas de ARN pueden doblarse y funcionar como pequeñas herramientas químicas, acelerando reacciones.</text:p>
        </text:list-item>
      </text:list>
      <text:p text:style-name="Text_20_body">Dicho de forma sencilla:</text:p>
      <text:p text:style-name="Quotations"><text:span text:style-name="Strong_20_Emphasis">El ARN es la primera molécula que puede recordar, recrearse y hacer cosas.</text:span></text:p>
      <text:p text:style-name="Text_20_body">Es la primera molécula con un “manual de instrucciones” incorporado.</text:p>
      <text:p text:style-name="Horizontal_20_Line"/>
      <text:h text:style-name="Heading_20_2" text:outline-level="2"><text:span text:style-name="Strong_20_Emphasis">5.2 Contexto: el universo antes del ARN</text:span></text:h>
      <text:p text:style-name="Text_20_body">Antes del ARN existían:</text:p>
      <text:list xml:id="list2564305501" text:style-name="L3">
        <text:list-item>
          <text:p text:style-name="P5">materia reactiva, </text:p>
        </text:list-item>
        <text:list-item>
          <text:p text:style-name="P5">redes autocatalíticas, </text:p>
        </text:list-item>
        <text:list-item>
          <text:p text:style-name="P5"><text:soft-page-break/>reproducción primitiva, </text:p>
        </text:list-item>
        <text:list-item>
          <text:p text:style-name="P4">evolución química. </text:p>
        </text:list-item>
      </text:list>
      <text:p text:style-name="Text_20_body">Pero todo esto ocurría de forma <text:span text:style-name="Strong_20_Emphasis">dispersa</text:span>:</text:p>
      <text:list xml:id="list909501878" text:style-name="L4">
        <text:list-item>
          <text:p text:style-name="P7">la información no estaba guardada en ningún sitio, </text:p>
        </text:list-item>
        <text:list-item>
          <text:p text:style-name="P7">los patrones se mantenían solo mientras el sistema estaba activo, </text:p>
        </text:list-item>
        <text:list-item>
          <text:p text:style-name="P7">no había una estructura que conservara la forma del proceso, </text:p>
        </text:list-item>
        <text:list-item>
          <text:p text:style-name="P6">no existía un soporte estable para la herencia. </text:p>
        </text:list-item>
      </text:list>
      <text:p text:style-name="Text_20_body">La reproducción era posible, pero <text:span text:style-name="Strong_20_Emphasis">no había un “documento” que describiera cómo debía recrearse el sistema</text:span>.</text:p>
      <text:p text:style-name="Text_20_body">Era como intentar mantener una tradición sin escribirla en ningún sitio:</text:p>
      <text:list xml:id="list1284701618" text:style-name="L5">
        <text:list-item>
          <text:p text:style-name="P9">mientras alguien la recuerda, existe, </text:p>
        </text:list-item>
        <text:list-item>
          <text:p text:style-name="P8">si se pierde la memoria, desaparece. </text:p>
        </text:list-item>
      </text:list>
      <text:p text:style-name="Text_20_body">El universo necesitaba una forma de <text:span text:style-name="Strong_20_Emphasis">guardar la información</text:span> para que la evolución pudiera avanzar más lejos.</text:p>
      <text:p text:style-name="Text_20_body">El ARN es esa forma.</text:p>
      <text:p text:style-name="Horizontal_20_Line"/>
      <text:h text:style-name="Heading_20_2" text:outline-level="2"><text:span text:style-name="Strong_20_Emphasis">5.3 Qué aporta el ARN: la primera memoria estable</text:span></text:h>
      <text:p text:style-name="Text_20_body">Con el ARN aparece algo completamente nuevo:</text:p>
      <text:p text:style-name="Quotations"><text:span text:style-name="Strong_20_Emphasis">La información deja de estar dispersa en un proceso<text:line-break/>y pasa a estar escrita en una molécula.</text:span></text:p>
      <text:p text:style-name="Text_20_body">Esto cambia todo.</text:p>
      <text:p text:style-name="Text_20_body">El ARN permite:</text:p>
      <text:list xml:id="list3630985313" text:style-name="L6">
        <text:list-item>
          <text:p text:style-name="P11">conservar un patrón, </text:p>
        </text:list-item>
        <text:list-item>
          <text:p text:style-name="P11">recrearlo con variaciones, </text:p>
        </text:list-item>
        <text:list-item>
          <text:p text:style-name="P11">transmitirlo, </text:p>
        </text:list-item>
        <text:list-item>
          <text:p text:style-name="P11">modificarlo, </text:p>
        </text:list-item>
        <text:list-item>
          <text:p text:style-name="P10">combinarlo con otros patrones. </text:p>
        </text:list-item>
      </text:list>
      <text:p text:style-name="Text_20_body">Por primera vez, la herencia tiene un soporte físico claro.</text:p>
      <text:p text:style-name="Text_20_body">La inteligencia primitiva —la capacidad de mantenerse y recrearse—<text:line-break/>encuentra aquí su primera herramienta estable.</text:p>
      <text:p text:style-name="Horizontal_20_Line"/>
      <text:h text:style-name="Heading_20_2" text:outline-level="2"><text:soft-page-break/><text:span text:style-name="Strong_20_Emphasis">5.4 El ARN como sistema completo</text:span></text:h>
      <text:p text:style-name="Text_20_body">El ARN no es solo una molécula.<text:line-break/>Es un <text:span text:style-name="Strong_20_Emphasis">sistema funcional</text:span> porque reúne tres funciones que antes estaban separadas:</text:p>
      <text:list xml:id="list286066980" text:style-name="L7">
        <text:list-item>
          <text:p text:style-name="P13"><text:span text:style-name="Strong_20_Emphasis">Memoria</text:span>: guarda información. </text:p>
        </text:list-item>
        <text:list-item>
          <text:p text:style-name="P13"><text:span text:style-name="Strong_20_Emphasis">Reproducción</text:span>: puede recrearse. </text:p>
        </text:list-item>
        <text:list-item>
          <text:p text:style-name="P12"><text:span text:style-name="Strong_20_Emphasis">Acción</text:span>: puede catalizar reacciones. </text:p>
        </text:list-item>
      </text:list>
      <text:p text:style-name="Text_20_body">Antes del ARN:</text:p>
      <text:list xml:id="list3794324108" text:style-name="L8">
        <text:list-item>
          <text:p text:style-name="P15">la memoria era débil, </text:p>
        </text:list-item>
        <text:list-item>
          <text:p text:style-name="P15">la reproducción era imprecisa, </text:p>
        </text:list-item>
        <text:list-item>
          <text:p text:style-name="P14">la acción dependía del entorno. </text:p>
        </text:list-item>
      </text:list>
      <text:p text:style-name="Text_20_body">Con el ARN:</text:p>
      <text:list xml:id="list951273644" text:style-name="L9">
        <text:list-item>
          <text:p text:style-name="P17">la memoria se vuelve interna, </text:p>
        </text:list-item>
        <text:list-item>
          <text:p text:style-name="P17">la reproducción se vuelve más fiable, </text:p>
        </text:list-item>
        <text:list-item>
          <text:p text:style-name="P16">la acción se vuelve programable. </text:p>
        </text:list-item>
      </text:list>
      <text:p text:style-name="Text_20_body">Es la primera vez que un sistema químico puede <text:span text:style-name="Strong_20_Emphasis">representarse a sí mismo</text:span> y <text:span text:style-name="Strong_20_Emphasis">actuar según esa representación</text:span>.</text:p>
      <text:p text:style-name="Horizontal_20_Line"/>
      <text:h text:style-name="Heading_20_2" text:outline-level="2"><text:span text:style-name="Strong_20_Emphasis">5.5 Por qué el ARN es un hito en la historia de la inteligencia</text:span></text:h>
      <text:p text:style-name="Text_20_body">El ARN marca un salto cualitativo porque introduce:</text:p>
      <text:h text:style-name="Heading_20_3" text:outline-level="3"><text:span text:style-name="Strong_20_Emphasis">1. Continuidad real</text:span></text:h>
      <text:p text:style-name="Text_20_body">La información ya no depende del estado momentáneo de una red química.<text:line-break/>Está escrita en una molécula que puede viajar, combinarse, persistir.</text:p>
      <text:h text:style-name="Heading_20_3" text:outline-level="3"><text:span text:style-name="Strong_20_Emphasis">2. Evolución acelerada</text:span></text:h>
      <text:p text:style-name="Text_20_body">Las variaciones en el ARN producen nuevas funciones.<text:line-break/>Las funciones útiles se mantienen.<text:line-break/>La evolución se vuelve más rápida y más creativa.</text:p>
      <text:h text:style-name="Heading_20_3" text:outline-level="3"><text:span text:style-name="Strong_20_Emphasis">3. Autonomía creciente</text:span></text:h>
      <text:p text:style-name="Text_20_body">El ARN puede:</text:p>
      <text:list xml:id="list1077485034" text:style-name="L10">
        <text:list-item>
          <text:p text:style-name="P19">construir partes de sí mismo, </text:p>
        </text:list-item>
        <text:list-item>
          <text:p text:style-name="P19">catalizar reacciones, </text:p>
        </text:list-item>
        <text:list-item>
          <text:p text:style-name="P18">generar nuevas combinaciones. </text:p>
        </text:list-item>
      </text:list>
      <text:p text:style-name="Text_20_body">Es un sistema que empieza a <text:span text:style-name="Strong_20_Emphasis">dirigir su propia continuidad</text:span>.</text:p>
      <text:h text:style-name="Heading_20_3" text:outline-level="3"><text:soft-page-break/><text:span text:style-name="Strong_20_Emphasis">4. La primera forma de inteligencia molecular</text:span></text:h>
      <text:p text:style-name="Text_20_body">No es inteligencia consciente.<text:line-break/>No es pensamiento.<text:line-break/>Pero sí es:</text:p>
      <text:p text:style-name="Quotations"><text:span text:style-name="Strong_20_Emphasis">un proceso que guarda información, la usa para recrearse<text:line-break/>y mejora con el tiempo.</text:span></text:p>
      <text:p text:style-name="Text_20_body">Es inteligencia en su forma más elemental.</text:p>
      <text:p text:style-name="Horizontal_20_Line"/>
      <text:h text:style-name="Heading_20_2" text:outline-level="2"><text:span text:style-name="Strong_20_Emphasis">5.6 El ARN como puente hacia el ADN</text:span></text:h>
      <text:p text:style-name="Text_20_body">El ARN es poderoso, pero inestable.<text:line-break/>Se degrada con facilidad.<text:line-break/>Comete errores.<text:line-break/>Es frágil.</text:p>
      <text:p text:style-name="Text_20_body">La evolución —ese refinamiento continuo—<text:line-break/>termina encontrando una solución más estable para guardar información:<text:line-break/>el ADN.</text:p>
      <text:p text:style-name="Text_20_body">Pero el ADN no aparece de la nada.<text:line-break/>Es una mejora del sistema que el ARN inauguró.</text:p>
      <text:p text:style-name="Text_20_body">El ARN es el primer gran arquitecto de la vida.<text:line-break/>El ADN es su obra maestra de estabilidad.</text:p>
      <text:p text:style-name="Horizontal_20_Line"/>
      <text:p text:style-name="Text_20_body">Si quieres, avanzamos al siguiente bloque: <text:span text:style-name="Strong_20_Emphasis">El ADN</text:span>, donde la inteligencia molecular encuentra una forma de memoria profunda y durader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31T15:39:57.439000000</meta:creation-date>
    <dc:date>2026-05-31T15:40:29.153000000</dc:date>
    <meta:editing-duration>PT32S</meta:editing-duration>
    <meta:editing-cycles>1</meta:editing-cycles>
    <meta:document-statistic meta:table-count="0" meta:image-count="0" meta:object-count="0" meta:page-count="4" meta:paragraph-count="80" meta:word-count="745" meta:character-count="4513" meta:non-whitespace-character-count="3848"/>
    <meta:generator>LibreOffice/7.3.5.2$Windows_X86_64 LibreOffice_project/184fe81b8c8c30d8b5082578aee2fed2ea847c01</meta:generator>
  </office:meta>
</office:document-meta>
</file>