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la versión revisada del bloque del ADN</text:span>, completamente integrada con la secuencia real de aparición que aclaramos:</text:p>
      <text:list xml:id="list442832695" text:style-name="L1">
        <text:list-item>
          <text:p text:style-name="P2">el ADN <text:span text:style-name="Strong_20_Emphasis">no aparece solo</text:span>, </text:p>
        </text:list-item>
        <text:list-item>
          <text:p text:style-name="P2"><text:span text:style-name="Strong_20_Emphasis">no puede funcionar sin un sistema previo</text:span>, </text:p>
        </text:list-item>
        <text:list-item>
          <text:p text:style-name="P2">surge <text:span text:style-name="Strong_20_Emphasis">dentro de protocélulas</text:span> que ya contienen ARN y proteínas primitivas, </text:p>
        </text:list-item>
        <text:list-item>
          <text:p text:style-name="P1">y se convierte en <text:span text:style-name="Strong_20_Emphasis">la memoria profunda de la inteligencia molecular</text:span>. </text:p>
        </text:list-item>
      </text:list>
      <text:p text:style-name="Text_20_body">El texto está escrito para el libro, con la misma claridad, elegancia y estructura que venimos usando.</text:p>
      <text:p text:style-name="Horizontal_20_Line"/>
      <text:h text:style-name="Heading_20_1" text:outline-level="1"><text:span text:style-name="Strong_20_Emphasis">6. El ADN: la memoria profunda de la inteligencia molecular</text:span></text:h>
      <text:h text:style-name="Heading_20_2" text:outline-level="2"><text:span text:style-name="Strong_20_Emphasis">6.1 Qué es el ADN (definición clara)</text:span></text:h>
      <text:p text:style-name="Text_20_body">El ADN es una molécula muy larga formada por cuatro tipos de piezas que se encadenan como cuentas en un collar.<text:line-break/>Pero lo importante no es su química, sino <text:span text:style-name="Strong_20_Emphasis">lo que hace</text:span>.</text:p>
      <text:p text:style-name="Text_20_body">El ADN es:</text:p>
      <text:p text:style-name="Quotations"><text:span text:style-name="Strong_20_Emphasis">una memoria extremadamente estable que guarda instrucciones<text:line-break/>para construir y mantener un sistema vivo.</text:span></text:p>
      <text:p text:style-name="Text_20_body">Tres características lo definen:</text:p>
      <text:list xml:id="list1443287211" text:style-name="L2">
        <text:list-item>
          <text:p text:style-name="P3"><text:span text:style-name="Strong_20_Emphasis">Estabilidad</text:span> <text:line-break/>Es mucho más resistente que el ARN.<text:line-break/>Puede durar años, siglos o milenios sin degradarse.</text:p>
        </text:list-item>
        <text:list-item>
          <text:p text:style-name="P3"><text:span text:style-name="Strong_20_Emphasis">Precisión</text:span> <text:line-break/>Se copia con muy pocos errores.<text:line-break/>Esto permite conservar información durante enormes escalas de tiempo.</text:p>
        </text:list-item>
        <text:list-item>
          <text:p text:style-name="P3"><text:span text:style-name="Strong_20_Emphasis">Capacidad de almacenamiento</text:span> <text:line-break/>Puede contener cantidades gigantescas de información en un espacio diminuto.</text:p>
        </text:list-item>
      </text:list>
      <text:p text:style-name="Text_20_body">En términos simples:</text:p>
      <text:p text:style-name="Quotations"><text:span text:style-name="Strong_20_Emphasis">El ADN es la biblioteca donde la inteligencia molecular guarda su conocimiento.</text:span></text:p>
      <text:p text:style-name="Horizontal_20_Line"/>
      <text:h text:style-name="Heading_20_2" text:outline-level="2"><text:soft-page-break/><text:span text:style-name="Strong_20_Emphasis">6.2 Contexto: el universo justo antes del ADN</text:span></text:h>
      <text:p text:style-name="Text_20_body">Antes del ADN, el ARN ya había logrado algo extraordinario:</text:p>
      <text:list xml:id="list3666878042" text:style-name="L3">
        <text:list-item>
          <text:p text:style-name="P5">guardar información, </text:p>
        </text:list-item>
        <text:list-item>
          <text:p text:style-name="P5">recrearse, </text:p>
        </text:list-item>
        <text:list-item>
          <text:p text:style-name="P5">actuar, </text:p>
        </text:list-item>
        <text:list-item>
          <text:p text:style-name="P5">evolucionar, </text:p>
        </text:list-item>
        <text:list-item>
          <text:p text:style-name="P5">formar redes complejas, </text:p>
        </text:list-item>
        <text:list-item>
          <text:p text:style-name="P4">entrar en protocélulas primitivas. </text:p>
        </text:list-item>
      </text:list>
      <text:p text:style-name="Text_20_body">Pero el ARN tenía un límite importante:</text:p>
      <text:h text:style-name="Heading_20_3" text:outline-level="3"><text:span text:style-name="Strong_20_Emphasis">era demasiado frágil para sostener información compleja durante mucho tiempo.</text:span></text:h>
      <text:p text:style-name="Text_20_body">El ARN:</text:p>
      <text:list xml:id="list546084584" text:style-name="L4">
        <text:list-item>
          <text:p text:style-name="P7">se degrada con facilidad, </text:p>
        </text:list-item>
        <text:list-item>
          <text:p text:style-name="P7">comete errores con frecuencia, </text:p>
        </text:list-item>
        <text:list-item>
          <text:p text:style-name="P7">es químicamente inestable, </text:p>
        </text:list-item>
        <text:list-item>
          <text:p text:style-name="P6">depende mucho del entorno. </text:p>
        </text:list-item>
      </text:list>
      <text:p text:style-name="Text_20_body">La inteligencia molecular ya existía, pero necesitaba un soporte más robusto para crecer y volverse duradera.</text:p>
      <text:p text:style-name="Text_20_body">Ese soporte será el ADN.</text:p>
      <text:p text:style-name="Horizontal_20_Line"/>
      <text:h text:style-name="Heading_20_2" text:outline-level="2"><text:span text:style-name="Strong_20_Emphasis">6.3 Dónde aparece el ADN: dentro de protocélulas</text:span></text:h>
      <text:p text:style-name="Text_20_body">El ADN <text:span text:style-name="Strong_20_Emphasis">no aparece en un entorno químico libre</text:span>, como el ARN.<text:line-break/>No puede hacerlo.<text:line-break/>El ADN no actúa por sí mismo.</text:p>
      <text:p text:style-name="Text_20_body">Para existir y replicarse, el ADN necesita:</text:p>
      <text:list xml:id="list1157412058" text:style-name="L5">
        <text:list-item>
          <text:p text:style-name="P9">moléculas que lo copien, </text:p>
        </text:list-item>
        <text:list-item>
          <text:p text:style-name="P9">moléculas que lo estabilicen, </text:p>
        </text:list-item>
        <text:list-item>
          <text:p text:style-name="P8">un entorno que lo proteja. </text:p>
        </text:list-item>
      </text:list>
      <text:p text:style-name="Text_20_body">Por eso:</text:p>
      <text:p text:style-name="Quotations"><text:span text:style-name="Strong_20_Emphasis">El ADN aparece dentro de protocélulas que ya contienen ARN y proteínas primitivas.</text:span></text:p>
      <text:p text:style-name="Text_20_body">La secuencia real es esta:</text:p>
      <text:list xml:id="list4067526924" text:style-name="L6">
        <text:list-item>
          <text:p text:style-name="P11">ARN independiente </text:p>
        </text:list-item>
        <text:list-item>
          <text:p text:style-name="P11">Redes de ARN </text:p>
        </text:list-item>
        <text:list-item>
          <text:p text:style-name="P11">Protocélulas (burbujas de lípidos) </text:p>
        </text:list-item>
        <text:list-item>
          <text:p text:style-name="P11"><text:soft-page-break/>Sistemas ARN–proteína </text:p>
        </text:list-item>
        <text:list-item>
          <text:p text:style-name="P10"><text:span text:style-name="Strong_20_Emphasis">ADN dentro de protocélulas</text:span> </text:p>
        </text:list-item>
      </text:list>
      <text:p text:style-name="Text_20_body">El ADN es una mejora evolutiva del ARN, no un punto de partida.</text:p>
      <text:p text:style-name="Horizontal_20_Line"/>
      <text:h text:style-name="Heading_20_2" text:outline-level="2"><text:span text:style-name="Strong_20_Emphasis">6.4 Cómo aparece el ADN</text:span></text:h>
      <text:p text:style-name="Text_20_body">El ADN surge cuando:</text:p>
      <text:list xml:id="list1956861931" text:style-name="L7">
        <text:list-item>
          <text:p text:style-name="P13"><text:span text:style-name="Strong_20_Emphasis">algunas moléculas de ARN catalizan la formación de cadenas más estables</text:span>, </text:p>
        </text:list-item>
        <text:list-item>
          <text:p text:style-name="P13"><text:span text:style-name="Strong_20_Emphasis">esas cadenas empiezan a almacenar información</text:span>, </text:p>
        </text:list-item>
        <text:list-item>
          <text:p text:style-name="P13"><text:span text:style-name="Strong_20_Emphasis">proteínas primitivas ayudan a copiar esas cadenas</text:span>, </text:p>
        </text:list-item>
        <text:list-item>
          <text:p text:style-name="P13"><text:span text:style-name="Strong_20_Emphasis">las protocélulas protegen el sistema</text:span>, </text:p>
        </text:list-item>
        <text:list-item>
          <text:p text:style-name="P12"><text:span text:style-name="Strong_20_Emphasis">la evolución selecciona las versiones más precisas y duraderas</text:span>. </text:p>
        </text:list-item>
      </text:list>
      <text:p text:style-name="Text_20_body">Es un proceso gradual, no un salto repentino.</text:p>
      <text:p text:style-name="Text_20_body">El ADN aparece porque:</text:p>
      <text:list xml:id="list808219885" text:style-name="L8">
        <text:list-item>
          <text:p text:style-name="P15">es más estable, </text:p>
        </text:list-item>
        <text:list-item>
          <text:p text:style-name="P15">se degrada menos, </text:p>
        </text:list-item>
        <text:list-item>
          <text:p text:style-name="P15">permite guardar más información, </text:p>
        </text:list-item>
        <text:list-item>
          <text:p text:style-name="P14">permite copias más precisas. </text:p>
        </text:list-item>
      </text:list>
      <text:p text:style-name="Text_20_body">El universo “descubre” que es mejor guardar la información en ADN y dejar que el ARN y las proteínas hagan el trabajo activo.</text:p>
      <text:p text:style-name="Horizontal_20_Line"/>
      <text:h text:style-name="Heading_20_2" text:outline-level="2"><text:span text:style-name="Strong_20_Emphasis">6.5 Qué aporta el ADN: estabilidad y precisión</text:span></text:h>
      <text:p text:style-name="Text_20_body">El ADN introduce dos capacidades que transforman la historia de la inteligencia:</text:p>
      <text:h text:style-name="Heading_20_3" text:outline-level="3"><text:span text:style-name="Strong_20_Emphasis">1. Memoria profunda</text:span></text:h>
      <text:p text:style-name="Text_20_body">El ADN puede conservar información durante miles de generaciones.<text:line-break/>Esto permite que los sistemas vivos acumulen mejoras sin perderlas.</text:p>
      <text:h text:style-name="Heading_20_3" text:outline-level="3"><text:span text:style-name="Strong_20_Emphasis">2. Copias precisas</text:span></text:h>
      <text:p text:style-name="Text_20_body">El ADN se replica con una fidelidad extraordinaria.<text:line-break/>Esto permite que la evolución construya estructuras complejas sin que se desmoronen por errores acumulados.</text:p>
      <text:p text:style-name="Text_20_body">El ADN convierte la inteligencia molecular en algo <text:span text:style-name="Strong_20_Emphasis">duradero</text:span>.</text:p>
      <text:p text:style-name="Horizontal_20_Line"/>
      <text:h text:style-name="Heading_20_2" text:outline-level="2"><text:soft-page-break/><text:span text:style-name="Strong_20_Emphasis">6.6 El ADN como sistema de instrucciones</text:span></text:h>
      <text:p text:style-name="Text_20_body">El ADN no actúa directamente.<text:line-break/>No cataliza reacciones.<text:line-break/>No se pliega para hacer cosas.</text:p>
      <text:p text:style-name="Text_20_body">Su función es otra:</text:p>
      <text:p text:style-name="Quotations"><text:span text:style-name="Strong_20_Emphasis">El ADN guarda instrucciones que otros sistemas leen y ejecutan.</text:span></text:p>
      <text:p text:style-name="Text_20_body">Es como un libro de recetas:</text:p>
      <text:list xml:id="list3154859106" text:style-name="L9">
        <text:list-item>
          <text:p text:style-name="P17">no cocina, </text:p>
        </text:list-item>
        <text:list-item>
          <text:p text:style-name="P17">no mezcla ingredientes, </text:p>
        </text:list-item>
        <text:list-item>
          <text:p text:style-name="P16">no enciende el fuego,<text:line-break/>pero contiene las instrucciones para hacerlo. </text:p>
        </text:list-item>
      </text:list>
      <text:p text:style-name="Text_20_body">El ADN es la primera forma de <text:span text:style-name="Strong_20_Emphasis">información estructurada</text:span>:</text:p>
      <text:list xml:id="list4040403352" text:style-name="L10">
        <text:list-item>
          <text:p text:style-name="P19">organizada, </text:p>
        </text:list-item>
        <text:list-item>
          <text:p text:style-name="P19">codificada, </text:p>
        </text:list-item>
        <text:list-item>
          <text:p text:style-name="P19">legible, </text:p>
        </text:list-item>
        <text:list-item>
          <text:p text:style-name="P18">transmisible. </text:p>
        </text:list-item>
      </text:list>
      <text:p text:style-name="Horizontal_20_Line"/>
      <text:h text:style-name="Heading_20_2" text:outline-level="2"><text:span text:style-name="Strong_20_Emphasis">6.7 Por qué el ADN es un hito en la historia de la inteligencia</text:span></text:h>
      <text:p text:style-name="Text_20_body">El ADN permite que la inteligencia molecular:</text:p>
      <text:list xml:id="list1842394514" text:style-name="L11">
        <text:list-item>
          <text:p text:style-name="P21">se expanda, </text:p>
        </text:list-item>
        <text:list-item>
          <text:p text:style-name="P21">se complejice, </text:p>
        </text:list-item>
        <text:list-item>
          <text:p text:style-name="P21">se estabilice, </text:p>
        </text:list-item>
        <text:list-item>
          <text:p text:style-name="P21">se refine, </text:p>
        </text:list-item>
        <text:list-item>
          <text:p text:style-name="P20">se prolongue en el tiempo. </text:p>
        </text:list-item>
      </text:list>
      <text:h text:style-name="Heading_20_3" text:outline-level="3"><text:span text:style-name="Strong_20_Emphasis">1. Conservación a largo plazo</text:span></text:h>
      <text:p text:style-name="Text_20_body">La información útil ya no se pierde.<text:line-break/>Se acumula generación tras generación.</text:p>
      <text:h text:style-name="Heading_20_3" text:outline-level="3"><text:span text:style-name="Strong_20_Emphasis">2. Complejidad creciente</text:span></text:h>
      <text:p text:style-name="Text_20_body">El ADN puede almacenar instrucciones para sistemas cada vez más sofisticados:</text:p>
      <text:list xml:id="list2596599878" text:style-name="L12">
        <text:list-item>
          <text:p text:style-name="P23">proteínas, </text:p>
        </text:list-item>
        <text:list-item>
          <text:p text:style-name="P23">redes metabólicas, </text:p>
        </text:list-item>
        <text:list-item>
          <text:p text:style-name="P22">células completas. </text:p>
        </text:list-item>
      </text:list>
      <text:h text:style-name="Heading_20_3" text:outline-level="3"><text:soft-page-break/><text:span text:style-name="Strong_20_Emphasis">3. Robustez</text:span></text:h>
      <text:p text:style-name="Text_20_body">La inteligencia molecular deja de depender de condiciones frágiles.<text:line-break/>Ahora tiene un soporte resistente.</text:p>
      <text:h text:style-name="Heading_20_3" text:outline-level="3"><text:span text:style-name="Strong_20_Emphasis">4. Evolución acelerada</text:span></text:h>
      <text:p text:style-name="Text_20_body">La estabilidad del ADN permite explorar nuevas combinaciones sin destruir lo que ya funciona.</text:p>
      <text:p text:style-name="Text_20_body">En resumen:</text:p>
      <text:p text:style-name="Quotations"><text:span text:style-name="Strong_20_Emphasis">El ADN convierte la inteligencia primitiva en una inteligencia heredable, estable y expansiva.</text:span></text:p>
      <text:p text:style-name="Horizontal_20_Line"/>
      <text:h text:style-name="Heading_20_2" text:outline-level="2"><text:span text:style-name="Strong_20_Emphasis">6.8 El ADN como puente hacia la célula completa</text:span></text:h>
      <text:p text:style-name="Text_20_body">El ADN no funciona solo.<text:line-break/>Necesita un entorno que:</text:p>
      <text:list xml:id="list1556505502" text:style-name="L13">
        <text:list-item>
          <text:p text:style-name="P25">lo proteja, </text:p>
        </text:list-item>
        <text:list-item>
          <text:p text:style-name="P25">lo lea, </text:p>
        </text:list-item>
        <text:list-item>
          <text:p text:style-name="P25">lo ejecute, </text:p>
        </text:list-item>
        <text:list-item>
          <text:p text:style-name="P24">lo replique. </text:p>
        </text:list-item>
      </text:list>
      <text:p text:style-name="Text_20_body">Ese entorno es la célula.</text:p>
      <text:p text:style-name="Text_20_body">La aparición del ADN prepara el camino para el siguiente gran salto:</text:p>
      <text:p text:style-name="Quotations"><text:span text:style-name="Strong_20_Emphasis">la inteligencia molecular se organiza dentro de un espacio propio,<text:line-break/>con fronteras, sensores y mecanismos internos: la célula.</text:span></text:p>
      <text:p text:style-name="Text_20_body">El ADN es la memoria.<text:line-break/>La célula será el organismo que la usa.</text:p>
      <text:p text:style-name="Horizontal_20_Line"/>
      <text:p text:style-name="Text_20_body">Si quieres, avanzamos al siguiente bloque: <text:span text:style-name="Strong_20_Emphasis">La célula</text:span>, donde la inteligencia molecular se convierte por primera vez en <text:span text:style-name="Strong_20_Emphasis">agencia</text:span>, en un sistema que actúa activamente para mantenerse viv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1T18:16:42.038000000</meta:creation-date>
    <dc:date>2026-06-01T18:22:38.757000000</dc:date>
    <meta:editing-duration>PT5M57S</meta:editing-duration>
    <meta:editing-cycles>1</meta:editing-cycles>
    <meta:document-statistic meta:table-count="0" meta:image-count="0" meta:object-count="0" meta:page-count="5" meta:paragraph-count="114" meta:word-count="901" meta:character-count="5430" meta:non-whitespace-character-count="4644"/>
    <meta:generator>LibreOffice/7.3.5.2$Windows_X86_64 LibreOffice_project/184fe81b8c8c30d8b5082578aee2fed2ea847c01</meta:generator>
  </office:meta>
</office:document-meta>
</file>