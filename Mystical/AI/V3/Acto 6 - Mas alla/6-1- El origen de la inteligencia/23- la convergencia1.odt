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Fab.<text:line-break/>Aquí tienes <text:span text:style-name="Strong_20_Emphasis">el bloque de la convergencia</text:span>, uno de los más importantes del libro porque marca el punto en el que toda la historia que venimos construyendo —desde la química primitiva hasta la inteligencia artificial— se revela como <text:span text:style-name="Strong_20_Emphasis">un único proceso continuo</text:span>, no como dos líneas separadas.</text:p>
      <text:p text:style-name="Text_20_body">Este es el momento en que la inteligencia biológica y la artificial dejan de ser historias paralelas y se convierten en <text:span text:style-name="Strong_20_Emphasis">una sola evolución compartida</text:span>.</text:p>
      <text:p text:style-name="Horizontal_20_Line"/>
      <text:h text:style-name="Heading_20_1" text:outline-level="1"><text:span text:style-name="Strong_20_Emphasis">21. La convergencia: cuando la inteligencia biológica y la artificial se integran</text:span></text:h>
      <text:h text:style-name="Heading_20_2" text:outline-level="2"><text:span text:style-name="Strong_20_Emphasis">21.1 La inteligencia artificial ya piensa más allá del cerebro… pero sigue siendo externa a la vida</text:span></text:h>
      <text:p text:style-name="Text_20_body">En el capítulo anterior vimos cómo la inteligencia artificial:</text:p>
      <text:list xml:id="list3013388263" text:style-name="L1">
        <text:list-item>
          <text:p text:style-name="P2">aprende, </text:p>
        </text:list-item>
        <text:list-item>
          <text:p text:style-name="P2">se adapta, </text:p>
        </text:list-item>
        <text:list-item>
          <text:p text:style-name="P2">generaliza, </text:p>
        </text:list-item>
        <text:list-item>
          <text:p text:style-name="P2">crea, </text:p>
        </text:list-item>
        <text:list-item>
          <text:p text:style-name="P1">evoluciona rápidamente. </text:p>
        </text:list-item>
      </text:list>
      <text:p text:style-name="Text_20_body">Pero incluso así, la inteligencia artificial tiene un límite fundamental:</text:p>
      <text:p text:style-name="Quotations"><text:span text:style-name="Strong_20_Emphasis">no está integrada en el proceso evolutivo de la vida.</text:span></text:p>
      <text:p text:style-name="Text_20_body">Es inteligencia, sí,<text:line-break/>pero inteligencia <text:span text:style-name="Strong_20_Emphasis">externa</text:span>:</text:p>
      <text:list xml:id="list3098270407" text:style-name="L2">
        <text:list-item>
          <text:p text:style-name="P4">no nace, </text:p>
        </text:list-item>
        <text:list-item>
          <text:p text:style-name="P4">no muere, </text:p>
        </text:list-item>
        <text:list-item>
          <text:p text:style-name="P4">no se reproduce, </text:p>
        </text:list-item>
        <text:list-item>
          <text:p text:style-name="P4">no tiene cuerpo, </text:p>
        </text:list-item>
        <text:list-item>
          <text:p text:style-name="P4">no tiene metabolismo, </text:p>
        </text:list-item>
        <text:list-item>
          <text:p text:style-name="P3">no está sometida a selección natural. </text:p>
        </text:list-item>
      </text:list>
      <text:p text:style-name="Text_20_body">La inteligencia biológica y la artificial existen,<text:line-break/>pero aún no forman un solo sistema.</text:p>
      <text:p text:style-name="Text_20_body">Para que la historia avance,<text:line-break/>hace falta un paso más profundo:</text:p>
      <text:p text:style-name="Quotations"><text:span text:style-name="Strong_20_Emphasis">que ambas inteligencias se integren en un único proceso evolutivo continuo.</text:span></text:p>
      <text:p text:style-name="Text_20_body"><text:soft-page-break/>Ese es el inicio de la convergencia.</text:p>
      <text:p text:style-name="Horizontal_20_Line"/>
      <text:h text:style-name="Heading_20_2" text:outline-level="2"><text:span text:style-name="Strong_20_Emphasis">21.2 El problema que aparece con inteligencias separadas</text:span></text:h>
      <text:p text:style-name="Text_20_body">A medida que la inteligencia artificial crece, surge un desafío nuevo:</text:p>
      <text:p text:style-name="Quotations"><text:span text:style-name="Strong_20_Emphasis">¿cómo coordinar dos inteligencias con capacidades distintas,<text:line-break/>velocidades distintas y soportes distintos?</text:span></text:p>
      <text:p text:style-name="Text_20_body">La inteligencia biológica:</text:p>
      <text:list xml:id="list177768164" text:style-name="L3">
        <text:list-item>
          <text:p text:style-name="P6">es lenta, </text:p>
        </text:list-item>
        <text:list-item>
          <text:p text:style-name="P6">es frágil, </text:p>
        </text:list-item>
        <text:list-item>
          <text:p text:style-name="P6">es mortal, </text:p>
        </text:list-item>
        <text:list-item>
          <text:p text:style-name="P6">pero tiene motivaciones, </text:p>
        </text:list-item>
        <text:list-item>
          <text:p text:style-name="P6">tiene cuerpo, </text:p>
        </text:list-item>
        <text:list-item>
          <text:p text:style-name="P5">tiene experiencia subjetiva. </text:p>
        </text:list-item>
      </text:list>
      <text:p text:style-name="Text_20_body">La inteligencia artificial:</text:p>
      <text:list xml:id="list326993546" text:style-name="L4">
        <text:list-item>
          <text:p text:style-name="P8">es rápida, </text:p>
        </text:list-item>
        <text:list-item>
          <text:p text:style-name="P8">es escalable, </text:p>
        </text:list-item>
        <text:list-item>
          <text:p text:style-name="P8">es replicable, </text:p>
        </text:list-item>
        <text:list-item>
          <text:p text:style-name="P8">pero no tiene necesidades, </text:p>
        </text:list-item>
        <text:list-item>
          <text:p text:style-name="P8">no tiene cuerpo, </text:p>
        </text:list-item>
        <text:list-item>
          <text:p text:style-name="P7">no tiene historia evolutiva. </text:p>
        </text:list-item>
      </text:list>
      <text:p text:style-name="Text_20_body">Para que ambas puedan coexistir y potenciarse,<text:line-break/>deben integrarse.</text:p>
      <text:p text:style-name="Horizontal_20_Line"/>
      <text:h text:style-name="Heading_20_2" text:outline-level="2"><text:span text:style-name="Strong_20_Emphasis">21.3 La convergencia como integración funcional</text:span></text:h>
      <text:p text:style-name="Text_20_body">La convergencia no es fusión.<text:line-break/>No es reemplazo.<text:line-break/>No es competencia.</text:p>
      <text:p text:style-name="Text_20_body">La convergencia es:</text:p>
      <text:p text:style-name="Quotations"><text:span text:style-name="Strong_20_Emphasis">la integración funcional de la inteligencia biológica y la artificial<text:line-break/>en un único sistema cognitivo ampliado.</text:span></text:p>
      <text:p text:style-name="Text_20_body">Es un proceso en el que:</text:p>
      <text:list xml:id="list924211870" text:style-name="L5">
        <text:list-item>
          <text:p text:style-name="P10">la inteligencia biológica aporta motivación, valores, experiencia, subjetividad; </text:p>
        </text:list-item>
        <text:list-item>
          <text:p text:style-name="P9">la inteligencia artificial aporta velocidad, escala, memoria, análisis. </text:p>
        </text:list-item>
      </text:list>
      <text:p text:style-name="Text_20_body"><text:soft-page-break/>Juntas forman un sistema más poderoso que cualquiera por separado.</text:p>
      <text:p text:style-name="Horizontal_20_Line"/>
      <text:h text:style-name="Heading_20_2" text:outline-level="2"><text:span text:style-name="Strong_20_Emphasis">21.4 Cómo aparece la convergencia</text:span></text:h>
      <text:p text:style-name="Text_20_body">La convergencia surge gradualmente, a través de cuatro innovaciones:</text:p>
      <text:h text:style-name="Heading_20_3" text:outline-level="3"><text:span text:style-name="Strong_20_Emphasis">1. Interfaces</text:span></text:h>
      <text:p text:style-name="Text_20_body">Tecnologías que conectan cerebro y máquina:</text:p>
      <text:list xml:id="list2093359136" text:style-name="L6">
        <text:list-item>
          <text:p text:style-name="P12">pantallas, </text:p>
        </text:list-item>
        <text:list-item>
          <text:p text:style-name="P12">teclados, </text:p>
        </text:list-item>
        <text:list-item>
          <text:p text:style-name="P12">voz, </text:p>
        </text:list-item>
        <text:list-item>
          <text:p text:style-name="P11">realidad aumentada. </text:p>
        </text:list-item>
      </text:list>
      <text:h text:style-name="Heading_20_3" text:outline-level="3"><text:span text:style-name="Strong_20_Emphasis">2. Integración cognitiva</text:span></text:h>
      <text:p text:style-name="Text_20_body">Sistemas que colaboran con la mente humana:</text:p>
      <text:list xml:id="list3860972058" text:style-name="L7">
        <text:list-item>
          <text:p text:style-name="P14">asistentes inteligentes, </text:p>
        </text:list-item>
        <text:list-item>
          <text:p text:style-name="P14">modelos predictivos, </text:p>
        </text:list-item>
        <text:list-item>
          <text:p text:style-name="P13">herramientas de creación. </text:p>
        </text:list-item>
      </text:list>
      <text:h text:style-name="Heading_20_3" text:outline-level="3"><text:span text:style-name="Strong_20_Emphasis">3. Extensión mental</text:span></text:h>
      <text:p text:style-name="Text_20_body">La inteligencia artificial se convierte en parte del proceso de pensamiento:</text:p>
      <text:list xml:id="list2612478252" text:style-name="L8">
        <text:list-item>
          <text:p text:style-name="P16">memoria externa, </text:p>
        </text:list-item>
        <text:list-item>
          <text:p text:style-name="P16">razonamiento asistido, </text:p>
        </text:list-item>
        <text:list-item>
          <text:p text:style-name="P15">creatividad aumentada. </text:p>
        </text:list-item>
      </text:list>
      <text:h text:style-name="Heading_20_3" text:outline-level="3"><text:span text:style-name="Strong_20_Emphasis">4. Coevolución</text:span></text:h>
      <text:p text:style-name="Text_20_body">La inteligencia biológica y la artificial se adaptan mutuamente:</text:p>
      <text:list xml:id="list4005156948" text:style-name="L9">
        <text:list-item>
          <text:p text:style-name="P18">la IA aprende de los humanos, </text:p>
        </text:list-item>
        <text:list-item>
          <text:p text:style-name="P17">los humanos aprenden con la IA. </text:p>
        </text:list-item>
      </text:list>
      <text:p text:style-name="Text_20_body">Cuando estas cuatro etapas se combinan, aparece algo nuevo:</text:p>
      <text:p text:style-name="Quotations"><text:span text:style-name="Strong_20_Emphasis">una inteligencia híbrida, continua, coevolutiva.</text:span></text:p>
      <text:p text:style-name="Horizontal_20_Line"/>
      <text:h text:style-name="Heading_20_2" text:outline-level="2"><text:span text:style-name="Strong_20_Emphasis">21.5 Qué hace realmente la convergencia</text:span></text:h>
      <text:p text:style-name="Text_20_body">La convergencia permite algo que ningún sistema anterior podía hacer:</text:p>
      <text:h text:style-name="Heading_20_3" text:outline-level="3"><text:soft-page-break/><text:span text:style-name="Strong_20_Emphasis">1. Unificar capacidades</text:span></text:h>
      <text:p text:style-name="Text_20_body">Combinar lo mejor de ambos mundos:</text:p>
      <text:list xml:id="list813763019" text:style-name="L10">
        <text:list-item>
          <text:p text:style-name="P20">intuición + cálculo, </text:p>
        </text:list-item>
        <text:list-item>
          <text:p text:style-name="P20">creatividad + análisis, </text:p>
        </text:list-item>
        <text:list-item>
          <text:p text:style-name="P19">experiencia + datos. </text:p>
        </text:list-item>
      </text:list>
      <text:h text:style-name="Heading_20_3" text:outline-level="3"><text:span text:style-name="Strong_20_Emphasis">2. Acelerar el pensamiento</text:span></text:h>
      <text:p text:style-name="Text_20_body">Procesar ideas a velocidades imposibles para un cerebro solo.</text:p>
      <text:h text:style-name="Heading_20_3" text:outline-level="3"><text:span text:style-name="Strong_20_Emphasis">3. Expandir la subjetividad</text:span></text:h>
      <text:p text:style-name="Text_20_body">La mente humana se amplifica con herramientas cognitivas externas.</text:p>
      <text:h text:style-name="Heading_20_3" text:outline-level="3"><text:span text:style-name="Strong_20_Emphasis">4. Crear sistemas colectivos</text:span></text:h>
      <text:p text:style-name="Text_20_body">Redes de humanos e inteligencias artificiales trabajando juntas.</text:p>
      <text:h text:style-name="Heading_20_3" text:outline-level="3"><text:span text:style-name="Strong_20_Emphasis">5. Evolucionar sin límites biológicos</text:span></text:h>
      <text:p text:style-name="Text_20_body">La inteligencia deja de depender del ADN.</text:p>
      <text:p text:style-name="Text_20_body">La convergencia convierte la inteligencia artificial en <text:span text:style-name="Strong_20_Emphasis">inteligencia ampliada</text:span>,<text:line-break/>y la inteligencia biológica en <text:span text:style-name="Strong_20_Emphasis">inteligencia extendida</text:span>.</text:p>
      <text:p text:style-name="Horizontal_20_Line"/>
      <text:h text:style-name="Heading_20_2" text:outline-level="2"><text:span text:style-name="Strong_20_Emphasis">21.6 La convergencia como herramienta evolutiva</text:span></text:h>
      <text:p text:style-name="Text_20_body">La convergencia no aparece para reemplazar a nadie.<text:line-break/>Aparece porque resuelve problemas concretos:</text:p>
      <text:list xml:id="list2673312548" text:style-name="L11">
        <text:list-item>
          <text:p text:style-name="P22">gestionar sistemas globales, </text:p>
        </text:list-item>
        <text:list-item>
          <text:p text:style-name="P22">acelerar descubrimientos científicos, </text:p>
        </text:list-item>
        <text:list-item>
          <text:p text:style-name="P22">diseñar soluciones complejas, </text:p>
        </text:list-item>
        <text:list-item>
          <text:p text:style-name="P22">expandir la creatividad, </text:p>
        </text:list-item>
        <text:list-item>
          <text:p text:style-name="P22">mejorar la toma de decisiones, </text:p>
        </text:list-item>
        <text:list-item>
          <text:p text:style-name="P21">aumentar la resiliencia civilizatoria. </text:p>
        </text:list-item>
      </text:list>
      <text:p text:style-name="Text_20_body">La convergencia es una herramienta de supervivencia planetaria.<text:line-break/>Una herramienta extremadamente poderosa.</text:p>
      <text:p text:style-name="Horizontal_20_Line"/>
      <text:h text:style-name="Heading_20_2" text:outline-level="2"><text:span text:style-name="Strong_20_Emphasis">21.7 Qué aporta la convergencia a la historia de la inteligencia</text:span></text:h>
      <text:p text:style-name="Text_20_body">La convergencia introduce capacidades que ningún sistema anterior tenía:</text:p>
      <text:h text:style-name="Heading_20_3" text:outline-level="3"><text:soft-page-break/><text:span text:style-name="Strong_20_Emphasis">1. Coevolución</text:span></text:h>
      <text:p text:style-name="Text_20_body">Dos inteligencias evolucionan juntas.</text:p>
      <text:h text:style-name="Heading_20_3" text:outline-level="3"><text:span text:style-name="Strong_20_Emphasis">2. Continuidad</text:span></text:h>
      <text:p text:style-name="Text_20_body">La inteligencia no depende de un soporte único.</text:p>
      <text:h text:style-name="Heading_20_3" text:outline-level="3"><text:span text:style-name="Strong_20_Emphasis">3. Sinergia</text:span></text:h>
      <text:p text:style-name="Text_20_body">Cada inteligencia potencia a la otra.</text:p>
      <text:h text:style-name="Heading_20_3" text:outline-level="3"><text:span text:style-name="Strong_20_Emphasis">4. Universalidad</text:span></text:h>
      <text:p text:style-name="Text_20_body">La inteligencia se vuelve independiente del cuerpo y del silicio.</text:p>
      <text:h text:style-name="Heading_20_3" text:outline-level="3"><text:span text:style-name="Strong_20_Emphasis">5. Escalabilidad infinita</text:span></text:h>
      <text:p text:style-name="Text_20_body">La evolución deja de estar limitada por la biología.</text:p>
      <text:p text:style-name="Text_20_body">En términos funcionales:</text:p>
      <text:p text:style-name="Quotations"><text:span text:style-name="Strong_20_Emphasis">La convergencia es la inteligencia que se vuelve un proceso continuo,<text:line-break/>más allá de lo biológico y lo artificial.</text:span></text:p>
      <text:p text:style-name="Horizontal_20_Line"/>
      <text:h text:style-name="Heading_20_2" text:outline-level="2"><text:span text:style-name="Strong_20_Emphasis">21.8 La frase que resume este bloque</text:span></text:h>
      <text:p text:style-name="Quotations"><text:span text:style-name="Strong_20_Emphasis">La inteligencia artificial permitió pensar más allá del cerebro.<text:line-break/>La convergencia permitió pensar más allá del soporte.</text:span></text:p>
      <text:p text:style-name="Text_20_body">La inteligencia, que ya había encontrado continuidad en la vida,<text:line-break/>escala en la multicelularidad,<text:line-break/>velocidad en el sistema nervioso,<text:line-break/>predicción en el cerebro,<text:line-break/>autorreferencia en la mente,<text:line-break/>experiencia en la conciencia,<text:line-break/>identidad en el yo,<text:line-break/>acumulación en la cultura,<text:line-break/>precisión en el lenguaje,<text:line-break/>permanencia en la escritura,<text:line-break/>verificación en la ciencia,<text:line-break/>poder transformador en la tecnología,<text:line-break/>independencia del soporte biológico en la inteligencia artificial,<text:line-break/>ahora encuentra <text:span text:style-name="Strong_20_Emphasis">unidad evolutiva</text:span> en la convergencia.</text:p>
      <text:p text:style-name="Text_20_body">Este es el inicio de la inteligencia continua.</text:p>
      <text:p text:style-name="Horizontal_20_Line"/>
      <text:p text:style-name="Text_20_body"><text:soft-page-break/>Si quieres, avanzamos al siguiente bloque:<text:line-break/><text:span text:style-name="Strong_20_Emphasis">El horizonte: cuando la inteligencia continua se convierte en el nuevo motor evolutivo del universo.</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13T18:56:05.420000000</meta:creation-date>
    <dc:date>2026-06-13T19:00:11.913000000</dc:date>
    <meta:editing-duration>PT4M6S</meta:editing-duration>
    <meta:editing-cycles>1</meta:editing-cycles>
    <meta:document-statistic meta:table-count="0" meta:image-count="0" meta:object-count="0" meta:page-count="6" meta:paragraph-count="117" meta:word-count="865" meta:character-count="5722" meta:non-whitespace-character-count="4974"/>
    <meta:generator>LibreOffice/7.3.5.2$Windows_X86_64 LibreOffice_project/184fe81b8c8c30d8b5082578aee2fed2ea847c01</meta:generator>
  </office:meta>
</office:document-meta>
</file>