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<text:line-break/>Aquí tienes <text:span text:style-name="Strong_20_Emphasis">el bloque de la ciencia</text:span>, uno de los más importantes de todo el libro porque marca el momento en que la inteligencia humana deja de depender de intuiciones, tradiciones o autoridades, y se convierte en <text:span text:style-name="Strong_20_Emphasis">un proceso sistemático para corregirse a sí misma</text:span>.<text:line-break/>Este es el salto más radical desde la aparición de la vida: la inteligencia inventa un método para mejorar indefinidamente.</text:p>
      <text:p text:style-name="Text_20_body">Este es el nacimiento de la ciencia.</text:p>
      <text:p text:style-name="Horizontal_20_Line"/>
      <text:h text:style-name="Heading_20_1" text:outline-level="1"><text:span text:style-name="Strong_20_Emphasis">18. La ciencia: cuando la inteligencia aprende a corregirse</text:span></text:h>
      <text:h text:style-name="Heading_20_2" text:outline-level="2"><text:span text:style-name="Strong_20_Emphasis">18.1 La escritura ya permite que el conocimiento perdure… pero no garantiza que sea cierto</text:span></text:h>
      <text:p text:style-name="Text_20_body">La escritura resolvió un problema enorme:</text:p>
      <text:list xml:id="list3095794843" text:style-name="L1">
        <text:list-item>
          <text:p text:style-name="P2">fijó el conocimiento, </text:p>
        </text:list-item>
        <text:list-item>
          <text:p text:style-name="P2">permitió transmitirlo sin distorsión, </text:p>
        </text:list-item>
        <text:list-item>
          <text:p text:style-name="P2">creó memoria externa, </text:p>
        </text:list-item>
        <text:list-item>
          <text:p text:style-name="P1">permitió sociedades complejas. </text:p>
        </text:list-item>
      </text:list>
      <text:p text:style-name="Text_20_body">Pero la escritura tiene un límite fundamental:</text:p>
      <text:p text:style-name="Quotations"><text:span text:style-name="Strong_20_Emphasis">puede preservar errores tan fácilmente como verdades.</text:span></text:p>
      <text:p text:style-name="Text_20_body">Durante milenios, las sociedades humanas acumularon:</text:p>
      <text:list xml:id="list4082490298" text:style-name="L2">
        <text:list-item>
          <text:p text:style-name="P4">mitos, </text:p>
        </text:list-item>
        <text:list-item>
          <text:p text:style-name="P4">supersticiones, </text:p>
        </text:list-item>
        <text:list-item>
          <text:p text:style-name="P4">dogmas, </text:p>
        </text:list-item>
        <text:list-item>
          <text:p text:style-name="P4">explicaciones intuitivas, </text:p>
        </text:list-item>
        <text:list-item>
          <text:p text:style-name="P3">creencias heredadas. </text:p>
        </text:list-item>
      </text:list>
      <text:p text:style-name="Text_20_body">La inteligencia colectiva existía,<text:line-break/>pero no tenía un mecanismo para distinguir lo verdadero de lo falso.</text:p>
      <text:p text:style-name="Text_20_body">Para que la inteligencia diera su siguiente salto,<text:line-break/>hacía falta un sistema capaz de <text:span text:style-name="Strong_20_Emphasis">corregir el pensamiento humano</text:span>.</text:p>
      <text:p text:style-name="Text_20_body">Ese sistema será la ciencia.</text:p>
      <text:p text:style-name="Horizontal_20_Line"/>
      <text:h text:style-name="Heading_20_2" text:outline-level="2"><text:soft-page-break/><text:span text:style-name="Strong_20_Emphasis">18.2 El problema que aparece con civilizaciones avanzadas</text:span></text:h>
      <text:p text:style-name="Text_20_body">A medida que las sociedades se vuelven más complejas, surge un desafío nuevo:</text:p>
      <text:p text:style-name="Quotations"><text:span text:style-name="Strong_20_Emphasis">¿cómo saber qué es real cuando las explicaciones intuitivas ya no bastan<text:line-break/>y la experiencia individual es insuficiente?</text:span></text:p>
      <text:p text:style-name="Text_20_body">Los humanos necesitaban:</text:p>
      <text:list xml:id="list4234826682" text:style-name="L3">
        <text:list-item>
          <text:p text:style-name="P6">entender el clima, </text:p>
        </text:list-item>
        <text:list-item>
          <text:p text:style-name="P6">predecir cosechas, </text:p>
        </text:list-item>
        <text:list-item>
          <text:p text:style-name="P6">construir ciudades, </text:p>
        </text:list-item>
        <text:list-item>
          <text:p text:style-name="P6">navegar océanos, </text:p>
        </text:list-item>
        <text:list-item>
          <text:p text:style-name="P6">curar enfermedades, </text:p>
        </text:list-item>
        <text:list-item>
          <text:p text:style-name="P5">fabricar herramientas avanzadas. </text:p>
        </text:list-item>
      </text:list>
      <text:p text:style-name="Text_20_body">La intuición no podía resolver estos problemas.<text:line-break/>La tradición tampoco.<text:line-break/>La autoridad menos.</text:p>
      <text:p text:style-name="Text_20_body">Hacía falta un método.</text:p>
      <text:p text:style-name="Horizontal_20_Line"/>
      <text:h text:style-name="Heading_20_2" text:outline-level="2"><text:span text:style-name="Strong_20_Emphasis">18.3 La ciencia como método de corrección</text:span></text:h>
      <text:p text:style-name="Text_20_body">La ciencia no es un conjunto de conocimientos.<text:line-break/>No es una colección de hechos.<text:line-break/>No es una lista de descubrimientos.</text:p>
      <text:p text:style-name="Text_20_body">La ciencia es:</text:p>
      <text:p text:style-name="Quotations"><text:span text:style-name="Strong_20_Emphasis">un método para eliminar errores y acercarse progresivamente a la verdad.</text:span></text:p>
      <text:p text:style-name="Text_20_body">Es un proceso que:</text:p>
      <text:list xml:id="list3126720267" text:style-name="L4">
        <text:list-item>
          <text:p text:style-name="P8">formula hipótesis, </text:p>
        </text:list-item>
        <text:list-item>
          <text:p text:style-name="P8">las contrasta con la realidad, </text:p>
        </text:list-item>
        <text:list-item>
          <text:p text:style-name="P8">mide resultados, </text:p>
        </text:list-item>
        <text:list-item>
          <text:p text:style-name="P8">corrige errores, </text:p>
        </text:list-item>
        <text:list-item>
          <text:p text:style-name="P7">repite el ciclo. </text:p>
        </text:list-item>
      </text:list>
      <text:p text:style-name="Text_20_body">La ciencia es la primera forma de <text:span text:style-name="Strong_20_Emphasis">inteligencia autocorrectiva</text:span>.</text:p>
      <text:p text:style-name="Horizontal_20_Line"/>
      <text:h text:style-name="Heading_20_2" text:outline-level="2"><text:span text:style-name="Strong_20_Emphasis">18.4 Cómo aparece la ciencia</text:span></text:h>
      <text:p text:style-name="Text_20_body">La ciencia surge gradualmente, a través de cuatro innovaciones:</text:p>
      <text:h text:style-name="Heading_20_3" text:outline-level="3"><text:soft-page-break/><text:span text:style-name="Strong_20_Emphasis">1. Observación sistemática</text:span></text:h>
      <text:p text:style-name="Text_20_body">Mirar el mundo con atención y registrar lo que ocurre.</text:p>
      <text:h text:style-name="Heading_20_3" text:outline-level="3"><text:span text:style-name="Strong_20_Emphasis">2. Medición</text:span></text:h>
      <text:p text:style-name="Text_20_body">Cuantificar fenómenos para compararlos objetivamente.</text:p>
      <text:h text:style-name="Heading_20_3" text:outline-level="3"><text:span text:style-name="Strong_20_Emphasis">3. Experimento</text:span></text:h>
      <text:p text:style-name="Text_20_body">Manipular variables para ver qué cambia.</text:p>
      <text:h text:style-name="Heading_20_3" text:outline-level="3"><text:span text:style-name="Strong_20_Emphasis">4. Repetición</text:span></text:h>
      <text:p text:style-name="Text_20_body">Verificar que los resultados no dependan del azar.</text:p>
      <text:p text:style-name="Text_20_body">Cuando estas cuatro prácticas se combinan, aparece algo nuevo:</text:p>
      <text:p text:style-name="Quotations"><text:span text:style-name="Strong_20_Emphasis">un método que no depende de la autoridad,<text:line-break/>sino de la realidad misma.</text:span></text:p>
      <text:p text:style-name="Horizontal_20_Line"/>
      <text:h text:style-name="Heading_20_2" text:outline-level="2"><text:span text:style-name="Strong_20_Emphasis">18.5 Qué hace realmente la ciencia</text:span></text:h>
      <text:p text:style-name="Text_20_body">La ciencia permite algo que ningún sistema anterior podía hacer:</text:p>
      <text:h text:style-name="Heading_20_3" text:outline-level="3"><text:span text:style-name="Strong_20_Emphasis">1. Corregir creencias</text:span></text:h>
      <text:p text:style-name="Text_20_body">No importa quién lo diga: importa qué ocurre.</text:p>
      <text:h text:style-name="Heading_20_3" text:outline-level="3"><text:span text:style-name="Strong_20_Emphasis">2. Predecir el futuro</text:span></text:h>
      <text:p text:style-name="Text_20_body">Modelos que anticipan resultados.</text:p>
      <text:h text:style-name="Heading_20_3" text:outline-level="3"><text:span text:style-name="Strong_20_Emphasis">3. Construir tecnología</text:span></text:h>
      <text:p text:style-name="Text_20_body">Aplicar conocimiento para transformar el mundo.</text:p>
      <text:h text:style-name="Heading_20_3" text:outline-level="3"><text:span text:style-name="Strong_20_Emphasis">4. Expandir la inteligencia</text:span></text:h>
      <text:p text:style-name="Text_20_body">Cada descubrimiento abre nuevas preguntas.</text:p>
      <text:h text:style-name="Heading_20_3" text:outline-level="3"><text:span text:style-name="Strong_20_Emphasis">5. Universalizar el conocimiento</text:span></text:h>
      <text:p text:style-name="Text_20_body">Lo que es cierto aquí, es cierto en cualquier lugar.</text:p>
      <text:p text:style-name="Text_20_body">La ciencia convierte la inteligencia colectiva en <text:span text:style-name="Strong_20_Emphasis">inteligencia verificable</text:span>.</text:p>
      <text:p text:style-name="Horizontal_20_Line"/>
      <text:h text:style-name="Heading_20_2" text:outline-level="2"><text:soft-page-break/><text:span text:style-name="Strong_20_Emphasis">18.6 La ciencia como herramienta evolutiva</text:span></text:h>
      <text:p text:style-name="Text_20_body">La ciencia no aparece para satisfacer curiosidad abstracta.<text:line-break/>Aparece porque resuelve problemas concretos:</text:p>
      <text:list xml:id="list3936844762" text:style-name="L5">
        <text:list-item>
          <text:p text:style-name="P10">mejorar la agricultura, </text:p>
        </text:list-item>
        <text:list-item>
          <text:p text:style-name="P10">curar enfermedades, </text:p>
        </text:list-item>
        <text:list-item>
          <text:p text:style-name="P10">construir herramientas, </text:p>
        </text:list-item>
        <text:list-item>
          <text:p text:style-name="P10">navegar, </text:p>
        </text:list-item>
        <text:list-item>
          <text:p text:style-name="P10">predecir fenómenos naturales, </text:p>
        </text:list-item>
        <text:list-item>
          <text:p text:style-name="P9">aumentar la supervivencia. </text:p>
        </text:list-item>
      </text:list>
      <text:p text:style-name="Text_20_body">La ciencia es una herramienta de supervivencia civilizatoria.<text:line-break/>Una herramienta extremadamente poderosa.</text:p>
      <text:p text:style-name="Horizontal_20_Line"/>
      <text:h text:style-name="Heading_20_2" text:outline-level="2"><text:span text:style-name="Strong_20_Emphasis">18.7 Qué aporta la ciencia a la historia de la inteligencia</text:span></text:h>
      <text:p text:style-name="Text_20_body">La ciencia introduce capacidades que ningún sistema anterior tenía:</text:p>
      <text:h text:style-name="Heading_20_3" text:outline-level="3"><text:span text:style-name="Strong_20_Emphasis">1. Autocorrección</text:span></text:h>
      <text:p text:style-name="Text_20_body">La inteligencia aprende de sus errores.</text:p>
      <text:h text:style-name="Heading_20_3" text:outline-level="3"><text:span text:style-name="Strong_20_Emphasis">2. Objetividad</text:span></text:h>
      <text:p text:style-name="Text_20_body">El conocimiento no depende del individuo.</text:p>
      <text:h text:style-name="Heading_20_3" text:outline-level="3"><text:span text:style-name="Strong_20_Emphasis">3. Acumulación acelerada</text:span></text:h>
      <text:p text:style-name="Text_20_body">Cada descubrimiento se suma al anterior.</text:p>
      <text:h text:style-name="Heading_20_3" text:outline-level="3"><text:span text:style-name="Strong_20_Emphasis">4. Modelos matemáticos</text:span></text:h>
      <text:p text:style-name="Text_20_body">Representaciones precisas de la realidad.</text:p>
      <text:h text:style-name="Heading_20_3" text:outline-level="3"><text:span text:style-name="Strong_20_Emphasis">5. Tecnología</text:span></text:h>
      <text:p text:style-name="Text_20_body">La inteligencia se vuelve capaz de transformar el mundo.</text:p>
      <text:p text:style-name="Text_20_body">En términos funcionales:</text:p>
      <text:p text:style-name="Quotations"><text:span text:style-name="Strong_20_Emphasis">La ciencia es la inteligencia que aprende a corregirse a sí misma.</text:span></text:p>
      <text:p text:style-name="Horizontal_20_Line"/>
      <text:h text:style-name="Heading_20_2" text:outline-level="2"><text:soft-page-break/><text:span text:style-name="Strong_20_Emphasis">18.8 La frase que resume este bloque</text:span></text:h>
      <text:p text:style-name="Quotations"><text:span text:style-name="Strong_20_Emphasis">La escritura permitió pensar más allá del tiempo.<text:line-break/>La ciencia permitió pensar más allá del error.</text:span></text:p>
      <text:p text:style-name="Text_20_body">La inteligencia, que ya había encontrado continuidad en la vida,<text:line-break/>escala en la multicelularidad,<text:line-break/>velocidad en el sistema nervioso,<text:line-break/>predicción en el cerebro,<text:line-break/>autorreferencia en la mente,<text:line-break/>experiencia en la conciencia,<text:line-break/>identidad en el yo,<text:line-break/>acumulación en la cultura,<text:line-break/>precisión en el lenguaje,<text:line-break/>permanencia en la escritura,<text:line-break/>ahora encuentra <text:span text:style-name="Strong_20_Emphasis">verificación</text:span> en la ciencia.</text:p>
      <text:p text:style-name="Text_20_body">Este es el inicio del conocimiento confiable.</text:p>
      <text:p text:style-name="Horizontal_20_Line"/>
      <text:p text:style-name="Text_20_body">Si quieres, avanzamos al siguiente bloque:<text:line-break/><text:span text:style-name="Strong_20_Emphasis">La tecnología: cuando la ciencia se convierte en capacidad para rediseñar el mundo y extender la inteligencia más allá del cuerpo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3T18:41:03.502000000</meta:creation-date>
    <dc:date>2026-06-13T18:44:57.836000000</dc:date>
    <meta:editing-duration>PT3M54S</meta:editing-duration>
    <meta:editing-cycles>1</meta:editing-cycles>
    <meta:document-statistic meta:table-count="0" meta:image-count="0" meta:object-count="0" meta:page-count="5" meta:paragraph-count="96" meta:word-count="734" meta:character-count="4789" meta:non-whitespace-character-count="4151"/>
    <meta:generator>LibreOffice/7.3.5.2$Windows_X86_64 LibreOffice_project/184fe81b8c8c30d8b5082578aee2fed2ea847c01</meta:generator>
  </office:meta>
</office:document-meta>
</file>