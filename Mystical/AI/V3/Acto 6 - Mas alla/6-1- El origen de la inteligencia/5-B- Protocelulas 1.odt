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completo sobre las protocélulas</text:span>, escrito para el libro, con la misma claridad conceptual que venimos construyendo.<text:line-break/>Este bloque es esencial porque explica <text:span text:style-name="Strong_20_Emphasis">cómo la inteligencia molecular encuentra un hogar</text:span>, cómo se encapsula, cómo se conserva y cómo prepara el camino para el ADN y la célula completa.</text:p>
      <text:p text:style-name="Horizontal_20_Line"/>
      <text:h text:style-name="Heading_20_1" text:outline-level="1"><text:span text:style-name="Strong_20_Emphasis">5. Protocélulas: cuando la inteligencia molecular encuentra un hogar</text:span></text:h>
      <text:h text:style-name="Heading_20_2" text:outline-level="2"><text:span text:style-name="Strong_20_Emphasis">5.1 Qué es una protocélula</text:span></text:h>
      <text:p text:style-name="Text_20_body">Una protocélula no es una célula.<text:line-break/>No tiene núcleo, ni orgánulos, ni maquinaria compleja.</text:p>
      <text:p text:style-name="Text_20_body">Una protocélula es simplemente:</text:p>
      <text:p text:style-name="Quotations"><text:span text:style-name="Strong_20_Emphasis">una burbuja de lípidos que encierra dentro una red química activa.</text:span></text:p>
      <text:p text:style-name="Text_20_body">Los lípidos son moléculas que, en agua, se organizan espontáneamente en:</text:p>
      <text:list xml:id="list1937025924" text:style-name="L1">
        <text:list-item>
          <text:p text:style-name="P2">micelas, </text:p>
        </text:list-item>
        <text:list-item>
          <text:p text:style-name="P2">vesículas, </text:p>
        </text:list-item>
        <text:list-item>
          <text:p text:style-name="P1">capas dobles. </text:p>
        </text:list-item>
      </text:list>
      <text:p text:style-name="Text_20_body">Esto ocurre sin vida, sin ADN, sin ARN.<text:line-break/>Es pura física:<text:line-break/>las partes hidrofóbicas se esconden dentro,<text:line-break/>las hidrofílicas quedan fuera.</text:p>
      <text:p text:style-name="Text_20_body">El resultado es una membrana.</text:p>
      <text:p text:style-name="Horizontal_20_Line"/>
      <text:h text:style-name="Heading_20_2" text:outline-level="2"><text:span text:style-name="Strong_20_Emphasis">5.2 Cómo aparece una protocélula</text:span></text:h>
      <text:p text:style-name="Text_20_body">Las protocélulas aparecen cuando:</text:p>
      <text:list xml:id="list506560348" text:style-name="L2">
        <text:list-item>
          <text:p text:style-name="P4">hay lípidos en el entorno, </text:p>
        </text:list-item>
        <text:list-item>
          <text:p text:style-name="P4">estos lípidos forman vesículas espontáneamente, </text:p>
        </text:list-item>
        <text:list-item>
          <text:p text:style-name="P3">y esas vesículas <text:span text:style-name="Strong_20_Emphasis">atrapan dentro moléculas que estaban en el medio</text:span>,<text:line-break/>entre ellas ARN. </text:p>
        </text:list-item>
      </text:list>
      <text:p text:style-name="Text_20_body">No hay intención.<text:line-break/>No hay diseño.<text:line-break/>Es estadística y química.</text:p>
      <text:h text:style-name="Heading_20_3" text:outline-level="3"><text:soft-page-break/><text:span text:style-name="Strong_20_Emphasis">¿Por qué el ARN queda atrapado?</text:span></text:h>
      <text:p text:style-name="Text_20_body">Por dos razones:</text:p>
      <text:list xml:id="list3522061861" text:style-name="L3">
        <text:list-item>
          <text:p text:style-name="P5"><text:span text:style-name="Strong_20_Emphasis">Encapsulación accidental</text:span> <text:line-break/>Si una vesícula se forma en un entorno donde hay ARN, simplemente lo encierra.</text:p>
        </text:list-item>
        <text:list-item>
          <text:p text:style-name="P5"><text:span text:style-name="Strong_20_Emphasis">Atracción electrostática</text:span> <text:line-break/>El ARN es cargado negativamente.<text:line-break/>Las membranas primitivas tenían zonas cargadas positivamente.<text:line-break/>Esto favorece que el ARN quede adherido o atrapado.</text:p>
        </text:list-item>
      </text:list>
      <text:p text:style-name="Horizontal_20_Line"/>
      <text:h text:style-name="Heading_20_2" text:outline-level="2"><text:span text:style-name="Strong_20_Emphasis">5.3 Por qué es importante que el ARN quede dentro</text:span></text:h>
      <text:p text:style-name="Text_20_body">Dentro de una membrana:</text:p>
      <text:list xml:id="list1828865511" text:style-name="L4">
        <text:list-item>
          <text:p text:style-name="P7">el ARN está protegido, </text:p>
        </text:list-item>
        <text:list-item>
          <text:p text:style-name="P7">las reacciones ocurren más concentradas, </text:p>
        </text:list-item>
        <text:list-item>
          <text:p text:style-name="P7">la red interna se vuelve más estable, </text:p>
        </text:list-item>
        <text:list-item>
          <text:p text:style-name="P6">la inteligencia molecular primitiva se vuelve más coherente. </text:p>
        </text:list-item>
      </text:list>
      <text:p text:style-name="Text_20_body">La protocélula introduce algo que no existía antes:</text:p>
      <text:p text:style-name="Quotations"><text:span text:style-name="Strong_20_Emphasis">la primera frontera entre un “adentro” y un “afuera”.</text:span></text:p>
      <text:p text:style-name="Text_20_body">Esto permite que la inteligencia molecular:</text:p>
      <text:list xml:id="list3946703092" text:style-name="L5">
        <text:list-item>
          <text:p text:style-name="P9">se organice, </text:p>
        </text:list-item>
        <text:list-item>
          <text:p text:style-name="P9">se mantenga, </text:p>
        </text:list-item>
        <text:list-item>
          <text:p text:style-name="P9">se refine, </text:p>
        </text:list-item>
        <text:list-item>
          <text:p text:style-name="P8">se vuelva autónoma. </text:p>
        </text:list-item>
      </text:list>
      <text:p text:style-name="Horizontal_20_Line"/>
      <text:h text:style-name="Heading_20_2" text:outline-level="2"><text:span text:style-name="Strong_20_Emphasis">5.4 Qué se reproduce en una protocélula</text:span></text:h>
      <text:p text:style-name="Text_20_body">Aquí está el punto clave.</text:p>
      <text:p text:style-name="Text_20_body">No se reproduce la membrana por sí sola.<text:line-break/>No se reproduce el ARN aislado.</text:p>
      <text:p text:style-name="Text_20_body">Lo que se reproduce es <text:span text:style-name="Strong_20_Emphasis">el sistema completo</text:span>:</text:p>
      <text:list xml:id="list1720835542" text:style-name="L6">
        <text:list-item>
          <text:p text:style-name="P11">la membrana, </text:p>
        </text:list-item>
        <text:list-item>
          <text:p text:style-name="P11">el ARN, </text:p>
        </text:list-item>
        <text:list-item>
          <text:p text:style-name="P11">las proteínas primitivas, </text:p>
        </text:list-item>
        <text:list-item>
          <text:p text:style-name="P10">las rutas químicas internas. </text:p>
        </text:list-item>
      </text:list>
      <text:p text:style-name="Text_20_body">Es decir:</text:p>
      <text:p text:style-name="Quotations"><text:soft-page-break/><text:span text:style-name="Strong_20_Emphasis">lo que se reproduce es la organización interna,<text:line-break/>no los componentes individuales.</text:span></text:p>
      <text:h text:style-name="Heading_20_3" text:outline-level="3"><text:span text:style-name="Strong_20_Emphasis">Cómo sucede la reproducción primitiva</text:span></text:h>
      <text:list xml:id="list1579660194" text:style-name="L7">
        <text:list-item>
          <text:p text:style-name="P13">La protocélula <text:span text:style-name="Strong_20_Emphasis">crece</text:span> al incorporar lípidos del entorno. </text:p>
        </text:list-item>
        <text:list-item>
          <text:p text:style-name="P13">Cuando es demasiado grande, <text:span text:style-name="Strong_20_Emphasis">se divide</text:span> por inestabilidad física. </text:p>
        </text:list-item>
        <text:list-item>
          <text:p text:style-name="P13">Cada protocélula hija recibe parte del ARN y de la red interna. </text:p>
        </text:list-item>
        <text:list-item>
          <text:p text:style-name="P12">El ARN y las proteínas primitivas <text:span text:style-name="Strong_20_Emphasis">reconstruyen el patrón funcional</text:span>. </text:p>
        </text:list-item>
      </text:list>
      <text:p text:style-name="Text_20_body">La membrana se divide por física.<text:line-break/>El interior se mantiene por química informada.</text:p>
      <text:p text:style-name="Horizontal_20_Line"/>
      <text:h text:style-name="Heading_20_2" text:outline-level="2"><text:span text:style-name="Strong_20_Emphasis">5.5 La protocélula como plataforma para la evolución</text:span></text:h>
      <text:p text:style-name="Text_20_body">Dentro de una protocélula:</text:p>
      <text:list xml:id="list3081474603" text:style-name="L8">
        <text:list-item>
          <text:p text:style-name="P15">las reacciones son más eficientes, </text:p>
        </text:list-item>
        <text:list-item>
          <text:p text:style-name="P15">la selección es más fuerte, </text:p>
        </text:list-item>
        <text:list-item>
          <text:p text:style-name="P15">las variaciones se conservan mejor, </text:p>
        </text:list-item>
        <text:list-item>
          <text:p text:style-name="P14">la inteligencia molecular puede crecer en complejidad. </text:p>
        </text:list-item>
      </text:list>
      <text:p text:style-name="Text_20_body">La protocélula es el primer “organismo” en sentido amplio:</text:p>
      <text:list xml:id="list2341717693" text:style-name="L9">
        <text:list-item>
          <text:p text:style-name="P17">tiene un interior, </text:p>
        </text:list-item>
        <text:list-item>
          <text:p text:style-name="P17">tiene un exterior, </text:p>
        </text:list-item>
        <text:list-item>
          <text:p text:style-name="P17">se mantiene, </text:p>
        </text:list-item>
        <text:list-item>
          <text:p text:style-name="P17">se recrea, </text:p>
        </text:list-item>
        <text:list-item>
          <text:p text:style-name="P16">evoluciona. </text:p>
        </text:list-item>
      </text:list>
      <text:p text:style-name="Text_20_body">No es vida todavía, pero es <text:span text:style-name="Strong_20_Emphasis">la arquitectura mínima para que la vida sea posible</text:span>.</text:p>
      <text:p text:style-name="Horizontal_20_Line"/>
      <text:h text:style-name="Heading_20_2" text:outline-level="2"><text:span text:style-name="Strong_20_Emphasis">5.6 El ARN dentro de protocélulas: un sistema completo</text:span></text:h>
      <text:p text:style-name="Text_20_body">El ARN dentro de una protocélula puede:</text:p>
      <text:list xml:id="list3704244549" text:style-name="L10">
        <text:list-item>
          <text:p text:style-name="P19">guardar información, </text:p>
        </text:list-item>
        <text:list-item>
          <text:p text:style-name="P19">catalizar reacciones, </text:p>
        </text:list-item>
        <text:list-item>
          <text:p text:style-name="P19">producir proteínas primitivas, </text:p>
        </text:list-item>
        <text:list-item>
          <text:p text:style-name="P19">replicarse, </text:p>
        </text:list-item>
        <text:list-item>
          <text:p text:style-name="P19">reorganizarse, </text:p>
        </text:list-item>
        <text:list-item>
          <text:p text:style-name="P18">evolucionar. </text:p>
        </text:list-item>
      </text:list>
      <text:p text:style-name="Text_20_body">Es un sistema químico que:</text:p>
      <text:list xml:id="list2377440799" text:style-name="L11">
        <text:list-item>
          <text:p text:style-name="P21"><text:soft-page-break/>tiene memoria, </text:p>
        </text:list-item>
        <text:list-item>
          <text:p text:style-name="P21">tiene acción, </text:p>
        </text:list-item>
        <text:list-item>
          <text:p text:style-name="P21">tiene regulación interna, </text:p>
        </text:list-item>
        <text:list-item>
          <text:p text:style-name="P20">tiene continuidad. </text:p>
        </text:list-item>
      </text:list>
      <text:p text:style-name="Text_20_body">La protocélula convierte la inteligencia molecular en <text:span text:style-name="Strong_20_Emphasis">una inteligencia encapsulada</text:span>,<text:line-break/>capaz de persistir y expandirse.</text:p>
      <text:p text:style-name="Horizontal_20_Line"/>
      <text:h text:style-name="Heading_20_2" text:outline-level="2"><text:span text:style-name="Strong_20_Emphasis">5.7 Por qué el ADN aparece dentro de protocélulas</text:span></text:h>
      <text:p text:style-name="Text_20_body">El ADN no puede existir solo.<text:line-break/>No cataliza reacciones.<text:line-break/>No se replica por sí mismo.<text:line-break/>No actúa.</text:p>
      <text:p text:style-name="Text_20_body">Necesita:</text:p>
      <text:list xml:id="list3156192428" text:style-name="L12">
        <text:list-item>
          <text:p text:style-name="P23">ARN que lo copie, </text:p>
        </text:list-item>
        <text:list-item>
          <text:p text:style-name="P23">proteínas que lo estabilicen, </text:p>
        </text:list-item>
        <text:list-item>
          <text:p text:style-name="P22">una membrana que lo proteja. </text:p>
        </text:list-item>
      </text:list>
      <text:p text:style-name="Text_20_body">Por eso:</text:p>
      <text:p text:style-name="Quotations"><text:span text:style-name="Strong_20_Emphasis">El ADN aparece dentro de protocélulas que ya contienen ARN y proteínas primitivas.</text:span></text:p>
      <text:p text:style-name="Text_20_body">El ADN es una mejora evolutiva del ARN:</text:p>
      <text:list xml:id="list2532702004" text:style-name="L13">
        <text:list-item>
          <text:p text:style-name="P25">más estable, </text:p>
        </text:list-item>
        <text:list-item>
          <text:p text:style-name="P25">más preciso, </text:p>
        </text:list-item>
        <text:list-item>
          <text:p text:style-name="P24">más duradero. </text:p>
        </text:list-item>
      </text:list>
      <text:p text:style-name="Text_20_body">Pero solo puede surgir en un sistema que ya tiene:</text:p>
      <text:list xml:id="list467525204" text:style-name="L14">
        <text:list-item>
          <text:p text:style-name="P27">inteligencia molecular, </text:p>
        </text:list-item>
        <text:list-item>
          <text:p text:style-name="P27">reproducción primitiva, </text:p>
        </text:list-item>
        <text:list-item>
          <text:p text:style-name="P27">evolución activa, </text:p>
        </text:list-item>
        <text:list-item>
          <text:p text:style-name="P26">un entorno protegido. </text:p>
        </text:list-item>
      </text:list>
      <text:p text:style-name="Horizontal_20_Line"/>
      <text:h text:style-name="Heading_20_2" text:outline-level="2"><text:span text:style-name="Strong_20_Emphasis">5.8 Por qué las protocélulas son un hito en la historia de la inteligencia</text:span></text:h>
      <text:p text:style-name="Text_20_body">Las protocélulas introducen:</text:p>
      <text:list xml:id="list1043236950" text:style-name="L15">
        <text:list-item>
          <text:p text:style-name="P29">un interior protegido, </text:p>
        </text:list-item>
        <text:list-item>
          <text:p text:style-name="P29">un espacio donde la información se concentra, </text:p>
        </text:list-item>
        <text:list-item>
          <text:p text:style-name="P29"><text:soft-page-break/>un entorno donde la evolución es más eficiente, </text:p>
        </text:list-item>
        <text:list-item>
          <text:p text:style-name="P28">un sistema que se recrea como unidad. </text:p>
        </text:list-item>
      </text:list>
      <text:p text:style-name="Text_20_body">Son el primer “cuerpo” de la inteligencia molecular.</text:p>
      <text:p text:style-name="Text_20_body">La inteligencia ya existía antes, en forma de auto-regulación química.<text:line-break/>Pero con las protocélulas aparece <text:span text:style-name="Strong_20_Emphasis">la primera forma de agencia física</text:span>:</text:p>
      <text:list xml:id="list2431189257" text:style-name="L16">
        <text:list-item>
          <text:p text:style-name="P31">un sistema que se mantiene, </text:p>
        </text:list-item>
        <text:list-item>
          <text:p text:style-name="P31">que se organiza, </text:p>
        </text:list-item>
        <text:list-item>
          <text:p text:style-name="P31">que se reproduce, </text:p>
        </text:list-item>
        <text:list-item>
          <text:p text:style-name="P30">que evoluciona como unidad. </text:p>
        </text:list-item>
      </text:list>
      <text:p text:style-name="Text_20_body">Las protocélulas son el puente entre:</text:p>
      <text:list xml:id="list1208313574" text:style-name="L17">
        <text:list-item>
          <text:p text:style-name="P33">la inteligencia molecular dispersa, </text:p>
        </text:list-item>
        <text:list-item>
          <text:p text:style-name="P32">y la vida organizada. </text:p>
        </text:list-item>
      </text:list>
      <text:p text:style-name="Horizontal_20_Line"/>
      <text:p text:style-name="Text_20_body">Si quieres, ahora sí podemos avanzar al siguiente bloque: <text:span text:style-name="Strong_20_Emphasis">La célula</text:span>, donde esta inteligencia encapsulada se convierte en un sistema capaz de actuar activamente para mantenerse viv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1T18:35:07.298000000</meta:creation-date>
    <dc:date>2026-06-01T18:41:16.927000000</dc:date>
    <meta:editing-duration>PT6M9S</meta:editing-duration>
    <meta:editing-cycles>1</meta:editing-cycles>
    <meta:document-statistic meta:table-count="0" meta:image-count="0" meta:object-count="0" meta:page-count="5" meta:paragraph-count="111" meta:word-count="816" meta:character-count="4923" meta:non-whitespace-character-count="4218"/>
    <meta:generator>LibreOffice/7.3.5.2$Windows_X86_64 LibreOffice_project/184fe81b8c8c30d8b5082578aee2fed2ea847c01</meta:generator>
  </office:meta>
</office:document-meta>
</file>