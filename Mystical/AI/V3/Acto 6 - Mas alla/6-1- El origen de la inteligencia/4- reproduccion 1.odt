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Vamos a construir <text:span text:style-name="Strong_20_Emphasis">Reproducción y evolución</text:span> con la misma estructura clara y accesible que venimos usando:</text:p>
      <text:list xml:id="list4267695519" text:style-name="L1">
        <text:list-item>
          <text:p text:style-name="P2">definición, </text:p>
        </text:list-item>
        <text:list-item>
          <text:p text:style-name="P2">contexto, </text:p>
        </text:list-item>
        <text:list-item>
          <text:p text:style-name="P1">por qué importa. </text:p>
        </text:list-item>
      </text:list>
      <text:p text:style-name="Text_20_body">Este es un bloque crucial porque aquí aparece, por primera vez, <text:span text:style-name="Strong_20_Emphasis">la historia</text:span>.<text:line-break/>Hasta ahora teníamos procesos que ocurren, procesos que se mantienen… pero todavía no había <text:span text:style-name="Emphasis">línea temporal</text:span>, <text:span text:style-name="Emphasis">acumulación</text:span>, <text:span text:style-name="Emphasis">mejora</text:span>.<text:line-break/>La reproducción es el punto donde la química deja de ser un conjunto de eventos y se convierte en un proceso con pasado y futuro.</text:p>
      <text:p text:style-name="Text_20_body">Aquí va el texto.</text:p>
      <text:p text:style-name="Horizontal_20_Line"/>
      <text:h text:style-name="Heading_20_1" text:outline-level="1"><text:span text:style-name="Strong_20_Emphasis">4. Reproducción y evolución</text:span></text:h>
      <text:h text:style-name="Heading_20_2" text:outline-level="2"><text:span text:style-name="Strong_20_Emphasis">4.1 Definición clara (para cualquier lector)</text:span></text:h>
      <text:h text:style-name="Heading_20_3" text:outline-level="3"><text:span text:style-name="Strong_20_Emphasis">¿Qué es reproducirse?</text:span></text:h>
      <text:p text:style-name="Text_20_body">Reproducirse significa:</text:p>
      <text:p text:style-name="Quotations"><text:span text:style-name="Strong_20_Emphasis">hacer una copia de uno mismo.</text:span></text:p>
      <text:p text:style-name="Text_20_body">Eso es todo.<text:line-break/>Una copia que se parece al original.</text:p>
      <text:p text:style-name="Text_20_body">Ejemplos cotidianos:</text:p>
      <text:list xml:id="list817834169" text:style-name="L2">
        <text:list-item>
          <text:p text:style-name="P4">una fotocopiadora hace copias de un documento, </text:p>
        </text:list-item>
        <text:list-item>
          <text:p text:style-name="P4">un molde hace copias de una figura, </text:p>
        </text:list-item>
        <text:list-item>
          <text:p text:style-name="P3">una receta permite repetir un plato. </text:p>
        </text:list-item>
      </text:list>
      <text:p text:style-name="Text_20_body">En biología, reproducirse es lo mismo:<text:line-break/>un sistema crea otro sistema parecido.</text:p>
      <text:h text:style-name="Heading_20_3" text:outline-level="3"><text:span text:style-name="Strong_20_Emphasis">¿Qué es evolucionar?</text:span></text:h>
      <text:p text:style-name="Text_20_body">Evolucionar significa:</text:p>
      <text:p text:style-name="Quotations"><text:span text:style-name="Strong_20_Emphasis">que las copias no son perfectas,<text:line-break/>y algunas funcionan mejor que otras.</text:span></text:p>
      <text:p text:style-name="Text_20_body">Si una copia funciona mejor:</text:p>
      <text:list xml:id="list1043105063" text:style-name="L3">
        <text:list-item>
          <text:p text:style-name="P6"><text:soft-page-break/>dura más, </text:p>
        </text:list-item>
        <text:list-item>
          <text:p text:style-name="P6">se mantiene mejor, </text:p>
        </text:list-item>
        <text:list-item>
          <text:p text:style-name="P5">se reproduce más. </text:p>
        </text:list-item>
      </text:list>
      <text:p text:style-name="Text_20_body">Y entonces sus características se vuelven más comunes.</text:p>
      <text:p text:style-name="Text_20_body">Esto es evolución.</text:p>
      <text:p text:style-name="Text_20_body">No requiere intención.<text:line-break/>No requiere inteligencia.<text:line-break/>No requiere vida compleja.</text:p>
      <text:p text:style-name="Text_20_body">Solo requiere:</text:p>
      <text:list xml:id="list599039711" text:style-name="L4">
        <text:list-item>
          <text:p text:style-name="P8">copias, </text:p>
        </text:list-item>
        <text:list-item>
          <text:p text:style-name="P8">variaciones, </text:p>
        </text:list-item>
        <text:list-item>
          <text:p text:style-name="P7">y selección. </text:p>
        </text:list-item>
      </text:list>
      <text:p text:style-name="Horizontal_20_Line"/>
      <text:h text:style-name="Heading_20_2" text:outline-level="2"><text:span text:style-name="Strong_20_Emphasis">4.2 Contexto: el universo antes de la reproducción</text:span></text:h>
      <text:p text:style-name="Text_20_body">Antes de que existiera la reproducción, el universo era un lugar lleno de reacciones químicas, pero sin historia.</text:p>
      <text:p text:style-name="Text_20_body">Todo ocurría así:</text:p>
      <text:list xml:id="list3242746098" text:style-name="L5">
        <text:list-item>
          <text:p text:style-name="P10">una reacción pasaba, </text:p>
        </text:list-item>
        <text:list-item>
          <text:p text:style-name="P10">terminaba, </text:p>
        </text:list-item>
        <text:list-item>
          <text:p text:style-name="P10">desaparecía, </text:p>
        </text:list-item>
        <text:list-item>
          <text:p text:style-name="P9">y no dejaba nada detrás. </text:p>
        </text:list-item>
      </text:list>
      <text:p text:style-name="Text_20_body">Incluso las redes autocatalíticas, aunque se mantenían, <text:span text:style-name="Strong_20_Emphasis">no se copiaban</text:span>.<text:line-break/>No había “descendencia”.<text:line-break/>No había “generaciones”.<text:line-break/>No había “líneas”.</text:p>
      <text:p text:style-name="Text_20_body">Era un universo sin acumulación.</text:p>
      <text:p text:style-name="Text_20_body">Nada podía mejorar porque nada podía conservarse.</text:p>
      <text:p text:style-name="Horizontal_20_Line"/>
      <text:h text:style-name="Heading_20_2" text:outline-level="2"><text:span text:style-name="Strong_20_Emphasis">4.3 Qué cambia cuando aparece la reproducción</text:span></text:h>
      <text:p text:style-name="Text_20_body">La aparición de la reproducción es uno de los mayores saltos en la historia del universo.</text:p>
      <text:p text:style-name="Text_20_body">Cuando un sistema puede hacer una copia de sí mismo:</text:p>
      <text:list xml:id="list1932925412" text:style-name="L6">
        <text:list-item>
          <text:p text:style-name="P12">aparece la continuidad, </text:p>
        </text:list-item>
        <text:list-item>
          <text:p text:style-name="P12">aparece la herencia, </text:p>
        </text:list-item>
        <text:list-item>
          <text:p text:style-name="P12"><text:soft-page-break/>aparece la variación, </text:p>
        </text:list-item>
        <text:list-item>
          <text:p text:style-name="P12">aparece la competencia, </text:p>
        </text:list-item>
        <text:list-item>
          <text:p text:style-name="P12">aparece la selección, </text:p>
        </text:list-item>
        <text:list-item>
          <text:p text:style-name="P11">aparece la mejora. </text:p>
        </text:list-item>
      </text:list>
      <text:p text:style-name="Text_20_body">Por primera vez, un proceso químico deja de ser un evento aislado y se convierte en <text:span text:style-name="Strong_20_Emphasis">una línea temporal</text:span>.</text:p>
      <text:p text:style-name="Text_20_body">La reproducción crea:</text:p>
      <text:list xml:id="list3949193272" text:style-name="L7">
        <text:list-item>
          <text:p text:style-name="P14">pasado, </text:p>
        </text:list-item>
        <text:list-item>
          <text:p text:style-name="P14">presente, </text:p>
        </text:list-item>
        <text:list-item>
          <text:p text:style-name="P13">futuro. </text:p>
        </text:list-item>
      </text:list>
      <text:p text:style-name="Text_20_body">Crea historia.</text:p>
      <text:p text:style-name="Horizontal_20_Line"/>
      <text:h text:style-name="Heading_20_2" text:outline-level="2"><text:span text:style-name="Strong_20_Emphasis">4.4 La evolución: mejora sin inteligencia</text:span></text:h>
      <text:p text:style-name="Text_20_body">La evolución no piensa.<text:line-break/>No decide.<text:line-break/>No tiene propósito.</text:p>
      <text:p text:style-name="Text_20_body">Pero funciona como un filtro:</text:p>
      <text:list xml:id="list2602380770" text:style-name="L8">
        <text:list-item>
          <text:p text:style-name="P16">las copias que funcionan mejor se multiplican, </text:p>
        </text:list-item>
        <text:list-item>
          <text:p text:style-name="P15">las que funcionan peor desaparecen. </text:p>
        </text:list-item>
      </text:list>
      <text:p text:style-name="Text_20_body">Con el tiempo, esto produce estructuras cada vez más eficientes.</text:p>
      <text:p text:style-name="Text_20_body">Es un proceso ciego, pero poderoso.</text:p>
      <text:p text:style-name="Text_20_body">La evolución es el primer mecanismo del universo capaz de:</text:p>
      <text:list xml:id="list4182696807" text:style-name="L9">
        <text:list-item>
          <text:p text:style-name="P18">acumular información, </text:p>
        </text:list-item>
        <text:list-item>
          <text:p text:style-name="P18">mejorar soluciones, </text:p>
        </text:list-item>
        <text:list-item>
          <text:p text:style-name="P18">explorar posibilidades, </text:p>
        </text:list-item>
        <text:list-item>
          <text:p text:style-name="P17">optimizar estructuras. </text:p>
        </text:list-item>
      </text:list>
      <text:p text:style-name="Text_20_body">Y todo esto ocurre sin ninguna inteligencia.</text:p>
      <text:p text:style-name="Text_20_body">Pero prepara el terreno para ella.</text:p>
      <text:p text:style-name="Horizontal_20_Line"/>
      <text:h text:style-name="Heading_20_2" text:outline-level="2"><text:span text:style-name="Strong_20_Emphasis">4.5 Por qué importa para la historia de la inteligencia</text:span></text:h>
      <text:p text:style-name="Text_20_body">Porque aquí aparece algo que la materia reactiva y las redes autocatalíticas no tenían:</text:p>
      <text:p text:style-name="Quotations"><text:span text:style-name="Strong_20_Emphasis">la capacidad de conservar información y mejorarla con el tiempo.</text:span></text:p>
      <text:p text:style-name="Text_20_body"><text:soft-page-break/>La inteligencia necesita:</text:p>
      <text:list xml:id="list1879058302" text:style-name="L10">
        <text:list-item>
          <text:p text:style-name="P20">memoria, </text:p>
        </text:list-item>
        <text:list-item>
          <text:p text:style-name="P20">continuidad, </text:p>
        </text:list-item>
        <text:list-item>
          <text:p text:style-name="P20">selección, </text:p>
        </text:list-item>
        <text:list-item>
          <text:p text:style-name="P19">mejora. </text:p>
        </text:list-item>
      </text:list>
      <text:p text:style-name="Text_20_body">La reproducción y la evolución son los primeros procesos que permiten que la información:</text:p>
      <text:list xml:id="list2269801757" text:style-name="L11">
        <text:list-item>
          <text:p text:style-name="P22">se mantenga, </text:p>
        </text:list-item>
        <text:list-item>
          <text:p text:style-name="P22">se copie, </text:p>
        </text:list-item>
        <text:list-item>
          <text:p text:style-name="P22">se modifique, </text:p>
        </text:list-item>
        <text:list-item>
          <text:p text:style-name="P21">se refine. </text:p>
        </text:list-item>
      </text:list>
      <text:p text:style-name="Text_20_body">Sin reproducción no hay evolución.<text:line-break/>Sin evolución no hay ADN.<text:line-break/>Sin ADN no hay células.<text:line-break/>Sin células no hay cerebros.<text:line-break/>Sin cerebros no hay experiencia subjetiva.</text:p>
      <text:p text:style-name="Text_20_body">La reproducción es el puente entre la química y la vida.<text:line-break/>La evolución es el puente entre la vida y la inteligencia.</text:p>
      <text:p text:style-name="Horizontal_20_Line"/>
      <text:p text:style-name="Text_20_body">Si quieres, avanzamos ahora al siguiente bloque: <text:span text:style-name="Strong_20_Emphasis">El ARN</text:span>, donde aparece la primera molécula capaz de almacenar información, copiarse y actuar al mismo tiemp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1T15:07:06.874000000</meta:creation-date>
    <dc:date>2026-05-31T15:20:24.358000000</dc:date>
    <meta:editing-duration>PT3M7S</meta:editing-duration>
    <meta:editing-cycles>1</meta:editing-cycles>
    <meta:document-statistic meta:table-count="0" meta:image-count="0" meta:object-count="0" meta:page-count="4" meta:paragraph-count="86" meta:word-count="606" meta:character-count="3664" meta:non-whitespace-character-count="3144"/>
    <meta:generator>LibreOffice/7.3.5.2$Windows_X86_64 LibreOffice_project/184fe81b8c8c30d8b5082578aee2fed2ea847c01</meta:generator>
  </office:meta>
</office:document-meta>
</file>