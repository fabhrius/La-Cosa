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el apartado que abre el capítulo: <text:span text:style-name="Strong_20_Emphasis">“Procesos lógicos: la estructura fundamental del universo”</text:span>.<text:line-break/>Lo he escrito con el tono conceptual, elegante y narrativo que estás buscando, y con la profundidad filosófica que este punto merece.</text:p>
      <text:p text:style-name="Text_20_body">Este texto está pensado para ser el <text:span text:style-name="Strong_20_Emphasis">primer bloque del capítulo</text:span>, antes de “materia reactiva”.</text:p>
      <text:p text:style-name="Horizontal_20_Line"/>
      <text:h text:style-name="Heading_20_1" text:outline-level="1"><text:span text:style-name="Strong_20_Emphasis">Procesos lógicos: la estructura fundamental del universo</text:span></text:h>
      <text:p text:style-name="Text_20_body">Antes de que existiera la vida, antes del ADN, antes incluso de la primera célula, ya existía algo más profundo y más antiguo: <text:span text:style-name="Strong_20_Emphasis">la lógica</text:span>.<text:line-break/>No la lógica humana, ni la lógica matemática, sino la lógica que estructura el comportamiento de la materia desde el origen del tiempo.</text:p>
      <text:p text:style-name="Text_20_body">El universo no empieza con inteligencia, pero sí empieza con <text:span text:style-name="Strong_20_Emphasis">procesos lógicos</text:span>.</text:p>
      <text:p text:style-name="Text_20_body">Un proceso lógico es, en esencia:</text:p>
      <text:list xml:id="list650989612" text:style-name="L1">
        <text:list-item>
          <text:p text:style-name="P2">un conjunto de estados posibles, </text:p>
        </text:list-item>
        <text:list-item>
          <text:p text:style-name="P2">reglas que determinan cómo un estado se transforma en otro, </text:p>
        </text:list-item>
        <text:list-item>
          <text:p text:style-name="P1">y una secuencia de transiciones que sigue esas reglas. </text:p>
        </text:list-item>
      </text:list>
      <text:p text:style-name="Text_20_body">No requiere intención.<text:line-break/>No requiere memoria.<text:line-break/>No requiere propósito.<text:line-break/>Solo requiere <text:span text:style-name="Strong_20_Emphasis">estructura</text:span>.</text:p>
      <text:p text:style-name="Text_20_body">Cada reacción química, cada interacción entre partículas, cada transición energética es un proceso lógico:<text:line-break/>un cambio gobernado por reglas internas, no por azar absoluto.</text:p>
      <text:p text:style-name="Text_20_body">La lógica es, por tanto, la primera forma de orden del universo.<text:line-break/>Pero es un orden sin dirección, sin voluntad, sin continuidad.<text:line-break/>Un orden que simplemente ocurre.</text:p>
      <text:h text:style-name="Heading_20_2" text:outline-level="2"><text:span text:style-name="Strong_20_Emphasis">1. La lógica como tejido del cosmos</text:span></text:h>
      <text:p text:style-name="Text_20_body">Desde el primer instante del universo, la materia se comporta de acuerdo con leyes que no elige.<text:line-break/>Cada partícula sigue trayectorias determinadas por su energía, su masa, su entorno.<text:line-break/>Cada interacción es una transición de estado.</text:p>
      <text:p text:style-name="Text_20_body">En este nivel, la lógica es:</text:p>
      <text:list xml:id="list3074438488" text:style-name="L2">
        <text:list-item>
          <text:p text:style-name="P4"><text:soft-page-break/>universal, </text:p>
        </text:list-item>
        <text:list-item>
          <text:p text:style-name="P4">indiferente, </text:p>
        </text:list-item>
        <text:list-item>
          <text:p text:style-name="P3">automática. </text:p>
        </text:list-item>
      </text:list>
      <text:p text:style-name="Text_20_body">Es la gramática básica de la existencia.</text:p>
      <text:p text:style-name="Text_20_body">Pero aunque esta lógica gobierna todo, <text:span text:style-name="Strong_20_Emphasis">no es inteligencia</text:span>.<text:line-break/>Porque la inteligencia requiere algo que aquí no existe:<text:line-break/>la capacidad de conservar información y usarla para influir en el futuro.</text:p>
      <text:h text:style-name="Heading_20_2" text:outline-level="2"><text:span text:style-name="Strong_20_Emphasis">2. Lógica sin memoria</text:span></text:h>
      <text:p text:style-name="Text_20_body">Un proceso lógico primitivo —como una reacción química aislada— no recuerda nada.<text:line-break/>No acumula nada.<text:line-break/>No aprende nada.</text:p>
      <text:p text:style-name="Text_20_body">El estado final no contiene ninguna huella del camino recorrido.<text:line-break/>No hay historia.<text:line-break/>No hay continuidad.</text:p>
      <text:p text:style-name="Text_20_body">Cada evento es un comienzo y un final.<text:line-break/>Un universo de instantes desconectados.</text:p>
      <text:p text:style-name="Text_20_body">La lógica existe, pero no se sostiene a sí misma.</text:p>
      <text:h text:style-name="Heading_20_2" text:outline-level="2"><text:span text:style-name="Strong_20_Emphasis">3. Lógica sin interior</text:span></text:h>
      <text:p text:style-name="Text_20_body">En este nivel, no existe la noción de “sí mismo”.<text:line-break/>No hay sistemas que se distingan del entorno.<text:line-break/>No hay fronteras, no hay identidad, no hay persistencia.</text:p>
      <text:p text:style-name="Text_20_body">La lógica opera, pero no se organiza.<text:line-break/>No se protege.<text:line-break/>No se reproduce.</text:p>
      <text:p text:style-name="Text_20_body">Es un mundo sin agentes, sin estructuras que luchen por existir.</text:p>
      <text:h text:style-name="Heading_20_2" text:outline-level="2"><text:span text:style-name="Strong_20_Emphasis">4. La semilla de la inteligencia</text:span></text:h>
      <text:p text:style-name="Text_20_body">Y sin embargo, aquí está la semilla de todo lo que vendrá después.</text:p>
      <text:p text:style-name="Text_20_body">Porque la inteligencia —en su forma más profunda— no es una sustancia, ni una propiedad mágica, ni un privilegio humano.<text:line-break/>Es una <text:span text:style-name="Strong_20_Emphasis">organización de procesos lógicos</text:span> que adquiere:</text:p>
      <text:list xml:id="list3516229388" text:style-name="L3">
        <text:list-item>
          <text:p text:style-name="P6">memoria, </text:p>
        </text:list-item>
        <text:list-item>
          <text:p text:style-name="P6">continuidad, </text:p>
        </text:list-item>
        <text:list-item>
          <text:p text:style-name="P6">capacidad de mantener su forma, </text:p>
        </text:list-item>
        <text:list-item>
          <text:p text:style-name="P5"><text:soft-page-break/>capacidad de dirigir su propia evolución. </text:p>
        </text:list-item>
      </text:list>
      <text:p text:style-name="Text_20_body">La inteligencia no aparece contra la lógica, sino <text:span text:style-name="Strong_20_Emphasis">a partir de ella</text:span>.<text:line-break/>Es la lógica que aprende a conservarse.<text:line-break/>La lógica que aprende a copiarse.<text:line-break/>La lógica que aprende a actuar.</text:p>
      <text:p text:style-name="Text_20_body">Pero en este primer nivel, nada de eso existe todavía.</text:p>
      <text:p text:style-name="Text_20_body">Aquí solo hay procesos lógicos desnudos:<text:line-break/>transiciones sin historia, sin propósito, sin dirección.</text:p>
      <text:p text:style-name="Text_20_body">Es el suelo sobre el que se construirá todo lo demás.</text:p>
      <text:h text:style-name="Heading_20_2" text:outline-level="2"><text:span text:style-name="Strong_20_Emphasis">5. El punto de partida</text:span></text:h>
      <text:p text:style-name="Text_20_body">Este apartado establece el origen conceptual del capítulo:<text:line-break/>la inteligencia no surge de la nada, sino de una larga cadena de transformaciones que empiezan aquí, en la lógica más simple.</text:p>
      <text:p text:style-name="Text_20_body">A partir de este punto, la historia de la inteligencia será la historia de cómo estos procesos lógicos:</text:p>
      <text:list xml:id="list1366106679" text:style-name="L4">
        <text:list-item>
          <text:p text:style-name="P8">adquieren memoria, </text:p>
        </text:list-item>
        <text:list-item>
          <text:p text:style-name="P8">se organizan, </text:p>
        </text:list-item>
        <text:list-item>
          <text:p text:style-name="P8">se mantienen, </text:p>
        </text:list-item>
        <text:list-item>
          <text:p text:style-name="P8">se reproducen, </text:p>
        </text:list-item>
        <text:list-item>
          <text:p text:style-name="P8">se estabilizan, </text:p>
        </text:list-item>
        <text:list-item>
          <text:p text:style-name="P8">se vuelven agentes, </text:p>
        </text:list-item>
        <text:list-item>
          <text:p text:style-name="P7">y finalmente generan experiencia subjetiva. </text:p>
        </text:list-item>
      </text:list>
      <text:p text:style-name="Text_20_body">Pero todo empieza aquí, en la lógica sin intención.</text:p>
      <text:p text:style-name="Text_20_body">En el universo antes de la vida.</text:p>
      <text:p text:style-name="Horizontal_20_Line"/>
      <text:p text:style-name="Text_20_body">Si quieres, continuamos con el siguiente apartado: <text:span text:style-name="Strong_20_Emphasis">Materia reactiva</text:span>. ¿Avanzamo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30T19:09:49.108000000</meta:creation-date>
    <dc:date>2026-05-30T19:16:12.013000000</dc:date>
    <meta:editing-duration>PT6M23S</meta:editing-duration>
    <meta:editing-cycles>1</meta:editing-cycles>
    <meta:document-statistic meta:table-count="0" meta:image-count="0" meta:object-count="0" meta:page-count="3" meta:paragraph-count="53" meta:word-count="658" meta:character-count="3956" meta:non-whitespace-character-count="3351"/>
    <meta:generator>LibreOffice/7.3.5.2$Windows_X86_64 LibreOffice_project/184fe81b8c8c30d8b5082578aee2fed2ea847c01</meta:generator>
  </office:meta>
</office:document-meta>
</file>