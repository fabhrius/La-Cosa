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Este es el momento ideal para <text:span text:style-name="Strong_20_Emphasis">detener la narrativa evolutiva</text:span>, mirar lo que ya construimos y explicar con precisión <text:span text:style-name="Strong_20_Emphasis">cuándo aparece la vida</text:span>, <text:span text:style-name="Strong_20_Emphasis">cuándo aparece la inteligencia</text:span>, y <text:span text:style-name="Strong_20_Emphasis">cómo se relacionan</text:span>.<text:line-break/>Este bloque será uno de los más importantes del libro, porque da al lector el marco conceptual que unifica todo lo anterior y prepara todo lo que viene después.</text:p>
      <text:p text:style-name="Text_20_body">Aquí tienes el texto, escrito para el libro, claro, elegante y profundo.</text:p>
      <text:p text:style-name="Horizontal_20_Line"/>
      <text:h text:style-name="Heading_20_1" text:outline-level="1"><text:span text:style-name="Strong_20_Emphasis">7. Vida e inteligencia: cuándo aparecen y cómo se relacionan</text:span></text:h>
      <text:h text:style-name="Heading_20_2" text:outline-level="2"><text:span text:style-name="Strong_20_Emphasis">7.1 La pregunta fundamental</text:span></text:h>
      <text:p text:style-name="Text_20_body">A medida que seguimos la historia del universo —desde la química simple hasta la primera célula— surge una cuestión inevitable:</text:p>
      <text:p text:style-name="Quotations"><text:span text:style-name="Strong_20_Emphasis">¿En qué momento aparece la vida?<text:line-break/>¿Y en qué momento aparece la inteligencia?</text:span></text:p>
      <text:p text:style-name="Text_20_body">La biología clásica responde que la vida empieza con la primera célula.<text:line-break/>Pero esta respuesta deja un vacío:<text:line-break/>¿cómo se pasa de química a vida sin un salto mágico?</text:p>
      <text:p text:style-name="Text_20_body">Para llenar ese vacío, necesitamos una definición más profunda, basada en procesos, no en estructuras.</text:p>
      <text:p text:style-name="Horizontal_20_Line"/>
      <text:h text:style-name="Heading_20_2" text:outline-level="2"><text:span text:style-name="Strong_20_Emphasis">7.2 Qué entendemos por “vida”</text:span></text:h>
      <text:p text:style-name="Text_20_body">En este libro, la vida no se define por tener:</text:p>
      <text:list xml:id="list3103577823" text:style-name="L1">
        <text:list-item>
          <text:p text:style-name="P2">ADN, </text:p>
        </text:list-item>
        <text:list-item>
          <text:p text:style-name="P2">proteínas, </text:p>
        </text:list-item>
        <text:list-item>
          <text:p text:style-name="P2">membranas, </text:p>
        </text:list-item>
        <text:list-item>
          <text:p text:style-name="P2">metabolismo, </text:p>
        </text:list-item>
        <text:list-item>
          <text:p text:style-name="P1">o células. </text:p>
        </text:list-item>
      </text:list>
      <text:p text:style-name="Text_20_body">Todo eso son <text:span text:style-name="Strong_20_Emphasis">formas avanzadas</text:span> de vida, no su esencia.</text:p>
      <text:p text:style-name="Text_20_body">La vida, en su definición más general, es:</text:p>
      <text:p text:style-name="Quotations"><text:span text:style-name="Strong_20_Emphasis">un proceso capaz de mantenerse, recrearse y evolucionar usando información interna.</text:span></text:p>
      <text:p text:style-name="Text_20_body">Esta definición no depende de células, ni de ADN, ni de organismos.<text:line-break/>Depende de <text:span text:style-name="Strong_20_Emphasis">dinámica</text:span>, no de anatomía.</text:p>
      <text:p text:style-name="Text_20_body"><text:soft-page-break/>Con esta definición, la vida no aparece de golpe con la célula.<text:line-break/>Empieza antes.</text:p>
      <text:p text:style-name="Horizontal_20_Line"/>
      <text:h text:style-name="Heading_20_2" text:outline-level="2"><text:span text:style-name="Strong_20_Emphasis">7.3 Qué entendemos por “inteligencia”</text:span></text:h>
      <text:p text:style-name="Text_20_body">La inteligencia tampoco se define aquí como:</text:p>
      <text:list xml:id="list2924869622" text:style-name="L2">
        <text:list-item>
          <text:p text:style-name="P4">pensamiento, </text:p>
        </text:list-item>
        <text:list-item>
          <text:p text:style-name="P4">conciencia, </text:p>
        </text:list-item>
        <text:list-item>
          <text:p text:style-name="P4">razonamiento, </text:p>
        </text:list-item>
        <text:list-item>
          <text:p text:style-name="P3">planificación. </text:p>
        </text:list-item>
      </text:list>
      <text:p text:style-name="Text_20_body">Todo eso son formas avanzadas de inteligencia.</text:p>
      <text:p text:style-name="Text_20_body">La inteligencia, en su forma más elemental, es:</text:p>
      <text:p text:style-name="Quotations"><text:span text:style-name="Strong_20_Emphasis">la capacidad de un sistema de modificar su comportamiento<text:line-break/>en función de su estado interno y de la información que recibe.</text:span></text:p>
      <text:p text:style-name="Text_20_body">Es decir:</text:p>
      <text:list xml:id="list475316852" text:style-name="L3">
        <text:list-item>
          <text:p text:style-name="P6">regulación, </text:p>
        </text:list-item>
        <text:list-item>
          <text:p text:style-name="P6">ajuste, </text:p>
        </text:list-item>
        <text:list-item>
          <text:p text:style-name="P6">selección de rutas, </text:p>
        </text:list-item>
        <text:list-item>
          <text:p text:style-name="P5">mantenimiento activo. </text:p>
        </text:list-item>
      </text:list>
      <text:p text:style-name="Text_20_body">La inteligencia es la dinámica que permite que la vida exista.</text:p>
      <text:p text:style-name="Horizontal_20_Line"/>
      <text:h text:style-name="Heading_20_2" text:outline-level="2"><text:span text:style-name="Strong_20_Emphasis">7.4 Cuándo aparece la inteligencia</text:span></text:h>
      <text:p text:style-name="Text_20_body">La inteligencia aparece <text:span text:style-name="Strong_20_Emphasis">antes que la vida estructurada</text:span>,<text:line-break/>en un momento muy preciso:</text:p>
      <text:h text:style-name="Heading_20_3" text:outline-level="3">**cuando una red química compleja desarrolla un estado interno</text:h>
      <text:p text:style-name="Text_20_body">que regula su propio comportamiento.**</text:p>
      <text:p text:style-name="Text_20_body">Esto ocurre en las <text:span text:style-name="Strong_20_Emphasis">redes autocatalíticas complejas</text:span>, cuando:</text:p>
      <text:list xml:id="list229240533" text:style-name="L4">
        <text:list-item>
          <text:p text:style-name="P8">existen múltiples rutas posibles, </text:p>
        </text:list-item>
        <text:list-item>
          <text:p text:style-name="P8">el estado interno determina cuál se activa, </text:p>
        </text:list-item>
        <text:list-item>
          <text:p text:style-name="P7">el sistema se reorganiza para mantenerse. </text:p>
        </text:list-item>
      </text:list>
      <text:p text:style-name="Text_20_body">Aquí aparece la primera forma de:</text:p>
      <text:list xml:id="list1792926975" text:style-name="L5">
        <text:list-item>
          <text:p text:style-name="P10">decisión química, </text:p>
        </text:list-item>
        <text:list-item>
          <text:p text:style-name="P10">regulación interna, </text:p>
        </text:list-item>
        <text:list-item>
          <text:p text:style-name="P10"><text:soft-page-break/>auto-mantenimiento, </text:p>
        </text:list-item>
        <text:list-item>
          <text:p text:style-name="P9">continuidad dinámica. </text:p>
        </text:list-item>
      </text:list>
      <text:p text:style-name="Text_20_body">Aquí nace la inteligencia primitiva.</text:p>
      <text:p text:style-name="Horizontal_20_Line"/>
      <text:h text:style-name="Heading_20_2" text:outline-level="2"><text:span text:style-name="Strong_20_Emphasis">7.5 Cuándo aparece la vida</text:span></text:h>
      <text:p text:style-name="Text_20_body">Si la vida es un proceso que:</text:p>
      <text:list xml:id="list1232138653" text:style-name="L6">
        <text:list-item>
          <text:p text:style-name="P12">se mantiene, </text:p>
        </text:list-item>
        <text:list-item>
          <text:p text:style-name="P12">se recrea, </text:p>
        </text:list-item>
        <text:list-item>
          <text:p text:style-name="P12">evoluciona, </text:p>
        </text:list-item>
        <text:list-item>
          <text:p text:style-name="P11">usa información interna, </text:p>
        </text:list-item>
      </text:list>
      <text:p text:style-name="Text_20_body">entonces la vida aparece <text:span text:style-name="Strong_20_Emphasis">cuando la inteligencia primitiva se vuelve estable y heredable</text:span>.</text:p>
      <text:p text:style-name="Text_20_body">Esto ocurre cuando:</text:p>
      <text:list xml:id="list2381240045" text:style-name="L7">
        <text:list-item>
          <text:p text:style-name="P14">las redes autocatalíticas complejas se reproducen, </text:p>
        </text:list-item>
        <text:list-item>
          <text:p text:style-name="P14">la evolución empieza a refinar sus patrones, </text:p>
        </text:list-item>
        <text:list-item>
          <text:p text:style-name="P14">el ARN aparece como memoria activa, </text:p>
        </text:list-item>
        <text:list-item>
          <text:p text:style-name="P13">las protocélulas encapsulan y protegen el sistema. </text:p>
        </text:list-item>
      </text:list>
      <text:p text:style-name="Text_20_body">En ese punto, ya existe:</text:p>
      <text:list xml:id="list769285498" text:style-name="L8">
        <text:list-item>
          <text:p text:style-name="P16">continuidad, </text:p>
        </text:list-item>
        <text:list-item>
          <text:p text:style-name="P16">herencia, </text:p>
        </text:list-item>
        <text:list-item>
          <text:p text:style-name="P16">variación, </text:p>
        </text:list-item>
        <text:list-item>
          <text:p text:style-name="P16">selección, </text:p>
        </text:list-item>
        <text:list-item>
          <text:p text:style-name="P15">regulación interna. </text:p>
        </text:list-item>
      </text:list>
      <text:p text:style-name="Text_20_body">Eso ya es vida, aunque todavía no haya células completas.</text:p>
      <text:p text:style-name="Horizontal_20_Line"/>
      <text:h text:style-name="Heading_20_2" text:outline-level="2"><text:span text:style-name="Strong_20_Emphasis">7.6 Qué aporta la célula entonces</text:span></text:h>
      <text:p text:style-name="Text_20_body">La célula no es el origen de la vida.<text:line-break/>Es el origen de <text:span text:style-name="Strong_20_Emphasis">la vida organizada en un cuerpo estable</text:span>.</text:p>
      <text:p text:style-name="Text_20_body">La célula introduce:</text:p>
      <text:list xml:id="list1403889751" text:style-name="L9">
        <text:list-item>
          <text:p text:style-name="P18">una membrana regulada, </text:p>
        </text:list-item>
        <text:list-item>
          <text:p text:style-name="P18">un metabolismo integrado, </text:p>
        </text:list-item>
        <text:list-item>
          <text:p text:style-name="P18">ADN como memoria profunda, </text:p>
        </text:list-item>
        <text:list-item>
          <text:p text:style-name="P18">reproducción controlada, </text:p>
        </text:list-item>
        <text:list-item>
          <text:p text:style-name="P17">agencia clara. </text:p>
        </text:list-item>
      </text:list>
      <text:p text:style-name="Text_20_body"><text:soft-page-break/>La célula es la primera forma <text:span text:style-name="Strong_20_Emphasis">robusta</text:span> de vida,<text:line-break/>pero no la primera forma <text:span text:style-name="Strong_20_Emphasis">real</text:span> de vida.</text:p>
      <text:p text:style-name="Text_20_body">La vida ya existía antes, como proceso.<text:line-break/>La célula es su primera arquitectura madura.</text:p>
      <text:p text:style-name="Horizontal_20_Line"/>
      <text:h text:style-name="Heading_20_2" text:outline-level="2"><text:span text:style-name="Strong_20_Emphasis">7.7 La relación entre vida e inteligencia</text:span></text:h>
      <text:p text:style-name="Text_20_body">Aquí está la idea central:</text:p>
      <text:p text:style-name="Quotations"><text:span text:style-name="Strong_20_Emphasis">La vida es inteligencia organizada en materia.<text:line-break/>La inteligencia es la dinámica activa de la vida.</text:span></text:p>
      <text:p text:style-name="Text_20_body">No son dos fenómenos separados.<text:line-break/>Son dos descripciones del mismo proceso:</text:p>
      <text:list xml:id="list2137475910" text:style-name="L10">
        <text:list-item>
          <text:p text:style-name="P20"><text:span text:style-name="Strong_20_Emphasis">Vida</text:span> describe la <text:span text:style-name="Emphasis">estructura</text:span> que se conserva. </text:p>
        </text:list-item>
        <text:list-item>
          <text:p text:style-name="P19"><text:span text:style-name="Strong_20_Emphasis">Inteligencia</text:span> describe la <text:span text:style-name="Emphasis">dinámica</text:span> que la conserva. </text:p>
        </text:list-item>
      </text:list>
      <text:p text:style-name="Text_20_body">No hay vida sin inteligencia.<text:line-break/>No hay inteligencia sin vida.</text:p>
      <text:p text:style-name="Text_20_body">Son inseparables.</text:p>
      <text:p text:style-name="Horizontal_20_Line"/>
      <text:h text:style-name="Heading_20_2" text:outline-level="2"><text:span text:style-name="Strong_20_Emphasis">7.8 El lector debe quedarse con esto</text:span></text:h>
      <text:list xml:id="list17713103" text:style-name="L11">
        <text:list-item>
          <text:p text:style-name="P22"><text:span text:style-name="Strong_20_Emphasis">La inteligencia aparece primero</text:span>, como regulación interna en redes químicas complejas. </text:p>
        </text:list-item>
        <text:list-item>
          <text:p text:style-name="P22"><text:span text:style-name="Strong_20_Emphasis">La vida aparece después</text:span>, cuando esa inteligencia se vuelve estable y heredable. </text:p>
        </text:list-item>
        <text:list-item>
          <text:p text:style-name="P22"><text:span text:style-name="Strong_20_Emphasis">La célula no crea la vida</text:span>, sino que la organiza en un cuerpo funcional. </text:p>
        </text:list-item>
        <text:list-item>
          <text:p text:style-name="P21"><text:span text:style-name="Strong_20_Emphasis">Vida e inteligencia son dos caras del mismo proceso</text:span>, vistas desde ángulos distintos. </text:p>
        </text:list-item>
      </text:list>
      <text:p text:style-name="Horizontal_20_Line"/>
      <text:p text:style-name="Text_20_body">Si quieres, ahora podemos continuar con el siguiente bloque:<text:line-break/><text:span text:style-name="Strong_20_Emphasis">De la célula a las redes de células</text:span>, donde la inteligencia deja de estar confinada en un solo cuerpo y empieza a distribuirse, cooperar y especializar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03T18:36:03.086000000</meta:creation-date>
    <dc:date>2026-06-03T18:45:28.527000000</dc:date>
    <meta:editing-duration>PT9M26S</meta:editing-duration>
    <meta:editing-cycles>1</meta:editing-cycles>
    <meta:document-statistic meta:table-count="0" meta:image-count="0" meta:object-count="0" meta:page-count="4" meta:paragraph-count="92" meta:word-count="752" meta:character-count="4518" meta:non-whitespace-character-count="3858"/>
    <meta:generator>LibreOffice/7.3.5.2$Windows_X86_64 LibreOffice_project/184fe81b8c8c30d8b5082578aee2fed2ea847c01</meta:generator>
  </office:meta>
</office:document-meta>
</file>