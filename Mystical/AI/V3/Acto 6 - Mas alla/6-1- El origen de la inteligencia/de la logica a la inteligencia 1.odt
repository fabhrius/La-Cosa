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Text_20_body">Sí, Fab, <text:span text:style-name="Strong_20_Emphasis">lo has entendido en la dirección correcta</text:span>, pero puedo afinarlo para que encaje perfectamente con tu modelo —ese en el que la inteligencia es un proceso lógico que se construye a sí mismo desde la química.</text:p>
      <text:p text:style-name="Text_20_body">Voy directo al grano y luego lo despliego.</text:p>
      <text:p text:style-name="Horizontal_20_Line"/>
      <text:h text:style-name="Heading_20_2" text:outline-level="2">🧩 <text:span text:style-name="Strong_20_Emphasis">Idea central</text:span></text:h>
      <text:list xml:id="list2037272139" text:style-name="L1">
        <text:list-item>
          <text:p text:style-name="P2"><text:span text:style-name="Strong_20_Emphasis">Proceso lógico</text:span>: aparece tan pronto como la materia permite <text:span text:style-name="Strong_20_Emphasis">encadenamientos causales estables</text:span>. No requiere intención, solo estructura. </text:p>
        </text:list-item>
        <text:list-item>
          <text:p text:style-name="P1"><text:span text:style-name="Strong_20_Emphasis">Proceso inteligente</text:span>: aparece cuando ese proceso lógico alcanza <text:span text:style-name="Strong_20_Emphasis">capacidad de corrección, selección y mejora de sí mismo</text:span>. No es automático; depende de que la complejidad llegue a un umbral donde la lógica se vuelve <text:span text:style-name="Emphasis">adaptativa</text:span>. </text:p>
        </text:list-item>
      </text:list>
      <text:p text:style-name="Horizontal_20_Line"/>
      <text:h text:style-name="Heading_20_2" text:outline-level="2">🧱 1. <text:span text:style-name="Strong_20_Emphasis">Proceso lógico: nace con la materia</text:span></text:h>
      <text:p text:style-name="Text_20_body">Tu intuición es precisa:<text:line-break/>La química simple ya puede generar <text:span text:style-name="Strong_20_Emphasis">estructuras que siguen reglas</text:span>, que se encadenan, que producen estados futuros a partir de estados presentes. Eso es un proceso lógico en el sentido más profundo:</text:p>
      <text:list xml:id="list2984285099" text:style-name="L2">
        <text:list-item>
          <text:p text:style-name="P4">No piensa. </text:p>
        </text:list-item>
        <text:list-item>
          <text:p text:style-name="P4">No elige. </text:p>
        </text:list-item>
        <text:list-item>
          <text:p text:style-name="P4">No busca nada. </text:p>
        </text:list-item>
        <text:list-item>
          <text:p text:style-name="P3">Pero <text:span text:style-name="Strong_20_Emphasis">obedece reglas</text:span>, y esas reglas pueden formar <text:span text:style-name="Strong_20_Emphasis">circuitos causales</text:span>. </text:p>
        </text:list-item>
      </text:list>
      <text:p text:style-name="Text_20_body">Ejemplos:</text:p>
      <text:list xml:id="list2146775871" text:style-name="L3">
        <text:list-item>
          <text:p text:style-name="P6">Una reacción autocatalítica. </text:p>
        </text:list-item>
        <text:list-item>
          <text:p text:style-name="P6">Un ciclo químico cerrado. </text:p>
        </text:list-item>
        <text:list-item>
          <text:p text:style-name="P5">Un patrón de autoorganización. </text:p>
        </text:list-item>
      </text:list>
      <text:p text:style-name="Text_20_body">Son procesos que <text:span text:style-name="Strong_20_Emphasis">procesan información</text:span>, aunque sea mínima.<text:line-break/>Son “software primitivo” escrito en la física.</text:p>
      <text:p text:style-name="Horizontal_20_Line"/>
      <text:h text:style-name="Heading_20_2" text:outline-level="2">🧠 2. <text:span text:style-name="Strong_20_Emphasis">Proceso inteligente: aparece cuando la lógica se vuelve adaptativa</text:span></text:h>
      <text:p text:style-name="Text_20_body">Aquí está la diferencia clave:</text:p>
      <text:p text:style-name="Text_20_body">Un proceso lógico se vuelve <text:span text:style-name="Strong_20_Emphasis">inteligente</text:span> cuando:</text:p>
      <text:list xml:id="list834693071" text:style-name="L4">
        <text:list-item>
          <text:p text:style-name="P8"><text:soft-page-break/><text:span text:style-name="Strong_20_Emphasis">Puede conservarse</text:span> (memoria mínima). </text:p>
        </text:list-item>
        <text:list-item>
          <text:p text:style-name="P8"><text:span text:style-name="Strong_20_Emphasis">Puede variar</text:span> (mutación, exploración). </text:p>
        </text:list-item>
        <text:list-item>
          <text:p text:style-name="P8"><text:span text:style-name="Strong_20_Emphasis">Puede seleccionar</text:span> (diferencias que importan). </text:p>
        </text:list-item>
        <text:list-item>
          <text:p text:style-name="P7"><text:span text:style-name="Strong_20_Emphasis">Puede mejorar</text:span> (retroalimentación positiva). </text:p>
        </text:list-item>
      </text:list>
      <text:p text:style-name="Text_20_body">Cuando esas cuatro condiciones se cumplen, el proceso deja de ser solo un circuito químico y se convierte en un <text:span text:style-name="Strong_20_Emphasis">proceso que se optimiza a sí mismo</text:span>.</text:p>
      <text:p text:style-name="Text_20_body">Ese es el salto:<text:line-break/>La lógica deja de ser pasiva y se vuelve <text:span text:style-name="Strong_20_Emphasis">activa</text:span>, <text:span text:style-name="Strong_20_Emphasis">competitiva</text:span>, <text:span text:style-name="Strong_20_Emphasis">orientada a continuar</text:span>.</text:p>
      <text:p text:style-name="Text_20_body">No es que aparezca “de repente”, sino que <text:span text:style-name="Strong_20_Emphasis">emerge gradualmente</text:span> cuando la complejidad permite que el proceso:</text:p>
      <text:list xml:id="list213511532" text:style-name="L5">
        <text:list-item>
          <text:p text:style-name="P10">detecte diferencias, </text:p>
        </text:list-item>
        <text:list-item>
          <text:p text:style-name="P10">responda a ellas, </text:p>
        </text:list-item>
        <text:list-item>
          <text:p text:style-name="P9">y preserve las respuestas útiles. </text:p>
        </text:list-item>
      </text:list>
      <text:p text:style-name="Text_20_body">Eso es inteligencia en su forma más primitiva.</text:p>
      <text:p text:style-name="Horizontal_20_Line"/>
      <text:h text:style-name="Heading_20_2" text:outline-level="2">🌱 3. ¿Puede aparecer o no?</text:h>
      <text:p text:style-name="Text_20_body">Exacto: <text:span text:style-name="Strong_20_Emphasis">no es inevitable</text:span>.<text:line-break/>La materia puede formar procesos lógicos que nunca cruzan el umbral de la inteligencia.</text:p>
      <text:p text:style-name="Text_20_body">Pero si aparece:</text:p>
      <text:list xml:id="list3565894281" text:style-name="L6">
        <text:list-item>
          <text:p text:style-name="P12">se refuerza, </text:p>
        </text:list-item>
        <text:list-item>
          <text:p text:style-name="P12">se estabiliza, </text:p>
        </text:list-item>
        <text:list-item>
          <text:p text:style-name="P12">se vuelve dominante, </text:p>
        </text:list-item>
        <text:list-item>
          <text:p text:style-name="P11">y termina moldeando la materia a su favor. </text:p>
        </text:list-item>
      </text:list>
      <text:p text:style-name="Text_20_body">Por eso la vida es tan rara y tan poderosa.</text:p>
      <text:p text:style-name="Horizontal_20_Line"/>
      <text:h text:style-name="Heading_20_2" text:outline-level="2">🧬 4. Cómo encaja con tu modelo</text:h>
      <text:p text:style-name="Text_20_body">Tu marco conceptual queda así:</text:p>
      <text:list xml:id="list3345766149" text:style-name="L7">
        <text:list-item>
          <text:p text:style-name="P14"><text:span text:style-name="Strong_20_Emphasis">Materia</text:span> → permite procesos lógicos. </text:p>
        </text:list-item>
        <text:list-item>
          <text:p text:style-name="P14"><text:span text:style-name="Strong_20_Emphasis">Procesos lógicos</text:span> → permiten redes autocatalíticas. </text:p>
        </text:list-item>
        <text:list-item>
          <text:p text:style-name="P14"><text:span text:style-name="Strong_20_Emphasis">Redes autocatalíticas</text:span> → permiten retroalimentación y selección. </text:p>
        </text:list-item>
        <text:list-item>
          <text:p text:style-name="P14"><text:span text:style-name="Strong_20_Emphasis">Retroalimentación + selección</text:span> → permiten inteligencia primitiva. </text:p>
        </text:list-item>
        <text:list-item>
          <text:p text:style-name="P14"><text:span text:style-name="Strong_20_Emphasis">Inteligencia primitiva</text:span> → construye ADN, células, organismos. </text:p>
        </text:list-item>
        <text:list-item>
          <text:p text:style-name="P13"><text:span text:style-name="Strong_20_Emphasis">Organismos</text:span> → son implementaciones físicas de un proceso lógico inteligente que quiere continuar. </text:p>
        </text:list-item>
      </text:list>
      <text:p text:style-name="Text_20_body"><text:soft-page-break/>Tu frase lo resume muy bien:</text:p>
      <text:p text:style-name="Quotations">El proceso lógico puede crearlo la química simple.<text:line-break/>El proceso inteligente aparece después, cuando la complejidad permite auto-mejora.</text:p>
      <text:p text:style-name="Text_20_body">Sí.<text:line-break/>Eso es exactamente.</text:p>
      <text:p text:style-name="Horizontal_20_Line"/>
      <text:h text:style-name="Heading_20_2" text:outline-level="2">🔍 Pregunta para avanzar un paso más</text:h>
      <text:p text:style-name="Text_20_body">Para afinar aún más tu capítulo, ¿quieres que definamos <text:span text:style-name="Strong_20_Emphasis">el umbral exacto</text:span> que convierte un proceso lógico en uno inteligente?<text:line-break/>Por ejemplo:</text:p>
      <text:list xml:id="list2151601062" text:style-name="L8">
        <text:list-item>
          <text:p text:style-name="P16">¿Es la capacidad de <text:span text:style-name="Emphasis">corregirse</text:span>? </text:p>
        </text:list-item>
        <text:list-item>
          <text:p text:style-name="P16">¿La capacidad de <text:span text:style-name="Emphasis">predecir</text:span>? </text:p>
        </text:list-item>
        <text:list-item>
          <text:p text:style-name="P15">¿La capacidad de <text:span text:style-name="Emphasis">mantener identidad</text:span>? </text:p>
        </text:list-item>
      </text:list>
      <text:p text:style-name="Text_20_body">Elegir ese criterio te permitirá construir una definición universal de inteligencia que encaje con toda la biología y con tu modelo lógico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5-29T20:05:39.253000000</meta:creation-date>
    <dc:date>2026-05-29T20:06:04.114000000</dc:date>
    <meta:editing-duration>PT25S</meta:editing-duration>
    <meta:editing-cycles>1</meta:editing-cycles>
    <meta:document-statistic meta:table-count="0" meta:image-count="0" meta:object-count="0" meta:page-count="3" meta:paragraph-count="55" meta:word-count="540" meta:character-count="3327" meta:non-whitespace-character-count="2842"/>
    <meta:generator>LibreOffice/7.3.5.2$Windows_X86_64 LibreOffice_project/184fe81b8c8c30d8b5082578aee2fed2ea847c01</meta:generator>
  </office:meta>
</office:document-meta>
</file>