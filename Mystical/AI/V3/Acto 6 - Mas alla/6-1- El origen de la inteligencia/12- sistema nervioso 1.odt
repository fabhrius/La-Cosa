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sobre el sistema nervioso</text:span>, escrito para el libro, con la misma claridad conceptual que venimos construyendo.<text:line-break/>Este es uno de los saltos más profundos de toda la historia de la inteligencia: <text:span text:style-name="Strong_20_Emphasis">cuando una red de células aprende a integrar información en tiempo real</text:span>, creando un nuevo tipo de mente.</text:p>
      <text:p text:style-name="Horizontal_20_Line"/>
      <text:h text:style-name="Heading_20_1" text:outline-level="1"><text:span text:style-name="Strong_20_Emphasis">10. El sistema nervioso: cuando la inteligencia distribuida aprende a integrarse</text:span></text:h>
      <text:h text:style-name="Heading_20_2" text:outline-level="2"><text:span text:style-name="Strong_20_Emphasis">10.1 El problema que aparece en los organismos multicelulares</text:span></text:h>
      <text:p text:style-name="Text_20_body">Una vez que la vida aprende a formar organismos multicelulares, surge un nuevo desafío:</text:p>
      <text:p text:style-name="Quotations"><text:span text:style-name="Strong_20_Emphasis">¿Cómo coordinar miles, millones o trillones de células<text:line-break/>para que actúen como un solo cuerpo?</text:span></text:p>
      <text:p text:style-name="Text_20_body">En un organismo simple, unas pocas señales químicas bastan.<text:line-break/>Pero a medida que el cuerpo crece:</text:p>
      <text:list xml:id="list2099150858" text:style-name="L1">
        <text:list-item>
          <text:p text:style-name="P2">hay más partes, </text:p>
        </text:list-item>
        <text:list-item>
          <text:p text:style-name="P2">más funciones, </text:p>
        </text:list-item>
        <text:list-item>
          <text:p text:style-name="P2">más distancias, </text:p>
        </text:list-item>
        <text:list-item>
          <text:p text:style-name="P1">más decisiones que tomar. </text:p>
        </text:list-item>
      </text:list>
      <text:p text:style-name="Text_20_body">La inteligencia distribuida —la que vive en cada célula— ya no es suficiente.<text:line-break/>Hace falta un sistema capaz de:</text:p>
      <text:list xml:id="list438071070" text:style-name="L2">
        <text:list-item>
          <text:p text:style-name="P4">recibir información, </text:p>
        </text:list-item>
        <text:list-item>
          <text:p text:style-name="P4">transmitirla rápido, </text:p>
        </text:list-item>
        <text:list-item>
          <text:p text:style-name="P4">integrarla, </text:p>
        </text:list-item>
        <text:list-item>
          <text:p text:style-name="P3">y coordinar respuestas. </text:p>
        </text:list-item>
      </text:list>
      <text:p text:style-name="Text_20_body">Ese sistema será el sistema nervioso.</text:p>
      <text:p text:style-name="Horizontal_20_Line"/>
      <text:h text:style-name="Heading_20_2" text:outline-level="2"><text:span text:style-name="Strong_20_Emphasis">10.2 La primera solución: células sensibles y señales químicas</text:span></text:h>
      <text:p text:style-name="Text_20_body">Antes de que existan neuronas, ya existen células que:</text:p>
      <text:list xml:id="list1316077190" text:style-name="L3">
        <text:list-item>
          <text:p text:style-name="P6">detectan luz, </text:p>
        </text:list-item>
        <text:list-item>
          <text:p text:style-name="P6">detectan presión, </text:p>
        </text:list-item>
        <text:list-item>
          <text:p text:style-name="P6">detectan sustancias químicas, </text:p>
        </text:list-item>
        <text:list-item>
          <text:p text:style-name="P5">liberan señales al resto del cuerpo. </text:p>
        </text:list-item>
      </text:list>
      <text:p text:style-name="Text_20_body"><text:soft-page-break/>Estas señales viajan lentamente, por difusión química.<text:line-break/>Pero permiten una coordinación mínima:</text:p>
      <text:list xml:id="list1496428747" text:style-name="L4">
        <text:list-item>
          <text:p text:style-name="P8">moverse hacia la luz, </text:p>
        </text:list-item>
        <text:list-item>
          <text:p text:style-name="P8">alejarse de toxinas, </text:p>
        </text:list-item>
        <text:list-item>
          <text:p text:style-name="P7">contraerse ante un estímulo. </text:p>
        </text:list-item>
      </text:list>
      <text:p text:style-name="Text_20_body">Es inteligencia corporal primitiva:</text:p>
      <text:list xml:id="list3995323222" text:style-name="L5">
        <text:list-item>
          <text:p text:style-name="P10">lenta, </text:p>
        </text:list-item>
        <text:list-item>
          <text:p text:style-name="P10">difusa, </text:p>
        </text:list-item>
        <text:list-item>
          <text:p text:style-name="P9">suficiente para organismos simples. </text:p>
        </text:list-item>
      </text:list>
      <text:p text:style-name="Text_20_body">Pero insuficiente para cuerpos grandes o móviles.</text:p>
      <text:p text:style-name="Horizontal_20_Line"/>
      <text:h text:style-name="Heading_20_2" text:outline-level="2"><text:span text:style-name="Strong_20_Emphasis">10.3 El salto decisivo: la célula nerviosa</text:span></text:h>
      <text:p text:style-name="Text_20_body">En algún momento de la evolución aparece una célula con tres capacidades nuevas:</text:p>
      <text:list xml:id="list1573624162" text:style-name="L6">
        <text:list-item>
          <text:p text:style-name="P11"><text:span text:style-name="Strong_20_Emphasis">Excitabilidad</text:span> <text:line-break/>Puede generar una señal eléctrica.</text:p>
        </text:list-item>
        <text:list-item>
          <text:p text:style-name="P11"><text:span text:style-name="Strong_20_Emphasis">Conductividad</text:span> <text:line-break/>Puede transmitir esa señal a gran velocidad.</text:p>
        </text:list-item>
        <text:list-item>
          <text:p text:style-name="P11"><text:span text:style-name="Strong_20_Emphasis">Conectividad</text:span> <text:line-break/>Puede comunicarse con otras células mediante sinapsis.</text:p>
        </text:list-item>
      </text:list>
      <text:p text:style-name="Text_20_body">Esta célula es la primera <text:span text:style-name="Strong_20_Emphasis">neurona</text:span>.</text:p>
      <text:p text:style-name="Text_20_body">La neurona resuelve el problema de la velocidad:</text:p>
      <text:list xml:id="list4176407066" text:style-name="L7">
        <text:list-item>
          <text:p text:style-name="P13">las señales químicas tardan segundos, </text:p>
        </text:list-item>
        <text:list-item>
          <text:p text:style-name="P12">las señales eléctricas tardan milésimas de segundo. </text:p>
        </text:list-item>
      </text:list>
      <text:p text:style-name="Text_20_body">La inteligencia corporal deja de ser lenta.<text:line-break/>Empieza a ser <text:span text:style-name="Strong_20_Emphasis">rápida</text:span>.</text:p>
      <text:p text:style-name="Horizontal_20_Line"/>
      <text:h text:style-name="Heading_20_2" text:outline-level="2"><text:span text:style-name="Strong_20_Emphasis">10.4 La red neuronal: inteligencia distribuida que se integra</text:span></text:h>
      <text:p text:style-name="Text_20_body">Una neurona sola no es un sistema nervioso.<text:line-break/>Pero cuando muchas neuronas se conectan entre sí, aparece algo nuevo:</text:p>
      <text:p text:style-name="Quotations"><text:span text:style-name="Strong_20_Emphasis">una red capaz de integrar información de todo el cuerpo<text:line-break/>y coordinar respuestas en tiempo real.</text:span></text:p>
      <text:p text:style-name="Text_20_body">La red neuronal:</text:p>
      <text:list xml:id="list3644495766" text:style-name="L8">
        <text:list-item>
          <text:p text:style-name="P15"><text:soft-page-break/>recibe señales sensoriales, </text:p>
        </text:list-item>
        <text:list-item>
          <text:p text:style-name="P15">las combina, </text:p>
        </text:list-item>
        <text:list-item>
          <text:p text:style-name="P15">las interpreta, </text:p>
        </text:list-item>
        <text:list-item>
          <text:p text:style-name="P14">envía órdenes coordinadas. </text:p>
        </text:list-item>
      </text:list>
      <text:p text:style-name="Text_20_body">Es una inteligencia distribuida, pero <text:span text:style-name="Strong_20_Emphasis">integrada</text:span>:</text:p>
      <text:list xml:id="list2503623490" text:style-name="L9">
        <text:list-item>
          <text:p text:style-name="P17">cada neurona aporta una parte, </text:p>
        </text:list-item>
        <text:list-item>
          <text:p text:style-name="P16">la red completa produce el comportamiento. </text:p>
        </text:list-item>
      </text:list>
      <text:p text:style-name="Text_20_body">Aquí aparece la primera forma de <text:span text:style-name="Strong_20_Emphasis">procesamiento centralizado</text:span>.</text:p>
      <text:p text:style-name="Horizontal_20_Line"/>
      <text:h text:style-name="Heading_20_2" text:outline-level="2"><text:span text:style-name="Strong_20_Emphasis">10.5 El sistema nervioso como órgano de coordinación</text:span></text:h>
      <text:p text:style-name="Text_20_body">A medida que los organismos se vuelven más complejos,<text:line-break/>las redes neuronales se organizan en estructuras especializadas:</text:p>
      <text:list xml:id="list1790427393" text:style-name="L10">
        <text:list-item>
          <text:p text:style-name="P19">ganglios, </text:p>
        </text:list-item>
        <text:list-item>
          <text:p text:style-name="P19">cordones nerviosos, </text:p>
        </text:list-item>
        <text:list-item>
          <text:p text:style-name="P18">cerebros primitivos. </text:p>
        </text:list-item>
      </text:list>
      <text:p text:style-name="Text_20_body">Estas estructuras permiten:</text:p>
      <text:list xml:id="list3881688444" text:style-name="L11">
        <text:list-item>
          <text:p text:style-name="P21">movimientos coordinados, </text:p>
        </text:list-item>
        <text:list-item>
          <text:p text:style-name="P21">comportamientos complejos, </text:p>
        </text:list-item>
        <text:list-item>
          <text:p text:style-name="P21">respuestas rápidas, </text:p>
        </text:list-item>
        <text:list-item>
          <text:p text:style-name="P20">aprendizaje simple. </text:p>
        </text:list-item>
      </text:list>
      <text:p text:style-name="Text_20_body">El sistema nervioso se convierte en el <text:span text:style-name="Strong_20_Emphasis">órgano de la inteligencia corporal</text:span>.</text:p>
      <text:p text:style-name="Horizontal_20_Line"/>
      <text:h text:style-name="Heading_20_2" text:outline-level="2"><text:span text:style-name="Strong_20_Emphasis">10.6 Qué aporta el sistema nervioso a la historia de la inteligencia</text:span></text:h>
      <text:p text:style-name="Text_20_body">El sistema nervioso introduce capacidades que ninguna célula,<text:line-break/>ningún tejido y ningún organismo multicelular podía tener antes:</text:p>
      <text:h text:style-name="Heading_20_3" text:outline-level="3"><text:span text:style-name="Strong_20_Emphasis">1. Velocidad</text:span></text:h>
      <text:p text:style-name="Text_20_body">La información viaja casi instantáneamente.</text:p>
      <text:h text:style-name="Heading_20_3" text:outline-level="3"><text:span text:style-name="Strong_20_Emphasis">2. Integración</text:span></text:h>
      <text:p text:style-name="Text_20_body">Se combinan señales de distintas partes del cuerpo.</text:p>
      <text:h text:style-name="Heading_20_3" text:outline-level="3"><text:soft-page-break/><text:span text:style-name="Strong_20_Emphasis">3. Coordinación</text:span></text:h>
      <text:p text:style-name="Text_20_body">El organismo actúa como una unidad coherente.</text:p>
      <text:h text:style-name="Heading_20_3" text:outline-level="3"><text:span text:style-name="Strong_20_Emphasis">4. Adaptación</text:span></text:h>
      <text:p text:style-name="Text_20_body">Las conexiones pueden cambiar con la experiencia.</text:p>
      <text:h text:style-name="Heading_20_3" text:outline-level="3"><text:span text:style-name="Strong_20_Emphasis">5. Aprendizaje</text:span></text:h>
      <text:p text:style-name="Text_20_body">El sistema nervioso puede modificar su comportamiento según el pasado.</text:p>
      <text:p text:style-name="Text_20_body">En términos funcionales:</text:p>
      <text:p text:style-name="Quotations"><text:span text:style-name="Strong_20_Emphasis">El sistema nervioso es la inteligencia corporal organizada en una red eléctrica.</text:span></text:p>
      <text:p text:style-name="Horizontal_20_Line"/>
      <text:h text:style-name="Heading_20_2" text:outline-level="2"><text:span text:style-name="Strong_20_Emphasis">10.7 La frase que resume este bloque</text:span></text:h>
      <text:p text:style-name="Quotations"><text:span text:style-name="Strong_20_Emphasis">La multicelularidad permitió crecer.<text:line-break/>El sistema nervioso permitió actuar.</text:span></text:p>
      <text:p text:style-name="Text_20_body">La inteligencia, que ya había encontrado continuidad en la vida<text:line-break/>y escala en los organismos multicelulares,<text:line-break/>ahora encuentra <text:span text:style-name="Strong_20_Emphasis">velocidad, integración y coordinación</text:span>.</text:p>
      <text:p text:style-name="Text_20_body">Este es el inicio de una nueva era:<text:line-break/>la era de los animales, del movimiento, del comportamiento,<text:line-break/>y, mucho más adelante, de la mente consciente.</text:p>
      <text:p text:style-name="Horizontal_20_Line"/>
      <text:p text:style-name="Text_20_body">Si quieres, avanzamos al siguiente bloque:<text:line-break/><text:span text:style-name="Strong_20_Emphasis">El cerebro: cuando la inteligencia integrada aprende a modelar el mundo y a modelarse a sí mism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7T18:59:20.646000000</meta:creation-date>
    <dc:date>2026-06-07T19:00:19.727000000</dc:date>
    <meta:editing-duration>PT59S</meta:editing-duration>
    <meta:editing-cycles>1</meta:editing-cycles>
    <meta:document-statistic meta:table-count="0" meta:image-count="0" meta:object-count="0" meta:page-count="4" meta:paragraph-count="83" meta:word-count="662" meta:character-count="4269" meta:non-whitespace-character-count="3690"/>
    <meta:generator>LibreOffice/7.3.5.2$Windows_X86_64 LibreOffice_project/184fe81b8c8c30d8b5082578aee2fed2ea847c01</meta:generator>
  </office:meta>
</office:document-meta>
</file>