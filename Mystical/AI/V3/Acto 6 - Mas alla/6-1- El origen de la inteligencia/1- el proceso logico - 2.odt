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in" fo:margin-bottom="0in" style:contextual-spacing="false"/>
    </style:style>
    <style:style style:name="P3" style:family="paragraph" style:parent-style-name="Text_20_body" style:list-style-name="L2"/>
    <style:style style:name="P4" style:family="paragraph" style:parent-style-name="Text_20_body" style:list-style-name="L2">
      <style:paragraph-properties fo:margin-top="0in" fo:margin-bottom="0in" style:contextual-spacing="false"/>
    </style:style>
    <style:style style:name="P5" style:family="paragraph" style:parent-style-name="Text_20_body" style:list-style-name="L3"/>
    <style:style style:name="P6" style:family="paragraph" style:parent-style-name="Text_20_body" style:list-style-name="L3">
      <style:paragraph-properties fo:margin-top="0in" fo:margin-bottom="0in" style:contextual-spacing="false"/>
    </style:style>
    <style:style style:name="P7" style:family="paragraph" style:parent-style-name="Text_20_body" style:list-style-name="L4"/>
    <style:style style:name="P8" style:family="paragraph" style:parent-style-name="Text_20_body" style:list-style-name="L4">
      <style:paragraph-properties fo:margin-top="0in" fo:margin-bottom="0in" style:contextual-spacing="false"/>
    </style:style>
    <style:style style:name="P9" style:family="paragraph" style:parent-style-name="Text_20_body" style:list-style-name="L5"/>
    <style:style style:name="P10" style:family="paragraph" style:parent-style-name="Text_20_body" style:list-style-name="L5">
      <style:paragraph-properties fo:margin-top="0in" fo:margin-bottom="0in" style:contextual-spacing="false"/>
    </style:style>
    <style:style style:name="P11" style:family="paragraph" style:parent-style-name="Text_20_body" style:list-style-name="L6"/>
    <style:style style:name="P12" style:family="paragraph" style:parent-style-name="Text_20_body" style:list-style-name="L6">
      <style:paragraph-properties fo:margin-top="0in" fo:margin-bottom="0in" style:contextual-spacing="false"/>
    </style:style>
    <style:style style:name="P13" style:family="paragraph" style:parent-style-name="Text_20_body" style:list-style-name="L7"/>
    <style:style style:name="P14" style:family="paragraph" style:parent-style-name="Text_20_body" style:list-style-name="L7">
      <style:paragraph-properties fo:margin-top="0in" fo:margin-bottom="0in" style:contextual-spacing="false"/>
    </style:style>
    <style:style style:name="P15" style:family="paragraph" style:parent-style-name="Text_20_body" style:list-style-name="L8"/>
    <style:style style:name="P16" style:family="paragraph" style:parent-style-name="Text_20_body" style:list-style-name="L8">
      <style:paragraph-properties fo:margin-top="0in" fo:margin-bottom="0in" style:contextual-spacing="false"/>
    </style:style>
    <style:style style:name="P17" style:family="paragraph" style:parent-style-name="Text_20_body" style:list-style-name="L9"/>
    <style:style style:name="P18" style:family="paragraph" style:parent-style-name="Text_20_body" style:list-style-name="L9">
      <style:paragraph-properties fo:margin-top="0in" fo:margin-bottom="0in" style:contextual-spacing="false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Perfecto, Fab.<text:line-break/>Aquí tienes <text:span text:style-name="Strong_20_Emphasis">el primer bloque</text:span>, escrito exactamente con la estructura que acordamos:</text:p>
      <text:list xml:id="list1821993413" text:style-name="L1">
        <text:list-item>
          <text:p text:style-name="P2"><text:span text:style-name="Strong_20_Emphasis">definición clara</text:span>, </text:p>
        </text:list-item>
        <text:list-item>
          <text:p text:style-name="P2"><text:span text:style-name="Strong_20_Emphasis">contexto</text:span>, </text:p>
        </text:list-item>
        <text:list-item>
          <text:p text:style-name="P1"><text:span text:style-name="Strong_20_Emphasis">por qué importa</text:span>. </text:p>
        </text:list-item>
      </text:list>
      <text:p text:style-name="Text_20_body">Está pensado para un lector sin formación científica, pero sin simplificar en exceso.<text:line-break/>Es claro, elegante y conceptualmente sólido.</text:p>
      <text:p text:style-name="Horizontal_20_Line"/>
      <text:h text:style-name="Heading_20_1" text:outline-level="1"><text:span text:style-name="Strong_20_Emphasis">1. Procesos lógicos</text:span></text:h>
      <text:h text:style-name="Heading_20_2" text:outline-level="2"><text:span text:style-name="Strong_20_Emphasis">1.1 Definición clara (para cualquier lector)</text:span></text:h>
      <text:p text:style-name="Text_20_body">Cuando hablamos de <text:span text:style-name="Emphasis">proceso lógico</text:span> no estamos hablando de matemáticas, ni de ordenadores, ni de razonamientos humanos.<text:line-break/>Estamos hablando de algo mucho más básico y universal.</text:p>
      <text:p text:style-name="Text_20_body">Un <text:span text:style-name="Strong_20_Emphasis">proceso lógico</text:span> es simplemente:</text:p>
      <text:p text:style-name="Quotations"><text:span text:style-name="Strong_20_Emphasis">un cambio que sigue una regla.</text:span></text:p>
      <text:p text:style-name="Text_20_body">Eso es todo.</text:p>
      <text:p text:style-name="Text_20_body">Un proceso lógico ocurre cuando:</text:p>
      <text:list xml:id="list3793778659" text:style-name="L2">
        <text:list-item>
          <text:p text:style-name="P4">hay un estado inicial, </text:p>
        </text:list-item>
        <text:list-item>
          <text:p text:style-name="P4">hay una regla que dice cómo debe cambiar, </text:p>
        </text:list-item>
        <text:list-item>
          <text:p text:style-name="P3">y aparece un estado final que cumple esa regla. </text:p>
        </text:list-item>
      </text:list>
      <text:p text:style-name="Text_20_body">Ejemplos cotidianos:</text:p>
      <text:list xml:id="list719784095" text:style-name="L3">
        <text:list-item>
          <text:p text:style-name="P6">Si calientas agua, hierve. </text:p>
        </text:list-item>
        <text:list-item>
          <text:p text:style-name="P6">Si sueltas una pelota, cae. </text:p>
        </text:list-item>
        <text:list-item>
          <text:p text:style-name="P5">Si mezclas vinagre y bicarbonato, hace espuma. </text:p>
        </text:list-item>
      </text:list>
      <text:p text:style-name="Text_20_body">En todos estos casos:</text:p>
      <text:list xml:id="list3425832234" text:style-name="L4">
        <text:list-item>
          <text:p text:style-name="P8">hay un antes, </text:p>
        </text:list-item>
        <text:list-item>
          <text:p text:style-name="P8">hay un después, </text:p>
        </text:list-item>
        <text:list-item>
          <text:p text:style-name="P7">y hay una regla que conecta ambos. </text:p>
        </text:list-item>
      </text:list>
      <text:p text:style-name="Text_20_body">No hace falta intención.<text:line-break/>No hace falta inteligencia.<text:line-break/>No hace falta vida.</text:p>
      <text:p text:style-name="Text_20_body">Solo hace falta <text:span text:style-name="Strong_20_Emphasis">orden</text:span>.</text:p>
      <text:p text:style-name="Text_20_body"><text:soft-page-break/>Un proceso lógico es, en esencia, <text:span text:style-name="Strong_20_Emphasis">un cambio ordenado</text:span>.</text:p>
      <text:p text:style-name="Horizontal_20_Line"/>
      <text:h text:style-name="Heading_20_2" text:outline-level="2"><text:span text:style-name="Strong_20_Emphasis">1.2 Contexto: el universo como una fábrica de procesos lógicos</text:span></text:h>
      <text:p text:style-name="Text_20_body">Desde el primer instante del universo, todo lo que ocurre sigue reglas:</text:p>
      <text:list xml:id="list345509720" text:style-name="L5">
        <text:list-item>
          <text:p text:style-name="P10">cómo se mueven las partículas, </text:p>
        </text:list-item>
        <text:list-item>
          <text:p text:style-name="P10">cómo se combinan los átomos, </text:p>
        </text:list-item>
        <text:list-item>
          <text:p text:style-name="P10">cómo fluye la energía, </text:p>
        </text:list-item>
        <text:list-item>
          <text:p text:style-name="P9">cómo se forman las moléculas. </text:p>
        </text:list-item>
      </text:list>
      <text:p text:style-name="Text_20_body">Nada ocurre “porque sí”.<text:line-break/>Todo ocurre siguiendo <text:span text:style-name="Strong_20_Emphasis">leyes</text:span>, <text:span text:style-name="Strong_20_Emphasis">patrones</text:span>, <text:span text:style-name="Strong_20_Emphasis">regularidades</text:span>.</text:p>
      <text:p text:style-name="Text_20_body">Esto significa que el universo, desde el principio, está lleno de procesos lógicos:</text:p>
      <text:list xml:id="list549697700" text:style-name="L6">
        <text:list-item>
          <text:p text:style-name="P12">estrellas que nacen y mueren, </text:p>
        </text:list-item>
        <text:list-item>
          <text:p text:style-name="P12">átomos que se unen y se separan, </text:p>
        </text:list-item>
        <text:list-item>
          <text:p text:style-name="P11">reacciones químicas que transforman unas sustancias en otras. </text:p>
        </text:list-item>
      </text:list>
      <text:p text:style-name="Text_20_body">Pero aunque todo esto es lógico, <text:span text:style-name="Strong_20_Emphasis">no es inteligente</text:span>.</text:p>
      <text:p text:style-name="Text_20_body">¿Por qué?</text:p>
      <text:p text:style-name="Text_20_body">Porque estos procesos:</text:p>
      <text:list xml:id="list3401752269" text:style-name="L7">
        <text:list-item>
          <text:p text:style-name="P14">no recuerdan, </text:p>
        </text:list-item>
        <text:list-item>
          <text:p text:style-name="P14">no se mantienen, </text:p>
        </text:list-item>
        <text:list-item>
          <text:p text:style-name="P14">no se corrigen, </text:p>
        </text:list-item>
        <text:list-item>
          <text:p text:style-name="P14">no se reproducen, </text:p>
        </text:list-item>
        <text:list-item>
          <text:p text:style-name="P14">no tienen continuidad, </text:p>
        </text:list-item>
        <text:list-item>
          <text:p text:style-name="P13">no tienen un “sí mismo”. </text:p>
        </text:list-item>
      </text:list>
      <text:p text:style-name="Text_20_body">Son procesos que simplemente <text:span text:style-name="Strong_20_Emphasis">ocurren</text:span>.</text:p>
      <text:p text:style-name="Horizontal_20_Line"/>
      <text:h text:style-name="Heading_20_2" text:outline-level="2"><text:span text:style-name="Strong_20_Emphasis">1.3 Por qué importa: la lógica es la semilla de la inteligencia</text:span></text:h>
      <text:p text:style-name="Text_20_body">La inteligencia no aparece de golpe.<text:line-break/>No surge de la nada.<text:line-break/>No es un milagro.</text:p>
      <text:p text:style-name="Text_20_body">La inteligencia es una forma especial de proceso lógico, una forma que:</text:p>
      <text:list xml:id="list1504781398" text:style-name="L8">
        <text:list-item>
          <text:p text:style-name="P16">se mantiene, </text:p>
        </text:list-item>
        <text:list-item>
          <text:p text:style-name="P16">se copia, </text:p>
        </text:list-item>
        <text:list-item>
          <text:p text:style-name="P16">se corrige, </text:p>
        </text:list-item>
        <text:list-item>
          <text:p text:style-name="P16"><text:soft-page-break/>se adapta, </text:p>
        </text:list-item>
        <text:list-item>
          <text:p text:style-name="P16">se dirige, </text:p>
        </text:list-item>
        <text:list-item>
          <text:p text:style-name="P16">se protege, </text:p>
        </text:list-item>
        <text:list-item>
          <text:p text:style-name="P15">se transforma. </text:p>
        </text:list-item>
      </text:list>
      <text:p text:style-name="Text_20_body">Pero para que eso pueda existir, primero tiene que existir <text:span text:style-name="Strong_20_Emphasis">la lógica básica</text:span>:<text:line-break/>la capacidad del universo de producir cambios ordenados.</text:p>
      <text:p text:style-name="Text_20_body">Por eso este primer bloque es esencial:</text:p>
      <text:p text:style-name="Quotations"><text:span text:style-name="Strong_20_Emphasis">La inteligencia es lógica organizada.<text:line-break/>Y la lógica existe desde el principio.</text:span></text:p>
      <text:p text:style-name="Text_20_body">Lo que veremos en los siguientes apartados es cómo esa lógica:</text:p>
      <text:list xml:id="list4083287156" text:style-name="L9">
        <text:list-item>
          <text:p text:style-name="P18">primero se vuelve reactiva, </text:p>
        </text:list-item>
        <text:list-item>
          <text:p text:style-name="P18">luego se vuelve autocatalítica, </text:p>
        </text:list-item>
        <text:list-item>
          <text:p text:style-name="P18">luego se vuelve reproductiva, </text:p>
        </text:list-item>
        <text:list-item>
          <text:p text:style-name="P18">luego se vuelve genética, </text:p>
        </text:list-item>
        <text:list-item>
          <text:p text:style-name="P18">luego se vuelve celular, </text:p>
        </text:list-item>
        <text:list-item>
          <text:p text:style-name="P18">luego se vuelve neuronal, </text:p>
        </text:list-item>
        <text:list-item>
          <text:p text:style-name="P17">y finalmente se vuelve experiencia subjetiva. </text:p>
        </text:list-item>
      </text:list>
      <text:p text:style-name="Text_20_body">Pero todo empieza aquí:<text:line-break/>con el concepto más simple y más universal de todos.</text:p>
      <text:p text:style-name="Text_20_body">Un proceso lógico es <text:span text:style-name="Strong_20_Emphasis">un cambio que sigue una regla</text:span>.<text:line-break/>La inteligencia es lo que ocurre cuando esos cambios empiezan a <text:span text:style-name="Strong_20_Emphasis">conservarse</text:span>, <text:span text:style-name="Strong_20_Emphasis">acumularse</text:span> y <text:span text:style-name="Strong_20_Emphasis">dirigirse</text:span>.</text:p>
      <text:p text:style-name="Horizontal_20_Line"/>
      <text:p text:style-name="Text_20_body">Si te parece bien, pasamos ahora al <text:span text:style-name="Strong_20_Emphasis">bloque 2: Materia reactiva</text:span>, siguiendo la misma estructura (definición → contexto → por qué importa).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6-05-31T14:57:26.914000000</meta:creation-date>
    <dc:date>2026-05-31T14:58:04.116000000</dc:date>
    <meta:editing-duration>PT37S</meta:editing-duration>
    <meta:editing-cycles>1</meta:editing-cycles>
    <meta:document-statistic meta:table-count="0" meta:image-count="0" meta:object-count="0" meta:page-count="3" meta:paragraph-count="71" meta:word-count="530" meta:character-count="3068" meta:non-whitespace-character-count="2609"/>
    <meta:generator>LibreOffice/7.3.5.2$Windows_X86_64 LibreOffice_project/184fe81b8c8c30d8b5082578aee2fed2ea847c01</meta:generator>
  </office:meta>
</office:document-meta>
</file>