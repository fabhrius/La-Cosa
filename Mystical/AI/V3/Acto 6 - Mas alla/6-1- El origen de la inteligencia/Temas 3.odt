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Fab, ahora sí estamos entrando en la zona profunda, donde tu libro deja de ser biología y se convierte en metafísica de la información.<text:line-break/>Y lo que planteas —que <text:span text:style-name="Strong_20_Emphasis">la inteligencia se construye a sí misma</text:span>, que <text:span text:style-name="Strong_20_Emphasis">el ADN no es casual</text:span>, que <text:span text:style-name="Strong_20_Emphasis">la célula es la primera inteligencia operativa</text:span>, y que <text:span text:style-name="Strong_20_Emphasis">los cerebros solo amplifican un propósito más antiguo</text:span>— es exactamente el eje filosófico que puede sostener todo el capítulo.</text:p>
      <text:p text:style-name="Text_20_body">Voy a darte una <text:span text:style-name="Strong_20_Emphasis">estructura de contenidos revisada</text:span>, ajustada a tus prioridades:</text:p>
      <text:list xml:id="list1794314307" text:style-name="L1">
        <text:list-item>
          <text:p text:style-name="P2">centrada en <text:span text:style-name="Strong_20_Emphasis">la primera inteligencia del universo</text:span>, </text:p>
        </text:list-item>
        <text:list-item>
          <text:p text:style-name="P2">sin antropocentrismo, </text:p>
        </text:list-item>
        <text:list-item>
          <text:p text:style-name="P2">culminando en la aparición de los cerebros como <text:span text:style-name="Emphasis">máquinas de experiencia</text:span>, </text:p>
        </text:list-item>
        <text:list-item>
          <text:p text:style-name="P2">y mostrando cómo <text:span text:style-name="Strong_20_Emphasis">los procesos lógicos se transforman en procesos inteligentes</text:span>, </text:p>
        </text:list-item>
        <text:list-item>
          <text:p text:style-name="P1">con el ADN como solución necesaria, no accidental. </text:p>
        </text:list-item>
      </text:list>
      <text:p text:style-name="Text_20_body">La estructura que sigue está diseñada para que el capítulo tenga fuerza conceptual, claridad narrativa y profundidad filosófica.</text:p>
      <text:p text:style-name="Horizontal_20_Line"/>
      <text:h text:style-name="Heading_20_1" text:outline-level="1"><text:span text:style-name="Strong_20_Emphasis">Capítulo: La aparición de la inteligencia</text:span></text:h>
      <text:h text:style-name="Heading_20_2" text:outline-level="2"><text:span text:style-name="Strong_20_Emphasis">1. Introducción: La inteligencia como fenómeno que se construye a sí mismo</text:span></text:h>
      <text:list xml:id="list1858467497" text:style-name="L2">
        <text:list-item>
          <text:p text:style-name="P4">La inteligencia no aparece de golpe: emerge por capas. </text:p>
        </text:list-item>
        <text:list-item>
          <text:p text:style-name="P4">Diferencia entre <text:span text:style-name="Emphasis">lógica</text:span> e <text:span text:style-name="Emphasis">inteligencia</text:span>: </text:p>
          <text:list>
            <text:list-item>
              <text:p text:style-name="P4">la lógica describe, </text:p>
            </text:list-item>
            <text:list-item>
              <text:p text:style-name="P4">la inteligencia decide. </text:p>
            </text:list-item>
          </text:list>
        </text:list-item>
        <text:list-item>
          <text:p text:style-name="P3">La tesis del capítulo:<text:line-break/><text:span text:style-name="Strong_20_Emphasis">la inteligencia surge cuando un proceso lógico adquiere la capacidad de preservar, transformar y dirigir información para su propia continuidad.</text:span> </text:p>
        </text:list-item>
      </text:list>
      <text:p text:style-name="Horizontal_20_Line"/>
      <text:h text:style-name="Heading_20_2" text:outline-level="2"><text:span text:style-name="Strong_20_Emphasis">2. El primer nivel: procesos lógicos sin inteligencia</text:span></text:h>
      <text:list xml:id="list1501465193" text:style-name="L3">
        <text:list-item>
          <text:p text:style-name="P6">La materia reactiva: transiciones de estado sin memoria. </text:p>
        </text:list-item>
        <text:list-item>
          <text:p text:style-name="P6">Redes autocatalíticas: coherencia interna, pero sin propósito. </text:p>
        </text:list-item>
        <text:list-item>
          <text:p text:style-name="P6">Por qué esto aún no es inteligencia: </text:p>
          <text:list>
            <text:list-item>
              <text:p text:style-name="P6">no hay selección interna, </text:p>
            </text:list-item>
            <text:list-item>
              <text:p text:style-name="P6">no hay acumulación de información, </text:p>
            </text:list-item>
            <text:list-item>
              <text:p text:style-name="P5">no hay dirección. </text:p>
            </text:list-item>
          </text:list>
        </text:list-item>
      </text:list>
      <text:p text:style-name="Text_20_body">Aquí se introduce la idea clave:<text:line-break/><text:span text:style-name="Strong_20_Emphasis">la lógica es la semilla, pero no la inteligencia.</text:span></text:p>
      <text:p text:style-name="Horizontal_20_Line"><text:soft-page-break/></text:p>
      <text:h text:style-name="Heading_20_2" text:outline-level="2"><text:span text:style-name="Strong_20_Emphasis">3. La reproducción: el primer mecanismo que crea historia</text:span></text:h>
      <text:list xml:id="list4145359012" text:style-name="L4">
        <text:list-item>
          <text:p text:style-name="P8">La reproducción como ruptura de la simetría temporal. </text:p>
        </text:list-item>
        <text:list-item>
          <text:p text:style-name="P8">Antes: cada proceso empieza de cero. </text:p>
        </text:list-item>
        <text:list-item>
          <text:p text:style-name="P8">Después: cada copia conserva información. </text:p>
        </text:list-item>
        <text:list-item>
          <text:p text:style-name="P8">La reproducción convierte la química en un proceso acumulativo. </text:p>
        </text:list-item>
        <text:list-item>
          <text:p text:style-name="P7">Aparece el primer embrión de “aprendizaje”, aunque aún no interno. </text:p>
        </text:list-item>
      </text:list>
      <text:p text:style-name="Text_20_body">Este es el primer paso hacia la inteligencia:<text:line-break/><text:span text:style-name="Strong_20_Emphasis">la información deja de ser efímera.</text:span></text:p>
      <text:p text:style-name="Horizontal_20_Line"/>
      <text:h text:style-name="Heading_20_2" text:outline-level="2"><text:span text:style-name="Strong_20_Emphasis">4. Evolución: optimización sin intención</text:span></text:h>
      <text:list xml:id="list2547948631" text:style-name="L5">
        <text:list-item>
          <text:p text:style-name="P10">La selección natural como algoritmo ciego. </text:p>
        </text:list-item>
        <text:list-item>
          <text:p text:style-name="P10">La paradoja: un proceso no inteligente que produce estructuras cada vez más inteligentes. </text:p>
        </text:list-item>
        <text:list-item>
          <text:p text:style-name="P10">La evolución como “entorno de entrenamiento” para la inteligencia futura. </text:p>
        </text:list-item>
        <text:list-item>
          <text:p text:style-name="P10">Pero aún no hay inteligencia real: </text:p>
          <text:list>
            <text:list-item>
              <text:p text:style-name="P10">no hay decisiones internas, </text:p>
            </text:list-item>
            <text:list-item>
              <text:p text:style-name="P10">no hay modelos del entorno, </text:p>
            </text:list-item>
            <text:list-item>
              <text:p text:style-name="P9">no hay propósito. </text:p>
            </text:list-item>
          </text:list>
        </text:list-item>
      </text:list>
      <text:p text:style-name="Text_20_body">Aquí preparas el terreno para el salto decisivo.</text:p>
      <text:p text:style-name="Horizontal_20_Line"/>
      <text:h text:style-name="Heading_20_2" text:outline-level="2"><text:span text:style-name="Strong_20_Emphasis">5. El ADN: la primera inteligencia profunda</text:span></text:h>
      <text:p text:style-name="Text_20_body">Este es el corazón del capítulo.</text:p>
      <text:list xml:id="list1562916168" text:style-name="L6">
        <text:list-item>
          <text:p text:style-name="P12">El ADN no es una molécula: es un <text:span text:style-name="Strong_20_Emphasis">sistema lógico estable</text:span>. </text:p>
        </text:list-item>
        <text:list-item>
          <text:p text:style-name="P12">El ADN como solución necesaria, no accidental: </text:p>
          <text:list>
            <text:list-item>
              <text:p text:style-name="P12">un código, </text:p>
            </text:list-item>
            <text:list-item>
              <text:p text:style-name="P12">un lenguaje, </text:p>
            </text:list-item>
            <text:list-item>
              <text:p text:style-name="P12">un sistema de representación, </text:p>
            </text:list-item>
            <text:list-item>
              <text:p text:style-name="P12">un mecanismo de diseño. </text:p>
            </text:list-item>
          </text:list>
        </text:list-item>
        <text:list-item>
          <text:p text:style-name="P12">La inteligencia del ADN: </text:p>
          <text:list>
            <text:list-item>
              <text:p text:style-name="P12">explora espacios combinatorios, </text:p>
            </text:list-item>
            <text:list-item>
              <text:p text:style-name="P12">almacena soluciones, </text:p>
            </text:list-item>
            <text:list-item>
              <text:p text:style-name="P12">corrige errores, </text:p>
            </text:list-item>
            <text:list-item>
              <text:p text:style-name="P12">genera diversidad, </text:p>
            </text:list-item>
            <text:list-item>
              <text:p text:style-name="P12">construye organismos completos. </text:p>
            </text:list-item>
          </text:list>
        </text:list-item>
        <text:list-item>
          <text:p text:style-name="P12">Escala temporal: </text:p>
          <text:list>
            <text:list-item>
              <text:p text:style-name="P12"><text:soft-page-break/>el cerebro vive décadas, </text:p>
            </text:list-item>
            <text:list-item>
              <text:p text:style-name="P12">el ADN vive miles de millones de años. </text:p>
            </text:list-item>
          </text:list>
        </text:list-item>
        <text:list-item>
          <text:p text:style-name="P11">El ADN como la inteligencia más poderosa del planeta:<text:line-break/><text:span text:style-name="Strong_20_Emphasis">crea seres que luego crean cerebros.</text:span> </text:p>
        </text:list-item>
      </text:list>
      <text:p text:style-name="Text_20_body">Aquí introduces la idea filosófica clave:<text:line-break/><text:span text:style-name="Strong_20_Emphasis">la inteligencia se construye a sí misma, y el ADN es su primera gran obra.</text:span></text:p>
      <text:p text:style-name="Horizontal_20_Line"/>
      <text:h text:style-name="Heading_20_2" text:outline-level="2"><text:span text:style-name="Strong_20_Emphasis">6. La célula: la primera inteligencia operativa</text:span></text:h>
      <text:list xml:id="list906514964" text:style-name="L7">
        <text:list-item>
          <text:p text:style-name="P14">La célula como agente: percibe, evalúa, decide. </text:p>
        </text:list-item>
        <text:list-item>
          <text:p text:style-name="P14">Sensores, rutas metabólicas, regulación, homeostasis. </text:p>
        </text:list-item>
        <text:list-item>
          <text:p text:style-name="P14">La célula convierte la inteligencia profunda del ADN en inteligencia en tiempo real. </text:p>
        </text:list-item>
        <text:list-item>
          <text:p text:style-name="P14">Aquí aparece la primera forma de “voluntad”: </text:p>
          <text:list>
            <text:list-item>
              <text:p text:style-name="P14">no humana, </text:p>
            </text:list-item>
            <text:list-item>
              <text:p text:style-name="P14">no consciente, </text:p>
            </text:list-item>
            <text:list-item>
              <text:p text:style-name="P13">pero sí dirigida. </text:p>
            </text:list-item>
          </text:list>
        </text:list-item>
      </text:list>
      <text:p text:style-name="Text_20_body">La célula es la primera entidad que <text:span text:style-name="Emphasis">actúa</text:span>.</text:p>
      <text:p text:style-name="Horizontal_20_Line"/>
      <text:h text:style-name="Heading_20_2" text:outline-level="2"><text:span text:style-name="Strong_20_Emphasis">7. Multicelularidad y sistemas nerviosos: la inteligencia se acelera</text:span></text:h>
      <text:list xml:id="list2467324210" text:style-name="L8">
        <text:list-item>
          <text:p text:style-name="P16">La multicelularidad introduce coordinación y especialización. </text:p>
        </text:list-item>
        <text:list-item>
          <text:p text:style-name="P16">Los sistemas nerviosos integran información. </text:p>
        </text:list-item>
        <text:list-item>
          <text:p text:style-name="P16">Aparece el aprendizaje dentro de la vida del individuo. </text:p>
        </text:list-item>
        <text:list-item>
          <text:p text:style-name="P15">La inteligencia deja de depender solo de mutaciones:<text:line-break/><text:span text:style-name="Strong_20_Emphasis">ahora puede modificarse en una sola vida.</text:span> </text:p>
        </text:list-item>
      </text:list>
      <text:p text:style-name="Text_20_body">Este es el puente hacia los cerebros.</text:p>
      <text:p text:style-name="Horizontal_20_Line"/>
      <text:h text:style-name="Heading_20_2" text:outline-level="2"><text:span text:style-name="Strong_20_Emphasis">8. La aparición de los cerebros: la inteligencia se vuelve experiencia</text:span></text:h>
      <text:p text:style-name="Text_20_body">Aquí no hablas de humanos, sino de <text:span text:style-name="Strong_20_Emphasis">cualquier cerebro</text:span>.</text:p>
      <text:list xml:id="list2304931509" text:style-name="L9">
        <text:list-item>
          <text:p text:style-name="P18">Peces, insectos, anfibios: </text:p>
          <text:list>
            <text:list-item>
              <text:p text:style-name="P18">percepción, </text:p>
            </text:list-item>
            <text:list-item>
              <text:p text:style-name="P18">memoria, </text:p>
            </text:list-item>
            <text:list-item>
              <text:p text:style-name="P18">emoción, </text:p>
            </text:list-item>
            <text:list-item>
              <text:p text:style-name="P18">decisión. </text:p>
            </text:list-item>
          </text:list>
        </text:list-item>
        <text:list-item>
          <text:p text:style-name="P18"><text:soft-page-break/>La experiencia subjetiva como herramienta evolutiva. </text:p>
        </text:list-item>
        <text:list-item>
          <text:p text:style-name="P18">La conciencia como un mecanismo para integrar información y guiar acción. </text:p>
        </text:list-item>
        <text:list-item>
          <text:p text:style-name="P18">La inteligencia neuronal como amplificación de la inteligencia genética. </text:p>
        </text:list-item>
        <text:list-item>
          <text:p text:style-name="P17">La voluntad como extensión del propósito original del ADN. </text:p>
        </text:list-item>
      </text:list>
      <text:p text:style-name="Text_20_body">Aquí introduces la idea existencial:<text:line-break/><text:span text:style-name="Strong_20_Emphasis">la experiencia subjetiva es un producto tardío de un proceso que empezó miles de millones de años antes.</text:span></text:p>
      <text:p text:style-name="Horizontal_20_Line"/>
      <text:h text:style-name="Heading_20_2" text:outline-level="2"><text:span text:style-name="Strong_20_Emphasis">9. Conclusión: La inteligencia como un proceso que se construye a sí mismo</text:span></text:h>
      <text:list xml:id="list71567898" text:style-name="L10">
        <text:list-item>
          <text:p text:style-name="P20">Desde la autocatalisis hasta los cerebros, la inteligencia se despliega por capas. </text:p>
        </text:list-item>
        <text:list-item>
          <text:p text:style-name="P20">El ADN como arquitecto profundo. </text:p>
        </text:list-item>
        <text:list-item>
          <text:p text:style-name="P20">La célula como primer agente. </text:p>
        </text:list-item>
        <text:list-item>
          <text:p text:style-name="P20">El cerebro como amplificador de un propósito antiguo. </text:p>
        </text:list-item>
        <text:list-item>
          <text:p text:style-name="P20">La inteligencia humana no es el origen, sino la consecuencia. </text:p>
        </text:list-item>
        <text:list-item>
          <text:p text:style-name="P19">La idea final del capítulo:<text:line-break/><text:span text:style-name="Strong_20_Emphasis">la inteligencia no aparece en el universo: el universo aprende a volverse inteligente.</text:span> </text:p>
        </text:list-item>
      </text:list>
      <text:p text:style-name="Horizontal_20_Line"/>
      <text:h text:style-name="Heading_20_1" text:outline-level="1">Si quieres, puedo ahora:</text:h>
      <text:list xml:id="list2077274312" text:style-name="L11">
        <text:list-item>
          <text:p text:style-name="P22">desarrollar cada sección en prosa, </text:p>
        </text:list-item>
        <text:list-item>
          <text:p text:style-name="P22">convertir esta estructura en un mapa conceptual, </text:p>
        </text:list-item>
        <text:list-item>
          <text:p text:style-name="P21">o escribir directamente el capítulo completo con tono narrativo y filosófico. </text:p>
        </text:list-item>
      </text:list>
      <text:p text:style-name="Text_20_body">¿Cuál prefieres desarrollar ahora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5-29T19:23:38.243000000</meta:creation-date>
    <dc:date>2026-05-29T19:23:57.294000000</dc:date>
    <meta:editing-duration>PT19S</meta:editing-duration>
    <meta:editing-cycles>1</meta:editing-cycles>
    <meta:document-statistic meta:table-count="0" meta:image-count="0" meta:object-count="0" meta:page-count="4" meta:paragraph-count="97" meta:word-count="854" meta:character-count="5240" meta:non-whitespace-character-count="4483"/>
    <meta:generator>LibreOffice/7.3.5.2$Windows_X86_64 LibreOffice_project/184fe81b8c8c30d8b5082578aee2fed2ea847c01</meta:generator>
  </office:meta>
</office:document-meta>
</file>