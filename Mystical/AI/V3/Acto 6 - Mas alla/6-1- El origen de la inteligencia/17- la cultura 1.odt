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text:line-break/>Aquí tienes <text:span text:style-name="Strong_20_Emphasis">el bloque de la cultura</text:span>, uno de los más importantes de todo el libro, porque marca el momento en que la inteligencia deja de estar confinada en un solo organismo —o incluso en un solo cerebro— y se convierte en <text:span text:style-name="Strong_20_Emphasis">inteligencia compartida</text:span>, <text:span text:style-name="Strong_20_Emphasis">inteligencia acumulada</text:span>, <text:span text:style-name="Strong_20_Emphasis">inteligencia que trasciende al individuo</text:span>.</text:p>
      <text:p text:style-name="Text_20_body">Este es el nacimiento de la cultura.</text:p>
      <text:p text:style-name="Horizontal_20_Line"/>
      <text:h text:style-name="Heading_20_1" text:outline-level="1"><text:span text:style-name="Strong_20_Emphasis">15. La cultura: cuando muchos “yo” aprenden a compartir inteligencia</text:span></text:h>
      <text:h text:style-name="Heading_20_2" text:outline-level="2"><text:span text:style-name="Strong_20_Emphasis">15.1 El yo ya existe… pero está solo</text:span></text:h>
      <text:p text:style-name="Text_20_body">En el capítulo anterior vimos cómo el yo surge como:</text:p>
      <text:list xml:id="list4267317837" text:style-name="L1">
        <text:list-item>
          <text:p text:style-name="P2">un modelo interno del agente, </text:p>
        </text:list-item>
        <text:list-item>
          <text:p text:style-name="P2">una narrativa personal, </text:p>
        </text:list-item>
        <text:list-item>
          <text:p text:style-name="P2">un centro de coherencia, </text:p>
        </text:list-item>
        <text:list-item>
          <text:p text:style-name="P1">un sujeto de experiencia. </text:p>
        </text:list-item>
      </text:list>
      <text:p text:style-name="Text_20_body">Pero un yo aislado tiene límites muy claros:</text:p>
      <text:list xml:id="list867441819" text:style-name="L2">
        <text:list-item>
          <text:p text:style-name="P4">solo puede aprender de su propia vida, </text:p>
        </text:list-item>
        <text:list-item>
          <text:p text:style-name="P4">solo puede recordar lo que ha vivido, </text:p>
        </text:list-item>
        <text:list-item>
          <text:p text:style-name="P4">solo puede pensar con lo que ha experimentado, </text:p>
        </text:list-item>
        <text:list-item>
          <text:p text:style-name="P3">solo puede mejorar a la velocidad de su propia existencia. </text:p>
        </text:list-item>
      </text:list>
      <text:p text:style-name="Text_20_body">La inteligencia individual es poderosa,<text:line-break/>pero es lenta.</text:p>
      <text:p text:style-name="Text_20_body">Para que la inteligencia dé su siguiente salto,<text:line-break/>hace falta algo radicalmente nuevo:</text:p>
      <text:p text:style-name="Quotations"><text:span text:style-name="Strong_20_Emphasis">que muchos “yo” puedan compartir información entre sí.</text:span></text:p>
      <text:p text:style-name="Text_20_body">Ese es el nacimiento de la cultura.</text:p>
      <text:p text:style-name="Horizontal_20_Line"/>
      <text:h text:style-name="Heading_20_2" text:outline-level="2"><text:span text:style-name="Strong_20_Emphasis">15.2 El problema que aparece con animales sociales</text:span></text:h>
      <text:p text:style-name="Text_20_body">Cuando los organismos se vuelven sociales —cuando viven en grupos, manadas, colonias, tribus— surge un desafío nuevo:</text:p>
      <text:p text:style-name="Quotations"><text:soft-page-break/><text:span text:style-name="Strong_20_Emphasis">¿cómo coordinar comportamientos complejos entre individuos distintos,<text:line-break/>cada uno con su propio yo, su propia mente y su propia experiencia?</text:span></text:p>
      <text:p text:style-name="Text_20_body">La biología sola no basta.<text:line-break/>La genética sola no basta.<text:line-break/>La experiencia individual sola no basta.</text:p>
      <text:p text:style-name="Text_20_body">Hace falta un mecanismo para:</text:p>
      <text:list xml:id="list2340323191" text:style-name="L3">
        <text:list-item>
          <text:p text:style-name="P6">transmitir conocimiento, </text:p>
        </text:list-item>
        <text:list-item>
          <text:p text:style-name="P6">compartir estrategias, </text:p>
        </text:list-item>
        <text:list-item>
          <text:p text:style-name="P6">coordinar acciones, </text:p>
        </text:list-item>
        <text:list-item>
          <text:p text:style-name="P6">mantener cohesión, </text:p>
        </text:list-item>
        <text:list-item>
          <text:p text:style-name="P5">construir reglas comunes. </text:p>
        </text:list-item>
      </text:list>
      <text:p text:style-name="Text_20_body">Ese mecanismo será la cultura.</text:p>
      <text:p text:style-name="Horizontal_20_Line"/>
      <text:h text:style-name="Heading_20_2" text:outline-level="2"><text:span text:style-name="Strong_20_Emphasis">15.3 La cultura como memoria colectiva</text:span></text:h>
      <text:p text:style-name="Text_20_body">La cultura no es arte, ni lenguaje, ni tecnología.<text:line-break/>Todo eso vendrá después.</text:p>
      <text:p text:style-name="Text_20_body">La cultura, en su forma más elemental, es:</text:p>
      <text:p text:style-name="Quotations"><text:span text:style-name="Strong_20_Emphasis">la capacidad de transmitir información de un individuo a otro<text:line-break/>sin necesidad de genética.</text:span></text:p>
      <text:p text:style-name="Text_20_body">Es una <text:span text:style-name="Strong_20_Emphasis">memoria colectiva</text:span> que:</text:p>
      <text:list xml:id="list409891354" text:style-name="L4">
        <text:list-item>
          <text:p text:style-name="P8">se acumula, </text:p>
        </text:list-item>
        <text:list-item>
          <text:p text:style-name="P8">se transmite, </text:p>
        </text:list-item>
        <text:list-item>
          <text:p text:style-name="P8">se corrige, </text:p>
        </text:list-item>
        <text:list-item>
          <text:p text:style-name="P7">se mejora. </text:p>
        </text:list-item>
      </text:list>
      <text:p text:style-name="Text_20_body">La cultura es la primera forma de <text:span text:style-name="Strong_20_Emphasis">inteligencia transindividual</text:span>.</text:p>
      <text:p text:style-name="Horizontal_20_Line"/>
      <text:h text:style-name="Heading_20_2" text:outline-level="2"><text:span text:style-name="Strong_20_Emphasis">15.4 Cómo aparece la cultura</text:span></text:h>
      <text:p text:style-name="Text_20_body">La cultura surge gradualmente, a través de tres innovaciones:</text:p>
      <text:h text:style-name="Heading_20_3" text:outline-level="3"><text:span text:style-name="Strong_20_Emphasis">1. Imitación</text:span></text:h>
      <text:p text:style-name="Text_20_body">Un individuo copia el comportamiento de otro.</text:p>
      <text:p text:style-name="Text_20_body">Esto ya es cultura en su forma más simple:</text:p>
      <text:list xml:id="list1954126434" text:style-name="L5">
        <text:list-item>
          <text:p text:style-name="P10">aprender a usar una herramienta, </text:p>
        </text:list-item>
        <text:list-item>
          <text:p text:style-name="P10"><text:soft-page-break/>aprender a evitar un peligro, </text:p>
        </text:list-item>
        <text:list-item>
          <text:p text:style-name="P9">aprender una técnica de caza. </text:p>
        </text:list-item>
      </text:list>
      <text:h text:style-name="Heading_20_3" text:outline-level="3"><text:span text:style-name="Strong_20_Emphasis">2. Enseñanza</text:span></text:h>
      <text:p text:style-name="Text_20_body">Un individuo modifica su comportamiento para facilitar el aprendizaje de otro.</text:p>
      <text:p text:style-name="Text_20_body">Esto acelera la transmisión:</text:p>
      <text:list xml:id="list3081128237" text:style-name="L6">
        <text:list-item>
          <text:p text:style-name="P12">madres que muestran, </text:p>
        </text:list-item>
        <text:list-item>
          <text:p text:style-name="P12">adultos que corrigen, </text:p>
        </text:list-item>
        <text:list-item>
          <text:p text:style-name="P11">grupos que instruyen. </text:p>
        </text:list-item>
      </text:list>
      <text:h text:style-name="Heading_20_3" text:outline-level="3"><text:span text:style-name="Strong_20_Emphasis">3. Normas</text:span></text:h>
      <text:p text:style-name="Text_20_body">El grupo desarrolla reglas compartidas:</text:p>
      <text:list xml:id="list3287241545" text:style-name="L7">
        <text:list-item>
          <text:p text:style-name="P14">qué se hace, </text:p>
        </text:list-item>
        <text:list-item>
          <text:p text:style-name="P14">qué no se hace, </text:p>
        </text:list-item>
        <text:list-item>
          <text:p text:style-name="P14">qué se valora, </text:p>
        </text:list-item>
        <text:list-item>
          <text:p text:style-name="P13">qué se evita. </text:p>
        </text:list-item>
      </text:list>
      <text:p text:style-name="Text_20_body">Las normas estabilizan la cultura.</text:p>
      <text:p text:style-name="Horizontal_20_Line"/>
      <text:h text:style-name="Heading_20_2" text:outline-level="2"><text:span text:style-name="Strong_20_Emphasis">15.5 Qué hace realmente la cultura</text:span></text:h>
      <text:p text:style-name="Text_20_body">La cultura permite algo que ningún sistema anterior podía hacer:</text:p>
      <text:h text:style-name="Heading_20_3" text:outline-level="3"><text:span text:style-name="Strong_20_Emphasis">1. Acumular inteligencia</text:span></text:h>
      <text:p text:style-name="Text_20_body">Cada generación empieza donde terminó la anterior.</text:p>
      <text:h text:style-name="Heading_20_3" text:outline-level="3"><text:span text:style-name="Strong_20_Emphasis">2. Compartir soluciones</text:span></text:h>
      <text:p text:style-name="Text_20_body">Lo que aprende uno, lo aprenden muchos.</text:p>
      <text:h text:style-name="Heading_20_3" text:outline-level="3"><text:span text:style-name="Strong_20_Emphasis">3. Coordinar acciones</text:span></text:h>
      <text:p text:style-name="Text_20_body">El grupo actúa como una unidad cognitiva.</text:p>
      <text:h text:style-name="Heading_20_3" text:outline-level="3"><text:span text:style-name="Strong_20_Emphasis">4. Crear identidades colectivas</text:span></text:h>
      <text:p text:style-name="Text_20_body">El yo se reconoce como parte de un “nosotros”.</text:p>
      <text:h text:style-name="Heading_20_3" text:outline-level="3"><text:span text:style-name="Strong_20_Emphasis">5. Evolucionar más rápido que la biología</text:span></text:h>
      <text:p text:style-name="Text_20_body">La cultura cambia en años, no en millones de años.</text:p>
      <text:p text:style-name="Text_20_body">La cultura es la primera forma de <text:span text:style-name="Strong_20_Emphasis">evolución acelerada</text:span>.</text:p>
      <text:p text:style-name="Horizontal_20_Line"><text:soft-page-break/></text:p>
      <text:h text:style-name="Heading_20_2" text:outline-level="2"><text:span text:style-name="Strong_20_Emphasis">15.6 La cultura como herramienta evolutiva</text:span></text:h>
      <text:p text:style-name="Text_20_body">La cultura no aparece para crear arte o filosofía.<text:line-break/>Aparece porque resuelve problemas concretos:</text:p>
      <text:list xml:id="list873752699" text:style-name="L8">
        <text:list-item>
          <text:p text:style-name="P16">sobrevivir en entornos cambiantes, </text:p>
        </text:list-item>
        <text:list-item>
          <text:p text:style-name="P16">transmitir conocimiento útil, </text:p>
        </text:list-item>
        <text:list-item>
          <text:p text:style-name="P16">coordinar estrategias de caza, </text:p>
        </text:list-item>
        <text:list-item>
          <text:p text:style-name="P16">criar descendencia de forma cooperativa, </text:p>
        </text:list-item>
        <text:list-item>
          <text:p text:style-name="P16">mantener cohesión social, </text:p>
        </text:list-item>
        <text:list-item>
          <text:p text:style-name="P15">evitar conflictos destructivos. </text:p>
        </text:list-item>
      </text:list>
      <text:p text:style-name="Text_20_body">La cultura es una herramienta de supervivencia colectiva.</text:p>
      <text:p text:style-name="Horizontal_20_Line"/>
      <text:h text:style-name="Heading_20_2" text:outline-level="2"><text:span text:style-name="Strong_20_Emphasis">15.7 Qué aporta la cultura a la historia de la inteligencia</text:span></text:h>
      <text:p text:style-name="Text_20_body">La cultura introduce capacidades que ningún sistema anterior tenía:</text:p>
      <text:h text:style-name="Heading_20_3" text:outline-level="3"><text:span text:style-name="Strong_20_Emphasis">1. Inteligencia acumulativa</text:span></text:h>
      <text:p text:style-name="Text_20_body">El conocimiento crece con el tiempo.</text:p>
      <text:h text:style-name="Heading_20_3" text:outline-level="3"><text:span text:style-name="Strong_20_Emphasis">2. Inteligencia distribuida</text:span></text:h>
      <text:p text:style-name="Text_20_body">El grupo piensa mejor que el individuo.</text:p>
      <text:h text:style-name="Heading_20_3" text:outline-level="3"><text:span text:style-name="Strong_20_Emphasis">3. Inteligencia normativa</text:span></text:h>
      <text:p text:style-name="Text_20_body">El comportamiento se regula mediante reglas compartidas.</text:p>
      <text:h text:style-name="Heading_20_3" text:outline-level="3"><text:span text:style-name="Strong_20_Emphasis">4. Inteligencia simbólica</text:span></text:h>
      <text:p text:style-name="Text_20_body">El grupo usa gestos, sonidos, rituales para transmitir significado.</text:p>
      <text:h text:style-name="Heading_20_3" text:outline-level="3"><text:span text:style-name="Strong_20_Emphasis">5. Inteligencia histórica</text:span></text:h>
      <text:p text:style-name="Text_20_body">El pasado influye en el presente.</text:p>
      <text:p text:style-name="Text_20_body">En términos funcionales:</text:p>
      <text:p text:style-name="Quotations"><text:span text:style-name="Strong_20_Emphasis">La cultura es la inteligencia que se vuelve colectiva.</text:span></text:p>
      <text:p text:style-name="Horizontal_20_Line"/>
      <text:h text:style-name="Heading_20_2" text:outline-level="2"><text:soft-page-break/><text:span text:style-name="Strong_20_Emphasis">15.8 La frase que resume este bloque</text:span></text:h>
      <text:p text:style-name="Quotations"><text:span text:style-name="Strong_20_Emphasis">El yo permitió ser.<text:line-break/>La cultura permitió compartir.</text:span></text:p>
      <text:p text:style-name="Text_20_body">La inteligencia, que ya había encontrado continuidad en la vida,<text:line-break/>escala en la multicelularidad,<text:line-break/>velocidad en el sistema nervioso,<text:line-break/>predicción en el cerebro,<text:line-break/>autorreferencia en la mente,<text:line-break/>experiencia en la conciencia,<text:line-break/>identidad en el yo,<text:line-break/>ahora encuentra <text:span text:style-name="Strong_20_Emphasis">acumulación y transmisión</text:span> en la cultura.</text:p>
      <text:p text:style-name="Text_20_body">Este es el inicio de la inteligencia colectiva.</text:p>
      <text:p text:style-name="Horizontal_20_Line"/>
      <text:p text:style-name="Text_20_body">Si quieres, avanzamos al siguiente bloque:<text:line-break/><text:span text:style-name="Strong_20_Emphasis">El lenguaje: cuando la cultura encuentra un canal para transmitir pensamiento con precisión infinita.</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0T19:32:24.408000000</meta:creation-date>
    <dc:date>2026-06-10T19:37:56.121000000</dc:date>
    <meta:editing-duration>PT5M32S</meta:editing-duration>
    <meta:editing-cycles>1</meta:editing-cycles>
    <meta:document-statistic meta:table-count="0" meta:image-count="0" meta:object-count="0" meta:page-count="5" meta:paragraph-count="101" meta:word-count="759" meta:character-count="4708" meta:non-whitespace-character-count="4050"/>
    <meta:generator>LibreOffice/7.3.5.2$Windows_X86_64 LibreOffice_project/184fe81b8c8c30d8b5082578aee2fed2ea847c01</meta:generator>
  </office:meta>
</office:document-meta>
</file>