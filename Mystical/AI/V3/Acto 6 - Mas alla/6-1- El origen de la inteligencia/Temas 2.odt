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perfecto.<text:line-break/>Aquí ya estamos entrando en el corazón conceptual de tu libro: <text:span text:style-name="Strong_20_Emphasis">la aparición de la primera inteligencia del universo</text:span>, no la humana, no la neuronal, sino la inteligencia que emerge de la materia cuando adquiere la capacidad de <text:span text:style-name="Emphasis">preservar, transformar y dirigir información</text:span>.</text:p>
      <text:p text:style-name="Text_20_body">Y sí: en tu marco —que comparto plenamente— <text:span text:style-name="Strong_20_Emphasis">el ADN no es un simple soporte</text:span>, sino el primer sistema capaz de <text:span text:style-name="Emphasis">diseñar</text:span>, <text:span text:style-name="Emphasis">probar</text:span>, <text:span text:style-name="Emphasis">corregir</text:span>, <text:span text:style-name="Emphasis">expandir</text:span> y <text:span text:style-name="Emphasis">multiplicar</text:span> formas de vida.<text:line-break/>Es una inteligencia distribuida, lenta, profunda, que opera en escalas temporales que ningún cerebro puede igualar.</text:p>
      <text:p text:style-name="Text_20_body">Lo que haremos ahora es lo que pediste:<text:line-break/><text:span text:style-name="Strong_20_Emphasis">crear una estructura de contenidos para un capítulo dedicado a la aparición de la inteligencia</text:span>, centrado en la inteligencia primordial, la inteligencia del ADN y la transición desde procesos lógicos a procesos inteligentes.</text:p>
      <text:p text:style-name="Text_20_body">A continuación te propongo una estructura clara, elegante y coherente con tu modelo.</text:p>
      <text:p text:style-name="Horizontal_20_Line"/>
      <text:h text:style-name="Heading_20_1" text:outline-level="1"><text:span text:style-name="Strong_20_Emphasis">Estructura del capítulo: La aparición de la inteligencia</text:span></text:h>
      <text:h text:style-name="Heading_20_2" text:outline-level="2"><text:span text:style-name="Strong_20_Emphasis">1. Introducción: ¿Qué significa que la inteligencia “aparezca”?</text:span></text:h>
      <text:list xml:id="list1399441024" text:style-name="L1">
        <text:list-item>
          <text:p text:style-name="P2">Diferencia entre <text:span text:style-name="Emphasis">proceso lógico</text:span> y <text:span text:style-name="Emphasis">proceso inteligente</text:span>. </text:p>
        </text:list-item>
        <text:list-item>
          <text:p text:style-name="P2">La inteligencia como fenómeno emergente, no como propiedad material. </text:p>
        </text:list-item>
        <text:list-item>
          <text:p text:style-name="P1">La pregunta central: ¿qué condiciones deben darse para que un proceso lógico se convierta en inteligencia? </text:p>
        </text:list-item>
      </text:list>
      <text:p text:style-name="Horizontal_20_Line"/>
      <text:h text:style-name="Heading_20_2" text:outline-level="2"><text:span text:style-name="Strong_20_Emphasis">2. Materia reactiva → Materia organizada: el primer nivel de lógica</text:span></text:h>
      <text:list xml:id="list3399455961" text:style-name="L2">
        <text:list-item>
          <text:p text:style-name="P4">Reacciones químicas como transiciones de estado. </text:p>
        </text:list-item>
        <text:list-item>
          <text:p text:style-name="P4">Redes autocatalíticas como los primeros sistemas con coherencia interna. </text:p>
        </text:list-item>
        <text:list-item>
          <text:p text:style-name="P3">Por qué esto aún no es inteligencia: no hay selección, memoria ni propósito. </text:p>
        </text:list-item>
      </text:list>
      <text:p text:style-name="Horizontal_20_Line"/>
      <text:h text:style-name="Heading_20_2" text:outline-level="2"><text:span text:style-name="Strong_20_Emphasis">3. La reproducción como punto de inflexión</text:span></text:h>
      <text:list xml:id="list3807420090" text:style-name="L3">
        <text:list-item>
          <text:p text:style-name="P6">La reproducción como el primer mecanismo que preserva información. </text:p>
        </text:list-item>
        <text:list-item>
          <text:p text:style-name="P6">La aparición de la continuidad estructural. </text:p>
        </text:list-item>
        <text:list-item>
          <text:p text:style-name="P6">La diferencia entre “mantenerse” y “multiplicarse”. </text:p>
        </text:list-item>
        <text:list-item>
          <text:p text:style-name="P5"><text:soft-page-break/>Cómo la reproducción convierte la química en un proceso histórico. </text:p>
        </text:list-item>
      </text:list>
      <text:p text:style-name="Horizontal_20_Line"/>
      <text:h text:style-name="Heading_20_2" text:outline-level="2"><text:span text:style-name="Strong_20_Emphasis">4. Evolución: optimización sin inteligencia</text:span></text:h>
      <text:list xml:id="list1436413461" text:style-name="L4">
        <text:list-item>
          <text:p text:style-name="P8">La selección natural como un algoritmo ciego. </text:p>
        </text:list-item>
        <text:list-item>
          <text:p text:style-name="P8">Adaptación sin intención. </text:p>
        </text:list-item>
        <text:list-item>
          <text:p text:style-name="P8">Por qué la evolución no es inteligencia, pero prepara el terreno para ella. </text:p>
        </text:list-item>
        <text:list-item>
          <text:p text:style-name="P7">La paradoja: un proceso no inteligente que genera estructuras cada vez más inteligentes. </text:p>
        </text:list-item>
      </text:list>
      <text:p text:style-name="Horizontal_20_Line"/>
      <text:h text:style-name="Heading_20_2" text:outline-level="2"><text:span text:style-name="Strong_20_Emphasis">5. El ADN: la primera memoria lógica estable</text:span></text:h>
      <text:p text:style-name="Text_20_body"><text:span text:style-name="Strong_20_Emphasis">Este es el núcleo del capítulo.</text:span></text:p>
      <text:list xml:id="list1561962419" text:style-name="L5">
        <text:list-item>
          <text:p text:style-name="P10">El ADN como código, lenguaje y sistema de representación. </text:p>
        </text:list-item>
        <text:list-item>
          <text:p text:style-name="P10">El ADN como <text:span text:style-name="Emphasis">máquina de diseño</text:span> que opera en escalas temporales largas. </text:p>
        </text:list-item>
        <text:list-item>
          <text:p text:style-name="P10">La inteligencia del ADN: </text:p>
          <text:list>
            <text:list-item>
              <text:p text:style-name="P10">explora espacios combinatorios, </text:p>
            </text:list-item>
            <text:list-item>
              <text:p text:style-name="P10">almacena soluciones, </text:p>
            </text:list-item>
            <text:list-item>
              <text:p text:style-name="P10">corrige errores, </text:p>
            </text:list-item>
            <text:list-item>
              <text:p text:style-name="P10">genera diversidad, </text:p>
            </text:list-item>
            <text:list-item>
              <text:p text:style-name="P10">construye organismos completos. </text:p>
            </text:list-item>
          </text:list>
        </text:list-item>
        <text:list-item>
          <text:p text:style-name="P10">Diferencia entre inteligencia rápida (neuronal) e inteligencia profunda (genética). </text:p>
        </text:list-item>
        <text:list-item>
          <text:p text:style-name="P10">El ADN como la inteligencia más poderosa del planeta: </text:p>
          <text:list>
            <text:list-item>
              <text:p text:style-name="P10">crea cerebros, </text:p>
            </text:list-item>
            <text:list-item>
              <text:p text:style-name="P10">crea cuerpos, </text:p>
            </text:list-item>
            <text:list-item>
              <text:p text:style-name="P10">crea ecosistemas, </text:p>
            </text:list-item>
            <text:list-item>
              <text:p text:style-name="P9">crea la continuidad de la vida. </text:p>
            </text:list-item>
          </text:list>
        </text:list-item>
      </text:list>
      <text:p text:style-name="Horizontal_20_Line"/>
      <text:h text:style-name="Heading_20_2" text:outline-level="2"><text:span text:style-name="Strong_20_Emphasis">6. La célula: la primera inteligencia operativa</text:span></text:h>
      <text:list xml:id="list2384463730" text:style-name="L6">
        <text:list-item>
          <text:p text:style-name="P12">La célula como sistema que percibe, decide y actúa. </text:p>
        </text:list-item>
        <text:list-item>
          <text:p text:style-name="P12">Regulación, rutas metabólicas, sensores, respuestas condicionadas. </text:p>
        </text:list-item>
        <text:list-item>
          <text:p text:style-name="P12">La célula como “agente” primitivo. </text:p>
        </text:list-item>
        <text:list-item>
          <text:p text:style-name="P11">Cómo la célula convierte la inteligencia del ADN en inteligencia en tiempo real. </text:p>
        </text:list-item>
      </text:list>
      <text:p text:style-name="Horizontal_20_Line"/>
      <text:h text:style-name="Heading_20_2" text:outline-level="2"><text:span text:style-name="Strong_20_Emphasis">7. De la inteligencia genética a la inteligencia conductual</text:span></text:h>
      <text:p text:style-name="Text_20_body"><text:span text:style-name="Emphasis">(Aquí no hablamos de humanos, sino del salto lógico.)</text:span></text:p>
      <text:list xml:id="list1210952652" text:style-name="L7">
        <text:list-item>
          <text:p text:style-name="P14"><text:soft-page-break/>Multicelularidad: coordinación y especialización. </text:p>
        </text:list-item>
        <text:list-item>
          <text:p text:style-name="P14">Sistemas nerviosos: integración de información. </text:p>
        </text:list-item>
        <text:list-item>
          <text:p text:style-name="P14">Aprendizaje dentro de la vida del individuo. </text:p>
        </text:list-item>
        <text:list-item>
          <text:p text:style-name="P14">La inteligencia como un fenómeno en dos escalas: </text:p>
          <text:list>
            <text:list-item>
              <text:p text:style-name="P14"><text:span text:style-name="Strong_20_Emphasis">larga</text:span> (ADN), </text:p>
            </text:list-item>
            <text:list-item>
              <text:p text:style-name="P13"><text:span text:style-name="Strong_20_Emphasis">corta</text:span> (organismo). </text:p>
            </text:list-item>
          </text:list>
        </text:list-item>
      </text:list>
      <text:p text:style-name="Horizontal_20_Line"/>
      <text:h text:style-name="Heading_20_2" text:outline-level="2"><text:span text:style-name="Strong_20_Emphasis">8. Dos inteligencias, un mismo origen</text:span></text:h>
      <text:list xml:id="list2188538803" text:style-name="L8">
        <text:list-item>
          <text:p text:style-name="P16">La inteligencia genética (lenta, profunda, estructural). </text:p>
        </text:list-item>
        <text:list-item>
          <text:p text:style-name="P16">La inteligencia neuronal (rápida, adaptativa, operativa). </text:p>
        </text:list-item>
        <text:list-item>
          <text:p text:style-name="P16">Cómo ambas se complementan. </text:p>
        </text:list-item>
        <text:list-item>
          <text:p text:style-name="P16">Por qué la inteligencia neuronal es espectacular pero no fundamental. </text:p>
        </text:list-item>
        <text:list-item>
          <text:p text:style-name="P15">Por qué la inteligencia del ADN es la que realmente “hace el trabajo”. </text:p>
        </text:list-item>
      </text:list>
      <text:p text:style-name="Horizontal_20_Line"/>
      <text:h text:style-name="Heading_20_2" text:outline-level="2"><text:span text:style-name="Strong_20_Emphasis">9. Conclusión: La inteligencia como continuidad lógica</text:span></text:h>
      <text:list xml:id="list3806461741" text:style-name="L9">
        <text:list-item>
          <text:p text:style-name="P18">La inteligencia no aparece de golpe: se construye por capas. </text:p>
        </text:list-item>
        <text:list-item>
          <text:p text:style-name="P18">El ADN como el verdadero arquitecto de la vida. </text:p>
        </text:list-item>
        <text:list-item>
          <text:p text:style-name="P18">La célula como la primera manifestación clara de inteligencia. </text:p>
        </text:list-item>
        <text:list-item>
          <text:p text:style-name="P18">La inteligencia humana como una rama tardía, no como el origen. </text:p>
        </text:list-item>
        <text:list-item>
          <text:p text:style-name="P17">La idea central del capítulo:<text:line-break/><text:span text:style-name="Strong_20_Emphasis">la inteligencia comienza cuando la información adquiere la capacidad de preservarse, transformarse y dirigir su propia continuidad.</text:span> </text:p>
        </text:list-item>
      </text:list>
      <text:p text:style-name="Horizontal_20_Line"/>
      <text:h text:style-name="Heading_20_1" text:outline-level="1"><text:span text:style-name="Strong_20_Emphasis">Si quieres, puedo ahora:</text:span></text:h>
      <text:list xml:id="list3355278373" text:style-name="L10">
        <text:list-item>
          <text:p text:style-name="P20">desarrollar cada sección en prosa, </text:p>
        </text:list-item>
        <text:list-item>
          <text:p text:style-name="P20">convertirlo en un esquema narrativo, </text:p>
        </text:list-item>
        <text:list-item>
          <text:p text:style-name="P19">o escribir directamente el capítulo completo. </text:p>
        </text:list-item>
      </text:list>
      <text:p text:style-name="Text_20_body">¿Cuál prefieres desarrollar primer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9T19:22:24.857000000</meta:creation-date>
    <dc:date>2026-05-29T19:22:41.297000000</dc:date>
    <meta:editing-duration>PT16S</meta:editing-duration>
    <meta:editing-cycles>1</meta:editing-cycles>
    <meta:document-statistic meta:table-count="0" meta:image-count="0" meta:object-count="0" meta:page-count="3" meta:paragraph-count="69" meta:word-count="666" meta:character-count="4275" meta:non-whitespace-character-count="3678"/>
    <meta:generator>LibreOffice/7.3.5.2$Windows_X86_64 LibreOffice_project/184fe81b8c8c30d8b5082578aee2fed2ea847c01</meta:generator>
  </office:meta>
</office:document-meta>
</file>