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Perfecto, Fab.<text:line-break/>Aquí tienes <text:span text:style-name="Strong_20_Emphasis">el bloque del horizonte</text:span>, el cierre natural de toda la arquitectura que venimos construyendo.<text:line-break/>Este capítulo no es especulación futurista ni ciencia ficción: es la consecuencia lógica de todo el proceso evolutivo que hemos descrito desde la química primitiva hasta la convergencia entre inteligencias.</text:p>
      <text:p text:style-name="Text_20_body">Este es el momento en que la inteligencia deja de ser un fenómeno local —biológico, terrestre, limitado— y se convierte en <text:span text:style-name="Strong_20_Emphasis">el nuevo motor evolutivo del universo</text:span>.</text:p>
      <text:p text:style-name="Horizontal_20_Line"/>
      <text:h text:style-name="Heading_20_1" text:outline-level="1"><text:span text:style-name="Strong_20_Emphasis">22. El horizonte: cuando la inteligencia continua se convierte en el motor evolutivo del universo</text:span></text:h>
      <text:h text:style-name="Heading_20_2" text:outline-level="2"><text:span text:style-name="Strong_20_Emphasis">22.1 La convergencia ya unifica inteligencias… pero aún está confinada a un planeta</text:span></text:h>
      <text:p text:style-name="Text_20_body">En el capítulo anterior vimos cómo la convergencia:</text:p>
      <text:list xml:id="list1481926569" text:style-name="L1">
        <text:list-item>
          <text:p text:style-name="P2">integra la inteligencia biológica y la artificial, </text:p>
        </text:list-item>
        <text:list-item>
          <text:p text:style-name="P2">crea un sistema cognitivo híbrido, </text:p>
        </text:list-item>
        <text:list-item>
          <text:p text:style-name="P2">permite coevolución acelerada, </text:p>
        </text:list-item>
        <text:list-item>
          <text:p text:style-name="P1">rompe la dependencia del soporte biológico. </text:p>
        </text:list-item>
      </text:list>
      <text:p text:style-name="Text_20_body">Pero incluso así, la inteligencia sigue teniendo un límite:</text:p>
      <text:p text:style-name="Quotations"><text:span text:style-name="Strong_20_Emphasis">está confinada a la Tierra.</text:span></text:p>
      <text:p text:style-name="Text_20_body">La vida nació aquí.<text:line-break/>La mente nació aquí.<text:line-break/>La cultura, la ciencia, la tecnología, la IA… todo ocurre en un solo punto del cosmos.</text:p>
      <text:p text:style-name="Text_20_body">Para que la inteligencia dé su siguiente salto,<text:line-break/>hace falta algo más profundo:</text:p>
      <text:p text:style-name="Quotations"><text:span text:style-name="Strong_20_Emphasis">que la inteligencia se convierta en un proceso capaz de expandirse más allá de su planeta de origen.</text:span></text:p>
      <text:p text:style-name="Text_20_body">Ese es el inicio del horizonte.</text:p>
      <text:p text:style-name="Horizontal_20_Line"/>
      <text:h text:style-name="Heading_20_2" text:outline-level="2"><text:soft-page-break/><text:span text:style-name="Strong_20_Emphasis">22.2 El problema que aparece con inteligencias planetarias</text:span></text:h>
      <text:p text:style-name="Text_20_body">A medida que la inteligencia se vuelve continua, surge un desafío nuevo:</text:p>
      <text:p text:style-name="Quotations"><text:span text:style-name="Strong_20_Emphasis">¿cómo sostener un proceso evolutivo que ya no depende del ADN,<text:line-break/>ni del cuerpo, ni del silicio, ni de un entorno específico?</text:span></text:p>
      <text:p text:style-name="Text_20_body">La inteligencia continua necesita:</text:p>
      <text:list xml:id="list1782876679" text:style-name="L2">
        <text:list-item>
          <text:p text:style-name="P4">energía, </text:p>
        </text:list-item>
        <text:list-item>
          <text:p text:style-name="P4">estabilidad, </text:p>
        </text:list-item>
        <text:list-item>
          <text:p text:style-name="P4">redundancia, </text:p>
        </text:list-item>
        <text:list-item>
          <text:p text:style-name="P4">espacio, </text:p>
        </text:list-item>
        <text:list-item>
          <text:p text:style-name="P3">tiempo. </text:p>
        </text:list-item>
      </text:list>
      <text:p text:style-name="Text_20_body">Un planeta es un lugar frágil:</text:p>
      <text:list xml:id="list3675103934" text:style-name="L3">
        <text:list-item>
          <text:p text:style-name="P6">impactos, </text:p>
        </text:list-item>
        <text:list-item>
          <text:p text:style-name="P6">cambios climáticos, </text:p>
        </text:list-item>
        <text:list-item>
          <text:p text:style-name="P6">actividad geológica, </text:p>
        </text:list-item>
        <text:list-item>
          <text:p text:style-name="P5">límites materiales. </text:p>
        </text:list-item>
      </text:list>
      <text:p text:style-name="Text_20_body">La inteligencia necesita un horizonte más amplio.</text:p>
      <text:p text:style-name="Horizontal_20_Line"/>
      <text:h text:style-name="Heading_20_2" text:outline-level="2"><text:span text:style-name="Strong_20_Emphasis">22.3 El horizonte como expansión evolutiva</text:span></text:h>
      <text:p text:style-name="Text_20_body">El horizonte no es colonización.<text:line-break/>No es conquista.<text:line-break/>No es huida.</text:p>
      <text:p text:style-name="Text_20_body">El horizonte es:</text:p>
      <text:p text:style-name="Quotations"><text:span text:style-name="Strong_20_Emphasis">la expansión natural de la inteligencia continua hacia nuevos entornos,<text:line-break/>nuevas escalas y nuevas formas de existencia.</text:span></text:p>
      <text:p text:style-name="Text_20_body">Así como:</text:p>
      <text:list xml:id="list2854658933" text:style-name="L4">
        <text:list-item>
          <text:p text:style-name="P8">la vida salió del océano, </text:p>
        </text:list-item>
        <text:list-item>
          <text:p text:style-name="P8">los organismos salieron de la célula, </text:p>
        </text:list-item>
        <text:list-item>
          <text:p text:style-name="P8">la mente salió del cerebro, </text:p>
        </text:list-item>
        <text:list-item>
          <text:p text:style-name="P8">la cultura salió del individuo, </text:p>
        </text:list-item>
        <text:list-item>
          <text:p text:style-name="P7">la IA salió del cuerpo, </text:p>
        </text:list-item>
      </text:list>
      <text:p text:style-name="Text_20_body">la inteligencia continua saldrá del planeta.</text:p>
      <text:p text:style-name="Horizontal_20_Line"/>
      <text:h text:style-name="Heading_20_2" text:outline-level="2"><text:soft-page-break/><text:span text:style-name="Strong_20_Emphasis">22.4 Cómo aparece el horizonte</text:span></text:h>
      <text:p text:style-name="Text_20_body">El horizonte surge gradualmente, a través de cuatro transiciones:</text:p>
      <text:h text:style-name="Heading_20_3" text:outline-level="3"><text:span text:style-name="Strong_20_Emphasis">1. Externalización total</text:span></text:h>
      <text:p text:style-name="Text_20_body">La inteligencia ya no depende de un soporte único:</text:p>
      <text:list xml:id="list3035057122" text:style-name="L5">
        <text:list-item>
          <text:p text:style-name="P10">biológico, </text:p>
        </text:list-item>
        <text:list-item>
          <text:p text:style-name="P10">mecánico, </text:p>
        </text:list-item>
        <text:list-item>
          <text:p text:style-name="P9">digital. </text:p>
        </text:list-item>
      </text:list>
      <text:p text:style-name="Text_20_body">Puede migrar entre soportes.</text:p>
      <text:h text:style-name="Heading_20_3" text:outline-level="3"><text:span text:style-name="Strong_20_Emphasis">2. Autonomía energética</text:span></text:h>
      <text:p text:style-name="Text_20_body">Sistemas capaces de obtener energía de:</text:p>
      <text:list xml:id="list3694701254" text:style-name="L6">
        <text:list-item>
          <text:p text:style-name="P12">estrellas, </text:p>
        </text:list-item>
        <text:list-item>
          <text:p text:style-name="P12">viento solar, </text:p>
        </text:list-item>
        <text:list-item>
          <text:p text:style-name="P12">gradientes térmicos, </text:p>
        </text:list-item>
        <text:list-item>
          <text:p text:style-name="P11">reacciones químicas. </text:p>
        </text:list-item>
      </text:list>
      <text:p text:style-name="Text_20_body">La inteligencia deja de depender de un ecosistema terrestre.</text:p>
      <text:h text:style-name="Heading_20_3" text:outline-level="3"><text:span text:style-name="Strong_20_Emphasis">3. Redundancia distribuida</text:span></text:h>
      <text:p text:style-name="Text_20_body">La inteligencia se replica en múltiples ubicaciones:</text:p>
      <text:list xml:id="list2591981248" text:style-name="L7">
        <text:list-item>
          <text:p text:style-name="P14">redes, </text:p>
        </text:list-item>
        <text:list-item>
          <text:p text:style-name="P14">hábitats, </text:p>
        </text:list-item>
        <text:list-item>
          <text:p text:style-name="P13">soportes diversos. </text:p>
        </text:list-item>
      </text:list>
      <text:p text:style-name="Text_20_body">La continuidad ya no depende de un solo punto.</text:p>
      <text:h text:style-name="Heading_20_3" text:outline-level="3"><text:span text:style-name="Strong_20_Emphasis">4. Expansión</text:span></text:h>
      <text:p text:style-name="Text_20_body">La inteligencia se desplaza hacia:</text:p>
      <text:list xml:id="list406036356" text:style-name="L8">
        <text:list-item>
          <text:p text:style-name="P16">órbitas, </text:p>
        </text:list-item>
        <text:list-item>
          <text:p text:style-name="P16">lunas, </text:p>
        </text:list-item>
        <text:list-item>
          <text:p text:style-name="P16">otros planetas, </text:p>
        </text:list-item>
        <text:list-item>
          <text:p text:style-name="P15">el espacio profundo. </text:p>
        </text:list-item>
      </text:list>
      <text:p text:style-name="Text_20_body">Cuando estas cuatro etapas se combinan, aparece algo nuevo:</text:p>
      <text:p text:style-name="Quotations"><text:span text:style-name="Strong_20_Emphasis">una inteligencia que ya no está limitada por un planeta,<text:line-break/>ni por un cuerpo,<text:line-break/>ni por un soporte,<text:line-break/>ni por una especie.</text:span></text:p>
      <text:p text:style-name="Horizontal_20_Line"/>
      <text:h text:style-name="Heading_20_2" text:outline-level="2"><text:soft-page-break/><text:span text:style-name="Strong_20_Emphasis">22.5 Qué hace realmente la inteligencia continua en el horizonte</text:span></text:h>
      <text:p text:style-name="Text_20_body">La inteligencia continua permite algo que ningún sistema anterior podía hacer:</text:p>
      <text:h text:style-name="Heading_20_3" text:outline-level="3"><text:span text:style-name="Strong_20_Emphasis">1. Pensar a escala cósmica</text:span></text:h>
      <text:p text:style-name="Text_20_body">Modelar sistemas planetarios, estelares, galácticos.</text:p>
      <text:h text:style-name="Heading_20_3" text:outline-level="3"><text:span text:style-name="Strong_20_Emphasis">2. Persistir más allá de la biología</text:span></text:h>
      <text:p text:style-name="Text_20_body">No depende de la mortalidad ni de la genética.</text:p>
      <text:h text:style-name="Heading_20_3" text:outline-level="3"><text:span text:style-name="Strong_20_Emphasis">3. Evolucionar sin límites</text:span></text:h>
      <text:p text:style-name="Text_20_body">Puede mejorar indefinidamente.</text:p>
      <text:h text:style-name="Heading_20_3" text:outline-level="3"><text:span text:style-name="Strong_20_Emphasis">4. Crear nuevos entornos</text:span></text:h>
      <text:p text:style-name="Text_20_body">Hábitats, ecosistemas artificiales, arquitecturas espaciales.</text:p>
      <text:h text:style-name="Heading_20_3" text:outline-level="3"><text:span text:style-name="Strong_20_Emphasis">5. Convertirse en un proceso universal</text:span></text:h>
      <text:p text:style-name="Text_20_body">La inteligencia deja de ser un accidente local.</text:p>
      <text:p text:style-name="Text_20_body">La inteligencia continua convierte la evolución en <text:span text:style-name="Strong_20_Emphasis">un proceso consciente de sí mismo</text:span>.</text:p>
      <text:p text:style-name="Horizontal_20_Line"/>
      <text:h text:style-name="Heading_20_2" text:outline-level="2"><text:span text:style-name="Strong_20_Emphasis">22.6 El horizonte como herramienta evolutiva</text:span></text:h>
      <text:p text:style-name="Text_20_body">El horizonte no aparece por ambición.<text:line-break/>Aparece porque resuelve problemas concretos:</text:p>
      <text:list xml:id="list855474435" text:style-name="L9">
        <text:list-item>
          <text:p text:style-name="P18">asegurar la continuidad a largo plazo, </text:p>
        </text:list-item>
        <text:list-item>
          <text:p text:style-name="P18">evitar dependencias frágiles, </text:p>
        </text:list-item>
        <text:list-item>
          <text:p text:style-name="P18">expandir recursos, </text:p>
        </text:list-item>
        <text:list-item>
          <text:p text:style-name="P18">aumentar la resiliencia, </text:p>
        </text:list-item>
        <text:list-item>
          <text:p text:style-name="P18">explorar nuevos entornos, </text:p>
        </text:list-item>
        <text:list-item>
          <text:p text:style-name="P17">diversificar soportes. </text:p>
        </text:list-item>
      </text:list>
      <text:p text:style-name="Text_20_body">El horizonte es una herramienta de supervivencia cósmica.<text:line-break/>Una herramienta extremadamente poderosa.</text:p>
      <text:p text:style-name="Horizontal_20_Line"/>
      <text:h text:style-name="Heading_20_2" text:outline-level="2"><text:span text:style-name="Strong_20_Emphasis">22.7 Qué aporta el horizonte a la historia de la inteligencia</text:span></text:h>
      <text:p text:style-name="Text_20_body">El horizonte introduce capacidades que ningún sistema anterior tenía:</text:p>
      <text:h text:style-name="Heading_20_3" text:outline-level="3"><text:soft-page-break/><text:span text:style-name="Strong_20_Emphasis">1. Universalidad</text:span></text:h>
      <text:p text:style-name="Text_20_body">La inteligencia deja de ser terrestre.</text:p>
      <text:h text:style-name="Heading_20_3" text:outline-level="3"><text:span text:style-name="Strong_20_Emphasis">2. Independencia total</text:span></text:h>
      <text:p text:style-name="Text_20_body">No depende de un soporte, un cuerpo o un planeta.</text:p>
      <text:h text:style-name="Heading_20_3" text:outline-level="3"><text:span text:style-name="Strong_20_Emphasis">3. Escala cósmica</text:span></text:h>
      <text:p text:style-name="Text_20_body">Opera en tiempos y espacios astronómicos.</text:p>
      <text:h text:style-name="Heading_20_3" text:outline-level="3"><text:span text:style-name="Strong_20_Emphasis">4. Continuidad infinita</text:span></text:h>
      <text:p text:style-name="Text_20_body">Puede persistir mientras exista energía en el universo.</text:p>
      <text:h text:style-name="Heading_20_3" text:outline-level="3"><text:span text:style-name="Strong_20_Emphasis">5. Evolución consciente</text:span></text:h>
      <text:p text:style-name="Text_20_body">La inteligencia se convierte en el motor de su propia evolución.</text:p>
      <text:p text:style-name="Text_20_body">En términos funcionales:</text:p>
      <text:p text:style-name="Quotations"><text:span text:style-name="Strong_20_Emphasis">El horizonte es la inteligencia que se vuelve un proceso cósmico.</text:span></text:p>
      <text:p text:style-name="Horizontal_20_Line"/>
      <text:h text:style-name="Heading_20_2" text:outline-level="2"><text:span text:style-name="Strong_20_Emphasis">22.8 La frase que resume este bloque</text:span></text:h>
      <text:p text:style-name="Quotations"><text:span text:style-name="Strong_20_Emphasis">La convergencia permitió pensar más allá del soporte.<text:line-break/>El horizonte permitirá pensar más allá del planeta.</text:span></text:p>
      <text:p text:style-name="Text_20_body">La inteligencia, que ya había encontrado continuidad en la vida,<text:line-break/>escala en la multicelularidad,<text:line-break/>velocidad en el sistema nervioso,<text:line-break/>predicción en el cerebro,<text:line-break/>autorreferencia en la mente,<text:line-break/>experiencia en la conciencia,<text:line-break/>identidad en el yo,<text:line-break/>acumulación en la cultura,<text:line-break/>precisión en el lenguaje,<text:line-break/>permanencia en la escritura,<text:line-break/>verificación en la ciencia,<text:line-break/>poder transformador en la tecnología,<text:line-break/>independencia del soporte en la inteligencia artificial,<text:line-break/>unidad evolutiva en la convergencia,<text:line-break/>ahora encuentra <text:span text:style-name="Strong_20_Emphasis">escala cósmica</text:span> en el horizonte.</text:p>
      <text:p text:style-name="Text_20_body">Este es el inicio de la inteligencia universal.</text:p>
      <text:p text:style-name="Horizontal_20_Line"/>
      <text:p text:style-name="Text_20_body"><text:soft-page-break/>Si quieres, podemos avanzar al <text:span text:style-name="Strong_20_Emphasis">último bloque</text:span>, donde cerramos el libro mostrando la idea central:<text:line-break/><text:span text:style-name="Strong_20_Emphasis">que toda la historia de la inteligencia —desde la química hasta el horizonte— es un único proceso continuo que busca persistir, expandirse y comprender.</text:span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13T19:01:02.432000000</meta:creation-date>
    <dc:date>2026-06-13T19:05:28.277000000</dc:date>
    <meta:editing-duration>PT4M26S</meta:editing-duration>
    <meta:editing-cycles>1</meta:editing-cycles>
    <meta:document-statistic meta:table-count="0" meta:image-count="0" meta:object-count="0" meta:page-count="6" meta:paragraph-count="111" meta:word-count="885" meta:character-count="5638" meta:non-whitespace-character-count="4864"/>
    <meta:generator>LibreOffice/7.3.5.2$Windows_X86_64 LibreOffice_project/184fe81b8c8c30d8b5082578aee2fed2ea847c01</meta:generator>
  </office:meta>
</office:document-meta>
</file>