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r supuesto, Fab.<text:line-break/>Aquí tienes <text:span text:style-name="Strong_20_Emphasis">el bloque completo de “Reproducción y evolución”</text:span>, reescrito <text:span text:style-name="Strong_20_Emphasis">como texto para el libro</text:span>, sin referencias a ti, sin mencionar “tu modelo”, y con una definición de reproducción coherente con lo que planteas: <text:span text:style-name="Strong_20_Emphasis">recreación con variación</text:span>, no copia.</text:p>
      <text:p text:style-name="Text_20_body">El tono es claro, accesible, elegante y completamente autónomo.</text:p>
      <text:p text:style-name="Horizontal_20_Line"/>
      <text:h text:style-name="Heading_20_1" text:outline-level="1"><text:span text:style-name="Strong_20_Emphasis">4. Reproducción y evolución</text:span></text:h>
      <text:h text:style-name="Heading_20_2" text:outline-level="2"><text:span text:style-name="Strong_20_Emphasis">4.1 Qué es reproducirse</text:span></text:h>
      <text:p text:style-name="Text_20_body">En el lenguaje cotidiano solemos pensar que reproducirse es “copiarse”.<text:line-break/>Pero copiar significa hacer algo idéntico, sin cambios.<text:line-break/>La reproducción no funciona así.</text:p>
      <text:p text:style-name="Text_20_body">En la naturaleza, reproducirse significa:</text:p>
      <text:p text:style-name="Quotations"><text:span text:style-name="Strong_20_Emphasis">volver a crear algo siguiendo un mismo patrón básico,<text:line-break/>usando componentes similares,<text:line-break/>pero permitiendo variaciones.</text:span></text:p>
      <text:p text:style-name="Text_20_body">Es recreación, no copia.</text:p>
      <text:p text:style-name="Text_20_body">Ejemplos sencillos:</text:p>
      <text:list xml:id="list2124834305" text:style-name="L1">
        <text:list-item>
          <text:p text:style-name="P2">Dos galletas hechas con el mismo molde nunca son exactamente iguales. </text:p>
        </text:list-item>
        <text:list-item>
          <text:p text:style-name="P2">Dos plantas nacidas de la misma semilla crecen de forma distinta. </text:p>
        </text:list-item>
        <text:list-item>
          <text:p text:style-name="P1">Dos casas construidas con el mismo plano siempre tienen diferencias. </text:p>
        </text:list-item>
      </text:list>
      <text:p text:style-name="Text_20_body">La reproducción repite un <text:span text:style-name="Strong_20_Emphasis">diseño general</text:span>, pero cada nueva versión es ligeramente distinta.</text:p>
      <text:p text:style-name="Text_20_body">Esa variación es esencial.</text:p>
      <text:p text:style-name="Horizontal_20_Line"/>
      <text:h text:style-name="Heading_20_2" text:outline-level="2"><text:span text:style-name="Strong_20_Emphasis">4.2 Qué es evolucionar</text:span></text:h>
      <text:p text:style-name="Text_20_body">Si cada reproducción introduce pequeñas diferencias, entonces algunas versiones funcionan mejor que otras.</text:p>
      <text:p text:style-name="Text_20_body">Evolucionar significa:</text:p>
      <text:p text:style-name="Quotations"><text:span text:style-name="Strong_20_Emphasis">que las variaciones que mejor funcionan se vuelven más comunes con el tiempo.</text:span></text:p>
      <text:p text:style-name="Text_20_body">No hace falta intención.<text:line-break/>No hace falta planificación.<text:line-break/>No hace falta inteligencia consciente.</text:p>
      <text:p text:style-name="Text_20_body"><text:soft-page-break/>Solo hace falta:</text:p>
      <text:list xml:id="list526243004" text:style-name="L2">
        <text:list-item>
          <text:p text:style-name="P4">recreación, </text:p>
        </text:list-item>
        <text:list-item>
          <text:p text:style-name="P4">variación, </text:p>
        </text:list-item>
        <text:list-item>
          <text:p text:style-name="P3">y consecuencias. </text:p>
        </text:list-item>
      </text:list>
      <text:p text:style-name="Text_20_body">Las versiones que se mantienen mejor, duran más.<text:line-break/>Las que duran más, se recrean más veces.<text:line-break/>Y así, poco a poco, el sistema mejora.</text:p>
      <text:p text:style-name="Horizontal_20_Line"/>
      <text:h text:style-name="Heading_20_2" text:outline-level="2"><text:span text:style-name="Strong_20_Emphasis">4.3 El universo antes de la reproducción</text:span></text:h>
      <text:p text:style-name="Text_20_body">Antes de que existiera la reproducción, el universo era un lugar lleno de reacciones químicas:</text:p>
      <text:list xml:id="list3220026554" text:style-name="L3">
        <text:list-item>
          <text:p text:style-name="P6">moléculas que se formaban, </text:p>
        </text:list-item>
        <text:list-item>
          <text:p text:style-name="P6">se rompían, </text:p>
        </text:list-item>
        <text:list-item>
          <text:p text:style-name="P6">se combinaban, </text:p>
        </text:list-item>
        <text:list-item>
          <text:p text:style-name="P5">desaparecían. </text:p>
        </text:list-item>
      </text:list>
      <text:p text:style-name="Text_20_body">Incluso las redes autocatalíticas, aunque podían mantenerse durante un tiempo, <text:span text:style-name="Strong_20_Emphasis">no generaban descendencia</text:span>.<text:line-break/>No había “hijas”, ni “nietas”, ni “líneas” de sistemas que se repitieran.</text:p>
      <text:p text:style-name="Text_20_body">Todo ocurría una sola vez.<text:line-break/>Nada se acumulaba.<text:line-break/>Nada se heredaba.</text:p>
      <text:p text:style-name="Text_20_body">Era un universo sin historia.</text:p>
      <text:p text:style-name="Horizontal_20_Line"/>
      <text:h text:style-name="Heading_20_2" text:outline-level="2"><text:span text:style-name="Strong_20_Emphasis">4.4 Qué cambia cuando aparece la reproducción</text:span></text:h>
      <text:p text:style-name="Text_20_body">La aparición de la reproducción transforma la química en algo completamente nuevo.</text:p>
      <text:p text:style-name="Text_20_body">Cuando un sistema puede <text:span text:style-name="Strong_20_Emphasis">recrearse</text:span> siguiendo un patrón:</text:p>
      <text:list xml:id="list760316688" text:style-name="L4">
        <text:list-item>
          <text:p text:style-name="P8">aparece una <text:span text:style-name="Strong_20_Emphasis">serie</text:span> de versiones, </text:p>
        </text:list-item>
        <text:list-item>
          <text:p text:style-name="P8">aparece una <text:span text:style-name="Strong_20_Emphasis">línea temporal</text:span>, </text:p>
        </text:list-item>
        <text:list-item>
          <text:p text:style-name="P8">aparece la posibilidad de <text:span text:style-name="Strong_20_Emphasis">acumular cambios</text:span>, </text:p>
        </text:list-item>
        <text:list-item>
          <text:p text:style-name="P8">aparece la <text:span text:style-name="Strong_20_Emphasis">herencia</text:span>, </text:p>
        </text:list-item>
        <text:list-item>
          <text:p text:style-name="P7">aparece la <text:span text:style-name="Strong_20_Emphasis">mejora</text:span>. </text:p>
        </text:list-item>
      </text:list>
      <text:p text:style-name="Text_20_body">La reproducción convierte un sistema aislado en una <text:span text:style-name="Strong_20_Emphasis">familia de sistemas</text:span> que se extiende en el tiempo.</text:p>
      <text:p text:style-name="Text_20_body">Y como cada recreación introduce variaciones, algunas versiones funcionan mejor que otras.<text:line-break/>Esas versiones se vuelven más frecuentes.</text:p>
      <text:p text:style-name="Text_20_body"><text:soft-page-break/>Así nace la evolución.</text:p>
      <text:p text:style-name="Horizontal_20_Line"/>
      <text:h text:style-name="Heading_20_2" text:outline-level="2"><text:span text:style-name="Strong_20_Emphasis">4.5 Reproducción y evolución como formas primitivas de inteligencia</text:span></text:h>
      <text:p text:style-name="Text_20_body">En este punto ocurre algo profundo.</text:p>
      <text:p text:style-name="Text_20_body">La reproducción y la evolución no son vida todavía, pero tampoco son química pasiva.<text:line-break/>Son algo intermedio:<text:line-break/><text:span text:style-name="Strong_20_Emphasis">procesos que conservan un patrón, lo recrean y lo mejoran.</text:span></text:p>
      <text:p text:style-name="Text_20_body">Esto introduce por primera vez:</text:p>
      <text:list xml:id="list3411121143" text:style-name="L5">
        <text:list-item>
          <text:p text:style-name="P10">continuidad, </text:p>
        </text:list-item>
        <text:list-item>
          <text:p text:style-name="P10">memoria estructural, </text:p>
        </text:list-item>
        <text:list-item>
          <text:p text:style-name="P10">selección, </text:p>
        </text:list-item>
        <text:list-item>
          <text:p text:style-name="P10">refinamiento, </text:p>
        </text:list-item>
        <text:list-item>
          <text:p text:style-name="P9">dirección en el tiempo. </text:p>
        </text:list-item>
      </text:list>
      <text:p text:style-name="Text_20_body">La química deja de ser un conjunto de eventos aislados y se convierte en un proceso que <text:span text:style-name="Strong_20_Emphasis">aprende a mantenerse</text:span>.</text:p>
      <text:p text:style-name="Text_20_body">La reproducción crea la continuidad.<text:line-break/>La evolución mejora esa continuidad.</text:p>
      <text:p text:style-name="Text_20_body">Juntas forman la primera forma de <text:span text:style-name="Strong_20_Emphasis">inteligencia primitiva</text:span> del universo:<text:line-break/>la capacidad de un sistema de conservar su forma a través del tiempo, recrearse y volverse mejor en hacerlo.</text:p>
      <text:p text:style-name="Horizontal_20_Line"/>
      <text:h text:style-name="Heading_20_2" text:outline-level="2"><text:span text:style-name="Strong_20_Emphasis">4.6 Por qué este paso es decisivo</text:span></text:h>
      <text:p text:style-name="Text_20_body">Sin reproducción no hay variación.<text:line-break/>Sin variación no hay evolución.<text:line-break/>Sin evolución no hay mejora.<text:line-break/>Sin mejora no hay estructuras complejas.<text:line-break/>Sin estructuras complejas no hay vida.<text:line-break/>Y sin vida no hay cerebros, ni modelos internos, ni experiencia subjetiva.</text:p>
      <text:p text:style-name="Text_20_body">La reproducción y la evolución son el punto donde la historia comienza.<text:line-break/>Son el momento en que la materia deja de limitarse a reaccionar y empieza a <text:span text:style-name="Strong_20_Emphasis">perseverar</text:span>.</text:p>
      <text:p text:style-name="Text_20_body">A partir de aquí, la inteligencia primitiva encontrará su primera forma estable en una molécula extraordinaria: <text:span text:style-name="Strong_20_Emphasis">el ARN</text:span>.</text:p>
      <text:p text:style-name="Horizontal_20_Line"/>
      <text:p text:style-name="Text_20_body"><text:soft-page-break/>Si quieres, avanzamos al siguiente bloque: <text:span text:style-name="Strong_20_Emphasis">El ARN</text:span>, donde aparece la primera molécula capaz de almacenar información, recrearse y actuar al mismo tiemp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5:25:53.785000000</meta:creation-date>
    <dc:date>2026-05-31T15:26:16.503000000</dc:date>
    <meta:editing-duration>PT23S</meta:editing-duration>
    <meta:editing-cycles>1</meta:editing-cycles>
    <meta:document-statistic meta:table-count="0" meta:image-count="0" meta:object-count="0" meta:page-count="4" meta:paragraph-count="61" meta:word-count="642" meta:character-count="4090" meta:non-whitespace-character-count="3509"/>
    <meta:generator>LibreOffice/7.3.5.2$Windows_X86_64 LibreOffice_project/184fe81b8c8c30d8b5082578aee2fed2ea847c01</meta:generator>
  </office:meta>
</office:document-meta>
</file>