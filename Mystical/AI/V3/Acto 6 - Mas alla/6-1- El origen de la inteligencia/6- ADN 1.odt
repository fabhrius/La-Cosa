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Vamos a construir <text:span text:style-name="Strong_20_Emphasis">el bloque del ADN</text:span> con la misma claridad conceptual que ya logramos con los anteriores.<text:line-break/>Este es un punto clave porque aquí aparece, por primera vez, <text:span text:style-name="Strong_20_Emphasis">una memoria profunda, estable y extraordinariamente precisa</text:span>, capaz de sostener la inteligencia molecular durante miles de millones de años.</text:p>
      <text:p text:style-name="Text_20_body">El ADN no es el origen de la inteligencia, pero sí es <text:span text:style-name="Strong_20_Emphasis">la estructura que permite que esa inteligencia se vuelva duradera, compleja y expansiva</text:span>.</text:p>
      <text:p text:style-name="Text_20_body">Aquí tienes el bloque completo, listo para el libro.</text:p>
      <text:p text:style-name="Horizontal_20_Line"/>
      <text:h text:style-name="Heading_20_1" text:outline-level="1"><text:span text:style-name="Strong_20_Emphasis">6. El ADN: la memoria profunda de la inteligencia molecular</text:span></text:h>
      <text:h text:style-name="Heading_20_2" text:outline-level="2"><text:span text:style-name="Strong_20_Emphasis">6.1 Qué es el ADN (definición clara)</text:span></text:h>
      <text:p text:style-name="Text_20_body">El ADN es una molécula muy larga formada por cuatro tipos de piezas que se encadenan como cuentas en un collar.<text:line-break/>Lo importante no es su química, sino <text:span text:style-name="Strong_20_Emphasis">lo que hace</text:span>.</text:p>
      <text:p text:style-name="Text_20_body">El ADN es:</text:p>
      <text:p text:style-name="Quotations"><text:span text:style-name="Strong_20_Emphasis">una memoria extremadamente estable que guarda instrucciones<text:line-break/>para construir y mantener un sistema vivo.</text:span></text:p>
      <text:p text:style-name="Text_20_body">Tres características lo definen:</text:p>
      <text:list xml:id="list3680982093" text:style-name="L1">
        <text:list-item>
          <text:p text:style-name="P1"><text:span text:style-name="Strong_20_Emphasis">Estabilidad</text:span> <text:line-break/>Es mucho más resistente que el ARN.<text:line-break/>Puede durar años, siglos, incluso milenios.</text:p>
        </text:list-item>
        <text:list-item>
          <text:p text:style-name="P1"><text:span text:style-name="Strong_20_Emphasis">Precisión</text:span> <text:line-break/>Se copia con muy pocos errores.<text:line-break/>Esto permite conservar información durante enormes escalas de tiempo.</text:p>
        </text:list-item>
        <text:list-item>
          <text:p text:style-name="P1"><text:span text:style-name="Strong_20_Emphasis">Capacidad de almacenamiento</text:span> <text:line-break/>Puede contener cantidades gigantescas de información en un espacio diminuto.</text:p>
        </text:list-item>
      </text:list>
      <text:p text:style-name="Text_20_body">En términos simples:</text:p>
      <text:p text:style-name="Quotations"><text:span text:style-name="Strong_20_Emphasis">El ADN es la biblioteca donde la inteligencia molecular guarda su conocimiento.</text:span></text:p>
      <text:p text:style-name="Horizontal_20_Line"/>
      <text:h text:style-name="Heading_20_2" text:outline-level="2"><text:soft-page-break/><text:span text:style-name="Strong_20_Emphasis">6.2 Contexto: el universo justo antes del ADN</text:span></text:h>
      <text:p text:style-name="Text_20_body">Antes del ADN, el ARN ya había logrado algo extraordinario:</text:p>
      <text:list xml:id="list324717191" text:style-name="L2">
        <text:list-item>
          <text:p text:style-name="P3">guardar información, </text:p>
        </text:list-item>
        <text:list-item>
          <text:p text:style-name="P3">recrearse, </text:p>
        </text:list-item>
        <text:list-item>
          <text:p text:style-name="P3">actuar, </text:p>
        </text:list-item>
        <text:list-item>
          <text:p text:style-name="P2">evolucionar. </text:p>
        </text:list-item>
      </text:list>
      <text:p text:style-name="Text_20_body">Pero el ARN tenía un problema fundamental:<text:line-break/><text:span text:style-name="Strong_20_Emphasis">era demasiado frágil</text:span>.</text:p>
      <text:list xml:id="list3872596004" text:style-name="L3">
        <text:list-item>
          <text:p text:style-name="P5">Se degradaba con facilidad. </text:p>
        </text:list-item>
        <text:list-item>
          <text:p text:style-name="P5">Era químicamente inestable. </text:p>
        </text:list-item>
        <text:list-item>
          <text:p text:style-name="P5">Cometía errores con frecuencia. </text:p>
        </text:list-item>
        <text:list-item>
          <text:p text:style-name="P4">No podía sostener información compleja durante mucho tiempo. </text:p>
        </text:list-item>
      </text:list>
      <text:p text:style-name="Text_20_body">La inteligencia molecular ya existía, pero necesitaba un soporte más robusto para crecer.</text:p>
      <text:p text:style-name="Text_20_body">El ADN aparece como la solución evolutiva a esa necesidad.</text:p>
      <text:p text:style-name="Horizontal_20_Line"/>
      <text:h text:style-name="Heading_20_2" text:outline-level="2"><text:span text:style-name="Strong_20_Emphasis">6.3 Qué aporta el ADN: estabilidad y precisión</text:span></text:h>
      <text:p text:style-name="Text_20_body">El ADN introduce dos capacidades que transforman la historia de la inteligencia:</text:p>
      <text:h text:style-name="Heading_20_3" text:outline-level="3"><text:span text:style-name="Strong_20_Emphasis">1. Memoria profunda</text:span></text:h>
      <text:p text:style-name="Text_20_body">El ADN puede conservar información durante miles de generaciones.<text:line-break/>Esto permite que los sistemas vivos acumulen mejoras sin perderlas.</text:p>
      <text:h text:style-name="Heading_20_3" text:outline-level="3"><text:span text:style-name="Strong_20_Emphasis">2. Copias precisas</text:span></text:h>
      <text:p text:style-name="Text_20_body">El ADN se replica con una fidelidad extraordinaria.<text:line-break/>Esto permite que la evolución construya estructuras complejas sin que se desmoronen por errores acumulados.</text:p>
      <text:p text:style-name="Text_20_body">El ADN convierte la inteligencia molecular en algo <text:span text:style-name="Strong_20_Emphasis">duradero</text:span>.</text:p>
      <text:p text:style-name="Horizontal_20_Line"/>
      <text:h text:style-name="Heading_20_2" text:outline-level="2"><text:span text:style-name="Strong_20_Emphasis">6.4 El ADN como sistema de instrucciones</text:span></text:h>
      <text:p text:style-name="Text_20_body">El ADN no actúa directamente.<text:line-break/>No cataliza reacciones.<text:line-break/>No se pliega como el ARN para hacer cosas.</text:p>
      <text:p text:style-name="Text_20_body">Su función es otra:</text:p>
      <text:p text:style-name="Quotations"><text:soft-page-break/><text:span text:style-name="Strong_20_Emphasis">El ADN guarda instrucciones que otros sistemas leen y ejecutan.</text:span></text:p>
      <text:p text:style-name="Text_20_body">Es como un libro de recetas:</text:p>
      <text:list xml:id="list3770232271" text:style-name="L4">
        <text:list-item>
          <text:p text:style-name="P7">no cocina, </text:p>
        </text:list-item>
        <text:list-item>
          <text:p text:style-name="P7">no mezcla ingredientes, </text:p>
        </text:list-item>
        <text:list-item>
          <text:p text:style-name="P6">no enciende el fuego,<text:line-break/>pero contiene las instrucciones para hacerlo. </text:p>
        </text:list-item>
      </text:list>
      <text:p text:style-name="Text_20_body">El ADN es la primera forma de <text:span text:style-name="Strong_20_Emphasis">información estructurada</text:span>:</text:p>
      <text:list xml:id="list111048836" text:style-name="L5">
        <text:list-item>
          <text:p text:style-name="P9">organizada, </text:p>
        </text:list-item>
        <text:list-item>
          <text:p text:style-name="P9">codificada, </text:p>
        </text:list-item>
        <text:list-item>
          <text:p text:style-name="P9">legible, </text:p>
        </text:list-item>
        <text:list-item>
          <text:p text:style-name="P8">transmisible. </text:p>
        </text:list-item>
      </text:list>
      <text:p text:style-name="Horizontal_20_Line"/>
      <text:h text:style-name="Heading_20_2" text:outline-level="2"><text:span text:style-name="Strong_20_Emphasis">6.5 Por qué el ADN es un hito en la historia de la inteligencia</text:span></text:h>
      <text:p text:style-name="Text_20_body">El ADN permite que la inteligencia molecular:</text:p>
      <text:list xml:id="list2933065293" text:style-name="L6">
        <text:list-item>
          <text:p text:style-name="P11">se expanda, </text:p>
        </text:list-item>
        <text:list-item>
          <text:p text:style-name="P11">se complejice, </text:p>
        </text:list-item>
        <text:list-item>
          <text:p text:style-name="P11">se estabilice, </text:p>
        </text:list-item>
        <text:list-item>
          <text:p text:style-name="P11">se refine, </text:p>
        </text:list-item>
        <text:list-item>
          <text:p text:style-name="P10">se prolongue en el tiempo. </text:p>
        </text:list-item>
      </text:list>
      <text:h text:style-name="Heading_20_3" text:outline-level="3"><text:span text:style-name="Strong_20_Emphasis">1. Conservación a largo plazo</text:span></text:h>
      <text:p text:style-name="Text_20_body">La información útil ya no se pierde.<text:line-break/>Se acumula generación tras generación.</text:p>
      <text:h text:style-name="Heading_20_3" text:outline-level="3"><text:span text:style-name="Strong_20_Emphasis">2. Complejidad creciente</text:span></text:h>
      <text:p text:style-name="Text_20_body">El ADN puede almacenar instrucciones para sistemas cada vez más sofisticados:</text:p>
      <text:list xml:id="list1210456948" text:style-name="L7">
        <text:list-item>
          <text:p text:style-name="P13">proteínas, </text:p>
        </text:list-item>
        <text:list-item>
          <text:p text:style-name="P13">redes metabólicas, </text:p>
        </text:list-item>
        <text:list-item>
          <text:p text:style-name="P12">células completas. </text:p>
        </text:list-item>
      </text:list>
      <text:h text:style-name="Heading_20_3" text:outline-level="3"><text:span text:style-name="Strong_20_Emphasis">3. Robustez</text:span></text:h>
      <text:p text:style-name="Text_20_body">La inteligencia molecular deja de depender de condiciones frágiles.<text:line-break/>Ahora tiene un soporte resistente.</text:p>
      <text:h text:style-name="Heading_20_3" text:outline-level="3"><text:span text:style-name="Strong_20_Emphasis">4. Evolución acelerada</text:span></text:h>
      <text:p text:style-name="Text_20_body">La estabilidad del ADN permite explorar nuevas combinaciones sin destruir lo que ya funciona.</text:p>
      <text:p text:style-name="Text_20_body"><text:soft-page-break/>En resumen:</text:p>
      <text:p text:style-name="Quotations"><text:span text:style-name="Strong_20_Emphasis">El ADN convierte la inteligencia primitiva en una inteligencia heredable, estable y expansiva.</text:span></text:p>
      <text:p text:style-name="Horizontal_20_Line"/>
      <text:h text:style-name="Heading_20_2" text:outline-level="2"><text:span text:style-name="Strong_20_Emphasis">6.6 El ADN como puente hacia la célula</text:span></text:h>
      <text:p text:style-name="Text_20_body">El ADN no funciona solo.<text:line-break/>Necesita un entorno que:</text:p>
      <text:list xml:id="list3407380555" text:style-name="L8">
        <text:list-item>
          <text:p text:style-name="P15">lo proteja, </text:p>
        </text:list-item>
        <text:list-item>
          <text:p text:style-name="P15">lo lea, </text:p>
        </text:list-item>
        <text:list-item>
          <text:p text:style-name="P15">lo ejecute, </text:p>
        </text:list-item>
        <text:list-item>
          <text:p text:style-name="P14">lo replique. </text:p>
        </text:list-item>
      </text:list>
      <text:p text:style-name="Text_20_body">Ese entorno es la célula.</text:p>
      <text:p text:style-name="Text_20_body">La aparición del ADN prepara el camino para el siguiente gran salto:</text:p>
      <text:p text:style-name="Quotations"><text:span text:style-name="Strong_20_Emphasis">la inteligencia molecular se organiza dentro de un espacio propio,<text:line-break/>con fronteras, sensores y mecanismos internos: la célula.</text:span></text:p>
      <text:p text:style-name="Text_20_body">El ADN es la memoria.<text:line-break/>La célula será el organismo que la usa.</text:p>
      <text:p text:style-name="Horizontal_20_Line"/>
      <text:p text:style-name="Text_20_body">Si quieres, avanzamos al siguiente bloque: <text:span text:style-name="Strong_20_Emphasis">La célula</text:span>, donde la inteligencia molecular se convierte por primera vez en <text:span text:style-name="Strong_20_Emphasis">agencia</text:span>, en un sistema que actúa activamente para mantenerse viv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8:15:44.704000000</meta:creation-date>
    <dc:date>2026-05-31T18:18:18.581000000</dc:date>
    <meta:editing-duration>PT2M34S</meta:editing-duration>
    <meta:editing-cycles>1</meta:editing-cycles>
    <meta:document-statistic meta:table-count="0" meta:image-count="0" meta:object-count="0" meta:page-count="4" meta:paragraph-count="78" meta:word-count="684" meta:character-count="4207" meta:non-whitespace-character-count="3601"/>
    <meta:generator>LibreOffice/7.3.5.2$Windows_X86_64 LibreOffice_project/184fe81b8c8c30d8b5082578aee2fed2ea847c01</meta:generator>
  </office:meta>
</office:document-meta>
</file>