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e es uno de esos momentos en los que conviene detenerse, respirar, y mirar el cuadro completo.<text:line-break/>Porque lo que llamamos “aparición de la inteligencia” no es un evento, sino una secuencia de transiciones lógicas, cada una más profunda que la anterior. Y tú ya has señalado la clave: <text:span text:style-name="Strong_20_Emphasis">un proceso lógico no es todavía un proceso inteligente</text:span>. La inteligencia no aparece porque sí; aparece cuando un proceso lógico adquiere ciertas propiedades estructurales que lo convierten en <text:span text:style-name="Emphasis">capaz de producir resultados no naturales</text:span>, es decir, resultados que no son consecuencia directa de la física, sino de un mecanismo interno que selecciona, filtra, aprende, optimiza.</text:p>
      <text:p text:style-name="Text_20_body">A grandes rasgos, la historia puede contarse como una serie de hitos evolutivos —pero no “evolutivos” en el sentido biológico clásico, sino en el sentido lógico: cada hito introduce una nueva capacidad que no existía antes.</text:p>
      <text:p text:style-name="Text_20_body">A continuación te propongo una <text:span text:style-name="Strong_20_Emphasis">secuencia de hitos</text:span>, cada uno representando un salto cualitativo en la aparición de la inteligencia. No es un listado biológico, sino un mapa lógico de cómo la inteligencia se construye a sí misma desde cero.</text:p>
      <text:p text:style-name="Horizontal_20_Line"/>
      <text:h text:style-name="Heading_20_2" text:outline-level="2">1. <text:span text:style-name="Strong_20_Emphasis">Materia reactiva → Procesos lógicos mínimos</text:span></text:h>
      <text:p text:style-name="Text_20_body">Antes de la inteligencia, hay <text:span text:style-name="Strong_20_Emphasis">procesos lógicos</text:span>, pero no inteligentes.</text:p>
      <text:p text:style-name="Text_20_body">Un proceso lógico mínimo es aquel en el que:</text:p>
      <text:list xml:id="list1590474987" text:style-name="L1">
        <text:list-item>
          <text:p text:style-name="P2">hay estados, </text:p>
        </text:list-item>
        <text:list-item>
          <text:p text:style-name="P2">hay transiciones entre estados, </text:p>
        </text:list-item>
        <text:list-item>
          <text:p text:style-name="P1">y esas transiciones siguen reglas internas. </text:p>
        </text:list-item>
      </text:list>
      <text:p text:style-name="Text_20_body">Una red autocatalítica es exactamente eso:<text:line-break/>un sistema que <text:span text:style-name="Strong_20_Emphasis">se mantiene a sí mismo</text:span> mediante un conjunto de reglas internas.<text:line-break/>Pero todavía no “elige”, no “optimiza”, no “aprende”.</text:p>
      <text:p text:style-name="Text_20_body">Aquí aparece el <text:span text:style-name="Strong_20_Emphasis">primer bucle lógico</text:span>, pero no inteligencia.</text:p>
      <text:p text:style-name="Horizontal_20_Line"/>
      <text:h text:style-name="Heading_20_2" text:outline-level="2">2. <text:span text:style-name="Strong_20_Emphasis">Red autocatalítica → Sistema que se reproduce</text:span></text:h>
      <text:p text:style-name="Text_20_body">Este es el primer salto real.</text:p>
      <text:p text:style-name="Text_20_body">Cuando un sistema no solo se mantiene, sino que <text:span text:style-name="Strong_20_Emphasis">se copia</text:span>, aparece algo nuevo:<text:line-break/>un mecanismo que <text:span text:style-name="Strong_20_Emphasis">preserva información estructural</text:span>.</text:p>
      <text:p text:style-name="Text_20_body">La reproducción introduce:</text:p>
      <text:list xml:id="list2318528678" text:style-name="L2">
        <text:list-item>
          <text:p text:style-name="P4">persistencia, </text:p>
        </text:list-item>
        <text:list-item>
          <text:p text:style-name="P4">acumulación de cambios, </text:p>
        </text:list-item>
        <text:list-item>
          <text:p text:style-name="P3">competencia entre variantes. </text:p>
        </text:list-item>
      </text:list>
      <text:p text:style-name="Text_20_body">Y con eso aparece el primer embrión de lo que luego llamaremos “aprendizaje evolutivo”.</text:p>
      <text:p text:style-name="Text_20_body"><text:soft-page-break/>Pero todavía no hay inteligencia:<text:line-break/>hay un proceso lógico que <text:span text:style-name="Emphasis">parece</text:span> inteligente porque produce adaptación, pero no es un proceso que tome decisiones internas.</text:p>
      <text:p text:style-name="Horizontal_20_Line"/>
      <text:h text:style-name="Heading_20_2" text:outline-level="2">3. <text:span text:style-name="Strong_20_Emphasis">Reproducción → Evolución → Optimización externa</text:span></text:h>
      <text:p text:style-name="Text_20_body">La evolución introduce un mecanismo que selecciona estructuras más eficientes.</text:p>
      <text:p text:style-name="Text_20_body">Aquí aparece algo crucial:</text:p>
      <text:list xml:id="list2664215405" text:style-name="L3">
        <text:list-item>
          <text:p text:style-name="P6">el sistema ya no solo se mantiene, </text:p>
        </text:list-item>
        <text:list-item>
          <text:p text:style-name="P5">sino que <text:span text:style-name="Strong_20_Emphasis">mejora</text:span>. </text:p>
        </text:list-item>
      </text:list>
      <text:p text:style-name="Text_20_body">Pero la mejora no es interna:<text:line-break/>no es el sistema el que aprende, sino la población.</text:p>
      <text:p text:style-name="Text_20_body">Este es el punto donde muchos confunden evolución con inteligencia.<text:line-break/>Pero tú lo has dicho muy bien: <text:span text:style-name="Strong_20_Emphasis">esto no es inteligencia, es física</text:span>.</text:p>
      <text:p text:style-name="Horizontal_20_Line"/>
      <text:h text:style-name="Heading_20_2" text:outline-level="2">4. <text:span text:style-name="Strong_20_Emphasis">Evolución química → ADN: la primera memoria lógica estable</text:span></text:h>
      <text:p text:style-name="Text_20_body">Aquí ocurre el gran salto.</text:p>
      <text:p text:style-name="Text_20_body">El ADN no es solo un material:<text:line-break/>es un <text:span text:style-name="Strong_20_Emphasis">lenguaje</text:span>, un <text:span text:style-name="Strong_20_Emphasis">código</text:span>, un <text:span text:style-name="Strong_20_Emphasis">sistema de representación</text:span>.</text:p>
      <text:p text:style-name="Text_20_body">Con el ADN aparece:</text:p>
      <text:list xml:id="list1169430730" text:style-name="L4">
        <text:list-item>
          <text:p text:style-name="P8">una memoria estable, </text:p>
        </text:list-item>
        <text:list-item>
          <text:p text:style-name="P8">un mecanismo de copia con baja pérdida, </text:p>
        </text:list-item>
        <text:list-item>
          <text:p text:style-name="P8">un espacio combinatorio enorme, </text:p>
        </text:list-item>
        <text:list-item>
          <text:p text:style-name="P7">un sistema de instrucciones ejecutables. </text:p>
        </text:list-item>
      </text:list>
      <text:p text:style-name="Text_20_body">Este es el momento en que la lógica deja de ser puramente reactiva y se convierte en <text:span text:style-name="Strong_20_Emphasis">programable</text:span>.</text:p>
      <text:p text:style-name="Text_20_body">Y aquí, por primera vez, aparece algo que ya se parece a la inteligencia:<text:line-break/>un sistema capaz de <text:span text:style-name="Strong_20_Emphasis">explorar soluciones</text:span>, <text:span text:style-name="Strong_20_Emphasis">almacenarlas</text:span>, <text:span text:style-name="Strong_20_Emphasis">transmitirlas</text:span>, <text:span text:style-name="Strong_20_Emphasis">combinarlas</text:span>.</text:p>
      <text:p text:style-name="Text_20_body">Pero aún no hay inteligencia en tiempo real:<text:line-break/>la inteligencia está distribuida en generaciones.</text:p>
      <text:p text:style-name="Horizontal_20_Line"/>
      <text:h text:style-name="Heading_20_2" text:outline-level="2"><text:soft-page-break/>5. <text:span text:style-name="Strong_20_Emphasis">ADN → Célula: el primer sistema que toma decisiones internas</text:span></text:h>
      <text:p text:style-name="Text_20_body">La célula introduce:</text:p>
      <text:list xml:id="list223526077" text:style-name="L5">
        <text:list-item>
          <text:p text:style-name="P10">sensores, </text:p>
        </text:list-item>
        <text:list-item>
          <text:p text:style-name="P10">rutas metabólicas alternativas, </text:p>
        </text:list-item>
        <text:list-item>
          <text:p text:style-name="P10">mecanismos de regulación, </text:p>
        </text:list-item>
        <text:list-item>
          <text:p text:style-name="P9">respuestas condicionadas al entorno. </text:p>
        </text:list-item>
      </text:list>
      <text:p text:style-name="Text_20_body">Por primera vez, un sistema:</text:p>
      <text:list xml:id="list1928239097" text:style-name="L6">
        <text:list-item>
          <text:p text:style-name="P12">percibe, </text:p>
        </text:list-item>
        <text:list-item>
          <text:p text:style-name="P12">evalúa, </text:p>
        </text:list-item>
        <text:list-item>
          <text:p text:style-name="P11">actúa según condiciones internas y externas. </text:p>
        </text:list-item>
      </text:list>
      <text:p text:style-name="Text_20_body">Esto ya es inteligencia en su forma más primitiva:<text:line-break/><text:span text:style-name="Strong_20_Emphasis">inteligencia reactiva</text:span>, pero inteligencia real.</text:p>
      <text:p text:style-name="Text_20_body">La célula no “piensa”, pero <text:span text:style-name="Strong_20_Emphasis">elige</text:span> entre rutas posibles.<text:line-break/>Y esa elección no es azarosa: es un proceso lógico interno.</text:p>
      <text:p text:style-name="Horizontal_20_Line"/>
      <text:h text:style-name="Heading_20_2" text:outline-level="2">6. <text:span text:style-name="Strong_20_Emphasis">Células → Redes de células → Sistemas nerviosos</text:span></text:h>
      <text:p text:style-name="Text_20_body">Aquí aparece el siguiente salto cualitativo:<text:line-break/>la <text:span text:style-name="Strong_20_Emphasis">integración de información</text:span>.</text:p>
      <text:p text:style-name="Text_20_body">Un sistema nervioso permite:</text:p>
      <text:list xml:id="list2971437943" text:style-name="L7">
        <text:list-item>
          <text:p text:style-name="P14">coordinar respuestas, </text:p>
        </text:list-item>
        <text:list-item>
          <text:p text:style-name="P14">anticipar, </text:p>
        </text:list-item>
        <text:list-item>
          <text:p text:style-name="P14">modular comportamientos, </text:p>
        </text:list-item>
        <text:list-item>
          <text:p text:style-name="P13">aprender dentro de la vida del individuo. </text:p>
        </text:list-item>
      </text:list>
      <text:p text:style-name="Text_20_body">La inteligencia deja de ser evolutiva y se vuelve <text:span text:style-name="Strong_20_Emphasis">operacional</text:span>.</text:p>
      <text:p text:style-name="Text_20_body">Ya no depende solo de mutaciones:<text:line-break/>depende de experiencia.</text:p>
      <text:p text:style-name="Horizontal_20_Line"/>
      <text:h text:style-name="Heading_20_2" text:outline-level="2">7. <text:span text:style-name="Strong_20_Emphasis">Sistemas nerviosos → Cerebros → Modelos internos del mundo</text:span></text:h>
      <text:p text:style-name="Text_20_body">El cerebro introduce:</text:p>
      <text:list xml:id="list794845841" text:style-name="L8">
        <text:list-item>
          <text:p text:style-name="P16">memoria de trabajo, </text:p>
        </text:list-item>
        <text:list-item>
          <text:p text:style-name="P16">predicción, </text:p>
        </text:list-item>
        <text:list-item>
          <text:p text:style-name="P16"><text:soft-page-break/>planificación, </text:p>
        </text:list-item>
        <text:list-item>
          <text:p text:style-name="P15">simulación interna. </text:p>
        </text:list-item>
      </text:list>
      <text:p text:style-name="Text_20_body">Aquí aparece la inteligencia que reconocemos intuitivamente:</text:p>
      <text:list xml:id="list4018409492" text:style-name="L9">
        <text:list-item>
          <text:p text:style-name="P18">resolver problemas, </text:p>
        </text:list-item>
        <text:list-item>
          <text:p text:style-name="P18">anticipar consecuencias, </text:p>
        </text:list-item>
        <text:list-item>
          <text:p text:style-name="P18">aprender patrones, </text:p>
        </text:list-item>
        <text:list-item>
          <text:p text:style-name="P17">tomar decisiones complejas. </text:p>
        </text:list-item>
      </text:list>
      <text:p text:style-name="Text_20_body">Pero incluso aquí, la inteligencia no es “humana”:<text:line-break/>es simplemente un nivel más alto de la misma lógica que empezó en las redes autocatalíticas.</text:p>
      <text:p text:style-name="Horizontal_20_Line"/>
      <text:h text:style-name="Heading_20_2" text:outline-level="2">8. <text:span text:style-name="Strong_20_Emphasis">Cerebros → Lenguaje → Inteligencia simbólica</text:span></text:h>
      <text:p text:style-name="Text_20_body">El lenguaje es el salto que convierte la inteligencia en un sistema:</text:p>
      <text:list xml:id="list3050112038" text:style-name="L10">
        <text:list-item>
          <text:p text:style-name="P20">acumulativo, </text:p>
        </text:list-item>
        <text:list-item>
          <text:p text:style-name="P20">compartido, </text:p>
        </text:list-item>
        <text:list-item>
          <text:p text:style-name="P20">abstracto, </text:p>
        </text:list-item>
        <text:list-item>
          <text:p text:style-name="P19">expansivo. </text:p>
        </text:list-item>
      </text:list>
      <text:p text:style-name="Text_20_body">El lenguaje permite:</text:p>
      <text:list xml:id="list202108980" text:style-name="L11">
        <text:list-item>
          <text:p text:style-name="P22">representar lo que no está presente, </text:p>
        </text:list-item>
        <text:list-item>
          <text:p text:style-name="P22">transmitir conocimiento, </text:p>
        </text:list-item>
        <text:list-item>
          <text:p text:style-name="P22">construir modelos colectivos, </text:p>
        </text:list-item>
        <text:list-item>
          <text:p text:style-name="P21">crear cultura. </text:p>
        </text:list-item>
      </text:list>
      <text:p text:style-name="Text_20_body">Aquí aparece la inteligencia que se expande más rápido que la biología.</text:p>
      <text:p text:style-name="Horizontal_20_Line"/>
      <text:h text:style-name="Heading_20_2" text:outline-level="2">9. <text:span text:style-name="Strong_20_Emphasis">Lenguaje → Tecnología → Inteligencia extendida</text:span></text:h>
      <text:p text:style-name="Text_20_body">La inteligencia deja de estar confinada al organismo:</text:p>
      <text:list xml:id="list1161200322" text:style-name="L12">
        <text:list-item>
          <text:p text:style-name="P24">herramientas, </text:p>
        </text:list-item>
        <text:list-item>
          <text:p text:style-name="P24">escritura, </text:p>
        </text:list-item>
        <text:list-item>
          <text:p text:style-name="P24">ciencia, </text:p>
        </text:list-item>
        <text:list-item>
          <text:p text:style-name="P23">computación. </text:p>
        </text:list-item>
      </text:list>
      <text:p text:style-name="Text_20_body">Cada una amplifica la capacidad de la inteligencia para transformarse a sí misma.</text:p>
      <text:p text:style-name="Horizontal_20_Line"/>
      <text:h text:style-name="Heading_20_2" text:outline-level="2"><text:soft-page-break/>10. <text:span text:style-name="Strong_20_Emphasis">Tecnología → Sistemas artificiales → Inteligencia no biológica</text:span></text:h>
      <text:p text:style-name="Text_20_body">Este es el punto en el que estamos ahora:</text:p>
      <text:list xml:id="list686568808" text:style-name="L13">
        <text:list-item>
          <text:p text:style-name="P26">la inteligencia ya no depende de la biología, </text:p>
        </text:list-item>
        <text:list-item>
          <text:p text:style-name="P26">puede existir en otros soportes, </text:p>
        </text:list-item>
        <text:list-item>
          <text:p text:style-name="P26">puede operar a escalas distintas, </text:p>
        </text:list-item>
        <text:list-item>
          <text:p text:style-name="P25">puede combinarse con la inteligencia humana. </text:p>
        </text:list-item>
      </text:list>
      <text:p text:style-name="Text_20_body">Pero sigue siendo la misma lógica que empezó hace miles de millones de años.</text:p>
      <text:p text:style-name="Horizontal_20_Line"/>
      <text:h text:style-name="Heading_20_1" text:outline-level="1"><text:span text:style-name="Strong_20_Emphasis">Resumen en una frase</text:span></text:h>
      <text:p text:style-name="Text_20_body">La inteligencia aparece cuando un proceso lógico adquiere la capacidad de <text:span text:style-name="Strong_20_Emphasis">seleccionar, almacenar y utilizar información para producir resultados no naturales</text:span>, y esa capacidad emerge en una secuencia de hitos que van desde la autocatalisis hasta los cerebros y más allá.</text:p>
      <text:p text:style-name="Horizontal_20_Line"/>
      <text:p text:style-name="Text_20_body">Si quieres, puedo convertir esta secuencia en:</text:p>
      <text:list xml:id="list1107361144" text:style-name="L14">
        <text:list-item>
          <text:p text:style-name="P28">un capítulo completo, </text:p>
        </text:list-item>
        <text:list-item>
          <text:p text:style-name="P28">un esquema narrativo, </text:p>
        </text:list-item>
        <text:list-item>
          <text:p text:style-name="P28">un diagrama lógico, </text:p>
        </text:list-item>
        <text:list-item>
          <text:p text:style-name="P27">o una versión más poética para cerrar el capítulo. </text:p>
        </text:list-item>
      </text:list>
      <text:p text:style-name="Text_20_body">¿En qué formato quieres desarrollar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19:20:16.319000000</meta:creation-date>
    <meta:editing-cycles>1</meta:editing-cycles>
    <meta:editing-duration>PT53S</meta:editing-duration>
    <dc:date>2026-05-29T19:21:09.499000000</dc:date>
    <meta:document-statistic meta:table-count="0" meta:image-count="0" meta:object-count="0" meta:page-count="5" meta:paragraph-count="105" meta:word-count="968" meta:character-count="6015" meta:non-whitespace-character-count="5152"/>
    <meta:generator>LibreOffice/7.3.5.2$Windows_X86_64 LibreOffice_project/184fe81b8c8c30d8b5082578aee2fed2ea847c01</meta:generator>
  </office:meta>
</office:document-meta>
</file>