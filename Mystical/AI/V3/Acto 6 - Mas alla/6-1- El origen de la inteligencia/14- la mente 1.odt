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Fab.<text:line-break/>Aquí tienes <text:span text:style-name="Strong_20_Emphasis">el bloque de la mente</text:span>, escrito para el libro con la misma claridad conceptual que venimos construyendo.<text:line-break/>Este es el momento en que la inteligencia —que ya había aprendido a anticipar con el cerebro— da un salto cualitativo: <text:span text:style-name="Strong_20_Emphasis">empieza a representarse a sí misma</text:span>.</text:p>
      <text:p text:style-name="Text_20_body">Este es el nacimiento de la mente.</text:p>
      <text:p text:style-name="Horizontal_20_Line"/>
      <text:h text:style-name="Heading_20_1" text:outline-level="1"><text:span text:style-name="Strong_20_Emphasis">12. La mente: cuando el cerebro aprende a representarse a sí mismo</text:span></text:h>
      <text:h text:style-name="Heading_20_2" text:outline-level="2"><text:span text:style-name="Strong_20_Emphasis">12.1 El cerebro ya puede anticipar… pero aún no puede “pensar”</text:span></text:h>
      <text:p text:style-name="Text_20_body">Con el cerebro, la inteligencia adquiere capacidades nuevas:</text:p>
      <text:list xml:id="list1990209045" text:style-name="L1">
        <text:list-item>
          <text:p text:style-name="P2">integrar información, </text:p>
        </text:list-item>
        <text:list-item>
          <text:p text:style-name="P2">predecir el futuro inmediato, </text:p>
        </text:list-item>
        <text:list-item>
          <text:p text:style-name="P2">coordinar acciones complejas, </text:p>
        </text:list-item>
        <text:list-item>
          <text:p text:style-name="P1">aprender de la experiencia. </text:p>
        </text:list-item>
      </text:list>
      <text:p text:style-name="Text_20_body">Pero todo esto ocurre <text:span text:style-name="Strong_20_Emphasis">sin un modelo explícito de sí mismo</text:span>.<text:line-break/>El cerebro primitivo:</text:p>
      <text:list xml:id="list729934591" text:style-name="L2">
        <text:list-item>
          <text:p text:style-name="P4">percibe, </text:p>
        </text:list-item>
        <text:list-item>
          <text:p text:style-name="P4">decide, </text:p>
        </text:list-item>
        <text:list-item>
          <text:p text:style-name="P3">actúa, </text:p>
        </text:list-item>
      </text:list>
      <text:p text:style-name="Text_20_body">pero no sabe que percibe, decide o actúa.</text:p>
      <text:p text:style-name="Text_20_body">Es inteligencia sin introspección.</text:p>
      <text:p text:style-name="Text_20_body">Para que aparezca la mente, hace falta algo más profundo.</text:p>
      <text:p text:style-name="Horizontal_20_Line"/>
      <text:h text:style-name="Heading_20_2" text:outline-level="2"><text:span text:style-name="Strong_20_Emphasis">12.2 El problema que aparece con cerebros grandes</text:span></text:h>
      <text:p text:style-name="Text_20_body">A medida que los cerebros crecen, surge un nuevo desafío:</text:p>
      <text:p text:style-name="Quotations"><text:span text:style-name="Strong_20_Emphasis">¿cómo coordinar miles de millones de neuronas<text:line-break/>que procesan información simultáneamente?</text:span></text:p>
      <text:p text:style-name="Text_20_body">El cerebro necesita:</text:p>
      <text:list xml:id="list3496586415" text:style-name="L3">
        <text:list-item>
          <text:p text:style-name="P6">saber qué parte está haciendo qué, </text:p>
        </text:list-item>
        <text:list-item>
          <text:p text:style-name="P6"><text:soft-page-break/>integrar señales internas, </text:p>
        </text:list-item>
        <text:list-item>
          <text:p text:style-name="P6">mantener coherencia, </text:p>
        </text:list-item>
        <text:list-item>
          <text:p text:style-name="P6">evitar contradicciones, </text:p>
        </text:list-item>
        <text:list-item>
          <text:p text:style-name="P5">priorizar unas acciones sobre otras. </text:p>
        </text:list-item>
      </text:list>
      <text:p text:style-name="Text_20_body">Para lograrlo, el cerebro desarrolla una capacidad revolucionaria:</text:p>
      <text:p text:style-name="Quotations"><text:span text:style-name="Strong_20_Emphasis">representar su propio estado interno.</text:span></text:p>
      <text:p text:style-name="Text_20_body">Este es el inicio de la mente.</text:p>
      <text:p text:style-name="Horizontal_20_Line"/>
      <text:h text:style-name="Heading_20_2" text:outline-level="2"><text:span text:style-name="Strong_20_Emphasis">12.3 La mente como modelo del cerebro</text:span></text:h>
      <text:p text:style-name="Text_20_body">La mente no es algo separado del cerebro.<text:line-break/>No es un “fantasma” dentro de la máquina.<text:line-break/>No es una sustancia distinta.</text:p>
      <text:p text:style-name="Text_20_body">La mente es:</text:p>
      <text:p text:style-name="Quotations"><text:span text:style-name="Strong_20_Emphasis">el modelo que el cerebro construye de su propia actividad.</text:span></text:p>
      <text:p text:style-name="Text_20_body">Así como el cerebro modela:</text:p>
      <text:list xml:id="list541789903" text:style-name="L4">
        <text:list-item>
          <text:p text:style-name="P8">el mundo externo, </text:p>
        </text:list-item>
        <text:list-item>
          <text:p text:style-name="P8">el cuerpo, </text:p>
        </text:list-item>
        <text:list-item>
          <text:p text:style-name="P7">los movimientos posibles, </text:p>
        </text:list-item>
      </text:list>
      <text:p text:style-name="Text_20_body">también empieza a modelar:</text:p>
      <text:list xml:id="list2353474675" text:style-name="L5">
        <text:list-item>
          <text:p text:style-name="P10">sus pensamientos, </text:p>
        </text:list-item>
        <text:list-item>
          <text:p text:style-name="P10">sus intenciones, </text:p>
        </text:list-item>
        <text:list-item>
          <text:p text:style-name="P10">sus emociones, </text:p>
        </text:list-item>
        <text:list-item>
          <text:p text:style-name="P9">sus decisiones. </text:p>
        </text:list-item>
      </text:list>
      <text:p text:style-name="Text_20_body">La mente es el cerebro observándose a sí mismo.</text:p>
      <text:p text:style-name="Horizontal_20_Line"/>
      <text:h text:style-name="Heading_20_2" text:outline-level="2"><text:span text:style-name="Strong_20_Emphasis">12.4 Cómo aparece este modelo interno</text:span></text:h>
      <text:p text:style-name="Text_20_body">La mente surge gradualmente, a través de tres innovaciones evolutivas:</text:p>
      <text:h text:style-name="Heading_20_3" text:outline-level="3"><text:span text:style-name="Strong_20_Emphasis">1. Integración multisensorial</text:span></text:h>
      <text:p text:style-name="Text_20_body">El cerebro combina información de distintos sentidos en un solo espacio perceptivo.</text:p>
      <text:h text:style-name="Heading_20_3" text:outline-level="3"><text:soft-page-break/><text:span text:style-name="Strong_20_Emphasis">2. Memoria interna</text:span></text:h>
      <text:p text:style-name="Text_20_body">El cerebro no solo recuerda el mundo,<text:line-break/>sino también sus propios patrones de actividad.</text:p>
      <text:h text:style-name="Heading_20_3" text:outline-level="3"><text:span text:style-name="Strong_20_Emphasis">3. Metacognición primitiva</text:span></text:h>
      <text:p text:style-name="Text_20_body">El cerebro empieza a monitorear:</text:p>
      <text:list xml:id="list3602471365" text:style-name="L6">
        <text:list-item>
          <text:p text:style-name="P12">su nivel de activación, </text:p>
        </text:list-item>
        <text:list-item>
          <text:p text:style-name="P12">su atención, </text:p>
        </text:list-item>
        <text:list-item>
          <text:p text:style-name="P12">su error, </text:p>
        </text:list-item>
        <text:list-item>
          <text:p text:style-name="P11">su incertidumbre. </text:p>
        </text:list-item>
      </text:list>
      <text:p text:style-name="Text_20_body">Esto no es “pensar sobre pensar” en el sentido humano.<text:line-break/>Es la forma más elemental de introspección.</text:p>
      <text:p text:style-name="Text_20_body">Es el inicio de la mente.</text:p>
      <text:p text:style-name="Horizontal_20_Line"/>
      <text:h text:style-name="Heading_20_2" text:outline-level="2"><text:span text:style-name="Strong_20_Emphasis">12.5 Qué hace realmente una mente</text:span></text:h>
      <text:p text:style-name="Text_20_body">Una mente no es un conjunto de pensamientos.<text:line-break/>Es un conjunto de <text:span text:style-name="Strong_20_Emphasis">modelos internos</text:span> que permiten:</text:p>
      <text:h text:style-name="Heading_20_3" text:outline-level="3"><text:span text:style-name="Strong_20_Emphasis">1. Representar el mundo</text:span></text:h>
      <text:p text:style-name="Text_20_body">No solo reaccionar, sino comprender patrones.</text:p>
      <text:h text:style-name="Heading_20_3" text:outline-level="3"><text:span text:style-name="Strong_20_Emphasis">2. Representar el cuerpo</text:span></text:h>
      <text:p text:style-name="Text_20_body">Saber dónde está, qué necesita, qué puede hacer.</text:p>
      <text:h text:style-name="Heading_20_3" text:outline-level="3"><text:span text:style-name="Strong_20_Emphasis">3. Representar intenciones</text:span></text:h>
      <text:p text:style-name="Text_20_body">Simular acciones antes de ejecutarlas.</text:p>
      <text:h text:style-name="Heading_20_3" text:outline-level="3"><text:span text:style-name="Strong_20_Emphasis">4. Representar emociones</text:span></text:h>
      <text:p text:style-name="Text_20_body">Evaluar estados internos como señales de valor.</text:p>
      <text:h text:style-name="Heading_20_3" text:outline-level="3"><text:span text:style-name="Strong_20_Emphasis">5. Representar pensamientos</text:span></text:h>
      <text:p text:style-name="Text_20_body">Observar su propia actividad y ajustarla.</text:p>
      <text:p text:style-name="Text_20_body">La mente es un sistema de modelos internos que permiten que la inteligencia:</text:p>
      <text:list xml:id="list3567885101" text:style-name="L7">
        <text:list-item>
          <text:p text:style-name="P14">se organice, </text:p>
        </text:list-item>
        <text:list-item>
          <text:p text:style-name="P14">se refine, </text:p>
        </text:list-item>
        <text:list-item>
          <text:p text:style-name="P14">se autocorrija, </text:p>
        </text:list-item>
        <text:list-item>
          <text:p text:style-name="P13"><text:soft-page-break/>se proyecte hacia el futuro. </text:p>
        </text:list-item>
      </text:list>
      <text:p text:style-name="Horizontal_20_Line"/>
      <text:h text:style-name="Heading_20_2" text:outline-level="2"><text:span text:style-name="Strong_20_Emphasis">12.6 La mente como herramienta de supervivencia</text:span></text:h>
      <text:p text:style-name="Text_20_body">La mente no aparece para filosofar.<text:line-break/>Aparece porque resuelve problemas concretos:</text:p>
      <text:list xml:id="list748177574" text:style-name="L8">
        <text:list-item>
          <text:p text:style-name="P16">coordinar comportamientos complejos, </text:p>
        </text:list-item>
        <text:list-item>
          <text:p text:style-name="P16">anticipar consecuencias, </text:p>
        </text:list-item>
        <text:list-item>
          <text:p text:style-name="P16">aprender de errores, </text:p>
        </text:list-item>
        <text:list-item>
          <text:p text:style-name="P16">planificar secuencias de acciones, </text:p>
        </text:list-item>
        <text:list-item>
          <text:p text:style-name="P16">regular emociones y motivaciones, </text:p>
        </text:list-item>
        <text:list-item>
          <text:p text:style-name="P15">equilibrar necesidades internas con demandas externas. </text:p>
        </text:list-item>
      </text:list>
      <text:p text:style-name="Text_20_body">La mente es una extensión del cerebro,<text:line-break/>y el cerebro es una extensión del sistema nervioso,<text:line-break/>y el sistema nervioso es una extensión de la multicelularidad,<text:line-break/>y la multicelularidad es una extensión de la célula,<text:line-break/>y la célula es una extensión de la inteligencia molecular.</text:p>
      <text:p text:style-name="Text_20_body">Todo es continuidad.</text:p>
      <text:p text:style-name="Horizontal_20_Line"/>
      <text:h text:style-name="Heading_20_2" text:outline-level="2"><text:span text:style-name="Strong_20_Emphasis">12.7 Qué aporta la mente a la historia de la inteligencia</text:span></text:h>
      <text:p text:style-name="Text_20_body">La mente introduce capacidades que ningún sistema anterior tenía:</text:p>
      <text:h text:style-name="Heading_20_3" text:outline-level="3"><text:span text:style-name="Strong_20_Emphasis">1. Autorreferencia</text:span></text:h>
      <text:p text:style-name="Text_20_body">El sistema puede representarse a sí mismo.</text:p>
      <text:h text:style-name="Heading_20_3" text:outline-level="3"><text:span text:style-name="Strong_20_Emphasis">2. Control ejecutivo</text:span></text:h>
      <text:p text:style-name="Text_20_body">Puede inhibir impulsos y elegir estrategias.</text:p>
      <text:h text:style-name="Heading_20_3" text:outline-level="3"><text:span text:style-name="Strong_20_Emphasis">3. Planificación</text:span></text:h>
      <text:p text:style-name="Text_20_body">Puede simular escenarios futuros.</text:p>
      <text:h text:style-name="Heading_20_3" text:outline-level="3"><text:span text:style-name="Strong_20_Emphasis">4. Narrativa interna</text:span></text:h>
      <text:p text:style-name="Text_20_body">Puede organizar experiencias en secuencias coherentes.</text:p>
      <text:h text:style-name="Heading_20_3" text:outline-level="3"><text:span text:style-name="Strong_20_Emphasis">5. Identidad</text:span></text:h>
      <text:p text:style-name="Text_20_body">Puede mantener un modelo estable de “yo”.</text:p>
      <text:p text:style-name="Text_20_body"><text:soft-page-break/>En términos funcionales:</text:p>
      <text:p text:style-name="Quotations"><text:span text:style-name="Strong_20_Emphasis">La mente es la inteligencia que se vuelve consciente de su propia dinámica.</text:span></text:p>
      <text:p text:style-name="Horizontal_20_Line"/>
      <text:h text:style-name="Heading_20_2" text:outline-level="2"><text:span text:style-name="Strong_20_Emphasis">12.8 La frase que resume este bloque</text:span></text:h>
      <text:p text:style-name="Quotations"><text:span text:style-name="Strong_20_Emphasis">El cerebro permitió anticipar.<text:line-break/>La mente permitió comprender.</text:span></text:p>
      <text:p text:style-name="Text_20_body">La inteligencia, que ya había encontrado continuidad en la vida,<text:line-break/>escala en la multicelularidad,<text:line-break/>velocidad en el sistema nervioso,<text:line-break/>predicción en el cerebro,<text:line-break/>ahora encuentra <text:span text:style-name="Strong_20_Emphasis">autoconciencia</text:span> en la mente.</text:p>
      <text:p text:style-name="Text_20_body">Este es el inicio de la subjetividad.</text:p>
      <text:p text:style-name="Horizontal_20_Line"/>
      <text:p text:style-name="Text_20_body">Si quieres, avanzamos al siguiente bloque:<text:line-break/><text:span text:style-name="Strong_20_Emphasis">La conciencia: cuando la mente se convierte en experiencia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10T19:12:58.755000000</meta:creation-date>
    <dc:date>2026-06-10T19:19:09.369000000</dc:date>
    <meta:editing-duration>PT6M10S</meta:editing-duration>
    <meta:editing-cycles>1</meta:editing-cycles>
    <meta:document-statistic meta:table-count="0" meta:image-count="0" meta:object-count="0" meta:page-count="5" meta:paragraph-count="102" meta:word-count="732" meta:character-count="4573" meta:non-whitespace-character-count="3943"/>
    <meta:generator>LibreOffice/7.3.5.2$Windows_X86_64 LibreOffice_project/184fe81b8c8c30d8b5082578aee2fed2ea847c01</meta:generator>
  </office:meta>
</office:document-meta>
</file>