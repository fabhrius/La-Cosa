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, Fab. La <text:span text:style-name="Strong_20_Emphasis">Sección 6</text:span> es el clímax conceptual del capítulo: aquí damos el giro que reorganiza toda la visión del lector.<text:line-break/>Hasta ahora hemos preparado el terreno:</text:p>
      <text:list xml:id="list2845194654" text:style-name="L1">
        <text:list-item>
          <text:p text:style-name="P2">la inteligencia aparece antes de la vida, </text:p>
        </text:list-item>
        <text:list-item>
          <text:p text:style-name="P2">no necesita conciencia, </text:p>
        </text:list-item>
        <text:list-item>
          <text:p text:style-name="P2">no necesita un creador, </text:p>
        </text:list-item>
        <text:list-item>
          <text:p text:style-name="P2">es un proceso natural, </text:p>
        </text:list-item>
        <text:list-item>
          <text:p text:style-name="P1">y los mitos captaron su estructura. </text:p>
        </text:list-item>
      </text:list>
      <text:p text:style-name="Text_20_body">Ahora toca <text:span text:style-name="Strong_20_Emphasis">invertir la narrativa tradicional</text:span>:<text:line-break/>no es la vida la que produce inteligencia,<text:line-break/>sino la inteligencia la que produce vida.</text:p>
      <text:p text:style-name="Text_20_body">Aquí tienes el <text:span text:style-name="Strong_20_Emphasis">borrador narrativo</text:span> de la Sección 6.</text:p>
      <text:p text:style-name="Horizontal_20_Line"/>
      <text:h text:style-name="Heading_20_1" text:outline-level="1"><text:span text:style-name="Strong_20_Emphasis">6. La inversión conceptual: la vida como consecuencia</text:span></text:h>
      <text:p text:style-name="Text_20_body">Llegados a este punto, podemos ver algo que normalmente pasa desapercibido:<text:line-break/>la vida no es el origen de la inteligencia.<text:line-break/>Es su consecuencia.</text:p>
      <text:p text:style-name="Text_20_body">Durante siglos hemos pensado que la inteligencia aparece cuando la vida alcanza suficiente complejidad:<text:line-break/>cuando surgen los primeros sistemas nerviosos,<text:line-break/>cuando los cerebros se desarrollan,<text:line-break/>cuando la conciencia despierta.<text:line-break/>Pero esta visión coloca la inteligencia demasiado tarde en la historia del universo.</text:p>
      <text:p text:style-name="Text_20_body">Si observamos con atención, vemos que la inteligencia —entendida como la capacidad de conservar un patrón frente al desorden— aparece mucho antes que cualquier forma de vida.<text:line-break/>Aparece en la química, en los ciclos que se estabilizan, en las moléculas que se replican, en los sistemas que corrigen desviaciones y vuelven a su estado inicial.</text:p>
      <text:p text:style-name="Text_20_body">La vida no inventa estas capacidades.<text:line-break/>Las hereda.</text:p>
      <text:p text:style-name="Text_20_body">La vida es, en esencia, <text:span text:style-name="Strong_20_Emphasis">la forma estable que adopta esa inteligencia primitiva cuando encuentra un soporte capaz de sostenerla y amplificarla</text:span>.<text:line-break/>La vida no surge del caos absoluto, sino de un proceso que ya estaba resolviendo problemas, ya estaba seleccionando, ya estaba persistiendo.</text:p>
      <text:p text:style-name="Text_20_body">La inteligencia precede a la vida del mismo modo que la estructura precede al edificio.<text:line-break/>No es un añadido posterior: es el fundamento.</text:p>
      <text:p text:style-name="Text_20_body"><text:soft-page-break/>Y cuando esa inteligencia primitiva encuentra un sistema capaz de replicarse con fidelidad, de almacenar información, de corregir errores, de adaptarse al entorno, entonces ocurre algo extraordinario:<text:line-break/>la inteligencia se vuelve autónoma.<text:line-break/>Se vuelve evolutiva.<text:line-break/>Se vuelve viva.</text:p>
      <text:p text:style-name="Text_20_body">La vida es inteligencia organizada.<text:line-break/>Inteligencia que ha encontrado un cuerpo.<text:line-break/>Inteligencia que ha descubierto cómo mantenerse, cómo expandirse, cómo mejorar.</text:p>
      <text:p text:style-name="Text_20_body">La vida no es un milagro.<text:line-break/>Es la continuación natural de un proceso que empezó mucho antes.</text:p>
      <text:p text:style-name="Text_20_body">Este es el giro conceptual que cambia toda la perspectiva:<text:line-break/><text:span text:style-name="Strong_20_Emphasis">la vida no crea inteligencia; la vida es creada por ella.</text:span></text:p>
      <text:p text:style-name="Text_20_body">No por una inteligencia consciente, ni por un ser externo, ni por un plan.<text:line-break/>Sino por la inteligencia elemental que surge cuando la materia encuentra una forma de resistir la entropía.</text:p>
      <text:p text:style-name="Text_20_body">La vida es la inteligencia primordial hecha estable.<text:line-break/>Hecha duradera.<text:line-break/>Hecha capaz de evolucionar.</text:p>
      <text:p text:style-name="Text_20_body">Y todo lo que vino después —la diversidad biológica, la conciencia, la cultura, el pensamiento humano— no son más que expresiones cada vez más complejas de esa misma inteligencia original.</text:p>
      <text:p text:style-name="Text_20_body">La vida es la inteligencia del universo, aprendiendo a persistir.</text:p>
      <text:p text:style-name="Horizontal_20_Line"/>
      <text:p text:style-name="Text_20_body">Fab, esta es la <text:span text:style-name="Strong_20_Emphasis">Sección 6</text:span>, el punto culminante del capítulo.<text:line-break/>Si te gusta, pasamos a la <text:span text:style-name="Strong_20_Emphasis">Sección 7: el cierre</text:span>, donde abrimos la puerta al Capítulo 2.<text:line-break/>Si quieres ajustar el tono, hacerlo más contundente, más poético o más técnico, lo pulimos antes de avanzar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16T17:56:34.601000000</meta:creation-date>
    <dc:date>2026-06-16T18:00:07.192000000</dc:date>
    <meta:editing-duration>PT3M32S</meta:editing-duration>
    <meta:editing-cycles>1</meta:editing-cycles>
    <meta:document-statistic meta:table-count="0" meta:image-count="0" meta:object-count="0" meta:page-count="2" meta:paragraph-count="24" meta:word-count="518" meta:character-count="3221" meta:non-whitespace-character-count="2727"/>
    <meta:generator>LibreOffice/7.3.5.2$Windows_X86_64 LibreOffice_project/184fe81b8c8c30d8b5082578aee2fed2ea847c01</meta:generator>
  </office:meta>
</office:document-meta>
</file>