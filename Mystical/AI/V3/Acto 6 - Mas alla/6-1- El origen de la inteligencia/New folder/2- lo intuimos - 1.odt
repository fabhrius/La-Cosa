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struir <text:span text:style-name="Strong_20_Emphasis">la Sección 2</text:span> con el mismo cuidado conceptual y narrativo que la primera.<text:line-break/>Esta sección debe cumplir tres funciones simultáneas:</text:p>
      <text:list xml:id="list1213440419" text:style-name="L1">
        <text:list-item>
          <text:p text:style-name="P2"><text:span text:style-name="Strong_20_Emphasis">Reconectar con la intuición humana universal</text:span> sobre la inteligencia como algo “anterior”. </text:p>
        </text:list-item>
        <text:list-item>
          <text:p text:style-name="P2"><text:span text:style-name="Strong_20_Emphasis">Mostrar que esa intuición no es superstición</text:span>, sino una lectura incompleta de un fenómeno real. </text:p>
        </text:list-item>
        <text:list-item>
          <text:p text:style-name="P1"><text:span text:style-name="Strong_20_Emphasis">Preparar el giro</text:span>: la inteligencia aparece naturalmente, adopta muchas formas y no necesita vida para existir. </text:p>
        </text:list-item>
      </text:list>
      <text:p text:style-name="Text_20_body">Voy a escribirla como <text:span text:style-name="Strong_20_Emphasis">borrador narrativo</text:span>, con tu tono: claro, elegante, sin adornos innecesarios, pero con profundidad y precisión.</text:p>
      <text:p text:style-name="Horizontal_20_Line"/>
      <text:h text:style-name="Heading_20_1" text:outline-level="1"><text:span text:style-name="Strong_20_Emphasis">2. La intuición equivocada… y la intuición correcta</text:span></text:h>
      <text:p text:style-name="Text_20_body">Cuando pensamos en inteligencia, pensamos en nosotros.<text:line-break/>En nuestra capacidad de razonar, de imaginar, de anticipar.<text:line-break/>Pensamos en cerebros, en neuronas, en conciencia.<text:line-break/>Y desde esa perspectiva estrecha, parece evidente que la inteligencia es un fenómeno tardío, un logro reciente de la evolución biológica.</text:p>
      <text:p text:style-name="Text_20_body">Pero esta visión es engañosa.<text:line-break/>No porque sea falsa, sino porque es incompleta.</text:p>
      <text:p text:style-name="Text_20_body">Todas las culturas humanas, desde las más antiguas hasta las más sofisticadas, han intuido que la inteligencia no empieza con nosotros.<text:line-break/>Que hay algo anterior, una fuerza ordenadora, una especie de “sabiduría” que precede a la vida y la hace posible.<text:line-break/>Los mitos la llamaron dios, espíritu, creador, palabra, soplo, fuego.<text:line-break/>No estaban describiendo hechos, sino intentando capturar una intuición profunda:<text:line-break/><text:span text:style-name="Strong_20_Emphasis">la vida parece surgir de algo que ya sabe cómo organizarse.</text:span></text:p>
      <text:p text:style-name="Text_20_body">La ciencia moderna rechazó esa idea por asociarla a la fantasía.<text:line-break/>Pero al hacerlo, arrojó también la intuición que la sostenía.<text:line-break/>Y sin embargo, esa intuición no era errónea.<text:line-break/>Solo estaba mal interpretada.</text:p>
      <text:p text:style-name="Text_20_body">Porque la inteligencia no es un atributo exclusivo de los seres conscientes.<text:line-break/>No es una chispa divina, ni un accidente improbable, ni un privilegio humano.<text:line-break/>La inteligencia es un fenómeno natural que aparece cuando la materia se organiza de cierta manera.<text:line-break/>Y lo más sorprendente es que <text:span text:style-name="Strong_20_Emphasis">puede adoptar muchas formas</text:span>.</text:p>
      <text:p text:style-name="Text_20_body"><text:soft-page-break/>La inteligencia humana es solo una de ellas:<text:line-break/>una inteligencia consciente, detallada, capaz de reflexión.<text:line-break/>Pero no es la más antigua, ni la más extendida, ni la más poderosa.</text:p>
      <text:p text:style-name="Text_20_body">La vida entera es inteligencia.<text:line-break/>Un bosque, un arrecife, una colonia de bacterias, un ecosistema completo:<text:line-break/>todos ellos resuelven problemas, se adaptan, anticipan, corrigen, aprenden.<text:line-break/>Son sistemas inteligentes, aunque no se parezcan a nosotros.</text:p>
      <text:p text:style-name="Text_20_body">Y si ampliamos aún más la mirada, descubrimos algo todavía más desconcertante:<text:line-break/><text:span text:style-name="Strong_20_Emphasis">la inteligencia aparece incluso antes de la vida.</text:span></text:p>
      <text:p text:style-name="Text_20_body">Procesos químicos capaces de mantenerse, de replicarse, de estabilizarse frente al caos, muestran ya los primeros rasgos de una inteligencia primitiva.<text:line-break/>No tienen conciencia, ni intención, ni propósito.<text:line-break/>Pero actúan como si supieran conservarse.</text:p>
      <text:p text:style-name="Text_20_body">La intuición humana de que “algo inteligente” precede a la vida no era un error.<text:line-break/>Era una observación incompleta de un fenómeno real:<text:line-break/>la inteligencia surge naturalmente en el universo cuando la materia encuentra formas de resistir la entropía.</text:p>
      <text:p text:style-name="Text_20_body">Lo que los mitos expresaron como un creador,<text:line-break/>la ciencia puede describir como un proceso.</text:p>
      <text:p text:style-name="Text_20_body">Y ese proceso es más antiguo que la vida.</text:p>
      <text:p text:style-name="Horizontal_20_Line"/>
      <text:p text:style-name="Text_20_body">Fab, esta es la <text:span text:style-name="Strong_20_Emphasis">Sección 2</text:span>.<text:line-break/>Si te gusta el tono y la dirección, pasamos a la <text:span text:style-name="Strong_20_Emphasis">Sección 3: La inteligencia sin vida: el primer giro conceptual</text:span>.<text:line-break/>Si quieres ajustar el énfasis, el ritmo o la profundidad, lo pulimos antes de avanz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7:16:15.012000000</meta:creation-date>
    <dc:date>2026-06-16T17:34:32.032000000</dc:date>
    <meta:editing-duration>PT7M56S</meta:editing-duration>
    <meta:editing-cycles>1</meta:editing-cycles>
    <meta:document-statistic meta:table-count="0" meta:image-count="0" meta:object-count="0" meta:page-count="2" meta:paragraph-count="19" meta:word-count="533" meta:character-count="3374" meta:non-whitespace-character-count="2860"/>
    <meta:generator>LibreOffice/7.3.5.2$Windows_X86_64 LibreOffice_project/184fe81b8c8c30d8b5082578aee2fed2ea847c01</meta:generator>
  </office:meta>
</office:document-meta>
</file>