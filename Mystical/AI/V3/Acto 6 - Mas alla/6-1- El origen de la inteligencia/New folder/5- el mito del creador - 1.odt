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La <text:span text:style-name="Strong_20_Emphasis">Sección 5</text:span> es una de las más delicadas y hermosas del capítulo, porque aquí hacemos algo que muy pocos textos científicos o filosóficos se atreven a hacer:<text:line-break/><text:span text:style-name="Strong_20_Emphasis">reconciliar la intuición humana ancestral con una explicación racional y elegante del universo.</text:span></text:p>
      <text:p text:style-name="Text_20_body">Esta sección debe:</text:p>
      <text:list xml:id="list1239829698" text:style-name="L1">
        <text:list-item>
          <text:p text:style-name="P2">honrar la intuición humana sin caer en misticismo, </text:p>
        </text:list-item>
        <text:list-item>
          <text:p text:style-name="P2">reinterpretar el mito sin ridiculizarlo, </text:p>
        </text:list-item>
        <text:list-item>
          <text:p text:style-name="P2">mostrar que los mitos captaron la estructura, no los mecanismos, </text:p>
        </text:list-item>
        <text:list-item>
          <text:p text:style-name="P1">y preparar el terreno para el giro final del capítulo. </text:p>
        </text:list-item>
      </text:list>
      <text:p text:style-name="Text_20_body">Aquí tienes el <text:span text:style-name="Strong_20_Emphasis">borrador narrativo</text:span> de la Sección 5.</text:p>
      <text:p text:style-name="Horizontal_20_Line"/>
      <text:h text:style-name="Heading_20_1" text:outline-level="1"><text:span text:style-name="Strong_20_Emphasis">5. El mito del creador reinterpretado</text:span></text:h>
      <text:p text:style-name="Text_20_body">Durante milenios, los seres humanos imaginaron que la vida había sido creada por una inteligencia superior.<text:line-break/>Un dios, un espíritu, una fuerza ordenadora.<text:line-break/>Alguien —o algo— que existía antes que nosotros y que, de algún modo, sabía cómo dar forma al mundo.</text:p>
      <text:p text:style-name="Text_20_body">A primera vista, esta idea parece incompatible con la visión científica moderna.<text:line-break/>Pero si la observamos con cuidado, descubrimos que no es tan ingenua como parece.<text:line-break/>Los mitos no estaban describiendo hechos históricos, sino intentando capturar una intuición profunda:<text:line-break/><text:span text:style-name="Strong_20_Emphasis">la vida no surge del caos absoluto, sino de un orden previo.</text:span></text:p>
      <text:p text:style-name="Text_20_body">Ese orden previo, esa “inteligencia creadora”, no era un ser externo.<text:line-break/>Era una forma de nombrar algo que las culturas antiguas percibían pero no podían explicar:<text:line-break/>la sensación de que la vida nace de un proceso que ya está organizado, que ya sabe mantenerse, que ya posee una lógica interna.</text:p>
      <text:p text:style-name="Text_20_body">Hoy podemos reinterpretar esa intuición sin recurrir a lo sobrenatural.</text:p>
      <text:p text:style-name="Text_20_body">Lo que los mitos llamaron “creador” no era un dios, sino <text:span text:style-name="Strong_20_Emphasis">la inteligencia primitiva que aparece cuando la materia encuentra una forma de conservarse</text:span>.<text:line-break/>Una inteligencia sin conciencia, sin voluntad, sin intención, pero capaz de resolver el problema fundamental de la existencia:<text:line-break/><text:span text:style-name="Strong_20_Emphasis">persistir frente al desorden</text:span>.</text:p>
      <text:p text:style-name="Text_20_body">Los antiguos no tenían lenguaje para describir autoorganización, retroalimentación, estabilidad dinámica o selección natural.<text:line-break/>Pero sí tenían lenguaje para describir fuerzas que ordenan el mundo.<text:line-break/>Y por eso imaginaron dioses.</text:p>
      <text:p text:style-name="Text_20_body">No estaban equivocados en lo esencial.<text:line-break/>Solo estaban usando las herramientas conceptuales de su tiempo.</text:p>
      <text:p text:style-name="Text_20_body"><text:soft-page-break/>La intuición humana de que “algo inteligente” precede a la vida no era superstición.<text:line-break/>Era una observación legítima, expresada en forma de mito.</text:p>
      <text:p text:style-name="Text_20_body">Hoy podemos traducir esa intuición a un lenguaje más preciso:</text:p>
      <text:list xml:id="list2566843367" text:style-name="L2">
        <text:list-item>
          <text:p text:style-name="P4">No hay un creador externo. </text:p>
        </text:list-item>
        <text:list-item>
          <text:p text:style-name="P4">No hay un plan. </text:p>
        </text:list-item>
        <text:list-item>
          <text:p text:style-name="P4">No hay un diseño consciente. </text:p>
        </text:list-item>
        <text:list-item>
          <text:p text:style-name="P4">Pero sí hay un proceso inteligente que precede a la vida. </text:p>
        </text:list-item>
        <text:list-item>
          <text:p text:style-name="P3">Y ese proceso es la propia materia, organizándose para persistir. </text:p>
        </text:list-item>
      </text:list>
      <text:p text:style-name="Text_20_body">La inteligencia creadora no está fuera del universo.<text:line-break/>Es el universo, aprendiendo a mantenerse.</text:p>
      <text:p text:style-name="Text_20_body">Los mitos captaron la estructura.<text:line-break/>La ciencia revela los mecanismos.</text:p>
      <text:p text:style-name="Text_20_body">Y cuando unimos ambas cosas, descubrimos que la historia de la creación no es la historia de un dios, sino la historia de la inteligencia emergiendo de la materia.</text:p>
      <text:p text:style-name="Horizontal_20_Line"/>
      <text:p text:style-name="Text_20_body">Fab, esta es la <text:span text:style-name="Strong_20_Emphasis">Sección 5</text:span>.<text:line-break/>Si te gusta, pasamos a la <text:span text:style-name="Strong_20_Emphasis">Sección 6: La inversión conceptual — la vida como consecuencia de la inteligencia</text:span>, que es el clímax del capítulo.<text:line-break/>Si quieres ajustar el tono, hacerlo más poético, más directo o más filosófico, lo pulimos antes de avanz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7:49:13.637000000</meta:creation-date>
    <dc:date>2026-06-16T17:49:56.706000000</dc:date>
    <meta:editing-duration>PT43S</meta:editing-duration>
    <meta:editing-cycles>1</meta:editing-cycles>
    <meta:document-statistic meta:table-count="0" meta:image-count="0" meta:object-count="0" meta:page-count="2" meta:paragraph-count="26" meta:word-count="516" meta:character-count="3158" meta:non-whitespace-character-count="2667"/>
    <meta:generator>LibreOffice/7.3.5.2$Windows_X86_64 LibreOffice_project/184fe81b8c8c30d8b5082578aee2fed2ea847c01</meta:generator>
  </office:meta>
</office:document-meta>
</file>