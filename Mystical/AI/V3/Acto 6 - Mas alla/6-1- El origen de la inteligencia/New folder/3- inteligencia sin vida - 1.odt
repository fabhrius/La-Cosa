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, Fab. Vamos a construir <text:span text:style-name="Strong_20_Emphasis">la Sección 3</text:span>, que es una de las más importantes del capítulo porque introduce el <text:span text:style-name="Strong_20_Emphasis">primer giro conceptual fuerte</text:span>:<text:line-break/>la inteligencia existe <text:span text:style-name="Strong_20_Emphasis">antes</text:span> de la vida.</text:p>
      <text:p text:style-name="Text_20_body">Esta sección debe:</text:p>
      <text:list xml:id="list40035748" text:style-name="L1">
        <text:list-item>
          <text:p text:style-name="P2">sorprender sin exagerar, </text:p>
        </text:list-item>
        <text:list-item>
          <text:p text:style-name="P2">ser rigurosa sin tecnicismos, </text:p>
        </text:list-item>
        <text:list-item>
          <text:p text:style-name="P2">mostrar ejemplos naturales, </text:p>
        </text:list-item>
        <text:list-item>
          <text:p text:style-name="P1">y preparar el terreno para el origen de la vida. </text:p>
        </text:list-item>
      </text:list>
      <text:p text:style-name="Text_20_body">Aquí tienes el <text:span text:style-name="Strong_20_Emphasis">borrador narrativo</text:span> de la Sección 3.</text:p>
      <text:p text:style-name="Horizontal_20_Line"/>
      <text:h text:style-name="Heading_20_1" text:outline-level="1"><text:span text:style-name="Strong_20_Emphasis">3. La inteligencia sin vida: el primer giro conceptual</text:span></text:h>
      <text:p text:style-name="Text_20_body">Si queremos entender el origen de la inteligencia, debemos atrevernos a mirar donde casi nadie mira:<text:line-break/>en la materia que aún no está viva.</text:p>
      <text:p text:style-name="Text_20_body">Porque la inteligencia no aparece de repente con los organismos.<text:line-break/>No surge de la nada cuando una célula aprende a dividirse o cuando un cerebro aprende a pensar.<text:line-break/>La inteligencia empieza mucho antes, en un territorio que solemos considerar inerte, simple, carente de intención.</text:p>
      <text:p text:style-name="Text_20_body">Y sin embargo, ahí está.</text:p>
      <text:p text:style-name="Text_20_body">En ciertos procesos químicos primitivos encontramos ya los primeros rasgos de lo que, más tarde, reconoceremos como inteligencia.<text:line-break/>No tienen conciencia, ni memoria, ni propósito.<text:line-break/>Pero muestran algo más profundo: <text:span text:style-name="Strong_20_Emphasis">la capacidad de conservar un patrón frente al desorden</text:span>.</text:p>
      <text:p text:style-name="Text_20_body">Una molécula que se replica a sí misma está resolviendo un problema.<text:line-break/>Un ciclo químico que se mantiene estable frente a perturbaciones está tomando decisiones, aunque no lo sepa.<text:line-break/>Una red de reacciones que corrige desviaciones y vuelve a su estado inicial está ejecutando una forma elemental de retroalimentación.</text:p>
      <text:p text:style-name="Text_20_body">No son seres vivos.<text:line-break/>Pero tampoco son simples.<text:line-break/>Son sistemas que, sin vida, ya muestran comportamientos que asociamos a la inteligencia:</text:p>
      <text:list xml:id="list2620349777" text:style-name="L2">
        <text:list-item>
          <text:p text:style-name="P4"><text:span text:style-name="Strong_20_Emphasis">persistencia</text:span>, </text:p>
        </text:list-item>
        <text:list-item>
          <text:p text:style-name="P4"><text:span text:style-name="Strong_20_Emphasis">selección</text:span>, </text:p>
        </text:list-item>
        <text:list-item>
          <text:p text:style-name="P4"><text:span text:style-name="Strong_20_Emphasis">adaptación</text:span>, </text:p>
        </text:list-item>
        <text:list-item>
          <text:p text:style-name="P4"><text:span text:style-name="Strong_20_Emphasis">estabilidad</text:span>, </text:p>
        </text:list-item>
        <text:list-item>
          <text:p text:style-name="P3"><text:soft-page-break/><text:span text:style-name="Strong_20_Emphasis">resistencia al caos</text:span>. </text:p>
        </text:list-item>
      </text:list>
      <text:p text:style-name="Text_20_body">La inteligencia, en su forma más primitiva, no necesita neuronas.<text:line-break/>No necesita órganos.<text:line-break/>Ni siquiera necesita células.</text:p>
      <text:p text:style-name="Text_20_body">Solo necesita <text:span text:style-name="Strong_20_Emphasis">un patrón que se esfuerza por mantenerse</text:span>.</text:p>
      <text:p text:style-name="Text_20_body">Ese esfuerzo no es consciente.<text:line-break/>No es intencional.<text:line-break/>Pero es real.</text:p>
      <text:p text:style-name="Text_20_body">Cuando un sistema químico encuentra una configuración que le permite durar un poco más que las demás, ese sistema está, en cierto sentido, “resolviendo” el problema de la entropía.<text:line-break/>Cuando una molécula se replica, está “descubriendo” una estrategia para persistir.<text:line-break/>Cuando un ciclo se estabiliza, está “aprendiendo” a sobrevivir en un entorno hostil.</text:p>
      <text:p text:style-name="Text_20_body">Estas palabras —resolver, descubrir, aprender— no son metáforas.<text:line-break/>Son descripciones funcionales de lo que ocurre.</text:p>
      <text:p text:style-name="Text_20_body">La inteligencia, entendida como <text:span text:style-name="Strong_20_Emphasis">la capacidad de conservar un patrón frente al desorden</text:span>, aparece en cuanto la materia encuentra una forma de resistir la entropía.<text:line-break/>Y eso sucede mucho antes de que exista la vida.</text:p>
      <text:p text:style-name="Text_20_body">Este es el primer giro conceptual del capítulo:<text:line-break/><text:span text:style-name="Strong_20_Emphasis">la inteligencia no es un producto de la vida; la vida es un producto de la inteligencia.</text:span></text:p>
      <text:p text:style-name="Text_20_body">La vida no inventa la inteligencia.<text:line-break/>La hereda.<text:line-break/>La amplifica.<text:line-break/>La organiza.<text:line-break/>La convierte en algo estable, autónomo y capaz de evolucionar.</text:p>
      <text:p text:style-name="Text_20_body">Pero la semilla estaba ahí desde antes.</text:p>
      <text:p text:style-name="Horizontal_20_Line"/>
      <text:p text:style-name="Text_20_body">Fab, esta es la <text:span text:style-name="Strong_20_Emphasis">Sección 3</text:span>.<text:line-break/>Si te gusta el tono y la dirección, pasamos a la <text:span text:style-name="Strong_20_Emphasis">Sección 4: La inteligencia como proceso natural</text:span>.<text:line-break/>Si quieres ajustar el nivel de detalle, el énfasis o el estilo, lo pulimos antes de avanzar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16T17:36:59.070000000</meta:creation-date>
    <dc:date>2026-06-16T17:42:26.646000000</dc:date>
    <meta:editing-duration>PT5M27S</meta:editing-duration>
    <meta:editing-cycles>1</meta:editing-cycles>
    <meta:document-statistic meta:table-count="0" meta:image-count="0" meta:object-count="0" meta:page-count="2" meta:paragraph-count="29" meta:word-count="505" meta:character-count="3096" meta:non-whitespace-character-count="2620"/>
    <meta:generator>LibreOffice/7.3.5.2$Windows_X86_64 LibreOffice_project/184fe81b8c8c30d8b5082578aee2fed2ea847c01</meta:generator>
  </office:meta>
</office:document-meta>
</file>