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50fa6"/>
    </style:style>
    <style:style style:name="P2" style:family="paragraph" style:parent-style-name="Text_20_body" style:list-style-name="L1">
      <style:paragraph-properties fo:margin-top="0in" fo:margin-bottom="0in" style:contextual-spacing="false"/>
      <style:text-properties officeooo:paragraph-rsid="00150fa6"/>
    </style:style>
    <style:style style:name="P3" style:family="paragraph" style:parent-style-name="Text_20_body" style:list-style-name="L1">
      <style:text-properties officeooo:paragraph-rsid="00150fa6"/>
    </style:style>
    <style:style style:name="P4" style:family="paragraph" style:parent-style-name="Text_20_body">
      <style:text-properties officeooo:paragraph-rsid="00150fa6"/>
    </style:style>
    <style:style style:name="P5" style:family="paragraph" style:parent-style-name="Text_20_body">
      <style:text-properties officeooo:rsid="0016a3e5" officeooo:paragraph-rsid="0016a3e5"/>
    </style:style>
    <style:style style:name="T1" style:family="text">
      <style:text-properties officeooo:rsid="0019b86c"/>
    </style:style>
    <style:style style:name="T2" style:family="text">
      <style:text-properties officeooo:rsid="00197e60"/>
    </style:style>
    <style:style style:name="T3" style:family="text">
      <style:text-properties officeooo:rsid="001d4156"/>
    </style:style>
    <style:style style:name="T4" style:family="text">
      <style:text-properties officeooo:rsid="001ef372"/>
    </style:style>
    <style:style style:name="T5" style:family="text">
      <style:text-properties officeooo:rsid="0020ad1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/>
      <text:p text:style-name="P4"><text:span text:style-name="Strong_20_Emphasis">¿Cuándo apareció la inteligencia por primera vez en el universo?</text:span></text:p>
      <text:p text:style-name="P1"/>
      <text:p text:style-name="P1">la inteligencia no nació con nosotros.<text:line-break/>Ni siquiera nació con la vida.</text:p>
      <text:p text:style-name="P4">La inteligencia es anterior.</text:p>
      <text:p text:style-name="P4">Y todo lo que vino después —la vida, la evolución, la conciencia— no son más que formas cada vez más complejas de esa inteligencia primordial </text:p>
      <text:p text:style-name="P4"><text:span text:style-name="Strong_20_Emphasis">la inteligencia aparece de manera natural</text:span><text:span text:style-name="Strong_20_Emphasis"><text:span text:style-name="T1"> cuando la materia se organiza de cierta manera</text:span></text:span><text:span text:style-name="Strong_20_Emphasis">, <text:s/>su origen está en la propia estructura del cosmos.</text:span></text:p>
      <text:p text:style-name="P4"><text:span text:style-name="Strong_20_Emphasis">Procesos químicos capaces de mantenerse, de estabilizarse frente al caos, muestran ya los primeros rasgos de una inteligencia primitiva.</text:span></text:p>
      <text:p text:style-name="P4"><text:span text:style-name="Strong_20_Emphasis">La intuición humana de que “algo inteligente” precede a la vida no e</text:span><text:span text:style-name="Strong_20_Emphasis"><text:span text:style-name="T2">s</text:span></text:span><text:span text:style-name="Strong_20_Emphasis"> un error.</text:span></text:p>
      <text:p text:style-name="P4">Lo que los mitos expresaron como un creador,<text:span text:style-name="T1"> es algo que </text:span>la ciencia<text:span text:style-name="T2"> describe</text:span> como un proceso.</text:p>
      <text:p text:style-name="P4"><text:span text:style-name="Strong_20_Emphasis">Y ese proceso es más antiguo que la vida.</text:span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>En ciertos procesos químicos primitivos encontramos ya los primeros rasgos de lo que, más tarde, reconoceremos como inteligencia.</text:span></text:p>
      <text:p text:style-name="P4"><text:span text:style-name="Strong_20_Emphasis">Un ciclo químico que se mantiene estable frente a perturbaciones tomando decisiones,</text:span></text:p>
      <text:p text:style-name="P4"><text:span text:style-name="Strong_20_Emphasis">Una red de reacciones que corrige desviaciones y vuelve a su estado inicial retroalimenta</text:span><text:span text:style-name="Strong_20_Emphasis"><text:span text:style-name="T3">ndo el proceso</text:span></text:span><text:span text:style-name="Strong_20_Emphasis">.</text:span></text:p>
      <text:p text:style-name="P4"><text:span text:style-name="Strong_20_Emphasis"/></text:p>
      <text:p text:style-name="P1">sistemas que, sin vida, ya muestran comportamientos que asociamos a la inteligencia:</text:p>
      <text:list xml:id="list2161353637" text:style-name="L1">
        <text:list-item>
          <text:p text:style-name="P2"><text:span text:style-name="Strong_20_Emphasis">persistencia</text:span>, </text:p>
        </text:list-item>
        <text:list-item>
          <text:p text:style-name="P2"><text:span text:style-name="Strong_20_Emphasis">selección</text:span>, </text:p>
        </text:list-item>
        <text:list-item>
          <text:p text:style-name="P2"><text:span text:style-name="Strong_20_Emphasis">adaptación</text:span>, </text:p>
        </text:list-item>
        <text:list-item>
          <text:p text:style-name="P2"><text:span text:style-name="Strong_20_Emphasis">estabilidad</text:span>, </text:p>
        </text:list-item>
        <text:list-item>
          <text:p text:style-name="P3"><text:span text:style-name="Strong_20_Emphasis">resistencia al caos</text:span>. </text:p>
        </text:list-item>
      </text:list>
      <text:p text:style-name="P4"><text:span text:style-name="Strong_20_Emphasis"><text:span text:style-name="T3">Son l</text:span></text:span><text:span text:style-name="Strong_20_Emphasis">a inteligencia, en su forma más primitiva</text:span><text:span text:style-name="Strong_20_Emphasis"><text:span text:style-name="T3">.</text:span></text:span></text:p>
      <text:p text:style-name="P4"><text:span text:style-name="Strong_20_Emphasis">un patrón que se esfuerza por mantenerse.</text:span><text:span text:style-name="Strong_20_Emphasis"><text:span text:style-name="T4"> </text:span></text:span></text:p>
      <text:p text:style-name="P4"><text:span text:style-name="Strong_20_Emphasis"/></text:p>
      <text:p text:style-name="P4"><text:span text:style-name="Strong_20_Emphasis">mucho antes de que exista la vida</text:span><text:span text:style-name="Strong_20_Emphasis"><text:span text:style-name="T4"> <text:s/>la materia encuentra una forma de resistir la entropía</text:span></text:span></text:p>
      <text:p text:style-name="P4"><text:soft-page-break/><text:span text:style-name="Strong_20_Emphasis"><text:span text:style-name="T4">estructuras con la capacidad de conservar un patrón frente al desorden</text:span></text:span></text:p>
      <text:p text:style-name="P1"/>
      <text:p text:style-name="P4"><text:span text:style-name="Strong_20_Emphasis">la inteligencia no es un producto de la vida; la vida es un producto de la inteligencia.</text:span></text:p>
      <text:p text:style-name="P4"><text:span text:style-name="Strong_20_Emphasis"/></text:p>
      <text:p text:style-name="P4"><text:span text:style-name="Strong_20_Emphasis"><text:span text:style-name="T5">la vida es la misma inteligencia natural, cuando se transforma en algo estable, autónomo y capaz de evolucionar.</text:span></text:span></text:p>
      <text:p text:style-name="Horizontal_20_Line"/>
      <text:p text:style-name="Text_20_body"/>
      <text:p text:style-name="P5">4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16T19:19:25.071000000</meta:creation-date>
    <dc:date>2026-06-16T21:34:08.986000000</dc:date>
    <meta:editing-duration>PT2H14M43S</meta:editing-duration>
    <meta:editing-cycles>2</meta:editing-cycles>
    <meta:generator>LibreOffice/7.3.5.2$Windows_X86_64 LibreOffice_project/184fe81b8c8c30d8b5082578aee2fed2ea847c01</meta:generator>
    <meta:document-statistic meta:table-count="0" meta:image-count="0" meta:object-count="0" meta:page-count="2" meta:paragraph-count="25" meta:word-count="282" meta:character-count="1719" meta:non-whitespace-character-count="1458"/>
  </office:meta>
</office:document-meta>
</file>