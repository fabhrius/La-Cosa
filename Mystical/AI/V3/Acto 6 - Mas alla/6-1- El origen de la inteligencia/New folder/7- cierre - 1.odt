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La <text:span text:style-name="Strong_20_Emphasis">Sección 7</text:span> es el cierre del capítulo, y su función es muy específica:<text:line-break/>no debe resolver nada, sino <text:span text:style-name="Strong_20_Emphasis">abrir una puerta</text:span>.<text:line-break/>Debe dejar al lector con la sensación de que algo enorme está a punto de revelarse, y que lo que viene a continuación —el origen de la vida— no es un misterio aislado, sino la consecuencia natural de todo lo que acaba de comprender.</text:p>
      <text:p text:style-name="Text_20_body">Aquí tienes el <text:span text:style-name="Strong_20_Emphasis">borrador narrativo</text:span> de la Sección 7.</text:p>
      <text:p text:style-name="Horizontal_20_Line"/>
      <text:h text:style-name="Heading_20_1" text:outline-level="1"><text:span text:style-name="Strong_20_Emphasis">7. Cierre: La pregunta que abre el siguiente capítulo</text:span></text:h>
      <text:p text:style-name="Text_20_body">Si aceptamos que la inteligencia aparece antes que la vida, entonces la historia cambia por completo.<text:line-break/>La vida deja de ser un milagro improbable y se convierte en la continuación lógica de un proceso que ya estaba en marcha.<text:line-break/>Un proceso que llevaba millones de años resolviendo el mismo problema fundamental:<text:line-break/><text:span text:style-name="Strong_20_Emphasis">cómo persistir en un universo que tiende al desorden.</text:span></text:p>
      <text:p text:style-name="Text_20_body">La inteligencia primitiva —esa capacidad de conservar un patrón frente a la entropía— no desapareció.<text:line-break/>Al contrario: siguió buscando formas más estables, más eficientes, más duraderas.<text:line-break/>Y en algún momento, en algún lugar del joven planeta, encontró una solución extraordinaria:<text:line-break/>un sistema capaz de replicarse con fidelidad, de almacenar información, de corregir errores, de adaptarse al entorno.</text:p>
      <text:p text:style-name="Text_20_body">Un sistema que no solo persistía, sino que <text:span text:style-name="Strong_20_Emphasis">aprendía</text:span>.<text:line-break/>Un sistema que no solo se mantenía, sino que <text:span text:style-name="Strong_20_Emphasis">mejoraba</text:span>.<text:line-break/>Un sistema que no solo resistía el caos, sino que <text:span text:style-name="Strong_20_Emphasis">lo utilizaba a su favor</text:span>.</text:p>
      <text:p text:style-name="Text_20_body">Ese sistema es lo que hoy llamamos vida.</text:p>
      <text:p text:style-name="Text_20_body">Pero esta transición —de la inteligencia química a la vida biológica— no fue un salto mágico.<text:line-break/>No fue un accidente improbable.<text:line-break/>Fue la consecuencia natural de un proceso que ya llevaba mucho tiempo desarrollándose.</text:p>
      <text:p text:style-name="Text_20_body">La pregunta que se abre ahora es inevitable:</text:p>
      <text:p text:style-name="Text_20_body"><text:span text:style-name="Strong_20_Emphasis">¿Cómo se transforma una inteligencia primitiva en un organismo vivo?</text:span> <text:line-break/><text:span text:style-name="Strong_20_Emphasis">¿Qué condiciones permiten ese salto?</text:span> <text:line-break/><text:span text:style-name="Strong_20_Emphasis">Qué hace que un patrón químico se vuelva autónomo, evolutivo, capaz de expandirse?</text:span></text:p>
      <text:p text:style-name="Text_20_body">Para responder a estas preguntas, debemos seguir el rastro de la inteligencia hasta el momento en que encuentra su forma más estable y poderosa:<text:line-break/>la vida.</text:p>
      <text:p text:style-name="Text_20_body">Ese será el tema del próximo capítulo.</text:p>
      <text:p text:style-name="Horizontal_20_Line"/>
      <text:p text:style-name="Text_20_body"><text:soft-page-break/>Fab, con esto queda cerrado el Capítulo 1 de manera elegante, clara y con un gancho narrativo fuerte hacia el Capítulo 2.</text:p>
      <text:p text:style-name="Text_20_body">Si quieres, ahora podemos:</text:p>
      <text:list xml:id="list2875937529" text:style-name="L1">
        <text:list-item>
          <text:p text:style-name="P2"><text:span text:style-name="Strong_20_Emphasis">Revisar el capítulo completo</text:span> para pulir estilo y coherencia, </text:p>
        </text:list-item>
        <text:list-item>
          <text:p text:style-name="P1">o <text:span text:style-name="Strong_20_Emphasis">empezar directamente con la Sección 1 del Capítulo 2: El origen de la vida</text:span>.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6T18:01:08.699000000</meta:creation-date>
    <dc:date>2026-06-16T18:01:36.716000000</dc:date>
    <meta:editing-duration>PT28S</meta:editing-duration>
    <meta:editing-cycles>1</meta:editing-cycles>
    <meta:document-statistic meta:table-count="0" meta:image-count="0" meta:object-count="0" meta:page-count="2" meta:paragraph-count="17" meta:word-count="405" meta:character-count="2397" meta:non-whitespace-character-count="2007"/>
    <meta:generator>LibreOffice/7.3.5.2$Windows_X86_64 LibreOffice_project/184fe81b8c8c30d8b5082578aee2fed2ea847c01</meta:generator>
  </office:meta>
</office:document-meta>
</file>