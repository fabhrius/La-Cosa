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Vamos a empezar por la <text:span text:style-name="Strong_20_Emphasis">primera sección narrativa</text:span>, la apertura del capítulo.<text:line-break/>Esta sección es crucial: establece el tono, abre la pregunta correcta y prepara al lector para el giro conceptual que vendrá después.</text:p>
      <text:p text:style-name="Text_20_body">Voy a escribirla como <text:span text:style-name="Strong_20_Emphasis">primer borrador literario</text:span>, siguiendo tu estilo: claro, elegante, sin adornos innecesarios, pero con profundidad filosófica y precisión conceptual.</text:p>
      <text:p text:style-name="Text_20_body">Tú me dices después si quieres ajustarla, ampliarla o cambiar el tono.</text:p>
      <text:p text:style-name="Horizontal_20_Line"/>
      <text:h text:style-name="Heading_20_1" text:outline-level="1"><text:span text:style-name="Strong_20_Emphasis">Capítulo 1 — El origen de la inteligencia</text:span></text:h>
      <text:h text:style-name="Heading_20_3" text:outline-level="3"><text:span text:style-name="Strong_20_Emphasis">1. Apertura: La pregunta que nunca formulamos</text:span></text:h>
      <text:p text:style-name="Text_20_body">Durante siglos hemos hablado de la inteligencia como si fuera un atributo exclusivamente humano.<text:line-break/>La hemos estudiado en nuestros cerebros, la hemos buscado en otras especies, la hemos proyectado en máquinas.<text:line-break/>Siempre partimos de la misma premisa: <text:span text:style-name="Strong_20_Emphasis">la inteligencia empieza con nosotros</text:span>, o al menos con la vida.</text:p>
      <text:p text:style-name="Text_20_body">Pero esa premisa es engañosa.<text:line-break/>No porque sea falsa, sino porque es demasiado estrecha para contener la verdad.</text:p>
      <text:p text:style-name="Text_20_body">La pregunta que deberíamos hacernos no es:<text:line-break/><text:span text:style-name="Strong_20_Emphasis">¿cómo surgió la inteligencia humana?</text:span> <text:line-break/>ni siquiera<text:line-break/><text:span text:style-name="Strong_20_Emphasis">¿cómo surgió la inteligencia en los seres vivos?</text:span></text:p>
      <text:p text:style-name="Text_20_body">La pregunta correcta es otra, más simple y más profunda:</text:p>
      <text:p text:style-name="Text_20_body"><text:span text:style-name="Strong_20_Emphasis">¿Cuándo apareció la inteligencia por primera vez en el universo?</text:span></text:p>
      <text:p text:style-name="Text_20_body">Es una pregunta que rara vez formulamos, quizá porque intuimos que su respuesta nos obliga a abandonar la comodidad del antropocentrismo.<text:line-break/>Pero también es una pregunta liberadora, porque nos permite ver la inteligencia no como un privilegio, sino como un fenómeno natural, tan real y tan antiguo como la materia misma.</text:p>
      <text:p text:style-name="Text_20_body">Si seguimos esta pregunta hasta el fondo, descubrimos algo inesperado:<text:line-break/>la inteligencia no nació con nosotros.<text:line-break/>Ni siquiera nació con la vida.</text:p>
      <text:p text:style-name="Text_20_body">La inteligencia es anterior.</text:p>
      <text:p text:style-name="Text_20_body">Y todo lo que vino después —la vida, la evolución, la conciencia— no son más que formas cada vez más complejas de esa inteligencia primordial que ya estaba ahí, actuando en silencio mucho antes de que existiera un organismo capaz de nombrarla.</text:p>
      <text:p text:style-name="Horizontal_20_Line"/>
      <text:p text:style-name="Text_20_body"><text:soft-page-break/>Fab, esta es la <text:span text:style-name="Strong_20_Emphasis">primera sección</text:span>.<text:line-break/>Si te gusta el tono y la dirección, pasamos a la segunda.<text:line-break/>Si quieres que sea más poética, más directa, más técnica o más narrativa, la ajust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15T19:46:07.151000000</meta:creation-date>
    <dc:date>2026-06-15T19:48:23.560000000</dc:date>
    <meta:editing-duration>PT2M16S</meta:editing-duration>
    <meta:editing-cycles>1</meta:editing-cycles>
    <meta:document-statistic meta:table-count="0" meta:image-count="0" meta:object-count="0" meta:page-count="2" meta:paragraph-count="15" meta:word-count="344" meta:character-count="2127" meta:non-whitespace-character-count="1796"/>
    <meta:generator>LibreOffice/7.3.5.2$Windows_X86_64 LibreOffice_project/184fe81b8c8c30d8b5082578aee2fed2ea847c01</meta:generator>
  </office:meta>
</office:document-meta>
</file>