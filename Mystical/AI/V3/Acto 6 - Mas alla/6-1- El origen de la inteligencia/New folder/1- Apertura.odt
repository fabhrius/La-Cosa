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62f8a"/>
    </style:style>
    <style:style style:name="P2" style:family="paragraph" style:parent-style-name="Standard">
      <style:text-properties officeooo:paragraph-rsid="001d4156"/>
    </style:style>
    <style:style style:name="P3" style:family="paragraph" style:parent-style-name="Text_20_body">
      <style:text-properties officeooo:paragraph-rsid="00162f8a"/>
    </style:style>
    <style:style style:name="P4" style:family="paragraph" style:parent-style-name="Text_20_body">
      <style:text-properties officeooo:paragraph-rsid="00197e60"/>
    </style:style>
    <style:style style:name="P5" style:family="paragraph" style:parent-style-name="Text_20_body">
      <style:text-properties officeooo:paragraph-rsid="0019b86c"/>
    </style:style>
    <style:style style:name="P6" style:family="paragraph" style:parent-style-name="Text_20_body">
      <style:text-properties officeooo:paragraph-rsid="001d4156"/>
    </style:style>
    <style:style style:name="P7" style:family="paragraph" style:parent-style-name="Text_20_body" style:list-style-name="L1">
      <style:paragraph-properties fo:margin-top="0in" fo:margin-bottom="0in" style:contextual-spacing="false"/>
      <style:text-properties officeooo:paragraph-rsid="001d4156"/>
    </style:style>
    <style:style style:name="P8" style:family="paragraph" style:parent-style-name="Text_20_body" style:list-style-name="L1">
      <style:text-properties officeooo:paragraph-rsid="001d4156"/>
    </style:style>
    <style:style style:name="P9" style:family="paragraph" style:parent-style-name="Text_20_body">
      <style:text-properties officeooo:paragraph-rsid="001ef372"/>
    </style:style>
    <style:style style:name="P10" style:family="paragraph" style:parent-style-name="Text_20_body">
      <style:text-properties officeooo:paragraph-rsid="0020ad14"/>
    </style:style>
    <style:style style:name="T1" style:family="text">
      <style:text-properties fo:color="#c9211e" loext:opacity="100%"/>
    </style:style>
    <style:style style:name="T2" style:family="text">
      <style:text-properties officeooo:rsid="00197e60"/>
    </style:style>
    <style:style style:name="T3" style:family="text">
      <style:text-properties officeooo:rsid="0019b86c"/>
    </style:style>
    <style:style style:name="T4" style:family="text">
      <style:text-properties officeooo:rsid="001d4156"/>
    </style:style>
    <style:style style:name="T5" style:family="text">
      <style:text-properties officeooo:rsid="001ef372"/>
    </style:style>
    <style:style style:name="T6" style:family="text">
      <style:text-properties officeooo:rsid="0020ad1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1" text:outline-level="1"><text:span text:style-name="Strong_20_Emphasis">Capítulo 1 — El origen de la inteligencia</text:span></text:h>
      <text:h text:style-name="Heading_20_3" text:outline-level="3"><text:span text:style-name="Strong_20_Emphasis">1. Apertura: La pregunta que nunca formulamos</text:span></text:h>
      <text:p text:style-name="Text_20_body">Durante siglos hemos hablado de la inteligencia como si fuera un atributo exclusivamente humano.<text:line-break/>La hemos estudiado en nuestros cerebros, la hemos buscado en otras especies, la hemos proyectado en máquinas.<text:line-break/>Siempre partimos de la misma premisa: <text:span text:style-name="Strong_20_Emphasis">la inteligencia empieza con nosotros</text:span>, o al menos con la vida.</text:p>
      <text:p text:style-name="Text_20_body">Pero esa premisa es engañosa.<text:line-break/><text:span text:style-name="T1">No porque sea falsa, sino porque es demasiado estrecha para contener la verdad.</text:span></text:p>
      <text:p text:style-name="Text_20_body">La pregunta que deberíamos hacernos no es:<text:line-break/><text:span text:style-name="Strong_20_Emphasis">¿cómo surgió la inteligencia humana?</text:span> <text:line-break/>ni siquiera<text:line-break/><text:span text:style-name="Strong_20_Emphasis">¿cómo surgió la inteligencia en los seres vivos?</text:span></text:p>
      <text:p text:style-name="Text_20_body">La pregunta correcta es otra, más simple y más profunda:</text:p>
      <text:p text:style-name="Text_20_body"><text:span text:style-name="Strong_20_Emphasis">¿Cuándo apareció la inteligencia por primera vez en el universo?</text:span></text:p>
      <text:p text:style-name="Text_20_body">Es una pregunta que rara vez formulamos, quizá porque intuimos que su respuesta nos obliga a abandonar la comodidad del antropocentrismo.<text:line-break/>Pero también es una pregunta liberadora, porque nos permite ver la inteligencia no como un privilegio, sino como un fenómeno natural, tan real y tan antiguo como la materia misma.</text:p>
      <text:p text:style-name="Text_20_body">Si seguimos esta pregunta hasta el fondo, descubrimos algo inesperado:<text:line-break/>la inteligencia no nació con nosotros.<text:line-break/>Ni siquiera nació con la vida.</text:p>
      <text:p text:style-name="Text_20_body">La inteligencia es anterior.</text:p>
      <text:p text:style-name="Text_20_body">Y todo lo que vino después —la vida, la evolución, la conciencia— no son más que formas cada vez más complejas de esa inteligencia primordial que ya estaba ahí, actuando en silencio mucho antes de que existiera un organismo capaz de nombrarla.</text:p>
      <text:p text:style-name="Horizontal_20_Line"/>
      <text:p text:style-name="Text_20_body"/>
      <text:p text:style-name="Text_20_body"/>
      <text:p text:style-name="Text_20_body"/>
      <text:p text:style-name="Text_20_body"/>
      <text:p text:style-name="Text_20_body"/>
      <text:p text:style-name="Text_20_body"/>
      <text:p text:style-name="Text_20_body"><text:soft-page-break/></text:p>
      <text:p text:style-name="P5"><text:span text:style-name="Strong_20_Emphasis">¿Cuándo apareció la inteligencia por primera vez en el universo?</text:span></text:p>
      <text:p text:style-name="P1"/>
      <text:p text:style-name="P1">la inteligencia no nació con nosotros.<text:line-break/>Ni siquiera nació con la vida.</text:p>
      <text:p text:style-name="P3">La inteligencia es anterior.</text:p>
      <text:p text:style-name="P3">Y todo lo que vino después —la vida, la evolución, la conciencia— no son más que formas cada vez más complejas de esa inteligencia primordial </text:p>
      <text:p text:style-name="P5"><text:span text:style-name="Strong_20_Emphasis">la inteligencia aparece de manera natural</text:span><text:span text:style-name="Strong_20_Emphasis"><text:span text:style-name="T3"> cuando la materia se organiza de cierta manera</text:span></text:span><text:span text:style-name="Strong_20_Emphasis">, <text:s/>su origen está en la propia estructura del cosmos.</text:span></text:p>
      <text:p text:style-name="P4"><text:span text:style-name="Strong_20_Emphasis">Procesos químicos capaces de mantenerse, de estabilizarse frente al caos, muestran ya los primeros rasgos de una inteligencia primitiva.</text:span></text:p>
      <text:p text:style-name="P4"><text:span text:style-name="Strong_20_Emphasis">La intuición humana de que “algo inteligente” precede a la vida no e</text:span><text:span text:style-name="Strong_20_Emphasis"><text:span text:style-name="T2">s</text:span></text:span><text:span text:style-name="Strong_20_Emphasis"> un error.</text:span></text:p>
      <text:p text:style-name="P4">Lo que los mitos expresaron como un creador,<text:span text:style-name="T3"> es algo que </text:span>la ciencia<text:span text:style-name="T2"> describe</text:span> como un proceso.</text:p>
      <text:p text:style-name="P4"><text:span text:style-name="Strong_20_Emphasis">Y ese proceso es más antiguo que la vida.</text:span></text:p>
      <text:p text:style-name="P4"><text:span text:style-name="Strong_20_Emphasis"/></text:p>
      <text:p text:style-name="P4"><text:span text:style-name="Strong_20_Emphasis"/></text:p>
      <text:p text:style-name="P6"><text:span text:style-name="Strong_20_Emphasis">En ciertos procesos químicos primitivos encontramos ya los primeros rasgos de lo que, más tarde, reconoceremos como inteligencia.</text:span></text:p>
      <text:p text:style-name="P6"><text:span text:style-name="Strong_20_Emphasis">Un ciclo químico que se mantiene estable frente a perturbaciones tomando decisiones,</text:span></text:p>
      <text:p text:style-name="P6"><text:span text:style-name="Strong_20_Emphasis">Una red de reacciones que corrige desviaciones y vuelve a su estado inicial retroalimenta</text:span><text:span text:style-name="Strong_20_Emphasis"><text:span text:style-name="T4">ndo el proceso</text:span></text:span><text:span text:style-name="Strong_20_Emphasis">.</text:span></text:p>
      <text:p text:style-name="P6"><text:span text:style-name="Strong_20_Emphasis"/></text:p>
      <text:p text:style-name="P2">sistemas que, sin vida, ya muestran comportamientos que asociamos a la inteligencia:</text:p>
      <text:list xml:id="list2161353637" text:style-name="L1">
        <text:list-item>
          <text:p text:style-name="P7"><text:span text:style-name="Strong_20_Emphasis">persistencia</text:span>, </text:p>
        </text:list-item>
        <text:list-item>
          <text:p text:style-name="P7"><text:span text:style-name="Strong_20_Emphasis">selección</text:span>, </text:p>
        </text:list-item>
        <text:list-item>
          <text:p text:style-name="P7"><text:span text:style-name="Strong_20_Emphasis">adaptación</text:span>, </text:p>
        </text:list-item>
        <text:list-item>
          <text:p text:style-name="P7"><text:span text:style-name="Strong_20_Emphasis">estabilidad</text:span>, </text:p>
        </text:list-item>
        <text:list-item>
          <text:p text:style-name="P8"><text:span text:style-name="Strong_20_Emphasis">resistencia al caos</text:span>. </text:p>
        </text:list-item>
      </text:list>
      <text:p text:style-name="P6"><text:span text:style-name="Strong_20_Emphasis"><text:span text:style-name="T4">Son l</text:span></text:span><text:span text:style-name="Strong_20_Emphasis">a inteligencia, en su forma más primitiva</text:span><text:span text:style-name="Strong_20_Emphasis"><text:span text:style-name="T4">.</text:span></text:span></text:p>
      <text:p text:style-name="P6"><text:span text:style-name="Strong_20_Emphasis">un patrón que se esfuerza por mantenerse.</text:span><text:span text:style-name="Strong_20_Emphasis"><text:span text:style-name="T5"> </text:span></text:span></text:p>
      <text:p text:style-name="P6"><text:span text:style-name="Strong_20_Emphasis"/></text:p>
      <text:p text:style-name="P9"><text:span text:style-name="Strong_20_Emphasis">mucho antes de que exista la vida</text:span><text:span text:style-name="Strong_20_Emphasis"><text:span text:style-name="T5"> <text:s/>la materia encuentra una forma de resistir la entropía</text:span></text:span></text:p>
      <text:p text:style-name="P9"><text:span text:style-name="Strong_20_Emphasis"><text:span text:style-name="T5">estructuras con la capacidad de conservar un patrón frente al desorden</text:span></text:span></text:p>
      <text:p text:style-name="Standard"><text:soft-page-break/></text:p>
      <text:p text:style-name="P10"><text:span text:style-name="Strong_20_Emphasis">la inteligencia no es un producto de la vida; la vida es un producto de la inteligencia.</text:span></text:p>
      <text:p text:style-name="P10"><text:span text:style-name="Strong_20_Emphasis"/></text:p>
      <text:p text:style-name="P10"><text:span text:style-name="Strong_20_Emphasis"><text:span text:style-name="T6">la vida es la misma inteligencia natural, cuando se transforma en algo estable, autónomo y capaz de evolucionar.</text:span></text:span></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15T19:46:07.151000000</meta:creation-date>
    <dc:date>2026-06-16T19:19:00.253000000</dc:date>
    <meta:editing-duration>PT34M36S</meta:editing-duration>
    <meta:editing-cycles>10</meta:editing-cycles>
    <meta:generator>LibreOffice/7.3.5.2$Windows_X86_64 LibreOffice_project/184fe81b8c8c30d8b5082578aee2fed2ea847c01</meta:generator>
    <meta:document-statistic meta:table-count="0" meta:image-count="0" meta:object-count="0" meta:page-count="3" meta:paragraph-count="35" meta:word-count="522" meta:character-count="3208" meta:non-whitespace-character-count="2715"/>
  </office:meta>
</office:document-meta>
</file>