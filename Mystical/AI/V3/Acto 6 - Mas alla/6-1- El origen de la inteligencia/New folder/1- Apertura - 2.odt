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, Fab. Vamos a reescribir <text:span text:style-name="Strong_20_Emphasis">la primera sección</text:span> siguiendo exactamente la orientación que propones:<text:line-break/>más centrada en <text:span text:style-name="Strong_20_Emphasis">explorar qué es la inteligencia</text:span>, en <text:span text:style-name="Strong_20_Emphasis">el misterio de su aparición natural</text:span>, en <text:span text:style-name="Strong_20_Emphasis">la multiplicidad de formas que adopta</text:span>, y en <text:span text:style-name="Strong_20_Emphasis">la ceguera cultural que nos impide verla</text:span>.</text:p>
      <text:p text:style-name="Text_20_body">Voy a darte un <text:span text:style-name="Strong_20_Emphasis">nuevo borrador</text:span> de la sección 1, completamente alineado con tu visión.<text:line-break/>Este texto ya está pensado para ser el inicio del capítulo.</text:p>
      <text:p text:style-name="Horizontal_20_Line"/>
      <text:h text:style-name="Heading_20_1" text:outline-level="1"><text:span text:style-name="Strong_20_Emphasis">Capítulo 1 — El origen de la inteligencia</text:span></text:h>
      <text:h text:style-name="Heading_20_3" text:outline-level="3"><text:span text:style-name="Strong_20_Emphasis">1. Apertura: La inteligencia como misterio inadvertido</text:span></text:h>
      <text:p text:style-name="Text_20_body">La inteligencia es, quizá, el mayor misterio que pasa desapercibido.<text:line-break/>Vivimos rodeados de ella, la utilizamos a cada instante, la damos por sentada.<text:line-break/>Nos parece tan natural que casi creemos haberla inventado nosotros, como si fuera un logro exclusivo de nuestra especie.</text:p>
      <text:p text:style-name="Text_20_body">Pero la inteligencia no nació con el ser humano.<text:line-break/>Ni siquiera nació con la vida.</text:p>
      <text:p text:style-name="Text_20_body">La inteligencia es anterior.</text:p>
      <text:p text:style-name="Text_20_body">Y sin embargo, casi nadie se detiene a preguntarse qué es realmente, ni cómo aparece en un universo que, en principio, debería tender al desorden.<text:line-break/>La inteligencia no es una propiedad mágica, ni un privilegio biológico, ni un accidente improbable.<text:line-break/>Es un fenómeno natural que surge cuando la materia adopta ciertas formas de organización.</text:p>
      <text:p text:style-name="Text_20_body">Lo sorprendente es que la inteligencia puede adoptar muchas formas.<text:line-break/>La inteligencia humana es solo una de ellas: una inteligencia consciente, detallada, capaz de reflexión y lenguaje.<text:line-break/>Tal vez una de las más complejas que conocemos, pero no la única.</text:p>
      <text:p text:style-name="Text_20_body">La vida entera es inteligencia.<text:line-break/>Y si hablamos de potencia de cálculo, de capacidad de adaptación, de resolución de problemas, la vida —como conjunto— supera ampliamente a cualquier cerebro individual.<text:line-break/>Una colonia de bacterias, un bosque, un ecosistema completo, poseen formas de inteligencia que no se parecen a la nuestra, pero que son reales, eficaces y profundas.</text:p>
      <text:p text:style-name="Text_20_body">El objetivo de este capítulo es precisamente ese:<text:line-break/><text:span text:style-name="Strong_20_Emphasis">mirar a la naturaleza como un todo e identificar los sistemas inteligentes que ya existen</text:span>, sin prejuicios antropocéntricos.<text:line-break/>Observarlos, compararlos, y atrevernos a hacer las preguntas que casi nunca formulamos:</text:p>
      <text:p text:style-name="Text_20_body"><text:soft-page-break/><text:span text:style-name="Strong_20_Emphasis">¿Qué es la inteligencia?</text:span> <text:line-break/><text:span text:style-name="Strong_20_Emphasis">¿Cuándo apareció por primera vez en el universo?</text:span> <text:line-break/><text:span text:style-name="Strong_20_Emphasis">¿Cómo surgió?</text:span></text:p>
      <text:p text:style-name="Text_20_body">Preguntas simples, pero que abren una puerta inmensa.<text:line-break/>Porque si la inteligencia aparece de manera natural, sin necesidad de un creador externo, entonces su origen no está en nosotros, sino en la propia estructura del cosmos.</text:p>
      <text:p text:style-name="Text_20_body">Y eso cambia todo.</text:p>
      <text:p text:style-name="Horizontal_20_Line"/>
      <text:p text:style-name="Text_20_body">Fab, este es un borrador completamente alineado con tu intención:<text:line-break/>misterio, amplitud conceptual, ruptura del antropocentrismo, y una invitación a explorar.</text:p>
      <text:p text:style-name="Text_20_body">Si te gusta este tono, pasamos a la <text:span text:style-name="Strong_20_Emphasis">sección 2</text:span>.<text:line-break/>Si quieres que sea más técnico, más poético, más directo o más provocador, lo ajust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6T17:14:12.509000000</meta:creation-date>
    <dc:date>2026-06-16T17:14:31.774000000</dc:date>
    <meta:editing-duration>PT20S</meta:editing-duration>
    <meta:editing-cycles>1</meta:editing-cycles>
    <meta:document-statistic meta:table-count="0" meta:image-count="0" meta:object-count="0" meta:page-count="2" meta:paragraph-count="16" meta:word-count="435" meta:character-count="2725" meta:non-whitespace-character-count="2303"/>
    <meta:generator>LibreOffice/7.3.5.2$Windows_X86_64 LibreOffice_project/184fe81b8c8c30d8b5082578aee2fed2ea847c01</meta:generator>
  </office:meta>
</office:document-meta>
</file>