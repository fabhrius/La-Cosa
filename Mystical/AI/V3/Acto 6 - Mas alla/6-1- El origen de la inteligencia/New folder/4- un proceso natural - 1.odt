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La <text:span text:style-name="Strong_20_Emphasis">Sección 4</text:span> es una de las más delicadas del capítulo, porque aquí debemos <text:span text:style-name="Strong_20_Emphasis">desactivar por completo la idea de milagro, diseño o intención</text:span>, sin perder la profundidad ni la belleza del fenómeno.<text:line-break/>Esta sección debe transmitir una idea poderosa:</text:p>
      <text:p text:style-name="Quotations"><text:span text:style-name="Strong_20_Emphasis">La inteligencia no es un accidente ni un acto de voluntad.<text:line-break/>Es una consecuencia natural de cómo funciona el universo.</text:span></text:p>
      <text:p text:style-name="Text_20_body">Vamos a construirla con ese tono: clara, elegante, inevitable.</text:p>
      <text:p text:style-name="Text_20_body">Aquí tienes el <text:span text:style-name="Strong_20_Emphasis">borrador narrativo</text:span> de la Sección 4.</text:p>
      <text:p text:style-name="Horizontal_20_Line"/>
      <text:h text:style-name="Heading_20_1" text:outline-level="1"><text:span text:style-name="Strong_20_Emphasis">4. La inteligencia como proceso natural</text:span></text:h>
      <text:p text:style-name="Text_20_body">Si aceptamos que la inteligencia aparece antes de la vida, surge una pregunta inevitable:<text:line-break/>¿cómo es posible que algo tan sofisticado surja sin un creador, sin un plan, sin una intención previa?</text:p>
      <text:p text:style-name="Text_20_body">La respuesta es más simple —y más profunda— de lo que parece.</text:p>
      <text:p text:style-name="Text_20_body">La inteligencia no necesita conciencia para existir.<text:line-break/>No necesita un cerebro, ni un organismo, ni un propósito.<text:line-break/>La inteligencia, en su forma más elemental, es simplemente <text:span text:style-name="Strong_20_Emphasis">la capacidad de un sistema para conservarse frente al desorden</text:span>.<text:line-break/>Y esa capacidad no es un milagro: es una consecuencia directa de las leyes físicas.</text:p>
      <text:p text:style-name="Text_20_body">El universo tiende al caos, pero no de manera uniforme.<text:line-break/>En medio de la entropía, aparecen islas de orden: estructuras que, por pura probabilidad y por pura física, duran un poco más que las demás.<text:line-break/>Cuando una de esas estructuras encuentra un modo de mantenerse estable, aunque sea por un instante, está ejecutando el primer gesto de inteligencia:<text:line-break/><text:span text:style-name="Strong_20_Emphasis">resistir la disolución</text:span>.</text:p>
      <text:p text:style-name="Text_20_body">No hace falta intención.<text:line-break/>No hace falta voluntad.<text:line-break/>Solo hace falta que la materia encuentre una configuración que se mantenga.</text:p>
      <text:p text:style-name="Text_20_body">Y cuando esa configuración, además de mantenerse, <text:span text:style-name="Strong_20_Emphasis">se replica</text:span>, entonces la inteligencia primitiva se vuelve poderosa.<text:line-break/>Porque cada copia es una oportunidad de mejorar, de corregir errores, de adaptarse al entorno.<text:line-break/>La selección natural —mucho antes de la vida— empieza a actuar sobre patrones químicos.</text:p>
      <text:p text:style-name="Text_20_body">La inteligencia, entendida como <text:span text:style-name="Strong_20_Emphasis">la capacidad de resolver el problema de la persistencia</text:span>, surge de manera natural cuando:</text:p>
      <text:list xml:id="list283010369" text:style-name="L1">
        <text:list-item>
          <text:p text:style-name="P2">hay energía disponible, </text:p>
        </text:list-item>
        <text:list-item>
          <text:p text:style-name="P2">hay materia capaz de formar ciclos, </text:p>
        </text:list-item>
        <text:list-item>
          <text:p text:style-name="P1"><text:soft-page-break/>y hay un entorno que elimina lo que no funciona. </text:p>
        </text:list-item>
      </text:list>
      <text:p text:style-name="Text_20_body">No es magia.<text:line-break/>No es diseño.<text:line-break/>Es física.</text:p>
      <text:p text:style-name="Text_20_body">La autoorganización no es un fenómeno raro:<text:line-break/>es una propiedad fundamental de los sistemas complejos.<text:line-break/>Cuando suficientes elementos interactúan, aparecen patrones estables que se mantienen por sí mismos.<text:line-break/>Y esos patrones, al mantenerse, están realizando el trabajo esencial de la inteligencia:<text:line-break/><text:span text:style-name="Strong_20_Emphasis">conservar un orden improbable frente al caos inevitable</text:span>.</text:p>
      <text:p text:style-name="Text_20_body">La inteligencia no es un intruso en el universo.<text:line-break/>No es una excepción.<text:line-break/>Es una consecuencia natural de las leyes que gobiernan la materia y la energía.</text:p>
      <text:p text:style-name="Text_20_body">La vida, más tarde, llevará esta inteligencia a niveles extraordinarios.<text:line-break/>Pero la semilla —la capacidad de persistir, de estabilizarse, de corregirse— ya estaba ahí, inscrita en la estructura misma del cosmos.</text:p>
      <text:p text:style-name="Text_20_body">La inteligencia no necesita un creador.<text:line-break/>Es el universo, organizándose a sí mismo.</text:p>
      <text:p text:style-name="Horizontal_20_Line"/>
      <text:p text:style-name="Text_20_body">Fab, esta es la <text:span text:style-name="Strong_20_Emphasis">Sección 4</text:span>.<text:line-break/>Si te gusta el tono, pasamos a la <text:span text:style-name="Strong_20_Emphasis">Sección 5: El mito del creador reinterpretado</text:span>, donde conectamos esta visión con la intuición humana ancestral y preparamos el terreno para el gran giro del capítulo.</text:p>
      <text:p text:style-name="Text_20_body">¿Avanzamo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6T17:43:23.512000000</meta:creation-date>
    <dc:date>2026-06-16T17:43:59.093000000</dc:date>
    <meta:editing-duration>PT35S</meta:editing-duration>
    <meta:editing-cycles>1</meta:editing-cycles>
    <meta:document-statistic meta:table-count="0" meta:image-count="0" meta:object-count="0" meta:page-count="2" meta:paragraph-count="22" meta:word-count="516" meta:character-count="3174" meta:non-whitespace-character-count="2680"/>
    <meta:generator>LibreOffice/7.3.5.2$Windows_X86_64 LibreOffice_project/184fe81b8c8c30d8b5082578aee2fed2ea847c01</meta:generator>
  </office:meta>
</office:document-meta>
</file>