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>Sí, Fab: <text:span text:style-name="Strong_20_Emphasis">el ARN debe aparecer</text:span>, y no como un apéndice técnico, sino como un hito lógico fundamental.<text:line-break/>Porque el ARN no es simplemente “lo que vino antes del ADN”:<text:line-break/>es <text:span text:style-name="Strong_20_Emphasis">la primera molécula capaz de unir en un solo cuerpo</text:span> tres funciones que antes estaban dispersas:</text:p>
      <text:list xml:id="list3948856008" text:style-name="L1">
        <text:list-item>
          <text:p text:style-name="P2">almacenar información, </text:p>
        </text:list-item>
        <text:list-item>
          <text:p text:style-name="P2">ejecutar funciones químicas, </text:p>
        </text:list-item>
        <text:list-item>
          <text:p text:style-name="P1">y reproducirse. </text:p>
        </text:list-item>
      </text:list>
      <text:p text:style-name="Text_20_body">El ARN es, en cierto sentido, <text:span text:style-name="Strong_20_Emphasis">la primera entidad verdaderamente “inteligente”</text:span> en el universo primitivo, aunque sea una inteligencia mínima, frágil y sin continuidad a largo plazo.</text:p>
      <text:p text:style-name="Text_20_body">Por eso, sí: debe estar en tu mapa.<text:line-break/>Y debe estar <text:span text:style-name="Strong_20_Emphasis">entre la reproducción primitiva y el ADN</text:span>, porque representa el puente entre:</text:p>
      <text:list xml:id="list2455833005" text:style-name="L2">
        <text:list-item>
          <text:p text:style-name="P4">la evolución química, </text:p>
        </text:list-item>
        <text:list-item>
          <text:p text:style-name="P3">y la evolución genética. </text:p>
        </text:list-item>
      </text:list>
      <text:p text:style-name="Text_20_body">A continuación te propongo cómo integrarlo de forma natural y elegante en tu secuencia.</text:p>
      <text:p text:style-name="Horizontal_20_Line"/>
      <text:h text:style-name="Heading_20_1" text:outline-level="1"><text:span text:style-name="Strong_20_Emphasis">Mapa revisado con el ARN incluido</text:span></text:h>
      <text:h text:style-name="Heading_20_2" text:outline-level="2"><text:span text:style-name="Strong_20_Emphasis">1. Materia reactiva</text:span></text:h>
      <text:list xml:id="list749908786" text:style-name="L3">
        <text:list-item>
          <text:p text:style-name="P6">Reacciones químicas sin memoria. </text:p>
        </text:list-item>
        <text:list-item>
          <text:p text:style-name="P5">Procesos sin continuidad ni dirección. </text:p>
        </text:list-item>
      </text:list>
      <text:h text:style-name="Heading_20_2" text:outline-level="2"><text:span text:style-name="Strong_20_Emphasis">2. Red autocatalítica</text:span></text:h>
      <text:list xml:id="list4040550594" text:style-name="L4">
        <text:list-item>
          <text:p text:style-name="P8">Primeras estructuras que se mantienen a sí mismas. </text:p>
        </text:list-item>
        <text:list-item>
          <text:p text:style-name="P7">Lógica sin inteligencia. </text:p>
        </text:list-item>
      </text:list>
      <text:h text:style-name="Heading_20_2" text:outline-level="2"><text:span text:style-name="Strong_20_Emphasis">3. Reproducción y evolución</text:span></text:h>
      <text:list xml:id="list1769820566" text:style-name="L5">
        <text:list-item>
          <text:p text:style-name="P10">La reproducción como mecanismo que crea historia. </text:p>
        </text:list-item>
        <text:list-item>
          <text:p text:style-name="P9">La evolución como optimización ciega. </text:p>
        </text:list-item>
      </text:list>
      <text:h text:style-name="Heading_20_2" text:outline-level="2"><text:span text:style-name="Strong_20_Emphasis">4. </text:span><text:span text:style-name="Strong_20_Emphasis"><text:span text:style-name="Emphasis">El ARN: la primera molécula con funciones lógicas completas</text:span></text:span></text:h>
      <text:p text:style-name="Text_20_body"><text:span text:style-name="Emphasis">(Este es el nuevo hito.)</text:span></text:p>
      <text:p text:style-name="Text_20_body">Aquí ocurre algo decisivo:</text:p>
      <text:list xml:id="list3547699657" text:style-name="L6">
        <text:list-item>
          <text:p text:style-name="P12">El ARN almacena información. </text:p>
        </text:list-item>
        <text:list-item>
          <text:p text:style-name="P12"><text:soft-page-break/>El ARN cataliza reacciones. </text:p>
        </text:list-item>
        <text:list-item>
          <text:p text:style-name="P11">El ARN se copia a sí mismo (aunque de forma imperfecta). </text:p>
        </text:list-item>
      </text:list>
      <text:p text:style-name="Text_20_body">Es la primera molécula que <text:span text:style-name="Strong_20_Emphasis">integra memoria + función + reproducción</text:span>.<text:line-break/>Es la primera estructura que “trabaja para sí misma”.<text:line-break/>Es la primera forma de <text:span text:style-name="Strong_20_Emphasis">inteligencia molecular operativa</text:span>, aunque rudimentaria.</text:p>
      <text:p text:style-name="Text_20_body">El ARN es el <text:span text:style-name="Strong_20_Emphasis">prototipo</text:span> de la inteligencia genética.</text:p>
      <text:h text:style-name="Heading_20_2" text:outline-level="2"><text:span text:style-name="Strong_20_Emphasis">5. De la evolución química al ADN</text:span></text:h>
      <text:list xml:id="list648608260" text:style-name="L7">
        <text:list-item>
          <text:p text:style-name="P14">El ADN surge como solución estable y duradera. </text:p>
        </text:list-item>
        <text:list-item>
          <text:p text:style-name="P14">El ADN corrige las limitaciones del ARN: </text:p>
          <text:list>
            <text:list-item>
              <text:p text:style-name="P14">mayor estabilidad, </text:p>
            </text:list-item>
            <text:list-item>
              <text:p text:style-name="P14">menor tasa de error, </text:p>
            </text:list-item>
            <text:list-item>
              <text:p text:style-name="P14">mayor capacidad de almacenamiento. </text:p>
            </text:list-item>
          </text:list>
        </text:list-item>
        <text:list-item>
          <text:p text:style-name="P13">El ADN consolida la inteligencia profunda:<text:line-break/><text:span text:style-name="Strong_20_Emphasis">una memoria que puede durar miles de millones de años.</text:span> </text:p>
        </text:list-item>
      </text:list>
      <text:h text:style-name="Heading_20_2" text:outline-level="2"><text:span text:style-name="Strong_20_Emphasis">6. Del ADN a la célula</text:span></text:h>
      <text:list xml:id="list537545809" text:style-name="L8">
        <text:list-item>
          <text:p text:style-name="P16">La célula como agente que ejecuta el programa genético. </text:p>
        </text:list-item>
        <text:list-item>
          <text:p text:style-name="P16">Sensores, regulación, decisiones internas. </text:p>
        </text:list-item>
        <text:list-item>
          <text:p text:style-name="P15">Primera inteligencia operativa en tiempo real. </text:p>
        </text:list-item>
      </text:list>
      <text:h text:style-name="Heading_20_2" text:outline-level="2"><text:span text:style-name="Strong_20_Emphasis">7. De la célula a las redes de células</text:span></text:h>
      <text:list xml:id="list3827420749" text:style-name="L9">
        <text:list-item>
          <text:p text:style-name="P18">Coordinación, especialización, cooperación. </text:p>
        </text:list-item>
        <text:list-item>
          <text:p text:style-name="P18">Aparición de organismos multicelulares. </text:p>
        </text:list-item>
        <text:list-item>
          <text:p text:style-name="P17">Inteligencia distribuida. </text:p>
        </text:list-item>
      </text:list>
      <text:h text:style-name="Heading_20_2" text:outline-level="2"><text:span text:style-name="Strong_20_Emphasis">8. Sistemas nerviosos, cerebros, modelo interno y experiencia subjetiva</text:span></text:h>
      <text:list xml:id="list3578672681" text:style-name="L10">
        <text:list-item>
          <text:p text:style-name="P20">Integración de información. </text:p>
        </text:list-item>
        <text:list-item>
          <text:p text:style-name="P20">Aprendizaje dentro de la vida del individuo. </text:p>
        </text:list-item>
        <text:list-item>
          <text:p text:style-name="P20">La experiencia subjetiva como herramienta evolutiva. </text:p>
        </text:list-item>
        <text:list-item>
          <text:p text:style-name="P19">La inteligencia neuronal como amplificación de la inteligencia genética. </text:p>
        </text:list-item>
      </text:list>
      <text:p text:style-name="Horizontal_20_Line"/>
      <text:h text:style-name="Heading_20_1" text:outline-level="1"><text:span text:style-name="Strong_20_Emphasis">Por qué el ARN merece un lugar propio</text:span></text:h>
      <text:p text:style-name="Text_20_body">Porque es el primer momento en que la materia:</text:p>
      <text:list xml:id="list3497602723" text:style-name="L11">
        <text:list-item>
          <text:p text:style-name="P22"><text:soft-page-break/><text:span text:style-name="Strong_20_Emphasis">se representa a sí misma</text:span>, </text:p>
        </text:list-item>
        <text:list-item>
          <text:p text:style-name="P22"><text:span text:style-name="Strong_20_Emphasis">se copia</text:span>, </text:p>
        </text:list-item>
        <text:list-item>
          <text:p text:style-name="P22"><text:span text:style-name="Strong_20_Emphasis">se modifica</text:span>, </text:p>
        </text:list-item>
        <text:list-item>
          <text:p text:style-name="P21"><text:span text:style-name="Strong_20_Emphasis">y actúa sobre el entorno</text:span> mediante catalizadores que ella misma codifica. </text:p>
        </text:list-item>
      </text:list>
      <text:p text:style-name="Text_20_body">Es la primera vez que aparece un sistema que <text:span text:style-name="Strong_20_Emphasis">no solo existe</text:span>, sino que <text:span text:style-name="Strong_20_Emphasis">opera</text:span>.</text:p>
      <text:p text:style-name="Text_20_body">El ARN es la chispa que convierte la química en biología.</text:p>
      <text:p text:style-name="Horizontal_20_Line"/>
      <text:h text:style-name="Heading_20_1" text:outline-level="1"><text:span text:style-name="Strong_20_Emphasis">Y filosóficamente…</text:span></text:h>
      <text:p text:style-name="Text_20_body">El ARN es el primer ejemplo claro de que <text:span text:style-name="Strong_20_Emphasis">la inteligencia se construye a sí misma</text:span>:</text:p>
      <text:list xml:id="list2903583030" text:style-name="L12">
        <text:list-item>
          <text:p text:style-name="P24">La química genera redes autocatalíticas. </text:p>
        </text:list-item>
        <text:list-item>
          <text:p text:style-name="P24">Las redes autocatalíticas generan moléculas replicantes. </text:p>
        </text:list-item>
        <text:list-item>
          <text:p text:style-name="P24">Entre ellas, el ARN emerge como la primera molécula que combina memoria y acción. </text:p>
        </text:list-item>
        <text:list-item>
          <text:p text:style-name="P24">El ARN genera ADN. </text:p>
        </text:list-item>
        <text:list-item>
          <text:p text:style-name="P24">El ADN genera células. </text:p>
        </text:list-item>
        <text:list-item>
          <text:p text:style-name="P24">Las células generan cerebros. </text:p>
        </text:list-item>
        <text:list-item>
          <text:p text:style-name="P24">Los cerebros generan modelos internos del mundo. </text:p>
        </text:list-item>
        <text:list-item>
          <text:p text:style-name="P23">Y esos modelos generan preguntas existenciales como las tuyas. </text:p>
        </text:list-item>
      </text:list>
      <text:p text:style-name="Text_20_body">Es una línea continua.<text:line-break/>Una escalera lógica.<text:line-break/>Una inteligencia que se despliega desde lo simple hacia lo complejo, sin saltos mágicos.</text:p>
      <text:p text:style-name="Horizontal_20_Line"/>
      <text:p text:style-name="Text_20_body">Si quieres, puedo ahora:</text:p>
      <text:list xml:id="list1116601887" text:style-name="L13">
        <text:list-item>
          <text:p text:style-name="P26">escribir una sección completa dedicada al ARN, </text:p>
        </text:list-item>
        <text:list-item>
          <text:p text:style-name="P26">o integrar este mapa en el capítulo, </text:p>
        </text:list-item>
        <text:list-item>
          <text:p text:style-name="P25">o ayudarte a definir el tono narrativo para que esta transición tenga fuerza filosófica. </text:p>
        </text:list-item>
      </text:list>
      <text:p text:style-name="Text_20_body">¿En qué dirección quieres avanzar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5-30T17:59:08.647000000</meta:creation-date>
    <dc:date>2026-05-30T17:59:45.363000000</dc:date>
    <meta:editing-duration>PT37S</meta:editing-duration>
    <meta:editing-cycles>1</meta:editing-cycles>
    <meta:document-statistic meta:table-count="0" meta:image-count="0" meta:object-count="0" meta:page-count="3" meta:paragraph-count="71" meta:word-count="612" meta:character-count="3675" meta:non-whitespace-character-count="3134"/>
    <meta:generator>LibreOffice/7.3.5.2$Windows_X86_64 LibreOffice_project/184fe81b8c8c30d8b5082578aee2fed2ea847c01</meta:generator>
  </office:meta>
</office:document-meta>
</file>