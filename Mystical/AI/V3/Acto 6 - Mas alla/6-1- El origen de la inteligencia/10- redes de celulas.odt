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siguiente bloque</text:span>, donde mostramos cómo la inteligencia —ya encarnada en la célula— da su siguiente salto evolutivo: <text:span text:style-name="Strong_20_Emphasis">salir del individuo y distribuirse entre múltiples células</text:span>, cooperar, especializarse y construir organismos más grandes que cualquier célula podría sostener sola.</text:p>
      <text:p text:style-name="Text_20_body">Este bloque es clave porque marca el inicio de la complejidad biológica y, al mismo tiempo, muestra cómo la inteligencia sigue resolviendo su problema fundamental: <text:span text:style-name="Strong_20_Emphasis">continuar existiendo</text:span>, ahora a través de cuerpos colectivos.</text:p>
      <text:p text:style-name="Horizontal_20_Line"/>
      <text:h text:style-name="Heading_20_1" text:outline-level="1"><text:span text:style-name="Strong_20_Emphasis">9. De la célula a los organismos multicelulares: la inteligencia que aprende a cooperar</text:span></text:h>
      <text:h text:style-name="Heading_20_2" text:outline-level="2"><text:span text:style-name="Strong_20_Emphasis">9.1 La célula ya es vida completa… pero tiene límites</text:span></text:h>
      <text:p text:style-name="Text_20_body">La célula es un logro extraordinario:</text:p>
      <text:list xml:id="list640881906" text:style-name="L1">
        <text:list-item>
          <text:p text:style-name="P2">tiene memoria profunda (ADN), </text:p>
        </text:list-item>
        <text:list-item>
          <text:p text:style-name="P2">tiene regulación interna, </text:p>
        </text:list-item>
        <text:list-item>
          <text:p text:style-name="P2">tiene metabolismo, </text:p>
        </text:list-item>
        <text:list-item>
          <text:p text:style-name="P2">tiene agencia, </text:p>
        </text:list-item>
        <text:list-item>
          <text:p text:style-name="P1">se reproduce como unidad. </text:p>
        </text:list-item>
      </text:list>
      <text:p text:style-name="Text_20_body">Pero una célula sola tiene límites físicos y funcionales:</text:p>
      <text:list xml:id="list2549585128" text:style-name="L2">
        <text:list-item>
          <text:p text:style-name="P4">no puede crecer indefinidamente, </text:p>
        </text:list-item>
        <text:list-item>
          <text:p text:style-name="P4">no puede dividir su trabajo interno, </text:p>
        </text:list-item>
        <text:list-item>
          <text:p text:style-name="P4">no puede explorar demasiados entornos a la vez, </text:p>
        </text:list-item>
        <text:list-item>
          <text:p text:style-name="P3">no puede desarrollar funciones demasiado complejas sin saturarse. </text:p>
        </text:list-item>
      </text:list>
      <text:p text:style-name="Text_20_body">La inteligencia molecular, que ya había encontrado en la célula una forma estable de existir, se encuentra ahora con un nuevo problema:</text:p>
      <text:p text:style-name="Quotations"><text:span text:style-name="Strong_20_Emphasis">¿cómo expandirse más allá de lo que una célula individual puede hacer?</text:span></text:p>
      <text:p text:style-name="Text_20_body">La solución será la multicelularidad.</text:p>
      <text:p text:style-name="Horizontal_20_Line"/>
      <text:h text:style-name="Heading_20_2" text:outline-level="2"><text:span text:style-name="Strong_20_Emphasis">9.2 El primer paso: células que se quedan juntas</text:span></text:h>
      <text:p text:style-name="Text_20_body">La multicelularidad no empieza con un plan.<text:line-break/>Empieza con un accidente:</text:p>
      <text:list xml:id="list4137240689" text:style-name="L3">
        <text:list-item>
          <text:p text:style-name="P6">Una célula se divide. </text:p>
        </text:list-item>
        <text:list-item>
          <text:p text:style-name="P6">Las dos células hijas no se separan del todo. </text:p>
        </text:list-item>
        <text:list-item>
          <text:p text:style-name="P6"><text:soft-page-break/>Permanecen unidas por restos de membrana o proteínas de adhesión. </text:p>
        </text:list-item>
        <text:list-item>
          <text:p text:style-name="P5">Forman un pequeño grupo. </text:p>
        </text:list-item>
      </text:list>
      <text:p text:style-name="Text_20_body">Esto ocurre muchas veces en la naturaleza.<text:line-break/>Pero en algunos casos, este grupo tiene ventajas:</text:p>
      <text:list xml:id="list3420473789" text:style-name="L4">
        <text:list-item>
          <text:p text:style-name="P8">más resistencia, </text:p>
        </text:list-item>
        <text:list-item>
          <text:p text:style-name="P8">más estabilidad, </text:p>
        </text:list-item>
        <text:list-item>
          <text:p text:style-name="P8">más capacidad de captar recursos, </text:p>
        </text:list-item>
        <text:list-item>
          <text:p text:style-name="P7">más protección frente al entorno. </text:p>
        </text:list-item>
      </text:list>
      <text:p text:style-name="Text_20_body">La selección favorece estos grupos.</text:p>
      <text:p text:style-name="Text_20_body">La inteligencia molecular, que antes vivía en una célula, ahora empieza a vivir en <text:span text:style-name="Strong_20_Emphasis">un conjunto de células</text:span>.</text:p>
      <text:p text:style-name="Horizontal_20_Line"/>
      <text:h text:style-name="Heading_20_2" text:outline-level="2"><text:span text:style-name="Strong_20_Emphasis">9.3 El segundo paso: cooperación</text:span></text:h>
      <text:p text:style-name="Text_20_body">Al principio, las células del grupo son idénticas.<text:line-break/>Pero pronto aparece algo nuevo:</text:p>
      <text:p text:style-name="Quotations"><text:span text:style-name="Strong_20_Emphasis">las células empiezan a coordinarse.</text:span></text:p>
      <text:p text:style-name="Text_20_body">Esto ocurre porque:</text:p>
      <text:list xml:id="list1739224411" text:style-name="L5">
        <text:list-item>
          <text:p text:style-name="P10">comparten señales químicas, </text:p>
        </text:list-item>
        <text:list-item>
          <text:p text:style-name="P10">comparten nutrientes, </text:p>
        </text:list-item>
        <text:list-item>
          <text:p text:style-name="P10">comparten desechos, </text:p>
        </text:list-item>
        <text:list-item>
          <text:p text:style-name="P9">comparten riesgos. </text:p>
        </text:list-item>
      </text:list>
      <text:p text:style-name="Text_20_body">La cooperación no es intencional.<text:line-break/>Es una consecuencia natural de la proximidad y la comunicación química.</text:p>
      <text:p text:style-name="Text_20_body">Pero tiene un efecto profundo:</text:p>
      <text:list xml:id="list3285410778" text:style-name="L6">
        <text:list-item>
          <text:p text:style-name="P12">el grupo se comporta como una unidad, </text:p>
        </text:list-item>
        <text:list-item>
          <text:p text:style-name="P11">no como células aisladas. </text:p>
        </text:list-item>
      </text:list>
      <text:p text:style-name="Text_20_body">La inteligencia deja de estar confinada en un solo cuerpo celular.</text:p>
      <text:p text:style-name="Horizontal_20_Line"/>
      <text:h text:style-name="Heading_20_2" text:outline-level="2"><text:span text:style-name="Strong_20_Emphasis">9.4 El tercer paso: especialización</text:span></text:h>
      <text:p text:style-name="Text_20_body">Una vez que las células cooperan, aparece la posibilidad de algo revolucionario:</text:p>
      <text:p text:style-name="Quotations"><text:span text:style-name="Strong_20_Emphasis">que distintas células hagan trabajos distintos.</text:span></text:p>
      <text:p text:style-name="Text_20_body">Esto ocurre cuando:</text:p>
      <text:list xml:id="list3796971390" text:style-name="L7">
        <text:list-item>
          <text:p text:style-name="P14"><text:soft-page-break/>algunas células expresan ciertos genes, </text:p>
        </text:list-item>
        <text:list-item>
          <text:p text:style-name="P14">otras expresan otros, </text:p>
        </text:list-item>
        <text:list-item>
          <text:p text:style-name="P13">y el grupo obtiene beneficios de esta división del trabajo. </text:p>
        </text:list-item>
      </text:list>
      <text:p text:style-name="Text_20_body">Ejemplos tempranos:</text:p>
      <text:list xml:id="list1019246115" text:style-name="L8">
        <text:list-item>
          <text:p text:style-name="P16">células externas que protegen, </text:p>
        </text:list-item>
        <text:list-item>
          <text:p text:style-name="P16">células internas que procesan nutrientes, </text:p>
        </text:list-item>
        <text:list-item>
          <text:p text:style-name="P15">células reproductoras que aseguran continuidad. </text:p>
        </text:list-item>
      </text:list>
      <text:p text:style-name="Text_20_body">La especialización permite que el grupo haga cosas que ninguna célula podría hacer sola.</text:p>
      <text:p text:style-name="Text_20_body">Aquí aparece la primera forma de <text:span text:style-name="Strong_20_Emphasis">inteligencia distribuida</text:span>:</text:p>
      <text:list xml:id="list890237128" text:style-name="L9">
        <text:list-item>
          <text:p text:style-name="P18">cada célula tiene su propia regulación interna, </text:p>
        </text:list-item>
        <text:list-item>
          <text:p text:style-name="P17">pero el grupo tiene un comportamiento emergente. </text:p>
        </text:list-item>
      </text:list>
      <text:p text:style-name="Horizontal_20_Line"/>
      <text:h text:style-name="Heading_20_2" text:outline-level="2"><text:span text:style-name="Strong_20_Emphasis">9.5 El cuarto paso: integración</text:span></text:h>
      <text:p text:style-name="Text_20_body">Con el tiempo, los grupos multicelulares desarrollan:</text:p>
      <text:list xml:id="list1330431201" text:style-name="L10">
        <text:list-item>
          <text:p text:style-name="P20">tejidos, </text:p>
        </text:list-item>
        <text:list-item>
          <text:p text:style-name="P20">estructuras, </text:p>
        </text:list-item>
        <text:list-item>
          <text:p text:style-name="P20">comunicación interna, </text:p>
        </text:list-item>
        <text:list-item>
          <text:p text:style-name="P19">patrones de desarrollo. </text:p>
        </text:list-item>
      </text:list>
      <text:p text:style-name="Text_20_body">El grupo ya no es un conjunto de células.<text:line-break/>Es un <text:span text:style-name="Strong_20_Emphasis">organismo</text:span>.</text:p>
      <text:p text:style-name="Text_20_body">Un organismo multicelular es:</text:p>
      <text:list xml:id="list66344759" text:style-name="L11">
        <text:list-item>
          <text:p text:style-name="P22">una red de células cooperando, </text:p>
        </text:list-item>
        <text:list-item>
          <text:p text:style-name="P22">compartiendo información, </text:p>
        </text:list-item>
        <text:list-item>
          <text:p text:style-name="P22">especializándose, </text:p>
        </text:list-item>
        <text:list-item>
          <text:p text:style-name="P21">manteniendo un cuerpo común. </text:p>
        </text:list-item>
      </text:list>
      <text:p text:style-name="Text_20_body">La inteligencia molecular, que nació en redes químicas,<text:line-break/>que se estabilizó en la célula,<text:line-break/>ahora se convierte en <text:span text:style-name="Strong_20_Emphasis">inteligencia corporal colectiva</text:span>.</text:p>
      <text:p text:style-name="Horizontal_20_Line"/>
      <text:h text:style-name="Heading_20_2" text:outline-level="2"><text:span text:style-name="Strong_20_Emphasis">9.6 Por qué la multicelularidad es un salto en la historia de la inteligencia</text:span></text:h>
      <text:p text:style-name="Text_20_body">La multicelularidad introduce capacidades nuevas:</text:p>
      <text:h text:style-name="Heading_20_3" text:outline-level="3"><text:soft-page-break/><text:span text:style-name="Strong_20_Emphasis">1. Escala</text:span></text:h>
      <text:p text:style-name="Text_20_body">Los organismos pueden crecer mucho más que una célula.</text:p>
      <text:h text:style-name="Heading_20_3" text:outline-level="3"><text:span text:style-name="Strong_20_Emphasis">2. Complejidad</text:span></text:h>
      <text:p text:style-name="Text_20_body">Pueden desarrollar órganos, tejidos, sistemas.</text:p>
      <text:h text:style-name="Heading_20_3" text:outline-level="3"><text:span text:style-name="Strong_20_Emphasis">3. Robustez</text:span></text:h>
      <text:p text:style-name="Text_20_body">Si una célula muere, el organismo sigue.</text:p>
      <text:h text:style-name="Heading_20_3" text:outline-level="3"><text:span text:style-name="Strong_20_Emphasis">4. Especialización</text:span></text:h>
      <text:p text:style-name="Text_20_body">Distintas partes del organismo pueden hacer trabajos distintos.</text:p>
      <text:h text:style-name="Heading_20_3" text:outline-level="3"><text:span text:style-name="Strong_20_Emphasis">5. Coordinación</text:span></text:h>
      <text:p text:style-name="Text_20_body">La inteligencia ya no está en una célula, sino en la red completa.</text:p>
      <text:p text:style-name="Text_20_body">En términos funcionales:</text:p>
      <text:p text:style-name="Quotations"><text:span text:style-name="Strong_20_Emphasis">La multicelularidad es la inteligencia aprendiendo a distribuirse.</text:span></text:p>
      <text:p text:style-name="Horizontal_20_Line"/>
      <text:h text:style-name="Heading_20_2" text:outline-level="2"><text:span text:style-name="Strong_20_Emphasis">9.7 La frase que resume este bloque</text:span></text:h>
      <text:p text:style-name="Quotations"><text:span text:style-name="Strong_20_Emphasis">La célula resolvió el problema de la continuidad.<text:line-break/>La multicelularidad resolvió el problema de la escala.</text:span></text:p>
      <text:p text:style-name="Text_20_body">La inteligencia, que ya había encontrado la inmortalidad en la vida,<text:line-break/>ahora encuentra la expansión en los organismos multicelulares.</text:p>
      <text:p text:style-name="Horizontal_20_Line"/>
      <text:p text:style-name="Text_20_body">Si quieres, avanzamos al siguiente bloque:<text:line-break/><text:span text:style-name="Strong_20_Emphasis">El sistema nervioso: cuando la inteligencia distribuida aprende a integrar información en tiempo real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4T17:54:01.100000000</meta:creation-date>
    <dc:date>2026-06-04T18:03:26.404000000</dc:date>
    <meta:editing-duration>PT9M26S</meta:editing-duration>
    <meta:editing-cycles>1</meta:editing-cycles>
    <meta:document-statistic meta:table-count="0" meta:image-count="0" meta:object-count="0" meta:page-count="4" meta:paragraph-count="90" meta:word-count="719" meta:character-count="4621" meta:non-whitespace-character-count="3992"/>
    <meta:generator>LibreOffice/7.3.5.2$Windows_X86_64 LibreOffice_project/184fe81b8c8c30d8b5082578aee2fed2ea847c01</meta:generator>
  </office:meta>
</office:document-meta>
</file>