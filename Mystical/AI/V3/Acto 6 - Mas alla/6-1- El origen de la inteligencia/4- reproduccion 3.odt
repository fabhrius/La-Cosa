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Esta es <text:span text:style-name="Strong_20_Emphasis">la pregunta clave</text:span> que cualquier lector se hará:<text:line-break/><text:span text:style-name="Emphasis">¿qué es exactamente lo que se reproduce? ¿Dónde ocurre? ¿Cómo aparece la reproducción?</text:span></text:p>
      <text:p text:style-name="Text_20_body">Si no respondemos eso con claridad, el concepto queda flotando en el aire.<text:line-break/>Así que vamos a reconstruir el bloque para que el lector entienda <text:span text:style-name="Strong_20_Emphasis">qué se reproduce</text:span>, <text:span text:style-name="Strong_20_Emphasis">cómo surge la reproducción</text:span> y <text:span text:style-name="Strong_20_Emphasis">por qué aparece en ese momento de la historia del universo</text:span>.</text:p>
      <text:p text:style-name="Text_20_body">Aquí tienes una versión completamente revisada, clara y pedagógica.</text:p>
      <text:p text:style-name="Horizontal_20_Line"/>
      <text:h text:style-name="Heading_20_1" text:outline-level="1"><text:span text:style-name="Strong_20_Emphasis">4. Reproducción y evolución</text:span></text:h>
      <text:h text:style-name="Heading_20_2" text:outline-level="2"><text:span text:style-name="Strong_20_Emphasis">4.1 Qué significa reproducirse</text:span></text:h>
      <text:p text:style-name="Text_20_body">En la naturaleza, reproducirse no es copiar.<text:line-break/>Copiar sería hacer algo idéntico, sin cambios.<text:line-break/>La reproducción funciona de otra manera.</text:p>
      <text:p text:style-name="Text_20_body">Reproducirse significa:</text:p>
      <text:p text:style-name="Quotations"><text:span text:style-name="Strong_20_Emphasis">volver a crear una estructura siguiendo un mismo patrón básico,<text:line-break/>usando componentes similares,<text:line-break/>pero permitiendo variaciones.</text:span></text:p>
      <text:p text:style-name="Text_20_body">Es recreación, no copia.</text:p>
      <text:p text:style-name="Text_20_body">La reproducción siempre implica:</text:p>
      <text:list xml:id="list3666836503" text:style-name="L1">
        <text:list-item>
          <text:p text:style-name="P2">un patrón que se conserva, </text:p>
        </text:list-item>
        <text:list-item>
          <text:p text:style-name="P2">componentes que se reorganizan, </text:p>
        </text:list-item>
        <text:list-item>
          <text:p text:style-name="P1">y un resultado que nunca es idéntico al anterior. </text:p>
        </text:list-item>
      </text:list>
      <text:p text:style-name="Horizontal_20_Line"/>
      <text:h text:style-name="Heading_20_2" text:outline-level="2"><text:span text:style-name="Strong_20_Emphasis">4.2 ¿Qué es lo que se reproduce?</text:span></text:h>
      <text:p text:style-name="Text_20_body">Esta es la pregunta esencial.</text:p>
      <text:p text:style-name="Text_20_body">Lo que se reproduce no es una molécula aislada.<text:line-break/>Tampoco es una reacción suelta.</text:p>
      <text:p text:style-name="Text_20_body">Lo que se reproduce es <text:span text:style-name="Strong_20_Emphasis">una organización</text:span>, un <text:span text:style-name="Strong_20_Emphasis">patrón</text:span>, una <text:span text:style-name="Strong_20_Emphasis">forma de funcionar</text:span>.</text:p>
      <text:p text:style-name="Text_20_body">En los primeros pasos de la historia química, lo que se reproduce es:</text:p>
      <text:p text:style-name="Quotations"><text:span text:style-name="Strong_20_Emphasis">un conjunto de reacciones que forman un ciclo capaz de recrearse a partir de sus componentes.</text:span></text:p>
      <text:p text:style-name="Text_20_body"><text:soft-page-break/>Es decir:</text:p>
      <text:list xml:id="list403951808" text:style-name="L2">
        <text:list-item>
          <text:p text:style-name="P4">un proceso, </text:p>
        </text:list-item>
        <text:list-item>
          <text:p text:style-name="P4">una estructura dinámica, </text:p>
        </text:list-item>
        <text:list-item>
          <text:p text:style-name="P3">un modo de organizar la materia. </text:p>
        </text:list-item>
      </text:list>
      <text:p text:style-name="Text_20_body">No se reproduce “una cosa”, sino <text:span text:style-name="Strong_20_Emphasis">una forma de hacer cosas</text:span>.</text:p>
      <text:p text:style-name="Text_20_body">Esto es fundamental:<text:line-break/>la reproducción no es de objetos, sino de <text:span text:style-name="Strong_20_Emphasis">procesos organizados</text:span>.</text:p>
      <text:p text:style-name="Horizontal_20_Line"/>
      <text:h text:style-name="Heading_20_2" text:outline-level="2"><text:span text:style-name="Strong_20_Emphasis">4.3 ¿Dónde aparece la reproducción?</text:span></text:h>
      <text:p text:style-name="Text_20_body">La reproducción aparece <text:span text:style-name="Strong_20_Emphasis">dentro de redes químicas que ya tienen realimentación</text:span>, es decir, dentro de sistemas que ya saben mantenerse.</text:p>
      <text:p text:style-name="Text_20_body">Primero existe:</text:p>
      <text:list xml:id="list1882538406" text:style-name="L3">
        <text:list-item>
          <text:p text:style-name="P5">una red autocatalítica que se mantiene mientras haya recursos. </text:p>
        </text:list-item>
      </text:list>
      <text:p text:style-name="Text_20_body">Después ocurre algo nuevo:</text:p>
      <text:list xml:id="list3045285902" text:style-name="L4">
        <text:list-item>
          <text:p text:style-name="P7">esa red se fragmenta, </text:p>
        </text:list-item>
        <text:list-item>
          <text:p text:style-name="P7">o se expande, </text:p>
        </text:list-item>
        <text:list-item>
          <text:p text:style-name="P7">o se divide en dos zonas, </text:p>
        </text:list-item>
        <text:list-item>
          <text:p text:style-name="P6">y cada zona conserva el mismo patrón de reacciones. </text:p>
        </text:list-item>
      </text:list>
      <text:p text:style-name="Text_20_body">En ese momento, el patrón se ha <text:span text:style-name="Strong_20_Emphasis">recreado</text:span> en otro lugar.</text:p>
      <text:p text:style-name="Text_20_body">Eso es reproducción.</text:p>
      <text:p text:style-name="Text_20_body">No aparece en un sitio mágico.<text:line-break/>No aparece de golpe.<text:line-break/>Aparece <text:span text:style-name="Strong_20_Emphasis">cuando un sistema que ya se mantiene a sí mismo se vuelve capaz de recrear su organización en otro espacio</text:span>.</text:p>
      <text:p text:style-name="Horizontal_20_Line"/>
      <text:h text:style-name="Heading_20_2" text:outline-level="2"><text:span text:style-name="Strong_20_Emphasis">4.4 ¿Cómo aparece la reproducción?</text:span></text:h>
      <text:p text:style-name="Text_20_body">La reproducción surge cuando un sistema químico:</text:p>
      <text:list xml:id="list1554755198" text:style-name="L5">
        <text:list-item>
          <text:p text:style-name="P9"><text:span text:style-name="Strong_20_Emphasis">tiene un patrón estable</text:span> (como una red autocatalítica), </text:p>
        </text:list-item>
        <text:list-item>
          <text:p text:style-name="P9"><text:span text:style-name="Strong_20_Emphasis">puede crecer</text:span> añadiendo componentes, </text:p>
        </text:list-item>
        <text:list-item>
          <text:p text:style-name="P9"><text:span text:style-name="Strong_20_Emphasis">puede dividirse</text:span> o fragmentarse, </text:p>
        </text:list-item>
        <text:list-item>
          <text:p text:style-name="P8"><text:span text:style-name="Strong_20_Emphasis">y cada fragmento conserva el mismo patrón de reacciones.</text:span> </text:p>
        </text:list-item>
      </text:list>
      <text:p text:style-name="Text_20_body">Es decir:</text:p>
      <text:list xml:id="list729607578" text:style-name="L6">
        <text:list-item>
          <text:p text:style-name="P11">primero hay auto-mantenimiento, </text:p>
        </text:list-item>
        <text:list-item>
          <text:p text:style-name="P11"><text:soft-page-break/>luego hay crecimiento, </text:p>
        </text:list-item>
        <text:list-item>
          <text:p text:style-name="P11">luego hay división, </text:p>
        </text:list-item>
        <text:list-item>
          <text:p text:style-name="P10">y finalmente hay recreación del patrón. </text:p>
        </text:list-item>
      </text:list>
      <text:p text:style-name="Text_20_body">La reproducción no es un invento repentino.<text:line-break/>Es una consecuencia natural de:</text:p>
      <text:list xml:id="list2309027006" text:style-name="L7">
        <text:list-item>
          <text:p text:style-name="P13">la realimentación, </text:p>
        </text:list-item>
        <text:list-item>
          <text:p text:style-name="P13">la estabilidad, </text:p>
        </text:list-item>
        <text:list-item>
          <text:p text:style-name="P12">y el crecimiento. </text:p>
        </text:list-item>
      </text:list>
      <text:p text:style-name="Text_20_body">Cuando un sistema se mantiene lo suficiente, termina <text:span text:style-name="Strong_20_Emphasis">repitiéndose</text:span>.</text:p>
      <text:p text:style-name="Horizontal_20_Line"/>
      <text:h text:style-name="Heading_20_2" text:outline-level="2"><text:span text:style-name="Strong_20_Emphasis">4.5 Qué es evolucionar</text:span></text:h>
      <text:p text:style-name="Text_20_body">Si cada recreación introduce pequeñas variaciones, entonces algunas versiones funcionan mejor que otras.</text:p>
      <text:p text:style-name="Text_20_body">Evolucionar significa:</text:p>
      <text:p text:style-name="Quotations"><text:span text:style-name="Strong_20_Emphasis">que las versiones que se mantienen mejor se vuelven más frecuentes con el tiempo.</text:span></text:p>
      <text:p text:style-name="Text_20_body">No hace falta intención.<text:line-break/>No hace falta planificación.</text:p>
      <text:p text:style-name="Text_20_body">Solo hace falta:</text:p>
      <text:list xml:id="list3155109003" text:style-name="L8">
        <text:list-item>
          <text:p text:style-name="P15">recreación, </text:p>
        </text:list-item>
        <text:list-item>
          <text:p text:style-name="P15">variación, </text:p>
        </text:list-item>
        <text:list-item>
          <text:p text:style-name="P14">y consecuencias. </text:p>
        </text:list-item>
      </text:list>
      <text:p text:style-name="Horizontal_20_Line"/>
      <text:h text:style-name="Heading_20_2" text:outline-level="2"><text:span text:style-name="Strong_20_Emphasis">4.6 Por qué este paso es decisivo</text:span></text:h>
      <text:p text:style-name="Text_20_body">La reproducción y la evolución introducen algo que no existía antes:</text:p>
      <text:list xml:id="list2570267886" text:style-name="L9">
        <text:list-item>
          <text:p text:style-name="P17">continuidad, </text:p>
        </text:list-item>
        <text:list-item>
          <text:p text:style-name="P17">herencia, </text:p>
        </text:list-item>
        <text:list-item>
          <text:p text:style-name="P17">acumulación, </text:p>
        </text:list-item>
        <text:list-item>
          <text:p text:style-name="P17">mejora, </text:p>
        </text:list-item>
        <text:list-item>
          <text:p text:style-name="P16">historia. </text:p>
        </text:list-item>
      </text:list>
      <text:p text:style-name="Text_20_body">Antes de la reproducción, todo ocurría una sola vez.<text:line-break/>Después de la reproducción, las formas pueden <text:span text:style-name="Strong_20_Emphasis">persistir a través del tiempo</text:span>.</text:p>
      <text:p text:style-name="Text_20_body">Y aquí aparece la idea clave:</text:p>
      <text:p text:style-name="Quotations"><text:soft-page-break/><text:span text:style-name="Strong_20_Emphasis">La reproducción es la primera forma de inteligencia primitiva:<text:line-break/>un proceso capaz de conservar su forma recreándose.</text:span></text:p>
      <text:p text:style-name="Text_20_body">La evolución es el mecanismo que refina esa inteligencia:</text:p>
      <text:list xml:id="list1338631868" text:style-name="L10">
        <text:list-item>
          <text:p text:style-name="P19">selecciona las versiones que se mantienen mejor, </text:p>
        </text:list-item>
        <text:list-item>
          <text:p text:style-name="P19">descarta las que fallan, </text:p>
        </text:list-item>
        <text:list-item>
          <text:p text:style-name="P18">mejora la capacidad del sistema para persistir. </text:p>
        </text:list-item>
      </text:list>
      <text:p text:style-name="Text_20_body">La vida, tal como la entendemos, es una consecuencia tardía de este proceso.<text:line-break/>La inteligencia —en su forma más básica— aparece antes.</text:p>
      <text:p text:style-name="Horizontal_20_Line"/>
      <text:p text:style-name="Text_20_body">Si quieres, ahora que ya está claro <text:span text:style-name="Strong_20_Emphasis">qué se reproduce</text:span>, <text:span text:style-name="Strong_20_Emphasis">cómo aparece la reproducción</text:span> y <text:span text:style-name="Strong_20_Emphasis">qué significa en este contexto</text:span>, podemos avanzar al siguiente bloque: <text:span text:style-name="Strong_20_Emphasis">El ARN</text:span>, la primera molécula que encarna esta inteligencia primitiva en una estructura concret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1T15:31:25.805000000</meta:creation-date>
    <dc:date>2026-05-31T15:31:46.191000000</dc:date>
    <meta:editing-duration>PT20S</meta:editing-duration>
    <meta:editing-cycles>1</meta:editing-cycles>
    <meta:document-statistic meta:table-count="0" meta:image-count="0" meta:object-count="0" meta:page-count="4" meta:paragraph-count="78" meta:word-count="680" meta:character-count="4138" meta:non-whitespace-character-count="3536"/>
    <meta:generator>LibreOffice/7.3.5.2$Windows_X86_64 LibreOffice_project/184fe81b8c8c30d8b5082578aee2fed2ea847c01</meta:generator>
  </office:meta>
</office:document-meta>
</file>