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el bloque donde realmente nace la inteligencia</text:span>, escrito para el libro, con la misma estructura clara y accesible que venimos usando.<text:line-break/>Este bloque es crucial porque marca el momento exacto en que la materia deja de ser solo química y se convierte en <text:span text:style-name="Strong_20_Emphasis">un sistema que se regula a sí mismo</text:span>.</text:p>
      <text:p text:style-name="Horizontal_20_Line"/>
      <text:h text:style-name="Heading_20_1" text:outline-level="1"><text:span text:style-name="Strong_20_Emphasis">4. Redes autocatalíticas complejas: el nacimiento de la inteligencia</text:span></text:h>
      <text:h text:style-name="Heading_20_2" text:outline-level="2"><text:span text:style-name="Strong_20_Emphasis">4.1 Qué es una red autocatalítica compleja</text:span></text:h>
      <text:p text:style-name="Text_20_body">Una red autocatalítica simple es un conjunto de moléculas que se ayudan mutuamente a producirse.<text:line-break/>Pero una red autocatalítica <text:span text:style-name="Strong_20_Emphasis">compleja</text:span> es algo más:</text:p>
      <text:p text:style-name="Quotations"><text:span text:style-name="Strong_20_Emphasis">Es un sistema químico con múltiples rutas posibles,<text:line-break/>donde el propio estado interno determina qué ruta se activa.</text:span></text:p>
      <text:p text:style-name="Text_20_body">Esto significa que:</text:p>
      <text:list xml:id="list1102927080" text:style-name="L1">
        <text:list-item>
          <text:p text:style-name="P2">la red no siempre reacciona igual, </text:p>
        </text:list-item>
        <text:list-item>
          <text:p text:style-name="P2">su comportamiento depende de cómo está por dentro, </text:p>
        </text:list-item>
        <text:list-item>
          <text:p text:style-name="P2">y ese comportamiento modifica su estado interno, </text:p>
        </text:list-item>
        <text:list-item>
          <text:p text:style-name="P1">creando un ciclo de realimentación. </text:p>
        </text:list-item>
      </text:list>
      <text:p text:style-name="Text_20_body">Aquí aparece algo nuevo en el universo:<text:line-break/><text:span text:style-name="Strong_20_Emphasis">la regulación interna</text:span>.</text:p>
      <text:p text:style-name="Horizontal_20_Line"/>
      <text:h text:style-name="Heading_20_2" text:outline-level="2"><text:span text:style-name="Strong_20_Emphasis">4.2 Qué significa tener un “estado interno”</text:span></text:h>
      <text:p text:style-name="Text_20_body">En química cotidiana, una reacción ocurre igual siempre que las condiciones externas sean las mismas.<text:line-break/>Pero en una red autocatalítica compleja, esto deja de ser cierto.</text:p>
      <text:p text:style-name="Text_20_body">El sistema tiene un “estado interno” que incluye:</text:p>
      <text:list xml:id="list3071344926" text:style-name="L2">
        <text:list-item>
          <text:p text:style-name="P4">qué moléculas hay en ese momento, </text:p>
        </text:list-item>
        <text:list-item>
          <text:p text:style-name="P4">en qué cantidades, </text:p>
        </text:list-item>
        <text:list-item>
          <text:p text:style-name="P4">qué rutas están activas, </text:p>
        </text:list-item>
        <text:list-item>
          <text:p text:style-name="P3">qué partes del ciclo están saturadas o vacías. </text:p>
        </text:list-item>
      </text:list>
      <text:p text:style-name="Text_20_body">Ese estado interno <text:span text:style-name="Strong_20_Emphasis">no es una cosa</text:span>, es una <text:span text:style-name="Strong_20_Emphasis">situación</text:span>.<text:line-break/>Una configuración dinámica.</text:p>
      <text:p text:style-name="Text_20_body">Y lo importante es esto:</text:p>
      <text:p text:style-name="Quotations"><text:soft-page-break/><text:span text:style-name="Strong_20_Emphasis">El estado interno influye en cómo reacciona la red.</text:span></text:p>
      <text:p text:style-name="Text_20_body">Si falta una molécula, la red toma un camino.<text:line-break/>Si sobra otra, toma un camino distinto.<text:line-break/>Si una parte se degrada, el flujo se reorganiza.</text:p>
      <text:p text:style-name="Text_20_body">La red ya no responde solo al exterior.<text:line-break/>Responde también a sí misma.</text:p>
      <text:p text:style-name="Horizontal_20_Line"/>
      <text:h text:style-name="Heading_20_2" text:outline-level="2"><text:span text:style-name="Strong_20_Emphasis">4.3 La realimentación regulada</text:span></text:h>
      <text:p text:style-name="Text_20_body">En una red autocatalítica simple, la realimentación es automática:<text:line-break/>A produce B, B produce C, C produce A.</text:p>
      <text:p text:style-name="Text_20_body">Pero en una red compleja, la realimentación se vuelve <text:span text:style-name="Strong_20_Emphasis">condicional</text:span>:</text:p>
      <text:list xml:id="list167570055" text:style-name="L3">
        <text:list-item>
          <text:p text:style-name="P6">Si hay mucho de A, se frena la producción de A. </text:p>
        </text:list-item>
        <text:list-item>
          <text:p text:style-name="P6">Si falta B, se acelera la ruta que produce B. </text:p>
        </text:list-item>
        <text:list-item>
          <text:p text:style-name="P5">Si una parte del ciclo se bloquea, se activa otra ruta alternativa. </text:p>
        </text:list-item>
      </text:list>
      <text:p text:style-name="Text_20_body">Esto es crucial:</text:p>
      <text:p text:style-name="Quotations"><text:span text:style-name="Strong_20_Emphasis">La red ajusta su comportamiento para mantenerse.</text:span></text:p>
      <text:p text:style-name="Text_20_body">No es una reacción pasiva.<text:line-break/>Es un proceso que se regula a sí mismo.</text:p>
      <text:p text:style-name="Horizontal_20_Line"/>
      <text:h text:style-name="Heading_20_2" text:outline-level="2"><text:span text:style-name="Strong_20_Emphasis">4.4 Por qué esto es inteligencia</text:span></text:h>
      <text:p text:style-name="Text_20_body">La inteligencia, en su definición más general, no es pensar ni razonar.<text:line-break/>Es algo mucho más básico:</text:p>
      <text:p text:style-name="Quotations"><text:span text:style-name="Strong_20_Emphasis">Inteligencia es la capacidad de un sistema de modificar su comportamiento<text:line-break/>en función de su estado interno y de la información que recibe.</text:span></text:p>
      <text:p text:style-name="Text_20_body">Una red autocatalítica compleja ya hace esto:</text:p>
      <text:list xml:id="list2939428890" text:style-name="L4">
        <text:list-item>
          <text:p text:style-name="P8">detecta su propio estado (químicamente), </text:p>
        </text:list-item>
        <text:list-item>
          <text:p text:style-name="P8">ajusta sus reacciones, </text:p>
        </text:list-item>
        <text:list-item>
          <text:p text:style-name="P8">reorganiza su flujo, </text:p>
        </text:list-item>
        <text:list-item>
          <text:p text:style-name="P8">compensa perturbaciones, </text:p>
        </text:list-item>
        <text:list-item>
          <text:p text:style-name="P7">mantiene su forma. </text:p>
        </text:list-item>
      </text:list>
      <text:p text:style-name="Text_20_body">No tiene cerebro.<text:line-break/>No tiene intención.<text:line-break/>No tiene conciencia.</text:p>
      <text:p text:style-name="Text_20_body"><text:soft-page-break/>Pero sí tiene <text:span text:style-name="Strong_20_Emphasis">auto-regulación basada en información interna</text:span>.</text:p>
      <text:p text:style-name="Text_20_body">Y eso es inteligencia en su forma más primitiva.</text:p>
      <text:p text:style-name="Horizontal_20_Line"/>
      <text:h text:style-name="Heading_20_2" text:outline-level="2"><text:span text:style-name="Strong_20_Emphasis">4.5 El primer sistema que “elige”</text:span></text:h>
      <text:p text:style-name="Text_20_body">No elige como un animal.<text:line-break/>No elige como un humano.<text:line-break/>Pero sí <text:span text:style-name="Strong_20_Emphasis">selecciona</text:span> entre rutas posibles según su estado.</text:p>
      <text:p text:style-name="Text_20_body">Ejemplo simple:</text:p>
      <text:list xml:id="list4161049997" text:style-name="L5">
        <text:list-item>
          <text:p text:style-name="P10">Si hay exceso de un producto, la red toma un camino que lo consume. </text:p>
        </text:list-item>
        <text:list-item>
          <text:p text:style-name="P10">Si hay escasez, toma un camino que lo produce. </text:p>
        </text:list-item>
        <text:list-item>
          <text:p text:style-name="P9">Si una parte se degrada, la red reorganiza el flujo para compensar. </text:p>
        </text:list-item>
      </text:list>
      <text:p text:style-name="Text_20_body">Esto no es azar.<text:line-break/>No es pasividad.<text:line-break/>Es <text:span text:style-name="Strong_20_Emphasis">comportamiento condicionado por el estado interno</text:span>.</text:p>
      <text:p text:style-name="Text_20_body">Es el primer embrión de decisión.</text:p>
      <text:p text:style-name="Horizontal_20_Line"/>
      <text:h text:style-name="Heading_20_2" text:outline-level="2"><text:span text:style-name="Strong_20_Emphasis">4.6 Por qué este paso es decisivo</text:span></text:h>
      <text:p text:style-name="Text_20_body">Antes de este punto:</text:p>
      <text:list xml:id="list2641087636" text:style-name="L6">
        <text:list-item>
          <text:p text:style-name="P12">la materia solo reaccionaba, </text:p>
        </text:list-item>
        <text:list-item>
          <text:p text:style-name="P12">no se regulaba, </text:p>
        </text:list-item>
        <text:list-item>
          <text:p text:style-name="P12">no se ajustaba, </text:p>
        </text:list-item>
        <text:list-item>
          <text:p text:style-name="P11">no tenía un “interior”. </text:p>
        </text:list-item>
      </text:list>
      <text:p text:style-name="Text_20_body">Con las redes autocatalíticas complejas aparece:</text:p>
      <text:list xml:id="list2932522241" text:style-name="L7">
        <text:list-item>
          <text:p text:style-name="P14">auto-regulación, </text:p>
        </text:list-item>
        <text:list-item>
          <text:p text:style-name="P14">estabilidad activa, </text:p>
        </text:list-item>
        <text:list-item>
          <text:p text:style-name="P14">compensación, </text:p>
        </text:list-item>
        <text:list-item>
          <text:p text:style-name="P14">selección de rutas, </text:p>
        </text:list-item>
        <text:list-item>
          <text:p text:style-name="P13">comportamiento dependiente del estado interno. </text:p>
        </text:list-item>
      </text:list>
      <text:p text:style-name="Text_20_body">Aquí nace la inteligencia.</text:p>
      <text:p text:style-name="Text_20_body">No la inteligencia consciente.<text:line-break/>No la inteligencia biológica.<text:line-break/>Pero sí la inteligencia como <text:span text:style-name="Strong_20_Emphasis">proceso que se mantiene a sí mismo usando información interna</text:span>.</text:p>
      <text:p text:style-name="Horizontal_20_Line"/>
      <text:h text:style-name="Heading_20_2" text:outline-level="2"><text:soft-page-break/><text:span text:style-name="Strong_20_Emphasis">4.7 Cómo esto prepara el camino para la reproducción</text:span></text:h>
      <text:p text:style-name="Text_20_body">Una red que:</text:p>
      <text:list xml:id="list3238890274" text:style-name="L8">
        <text:list-item>
          <text:p text:style-name="P16">se mantiene, </text:p>
        </text:list-item>
        <text:list-item>
          <text:p text:style-name="P16">se regula, </text:p>
        </text:list-item>
        <text:list-item>
          <text:p text:style-name="P16">se reorganiza, </text:p>
        </text:list-item>
        <text:list-item>
          <text:p text:style-name="P15">se adapta, </text:p>
        </text:list-item>
      </text:list>
      <text:p text:style-name="Text_20_body">es una red que puede <text:span text:style-name="Strong_20_Emphasis">crecer</text:span> y <text:span text:style-name="Strong_20_Emphasis">dividirse</text:span> sin perder su patrón.</text:p>
      <text:p text:style-name="Text_20_body">Y cuando un patrón puede recrearse en otro espacio, aparece la reproducción.<text:line-break/>Y con la reproducción aparece la evolución.<text:line-break/>Y con la evolución aparece la mejora.</text:p>
      <text:p text:style-name="Text_20_body">Pero todo eso solo es posible porque antes apareció <text:span text:style-name="Strong_20_Emphasis">la inteligencia primitiva</text:span>:<text:line-break/>la capacidad de un sistema de mantenerse mediante decisiones químicas condicionadas por su estado interno.</text:p>
      <text:p text:style-name="Horizontal_20_Line"/>
      <text:p text:style-name="Text_20_body">Si quieres, ahora sí podemos avanzar al bloque del ARN, que ya no será presentado como “el origen de la inteligencia”, sino como <text:span text:style-name="Strong_20_Emphasis">la primera forma estable de inteligencia molecular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1T17:59:09.696000000</meta:creation-date>
    <dc:date>2026-05-31T18:00:44.195000000</dc:date>
    <meta:editing-duration>PT1M35S</meta:editing-duration>
    <meta:editing-cycles>1</meta:editing-cycles>
    <meta:document-statistic meta:table-count="0" meta:image-count="0" meta:object-count="0" meta:page-count="4" meta:paragraph-count="76" meta:word-count="761" meta:character-count="4440" meta:non-whitespace-character-count="3755"/>
    <meta:generator>LibreOffice/7.3.5.2$Windows_X86_64 LibreOffice_project/184fe81b8c8c30d8b5082578aee2fed2ea847c01</meta:generator>
  </office:meta>
</office:document-meta>
</file>