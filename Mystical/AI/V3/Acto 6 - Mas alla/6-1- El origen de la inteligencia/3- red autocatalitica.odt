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vamos a ello.<text:line-break/>Este es uno de los apartados más delicados y más hermosos del capítulo, porque aquí aparece <text:span text:style-name="Strong_20_Emphasis">por primera vez</text:span> algo que no existía en la materia reactiva:<text:line-break/>una estructura que <text:span text:style-name="Emphasis">se mantiene a sí misma</text:span>.<text:line-break/>Una estructura que empieza a comportarse como un “sí mismo” químico.</text:p>
      <text:p text:style-name="Text_20_body">Aquí tienes el texto desarrollado, con la profundidad conceptual que este punto merece.</text:p>
      <text:p text:style-name="Horizontal_20_Line"/>
      <text:h text:style-name="Heading_20_1" text:outline-level="1"><text:span text:style-name="Strong_20_Emphasis">Red autocatalítica: el primer “sí mismo” químico</text:span></text:h>
      <text:p text:style-name="Text_20_body">La materia reactiva puede cambiar, combinarse, formar patrones, incluso generar estructuras complejas.<text:line-break/>Pero todas esas formas son <text:span text:style-name="Strong_20_Emphasis">pasivas</text:span>: no se sostienen, no se reparan, no se defienden, no se reproducen.</text:p>
      <text:p text:style-name="Text_20_body">La red autocatalítica es el primer sistema que rompe esa pasividad.</text:p>
      <text:p text:style-name="Text_20_body">Una red autocatalítica es un conjunto de moléculas donde <text:span text:style-name="Strong_20_Emphasis">cada una ayuda a producir a otra</text:span>, y el conjunto entero se mantiene gracias a esa cooperación circular.<text:line-break/>No es una molécula aislada.<text:line-break/>No es una reacción puntual.<text:line-break/>Es un <text:span text:style-name="Strong_20_Emphasis">circuito</text:span>.</text:p>
      <text:p text:style-name="Text_20_body">Y ese circuito introduce algo radicalmente nuevo en el universo:<text:line-break/><text:span text:style-name="Strong_20_Emphasis">la continuidad</text:span>.</text:p>
      <text:p text:style-name="Horizontal_20_Line"/>
      <text:h text:style-name="Heading_20_2" text:outline-level="2"><text:span text:style-name="Strong_20_Emphasis">1. De reacciones aisladas a procesos que se sostienen</text:span></text:h>
      <text:p text:style-name="Text_20_body">En la materia reactiva, cada reacción es un evento sin historia.<text:line-break/>Pero en una red autocatalítica, las reacciones dejan de ser independientes:<text:line-break/>se encadenan, se alimentan, se refuerzan.</text:p>
      <text:p text:style-name="Text_20_body">El resultado es un sistema que:</text:p>
      <text:list xml:id="list2430975899" text:style-name="L1">
        <text:list-item>
          <text:p text:style-name="P2">se mantiene mientras haya recursos, </text:p>
        </text:list-item>
        <text:list-item>
          <text:p text:style-name="P2">se repara cuando una parte se degrada, </text:p>
        </text:list-item>
        <text:list-item>
          <text:p text:style-name="P2">se reorganiza si una ruta falla, </text:p>
        </text:list-item>
        <text:list-item>
          <text:p text:style-name="P1">y persiste más allá de la vida de sus componentes individuales. </text:p>
        </text:list-item>
      </text:list>
      <text:p text:style-name="Text_20_body">Por primera vez, aparece algo que <text:span text:style-name="Strong_20_Emphasis">no se deja arrastrar por el entorno</text:span>, sino que <text:span text:style-name="Strong_20_Emphasis">lo utiliza para mantenerse</text:span>.</text:p>
      <text:p text:style-name="Text_20_body">Esto es un cambio profundo.</text:p>
      <text:p text:style-name="Horizontal_20_Line"/>
      <text:h text:style-name="Heading_20_2" text:outline-level="2"><text:soft-page-break/><text:span text:style-name="Strong_20_Emphasis">2. La primera forma de “interior”</text:span></text:h>
      <text:p text:style-name="Text_20_body">Una red autocatalítica no tiene membrana, pero ya tiene un tipo de interior:<text:line-break/>un conjunto de reacciones que dependen unas de otras y que solo tienen sentido dentro del circuito.</text:p>
      <text:p text:style-name="Text_20_body">Si una molécula desaparece, el sistema entero se resiente.<text:line-break/>Si una reacción se acelera, el resto se ajusta.<text:line-break/>Si una ruta se bloquea, el sistema busca otra.</text:p>
      <text:p text:style-name="Text_20_body">Este comportamiento no es inteligencia, pero sí es <text:span text:style-name="Strong_20_Emphasis">coherencia interna</text:span>.</text:p>
      <text:p text:style-name="Text_20_body">La red autocatalítica es la primera estructura que:</text:p>
      <text:list xml:id="list4206792775" text:style-name="L2">
        <text:list-item>
          <text:p text:style-name="P4">distingue entre “lo que forma parte del circuito” y “lo que no”, </text:p>
        </text:list-item>
        <text:list-item>
          <text:p text:style-name="P4">mantiene una identidad funcional, </text:p>
        </text:list-item>
        <text:list-item>
          <text:p text:style-name="P3">y actúa como un todo. </text:p>
        </text:list-item>
      </text:list>
      <text:p text:style-name="Text_20_body">Es el primer embrión de un “sí mismo”.</text:p>
      <text:p text:style-name="Horizontal_20_Line"/>
      <text:h text:style-name="Heading_20_2" text:outline-level="2"><text:span text:style-name="Strong_20_Emphasis">3. Lógica que se mantiene</text:span></text:h>
      <text:p text:style-name="Text_20_body">Aquí aparece la primera propiedad que la materia reactiva no tenía:<text:line-break/><text:span text:style-name="Strong_20_Emphasis">la lógica se vuelve estable</text:span>.</text:p>
      <text:p text:style-name="Text_20_body">En la materia reactiva:</text:p>
      <text:list xml:id="list3891197690" text:style-name="L3">
        <text:list-item>
          <text:p text:style-name="P6">la lógica describe cómo ocurren las reacciones, </text:p>
        </text:list-item>
        <text:list-item>
          <text:p text:style-name="P5">pero no se conserva. </text:p>
        </text:list-item>
      </text:list>
      <text:p text:style-name="Text_20_body">En la red autocatalítica:</text:p>
      <text:list xml:id="list4253479472" text:style-name="L4">
        <text:list-item>
          <text:p text:style-name="P8">la lógica del sistema se mantiene en el tiempo, </text:p>
        </text:list-item>
        <text:list-item>
          <text:p text:style-name="P7">porque el sistema se reconstruye a sí mismo. </text:p>
        </text:list-item>
      </text:list>
      <text:p text:style-name="Text_20_body">Esto es crucial para tu teoría:<text:line-break/><text:span text:style-name="Strong_20_Emphasis">la inteligencia requiere continuidad</text:span>,<text:line-break/>y la continuidad empieza aquí.</text:p>
      <text:p text:style-name="Horizontal_20_Line"/>
      <text:h text:style-name="Heading_20_2" text:outline-level="2"><text:span text:style-name="Strong_20_Emphasis">4. No es inteligencia, pero es su antesala</text:span></text:h>
      <text:p text:style-name="Text_20_body">Una red autocatalítica:</text:p>
      <text:list xml:id="list2764062231" text:style-name="L5">
        <text:list-item>
          <text:p text:style-name="P10">no decide, </text:p>
        </text:list-item>
        <text:list-item>
          <text:p text:style-name="P10">no elige, </text:p>
        </text:list-item>
        <text:list-item>
          <text:p text:style-name="P10">no aprende, </text:p>
        </text:list-item>
        <text:list-item>
          <text:p text:style-name="P10">no tiene memoria histórica, </text:p>
        </text:list-item>
        <text:list-item>
          <text:p text:style-name="P9">no tiene propósito. </text:p>
        </text:list-item>
      </text:list>
      <text:p text:style-name="Text_20_body"><text:soft-page-break/>Pero sí tiene algo que la materia reactiva no tenía:</text:p>
      <text:list xml:id="list1953184194" text:style-name="L6">
        <text:list-item>
          <text:p text:style-name="P12"><text:span text:style-name="Strong_20_Emphasis">persistencia</text:span>, </text:p>
        </text:list-item>
        <text:list-item>
          <text:p text:style-name="P12"><text:span text:style-name="Strong_20_Emphasis">coherencia</text:span>, </text:p>
        </text:list-item>
        <text:list-item>
          <text:p text:style-name="P12"><text:span text:style-name="Strong_20_Emphasis">auto-mantenimiento</text:span>, </text:p>
        </text:list-item>
        <text:list-item>
          <text:p text:style-name="P12"><text:span text:style-name="Strong_20_Emphasis">resistencia al azar</text:span>, </text:p>
        </text:list-item>
        <text:list-item>
          <text:p text:style-name="P11"><text:span text:style-name="Strong_20_Emphasis">estructura interna que se defiende de la entropía</text:span>. </text:p>
        </text:list-item>
      </text:list>
      <text:p text:style-name="Text_20_body">Es un sistema que no solo ocurre:<text:line-break/><text:span text:style-name="Strong_20_Emphasis">se sostiene</text:span>.</text:p>
      <text:p text:style-name="Text_20_body">Y sostenerse es el primer paso hacia cualquier forma de inteligencia.</text:p>
      <text:p text:style-name="Horizontal_20_Line"/>
      <text:h text:style-name="Heading_20_2" text:outline-level="2"><text:span text:style-name="Strong_20_Emphasis">5. El salto conceptual</text:span></text:h>
      <text:p text:style-name="Text_20_body">La red autocatalítica marca el primer gran salto en la historia de la inteligencia:</text:p>
      <text:p text:style-name="Quotations"><text:span text:style-name="Strong_20_Emphasis">La lógica deja de ser un conjunto de eventos aislados y se convierte en un proceso que se mantiene a sí mismo.</text:span></text:p>
      <text:p text:style-name="Text_20_body">Aquí aparece la primera forma de continuidad.<text:line-break/>La primera forma de identidad.<text:line-break/>La primera forma de resistencia al entorno.</text:p>
      <text:p text:style-name="Text_20_body">No es vida todavía.<text:line-break/>No es inteligencia todavía.<text:line-break/>Pero es el primer sistema que se comporta como si quisiera seguir existiendo.</text:p>
      <text:p text:style-name="Text_20_body">Y ese “como si” es el germen de todo lo que vendrá después.</text:p>
      <text:p text:style-name="Horizontal_20_Line"/>
      <text:h text:style-name="Heading_20_2" text:outline-level="2"><text:span text:style-name="Strong_20_Emphasis">6. El puente hacia la reproducción</text:span></text:h>
      <text:p text:style-name="Text_20_body">Las redes autocatalíticas no se reproducen en el sentido biológico.<text:line-break/>No crean copias separadas de sí mismas.<text:line-break/>Pero sí <text:span text:style-name="Strong_20_Emphasis">crecen</text:span>, <text:span text:style-name="Strong_20_Emphasis">se expanden</text:span>, <text:span text:style-name="Strong_20_Emphasis">se reparan</text:span>, <text:span text:style-name="Strong_20_Emphasis">se regeneran</text:span>.</text:p>
      <text:p text:style-name="Text_20_body">Y ese comportamiento crea las condiciones para que, más adelante, aparezca la reproducción real.</text:p>
      <text:p text:style-name="Text_20_body">La red autocatalítica es el primer sistema donde:</text:p>
      <text:list xml:id="list3312363667" text:style-name="L7">
        <text:list-item>
          <text:p text:style-name="P14">la continuidad importa, </text:p>
        </text:list-item>
        <text:list-item>
          <text:p text:style-name="P14">la estructura importa, </text:p>
        </text:list-item>
        <text:list-item>
          <text:p text:style-name="P13">la forma importa. </text:p>
        </text:list-item>
      </text:list>
      <text:p text:style-name="Text_20_body">Es el primer sistema donde la lógica empieza a adquirir <text:span text:style-name="Strong_20_Emphasis">valor</text:span>.</text:p>
      <text:p text:style-name="Horizontal_20_Line"/>
      <text:p text:style-name="Text_20_body"><text:soft-page-break/>Si quieres, avanzamos al siguiente apartado: <text:span text:style-name="Strong_20_Emphasis">Reproducción y evolución</text:span>, donde la continuidad se convierte por primera vez en historia, y la historia en selec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4:30:23.167000000</meta:creation-date>
    <dc:date>2026-05-31T14:57:18.131000000</dc:date>
    <meta:editing-duration>PT13M30S</meta:editing-duration>
    <meta:editing-cycles>1</meta:editing-cycles>
    <meta:document-statistic meta:table-count="0" meta:image-count="0" meta:object-count="0" meta:page-count="4" meta:paragraph-count="64" meta:word-count="724" meta:character-count="4248" meta:non-whitespace-character-count="3588"/>
    <meta:generator>LibreOffice/7.3.5.2$Windows_X86_64 LibreOffice_project/184fe81b8c8c30d8b5082578aee2fed2ea847c01</meta:generator>
  </office:meta>
</office:document-meta>
</file>