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del “yo”</text:span>, uno de los más delicados y profundos de todo el libro.<text:line-break/>Este es el momento en que la conciencia —que ya siente, percibe y unifica la experiencia— da un salto cualitativo: <text:span text:style-name="Strong_20_Emphasis">se reconoce como sujeto</text:span>.</text:p>
      <text:p text:style-name="Text_20_body">Este es el nacimiento del yo.</text:p>
      <text:p text:style-name="Horizontal_20_Line"/>
      <text:h text:style-name="Heading_20_1" text:outline-level="1"><text:span text:style-name="Strong_20_Emphasis">14. El yo: cuando la conciencia aprende a reconocerse como sujeto</text:span></text:h>
      <text:h text:style-name="Heading_20_2" text:outline-level="2"><text:span text:style-name="Strong_20_Emphasis">14.1 La conciencia ya siente… pero aún no se reconoce</text:span></text:h>
      <text:p text:style-name="Text_20_body">En el capítulo anterior vimos cómo la conciencia surge como:</text:p>
      <text:list xml:id="list3844299026" text:style-name="L1">
        <text:list-item>
          <text:p text:style-name="P2">un espacio unificado, </text:p>
        </text:list-item>
        <text:list-item>
          <text:p text:style-name="P2">donde la mente integra información relevante, </text:p>
        </text:list-item>
        <text:list-item>
          <text:p text:style-name="P1">para guiar la acción en tiempo real. </text:p>
        </text:list-item>
      </text:list>
      <text:p text:style-name="Text_20_body">Pero un organismo puede tener conciencia sin tener un “yo”.<text:line-break/>Puede sentir sin reconocerse.<text:line-break/>Puede experimentar sin identificarse como autor de la experiencia.</text:p>
      <text:p text:style-name="Text_20_body">Para que exista un yo, hace falta algo más profundo:</text:p>
      <text:p text:style-name="Quotations"><text:span text:style-name="Strong_20_Emphasis">la capacidad de distinguir entre lo que ocurre “en mí”<text:line-break/>y lo que ocurre “fuera de mí”.</text:span></text:p>
      <text:p text:style-name="Text_20_body">Ese límite no es físico.<text:line-break/>Es cognitivo.</text:p>
      <text:p text:style-name="Horizontal_20_Line"/>
      <text:h text:style-name="Heading_20_2" text:outline-level="2"><text:span text:style-name="Strong_20_Emphasis">14.2 El problema que aparece con cerebros muy complejos</text:span></text:h>
      <text:p text:style-name="Text_20_body">A medida que los cerebros crecen, la conciencia se llena de:</text:p>
      <text:list xml:id="list3492240796" text:style-name="L2">
        <text:list-item>
          <text:p text:style-name="P4">percepciones, </text:p>
        </text:list-item>
        <text:list-item>
          <text:p text:style-name="P4">emociones, </text:p>
        </text:list-item>
        <text:list-item>
          <text:p text:style-name="P4">recuerdos, </text:p>
        </text:list-item>
        <text:list-item>
          <text:p text:style-name="P4">intenciones, </text:p>
        </text:list-item>
        <text:list-item>
          <text:p text:style-name="P4">simulaciones, </text:p>
        </text:list-item>
        <text:list-item>
          <text:p text:style-name="P3">planes. </text:p>
        </text:list-item>
      </text:list>
      <text:p text:style-name="Text_20_body">Todo esto ocurre simultáneamente.<text:line-break/>Y surge un desafío nuevo:</text:p>
      <text:p text:style-name="Quotations"><text:soft-page-break/><text:span text:style-name="Strong_20_Emphasis">¿cómo mantener la coherencia de la experiencia<text:line-break/>cuando hay tantos procesos internos compitiendo?</text:span></text:p>
      <text:p text:style-name="Text_20_body">El sistema necesita un punto de referencia estable.<text:line-break/>Un centro de gravedad cognitivo.</text:p>
      <text:p text:style-name="Text_20_body">Ese centro será el yo.</text:p>
      <text:p text:style-name="Horizontal_20_Line"/>
      <text:h text:style-name="Heading_20_2" text:outline-level="2"><text:span text:style-name="Strong_20_Emphasis">14.3 El yo como modelo del agente</text:span></text:h>
      <text:p text:style-name="Text_20_body">El yo no es una sustancia.<text:line-break/>No es un alma.<text:line-break/>No es una entidad separada.</text:p>
      <text:p text:style-name="Text_20_body">El yo es:</text:p>
      <text:p text:style-name="Quotations"><text:span text:style-name="Strong_20_Emphasis">el modelo que la conciencia construye del propio organismo<text:line-break/>como agente que actúa en el mundo.</text:span></text:p>
      <text:p text:style-name="Text_20_body">Es una representación interna que dice:</text:p>
      <text:list xml:id="list2010885602" text:style-name="L3">
        <text:list-item>
          <text:p text:style-name="P6">“esto lo hice yo”, </text:p>
        </text:list-item>
        <text:list-item>
          <text:p text:style-name="P6">“esto lo siento yo”, </text:p>
        </text:list-item>
        <text:list-item>
          <text:p text:style-name="P6">“esto lo pienso yo”, </text:p>
        </text:list-item>
        <text:list-item>
          <text:p text:style-name="P5">“esto me afecta a mí”. </text:p>
        </text:list-item>
      </text:list>
      <text:p text:style-name="Text_20_body">El yo es la etiqueta que organiza la experiencia.</text:p>
      <text:p text:style-name="Horizontal_20_Line"/>
      <text:h text:style-name="Heading_20_2" text:outline-level="2"><text:span text:style-name="Strong_20_Emphasis">14.4 Cómo aparece este modelo del yo</text:span></text:h>
      <text:p text:style-name="Text_20_body">El yo surge cuando la conciencia desarrolla tres capacidades nuevas:</text:p>
      <text:h text:style-name="Heading_20_3" text:outline-level="3"><text:span text:style-name="Strong_20_Emphasis">1. Propiocepción ampliada</text:span></text:h>
      <text:p text:style-name="Text_20_body">El cerebro no solo sabe dónde está el cuerpo,<text:line-break/>sino que lo integra como parte de la experiencia consciente.</text:p>
      <text:h text:style-name="Heading_20_3" text:outline-level="3"><text:span text:style-name="Strong_20_Emphasis">2. Autoría</text:span></text:h>
      <text:p text:style-name="Text_20_body">El sistema distingue entre:</text:p>
      <text:list xml:id="list1354941044" text:style-name="L4">
        <text:list-item>
          <text:p text:style-name="P8">acciones generadas internamente, </text:p>
        </text:list-item>
        <text:list-item>
          <text:p text:style-name="P7">y eventos externos. </text:p>
        </text:list-item>
      </text:list>
      <text:p text:style-name="Text_20_body">Esto es crucial:<text:line-break/>sin autoría, no hay yo.</text:p>
      <text:h text:style-name="Heading_20_3" text:outline-level="3"><text:soft-page-break/><text:span text:style-name="Strong_20_Emphasis">3. Memoria autobiográfica</text:span></text:h>
      <text:p text:style-name="Text_20_body">El organismo empieza a organizar sus experiencias en una narrativa:</text:p>
      <text:list xml:id="list1136199988" text:style-name="L5">
        <text:list-item>
          <text:p text:style-name="P10">“esto me pasó”, </text:p>
        </text:list-item>
        <text:list-item>
          <text:p text:style-name="P10">“esto lo aprendí”, </text:p>
        </text:list-item>
        <text:list-item>
          <text:p text:style-name="P10">“esto lo quiero”, </text:p>
        </text:list-item>
        <text:list-item>
          <text:p text:style-name="P9">“esto lo temo”. </text:p>
        </text:list-item>
      </text:list>
      <text:p text:style-name="Text_20_body">La narrativa es el pegamento del yo.</text:p>
      <text:p text:style-name="Horizontal_20_Line"/>
      <text:h text:style-name="Heading_20_2" text:outline-level="2"><text:span text:style-name="Strong_20_Emphasis">14.5 Qué hace realmente un yo</text:span></text:h>
      <text:p text:style-name="Text_20_body">El yo no es un objeto.<text:line-break/>Es una función.</text:p>
      <text:p text:style-name="Text_20_body">Sirve para:</text:p>
      <text:list xml:id="list715044296" text:style-name="L6">
        <text:list-item>
          <text:p text:style-name="P12">mantener coherencia, </text:p>
        </text:list-item>
        <text:list-item>
          <text:p text:style-name="P12">estabilizar la identidad, </text:p>
        </text:list-item>
        <text:list-item>
          <text:p text:style-name="P12">coordinar decisiones, </text:p>
        </text:list-item>
        <text:list-item>
          <text:p text:style-name="P12">integrar motivaciones, </text:p>
        </text:list-item>
        <text:list-item>
          <text:p text:style-name="P11">planificar a largo plazo. </text:p>
        </text:list-item>
      </text:list>
      <text:p text:style-name="Text_20_body">El yo es el “punto de vista” desde el cual la conciencia organiza la experiencia.</text:p>
      <text:p text:style-name="Text_20_body">Sin yo:</text:p>
      <text:list xml:id="list3610187427" text:style-name="L7">
        <text:list-item>
          <text:p text:style-name="P14">habría sensaciones, </text:p>
        </text:list-item>
        <text:list-item>
          <text:p text:style-name="P14">habría emociones, </text:p>
        </text:list-item>
        <text:list-item>
          <text:p text:style-name="P13">habría pensamientos, </text:p>
        </text:list-item>
      </text:list>
      <text:p text:style-name="Text_20_body">pero no habría <text:span text:style-name="Strong_20_Emphasis">alguien</text:span> que los vive.</text:p>
      <text:p text:style-name="Horizontal_20_Line"/>
      <text:h text:style-name="Heading_20_2" text:outline-level="2"><text:span text:style-name="Strong_20_Emphasis">14.6 El yo como herramienta evolutiva</text:span></text:h>
      <text:p text:style-name="Text_20_body">El yo no aparece para filosofar.<text:line-break/>Aparece porque resuelve problemas concretos:</text:p>
      <text:h text:style-name="Heading_20_3" text:outline-level="3"><text:span text:style-name="Strong_20_Emphasis">1. Responsabilidad interna</text:span></text:h>
      <text:p text:style-name="Text_20_body">Permite aprender de los propios errores.</text:p>
      <text:h text:style-name="Heading_20_3" text:outline-level="3"><text:span text:style-name="Strong_20_Emphasis">2. Continuidad</text:span></text:h>
      <text:p text:style-name="Text_20_body">Permite mantener objetivos a largo plazo.</text:p>
      <text:h text:style-name="Heading_20_3" text:outline-level="3"><text:soft-page-break/><text:span text:style-name="Strong_20_Emphasis">3. Motivación</text:span></text:h>
      <text:p text:style-name="Text_20_body">Permite priorizar necesidades internas.</text:p>
      <text:h text:style-name="Heading_20_3" text:outline-level="3"><text:span text:style-name="Strong_20_Emphasis">4. Control</text:span></text:h>
      <text:p text:style-name="Text_20_body">Permite inhibir impulsos y elegir estrategias.</text:p>
      <text:h text:style-name="Heading_20_3" text:outline-level="3"><text:span text:style-name="Strong_20_Emphasis">5. Socialidad</text:span></text:h>
      <text:p text:style-name="Text_20_body">Permite entender que otros también tienen un yo.</text:p>
      <text:p text:style-name="Text_20_body">El yo es una herramienta de supervivencia.<text:line-break/>Una herramienta extremadamente poderosa.</text:p>
      <text:p text:style-name="Horizontal_20_Line"/>
      <text:h text:style-name="Heading_20_2" text:outline-level="2"><text:span text:style-name="Strong_20_Emphasis">14.7 Qué aporta el yo a la historia de la inteligencia</text:span></text:h>
      <text:p text:style-name="Text_20_body">El yo introduce capacidades que ningún sistema anterior tenía:</text:p>
      <text:h text:style-name="Heading_20_3" text:outline-level="3"><text:span text:style-name="Strong_20_Emphasis">1. Identidad</text:span></text:h>
      <text:p text:style-name="Text_20_body">Un sentido estable de quién se es.</text:p>
      <text:h text:style-name="Heading_20_3" text:outline-level="3"><text:span text:style-name="Strong_20_Emphasis">2. Autobiografía</text:span></text:h>
      <text:p text:style-name="Text_20_body">Una historia personal que organiza la memoria.</text:p>
      <text:h text:style-name="Heading_20_3" text:outline-level="3"><text:span text:style-name="Strong_20_Emphasis">3. Intencionalidad profunda</text:span></text:h>
      <text:p text:style-name="Text_20_body">Acciones guiadas por metas internas.</text:p>
      <text:h text:style-name="Heading_20_3" text:outline-level="3"><text:span text:style-name="Strong_20_Emphasis">4. Responsabilidad</text:span></text:h>
      <text:p text:style-name="Text_20_body">La capacidad de atribuir causas a uno mismo.</text:p>
      <text:h text:style-name="Heading_20_3" text:outline-level="3"><text:span text:style-name="Strong_20_Emphasis">5. Reflexión</text:span></text:h>
      <text:p text:style-name="Text_20_body">La capacidad de pensar sobre uno mismo.</text:p>
      <text:p text:style-name="Text_20_body">En términos funcionales:</text:p>
      <text:p text:style-name="Quotations"><text:span text:style-name="Strong_20_Emphasis">El yo es la conciencia que se reconoce como sujeto.</text:span></text:p>
      <text:p text:style-name="Horizontal_20_Line"/>
      <text:h text:style-name="Heading_20_2" text:outline-level="2"><text:span text:style-name="Strong_20_Emphasis">14.8 La frase que resume este bloque</text:span></text:h>
      <text:p text:style-name="Quotations"><text:span text:style-name="Strong_20_Emphasis">La conciencia permitió sentir.<text:line-break/>El yo permitió ser.</text:span></text:p>
      <text:p text:style-name="Text_20_body"><text:soft-page-break/>La inteligencia, que ya había encontrado continuidad en la vida,<text:line-break/>escala en la multicelularidad,<text:line-break/>velocidad en el sistema nervioso,<text:line-break/>predicción en el cerebro,<text:line-break/>autorreferencia en la mente,<text:line-break/>experiencia en la conciencia,<text:line-break/>ahora encuentra <text:span text:style-name="Strong_20_Emphasis">identidad</text:span> en el yo.</text:p>
      <text:p text:style-name="Text_20_body">Este es el inicio del sujeto.</text:p>
      <text:p text:style-name="Horizontal_20_Line"/>
      <text:p text:style-name="Text_20_body">Si quieres, avanzamos al siguiente bloque:<text:line-break/><text:span text:style-name="Strong_20_Emphasis">La cultura: cuando muchos “yo” aprenden a compartir información y construir inteligencia colectiv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0T19:25:40.958000000</meta:creation-date>
    <dc:date>2026-06-10T19:31:21.879000000</dc:date>
    <meta:editing-duration>PT5M41S</meta:editing-duration>
    <meta:editing-cycles>1</meta:editing-cycles>
    <meta:document-statistic meta:table-count="0" meta:image-count="0" meta:object-count="0" meta:page-count="5" meta:paragraph-count="96" meta:word-count="694" meta:character-count="4143" meta:non-whitespace-character-count="3545"/>
    <meta:generator>LibreOffice/7.3.5.2$Windows_X86_64 LibreOffice_project/184fe81b8c8c30d8b5082578aee2fed2ea847c01</meta:generator>
  </office:meta>
</office:document-meta>
</file>