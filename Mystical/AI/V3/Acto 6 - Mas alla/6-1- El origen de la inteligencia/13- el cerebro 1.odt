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l cerebro</text:span>, escrito para el libro con la misma claridad, profundidad y continuidad conceptual que venimos construyendo.<text:line-break/>Este es uno de los momentos más importantes de toda la historia: <text:span text:style-name="Strong_20_Emphasis">cuando la inteligencia integrada aprende a modelar el mundo… y a modelarse a sí misma.</text:span></text:p>
      <text:p text:style-name="Horizontal_20_Line"/>
      <text:h text:style-name="Heading_20_1" text:outline-level="1"><text:span text:style-name="Strong_20_Emphasis">11. El cerebro: cuando la inteligencia aprende a modelar el mundo</text:span></text:h>
      <text:h text:style-name="Heading_20_2" text:outline-level="2"><text:span text:style-name="Strong_20_Emphasis">11.1 El problema que aparece con los sistemas nerviosos</text:span></text:h>
      <text:p text:style-name="Text_20_body">Una red neuronal simple —como la de un gusano o una medusa primitiva— ya permite:</text:p>
      <text:list xml:id="list3343238507" text:style-name="L1">
        <text:list-item>
          <text:p text:style-name="P2">movimiento, </text:p>
        </text:list-item>
        <text:list-item>
          <text:p text:style-name="P2">coordinación, </text:p>
        </text:list-item>
        <text:list-item>
          <text:p text:style-name="P2">respuestas rápidas, </text:p>
        </text:list-item>
        <text:list-item>
          <text:p text:style-name="P1">comportamientos básicos. </text:p>
        </text:list-item>
      </text:list>
      <text:p text:style-name="Text_20_body">Pero a medida que los organismos se vuelven más grandes y complejos, surge un nuevo desafío:</text:p>
      <text:p text:style-name="Quotations"><text:span text:style-name="Strong_20_Emphasis">¿cómo integrar enormes cantidades de información sensorial<text:line-break/>para tomar decisiones útiles en un entorno cambiante?</text:span></text:p>
      <text:p text:style-name="Text_20_body">El mundo se vuelve más:</text:p>
      <text:list xml:id="list3168580968" text:style-name="L2">
        <text:list-item>
          <text:p text:style-name="P4">dinámico, </text:p>
        </text:list-item>
        <text:list-item>
          <text:p text:style-name="P4">peligroso, </text:p>
        </text:list-item>
        <text:list-item>
          <text:p text:style-name="P4">competitivo, </text:p>
        </text:list-item>
        <text:list-item>
          <text:p text:style-name="P3">impredecible. </text:p>
        </text:list-item>
      </text:list>
      <text:p text:style-name="Text_20_body">La inteligencia necesita algo más que reflejos.<text:line-break/>Necesita <text:span text:style-name="Strong_20_Emphasis">modelos</text:span>.</text:p>
      <text:p text:style-name="Horizontal_20_Line"/>
      <text:h text:style-name="Heading_20_2" text:outline-level="2"><text:span text:style-name="Strong_20_Emphasis">11.2 El primer paso: concentrar neuronas</text:span></text:h>
      <text:p text:style-name="Text_20_body">En muchos organismos primitivos, las neuronas están distribuidas por todo el cuerpo.<text:line-break/>Pero pronto aparece una innovación:</text:p>
      <text:p text:style-name="Quotations"><text:span text:style-name="Strong_20_Emphasis">agrupar neuronas en un punto central para procesar información.</text:span></text:p>
      <text:p text:style-name="Text_20_body">Este punto suele estar cerca de:</text:p>
      <text:list xml:id="list2011518755" text:style-name="L3">
        <text:list-item>
          <text:p text:style-name="P6">la boca, </text:p>
        </text:list-item>
        <text:list-item>
          <text:p text:style-name="P6"><text:soft-page-break/>los ojos, </text:p>
        </text:list-item>
        <text:list-item>
          <text:p text:style-name="P5">los sensores principales. </text:p>
        </text:list-item>
      </text:list>
      <text:p text:style-name="Text_20_body">Es lógico:<text:line-break/>la información llega ahí primero.</text:p>
      <text:p text:style-name="Text_20_body">Este agrupamiento es el primer <text:span text:style-name="Strong_20_Emphasis">ganglio</text:span>.</text:p>
      <text:p text:style-name="Text_20_body">Un ganglio es un pequeño centro de procesamiento:</text:p>
      <text:list xml:id="list1744579219" text:style-name="L4">
        <text:list-item>
          <text:p text:style-name="P8">recibe señales, </text:p>
        </text:list-item>
        <text:list-item>
          <text:p text:style-name="P8">las combina, </text:p>
        </text:list-item>
        <text:list-item>
          <text:p text:style-name="P7">coordina respuestas. </text:p>
        </text:list-item>
      </text:list>
      <text:p text:style-name="Text_20_body">Es un “mini-cerebro”.</text:p>
      <text:p text:style-name="Horizontal_20_Line"/>
      <text:h text:style-name="Heading_20_2" text:outline-level="2"><text:span text:style-name="Strong_20_Emphasis">11.3 El segundo paso: varios ganglios conectados</text:span></text:h>
      <text:p text:style-name="Text_20_body">A medida que los organismos se vuelven más móviles,<text:line-break/>aparecen varios ganglios distribuidos por el cuerpo:</text:p>
      <text:list xml:id="list2850391561" text:style-name="L5">
        <text:list-item>
          <text:p text:style-name="P10">uno para coordinar el movimiento, </text:p>
        </text:list-item>
        <text:list-item>
          <text:p text:style-name="P10">otro para procesar señales sensoriales, </text:p>
        </text:list-item>
        <text:list-item>
          <text:p text:style-name="P9">otro para controlar órganos internos. </text:p>
        </text:list-item>
      </text:list>
      <text:p text:style-name="Text_20_body">Estos ganglios se conectan entre sí mediante cordones nerviosos.</text:p>
      <text:p text:style-name="Text_20_body">El resultado es un sistema nervioso más integrado:</text:p>
      <text:list xml:id="list1075574448" text:style-name="L6">
        <text:list-item>
          <text:p text:style-name="P12">más rápido, </text:p>
        </text:list-item>
        <text:list-item>
          <text:p text:style-name="P12">más flexible, </text:p>
        </text:list-item>
        <text:list-item>
          <text:p text:style-name="P11">más capaz de coordinar acciones complejas. </text:p>
        </text:list-item>
      </text:list>
      <text:p text:style-name="Text_20_body">Pero todavía no es un cerebro.</text:p>
      <text:p text:style-name="Horizontal_20_Line"/>
      <text:h text:style-name="Heading_20_2" text:outline-level="2"><text:span text:style-name="Strong_20_Emphasis">11.4 El tercer paso: un centro de integración dominante</text:span></text:h>
      <text:p text:style-name="Text_20_body">En algunos linajes —particularmente en los animales con simetría bilateral—<text:line-break/>uno de los ganglios se vuelve más grande y más importante que los demás.</text:p>
      <text:p text:style-name="Text_20_body">Ese ganglio:</text:p>
      <text:list xml:id="list3492766285" text:style-name="L7">
        <text:list-item>
          <text:p text:style-name="P14">recibe más información, </text:p>
        </text:list-item>
        <text:list-item>
          <text:p text:style-name="P14">coordina más funciones, </text:p>
        </text:list-item>
        <text:list-item>
          <text:p text:style-name="P13">toma decisiones más complejas. </text:p>
        </text:list-item>
      </text:list>
      <text:p text:style-name="Text_20_body">Con el tiempo, este ganglio dominante se convierte en <text:span text:style-name="Strong_20_Emphasis">el cerebro</text:span>.</text:p>
      <text:p text:style-name="Text_20_body"><text:soft-page-break/>El cerebro es:</text:p>
      <text:list xml:id="list1609557610" text:style-name="L8">
        <text:list-item>
          <text:p text:style-name="P16">un centro de integración, </text:p>
        </text:list-item>
        <text:list-item>
          <text:p text:style-name="P16">un órgano de predicción, </text:p>
        </text:list-item>
        <text:list-item>
          <text:p text:style-name="P15">un sistema de control. </text:p>
        </text:list-item>
      </text:list>
      <text:p text:style-name="Text_20_body">Es la primera estructura capaz de <text:span text:style-name="Strong_20_Emphasis">modelar el mundo</text:span>.</text:p>
      <text:p text:style-name="Horizontal_20_Line"/>
      <text:h text:style-name="Heading_20_2" text:outline-level="2"><text:span text:style-name="Strong_20_Emphasis">11.5 Qué hace realmente un cerebro</text:span></text:h>
      <text:p text:style-name="Text_20_body">Un cerebro no es un “centro de pensamiento” en el sentido humano.<text:line-break/>Su función fundamental es mucho más básica y universal:</text:p>
      <text:p text:style-name="Quotations"><text:span text:style-name="Strong_20_Emphasis">predecir qué va a pasar y actuar antes de que ocurra.</text:span></text:p>
      <text:p text:style-name="Text_20_body">Para lograrlo, un cerebro:</text:p>
      <text:list xml:id="list4060157881" text:style-name="L9">
        <text:list-item>
          <text:p text:style-name="P18">recibe información sensorial, </text:p>
        </text:list-item>
        <text:list-item>
          <text:p text:style-name="P18">la compara con experiencias pasadas, </text:p>
        </text:list-item>
        <text:list-item>
          <text:p text:style-name="P18">detecta patrones, </text:p>
        </text:list-item>
        <text:list-item>
          <text:p text:style-name="P18">anticipa consecuencias, </text:p>
        </text:list-item>
        <text:list-item>
          <text:p text:style-name="P17">elige acciones. </text:p>
        </text:list-item>
      </text:list>
      <text:p text:style-name="Text_20_body">Es un órgano de <text:span text:style-name="Strong_20_Emphasis">anticipación</text:span>.</text:p>
      <text:p text:style-name="Text_20_body">La inteligencia deja de ser solo reacción.<text:line-break/>Se convierte en <text:span text:style-name="Strong_20_Emphasis">predicción</text:span>.</text:p>
      <text:p text:style-name="Horizontal_20_Line"/>
      <text:h text:style-name="Heading_20_2" text:outline-level="2"><text:span text:style-name="Strong_20_Emphasis">11.6 El cerebro como modelo del mundo</text:span></text:h>
      <text:p text:style-name="Text_20_body">A medida que los cerebros crecen, desarrollan una capacidad extraordinaria:</text:p>
      <text:p text:style-name="Quotations"><text:span text:style-name="Strong_20_Emphasis">construir representaciones internas del entorno.</text:span></text:p>
      <text:p text:style-name="Text_20_body">Estas representaciones no son imágenes ni ideas.<text:line-break/>Son patrones de actividad neuronal que:</text:p>
      <text:list xml:id="list934839771" text:style-name="L10">
        <text:list-item>
          <text:p text:style-name="P20">codifican regularidades, </text:p>
        </text:list-item>
        <text:list-item>
          <text:p text:style-name="P20">almacenan experiencias, </text:p>
        </text:list-item>
        <text:list-item>
          <text:p text:style-name="P20">permiten simular escenarios, </text:p>
        </text:list-item>
        <text:list-item>
          <text:p text:style-name="P19">guían decisiones. </text:p>
        </text:list-item>
      </text:list>
      <text:p text:style-name="Text_20_body">El cerebro es un simulador:</text:p>
      <text:list xml:id="list1948000190" text:style-name="L11">
        <text:list-item>
          <text:p text:style-name="P22">prueba acciones antes de ejecutarlas, </text:p>
        </text:list-item>
        <text:list-item>
          <text:p text:style-name="P22">evalúa riesgos, </text:p>
        </text:list-item>
        <text:list-item>
          <text:p text:style-name="P22"><text:soft-page-break/>calcula beneficios, </text:p>
        </text:list-item>
        <text:list-item>
          <text:p text:style-name="P21">ajusta estrategias. </text:p>
        </text:list-item>
      </text:list>
      <text:p text:style-name="Text_20_body">La inteligencia se vuelve <text:span text:style-name="Strong_20_Emphasis">estratégica</text:span>.</text:p>
      <text:p text:style-name="Horizontal_20_Line"/>
      <text:h text:style-name="Heading_20_2" text:outline-level="2"><text:span text:style-name="Strong_20_Emphasis">11.7 El cerebro como modelo del propio cuerpo</text:span></text:h>
      <text:p text:style-name="Text_20_body">Pero el cerebro no solo modela el mundo externo.<text:line-break/>También modela el cuerpo:</text:p>
      <text:list xml:id="list4206424810" text:style-name="L12">
        <text:list-item>
          <text:p text:style-name="P24">su posición, </text:p>
        </text:list-item>
        <text:list-item>
          <text:p text:style-name="P24">su movimiento, </text:p>
        </text:list-item>
        <text:list-item>
          <text:p text:style-name="P24">su estado interno, </text:p>
        </text:list-item>
        <text:list-item>
          <text:p text:style-name="P23">sus necesidades. </text:p>
        </text:list-item>
      </text:list>
      <text:p text:style-name="Text_20_body">Este modelo corporal permite:</text:p>
      <text:list xml:id="list3502236376" text:style-name="L13">
        <text:list-item>
          <text:p text:style-name="P26">coordinación fina, </text:p>
        </text:list-item>
        <text:list-item>
          <text:p text:style-name="P26">equilibrio, </text:p>
        </text:list-item>
        <text:list-item>
          <text:p text:style-name="P26">locomoción compleja, </text:p>
        </text:list-item>
        <text:list-item>
          <text:p text:style-name="P25">acciones precisas. </text:p>
        </text:list-item>
      </text:list>
      <text:p text:style-name="Text_20_body">Es el inicio de la <text:span text:style-name="Strong_20_Emphasis">propriocepción</text:span>,<text:line-break/>la sensación de “yo soy este cuerpo”.</text:p>
      <text:p text:style-name="Horizontal_20_Line"/>
      <text:h text:style-name="Heading_20_2" text:outline-level="2"><text:span text:style-name="Strong_20_Emphasis">11.8 Qué aporta el cerebro a la historia de la inteligencia</text:span></text:h>
      <text:p text:style-name="Text_20_body">El cerebro introduce capacidades que ningún sistema anterior tenía:</text:p>
      <text:h text:style-name="Heading_20_3" text:outline-level="3"><text:span text:style-name="Strong_20_Emphasis">1. Predicción</text:span></text:h>
      <text:p text:style-name="Text_20_body">Anticipa el futuro inmediato.</text:p>
      <text:h text:style-name="Heading_20_3" text:outline-level="3"><text:span text:style-name="Strong_20_Emphasis">2. Simulación</text:span></text:h>
      <text:p text:style-name="Text_20_body">Prueba acciones sin ejecutarlas.</text:p>
      <text:h text:style-name="Heading_20_3" text:outline-level="3"><text:span text:style-name="Strong_20_Emphasis">3. Aprendizaje complejo</text:span></text:h>
      <text:p text:style-name="Text_20_body">Integra experiencias pasadas para mejorar decisiones.</text:p>
      <text:h text:style-name="Heading_20_3" text:outline-level="3"><text:span text:style-name="Strong_20_Emphasis">4. Coordinación avanzada</text:span></text:h>
      <text:p text:style-name="Text_20_body">Controla músculos, órganos y comportamientos.</text:p>
      <text:h text:style-name="Heading_20_3" text:outline-level="3"><text:soft-page-break/><text:span text:style-name="Strong_20_Emphasis">5. Representación</text:span></text:h>
      <text:p text:style-name="Text_20_body">Construye modelos internos del mundo y del cuerpo.</text:p>
      <text:p text:style-name="Text_20_body">En términos funcionales:</text:p>
      <text:p text:style-name="Quotations"><text:span text:style-name="Strong_20_Emphasis">El cerebro es la inteligencia convertida en un órgano de predicción.</text:span></text:p>
      <text:p text:style-name="Horizontal_20_Line"/>
      <text:h text:style-name="Heading_20_2" text:outline-level="2"><text:span text:style-name="Strong_20_Emphasis">11.9 La frase que resume este bloque</text:span></text:h>
      <text:p text:style-name="Quotations"><text:span text:style-name="Strong_20_Emphasis">El sistema nervioso permitió actuar.<text:line-break/>El cerebro permitió anticipar.</text:span></text:p>
      <text:p text:style-name="Text_20_body">La inteligencia, que ya había encontrado continuidad en la vida,<text:line-break/>escala en la multicelularidad,<text:line-break/>velocidad en el sistema nervioso,<text:line-break/>ahora encuentra <text:span text:style-name="Strong_20_Emphasis">visión del futuro</text:span> en el cerebro.</text:p>
      <text:p text:style-name="Text_20_body">Este es el inicio de la mente.</text:p>
      <text:p text:style-name="Horizontal_20_Line"/>
      <text:p text:style-name="Text_20_body">Si quieres, avanzamos al siguiente bloque:<text:line-break/><text:span text:style-name="Strong_20_Emphasis">La mente: cuando el cerebro aprende a representar no solo el mundo, sino también su propia actividad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0T19:00:40.172000000</meta:creation-date>
    <dc:date>2026-06-10T19:12:13.509000000</dc:date>
    <meta:editing-duration>PT1M23S</meta:editing-duration>
    <meta:editing-cycles>1</meta:editing-cycles>
    <meta:document-statistic meta:table-count="0" meta:image-count="0" meta:object-count="0" meta:page-count="5" meta:paragraph-count="109" meta:word-count="750" meta:character-count="4734" meta:non-whitespace-character-count="4093"/>
    <meta:generator>LibreOffice/7.3.5.2$Windows_X86_64 LibreOffice_project/184fe81b8c8c30d8b5082578aee2fed2ea847c01</meta:generator>
  </office:meta>
</office:document-meta>
</file>