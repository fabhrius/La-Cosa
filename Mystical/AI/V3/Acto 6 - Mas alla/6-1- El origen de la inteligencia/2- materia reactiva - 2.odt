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Vamos a escribir <text:span text:style-name="Strong_20_Emphasis">Materia reactiva</text:span> siguiendo exactamente la estructura que acordamos:</text:p>
      <text:list xml:id="list2362692011" text:style-name="L1">
        <text:list-item>
          <text:p text:style-name="P2"><text:span text:style-name="Strong_20_Emphasis">definición clara</text:span>, </text:p>
        </text:list-item>
        <text:list-item>
          <text:p text:style-name="P2"><text:span text:style-name="Strong_20_Emphasis">contexto</text:span>, </text:p>
        </text:list-item>
        <text:list-item>
          <text:p text:style-name="P1"><text:span text:style-name="Strong_20_Emphasis">por qué importa</text:span>. </text:p>
        </text:list-item>
      </text:list>
      <text:p text:style-name="Text_20_body">Y esta vez lo haremos con un lenguaje totalmente accesible, sin asumir conocimientos previos, y cuidando que cada frase construya comprensión real.</text:p>
      <text:p text:style-name="Text_20_body">Aquí va.</text:p>
      <text:p text:style-name="Horizontal_20_Line"/>
      <text:h text:style-name="Heading_20_1" text:outline-level="1"><text:span text:style-name="Strong_20_Emphasis">2. Materia reactiva</text:span></text:h>
      <text:h text:style-name="Heading_20_2" text:outline-level="2"><text:span text:style-name="Strong_20_Emphasis">2.1 Definición clara (para cualquier lector)</text:span></text:h>
      <text:p text:style-name="Text_20_body">Cuando hablamos de <text:span text:style-name="Emphasis">materia reactiva</text:span>, nos referimos a la materia que <text:span text:style-name="Strong_20_Emphasis">cambia cuando algo la afecta</text:span>.<text:line-break/>Es decir:</text:p>
      <text:p text:style-name="Quotations"><text:span text:style-name="Strong_20_Emphasis">Materia reactiva es materia que responde, pero no recuerda.</text:span></text:p>
      <text:p text:style-name="Text_20_body">Reacciona, pero no conserva nada de lo que le ha pasado.</text:p>
      <text:p text:style-name="Text_20_body">Ejemplos cotidianos:</text:p>
      <text:list xml:id="list3680165751" text:style-name="L2">
        <text:list-item>
          <text:p text:style-name="P4">El azúcar se disuelve en el agua. </text:p>
        </text:list-item>
        <text:list-item>
          <text:p text:style-name="P4">El hierro se oxida y se vuelve rojizo. </text:p>
        </text:list-item>
        <text:list-item>
          <text:p text:style-name="P4">Una vela se derrite cuando la enciendes. </text:p>
        </text:list-item>
        <text:list-item>
          <text:p text:style-name="P3">La leche se corta si la calientas demasiado. </text:p>
        </text:list-item>
      </text:list>
      <text:p text:style-name="Text_20_body">En todos estos casos:</text:p>
      <text:list xml:id="list3028470559" text:style-name="L3">
        <text:list-item>
          <text:p text:style-name="P6">la materia cambia, </text:p>
        </text:list-item>
        <text:list-item>
          <text:p text:style-name="P6">pero no guarda memoria del cambio, </text:p>
        </text:list-item>
        <text:list-item>
          <text:p text:style-name="P6">ni intenta evitarlo, </text:p>
        </text:list-item>
        <text:list-item>
          <text:p text:style-name="P6">ni se repara, </text:p>
        </text:list-item>
        <text:list-item>
          <text:p text:style-name="P5">ni se reconstruye. </text:p>
        </text:list-item>
      </text:list>
      <text:p text:style-name="Text_20_body">La materia reactiva <text:span text:style-name="Strong_20_Emphasis">no tiene un plan</text:span>.<text:line-break/>No tiene un “sí mismo”.<text:line-break/>No tiene continuidad.</text:p>
      <text:p text:style-name="Text_20_body">Solo responde a lo que ocurre a su alrededor.</text:p>
      <text:p text:style-name="Horizontal_20_Line"/>
      <text:h text:style-name="Heading_20_2" text:outline-level="2"><text:soft-page-break/><text:span text:style-name="Strong_20_Emphasis">2.2 Contexto: el universo antes de la vida</text:span></text:h>
      <text:p text:style-name="Text_20_body">Imaginemos el universo primitivo, miles de millones de años antes de que existiera la vida.</text:p>
      <text:p text:style-name="Text_20_body">Era un lugar lleno de:</text:p>
      <text:list xml:id="list979925902" text:style-name="L4">
        <text:list-item>
          <text:p text:style-name="P8">átomos, </text:p>
        </text:list-item>
        <text:list-item>
          <text:p text:style-name="P8">moléculas, </text:p>
        </text:list-item>
        <text:list-item>
          <text:p text:style-name="P8">energía, </text:p>
        </text:list-item>
        <text:list-item>
          <text:p text:style-name="P8">reacciones químicas, </text:p>
        </text:list-item>
        <text:list-item>
          <text:p text:style-name="P8">choques, </text:p>
        </text:list-item>
        <text:list-item>
          <text:p text:style-name="P8">combinaciones, </text:p>
        </text:list-item>
        <text:list-item>
          <text:p text:style-name="P7">separaciones. </text:p>
        </text:list-item>
      </text:list>
      <text:p text:style-name="Text_20_body">Todo cambiaba constantemente.<text:line-break/>Pero nada se mantenía por sí mismo.</text:p>
      <text:p text:style-name="Text_20_body">Era un universo lleno de actividad, pero sin <text:span text:style-name="Strong_20_Emphasis">sistemas</text:span>.<text:line-break/>Sin estructuras que se conservaran.<text:line-break/>Sin procesos que se defendieran.<text:line-break/>Sin nada que pudiera decirse “esto sigue siendo lo mismo que antes”.</text:p>
      <text:p text:style-name="Text_20_body">Cada reacción era un evento aislado:</text:p>
      <text:list xml:id="list3987737905" text:style-name="L5">
        <text:list-item>
          <text:p text:style-name="P10">ocurría, </text:p>
        </text:list-item>
        <text:list-item>
          <text:p text:style-name="P10">terminaba, </text:p>
        </text:list-item>
        <text:list-item>
          <text:p text:style-name="P9">y desaparecía. </text:p>
        </text:list-item>
      </text:list>
      <text:p text:style-name="Text_20_body">No había historia.<text:line-break/>No había acumulación.<text:line-break/>No había evolución.</text:p>
      <text:p text:style-name="Text_20_body">Era un universo sin memoria.</text:p>
      <text:p text:style-name="Horizontal_20_Line"/>
      <text:h text:style-name="Heading_20_2" text:outline-level="2"><text:span text:style-name="Strong_20_Emphasis">2.3 Por qué importa: aquí está el límite de lo posible</text:span></text:h>
      <text:p text:style-name="Text_20_body">La materia reactiva es importante porque nos muestra <text:span text:style-name="Strong_20_Emphasis">lo que la materia puede hacer por sí sola</text:span>, sin vida, sin ADN, sin células, sin inteligencia.</text:p>
      <text:p text:style-name="Text_20_body">Y lo que puede hacer es mucho… pero no suficiente.</text:p>
      <text:p text:style-name="Text_20_body">La materia reactiva:</text:p>
      <text:list xml:id="list387903081" text:style-name="L6">
        <text:list-item>
          <text:p text:style-name="P12">puede cambiar, </text:p>
        </text:list-item>
        <text:list-item>
          <text:p text:style-name="P12">puede combinarse, </text:p>
        </text:list-item>
        <text:list-item>
          <text:p text:style-name="P12">puede formar patrones, </text:p>
        </text:list-item>
        <text:list-item>
          <text:p text:style-name="P11">puede generar estructuras temporales. </text:p>
        </text:list-item>
      </text:list>
      <text:p text:style-name="Text_20_body"><text:soft-page-break/>Pero no puede:</text:p>
      <text:list xml:id="list2586065974" text:style-name="L7">
        <text:list-item>
          <text:p text:style-name="P14"><text:span text:style-name="Strong_20_Emphasis">mantenerse</text:span>, </text:p>
        </text:list-item>
        <text:list-item>
          <text:p text:style-name="P14"><text:span text:style-name="Strong_20_Emphasis">repararse</text:span>, </text:p>
        </text:list-item>
        <text:list-item>
          <text:p text:style-name="P14"><text:span text:style-name="Strong_20_Emphasis">protegerse</text:span>, </text:p>
        </text:list-item>
        <text:list-item>
          <text:p text:style-name="P14"><text:span text:style-name="Strong_20_Emphasis">multiplicarse</text:span>, </text:p>
        </text:list-item>
        <text:list-item>
          <text:p text:style-name="P14"><text:span text:style-name="Strong_20_Emphasis">corregirse</text:span>, </text:p>
        </text:list-item>
        <text:list-item>
          <text:p text:style-name="P14"><text:span text:style-name="Strong_20_Emphasis">evolucionar</text:span>, </text:p>
        </text:list-item>
        <text:list-item>
          <text:p text:style-name="P14"><text:span text:style-name="Strong_20_Emphasis">dirigirse</text:span>, </text:p>
        </text:list-item>
        <text:list-item>
          <text:p text:style-name="P14"><text:span text:style-name="Strong_20_Emphasis">recordar</text:span>, </text:p>
        </text:list-item>
        <text:list-item>
          <text:p text:style-name="P13"><text:span text:style-name="Strong_20_Emphasis">aprender</text:span>. </text:p>
        </text:list-item>
      </text:list>
      <text:p text:style-name="Text_20_body">Y sin estas capacidades, la inteligencia es imposible.</text:p>
      <text:p text:style-name="Text_20_body">La inteligencia necesita:</text:p>
      <text:list xml:id="list3367271596" text:style-name="L8">
        <text:list-item>
          <text:p text:style-name="P16">continuidad, </text:p>
        </text:list-item>
        <text:list-item>
          <text:p text:style-name="P16">memoria, </text:p>
        </text:list-item>
        <text:list-item>
          <text:p text:style-name="P16">estabilidad, </text:p>
        </text:list-item>
        <text:list-item>
          <text:p text:style-name="P16">selección, </text:p>
        </text:list-item>
        <text:list-item>
          <text:p text:style-name="P16">dirección, </text:p>
        </text:list-item>
        <text:list-item>
          <text:p text:style-name="P15">resistencia al azar. </text:p>
        </text:list-item>
      </text:list>
      <text:p text:style-name="Text_20_body">Nada de eso existe todavía.</text:p>
      <text:p text:style-name="Text_20_body">Por eso este apartado es esencial:<text:line-break/>nos muestra el punto de partida, el “nivel cero” de la historia.</text:p>
      <text:p text:style-name="Quotations"><text:span text:style-name="Strong_20_Emphasis">La materia reactiva es el universo antes de la vida.<text:line-break/>Un universo donde todo ocurre, pero nada persiste.</text:span></text:p>
      <text:p text:style-name="Text_20_body">A partir de aquí, la historia de la inteligencia será la historia de cómo la materia empieza a <text:span text:style-name="Strong_20_Emphasis">mantenerse</text:span>, <text:span text:style-name="Strong_20_Emphasis">organizarse</text:span>, <text:span text:style-name="Strong_20_Emphasis">reproducirse</text:span>, <text:span text:style-name="Strong_20_Emphasis">evolucionar</text:span>, <text:span text:style-name="Strong_20_Emphasis">representarse</text:span>, <text:span text:style-name="Strong_20_Emphasis">sentir</text:span>.</text:p>
      <text:p text:style-name="Text_20_body">Pero todo empieza aquí:<text:line-break/>con la materia que solo reacciona.</text:p>
      <text:p text:style-name="Horizontal_20_Line"/>
      <text:p text:style-name="Text_20_body">Si te parece bien, ahora pasamos al siguiente bloque: <text:span text:style-name="Strong_20_Emphasis">Redes autocatalíticas</text:span>, esta vez con una definición cristalina, ejemplos simples y una explicación clara de la realimentación. ¿Seguimo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1T15:01:04.763000000</meta:creation-date>
    <dc:date>2026-05-31T15:01:31.819000000</dc:date>
    <meta:editing-duration>PT27S</meta:editing-duration>
    <meta:editing-cycles>1</meta:editing-cycles>
    <meta:document-statistic meta:table-count="0" meta:image-count="0" meta:object-count="0" meta:page-count="3" meta:paragraph-count="74" meta:word-count="503" meta:character-count="3008" meta:non-whitespace-character-count="2579"/>
    <meta:generator>LibreOffice/7.3.5.2$Windows_X86_64 LibreOffice_project/184fe81b8c8c30d8b5082578aee2fed2ea847c01</meta:generator>
  </office:meta>
</office:document-meta>
</file>