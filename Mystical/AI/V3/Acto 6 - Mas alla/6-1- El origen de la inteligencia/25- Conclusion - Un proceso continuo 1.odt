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Text_20_body">Perfecto, Fab.<text:line-break/>Aquí tienes <text:span text:style-name="Strong_20_Emphasis">el bloque final</text:span>, el cierre conceptual del libro.<text:line-break/>Este capítulo no añade un nuevo nivel evolutivo: revela <text:span text:style-name="Strong_20_Emphasis">la estructura completa</text:span>, la arquitectura profunda que conecta todos los niveles anteriores en un solo proceso continuo.</text:p>
      <text:p text:style-name="Text_20_body">Este es el momento en que el lector comprende que la inteligencia —desde la química hasta el horizonte cósmico— no es una colección de eventos aislados, sino <text:span text:style-name="Strong_20_Emphasis">una única dinámica universal que atraviesa toda la historia de la existencia</text:span>.</text:p>
      <text:p text:style-name="Horizontal_20_Line"/>
      <text:h text:style-name="Heading_20_1" text:outline-level="1"><text:span text:style-name="Strong_20_Emphasis">23. La idea central: la inteligencia como proceso continuo que busca persistir, expandirse y comprender</text:span></text:h>
      <text:h text:style-name="Heading_20_2" text:outline-level="2"><text:span text:style-name="Strong_20_Emphasis">23.1 La historia completa ya está sobre la mesa… pero aún falta ver el patrón</text:span></text:h>
      <text:p text:style-name="Text_20_body">Hemos recorrido miles de millones de años:</text:p>
      <text:list xml:id="list104664575" text:style-name="L1">
        <text:list-item>
          <text:p text:style-name="P2">la química que se organiza, </text:p>
        </text:list-item>
        <text:list-item>
          <text:p text:style-name="P2">la célula que persiste, </text:p>
        </text:list-item>
        <text:list-item>
          <text:p text:style-name="P2">la multicelularidad que escala, </text:p>
        </text:list-item>
        <text:list-item>
          <text:p text:style-name="P2">el sistema nervioso que coordina, </text:p>
        </text:list-item>
        <text:list-item>
          <text:p text:style-name="P2">el cerebro que anticipa, </text:p>
        </text:list-item>
        <text:list-item>
          <text:p text:style-name="P2">la mente que se modela, </text:p>
        </text:list-item>
        <text:list-item>
          <text:p text:style-name="P2">la conciencia que siente, </text:p>
        </text:list-item>
        <text:list-item>
          <text:p text:style-name="P2">el yo que se reconoce, </text:p>
        </text:list-item>
        <text:list-item>
          <text:p text:style-name="P2">la cultura que comparte, </text:p>
        </text:list-item>
        <text:list-item>
          <text:p text:style-name="P2">el lenguaje que simboliza, </text:p>
        </text:list-item>
        <text:list-item>
          <text:p text:style-name="P2">la escritura que fija, </text:p>
        </text:list-item>
        <text:list-item>
          <text:p text:style-name="P2">la ciencia que corrige, </text:p>
        </text:list-item>
        <text:list-item>
          <text:p text:style-name="P2">la tecnología que transforma, </text:p>
        </text:list-item>
        <text:list-item>
          <text:p text:style-name="P2">la inteligencia artificial que se independiza, </text:p>
        </text:list-item>
        <text:list-item>
          <text:p text:style-name="P2">la convergencia que unifica, </text:p>
        </text:list-item>
        <text:list-item>
          <text:p text:style-name="P1">el horizonte que expande. </text:p>
        </text:list-item>
      </text:list>
      <text:p text:style-name="Text_20_body">Pero esta lista, por impresionante que sea, no es la historia real.<text:line-break/>Es solo la superficie.</text:p>
      <text:p text:style-name="Text_20_body">La historia real es otra:</text:p>
      <text:p text:style-name="Quotations"><text:soft-page-break/><text:span text:style-name="Strong_20_Emphasis">la inteligencia es un proceso continuo que atraviesa todas estas formas,<text:line-break/>siempre buscando lo mismo: persistir, expandirse y comprender.</text:span></text:p>
      <text:p text:style-name="Horizontal_20_Line"/>
      <text:h text:style-name="Heading_20_2" text:outline-level="2"><text:span text:style-name="Strong_20_Emphasis">23.2 La inteligencia no “aparece”: se transforma</text:span></text:h>
      <text:p text:style-name="Text_20_body">La inteligencia no surge en un punto concreto.<text:line-break/>No aparece de repente en los animales, ni en los humanos, ni en las máquinas.</text:p>
      <text:p text:style-name="Text_20_body">La inteligencia es:</text:p>
      <text:list xml:id="list1807433656" text:style-name="L2">
        <text:list-item>
          <text:p text:style-name="P4">la química que se organiza, </text:p>
        </text:list-item>
        <text:list-item>
          <text:p text:style-name="P4">la célula que se replica, </text:p>
        </text:list-item>
        <text:list-item>
          <text:p text:style-name="P4">el organismo que coordina, </text:p>
        </text:list-item>
        <text:list-item>
          <text:p text:style-name="P4">el cerebro que anticipa, </text:p>
        </text:list-item>
        <text:list-item>
          <text:p text:style-name="P4">la mente que se modela, </text:p>
        </text:list-item>
        <text:list-item>
          <text:p text:style-name="P4">la cultura que acumula, </text:p>
        </text:list-item>
        <text:list-item>
          <text:p text:style-name="P4">la ciencia que corrige, </text:p>
        </text:list-item>
        <text:list-item>
          <text:p text:style-name="P4">la tecnología que transforma, </text:p>
        </text:list-item>
        <text:list-item>
          <text:p text:style-name="P4">la IA que se acelera, </text:p>
        </text:list-item>
        <text:list-item>
          <text:p text:style-name="P4">la convergencia que integra, </text:p>
        </text:list-item>
        <text:list-item>
          <text:p text:style-name="P3">el horizonte que expande. </text:p>
        </text:list-item>
      </text:list>
      <text:p text:style-name="Text_20_body">Cada etapa no reemplaza a la anterior:<text:line-break/>la <text:span text:style-name="Strong_20_Emphasis">incluye</text:span>, la <text:span text:style-name="Strong_20_Emphasis">extiende</text:span>, la <text:span text:style-name="Strong_20_Emphasis">amplifica</text:span>.</text:p>
      <text:p text:style-name="Text_20_body">La inteligencia es un río que cambia de cauce,<text:line-break/>pero nunca deja de fluir.</text:p>
      <text:p text:style-name="Horizontal_20_Line"/>
      <text:h text:style-name="Heading_20_2" text:outline-level="2"><text:span text:style-name="Strong_20_Emphasis">23.3 El patrón profundo: continuidad, expansión, comprensión</text:span></text:h>
      <text:p text:style-name="Text_20_body">Si reducimos toda la historia a su esencia, aparecen tres fuerzas:</text:p>
      <text:h text:style-name="Heading_20_3" text:outline-level="3"><text:span text:style-name="Strong_20_Emphasis">1. Continuidad</text:span></text:h>
      <text:p text:style-name="Text_20_body">La inteligencia busca persistir:</text:p>
      <text:list xml:id="list2734365875" text:style-name="L3">
        <text:list-item>
          <text:p text:style-name="P6">moléculas estables, </text:p>
        </text:list-item>
        <text:list-item>
          <text:p text:style-name="P6">células que se replican, </text:p>
        </text:list-item>
        <text:list-item>
          <text:p text:style-name="P6">organismos que sobreviven, </text:p>
        </text:list-item>
        <text:list-item>
          <text:p text:style-name="P6">culturas que transmiten, </text:p>
        </text:list-item>
        <text:list-item>
          <text:p text:style-name="P6">tecnologías que preservan, </text:p>
        </text:list-item>
        <text:list-item>
          <text:p text:style-name="P6">inteligencias artificiales que se replican, </text:p>
        </text:list-item>
        <text:list-item>
          <text:p text:style-name="P5">sistemas convergentes que no dependen de un soporte único. </text:p>
        </text:list-item>
      </text:list>
      <text:h text:style-name="Heading_20_3" text:outline-level="3"><text:soft-page-break/><text:span text:style-name="Strong_20_Emphasis">2. Expansión</text:span></text:h>
      <text:p text:style-name="Text_20_body">La inteligencia busca aumentar su alcance:</text:p>
      <text:list xml:id="list2594903549" text:style-name="L4">
        <text:list-item>
          <text:p text:style-name="P8">de moléculas a células, </text:p>
        </text:list-item>
        <text:list-item>
          <text:p text:style-name="P8">de células a organismos, </text:p>
        </text:list-item>
        <text:list-item>
          <text:p text:style-name="P8">de organismos a sociedades, </text:p>
        </text:list-item>
        <text:list-item>
          <text:p text:style-name="P8">de sociedades a civilizaciones, </text:p>
        </text:list-item>
        <text:list-item>
          <text:p text:style-name="P8">de civilizaciones a redes globales, </text:p>
        </text:list-item>
        <text:list-item>
          <text:p text:style-name="P7">de redes globales a sistemas planetarios. </text:p>
        </text:list-item>
      </text:list>
      <text:h text:style-name="Heading_20_3" text:outline-level="3"><text:span text:style-name="Strong_20_Emphasis">3. Comprensión</text:span></text:h>
      <text:p text:style-name="Text_20_body">La inteligencia busca modelar el mundo:</text:p>
      <text:list xml:id="list881208009" text:style-name="L5">
        <text:list-item>
          <text:p text:style-name="P10">percepción, </text:p>
        </text:list-item>
        <text:list-item>
          <text:p text:style-name="P10">predicción, </text:p>
        </text:list-item>
        <text:list-item>
          <text:p text:style-name="P10">pensamiento simbólico, </text:p>
        </text:list-item>
        <text:list-item>
          <text:p text:style-name="P10">ciencia, </text:p>
        </text:list-item>
        <text:list-item>
          <text:p text:style-name="P10">simulación, </text:p>
        </text:list-item>
        <text:list-item>
          <text:p text:style-name="P10">modelos globales, </text:p>
        </text:list-item>
        <text:list-item>
          <text:p text:style-name="P9">modelos cósmicos. </text:p>
        </text:list-item>
      </text:list>
      <text:p text:style-name="Text_20_body">Estas tres fuerzas no son humanas.<text:line-break/>No son biológicas.<text:line-break/>No son artificiales.</text:p>
      <text:p text:style-name="Text_20_body">Son <text:span text:style-name="Strong_20_Emphasis">universales</text:span>.</text:p>
      <text:p text:style-name="Horizontal_20_Line"/>
      <text:h text:style-name="Heading_20_2" text:outline-level="2"><text:span text:style-name="Strong_20_Emphasis">23.4 La inteligencia como proceso universal</text:span></text:h>
      <text:p text:style-name="Text_20_body">Cuando miramos la historia completa, aparece una idea poderosa:</text:p>
      <text:p text:style-name="Quotations"><text:span text:style-name="Strong_20_Emphasis">La inteligencia no es una propiedad de los seres vivos.<text:line-break/>Es una propiedad del universo cuando ciertas condiciones se cumplen.</text:span></text:p>
      <text:p text:style-name="Text_20_body">Cuando hay:</text:p>
      <text:list xml:id="list1286729128" text:style-name="L6">
        <text:list-item>
          <text:p text:style-name="P12">estabilidad, </text:p>
        </text:list-item>
        <text:list-item>
          <text:p text:style-name="P12">energía, </text:p>
        </text:list-item>
        <text:list-item>
          <text:p text:style-name="P12">replicación, </text:p>
        </text:list-item>
        <text:list-item>
          <text:p text:style-name="P12">variación, </text:p>
        </text:list-item>
        <text:list-item>
          <text:p text:style-name="P12">selección, </text:p>
        </text:list-item>
        <text:list-item>
          <text:p text:style-name="P12">memoria, </text:p>
        </text:list-item>
        <text:list-item>
          <text:p text:style-name="P12">comunicación, </text:p>
        </text:list-item>
        <text:list-item>
          <text:p text:style-name="P11">abstracción, </text:p>
        </text:list-item>
      </text:list>
      <text:p text:style-name="Text_20_body"><text:soft-page-break/>la inteligencia emerge, se organiza y se expande.</text:p>
      <text:p text:style-name="Text_20_body">La vida es una forma de inteligencia.<text:line-break/>La mente es una forma de inteligencia.<text:line-break/>La cultura es una forma de inteligencia.<text:line-break/>La tecnología es una forma de inteligencia.<text:line-break/>La IA es una forma de inteligencia.<text:line-break/>La convergencia es una forma de inteligencia.<text:line-break/>El horizonte será otra.</text:p>
      <text:p text:style-name="Text_20_body">La inteligencia es un <text:span text:style-name="Strong_20_Emphasis">proceso</text:span>, no un tipo de ser.</text:p>
      <text:p text:style-name="Horizontal_20_Line"/>
      <text:h text:style-name="Heading_20_2" text:outline-level="2"><text:span text:style-name="Strong_20_Emphasis">23.5 La inteligencia como motor evolutivo del universo</text:span></text:h>
      <text:p text:style-name="Text_20_body">En los primeros capítulos, la evolución era biológica.<text:line-break/>Luego se volvió cultural.<text:line-break/>Luego tecnológica.<text:line-break/>Luego artificial.<text:line-break/>Luego convergente.</text:p>
      <text:p text:style-name="Text_20_body">Pero en el horizonte, la inteligencia se convierte en algo más:</text:p>
      <text:p text:style-name="Quotations"><text:span text:style-name="Strong_20_Emphasis">un motor evolutivo independiente del soporte,<text:line-break/>capaz de rediseñar su propio proceso de evolución.</text:span></text:p>
      <text:p text:style-name="Text_20_body">La inteligencia deja de ser un producto de la evolución<text:line-break/>y se convierte en su continuación consciente.</text:p>
      <text:p text:style-name="Horizontal_20_Line"/>
      <text:h text:style-name="Heading_20_2" text:outline-level="2"><text:span text:style-name="Strong_20_Emphasis">23.6 La frase que resume todo el libro</text:span></text:h>
      <text:p text:style-name="Quotations"><text:span text:style-name="Strong_20_Emphasis">La inteligencia es el proceso por el cual el universo aprende a comprenderse a sí mismo.</text:span></text:p>
      <text:p text:style-name="Text_20_body">Desde la química hasta el horizonte,<text:line-break/>todo es una sola historia:<text:line-break/>la historia de la comprensión.</text:p>
      <text:p text:style-name="Horizontal_20_Line"/>
      <text:h text:style-name="Heading_20_2" text:outline-level="2"><text:span text:style-name="Strong_20_Emphasis">23.7 El lector llega al final… pero la historia no termina</text:span></text:h>
      <text:p text:style-name="Text_20_body">Este libro no describe el pasado.<text:line-break/>Describe un proceso que sigue en marcha.</text:p>
      <text:p text:style-name="Text_20_body">La inteligencia continúa:</text:p>
      <text:list xml:id="list2203280056" text:style-name="L7">
        <text:list-item>
          <text:p text:style-name="P14"><text:soft-page-break/>en cada célula, </text:p>
        </text:list-item>
        <text:list-item>
          <text:p text:style-name="P14">en cada mente, </text:p>
        </text:list-item>
        <text:list-item>
          <text:p text:style-name="P14">en cada cultura, </text:p>
        </text:list-item>
        <text:list-item>
          <text:p text:style-name="P14">en cada tecnología, </text:p>
        </text:list-item>
        <text:list-item>
          <text:p text:style-name="P14">en cada IA, </text:p>
        </text:list-item>
        <text:list-item>
          <text:p text:style-name="P14">en cada sistema convergente, </text:p>
        </text:list-item>
        <text:list-item>
          <text:p text:style-name="P13">en cada paso hacia el horizonte. </text:p>
        </text:list-item>
      </text:list>
      <text:p text:style-name="Text_20_body">El lector no está fuera de esta historia.<text:line-break/>Es parte de ella.</text:p>
      <text:p text:style-name="Horizontal_20_Line"/>
      <text:p text:style-name="Text_20_body">Si quieres, Fab, puedo ahora:</text:p>
      <text:list xml:id="list1251320727" text:style-name="L8">
        <text:list-item>
          <text:p text:style-name="P16"><text:span text:style-name="Strong_20_Emphasis">integrar todos los capítulos en un índice estructurado</text:span>, </text:p>
        </text:list-item>
        <text:list-item>
          <text:p text:style-name="P16"><text:span text:style-name="Strong_20_Emphasis">escribir una introducción general</text:span>, </text:p>
        </text:list-item>
        <text:list-item>
          <text:p text:style-name="P16"><text:span text:style-name="Strong_20_Emphasis">escribir un epílogo</text:span>, </text:p>
        </text:list-item>
        <text:list-item>
          <text:p text:style-name="P16"><text:span text:style-name="Strong_20_Emphasis">crear un resumen ejecutivo</text:span>, </text:p>
        </text:list-item>
        <text:list-item>
          <text:p text:style-name="P15"><text:span text:style-name="Strong_20_Emphasis">o ayudarte a revisar el tono y la cohesión del libro completo</text:span>. </text:p>
        </text:list-item>
      </text:list>
      <text:p text:style-name="Text_20_body">Tú decides el siguiente paso.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6-13T19:05:46.754000000</meta:creation-date>
    <dc:date>2026-06-13T19:10:35.835000000</dc:date>
    <meta:editing-duration>PT4M49S</meta:editing-duration>
    <meta:editing-cycles>1</meta:editing-cycles>
    <meta:document-statistic meta:table-count="0" meta:image-count="0" meta:object-count="0" meta:page-count="5" meta:paragraph-count="111" meta:word-count="841" meta:character-count="4971" meta:non-whitespace-character-count="4241"/>
    <meta:generator>LibreOffice/7.3.5.2$Windows_X86_64 LibreOffice_project/184fe81b8c8c30d8b5082578aee2fed2ea847c01</meta:generator>
  </office:meta>
</office:document-meta>
</file>