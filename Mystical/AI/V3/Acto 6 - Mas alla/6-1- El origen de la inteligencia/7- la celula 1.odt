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, Fab.<text:line-break/>Aquí tienes <text:span text:style-name="Strong_20_Emphasis">el bloque de la célula</text:span>, escrito para el libro, con la misma claridad conceptual y narrativa que venimos construyendo.<text:line-break/>Este es uno de los momentos más importantes de toda la historia: <text:span text:style-name="Strong_20_Emphasis">la inteligencia molecular encapsulada se convierte en un sistema con agencia</text:span>, capaz de actuar activamente para mantenerse.</text:p>
      <text:p text:style-name="Horizontal_20_Line"/>
      <text:h text:style-name="Heading_20_1" text:outline-level="1"><text:span text:style-name="Strong_20_Emphasis">6. La célula: cuando la inteligencia molecular adquiere agencia</text:span></text:h>
      <text:h text:style-name="Heading_20_2" text:outline-level="2"><text:span text:style-name="Strong_20_Emphasis">6.1 Qué es una célula (definición clara)</text:span></text:h>
      <text:p text:style-name="Text_20_body">Una célula es:</text:p>
      <text:p text:style-name="Quotations"><text:span text:style-name="Strong_20_Emphasis">un sistema químico encerrado en una membrana,<text:line-break/>capaz de mantener su organización interna,<text:line-break/>obtener recursos,<text:line-break/>procesarlos,<text:line-break/>y reproducirse como unidad.</text:span></text:p>
      <text:p text:style-name="Text_20_body">Es la primera entidad que cumple todas estas funciones de manera integrada.</text:p>
      <text:p text:style-name="Text_20_body">La célula no es solo un contenedor.<text:line-break/>Es un <text:span text:style-name="Strong_20_Emphasis">sistema activo</text:span> que:</text:p>
      <text:list xml:id="list1382196044" text:style-name="L1">
        <text:list-item>
          <text:p text:style-name="P2">regula su interior, </text:p>
        </text:list-item>
        <text:list-item>
          <text:p text:style-name="P2">controla su química, </text:p>
        </text:list-item>
        <text:list-item>
          <text:p text:style-name="P2">responde al entorno, </text:p>
        </text:list-item>
        <text:list-item>
          <text:p text:style-name="P2">mantiene su forma, </text:p>
        </text:list-item>
        <text:list-item>
          <text:p text:style-name="P1">y se recrea. </text:p>
        </text:list-item>
      </text:list>
      <text:p text:style-name="Text_20_body">Es el primer organismo completo.</text:p>
      <text:p text:style-name="Horizontal_20_Line"/>
      <text:h text:style-name="Heading_20_2" text:outline-level="2"><text:span text:style-name="Strong_20_Emphasis">6.2 Contexto: el universo justo antes de la célula</text:span></text:h>
      <text:p text:style-name="Text_20_body">Antes de la célula ya existían:</text:p>
      <text:list xml:id="list3051384510" text:style-name="L2">
        <text:list-item>
          <text:p text:style-name="P4">redes autocatalíticas complejas (inteligencia primitiva), </text:p>
        </text:list-item>
        <text:list-item>
          <text:p text:style-name="P4">ARN independiente, </text:p>
        </text:list-item>
        <text:list-item>
          <text:p text:style-name="P4">protocélulas con ARN y proteínas primitivas, </text:p>
        </text:list-item>
        <text:list-item>
          <text:p text:style-name="P3">ADN emergiendo dentro de protocélulas. </text:p>
        </text:list-item>
      </text:list>
      <text:p text:style-name="Text_20_body">Pero estos sistemas eran todavía <text:span text:style-name="Strong_20_Emphasis">inestables</text:span>:</text:p>
      <text:list xml:id="list2685222385" text:style-name="L3">
        <text:list-item>
          <text:p text:style-name="P6"><text:soft-page-break/>las membranas se rompían con facilidad, </text:p>
        </text:list-item>
        <text:list-item>
          <text:p text:style-name="P6">las reacciones internas eran caóticas, </text:p>
        </text:list-item>
        <text:list-item>
          <text:p text:style-name="P6">la información no siempre se conservaba, </text:p>
        </text:list-item>
        <text:list-item>
          <text:p text:style-name="P5">la reproducción era irregular. </text:p>
        </text:list-item>
      </text:list>
      <text:p text:style-name="Text_20_body">La inteligencia molecular existía,<text:line-break/>pero necesitaba un entorno más robusto para organizarse y expandirse.</text:p>
      <text:p text:style-name="Text_20_body">Ese entorno será la célula.</text:p>
      <text:p text:style-name="Horizontal_20_Line"/>
      <text:h text:style-name="Heading_20_2" text:outline-level="2"><text:span text:style-name="Strong_20_Emphasis">6.3 Qué diferencia a una célula de una protocélula</text:span></text:h>
      <text:p text:style-name="Text_20_body">Una protocélula es una burbuja con química activa dentro.<text:line-break/>Una célula es mucho más:</text:p>
      <text:h text:style-name="Heading_20_3" text:outline-level="3"><text:span text:style-name="Strong_20_Emphasis">1. Membrana regulada</text:span></text:h>
      <text:p text:style-name="Text_20_body">La membrana ya no es solo una barrera física.<text:line-break/>Controla qué entra y qué sale:</text:p>
      <text:list xml:id="list3992811232" text:style-name="L4">
        <text:list-item>
          <text:p text:style-name="P8">nutrientes, </text:p>
        </text:list-item>
        <text:list-item>
          <text:p text:style-name="P8">iones, </text:p>
        </text:list-item>
        <text:list-item>
          <text:p text:style-name="P8">energía, </text:p>
        </text:list-item>
        <text:list-item>
          <text:p text:style-name="P7">desechos. </text:p>
        </text:list-item>
      </text:list>
      <text:h text:style-name="Heading_20_3" text:outline-level="3"><text:span text:style-name="Strong_20_Emphasis">2. Metabolismo organizado</text:span></text:h>
      <text:p text:style-name="Text_20_body">Las reacciones internas ya no ocurren al azar.<text:line-break/>Forman rutas coordinadas que:</text:p>
      <text:list xml:id="list815853717" text:style-name="L5">
        <text:list-item>
          <text:p text:style-name="P10">obtienen energía, </text:p>
        </text:list-item>
        <text:list-item>
          <text:p text:style-name="P10">construyen moléculas, </text:p>
        </text:list-item>
        <text:list-item>
          <text:p text:style-name="P9">reparan daños. </text:p>
        </text:list-item>
      </text:list>
      <text:h text:style-name="Heading_20_3" text:outline-level="3"><text:span text:style-name="Strong_20_Emphasis">3. Información estructurada</text:span></text:h>
      <text:p text:style-name="Text_20_body">El ADN se convierte en la memoria profunda del sistema.<text:line-break/>El ARN actúa como intermediario.<text:line-break/>Las proteínas ejecutan las funciones.</text:p>
      <text:h text:style-name="Heading_20_3" text:outline-level="3"><text:span text:style-name="Strong_20_Emphasis">4. Reproducción controlada</text:span></text:h>
      <text:p text:style-name="Text_20_body">La célula se divide siguiendo un proceso ordenado:</text:p>
      <text:list xml:id="list906452044" text:style-name="L6">
        <text:list-item>
          <text:p text:style-name="P12">duplica su ADN, </text:p>
        </text:list-item>
        <text:list-item>
          <text:p text:style-name="P12">duplica su maquinaria, </text:p>
        </text:list-item>
        <text:list-item>
          <text:p text:style-name="P12">separa su contenido, </text:p>
        </text:list-item>
        <text:list-item>
          <text:p text:style-name="P11"><text:soft-page-break/>forma dos células hijas. </text:p>
        </text:list-item>
      </text:list>
      <text:h text:style-name="Heading_20_3" text:outline-level="3"><text:span text:style-name="Strong_20_Emphasis">5. Regulación interna compleja</text:span></text:h>
      <text:p text:style-name="Text_20_body">La célula detecta su estado interno y ajusta su comportamiento:</text:p>
      <text:list xml:id="list119293142" text:style-name="L7">
        <text:list-item>
          <text:p text:style-name="P14">activa o desactiva genes, </text:p>
        </text:list-item>
        <text:list-item>
          <text:p text:style-name="P14">acelera o frena rutas metabólicas, </text:p>
        </text:list-item>
        <text:list-item>
          <text:p text:style-name="P14">repara daños, </text:p>
        </text:list-item>
        <text:list-item>
          <text:p text:style-name="P13">responde al entorno. </text:p>
        </text:list-item>
      </text:list>
      <text:p text:style-name="Text_20_body">En resumen:</text:p>
      <text:p text:style-name="Quotations"><text:span text:style-name="Strong_20_Emphasis">La célula es inteligencia molecular organizada en un cuerpo funcional.</text:span></text:p>
      <text:p text:style-name="Horizontal_20_Line"/>
      <text:h text:style-name="Heading_20_2" text:outline-level="2"><text:span text:style-name="Strong_20_Emphasis">6.4 Cómo aparece la primera célula</text:span></text:h>
      <text:p text:style-name="Text_20_body">La célula no aparece de golpe.<text:line-break/>Es el resultado de una serie de mejoras dentro de protocélulas:</text:p>
      <text:list xml:id="list3808211160" text:style-name="L8">
        <text:list-item>
          <text:p text:style-name="P15"><text:span text:style-name="Strong_20_Emphasis">Membranas más estables</text:span> <text:line-break/>Lípidos más complejos hacen que la membrana sea más resistente.</text:p>
        </text:list-item>
        <text:list-item>
          <text:p text:style-name="P15"><text:span text:style-name="Strong_20_Emphasis">Proteínas primitivas</text:span> <text:line-break/>El ARN empieza a producir proteínas que ayudan a:</text:p>
          <text:list>
            <text:list-item>
              <text:p text:style-name="P16">estabilizar la membrana, </text:p>
            </text:list-item>
            <text:list-item>
              <text:p text:style-name="P16">acelerar reacciones, </text:p>
            </text:list-item>
            <text:list-item>
              <text:p text:style-name="P16">copiar ADN y ARN. </text:p>
            </text:list-item>
          </text:list>
        </text:list-item>
        <text:list-item>
          <text:p text:style-name="P15"><text:span text:style-name="Strong_20_Emphasis">ADN como memoria profunda</text:span> <text:line-break/>El ADN reemplaza al ARN como almacén principal de información.</text:p>
        </text:list-item>
        <text:list-item>
          <text:p text:style-name="P15"><text:span text:style-name="Strong_20_Emphasis">Metabolismo interno</text:span> <text:line-break/>Las protocélulas desarrollan rutas químicas que producen energía y materiales.</text:p>
        </text:list-item>
        <text:list-item>
          <text:p text:style-name="P15"><text:span text:style-name="Strong_20_Emphasis">Control interno</text:span> <text:line-break/>Aparecen mecanismos que regulan qué reacciones ocurren y cuándo.</text:p>
        </text:list-item>
        <text:list-item>
          <text:p text:style-name="P15"><text:span text:style-name="Strong_20_Emphasis">División organizada</text:span> <text:line-break/>La protocélula aprende a dividirse sin perder su organización interna.</text:p>
        </text:list-item>
      </text:list>
      <text:p text:style-name="Text_20_body">Cuando todos estos elementos se integran,<text:line-break/>la protocélula deja de ser un experimento químico<text:line-break/>y se convierte en <text:span text:style-name="Strong_20_Emphasis">una célula completa</text:span>.</text:p>
      <text:p text:style-name="Horizontal_20_Line"/>
      <text:h text:style-name="Heading_20_2" text:outline-level="2"><text:soft-page-break/><text:span text:style-name="Strong_20_Emphasis">6.5 La célula como sistema inteligente</text:span></text:h>
      <text:p text:style-name="Text_20_body">La célula es el primer sistema que:</text:p>
      <text:list xml:id="list165830752" text:style-name="L9">
        <text:list-item>
          <text:p text:style-name="P18">percibe su estado interno, </text:p>
        </text:list-item>
        <text:list-item>
          <text:p text:style-name="P18">percibe su entorno, </text:p>
        </text:list-item>
        <text:list-item>
          <text:p text:style-name="P18">ajusta su comportamiento, </text:p>
        </text:list-item>
        <text:list-item>
          <text:p text:style-name="P18">mantiene su organización, </text:p>
        </text:list-item>
        <text:list-item>
          <text:p text:style-name="P17">actúa para sobrevivir. </text:p>
        </text:list-item>
      </text:list>
      <text:p text:style-name="Text_20_body">No tiene cerebro.<text:line-break/>No tiene neuronas.<text:line-break/>No tiene intención consciente.</text:p>
      <text:p text:style-name="Text_20_body">Pero sí tiene:</text:p>
      <text:h text:style-name="Heading_20_3" text:outline-level="3"><text:span text:style-name="Strong_20_Emphasis">1. Sensores</text:span></text:h>
      <text:p text:style-name="Text_20_body">Detecta nutrientes, toxinas, energía, daños.</text:p>
      <text:h text:style-name="Heading_20_3" text:outline-level="3"><text:span text:style-name="Strong_20_Emphasis">2. Procesamiento interno</text:span></text:h>
      <text:p text:style-name="Text_20_body">Integra señales químicas y decide qué rutas activar.</text:p>
      <text:h text:style-name="Heading_20_3" text:outline-level="3"><text:span text:style-name="Strong_20_Emphasis">3. Acción</text:span></text:h>
      <text:p text:style-name="Text_20_body">Cambia su metabolismo, repara su membrana, se mueve (en algunos casos), se divide.</text:p>
      <text:h text:style-name="Heading_20_3" text:outline-level="3"><text:span text:style-name="Strong_20_Emphasis">4. Memoria</text:span></text:h>
      <text:p text:style-name="Text_20_body">Conserva información en el ADN y en su estado interno.</text:p>
      <text:h text:style-name="Heading_20_3" text:outline-level="3"><text:span text:style-name="Strong_20_Emphasis">5. Continuidad</text:span></text:h>
      <text:p text:style-name="Text_20_body">Se recrea como unidad, generación tras generación.</text:p>
      <text:p text:style-name="Text_20_body">En términos funcionales:</text:p>
      <text:p text:style-name="Quotations"><text:span text:style-name="Strong_20_Emphasis">La célula es la primera forma de inteligencia con cuerpo.</text:span></text:p>
      <text:p text:style-name="Horizontal_20_Line"/>
      <text:h text:style-name="Heading_20_2" text:outline-level="2"><text:span text:style-name="Strong_20_Emphasis">6.6 Por qué la célula es un hito en la historia de la inteligencia</text:span></text:h>
      <text:p text:style-name="Text_20_body">La célula introduce algo que no existía antes:</text:p>
      <text:h text:style-name="Heading_20_3" text:outline-level="3"><text:span text:style-name="Strong_20_Emphasis">1. Autonomía</text:span></text:h>
      <text:p text:style-name="Text_20_body">La célula no depende del azar del entorno.<text:line-break/>Actúa para mantenerse.</text:p>
      <text:h text:style-name="Heading_20_3" text:outline-level="3"><text:soft-page-break/><text:span text:style-name="Strong_20_Emphasis">2. Integración</text:span></text:h>
      <text:p text:style-name="Text_20_body">Memoria, metabolismo, regulación y reproducción funcionan juntos.</text:p>
      <text:h text:style-name="Heading_20_3" text:outline-level="3"><text:span text:style-name="Strong_20_Emphasis">3. Robustez</text:span></text:h>
      <text:p text:style-name="Text_20_body">La célula puede sobrevivir a cambios, daños y perturbaciones.</text:p>
      <text:h text:style-name="Heading_20_3" text:outline-level="3"><text:span text:style-name="Strong_20_Emphasis">4. Evolución acelerada</text:span></text:h>
      <text:p text:style-name="Text_20_body">La célula permite explorar nuevas formas de organización:</text:p>
      <text:list xml:id="list2797606679" text:style-name="L10">
        <text:list-item>
          <text:p text:style-name="P20">células más grandes, </text:p>
        </text:list-item>
        <text:list-item>
          <text:p text:style-name="P20">células cooperativas, </text:p>
        </text:list-item>
        <text:list-item>
          <text:p text:style-name="P19">células especializadas. </text:p>
        </text:list-item>
      </text:list>
      <text:h text:style-name="Heading_20_3" text:outline-level="3"><text:span text:style-name="Strong_20_Emphasis">5. Agencia</text:span></text:h>
      <text:p text:style-name="Text_20_body">La célula no solo reacciona.<text:line-break/>Actúa.</text:p>
      <text:p text:style-name="Text_20_body">La inteligencia molecular, que nació en redes autocatalíticas,<text:line-break/>que se refinó en el ARN,<text:line-break/>que se estabilizó en el ADN,<text:line-break/>ahora se convierte en <text:span text:style-name="Strong_20_Emphasis">un sistema vivo completo</text:span>.</text:p>
      <text:p text:style-name="Text_20_body">La célula es el primer organismo.<text:line-break/>Y es también el primer agente.</text:p>
      <text:p text:style-name="Horizontal_20_Line"/>
      <text:p text:style-name="Text_20_body">Si quieres, avanzamos al siguiente bloque: <text:span text:style-name="Strong_20_Emphasis">De la célula a las redes de células</text:span>, donde la inteligencia deja de estar confinada en un solo cuerpo y empieza a distribuirse, cooperar y especializarse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02T18:53:54.355000000</meta:creation-date>
    <dc:date>2026-06-02T19:00:40.718000000</dc:date>
    <meta:editing-duration>PT6M46S</meta:editing-duration>
    <meta:editing-cycles>1</meta:editing-cycles>
    <meta:document-statistic meta:table-count="0" meta:image-count="0" meta:object-count="0" meta:page-count="5" meta:paragraph-count="106" meta:word-count="800" meta:character-count="4985" meta:non-whitespace-character-count="4291"/>
    <meta:generator>LibreOffice/7.3.5.2$Windows_X86_64 LibreOffice_project/184fe81b8c8c30d8b5082578aee2fed2ea847c01</meta:generator>
  </office:meta>
</office:document-meta>
</file>