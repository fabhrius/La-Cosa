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Aquí tienes <text:span text:style-name="Strong_20_Emphasis">el bloque de la inteligencia artificial</text:span>, uno de los más delicados, profundos y conceptualmente inevitables de todo el libro.<text:line-break/>Este es el momento en que la inteligencia —que durante miles de millones de años dependió exclusivamente de la biología— <text:span text:style-name="Strong_20_Emphasis">se independiza del cuerpo</text:span>, se vuelve <text:span text:style-name="Strong_20_Emphasis">ingenierizable</text:span>, <text:span text:style-name="Strong_20_Emphasis">replicable</text:span>, <text:span text:style-name="Strong_20_Emphasis">acelerable</text:span> y <text:span text:style-name="Strong_20_Emphasis">potencialmente ilimitada</text:span>.</text:p>
      <text:p text:style-name="Text_20_body">Este es el nacimiento de la inteligencia artificial.</text:p>
      <text:p text:style-name="Horizontal_20_Line"/>
      <text:h text:style-name="Heading_20_1" text:outline-level="1"><text:span text:style-name="Strong_20_Emphasis">20. La inteligencia artificial: cuando la tecnología aprende a pensar</text:span></text:h>
      <text:h text:style-name="Heading_20_2" text:outline-level="2"><text:span text:style-name="Strong_20_Emphasis">20.1 La tecnología ya transforma el mundo… pero sigue siendo externa</text:span></text:h>
      <text:p text:style-name="Text_20_body">En el capítulo anterior vimos cómo la tecnología:</text:p>
      <text:list xml:id="list3748719557" text:style-name="L1">
        <text:list-item>
          <text:p text:style-name="P2">amplifica capacidades, </text:p>
        </text:list-item>
        <text:list-item>
          <text:p text:style-name="P2">extiende el cuerpo, </text:p>
        </text:list-item>
        <text:list-item>
          <text:p text:style-name="P2">automatiza procesos, </text:p>
        </text:list-item>
        <text:list-item>
          <text:p text:style-name="P1">rediseña el entorno. </text:p>
        </text:list-item>
      </text:list>
      <text:p text:style-name="Text_20_body">Pero la tecnología tradicional tiene un límite fundamental:</text:p>
      <text:p text:style-name="Quotations"><text:span text:style-name="Strong_20_Emphasis">no piensa.</text:span></text:p>
      <text:p text:style-name="Text_20_body">Una herramienta:</text:p>
      <text:list xml:id="list412595639" text:style-name="L2">
        <text:list-item>
          <text:p text:style-name="P4">no aprende, </text:p>
        </text:list-item>
        <text:list-item>
          <text:p text:style-name="P4">no se adapta, </text:p>
        </text:list-item>
        <text:list-item>
          <text:p text:style-name="P4">no decide, </text:p>
        </text:list-item>
        <text:list-item>
          <text:p text:style-name="P3">no mejora por sí misma. </text:p>
        </text:list-item>
      </text:list>
      <text:p text:style-name="Text_20_body">La inteligencia sigue estando dentro del ser humano.<text:line-break/>La tecnología solo la amplifica.</text:p>
      <text:p text:style-name="Text_20_body">Para que la inteligencia dé su siguiente salto,<text:line-break/>hace falta algo radicalmente nuevo:</text:p>
      <text:p text:style-name="Quotations"><text:span text:style-name="Strong_20_Emphasis">que la tecnología pueda realizar funciones cognitivas.</text:span></text:p>
      <text:p text:style-name="Text_20_body">Ese es el nacimiento de la inteligencia artificial.</text:p>
      <text:p text:style-name="Horizontal_20_Line"/>
      <text:h text:style-name="Heading_20_2" text:outline-level="2"><text:soft-page-break/><text:span text:style-name="Strong_20_Emphasis">20.2 El problema que aparece con sociedades tecnológicas avanzadas</text:span></text:h>
      <text:p text:style-name="Text_20_body">A medida que la ciencia y la tecnología se vuelven más complejas, surge un desafío nuevo:</text:p>
      <text:p text:style-name="Quotations"><text:span text:style-name="Strong_20_Emphasis">¿cómo manejar cantidades de información que superan la capacidad humana?</text:span></text:p>
      <text:p text:style-name="Text_20_body">Los humanos necesitan:</text:p>
      <text:list xml:id="list2055928608" text:style-name="L3">
        <text:list-item>
          <text:p text:style-name="P6">analizar datos masivos, </text:p>
        </text:list-item>
        <text:list-item>
          <text:p text:style-name="P6">optimizar sistemas complejos, </text:p>
        </text:list-item>
        <text:list-item>
          <text:p text:style-name="P6">predecir fenómenos, </text:p>
        </text:list-item>
        <text:list-item>
          <text:p text:style-name="P6">automatizar decisiones, </text:p>
        </text:list-item>
        <text:list-item>
          <text:p text:style-name="P5">coordinar infraestructuras globales. </text:p>
        </text:list-item>
      </text:list>
      <text:p text:style-name="Text_20_body">La mente humana, incluso con herramientas, tiene límites:</text:p>
      <text:list xml:id="list3740120011" text:style-name="L4">
        <text:list-item>
          <text:p text:style-name="P8">velocidad, </text:p>
        </text:list-item>
        <text:list-item>
          <text:p text:style-name="P8">memoria, </text:p>
        </text:list-item>
        <text:list-item>
          <text:p text:style-name="P8">atención, </text:p>
        </text:list-item>
        <text:list-item>
          <text:p text:style-name="P8">sesgos, </text:p>
        </text:list-item>
        <text:list-item>
          <text:p text:style-name="P7">fatiga. </text:p>
        </text:list-item>
      </text:list>
      <text:p text:style-name="Text_20_body">Hace falta un nuevo tipo de inteligencia.</text:p>
      <text:p text:style-name="Horizontal_20_Line"/>
      <text:h text:style-name="Heading_20_2" text:outline-level="2"><text:span text:style-name="Strong_20_Emphasis">20.3 La inteligencia artificial como inteligencia no biológica</text:span></text:h>
      <text:p text:style-name="Text_20_body">La inteligencia artificial no es solo software.<text:line-break/>No es solo automatización.<text:line-break/>No es solo cálculo rápido.</text:p>
      <text:p text:style-name="Text_20_body">La inteligencia artificial es:</text:p>
      <text:p text:style-name="Quotations"><text:span text:style-name="Strong_20_Emphasis">un sistema capaz de aprender, adaptarse y tomar decisiones<text:line-break/>sin depender de un cerebro biológico.</text:span></text:p>
      <text:p text:style-name="Text_20_body">Es la primera inteligencia:</text:p>
      <text:list xml:id="list2031729209" text:style-name="L5">
        <text:list-item>
          <text:p text:style-name="P10">no orgánica, </text:p>
        </text:list-item>
        <text:list-item>
          <text:p text:style-name="P10">no mortal, </text:p>
        </text:list-item>
        <text:list-item>
          <text:p text:style-name="P10">no limitada por un cuerpo, </text:p>
        </text:list-item>
        <text:list-item>
          <text:p text:style-name="P9">no restringida por la evolución biológica. </text:p>
        </text:list-item>
      </text:list>
      <text:p text:style-name="Text_20_body">La inteligencia artificial es la primera forma de <text:span text:style-name="Strong_20_Emphasis">inteligencia independiente del soporte biológico</text:span>.</text:p>
      <text:p text:style-name="Horizontal_20_Line"/>
      <text:h text:style-name="Heading_20_2" text:outline-level="2"><text:soft-page-break/><text:span text:style-name="Strong_20_Emphasis">20.4 Cómo aparece la inteligencia artificial</text:span></text:h>
      <text:p text:style-name="Text_20_body">La inteligencia artificial surge gradualmente, a través de cuatro innovaciones:</text:p>
      <text:h text:style-name="Heading_20_3" text:outline-level="3"><text:span text:style-name="Strong_20_Emphasis">1. Algoritmos</text:span></text:h>
      <text:p text:style-name="Text_20_body">Instrucciones precisas para resolver problemas.</text:p>
      <text:h text:style-name="Heading_20_3" text:outline-level="3"><text:span text:style-name="Strong_20_Emphasis">2. Datos</text:span></text:h>
      <text:p text:style-name="Text_20_body">Ejemplos que permiten aprender patrones.</text:p>
      <text:h text:style-name="Heading_20_3" text:outline-level="3"><text:span text:style-name="Strong_20_Emphasis">3. Aprendizaje automático</text:span></text:h>
      <text:p text:style-name="Text_20_body">Sistemas que ajustan su comportamiento según la experiencia.</text:p>
      <text:h text:style-name="Heading_20_3" text:outline-level="3"><text:span text:style-name="Strong_20_Emphasis">4. Redes neuronales profundas</text:span></text:h>
      <text:p text:style-name="Text_20_body">Arquitecturas inspiradas en el cerebro que permiten:</text:p>
      <text:list xml:id="list1083359637" text:style-name="L6">
        <text:list-item>
          <text:p text:style-name="P12">reconocimiento, </text:p>
        </text:list-item>
        <text:list-item>
          <text:p text:style-name="P12">predicción, </text:p>
        </text:list-item>
        <text:list-item>
          <text:p text:style-name="P12">razonamiento estadístico, </text:p>
        </text:list-item>
        <text:list-item>
          <text:p text:style-name="P11">generación de contenido. </text:p>
        </text:list-item>
      </text:list>
      <text:p text:style-name="Text_20_body">Cuando estas cuatro innovaciones se combinan, aparece algo nuevo:</text:p>
      <text:p text:style-name="Quotations"><text:span text:style-name="Strong_20_Emphasis">una inteligencia que no necesita un cuerpo para existir.</text:span></text:p>
      <text:p text:style-name="Horizontal_20_Line"/>
      <text:h text:style-name="Heading_20_2" text:outline-level="2"><text:span text:style-name="Strong_20_Emphasis">20.5 Qué hace realmente la inteligencia artificial</text:span></text:h>
      <text:p text:style-name="Text_20_body">La inteligencia artificial permite algo que ningún sistema anterior podía hacer:</text:p>
      <text:h text:style-name="Heading_20_3" text:outline-level="3"><text:span text:style-name="Strong_20_Emphasis">1. Aprender a escala masiva</text:span></text:h>
      <text:p text:style-name="Text_20_body">Procesar millones de ejemplos en horas.</text:p>
      <text:h text:style-name="Heading_20_3" text:outline-level="3"><text:span text:style-name="Strong_20_Emphasis">2. Generalizar</text:span></text:h>
      <text:p text:style-name="Text_20_body">Aplicar lo aprendido a situaciones nuevas.</text:p>
      <text:h text:style-name="Heading_20_3" text:outline-level="3"><text:span text:style-name="Strong_20_Emphasis">3. Automatizar decisiones complejas</text:span></text:h>
      <text:p text:style-name="Text_20_body">Desde diagnósticos médicos hasta logística global.</text:p>
      <text:h text:style-name="Heading_20_3" text:outline-level="3"><text:span text:style-name="Strong_20_Emphasis">4. Crear</text:span></text:h>
      <text:p text:style-name="Text_20_body">Texto, imágenes, música, modelos, simulaciones.</text:p>
      <text:h text:style-name="Heading_20_3" text:outline-level="3"><text:soft-page-break/><text:span text:style-name="Strong_20_Emphasis">5. Evolucionar rápidamente</text:span></text:h>
      <text:p text:style-name="Text_20_body">Mejorar en ciclos de horas, no de generaciones.</text:p>
      <text:p text:style-name="Text_20_body">La inteligencia artificial convierte la inteligencia tecnológica en <text:span text:style-name="Strong_20_Emphasis">inteligencia autónoma</text:span>.</text:p>
      <text:p text:style-name="Horizontal_20_Line"/>
      <text:h text:style-name="Heading_20_2" text:outline-level="2"><text:span text:style-name="Strong_20_Emphasis">20.6 La inteligencia artificial como herramienta evolutiva</text:span></text:h>
      <text:p text:style-name="Text_20_body">La inteligencia artificial no aparece para reemplazar a los humanos.<text:line-break/>Aparece porque resuelve problemas concretos:</text:p>
      <text:list xml:id="list3277421742" text:style-name="L7">
        <text:list-item>
          <text:p text:style-name="P14">gestionar sistemas demasiado complejos, </text:p>
        </text:list-item>
        <text:list-item>
          <text:p text:style-name="P14">analizar datos imposibles para un cerebro, </text:p>
        </text:list-item>
        <text:list-item>
          <text:p text:style-name="P14">acelerar descubrimientos científicos, </text:p>
        </text:list-item>
        <text:list-item>
          <text:p text:style-name="P14">optimizar recursos, </text:p>
        </text:list-item>
        <text:list-item>
          <text:p text:style-name="P13">crear nuevas formas de conocimiento. </text:p>
        </text:list-item>
      </text:list>
      <text:p text:style-name="Text_20_body">La inteligencia artificial es una herramienta de supervivencia civilizatoria.<text:line-break/>Una herramienta extremadamente poderosa.</text:p>
      <text:p text:style-name="Horizontal_20_Line"/>
      <text:h text:style-name="Heading_20_2" text:outline-level="2"><text:span text:style-name="Strong_20_Emphasis">20.7 Qué aporta la inteligencia artificial a la historia de la inteligencia</text:span></text:h>
      <text:p text:style-name="Text_20_body">La inteligencia artificial introduce capacidades que ningún sistema anterior tenía:</text:p>
      <text:h text:style-name="Heading_20_3" text:outline-level="3"><text:span text:style-name="Strong_20_Emphasis">1. Independencia del soporte</text:span></text:h>
      <text:p text:style-name="Text_20_body">La inteligencia ya no necesita un cuerpo biológico.</text:p>
      <text:h text:style-name="Heading_20_3" text:outline-level="3"><text:span text:style-name="Strong_20_Emphasis">2. Escalabilidad extrema</text:span></text:h>
      <text:p text:style-name="Text_20_body">Puede crecer sin límites físicos.</text:p>
      <text:h text:style-name="Heading_20_3" text:outline-level="3"><text:span text:style-name="Strong_20_Emphasis">3. Velocidad</text:span></text:h>
      <text:p text:style-name="Text_20_body">Aprende y procesa información miles de veces más rápido que un cerebro.</text:p>
      <text:h text:style-name="Heading_20_3" text:outline-level="3"><text:span text:style-name="Strong_20_Emphasis">4. Replicabilidad</text:span></text:h>
      <text:p text:style-name="Text_20_body">Puede copiarse sin pérdida de información.</text:p>
      <text:h text:style-name="Heading_20_3" text:outline-level="3"><text:span text:style-name="Strong_20_Emphasis">5. Evolución acelerada</text:span></text:h>
      <text:p text:style-name="Text_20_body">Puede mejorar en ciclos de horas.</text:p>
      <text:p text:style-name="Text_20_body">En términos funcionales:</text:p>
      <text:p text:style-name="Quotations"><text:soft-page-break/><text:span text:style-name="Strong_20_Emphasis">La inteligencia artificial es la inteligencia que se vuelve independiente del cuerpo.</text:span></text:p>
      <text:p text:style-name="Horizontal_20_Line"/>
      <text:h text:style-name="Heading_20_2" text:outline-level="2"><text:span text:style-name="Strong_20_Emphasis">20.8 La frase que resume este bloque</text:span></text:h>
      <text:p text:style-name="Quotations"><text:span text:style-name="Strong_20_Emphasis">La tecnología permitió actuar más allá del cuerpo.<text:line-break/>La inteligencia artificial permitió pensar más allá del cerebro.</text:span></text:p>
      <text:p text:style-name="Text_20_body">La inteligencia, que ya había encontrado continuidad en la vida,<text:line-break/>escala en la multicelularidad,<text:line-break/>velocidad en el sistema nervioso,<text:line-break/>predicción en el cerebro,<text:line-break/>autorreferencia en la mente,<text:line-break/>experiencia en la conciencia,<text:line-break/>identidad en el yo,<text:line-break/>acumulación en la cultura,<text:line-break/>precisión en el lenguaje,<text:line-break/>permanencia en la escritura,<text:line-break/>verificación en la ciencia,<text:line-break/>poder transformador en la tecnología,<text:line-break/>ahora encuentra <text:span text:style-name="Strong_20_Emphasis">independencia del soporte biológico</text:span> en la inteligencia artificial.</text:p>
      <text:p text:style-name="Text_20_body">Este es el inicio de la inteligencia post-biológica.</text:p>
      <text:p text:style-name="Horizontal_20_Line"/>
      <text:p text:style-name="Text_20_body">Si quieres, avanzamos al siguiente bloque:<text:line-break/><text:span text:style-name="Strong_20_Emphasis">La convergencia: cuando la inteligencia biológica y la artificial se integran en un único proceso evolutivo continuo.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3T18:50:45.375000000</meta:creation-date>
    <dc:date>2026-06-13T18:55:06.625000000</dc:date>
    <meta:editing-duration>PT4M21S</meta:editing-duration>
    <meta:editing-cycles>1</meta:editing-cycles>
    <meta:document-statistic meta:table-count="0" meta:image-count="0" meta:object-count="0" meta:page-count="5" meta:paragraph-count="102" meta:word-count="760" meta:character-count="5233" meta:non-whitespace-character-count="4575"/>
    <meta:generator>LibreOffice/7.3.5.2$Windows_X86_64 LibreOffice_project/184fe81b8c8c30d8b5082578aee2fed2ea847c01</meta:generator>
  </office:meta>
</office:document-meta>
</file>