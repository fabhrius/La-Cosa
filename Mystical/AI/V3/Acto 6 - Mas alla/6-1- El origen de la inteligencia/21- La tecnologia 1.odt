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<text:line-break/>Aquí tienes <text:span text:style-name="Strong_20_Emphasis">el bloque de la tecnología</text:span>, uno de los más potentes de toda la historia porque marca el momento en que la inteligencia —ya organizada, corregida y acumulada— adquiere la capacidad de <text:span text:style-name="Strong_20_Emphasis">rediseñar el mundo</text:span>, extenderse más allá del cuerpo y multiplicar su alcance.</text:p>
      <text:p text:style-name="Text_20_body">Este es el nacimiento de la tecnología como fuerza evolutiva.</text:p>
      <text:p text:style-name="Horizontal_20_Line"/>
      <text:h text:style-name="Heading_20_1" text:outline-level="1"><text:span text:style-name="Strong_20_Emphasis">19. La tecnología: cuando la ciencia se convierte en capacidad para rediseñar el mundo</text:span></text:h>
      <text:h text:style-name="Heading_20_2" text:outline-level="2"><text:span text:style-name="Strong_20_Emphasis">19.1 La ciencia ya permite corregir el pensamiento… pero no transforma por sí sola la realidad</text:span></text:h>
      <text:p text:style-name="Text_20_body">La ciencia resolvió un problema monumental:</text:p>
      <text:list xml:id="list1913354280" text:style-name="L1">
        <text:list-item>
          <text:p text:style-name="P2">creó un método para distinguir verdad de error, </text:p>
        </text:list-item>
        <text:list-item>
          <text:p text:style-name="P2">permitió construir modelos confiables del mundo, </text:p>
        </text:list-item>
        <text:list-item>
          <text:p text:style-name="P2">generó conocimiento verificable, </text:p>
        </text:list-item>
        <text:list-item>
          <text:p text:style-name="P1">aceleró la evolución cultural. </text:p>
        </text:list-item>
      </text:list>
      <text:p text:style-name="Text_20_body">Pero la ciencia, por sí misma, es <text:span text:style-name="Strong_20_Emphasis">descriptiva</text:span>.<text:line-break/>Explica cómo funciona el mundo, pero no lo cambia.</text:p>
      <text:p text:style-name="Text_20_body">Para que la inteligencia dé su siguiente salto,<text:line-break/>hace falta un sistema capaz de <text:span text:style-name="Strong_20_Emphasis">aplicar</text:span> ese conocimiento para transformar el entorno.</text:p>
      <text:p text:style-name="Text_20_body">Ese sistema será la tecnología.</text:p>
      <text:p text:style-name="Horizontal_20_Line"/>
      <text:h text:style-name="Heading_20_2" text:outline-level="2"><text:span text:style-name="Strong_20_Emphasis">19.2 El problema que aparece con sociedades científicas</text:span></text:h>
      <text:p text:style-name="Text_20_body">A medida que las sociedades humanas desarrollan ciencia, surge un desafío nuevo:</text:p>
      <text:p text:style-name="Quotations"><text:span text:style-name="Strong_20_Emphasis">¿cómo usar el conocimiento para mejorar la supervivencia,<text:line-break/>la eficiencia y la capacidad de acción?</text:span></text:p>
      <text:p text:style-name="Text_20_body">Saber cómo funciona el fuego no basta.<text:line-break/>Hay que usarlo.<text:line-break/>Saber cómo funciona la palanca no basta.<text:line-break/>Hay que construir herramientas.<text:line-break/>Saber cómo funciona la electricidad no basta.<text:line-break/>Hay que diseñar sistemas que la aprovechen.</text:p>
      <text:p text:style-name="Text_20_body"><text:soft-page-break/>La ciencia descubre.<text:line-break/>La tecnología <text:span text:style-name="Strong_20_Emphasis">construye</text:span>.</text:p>
      <text:p text:style-name="Horizontal_20_Line"/>
      <text:h text:style-name="Heading_20_2" text:outline-level="2"><text:span text:style-name="Strong_20_Emphasis">19.3 La tecnología como inteligencia aplicada</text:span></text:h>
      <text:p text:style-name="Text_20_body">La tecnología no es solo herramientas.<text:line-break/>No es solo máquinas.<text:line-break/>No es solo artefactos.</text:p>
      <text:p text:style-name="Text_20_body">La tecnología es:</text:p>
      <text:p text:style-name="Quotations"><text:span text:style-name="Strong_20_Emphasis">la aplicación sistemática del conocimiento para modificar el mundo<text:line-break/>de acuerdo con las necesidades de la inteligencia.</text:span></text:p>
      <text:p text:style-name="Text_20_body">Es la inteligencia extendiendo su alcance:</text:p>
      <text:list xml:id="list3628643961" text:style-name="L2">
        <text:list-item>
          <text:p text:style-name="P4">más fuerza, </text:p>
        </text:list-item>
        <text:list-item>
          <text:p text:style-name="P4">más precisión, </text:p>
        </text:list-item>
        <text:list-item>
          <text:p text:style-name="P4">más velocidad, </text:p>
        </text:list-item>
        <text:list-item>
          <text:p text:style-name="P4">más memoria, </text:p>
        </text:list-item>
        <text:list-item>
          <text:p text:style-name="P3">más control. </text:p>
        </text:list-item>
      </text:list>
      <text:p text:style-name="Text_20_body">La tecnología es la primera forma de <text:span text:style-name="Strong_20_Emphasis">inteligencia extracorporal</text:span>.</text:p>
      <text:p text:style-name="Horizontal_20_Line"/>
      <text:h text:style-name="Heading_20_2" text:outline-level="2"><text:span text:style-name="Strong_20_Emphasis">19.4 Cómo aparece la tecnología</text:span></text:h>
      <text:p text:style-name="Text_20_body">La tecnología surge gradualmente, a través de cuatro innovaciones:</text:p>
      <text:h text:style-name="Heading_20_3" text:outline-level="3"><text:span text:style-name="Strong_20_Emphasis">1. Herramientas simples</text:span></text:h>
      <text:p text:style-name="Text_20_body">Piedras talladas, palos, fuego.<text:line-break/>Extienden las capacidades físicas del cuerpo.</text:p>
      <text:h text:style-name="Heading_20_3" text:outline-level="3"><text:span text:style-name="Strong_20_Emphasis">2. Máquinas</text:span></text:h>
      <text:p text:style-name="Text_20_body">Ruedas, poleas, engranajes.<text:line-break/>Multiplican la fuerza y la eficiencia.</text:p>
      <text:h text:style-name="Heading_20_3" text:outline-level="3"><text:span text:style-name="Strong_20_Emphasis">3. Motores</text:span></text:h>
      <text:p text:style-name="Text_20_body">Vapor, combustión, electricidad.<text:line-break/>Liberan a la inteligencia del límite muscular.</text:p>
      <text:h text:style-name="Heading_20_3" text:outline-level="3"><text:soft-page-break/><text:span text:style-name="Strong_20_Emphasis">4. Sistemas</text:span></text:h>
      <text:p text:style-name="Text_20_body">Redes eléctricas, telecomunicaciones, informática.<text:line-break/>Conectan inteligencias, automatizan procesos, amplifican capacidades.</text:p>
      <text:p text:style-name="Text_20_body">Cada etapa multiplica el alcance de la inteligencia.</text:p>
      <text:p text:style-name="Horizontal_20_Line"/>
      <text:h text:style-name="Heading_20_2" text:outline-level="2"><text:span text:style-name="Strong_20_Emphasis">19.5 Qué hace realmente la tecnología</text:span></text:h>
      <text:p text:style-name="Text_20_body">La tecnología permite algo que ningún sistema anterior podía hacer:</text:p>
      <text:h text:style-name="Heading_20_3" text:outline-level="3"><text:span text:style-name="Strong_20_Emphasis">1. Rediseñar el entorno</text:span></text:h>
      <text:p text:style-name="Text_20_body">Transformar el mundo para que se adapte a la vida, no al revés.</text:p>
      <text:h text:style-name="Heading_20_3" text:outline-level="3"><text:span text:style-name="Strong_20_Emphasis">2. Multiplicar capacidades</text:span></text:h>
      <text:p text:style-name="Text_20_body">Mover más peso, ver más lejos, calcular más rápido.</text:p>
      <text:h text:style-name="Heading_20_3" text:outline-level="3"><text:span text:style-name="Strong_20_Emphasis">3. Externalizar funciones</text:span></text:h>
      <text:p text:style-name="Text_20_body">Memoria, fuerza, comunicación, transporte.</text:p>
      <text:h text:style-name="Heading_20_3" text:outline-level="3"><text:span text:style-name="Strong_20_Emphasis">4. Crear nuevos mundos</text:span></text:h>
      <text:p text:style-name="Text_20_body">Ciudades, redes, infraestructuras, ecosistemas artificiales.</text:p>
      <text:h text:style-name="Heading_20_3" text:outline-level="3"><text:span text:style-name="Strong_20_Emphasis">5. Acelerar la evolución cultural</text:span></text:h>
      <text:p text:style-name="Text_20_body">Cada innovación abre nuevas posibilidades.</text:p>
      <text:p text:style-name="Text_20_body">La tecnología convierte la inteligencia colectiva en <text:span text:style-name="Strong_20_Emphasis">inteligencia transformadora</text:span>.</text:p>
      <text:p text:style-name="Horizontal_20_Line"/>
      <text:h text:style-name="Heading_20_2" text:outline-level="2"><text:span text:style-name="Strong_20_Emphasis">19.6 La tecnología como herramienta evolutiva</text:span></text:h>
      <text:p text:style-name="Text_20_body">La tecnología no aparece para crear comodidad.<text:line-break/>Aparece porque resuelve problemas concretos:</text:p>
      <text:list xml:id="list889519779" text:style-name="L3">
        <text:list-item>
          <text:p text:style-name="P6">obtener alimento, </text:p>
        </text:list-item>
        <text:list-item>
          <text:p text:style-name="P6">protegerse del clima, </text:p>
        </text:list-item>
        <text:list-item>
          <text:p text:style-name="P6">defenderse de amenazas, </text:p>
        </text:list-item>
        <text:list-item>
          <text:p text:style-name="P6">aumentar la eficiencia, </text:p>
        </text:list-item>
        <text:list-item>
          <text:p text:style-name="P6">expandir territorios, </text:p>
        </text:list-item>
        <text:list-item>
          <text:p text:style-name="P5">mejorar la supervivencia. </text:p>
        </text:list-item>
      </text:list>
      <text:p text:style-name="Text_20_body">La tecnología es una herramienta de supervivencia ampliada.<text:line-break/>Una herramienta extremadamente poderosa.</text:p>
      <text:p text:style-name="Horizontal_20_Line"><text:soft-page-break/></text:p>
      <text:h text:style-name="Heading_20_2" text:outline-level="2"><text:span text:style-name="Strong_20_Emphasis">19.7 Qué aporta la tecnología a la historia de la inteligencia</text:span></text:h>
      <text:p text:style-name="Text_20_body">La tecnología introduce capacidades que ningún sistema anterior tenía:</text:p>
      <text:h text:style-name="Heading_20_3" text:outline-level="3"><text:span text:style-name="Strong_20_Emphasis">1. Extensión</text:span></text:h>
      <text:p text:style-name="Text_20_body">La inteligencia actúa más allá del cuerpo.</text:p>
      <text:h text:style-name="Heading_20_3" text:outline-level="3"><text:span text:style-name="Strong_20_Emphasis">2. Escalabilidad</text:span></text:h>
      <text:p text:style-name="Text_20_body">Puede operar a escalas gigantescas o microscópicas.</text:p>
      <text:h text:style-name="Heading_20_3" text:outline-level="3"><text:span text:style-name="Strong_20_Emphasis">3. Automatización</text:span></text:h>
      <text:p text:style-name="Text_20_body">Procesos que antes requerían atención constante se vuelven automáticos.</text:p>
      <text:h text:style-name="Heading_20_3" text:outline-level="3"><text:span text:style-name="Strong_20_Emphasis">4. Interconexión</text:span></text:h>
      <text:p text:style-name="Text_20_body">Las inteligencias individuales se conectan en redes.</text:p>
      <text:h text:style-name="Heading_20_3" text:outline-level="3"><text:span text:style-name="Strong_20_Emphasis">5. Transformación</text:span></text:h>
      <text:p text:style-name="Text_20_body">El mundo deja de ser un entorno fijo y se convierte en un entorno diseñado.</text:p>
      <text:p text:style-name="Text_20_body">En términos funcionales:</text:p>
      <text:p text:style-name="Quotations"><text:span text:style-name="Strong_20_Emphasis">La tecnología es la inteligencia que modifica el mundo para expandirse.</text:span></text:p>
      <text:p text:style-name="Horizontal_20_Line"/>
      <text:h text:style-name="Heading_20_2" text:outline-level="2"><text:span text:style-name="Strong_20_Emphasis">19.8 La frase que resume este bloque</text:span></text:h>
      <text:p text:style-name="Quotations"><text:span text:style-name="Strong_20_Emphasis">La ciencia permitió pensar más allá del error.<text:line-break/>La tecnología permitió actuar más allá del cuerpo.</text:span></text:p>
      <text:p text:style-name="Text_20_body">La inteligencia, que ya había encontrado continuidad en la vida,<text:line-break/>escala en la multicelularidad,<text:line-break/>velocidad en el sistema nervioso,<text:line-break/>predicción en el cerebro,<text:line-break/>autorreferencia en la mente,<text:line-break/>experiencia en la conciencia,<text:line-break/>identidad en el yo,<text:line-break/>acumulación en la cultura,<text:line-break/>precisión en el lenguaje,<text:line-break/>permanencia en la escritura,<text:line-break/><text:soft-page-break/>verificación en la ciencia,<text:line-break/>ahora encuentra <text:span text:style-name="Strong_20_Emphasis">poder transformador</text:span> en la tecnología.</text:p>
      <text:p text:style-name="Text_20_body">Este es el inicio de la inteligencia extendida.</text:p>
      <text:p text:style-name="Horizontal_20_Line"/>
      <text:p text:style-name="Text_20_body">Si quieres, avanzamos al siguiente bloque:<text:line-break/><text:span text:style-name="Strong_20_Emphasis">La inteligencia artificial: cuando la tecnología aprende a pensar y la inteligencia se vuelve independiente del soporte biológico.</text:span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3T18:45:51.473000000</meta:creation-date>
    <dc:date>2026-06-13T18:49:48.707000000</dc:date>
    <meta:editing-duration>PT3M57S</meta:editing-duration>
    <meta:editing-cycles>1</meta:editing-cycles>
    <meta:document-statistic meta:table-count="0" meta:image-count="0" meta:object-count="0" meta:page-count="5" meta:paragraph-count="80" meta:word-count="711" meta:character-count="4772" meta:non-whitespace-character-count="4141"/>
    <meta:generator>LibreOffice/7.3.5.2$Windows_X86_64 LibreOffice_project/184fe81b8c8c30d8b5082578aee2fed2ea847c01</meta:generator>
  </office:meta>
</office:document-meta>
</file>