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Ahora que ya tenemos la <text:span text:style-name="Strong_20_Emphasis">estructura conceptual</text:span>, el siguiente paso es convertirla en un <text:span text:style-name="Strong_20_Emphasis">esquema narrativo</text:span>.<text:line-break/>Un esquema narrativo no es todavía el texto del capítulo, pero sí es <text:span text:style-name="Strong_20_Emphasis">la columna vertebral literaria</text:span>, el mapa emocional e intelectual que guiará la escritura.</text:p>
      <text:p text:style-name="Text_20_body">Voy a darte un esquema narrativo <text:span text:style-name="Strong_20_Emphasis">maduro, fluido, con ritmo</text:span>, pensado para que puedas escribir el capítulo sin perder coherencia ni fuerza.</text:p>
      <text:p text:style-name="Horizontal_20_Line"/>
      <text:h text:style-name="Heading_20_1" text:outline-level="1">🌑 <text:span text:style-name="Strong_20_Emphasis">ESQUEMA NARRATIVO DEL CAPÍTULO 1 — EL ORIGEN DE LA INTELIGENCIA</text:span></text:h>
      <text:p text:style-name="Text_20_body">A diferencia de la estructura conceptual (que es lógica), el esquema narrativo está organizado como <text:span text:style-name="Strong_20_Emphasis">una historia que avanza</text:span>, con tensión, revelación y cierre.</text:p>
      <text:p text:style-name="Text_20_body">Lo divido en <text:span text:style-name="Strong_20_Emphasis">secciones narrativas</text:span>, cada una con su función, tono y contenido.</text:p>
      <text:p text:style-name="Horizontal_20_Line"/>
      <text:h text:style-name="Heading_20_2" text:outline-level="2"><text:span text:style-name="Strong_20_Emphasis">1. Apertura: La pregunta que nunca formulamos</text:span></text:h>
      <text:p text:style-name="Text_20_body"><text:span text:style-name="Strong_20_Emphasis">Función narrativa:</text:span> enganchar al lector, romper su intuición inicial.</text:p>
      <text:p text:style-name="Text_20_body"><text:span text:style-name="Strong_20_Emphasis">Contenido:</text:span></text:p>
      <text:list xml:id="list1065904591" text:style-name="L1">
        <text:list-item>
          <text:p text:style-name="P2">La inteligencia humana se ve a sí misma como el punto de partida. </text:p>
        </text:list-item>
        <text:list-item>
          <text:p text:style-name="P2">Pero esta visión es antropocéntrica y limitada. </text:p>
        </text:list-item>
        <text:list-item>
          <text:p text:style-name="P1">La pregunta correcta no es “¿cómo surgió la inteligencia humana?”, sino:<text:line-break/><text:span text:style-name="Strong_20_Emphasis">¿cuándo apareció la inteligencia por primera vez en el universo?</text:span> </text:p>
        </text:list-item>
      </text:list>
      <text:p text:style-name="Text_20_body"><text:span text:style-name="Strong_20_Emphasis">Tono:</text:span> reflexivo, elegante, casi filosófico.</text:p>
      <text:p text:style-name="Horizontal_20_Line"/>
      <text:h text:style-name="Heading_20_2" text:outline-level="2"><text:span text:style-name="Strong_20_Emphasis">2. La intuición equivocada… y la intuición correcta</text:span></text:h>
      <text:p text:style-name="Text_20_body"><text:span text:style-name="Strong_20_Emphasis">Función narrativa:</text:span> mostrar que el lector ya “sabía” algo, pero no sabía por qué.</text:p>
      <text:p text:style-name="Text_20_body"><text:span text:style-name="Strong_20_Emphasis">Contenido:</text:span></text:p>
      <text:list xml:id="list3836462257" text:style-name="L2">
        <text:list-item>
          <text:p text:style-name="P4">La intuición humana de que “la inteligencia precede a la vida” aparece en todas las culturas. </text:p>
        </text:list-item>
        <text:list-item>
          <text:p text:style-name="P4">Los mitos lo expresan como dioses creadores. </text:p>
        </text:list-item>
        <text:list-item>
          <text:p text:style-name="P4">La ciencia moderna lo descartó por asociarlo a fantasía. </text:p>
        </text:list-item>
        <text:list-item>
          <text:p text:style-name="P3">Pero la intuición no era errónea: solo estaba mal interpretada. </text:p>
        </text:list-item>
      </text:list>
      <text:p text:style-name="Text_20_body"><text:span text:style-name="Strong_20_Emphasis">Tono:</text:span> conciliador, revelador.</text:p>
      <text:p text:style-name="Horizontal_20_Line"/>
      <text:h text:style-name="Heading_20_2" text:outline-level="2"><text:soft-page-break/><text:span text:style-name="Strong_20_Emphasis">3. La inteligencia sin vida: el primer giro conceptual</text:span></text:h>
      <text:p text:style-name="Text_20_body"><text:span text:style-name="Strong_20_Emphasis">Función narrativa:</text:span> introducir la idea clave del capítulo.</text:p>
      <text:p text:style-name="Text_20_body"><text:span text:style-name="Strong_20_Emphasis">Contenido:</text:span></text:p>
      <text:list xml:id="list270474116" text:style-name="L3">
        <text:list-item>
          <text:p text:style-name="P6">La inteligencia no empieza con la vida. </text:p>
        </text:list-item>
        <text:list-item>
          <text:p text:style-name="P6">Aparece antes, en la química. </text:p>
        </text:list-item>
        <text:list-item>
          <text:p text:style-name="P6">Ciertos procesos químicos ya muestran: </text:p>
          <text:list>
            <text:list-item>
              <text:p text:style-name="P6">persistencia, </text:p>
            </text:list-item>
            <text:list-item>
              <text:p text:style-name="P6">selección, </text:p>
            </text:list-item>
            <text:list-item>
              <text:p text:style-name="P6">retroalimentación, </text:p>
            </text:list-item>
            <text:list-item>
              <text:p text:style-name="P6">resolución de problemas. </text:p>
            </text:list-item>
          </text:list>
        </text:list-item>
        <text:list-item>
          <text:p text:style-name="P5">No son “vivos”, pero sí son <text:span text:style-name="Strong_20_Emphasis">inteligentes en un sentido primitivo</text:span>. </text:p>
        </text:list-item>
      </text:list>
      <text:p text:style-name="Text_20_body"><text:span text:style-name="Strong_20_Emphasis">Tono:</text:span> científico, claro, sin tecnicismos innecesarios.</text:p>
      <text:p text:style-name="Horizontal_20_Line"/>
      <text:h text:style-name="Heading_20_2" text:outline-level="2"><text:span text:style-name="Strong_20_Emphasis">4. La inteligencia como proceso natural</text:span></text:h>
      <text:p text:style-name="Text_20_body"><text:span text:style-name="Strong_20_Emphasis">Función narrativa:</text:span> eliminar la necesidad de milagros o diseño.</text:p>
      <text:p text:style-name="Text_20_body"><text:span text:style-name="Strong_20_Emphasis">Contenido:</text:span></text:p>
      <text:list xml:id="list2552972546" text:style-name="L4">
        <text:list-item>
          <text:p text:style-name="P8">La inteligencia no requiere conciencia. </text:p>
        </text:list-item>
        <text:list-item>
          <text:p text:style-name="P8">No requiere intención. </text:p>
        </text:list-item>
        <text:list-item>
          <text:p text:style-name="P8">No requiere un creador. </text:p>
        </text:list-item>
        <text:list-item>
          <text:p text:style-name="P8">Surge cuando la materia forma ciclos capaces de conservarse. </text:p>
        </text:list-item>
        <text:list-item>
          <text:p text:style-name="P7">La termodinámica y la autoorganización explican su aparición. </text:p>
        </text:list-item>
      </text:list>
      <text:p text:style-name="Text_20_body"><text:span text:style-name="Strong_20_Emphasis">Tono:</text:span> firme, elegante, casi inevitable.</text:p>
      <text:p text:style-name="Horizontal_20_Line"/>
      <text:h text:style-name="Heading_20_2" text:outline-level="2"><text:span text:style-name="Strong_20_Emphasis">5. El mito del creador reinterpretado</text:span></text:h>
      <text:p text:style-name="Text_20_body"><text:span text:style-name="Strong_20_Emphasis">Función narrativa:</text:span> conectar con la tradición humana y mostrar continuidad.</text:p>
      <text:p text:style-name="Text_20_body"><text:span text:style-name="Strong_20_Emphasis">Contenido:</text:span></text:p>
      <text:list xml:id="list3511498528" text:style-name="L5">
        <text:list-item>
          <text:p text:style-name="P10">Los mitos no estaban describiendo hechos, sino estructuras lógicas. </text:p>
        </text:list-item>
        <text:list-item>
          <text:p text:style-name="P10">El “creador inteligente” es una metáfora de la inteligencia primordial. </text:p>
        </text:list-item>
        <text:list-item>
          <text:p text:style-name="P10">No es un ser externo: es un proceso interno del universo. </text:p>
        </text:list-item>
        <text:list-item>
          <text:p text:style-name="P9">La intuición humana captó la estructura, pero no los mecanismos. </text:p>
        </text:list-item>
      </text:list>
      <text:p text:style-name="Text_20_body"><text:span text:style-name="Strong_20_Emphasis">Tono:</text:span> poético, respetuoso, integrador.</text:p>
      <text:p text:style-name="Horizontal_20_Line"/>
      <text:h text:style-name="Heading_20_2" text:outline-level="2"><text:soft-page-break/><text:span text:style-name="Strong_20_Emphasis">6. La inversión conceptual: la vida como consecuencia</text:span></text:h>
      <text:p text:style-name="Text_20_body"><text:span text:style-name="Strong_20_Emphasis">Función narrativa:</text:span> preparar el terreno para el Capítulo 2.</text:p>
      <text:p text:style-name="Text_20_body"><text:span text:style-name="Strong_20_Emphasis">Contenido:</text:span></text:p>
      <text:list xml:id="list2097467537" text:style-name="L6">
        <text:list-item>
          <text:p text:style-name="P12">La vida no crea inteligencia. </text:p>
        </text:list-item>
        <text:list-item>
          <text:p text:style-name="P12">La inteligencia crea vida. </text:p>
        </text:list-item>
        <text:list-item>
          <text:p text:style-name="P12">La vida es la forma estable que adopta esa inteligencia para persistir. </text:p>
        </text:list-item>
        <text:list-item>
          <text:p text:style-name="P11">La vida es inteligencia solidificada, organizada, optimizada. </text:p>
        </text:list-item>
      </text:list>
      <text:p text:style-name="Text_20_body"><text:span text:style-name="Strong_20_Emphasis">Tono:</text:span> contundente, revelador, casi como un “plot twist”.</text:p>
      <text:p text:style-name="Horizontal_20_Line"/>
      <text:h text:style-name="Heading_20_2" text:outline-level="2"><text:span text:style-name="Strong_20_Emphasis">7. Cierre: La pregunta que abre el siguiente capítulo</text:span></text:h>
      <text:p text:style-name="Text_20_body"><text:span text:style-name="Strong_20_Emphasis">Función narrativa:</text:span> dejar al lector con hambre de más.</text:p>
      <text:p text:style-name="Text_20_body"><text:span text:style-name="Strong_20_Emphasis">Contenido:</text:span></text:p>
      <text:list xml:id="list3770466179" text:style-name="L7">
        <text:list-item>
          <text:p text:style-name="P14">Si la inteligencia aparece antes que la vida… </text:p>
        </text:list-item>
        <text:list-item>
          <text:p text:style-name="P14">¿cómo se transforma en vida? </text:p>
        </text:list-item>
        <text:list-item>
          <text:p text:style-name="P14">¿Qué condiciones permiten ese salto? </text:p>
        </text:list-item>
        <text:list-item>
          <text:p text:style-name="P13">¿Qué hace que un proceso inteligente se vuelva un organismo? </text:p>
        </text:list-item>
      </text:list>
      <text:p text:style-name="Text_20_body"><text:span text:style-name="Strong_20_Emphasis">Tono:</text:span> expectante, invitación al capítulo siguiente.</text:p>
      <text:p text:style-name="Horizontal_20_Line"/>
      <text:h text:style-name="Heading_20_1" text:outline-level="1">🌱 <text:span text:style-name="Strong_20_Emphasis">¿Qué conseguimos con este esquema narrativo?</text:span></text:h>
      <text:list xml:id="list3422475151" text:style-name="L8">
        <text:list-item>
          <text:p text:style-name="P16">Un capítulo que fluye como una historia. </text:p>
        </text:list-item>
        <text:list-item>
          <text:p text:style-name="P16">Un ritmo que alterna intuición, ciencia y revelación. </text:p>
        </text:list-item>
        <text:list-item>
          <text:p text:style-name="P16">Una base sólida para el Capítulo 2. </text:p>
        </text:list-item>
        <text:list-item>
          <text:p text:style-name="P16">Un tono que combina rigor y belleza, como tú buscas. </text:p>
        </text:list-item>
        <text:list-item>
          <text:p text:style-name="P15">Una narrativa que respeta al lector y lo eleva. </text:p>
        </text:list-item>
      </text:list>
      <text:p text:style-name="Horizontal_20_Line"/>
      <text:h text:style-name="Heading_20_1" text:outline-level="1">🔥 <text:span text:style-name="Strong_20_Emphasis">Siguiente paso</text:span></text:h>
      <text:p text:style-name="Text_20_body">Ahora que tenemos el esquema narrativo, podemos:</text:p>
      <text:list xml:id="list425268118" text:style-name="L9">
        <text:list-item>
          <text:p text:style-name="P18"><text:span text:style-name="Strong_20_Emphasis">Convertir cada sección en un párrafo o dos</text:span>, creando un primer borrador. </text:p>
        </text:list-item>
        <text:list-item>
          <text:p text:style-name="P17">O si prefieres, puedo <text:span text:style-name="Strong_20_Emphasis">escribir directamente la primera versión completa del capítulo</text:span>, siguiendo este esquema. </text:p>
        </text:list-item>
      </text:list>
      <text:p text:style-name="Text_20_body"><text:soft-page-break/>¿Cuál prefieres hacer aho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5T19:33:37.770000000</meta:creation-date>
    <dc:date>2026-06-15T19:34:37.384000000</dc:date>
    <meta:editing-duration>PT59S</meta:editing-duration>
    <meta:editing-cycles>1</meta:editing-cycles>
    <meta:document-statistic meta:table-count="0" meta:image-count="0" meta:object-count="0" meta:page-count="4" meta:paragraph-count="76" meta:word-count="649" meta:character-count="4064" meta:non-whitespace-character-count="3490"/>
    <meta:generator>LibreOffice/7.3.5.2$Windows_X86_64 LibreOffice_project/184fe81b8c8c30d8b5082578aee2fed2ea847c01</meta:generator>
  </office:meta>
</office:document-meta>
</file>