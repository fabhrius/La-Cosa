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in" fo:margin-bottom="0in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in" fo:margin-bottom="0in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in" fo:margin-bottom="0in" style:contextual-spacing="false"/>
    </style:style>
    <style:style style:name="P53" style:family="paragraph" style:parent-style-name="Text_20_body" style:list-style-name="L27"/>
    <style:style style:name="P54" style:family="paragraph" style:parent-style-name="Text_20_body" style:list-style-name="L27">
      <style:paragraph-properties fo:margin-top="0in" fo:margin-bottom="0in" style:contextual-spacing="false"/>
    </style:style>
    <style:style style:name="P55" style:family="paragraph" style:parent-style-name="Text_20_body" style:list-style-name="L28"/>
    <style:style style:name="P56" style:family="paragraph" style:parent-style-name="Text_20_body" style:list-style-name="L28">
      <style:paragraph-properties fo:margin-top="0in" fo:margin-bottom="0in" style:contextual-spacing="false"/>
    </style:style>
    <style:style style:name="P57" style:family="paragraph" style:parent-style-name="Text_20_body" style:list-style-name="L29"/>
    <style:style style:name="P58" style:family="paragraph" style:parent-style-name="Text_20_body" style:list-style-name="L29">
      <style:paragraph-properties fo:margin-top="0in" fo:margin-bottom="0in" style:contextual-spacing="false"/>
    </style:style>
    <style:style style:name="P59" style:family="paragraph" style:parent-style-name="Text_20_body" style:list-style-name="L30"/>
    <style:style style:name="P60" style:family="paragraph" style:parent-style-name="Text_20_body" style:list-style-name="L30">
      <style:paragraph-properties fo:margin-top="0in" fo:margin-bottom="0in" style:contextual-spacing="false"/>
    </style:style>
    <style:style style:name="P61" style:family="paragraph" style:parent-style-name="Text_20_body" style:list-style-name="L31"/>
    <style:style style:name="P62" style:family="paragraph" style:parent-style-name="Text_20_body" style:list-style-name="L31">
      <style:paragraph-properties fo:margin-top="0in" fo:margin-bottom="0in" style:contextual-spacing="false"/>
    </style:style>
    <style:style style:name="P63" style:family="paragraph" style:parent-style-name="Text_20_body" style:list-style-name="L32"/>
    <style:style style:name="P64" style:family="paragraph" style:parent-style-name="Text_20_body" style:list-style-name="L32">
      <style:paragraph-properties fo:margin-top="0in" fo:margin-bottom="0in" style:contextual-spacing="false"/>
    </style:style>
    <style:style style:name="P65" style:family="paragraph" style:parent-style-name="Text_20_body" style:list-style-name="L33"/>
    <style:style style:name="P66" style:family="paragraph" style:parent-style-name="Text_20_body" style:list-style-name="L33">
      <style:paragraph-properties fo:margin-top="0in" fo:margin-bottom="0in" style:contextual-spacing="false"/>
    </style:style>
    <style:style style:name="P67" style:family="paragraph" style:parent-style-name="Text_20_body" style:list-style-name="L34"/>
    <style:style style:name="P68" style:family="paragraph" style:parent-style-name="Text_20_body" style:list-style-name="L35"/>
    <style:style style:name="P69" style:family="paragraph" style:parent-style-name="Text_20_body" style:list-style-name="L35">
      <style:paragraph-properties fo:margin-top="0in" fo:margin-bottom="0in" style:contextual-spacing="false"/>
    </style:style>
    <style:style style:name="P70" style:family="paragraph" style:parent-style-name="Text_20_body" style:list-style-name="L36"/>
    <style:style style:name="P71" style:family="paragraph" style:parent-style-name="Text_20_body" style:list-style-name="L36">
      <style:paragraph-properties fo:margin-top="0in" fo:margin-bottom="0in" style:contextual-spacing="false"/>
    </style:style>
    <style:style style:name="P72" style:family="paragraph" style:parent-style-name="Text_20_body" style:list-style-name="L37"/>
    <style:style style:name="P73" style:family="paragraph" style:parent-style-name="Text_20_body" style:list-style-name="L3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enial, vamos a completar el modelo sin tocar los nombres ni el orden.<text:line-break/>Voy a ir nivel por nivel, mostrando definición, fenómeno, ejemplos y cómo empuja al siguiente escalón.</text:p>
      <text:p text:style-name="Horizontal_20_Line"/>
      <text:h text:style-name="Heading_20_2" text:outline-level="2">Nivel 0 — Dinámica física</text:h>
      <text:p text:style-name="Text_20_body"><text:span text:style-name="Strong_20_Emphasis">Definición:</text:span> <text:line-break/>Procesos físicos y químicos que siguen las leyes naturales sin selección interna ni uso funcional de información.</text:p>
      <text:p text:style-name="Text_20_body"><text:span text:style-name="Strong_20_Emphasis">Fenómeno característico:</text:span></text:p>
      <text:list xml:id="list3389681078" text:style-name="L1">
        <text:list-item>
          <text:p text:style-name="P2">Evolución hacia equilibrio. </text:p>
        </text:list-item>
        <text:list-item>
          <text:p text:style-name="P1">No hay elección entre alternativas: dado el estado inicial, la dinámica está fijada. </text:p>
        </text:list-item>
      </text:list>
      <text:p text:style-name="Text_20_body"><text:span text:style-name="Strong_20_Emphasis">Ejemplos naturales:</text:span></text:p>
      <text:list xml:id="list2183274443" text:style-name="L2">
        <text:list-item>
          <text:p text:style-name="P4">Difusión de una molécula en agua. </text:p>
        </text:list-item>
        <text:list-item>
          <text:p text:style-name="P4">Reacciones químicas simples que van a equilibrio. </text:p>
        </text:list-item>
        <text:list-item>
          <text:p text:style-name="P3">Enfriamiento de un cuerpo caliente. </text:p>
        </text:list-item>
      </text:list>
      <text:p text:style-name="Text_20_body"><text:span text:style-name="Strong_20_Emphasis">Ejemplos artificiales:</text:span></text:p>
      <text:list xml:id="list368202638" text:style-name="L3">
        <text:list-item>
          <text:p text:style-name="P6">Un circuito eléctrico lineal sin elementos de control. </text:p>
        </text:list-item>
        <text:list-item>
          <text:p text:style-name="P5">Un autómata celular sin bifurcaciones (regla que siempre lleva al mismo patrón). </text:p>
        </text:list-item>
      </text:list>
      <text:p text:style-name="Text_20_body"><text:span text:style-name="Strong_20_Emphasis">Rol en la evolución:</text:span></text:p>
      <text:list xml:id="list2958776359" text:style-name="L4">
        <text:list-item>
          <text:p text:style-name="P8">Es el “suelo” sobre el que todo ocurre. </text:p>
        </text:list-item>
        <text:list-item>
          <text:p text:style-name="P7">Muestra lo que es la dinámica natural sin inteligencia: no hay selección, no hay desviación informada. </text:p>
        </text:list-item>
      </text:list>
      <text:p text:style-name="Horizontal_20_Line"/>
      <text:h text:style-name="Heading_20_2" text:outline-level="2">1. Materia organizada → proto‑agencia</text:h>
      <text:p text:style-name="Text_20_body"><text:span text:style-name="Strong_20_Emphasis">Definición:</text:span> <text:line-break/>Sistemas físicos o químicos cuya estructura les permite mantenerse activos mientras reciben energía, pero sin seleccionar rutas entre alternativas.</text:p>
      <text:p text:style-name="Text_20_body"><text:span text:style-name="Strong_20_Emphasis">Fenómeno característico (persistencia reactiva):</text:span></text:p>
      <text:list xml:id="list2533919680" text:style-name="L5">
        <text:list-item>
          <text:p text:style-name="P10">El sistema se mantiene mientras haya flujo de energía. </text:p>
        </text:list-item>
        <text:list-item>
          <text:p text:style-name="P9">No decide nada, pero su organización hace que no se disuelva inmediatamente. </text:p>
        </text:list-item>
      </text:list>
      <text:p text:style-name="Text_20_body"><text:span text:style-name="Strong_20_Emphasis">Ejemplos naturales:</text:span></text:p>
      <text:list xml:id="list614903329" text:style-name="L6">
        <text:list-item>
          <text:p text:style-name="P12">Ciclos químicos simples (como el ciclo de Krebs, visto solo como química). </text:p>
        </text:list-item>
        <text:list-item>
          <text:p text:style-name="P11">Remolinos, tornados, estructuras disipativas básicas. </text:p>
        </text:list-item>
      </text:list>
      <text:p text:style-name="Text_20_body"><text:soft-page-break/><text:span text:style-name="Strong_20_Emphasis">Ejemplos artificiales:</text:span></text:p>
      <text:list xml:id="list3560512728" text:style-name="L7">
        <text:list-item>
          <text:p text:style-name="P14">Osciladores químicos (reacción de Belousov–Zhabotinsky). </text:p>
        </text:list-item>
        <text:list-item>
          <text:p text:style-name="P13">Circuitos osciladores electrónicos. </text:p>
        </text:list-item>
      </text:list>
      <text:p text:style-name="Text_20_body"><text:span text:style-name="Strong_20_Emphasis">Evolución respecto al nivel 0:</text:span></text:p>
      <text:list xml:id="list2379375201" text:style-name="L8">
        <text:list-item>
          <text:p text:style-name="P16">Aparece organización que se mantiene en el tiempo. </text:p>
        </text:list-item>
        <text:list-item>
          <text:p text:style-name="P15">Pero aún no hay selección entre alternativas: el sistema sigue la dinámica que su estructura impone. </text:p>
        </text:list-item>
      </text:list>
      <text:p text:style-name="Text_20_body"><text:span text:style-name="Strong_20_Emphasis">Por qué es “proto‑agencia”:</text:span></text:p>
      <text:list xml:id="list1717336936" text:style-name="L9">
        <text:list-item>
          <text:p text:style-name="P18">No es inteligencia todavía, pero ya hay algo que “se sostiene” mientras el entorno lo permite. </text:p>
        </text:list-item>
        <text:list-item>
          <text:p text:style-name="P17">Es el paso previo a que esa organización empiece a elegir rutas. </text:p>
        </text:list-item>
      </text:list>
      <text:p text:style-name="Horizontal_20_Line"/>
      <text:h text:style-name="Heading_20_2" text:outline-level="2">2. Redes químicas → inteligencia mínima</text:h>
      <text:p text:style-name="Text_20_body"><text:span text:style-name="Strong_20_Emphasis">Definición:</text:span> <text:line-break/>Sistemas químicos con múltiples rutas posibles cuya evolución depende del estado interno, de modo que seleccionan dinámicas distintas según su configuración.</text:p>
      <text:p text:style-name="Text_20_body"><text:span text:style-name="Strong_20_Emphasis">Fenómeno característico (selección de rutas):</text:span></text:p>
      <text:list xml:id="list2045935159" text:style-name="L10">
        <text:list-item>
          <text:p text:style-name="P20">Bifurcaciones: el sistema puede ir por A o por B. </text:p>
        </text:list-item>
        <text:list-item>
          <text:p text:style-name="P19">El estado interno (concentraciones, estructura) determina qué ruta se toma. </text:p>
        </text:list-item>
      </text:list>
      <text:p text:style-name="Text_20_body"><text:span text:style-name="Strong_20_Emphasis">Ejemplos naturales:</text:span></text:p>
      <text:list xml:id="list929339565" text:style-name="L11">
        <text:list-item>
          <text:p text:style-name="P22">Redes metabólicas primitivas con caminos alternativos. </text:p>
        </text:list-item>
        <text:list-item>
          <text:p text:style-name="P21">Sistemas químicos con histéresis: la respuesta depende de la historia previa. </text:p>
        </text:list-item>
      </text:list>
      <text:p text:style-name="Text_20_body"><text:span text:style-name="Strong_20_Emphasis">Ejemplos artificiales:</text:span></text:p>
      <text:list xml:id="list1799799517" text:style-name="L12">
        <text:list-item>
          <text:p text:style-name="P24">Tu sistema que simula vida y modifica información con reglas de “reproducción” lógica. </text:p>
        </text:list-item>
        <text:list-item>
          <text:p text:style-name="P24">Autómatas celulares con reglas que dependen del contexto local. </text:p>
        </text:list-item>
        <text:list-item>
          <text:p text:style-name="P23">Circuitos de control simples que cambian de modo según el estado. </text:p>
        </text:list-item>
      </text:list>
      <text:p text:style-name="Text_20_body"><text:span text:style-name="Strong_20_Emphasis">Evolución respecto al nivel anterior:</text:span></text:p>
      <text:list xml:id="list1470763387" text:style-name="L13">
        <text:list-item>
          <text:p text:style-name="P26">Ya no hay una única dinámica: aparecen alternativas. </text:p>
        </text:list-item>
        <text:list-item>
          <text:p text:style-name="P26">El sistema usa información de su estado para elegir. </text:p>
        </text:list-item>
        <text:list-item>
          <text:p text:style-name="P25">Aquí nace la <text:span text:style-name="Strong_20_Emphasis">inteligencia mínima</text:span>: desviación informada respecto a la dinámica natural. </text:p>
        </text:list-item>
      </text:list>
      <text:p text:style-name="Text_20_body"><text:span text:style-name="Strong_20_Emphasis">Por qué es inteligencia:</text:span></text:p>
      <text:list xml:id="list977014909" text:style-name="L14">
        <text:list-item>
          <text:p text:style-name="P28">Porque el resultado no es el que dictaría una única ley física ciega. </text:p>
        </text:list-item>
        <text:list-item>
          <text:p text:style-name="P27">El sistema “decide” (en sentido físico) qué hacer según cómo está. </text:p>
        </text:list-item>
      </text:list>
      <text:p text:style-name="Horizontal_20_Line"/>
      <text:h text:style-name="Heading_20_2" text:outline-level="2"><text:soft-page-break/>3. Redes autocatalíticas → inteligencia adaptativa</text:h>
      <text:p text:style-name="Text_20_body"><text:span text:style-name="Strong_20_Emphasis">Definición:</text:span> <text:line-break/>Redes químicas donde los productos de ciertas reacciones favorecen su propia producción, creando ciclos que se refuerzan y pueden estabilizarse en configuraciones útiles.</text:p>
      <text:p text:style-name="Text_20_body"><text:span text:style-name="Strong_20_Emphasis">Fenómeno característico (memoria y aprendizaje físico):</text:span></text:p>
      <text:list xml:id="list1357915471" text:style-name="L15">
        <text:list-item>
          <text:p text:style-name="P30">Autocatálisis: el sistema se refuerza a sí mismo. </text:p>
        </text:list-item>
        <text:list-item>
          <text:p text:style-name="P30">Atractores: estados hacia los que tiende y en los que se mantiene. </text:p>
        </text:list-item>
        <text:list-item>
          <text:p text:style-name="P29">Histéresis: la historia importa; el sistema “recuerda” configuraciones. </text:p>
        </text:list-item>
      </text:list>
      <text:p text:style-name="Text_20_body"><text:span text:style-name="Strong_20_Emphasis">Ejemplos naturales:</text:span></text:p>
      <text:list xml:id="list3039503103" text:style-name="L16">
        <text:list-item>
          <text:p text:style-name="P32">Redes autocatalíticas propuestas por Kauffman como precursores de la vida. </text:p>
        </text:list-item>
        <text:list-item>
          <text:p text:style-name="P31">Sistemas químicos con múltiples atractores estables. </text:p>
        </text:list-item>
      </text:list>
      <text:p text:style-name="Text_20_body"><text:span text:style-name="Strong_20_Emphasis">Ejemplos artificiales:</text:span></text:p>
      <text:list xml:id="list799757996" text:style-name="L17">
        <text:list-item>
          <text:p text:style-name="P34">Redes de reacción–difusión que generan patrones estables. </text:p>
        </text:list-item>
        <text:list-item>
          <text:p text:style-name="P33">Algoritmos evolutivos que refuerzan soluciones sin aún tener “vida”. </text:p>
        </text:list-item>
      </text:list>
      <text:p text:style-name="Text_20_body"><text:span text:style-name="Strong_20_Emphasis">Evolución respecto al nivel anterior:</text:span></text:p>
      <text:list xml:id="list2926107051" text:style-name="L18">
        <text:list-item>
          <text:p text:style-name="P36">Antes había selección de rutas; ahora hay <text:span text:style-name="Strong_20_Emphasis">refuerzo de ciertas rutas</text:span>. </text:p>
        </text:list-item>
        <text:list-item>
          <text:p text:style-name="P35">El sistema no solo elige, sino que <text:span text:style-name="Strong_20_Emphasis">aprende físicamente</text:span>: las configuraciones que funcionan se consolidan. </text:p>
        </text:list-item>
      </text:list>
      <text:p text:style-name="Text_20_body"><text:span text:style-name="Strong_20_Emphasis">Por qué es inteligencia adaptativa:</text:span></text:p>
      <text:list xml:id="list974355007" text:style-name="L19">
        <text:list-item>
          <text:p text:style-name="P38">Porque el sistema modifica su propia estructura en función de lo que ha ocurrido. </text:p>
        </text:list-item>
        <text:list-item>
          <text:p text:style-name="P37">Es una forma de aprendizaje sin genes ni neuronas. </text:p>
        </text:list-item>
      </text:list>
      <text:p text:style-name="Horizontal_20_Line"/>
      <text:h text:style-name="Heading_20_2" text:outline-level="2">4. Protocélulas → vida mínima</text:h>
      <text:p text:style-name="Text_20_body"><text:span text:style-name="Strong_20_Emphasis">Definición:</text:span> <text:line-break/>Sistemas químicos compartimentalizados (por ejemplo, dentro de vesículas) que mantienen su organización y pueden generar copias imperfectas de sí mismos.</text:p>
      <text:p text:style-name="Text_20_body"><text:span text:style-name="Strong_20_Emphasis">Fenómeno característico (herencia imperfecta y evolución):</text:span></text:p>
      <text:list xml:id="list2922290664" text:style-name="L20">
        <text:list-item>
          <text:p text:style-name="P40">Compartimentalización: hay un “dentro” y un “fuera”. </text:p>
        </text:list-item>
        <text:list-item>
          <text:p text:style-name="P40">Auto‑mantenimiento: el sistema repara o repone componentes. </text:p>
        </text:list-item>
        <text:list-item>
          <text:p text:style-name="P39">Copias imperfectas: aparecen variaciones entre descendientes. </text:p>
        </text:list-item>
      </text:list>
      <text:p text:style-name="Text_20_body"><text:span text:style-name="Strong_20_Emphasis">Ejemplos naturales:</text:span></text:p>
      <text:list xml:id="list1774057497" text:style-name="L21">
        <text:list-item>
          <text:p text:style-name="P42">Vesículas lipídicas con redes químicas internas. </text:p>
        </text:list-item>
        <text:list-item>
          <text:p text:style-name="P41">Protocélulas hipotéticas del origen de la vida. </text:p>
        </text:list-item>
      </text:list>
      <text:p text:style-name="Text_20_body"><text:soft-page-break/><text:span text:style-name="Strong_20_Emphasis">Ejemplos artificiales:</text:span></text:p>
      <text:list xml:id="list3625655805" text:style-name="L22">
        <text:list-item>
          <text:p text:style-name="P44">Sistemas de vida artificial con estados que se replican con mutaciones. </text:p>
        </text:list-item>
        <text:list-item>
          <text:p text:style-name="P43">Simulaciones tipo Tierra de Autómatas donde patrones se copian y varían. </text:p>
        </text:list-item>
      </text:list>
      <text:p text:style-name="Text_20_body"><text:span text:style-name="Strong_20_Emphasis">Evolución respecto al nivel anterior:</text:span></text:p>
      <text:list xml:id="list1111349779" text:style-name="L23">
        <text:list-item>
          <text:p text:style-name="P46">La inteligencia adaptativa ahora está <text:span text:style-name="Strong_20_Emphasis">encerrada en un contenedor</text:span>. </text:p>
        </text:list-item>
        <text:list-item>
          <text:p text:style-name="P46">El sistema aplica su capacidad de selección y aprendizaje a <text:span text:style-name="Strong_20_Emphasis">mantenerse a sí mismo</text:span>. </text:p>
        </text:list-item>
        <text:list-item>
          <text:p text:style-name="P45">Aquí aparece la <text:span text:style-name="Strong_20_Emphasis">vida mínima</text:span>: inteligencia autorreferencial. </text:p>
        </text:list-item>
      </text:list>
      <text:p text:style-name="Text_20_body"><text:span text:style-name="Strong_20_Emphasis">Por qué es vida:</text:span></text:p>
      <text:list xml:id="list1186550941" text:style-name="L24">
        <text:list-item>
          <text:p text:style-name="P48">Porque el sistema se convierte en su propio problema: debe mantenerse y reproducirse. </text:p>
        </text:list-item>
        <text:list-item>
          <text:p text:style-name="P47">La inteligencia ya no solo resuelve dinámicas externas, sino su propia continuidad. </text:p>
        </text:list-item>
      </text:list>
      <text:p text:style-name="Horizontal_20_Line"/>
      <text:h text:style-name="Heading_20_2" text:outline-level="2">5. Células → vida organizada</text:h>
      <text:p text:style-name="Text_20_body"><text:span text:style-name="Strong_20_Emphasis">Definición:</text:span> <text:line-break/>Sistemas vivos con metabolismo completo, regulación interna y robustez frente a perturbaciones, capaces de evolucionar en poblaciones.</text:p>
      <text:p text:style-name="Text_20_body"><text:span text:style-name="Strong_20_Emphasis">Fenómeno característico (metabolismo, regulación, robustez):</text:span></text:p>
      <text:list xml:id="list2126304626" text:style-name="L25">
        <text:list-item>
          <text:p text:style-name="P50">Metabolismo: transformación controlada de energía y materia. </text:p>
        </text:list-item>
        <text:list-item>
          <text:p text:style-name="P50">Regulación: redes de control que ajustan respuestas. </text:p>
        </text:list-item>
        <text:list-item>
          <text:p text:style-name="P49">Robustez: capacidad de seguir funcionando bajo cambios. </text:p>
        </text:list-item>
      </text:list>
      <text:p text:style-name="Text_20_body"><text:span text:style-name="Strong_20_Emphasis">Ejemplos naturales:</text:span></text:p>
      <text:list xml:id="list4223860326" text:style-name="L26">
        <text:list-item>
          <text:p text:style-name="P52">Células procariotas y eucariotas. </text:p>
        </text:list-item>
        <text:list-item>
          <text:p text:style-name="P51">Microorganismos que regulan su entorno interno. </text:p>
        </text:list-item>
      </text:list>
      <text:p text:style-name="Text_20_body"><text:span text:style-name="Strong_20_Emphasis">Ejemplos artificiales:</text:span></text:p>
      <text:list xml:id="list2394341977" text:style-name="L27">
        <text:list-item>
          <text:p text:style-name="P54">Modelos de células virtuales con metabolismo simulado. </text:p>
        </text:list-item>
        <text:list-item>
          <text:p text:style-name="P53">Robots con sistemas de control homeostático. </text:p>
        </text:list-item>
      </text:list>
      <text:p text:style-name="Text_20_body"><text:span text:style-name="Strong_20_Emphasis">Evolución respecto al nivel anterior:</text:span></text:p>
      <text:list xml:id="list513634741" text:style-name="L28">
        <text:list-item>
          <text:p text:style-name="P56">La vida mínima se vuelve <text:span text:style-name="Strong_20_Emphasis">estructurada y eficiente</text:span>. </text:p>
        </text:list-item>
        <text:list-item>
          <text:p text:style-name="P56">La inteligencia autorreferencial se organiza en redes de regulación. </text:p>
        </text:list-item>
        <text:list-item>
          <text:p text:style-name="P55">Aparece la <text:span text:style-name="Strong_20_Emphasis">inteligencia evolutiva plena</text:span>: sistemas que no solo viven, sino que exploran espacios de posibilidades a través de la evolución. </text:p>
        </text:list-item>
      </text:list>
      <text:p text:style-name="Text_20_body"><text:span text:style-name="Strong_20_Emphasis">Por qué es vida organizada:</text:span></text:p>
      <text:list xml:id="list4141720358" text:style-name="L29">
        <text:list-item>
          <text:p text:style-name="P58">Porque la inteligencia aplicada a la propia continuidad se ha convertido en un sistema altamente estructurado y regulado. </text:p>
        </text:list-item>
        <text:list-item>
          <text:p text:style-name="P57">La célula es una máquina de persistencia y exploración. </text:p>
        </text:list-item>
      </text:list>
      <text:p text:style-name="Horizontal_20_Line"><text:soft-page-break/></text:p>
      <text:h text:style-name="Heading_20_2" text:outline-level="2">6. Organismos → inteligencia biológica</text:h>
      <text:p text:style-name="Text_20_body"><text:span text:style-name="Strong_20_Emphasis">Definición:</text:span> <text:line-break/>Sistemas vivos multicelulares o altamente organizados que representan su entorno, tienen objetivos implícitos y pueden planificar acciones.</text:p>
      <text:p text:style-name="Text_20_body"><text:span text:style-name="Strong_20_Emphasis">Fenómeno característico (representación, objetivos, planificación):</text:span></text:p>
      <text:list xml:id="list3494502397" text:style-name="L30">
        <text:list-item>
          <text:p text:style-name="P60">Sistemas nerviosos o equivalentes. </text:p>
        </text:list-item>
        <text:list-item>
          <text:p text:style-name="P60">Percepción del entorno. </text:p>
        </text:list-item>
        <text:list-item>
          <text:p text:style-name="P59">Comportamientos dirigidos a fines (buscar alimento, evitar peligro, cooperar). </text:p>
        </text:list-item>
      </text:list>
      <text:p text:style-name="Text_20_body"><text:span text:style-name="Strong_20_Emphasis">Ejemplos naturales:</text:span></text:p>
      <text:list xml:id="list3241649029" text:style-name="L31">
        <text:list-item>
          <text:p text:style-name="P62">Animales, humanos. </text:p>
        </text:list-item>
        <text:list-item>
          <text:p text:style-name="P61">Plantas con respuestas complejas (aunque sin sistema nervioso, muestran formas de inteligencia funcional). </text:p>
        </text:list-item>
      </text:list>
      <text:p text:style-name="Text_20_body"><text:span text:style-name="Strong_20_Emphasis">Ejemplos artificiales:</text:span></text:p>
      <text:list xml:id="list1052133122" text:style-name="L32">
        <text:list-item>
          <text:p text:style-name="P64">Robots autónomos que navegan y toman decisiones. </text:p>
        </text:list-item>
        <text:list-item>
          <text:p text:style-name="P63">Sistemas de IA que resuelven problemas complejos. </text:p>
        </text:list-item>
      </text:list>
      <text:p text:style-name="Text_20_body"><text:span text:style-name="Strong_20_Emphasis">Evolución respecto al nivel anterior:</text:span></text:p>
      <text:list xml:id="list1252171433" text:style-name="L33">
        <text:list-item>
          <text:p text:style-name="P66">La inteligencia que antes se aplicaba solo a la propia organización ahora se aplica también a <text:span text:style-name="Strong_20_Emphasis">problemas externos</text:span>. </text:p>
        </text:list-item>
        <text:list-item>
          <text:p text:style-name="P66">Aparecen modelos internos, representación, objetivos. </text:p>
        </text:list-item>
        <text:list-item>
          <text:p text:style-name="P65">Es la culminación de la línea: <text:span text:style-name="Strong_20_Emphasis">inteligencia biológica</text:span>. </text:p>
        </text:list-item>
      </text:list>
      <text:p text:style-name="Text_20_body"><text:span text:style-name="Strong_20_Emphasis">Por qué es inteligencia biológica:</text:span></text:p>
      <text:list xml:id="list1706766590" text:style-name="L34">
        <text:list-item>
          <text:p text:style-name="P67">Porque aquí ya reconocemos lo que comúnmente llamamos “ser inteligente”: resolver problemas, adaptarse, planificar. </text:p>
        </text:list-item>
      </text:list>
      <text:p text:style-name="Horizontal_20_Line"/>
      <text:h text:style-name="Heading_20_2" text:outline-level="2">La historia completa de la evolución del fenómeno</text:h>
      <text:p text:style-name="Text_20_body">Si lo miramos como narrativa:</text:p>
      <text:list xml:id="list584561455" text:style-name="L35">
        <text:list-item>
          <text:p text:style-name="P69"><text:span text:style-name="Strong_20_Emphasis">Dinámica física:</text:span> lo que ocurre sin inteligencia. </text:p>
        </text:list-item>
        <text:list-item>
          <text:p text:style-name="P69"><text:span text:style-name="Strong_20_Emphasis">Proto‑agencia:</text:span> estructuras que se sostienen mientras haya energía. </text:p>
        </text:list-item>
        <text:list-item>
          <text:p text:style-name="P69"><text:span text:style-name="Strong_20_Emphasis">Inteligencia mínima:</text:span> selección informada de rutas. </text:p>
        </text:list-item>
        <text:list-item>
          <text:p text:style-name="P69"><text:span text:style-name="Strong_20_Emphasis">Inteligencia adaptativa:</text:span> aprendizaje físico y memoria. </text:p>
        </text:list-item>
        <text:list-item>
          <text:p text:style-name="P69"><text:span text:style-name="Strong_20_Emphasis">Vida mínima:</text:span> inteligencia aplicada a sí misma, compartimentalizada. </text:p>
        </text:list-item>
        <text:list-item>
          <text:p text:style-name="P69"><text:span text:style-name="Strong_20_Emphasis">Vida organizada:</text:span> regulación, metabolismo, robustez, evolución. </text:p>
        </text:list-item>
        <text:list-item>
          <text:p text:style-name="P68"><text:span text:style-name="Strong_20_Emphasis">Inteligencia biológica:</text:span> representación, objetivos, planificación. </text:p>
        </text:list-item>
      </text:list>
      <text:p text:style-name="Text_20_body"><text:soft-page-break/>Con esto puedes contar en tu capítulo:</text:p>
      <text:list xml:id="list3177290153" text:style-name="L36">
        <text:list-item>
          <text:p text:style-name="P71">cómo aparece el fenómeno, </text:p>
        </text:list-item>
        <text:list-item>
          <text:p text:style-name="P71">cómo se complejiza, </text:p>
        </text:list-item>
        <text:list-item>
          <text:p text:style-name="P71">cómo se convierte en vida, </text:p>
        </text:list-item>
        <text:list-item>
          <text:p text:style-name="P70">cómo termina en inteligencia biológica. </text:p>
        </text:list-item>
      </text:list>
      <text:p text:style-name="Horizontal_20_Line"/>
      <text:p text:style-name="Text_20_body">Si quieres, el siguiente paso puede ser:</text:p>
      <text:list xml:id="list107278660" text:style-name="L37">
        <text:list-item>
          <text:p text:style-name="P73">escribir la <text:span text:style-name="Strong_20_Emphasis">sección del capítulo</text:span> que describe esta escalera, </text:p>
        </text:list-item>
        <text:list-item>
          <text:p text:style-name="P72">o profundizar en uno de los niveles (por ejemplo, redes autocatalíticas) con más detalle técnico.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9T19:48:48.250000000</meta:creation-date>
    <dc:date>2026-06-19T20:09:31.992000000</dc:date>
    <meta:editing-duration>PT10M33S</meta:editing-duration>
    <meta:editing-cycles>1</meta:editing-cycles>
    <meta:document-statistic meta:table-count="0" meta:image-count="0" meta:object-count="0" meta:page-count="6" meta:paragraph-count="143" meta:word-count="1251" meta:character-count="8531" meta:non-whitespace-character-count="7417"/>
    <meta:generator>LibreOffice/7.3.5.2$Windows_X86_64 LibreOffice_project/184fe81b8c8c30d8b5082578aee2fed2ea847c01</meta:generator>
  </office:meta>
</office:document-meta>
</file>