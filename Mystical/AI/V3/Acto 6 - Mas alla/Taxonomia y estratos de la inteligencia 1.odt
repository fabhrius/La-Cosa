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ahora sí estamos entrando en el <text:span text:style-name="Strong_20_Emphasis">núcleo duro</text:span> del problema.<text:line-break/>Lo que has identificado es exactamente el punto donde todo se rompe si no se define bien:</text:p>
      <text:p text:style-name="Quotations"><text:span text:style-name="Strong_20_Emphasis">El concepto de “inteligencia” que usa la biología es demasiado tardío, demasiado complejo y demasiado cargado de representación.<text:line-break/>Si queremos explicar el origen real de la inteligencia, necesitamos un concepto más primitivo, más general y más físico.</text:span></text:p>
      <text:p text:style-name="Text_20_body">Y eso implica dos tareas:</text:p>
      <text:list xml:id="list3243519328" text:style-name="L1">
        <text:list-item>
          <text:p text:style-name="P2"><text:span text:style-name="Strong_20_Emphasis">Encontrar las palabras correctas para las versiones más simples del fenómeno.</text:span> </text:p>
        </text:list-item>
        <text:list-item>
          <text:p text:style-name="P1"><text:span text:style-name="Strong_20_Emphasis">Trazar la evolución completa desde el origen físico hasta la inteligencia biológica.</text:span> </text:p>
        </text:list-item>
      </text:list>
      <text:p text:style-name="Text_20_body">Vamos a hacerlo con precisión conceptual, no con metáforas.</text:p>
      <text:p text:style-name="Horizontal_20_Line"/>
      <text:h text:style-name="Heading_20_1" text:outline-level="1">🔥 1. El problema real: “inteligencia” está secuestrada por definiciones tardías</text:h>
      <text:p text:style-name="Text_20_body">En biología y en ciencias cognitivas, “inteligencia” suele implicar:</text:p>
      <text:list xml:id="list3242926036" text:style-name="L2">
        <text:list-item>
          <text:p text:style-name="P4">representación interna, </text:p>
        </text:list-item>
        <text:list-item>
          <text:p text:style-name="P4">objetivos implícitos, </text:p>
        </text:list-item>
        <text:list-item>
          <text:p text:style-name="P4">resolución de problemas, </text:p>
        </text:list-item>
        <text:list-item>
          <text:p text:style-name="P4">aprendizaje, </text:p>
        </text:list-item>
        <text:list-item>
          <text:p text:style-name="P4">planificación, </text:p>
        </text:list-item>
        <text:list-item>
          <text:p text:style-name="P3">flexibilidad conductual. </text:p>
        </text:list-item>
      </text:list>
      <text:p text:style-name="Text_20_body">Eso sitúa la inteligencia <text:span text:style-name="Strong_20_Emphasis">muy tarde</text:span> en la evolución: animales, cerebros, sistemas nerviosos.</text:p>
      <text:p text:style-name="Text_20_body">Pero tú no estás estudiando eso.<text:line-break/>Tú estás estudiando <text:span text:style-name="Strong_20_Emphasis">el origen del fenómeno que, miles de millones de años después, dará lugar a eso</text:span>.</text:p>
      <text:p text:style-name="Text_20_body">Y ese fenómeno aparece <text:span text:style-name="Strong_20_Emphasis">mucho antes</text:span>, en sistemas químicos que:</text:p>
      <text:list xml:id="list3926568699" text:style-name="L3">
        <text:list-item>
          <text:p text:style-name="P6">responden, </text:p>
        </text:list-item>
        <text:list-item>
          <text:p text:style-name="P6">se estabilizan, </text:p>
        </text:list-item>
        <text:list-item>
          <text:p text:style-name="P6">seleccionan rutas, </text:p>
        </text:list-item>
        <text:list-item>
          <text:p text:style-name="P6">acumulan información, </text:p>
        </text:list-item>
        <text:list-item>
          <text:p text:style-name="P5">se mantienen. </text:p>
        </text:list-item>
      </text:list>
      <text:p text:style-name="Text_20_body">Pero no tienen representación ni objetivos.</text:p>
      <text:p text:style-name="Text_20_body">Por eso, si usamos la palabra “inteligencia” sin redefinirla, estamos muertos.</text:p>
      <text:p text:style-name="Horizontal_20_Line"/>
      <text:h text:style-name="Heading_20_1" text:outline-level="1"><text:soft-page-break/>🔧 2. Necesitamos un nuevo vocabulario para las versiones primitivas del fenómeno</text:h>
      <text:p text:style-name="Text_20_body">Aquí está la clave:<text:line-break/><text:span text:style-name="Strong_20_Emphasis">no podemos llamar “inteligencia” a lo que ocurre en redes químicas primitivas</text:span>, porque la palabra está contaminada.</text:p>
      <text:p text:style-name="Text_20_body">Pero tampoco podemos renunciar al concepto, porque lo que ocurre ahí <text:span text:style-name="Strong_20_Emphasis">es el origen real de la inteligencia</text:span>.</text:p>
      <text:p text:style-name="Text_20_body">La solución es <text:span text:style-name="Strong_20_Emphasis">estratificar el fenómeno</text:span> y darle nombres distintos según el nivel.</text:p>
      <text:p text:style-name="Text_20_body">Te propongo una taxonomía funcional, no psicológica:</text:p>
      <text:p text:style-name="Horizontal_20_Line"/>
      <text:h text:style-name="Heading_20_2" text:outline-level="2"><text:span text:style-name="Strong_20_Emphasis">Nivel 0 — Dinámica física</text:span></text:h>
      <text:p text:style-name="Text_20_body">No hay selección, no hay memoria, no hay persistencia activa.<text:line-break/>Ejemplo: reacciones químicas simples.</text:p>
      <text:p text:style-name="Horizontal_20_Line"/>
      <text:h text:style-name="Heading_20_2" text:outline-level="2"><text:span text:style-name="Strong_20_Emphasis">Nivel 1 — Persistencia reactiva</text:span></text:h>
      <text:p text:style-name="Text_20_body">El sistema tiende a mantenerse mientras haya energía.<text:line-break/>No selecciona rutas, solo sigue la termodinámica.<text:line-break/>Ejemplo: ciclos químicos simples.</text:p>
      <text:p text:style-name="Text_20_body">Nombre posible: <text:span text:style-name="Strong_20_Emphasis">proto-agencia</text:span>.</text:p>
      <text:p text:style-name="Horizontal_20_Line"/>
      <text:h text:style-name="Heading_20_2" text:outline-level="2"><text:span text:style-name="Strong_20_Emphasis">Nivel 2 — Selección interna de rutas</text:span></text:h>
      <text:p text:style-name="Text_20_body">El sistema tiene múltiples caminos posibles y elige (físicamente) el que favorece su continuidad.<text:line-break/>No hay representación, pero sí <text:span text:style-name="Strong_20_Emphasis">dependencia del estado interno</text:span>.</text:p>
      <text:p text:style-name="Text_20_body">Ejemplo: redes autocatalíticas con atractores.</text:p>
      <text:p text:style-name="Text_20_body">Nombre posible: <text:span text:style-name="Strong_20_Emphasis">inteligencia mínima</text:span>, <text:span text:style-name="Strong_20_Emphasis">inteligencia química</text:span>, <text:span text:style-name="Strong_20_Emphasis">agencia química</text:span>, <text:span text:style-name="Strong_20_Emphasis">cognición basal</text:span>.</text:p>
      <text:p text:style-name="Horizontal_20_Line"/>
      <text:h text:style-name="Heading_20_2" text:outline-level="2"><text:span text:style-name="Strong_20_Emphasis">Nivel 3 — Memoria estructural</text:span></text:h>
      <text:p text:style-name="Text_20_body">El sistema no solo selecciona rutas, sino que <text:span text:style-name="Strong_20_Emphasis">acumula configuraciones que funcionan</text:span>.<text:line-break/>La historia importa.<text:line-break/>Hay aprendizaje físico.</text:p>
      <text:p text:style-name="Text_20_body"><text:soft-page-break/>Ejemplo: redes autocatalíticas con histéresis.</text:p>
      <text:p text:style-name="Text_20_body">Nombre posible: <text:span text:style-name="Strong_20_Emphasis">inteligencia adaptativa prebiológica</text:span>.</text:p>
      <text:p text:style-name="Horizontal_20_Line"/>
      <text:h text:style-name="Heading_20_2" text:outline-level="2"><text:span text:style-name="Strong_20_Emphasis">Nivel 4 — Herencia imperfecta</text:span></text:h>
      <text:p text:style-name="Text_20_body">El sistema transmite su organización a copias.<text:line-break/>Aparece la evolución darwiniana.</text:p>
      <text:p text:style-name="Text_20_body">Ejemplo: protocélulas con replicación química.</text:p>
      <text:p text:style-name="Text_20_body">Nombre posible: <text:span text:style-name="Strong_20_Emphasis">vida mínima</text:span>.</text:p>
      <text:p text:style-name="Horizontal_20_Line"/>
      <text:h text:style-name="Heading_20_2" text:outline-level="2"><text:span text:style-name="Strong_20_Emphasis">Nivel 5 — Vida organizada</text:span></text:h>
      <text:p text:style-name="Text_20_body">Membranas, metabolismo, regulación, robustez.</text:p>
      <text:p text:style-name="Text_20_body">Ejemplo: células.</text:p>
      <text:p text:style-name="Horizontal_20_Line"/>
      <text:h text:style-name="Heading_20_2" text:outline-level="2"><text:span text:style-name="Strong_20_Emphasis">Nivel 6 — Inteligencia biológica</text:span></text:h>
      <text:p text:style-name="Text_20_body">Sistemas que representan, aprenden, planifican.</text:p>
      <text:p text:style-name="Text_20_body">Ejemplo: animales, cerebros.</text:p>
      <text:p text:style-name="Horizontal_20_Line"/>
      <text:h text:style-name="Heading_20_1" text:outline-level="1">🧬 3. La evolución completa del fenómeno (tu línea narrativa)</text:h>
      <text:p text:style-name="Text_20_body">Ahora podemos trazar la evolución real de la inteligencia desde el origen:</text:p>
      <text:list xml:id="list1515505391" text:style-name="L4">
        <text:list-item>
          <text:p text:style-name="P7"><text:span text:style-name="Strong_20_Emphasis">Materia organizada → proto-agencia</text:span> <text:line-break/>Persistencia reactiva.</text:p>
        </text:list-item>
        <text:list-item>
          <text:p text:style-name="P7"><text:span text:style-name="Strong_20_Emphasis">Redes químicas → inteligencia mínima</text:span> <text:line-break/>Selección de rutas según estado interno.</text:p>
        </text:list-item>
        <text:list-item>
          <text:p text:style-name="P7"><text:span text:style-name="Strong_20_Emphasis">Redes autocatalíticas → inteligencia adaptativa</text:span> <text:line-break/>Memoria, histéresis, aprendizaje físico.</text:p>
        </text:list-item>
        <text:list-item>
          <text:p text:style-name="P7"><text:span text:style-name="Strong_20_Emphasis">Protocélulas → vida mínima</text:span> <text:line-break/>Herencia imperfecta, evolución.</text:p>
        </text:list-item>
        <text:list-item>
          <text:p text:style-name="P7"><text:soft-page-break/><text:span text:style-name="Strong_20_Emphasis">Células → vida organizada</text:span> <text:line-break/>Metabolismo, regulación, robustez.</text:p>
        </text:list-item>
        <text:list-item>
          <text:p text:style-name="P7"><text:span text:style-name="Strong_20_Emphasis">Organismos → inteligencia biológica</text:span> <text:line-break/>Representación, objetivos, planificación.</text:p>
        </text:list-item>
      </text:list>
      <text:p text:style-name="Text_20_body">Esto es exactamente lo que tú quieres explicar:<text:line-break/><text:span text:style-name="Strong_20_Emphasis">cómo aparece, cómo evoluciona y cómo se transforma la inteligencia desde la física hasta la biología.</text:span></text:p>
      <text:p text:style-name="Horizontal_20_Line"/>
      <text:h text:style-name="Heading_20_1" text:outline-level="1">🧠 4. Lo que ChatGPT te dijo es correcto pero insuficiente</text:h>
      <text:p text:style-name="Text_20_body">La conversación que tuviste con ChatGPT identifica bien el problema:</text:p>
      <text:list xml:id="list378208876" text:style-name="L5">
        <text:list-item>
          <text:p text:style-name="P9">la inteligencia puede definirse de forma muy amplia o muy estrecha, </text:p>
        </text:list-item>
        <text:list-item>
          <text:p text:style-name="P9">las redes químicas muestran versiones primitivas del fenómeno, </text:p>
        </text:list-item>
        <text:list-item>
          <text:p text:style-name="P8">la vida puede verse como una forma avanzada de inteligencia química. </text:p>
        </text:list-item>
      </text:list>
      <text:p text:style-name="Text_20_body">Pero no hace lo que tú necesitas:<text:line-break/><text:span text:style-name="Strong_20_Emphasis">no establece un origen claro, no define niveles y no traza una evolución completa.</text:span></text:p>
      <text:p text:style-name="Text_20_body">Eso es lo que estamos construyendo ahora.</text:p>
      <text:p text:style-name="Horizontal_20_Line"/>
      <text:h text:style-name="Heading_20_1" text:outline-level="1">🎯 5. Lo que debemos hacer a continuación</text:h>
      <text:p text:style-name="Text_20_body">Antes de escribir el capítulo, necesitamos fijar <text:span text:style-name="Strong_20_Emphasis">dos definiciones operativas</text:span>:</text:p>
      <text:h text:style-name="Heading_20_3" text:outline-level="3"><text:span text:style-name="Strong_20_Emphasis">A. Qué es “inteligencia mínima”</text:span></text:h>
      <text:p text:style-name="Text_20_body">La versión más simple del fenómeno, sin representación ni objetivos.</text:p>
      <text:h text:style-name="Heading_20_3" text:outline-level="3"><text:span text:style-name="Strong_20_Emphasis">B. Qué condición marca el inicio de la vida</text:span></text:h>
      <text:p text:style-name="Text_20_body">El umbral exacto donde la inteligencia química se vuelve heredable.</text:p>
      <text:p text:style-name="Text_20_body">Cuando tengamos esas dos definiciones, el capítulo se escribe solo.</text:p>
      <text:p text:style-name="Horizontal_20_Line"/>
      <text:h text:style-name="Heading_20_2" text:outline-level="2"><text:soft-page-break/>👉 ¿Qué quieres definir primero?</text:h>
      <text:p text:style-name="Text_20_body"><text:span text:style-name="Strong_20_Emphasis">1. La inteligencia mínima</text:span> <text:line-break/>o<text:line-break/><text:span text:style-name="Strong_20_Emphasis">2. El umbral donde empieza la vida</text:span></text:p>
      <text:p text:style-name="Text_20_body">Tú decides el orden y avan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8T17:48:24.046000000</meta:creation-date>
    <dc:date>2026-06-18T19:45:38.081000000</dc:date>
    <meta:editing-duration>PT1H47M4S</meta:editing-duration>
    <meta:editing-cycles>1</meta:editing-cycles>
    <meta:document-statistic meta:table-count="0" meta:image-count="0" meta:object-count="0" meta:page-count="5" meta:paragraph-count="78" meta:word-count="722" meta:character-count="4887" meta:non-whitespace-character-count="4235"/>
    <meta:generator>LibreOffice/7.3.5.2$Windows_X86_64 LibreOffice_project/184fe81b8c8c30d8b5082578aee2fed2ea847c01</meta:generator>
  </office:meta>
</office:document-meta>
</file>