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apítulo 1 — El origen de la inteligencia (estructura propuesta)</text:span></text:h>
      <text:h text:style-name="Heading_20_3" text:outline-level="3"><text:span text:style-name="Strong_20_Emphasis">1. El problema inicial: ¿qué es la inteligencia?</text:span></text:h>
      <text:p text:style-name="Text_20_body">Una definición operativa, universal, no antropocéntrica. Aquí introduces tu idea clave:</text:p>
      <text:p text:style-name="Quotations">La inteligencia es la capacidad de conservarse frente a la entropía mediante acciones que estabilizan un patrón.</text:p>
      <text:h text:style-name="Heading_20_3" text:outline-level="3"><text:span text:style-name="Strong_20_Emphasis">2. La inteligencia sin vida: la inteligencia química</text:span></text:h>
      <text:p text:style-name="Text_20_body">Cómo ciertos procesos químicos ya muestran:</text:p>
      <text:list xml:id="list550057600" text:style-name="L1">
        <text:list-item>
          <text:p text:style-name="P1">selección,</text:p>
        </text:list-item>
        <text:list-item>
          <text:p text:style-name="P1">retroalimentación,</text:p>
        </text:list-item>
        <text:list-item>
          <text:p text:style-name="P1">corrección,</text:p>
        </text:list-item>
        <text:list-item>
          <text:p text:style-name="P1">persistencia.</text:p>
        </text:list-item>
      </text:list>
      <text:p text:style-name="Text_20_body">Aquí estableces que <text:span text:style-name="Strong_20_Emphasis">la inteligencia no empieza con la vida</text:span>, sino antes.</text:p>
      <text:h text:style-name="Heading_20_3" text:outline-level="3"><text:span text:style-name="Strong_20_Emphasis">3. La emergencia de la inteligencia como proceso natural</text:span></text:h>
      <text:p text:style-name="Text_20_body">No es milagro, no es azar puro, no es diseño. Es una consecuencia de:</text:p>
      <text:list xml:id="list3921515272" text:style-name="L2">
        <text:list-item>
          <text:p text:style-name="P2">la termodinámica,</text:p>
        </text:list-item>
        <text:list-item>
          <text:p text:style-name="P2">la autoorganización,</text:p>
        </text:list-item>
        <text:list-item>
          <text:p text:style-name="P2">la estabilidad de ciclos.</text:p>
        </text:list-item>
      </text:list>
      <text:h text:style-name="Heading_20_3" text:outline-level="3"><text:span text:style-name="Strong_20_Emphasis">4. La intuición humana del “creador inteligente”</text:span></text:h>
      <text:p text:style-name="Text_20_body">Aquí conectas con los mitos: la intuición de que “algo inteligente” precede a la vida no es errónea, solo mal interpretada.</text:p>
      <text:h text:style-name="Heading_20_3" text:outline-level="3"><text:span text:style-name="Strong_20_Emphasis">5. La inversión conceptual</text:span></text:h>
      <text:p text:style-name="Quotations">La inteligencia no es producto de la vida. La vida es producto de la inteligencia.</text:p>
      <text:p text:style-name="Text_20_body">Este es el golpe conceptual que prepara el Capítulo 2.</text:p>
      <text:h text:style-name="Heading_20_3" text:outline-level="3"><text:span text:style-name="Strong_20_Emphasis">6. Transición hacia el origen de la vida</text:span></text:h>
      <text:p text:style-name="Text_20_body">Cómo esa inteligencia primitiva encuentra una forma estable: la vid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5T19:30:25.631000000</meta:creation-date>
    <dc:date>2026-06-15T19:32:39.355000000</dc:date>
    <meta:editing-duration>PT2M14S</meta:editing-duration>
    <meta:editing-cycles>1</meta:editing-cycles>
    <meta:document-statistic meta:table-count="0" meta:image-count="0" meta:object-count="0" meta:page-count="1" meta:paragraph-count="23" meta:word-count="188" meta:character-count="1165" meta:non-whitespace-character-count="1006"/>
    <meta:generator>LibreOffice/7.3.5.2$Windows_X86_64 LibreOffice_project/184fe81b8c8c30d8b5082578aee2fed2ea847c01</meta:generator>
  </office:meta>
</office:document-meta>
</file>