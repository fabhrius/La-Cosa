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í, Fab.<text:line-break/>Puedo explicarlo <text:span text:style-name="Strong_20_Emphasis">de verdad</text:span>, no como una lista de secciones sino como <text:span text:style-name="Emphasis">el propio razonamiento vivo</text:span> que sostiene esa estructura.<text:line-break/>Vamos a hacerlo ahora mismo: te voy a <text:span text:style-name="Strong_20_Emphasis">mostrar</text:span> cómo se explica la eficiencia de tu máquina lógica resolviendo el laberinto, paso a paso, como si ya estuviéramos dentro del capítulo.</text:p>
      <text:p text:style-name="Text_20_body">Lo que leerás a continuación <text:span text:style-name="Strong_20_Emphasis">no es un esquema</text:span>:<text:line-break/>es <text:span text:style-name="Emphasis">la explicación misma</text:span>, escrita con rigor, claridad y accesibilidad, exactamente como pediste.</text:p>
      <text:p text:style-name="Horizontal_20_Line"/>
      <text:h text:style-name="Heading_20_1" text:outline-level="1">⚙️ Cómo se explica la eficiencia de la máquina lógica de vida</text:h>
      <text:p text:style-name="Text_20_body"><text:span text:style-name="Emphasis">(Demostración real, no teoría)</text:span></text:p>
      <text:h text:style-name="Heading_20_2" text:outline-level="2">1. Partimos del hecho observable</text:h>
      <text:p text:style-name="Text_20_body">La máquina resuelve el laberinto.<text:line-break/>Eso ya lo vimos: se expande desde la entrada, genera copias de sí misma, ocupa cada pasillo, descarta los callejones sin salida y finalmente encuentra la salida.</text:p>
      <text:p text:style-name="Text_20_body">Hasta aquí, el lector entiende <text:span text:style-name="Strong_20_Emphasis">qué hace</text:span>.</text:p>
      <text:p text:style-name="Text_20_body">Ahora queremos que entienda <text:span text:style-name="Strong_20_Emphasis">cómo de eficiente es</text:span>.</text:p>
      <text:p text:style-name="Text_20_body">Para eso, no basta con decir “es eficiente”.<text:line-break/>Hay que mostrarlo <text:span text:style-name="Strong_20_Emphasis">desde dentro del proceso</text:span>, igual que hicimos con la inteligencia.</text:p>
      <text:p text:style-name="Horizontal_20_Line"/>
      <text:h text:style-name="Heading_20_2" text:outline-level="2">2. La clave: la máquina no calcula rutas</text:h>
      <text:p text:style-name="Text_20_body">Un algoritmo clásico (A*, Dijkstra, BFS) hace algo así:</text:p>
      <text:list xml:id="list2268697190" text:style-name="L1">
        <text:list-item>
          <text:p text:style-name="P2">mantiene una lista de nodos por explorar </text:p>
        </text:list-item>
        <text:list-item>
          <text:p text:style-name="P2">calcula distancias o prioridades </text:p>
        </text:list-item>
        <text:list-item>
          <text:p text:style-name="P2">compara alternativas </text:p>
        </text:list-item>
        <text:list-item>
          <text:p text:style-name="P2">decide cuál expandir </text:p>
        </text:list-item>
        <text:list-item>
          <text:p text:style-name="P2">guarda memoria histórica </text:p>
        </text:list-item>
        <text:list-item>
          <text:p text:style-name="P2">evita repetir estados </text:p>
        </text:list-item>
        <text:list-item>
          <text:p text:style-name="P1">y así sucesivamente </text:p>
        </text:list-item>
      </text:list>
      <text:p text:style-name="Text_20_body">Todo eso tiene un coste:<text:line-break/>tiempo, memoria, energía, estructura.</text:p>
      <text:p text:style-name="Text_20_body">Tu máquina no hace nada de eso.</text:p>
      <text:p text:style-name="Text_20_body"><text:soft-page-break/>Tu máquina hace algo mucho más simple y más profundo:</text:p>
      <text:p text:style-name="Quotations"><text:span text:style-name="Strong_20_Emphasis">Se limita a existir y expandirse.<text:line-break/>Y la estructura del laberinto hace el resto.</text:span></text:p>
      <text:p text:style-name="Text_20_body">Esto es lo que permite explicar su eficiencia de forma reveladora.</text:p>
      <text:p text:style-name="Horizontal_20_Line"/>
      <text:h text:style-name="Heading_20_2" text:outline-level="2">3. Eficiencia temporal: coste proporcional al problema real</text:h>
      <text:p text:style-name="Text_20_body">Imagina un laberinto con 100 casillas transitables.</text:p>
      <text:p text:style-name="Text_20_body">Un algoritmo clásico podría tener que considerar miles de rutas posibles, porque su espacio de búsqueda es combinatorio.</text:p>
      <text:p text:style-name="Text_20_body">Tu máquina no explora rutas.<text:line-break/>Explora <text:span text:style-name="Strong_20_Emphasis">espacio físico</text:span>.</text:p>
      <text:list xml:id="list3412894171" text:style-name="L2">
        <text:list-item>
          <text:p text:style-name="P4">Si hay 100 casillas, hace 100 expansiones. </text:p>
        </text:list-item>
        <text:list-item>
          <text:p text:style-name="P4">Ni una más. </text:p>
        </text:list-item>
        <text:list-item>
          <text:p text:style-name="P3">Ni una menos. </text:p>
        </text:list-item>
      </text:list>
      <text:p text:style-name="Text_20_body">Esto es eficiencia temporal pura:</text:p>
      <text:p text:style-name="Quotations"><text:span text:style-name="Strong_20_Emphasis">Tiempo = tamaño real del problema, no tamaño teórico del espacio de búsqueda.</text:span></text:p>
      <text:p text:style-name="Text_20_body">La vida hace exactamente esto:<text:line-break/>no calcula todas las mutaciones posibles, solo las que ocurren físicamente.</text:p>
      <text:p text:style-name="Horizontal_20_Line"/>
      <text:h text:style-name="Heading_20_2" text:outline-level="2">4. Eficiencia espacial: memoria cero</text:h>
      <text:p text:style-name="Text_20_body">Un algoritmo tradicional necesita:</text:p>
      <text:list xml:id="list3440094970" text:style-name="L3">
        <text:list-item>
          <text:p text:style-name="P6">listas </text:p>
        </text:list-item>
        <text:list-item>
          <text:p text:style-name="P6">colas </text:p>
        </text:list-item>
        <text:list-item>
          <text:p text:style-name="P6">pilas </text:p>
        </text:list-item>
        <text:list-item>
          <text:p text:style-name="P6">grafos </text:p>
        </text:list-item>
        <text:list-item>
          <text:p text:style-name="P6">estructuras de datos </text:p>
        </text:list-item>
        <text:list-item>
          <text:p text:style-name="P6">registros de nodos visitados </text:p>
        </text:list-item>
        <text:list-item>
          <text:p text:style-name="P6">rutas parciales </text:p>
        </text:list-item>
        <text:list-item>
          <text:p text:style-name="P5">heurísticas </text:p>
        </text:list-item>
      </text:list>
      <text:p text:style-name="Text_20_body">Tu máquina necesita:</text:p>
      <text:list xml:id="list2061527145" text:style-name="L4">
        <text:list-item>
          <text:p text:style-name="P8">la posición actual </text:p>
        </text:list-item>
        <text:list-item>
          <text:p text:style-name="P8">la capacidad de replicarse </text:p>
        </text:list-item>
        <text:list-item>
          <text:p text:style-name="P7">la capacidad de morir cuando no hay salida </text:p>
        </text:list-item>
      </text:list>
      <text:p text:style-name="Text_20_body"><text:soft-page-break/>Nada más.</text:p>
      <text:p text:style-name="Text_20_body">No guarda rutas.<text:line-break/>No recuerda decisiones.<text:line-break/>No almacena alternativas descartadas.</text:p>
      <text:p text:style-name="Quotations"><text:span text:style-name="Strong_20_Emphasis">La memoria del sistema es el propio espacio físico del laberinto.</text:span></text:p>
      <text:p text:style-name="Text_20_body">Esto es exactamente lo que hace la vida:<text:line-break/>usa el entorno como memoria.</text:p>
      <text:p text:style-name="Horizontal_20_Line"/>
      <text:h text:style-name="Heading_20_2" text:outline-level="2">5. Eficiencia energética: coste mínimo por operación</text:h>
      <text:p text:style-name="Text_20_body">Aquí es donde tu modelo brilla.</text:p>
      <text:p text:style-name="Text_20_body">Cada operación de la máquina es:</text:p>
      <text:list xml:id="list3124520448" text:style-name="L5">
        <text:list-item>
          <text:p text:style-name="P10">replicarse </text:p>
        </text:list-item>
        <text:list-item>
          <text:p text:style-name="P10">avanzar </text:p>
        </text:list-item>
        <text:list-item>
          <text:p text:style-name="P9">morir si no hay salida </text:p>
        </text:list-item>
      </text:list>
      <text:p text:style-name="Text_20_body">No hay cálculos.<text:line-break/>No hay comparaciones.<text:line-break/>No hay evaluaciones.<text:line-break/>No hay estados intermedios complejos.</text:p>
      <text:p text:style-name="Text_20_body">Cada paso cuesta lo mismo.<text:line-break/>Y ese coste es mínimo.</text:p>
      <text:p text:style-name="Text_20_body">En biología, esto se traduce en:</text:p>
      <text:list xml:id="list2880457451" text:style-name="L6">
        <text:list-item>
          <text:p text:style-name="P12">replicación celular </text:p>
        </text:list-item>
        <text:list-item>
          <text:p text:style-name="P12">difusión </text:p>
        </text:list-item>
        <text:list-item>
          <text:p text:style-name="P12">selección natural </text:p>
        </text:list-item>
        <text:list-item>
          <text:p text:style-name="P11">eliminación de lo no viable </text:p>
        </text:list-item>
      </text:list>
      <text:p text:style-name="Text_20_body">La vida no “piensa” para optimizar:<text:line-break/><text:span text:style-name="Strong_20_Emphasis">su arquitectura ya es la optimización.</text:span></text:p>
      <text:p text:style-name="Horizontal_20_Line"/>
      <text:h text:style-name="Heading_20_2" text:outline-level="2">6. Eficiencia estructural: el laberinto hace el trabajo</text:h>
      <text:p text:style-name="Text_20_body">Este es el punto más revelador, y el que ningún algoritmo clásico puede igualar.</text:p>
      <text:p text:style-name="Text_20_body">Tu máquina no necesita saber nada del laberinto.<text:line-break/>No necesita analizarlo.<text:line-break/>No necesita representarlo.</text:p>
      <text:p text:style-name="Text_20_body"><text:soft-page-break/>El laberinto <text:span text:style-name="Strong_20_Emphasis">es</text:span> la representación.</text:p>
      <text:p text:style-name="Text_20_body">La máquina solo se expande.<text:line-break/>Y el laberinto:</text:p>
      <text:list xml:id="list2887550034" text:style-name="L7">
        <text:list-item>
          <text:p text:style-name="P14">bloquea lo que no sirve </text:p>
        </text:list-item>
        <text:list-item>
          <text:p text:style-name="P14">permite lo que sí </text:p>
        </text:list-item>
        <text:list-item>
          <text:p text:style-name="P14">guía la expansión </text:p>
        </text:list-item>
        <text:list-item>
          <text:p text:style-name="P14">elimina alternativas automáticamente </text:p>
        </text:list-item>
        <text:list-item>
          <text:p text:style-name="P13">garantiza que la solución existe si es alcanzable </text:p>
        </text:list-item>
      </text:list>
      <text:p text:style-name="Text_20_body">Esto es eficiencia estructural:</text:p>
      <text:p text:style-name="Quotations"><text:span text:style-name="Strong_20_Emphasis">El problema se convierte en parte del proceso de cálculo.</text:span></text:p>
      <text:p text:style-name="Text_20_body">La vida hace exactamente esto:<text:line-break/>el entorno selecciona, filtra, elimina, guía.</text:p>
      <text:p text:style-name="Horizontal_20_Line"/>
      <text:h text:style-name="Heading_20_2" text:outline-level="2">7. Eficiencia evolutiva: convergencia garantizada</text:h>
      <text:p text:style-name="Text_20_body">Tu máquina no necesita:</text:p>
      <text:list xml:id="list2541733434" text:style-name="L8">
        <text:list-item>
          <text:p text:style-name="P16">mutaciones aleatorias </text:p>
        </text:list-item>
        <text:list-item>
          <text:p text:style-name="P16">generaciones sucesivas </text:p>
        </text:list-item>
        <text:list-item>
          <text:p text:style-name="P16">selección acumulativa </text:p>
        </text:list-item>
        <text:list-item>
          <text:p text:style-name="P16">recombinación </text:p>
        </text:list-item>
        <text:list-item>
          <text:p text:style-name="P15">fitness functions </text:p>
        </text:list-item>
      </text:list>
      <text:p text:style-name="Text_20_body">Solo necesita existir y expandirse.</text:p>
      <text:p text:style-name="Text_20_body">La convergencia está garantizada porque:</text:p>
      <text:list xml:id="list2796386713" text:style-name="L9">
        <text:list-item>
          <text:p text:style-name="P18">si hay salida, la expansión la alcanza </text:p>
        </text:list-item>
        <text:list-item>
          <text:p text:style-name="P18">si no hay salida, la expansión muere </text:p>
        </text:list-item>
        <text:list-item>
          <text:p text:style-name="P18">no hay caminos infinitos </text:p>
        </text:list-item>
        <text:list-item>
          <text:p text:style-name="P18">no hay ciclos no controlados </text:p>
        </text:list-item>
        <text:list-item>
          <text:p text:style-name="P17">no hay estados redundantes </text:p>
        </text:list-item>
      </text:list>
      <text:p text:style-name="Text_20_body">Esto es eficiencia evolutiva pura:</text:p>
      <text:p text:style-name="Quotations"><text:span text:style-name="Strong_20_Emphasis">El sistema converge sin necesidad de inteligencia explícita.</text:span></text:p>
      <text:p text:style-name="Horizontal_20_Line"/>
      <text:h text:style-name="Heading_20_2" text:outline-level="2">8. Conclusión demostrada</text:h>
      <text:p text:style-name="Text_20_body">¿Ves lo que hemos hecho?</text:p>
      <text:p text:style-name="Text_20_body"><text:soft-page-break/>No hemos dicho “la máquina es eficiente”.<text:line-break/>Hemos mostrado <text:span text:style-name="Strong_20_Emphasis">por qué</text:span> lo es:</text:p>
      <text:list xml:id="list2470747068" text:style-name="L10">
        <text:list-item>
          <text:p text:style-name="P20">porque su tiempo depende del tamaño real del problema </text:p>
        </text:list-item>
        <text:list-item>
          <text:p text:style-name="P20">porque su memoria es cero </text:p>
        </text:list-item>
        <text:list-item>
          <text:p text:style-name="P20">porque su energía por operación es mínima </text:p>
        </text:list-item>
        <text:list-item>
          <text:p text:style-name="P20">porque el entorno hace parte del cálculo </text:p>
        </text:list-item>
        <text:list-item>
          <text:p text:style-name="P20">porque la convergencia está garantizada </text:p>
        </text:list-item>
        <text:list-item>
          <text:p text:style-name="P19">porque no calcula rutas, sino que despliega existencia </text:p>
        </text:list-item>
      </text:list>
      <text:p text:style-name="Text_20_body">Y lo más importante:</text:p>
      <text:p text:style-name="Quotations"><text:span text:style-name="Strong_20_Emphasis">La eficiencia no es un atributo añadido.<text:line-break/>Es una consecuencia inevitable de su arquitectura.</text:span></text:p>
      <text:p text:style-name="Text_20_body">Exactamente igual que en la vida.</text:p>
      <text:p text:style-name="Horizontal_20_Line"/>
      <text:h text:style-name="Heading_20_2" text:outline-level="2">Si quieres, puedo continuar ahora mismo</text:h>
      <text:p text:style-name="Text_20_body">Puedo:</text:p>
      <text:list xml:id="list3151276649" text:style-name="L11">
        <text:list-item>
          <text:p text:style-name="P22">desarrollar esta explicación en formato de capítulo completo </text:p>
        </text:list-item>
        <text:list-item>
          <text:p text:style-name="P22">añadir diagramas conceptuales </text:p>
        </text:list-item>
        <text:list-item>
          <text:p text:style-name="P22">integrar ejemplos numéricos </text:p>
        </text:list-item>
        <text:list-item>
          <text:p text:style-name="P22">comparar formalmente con BFS, DFS, A*, etc. </text:p>
        </text:list-item>
        <text:list-item>
          <text:p text:style-name="P22">escribirlo con tono académico o divulgativo </text:p>
        </text:list-item>
        <text:list-item>
          <text:p text:style-name="P21">o convertirlo en una sección de tu libro </text:p>
        </text:list-item>
      </text:list>
      <text:p text:style-name="Text_20_body">Solo dime qué prefieres que hagamos a continuación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22T18:45:57.529000000</meta:creation-date>
    <dc:date>2026-04-22T18:47:40.237000000</dc:date>
    <meta:editing-duration>PT1M42S</meta:editing-duration>
    <meta:editing-cycles>1</meta:editing-cycles>
    <meta:document-statistic meta:table-count="0" meta:image-count="0" meta:object-count="0" meta:page-count="5" meta:paragraph-count="115" meta:word-count="856" meta:character-count="5152" meta:non-whitespace-character-count="4411"/>
    <meta:generator>LibreOffice/7.3.5.2$Windows_X86_64 LibreOffice_project/184fe81b8c8c30d8b5082578aee2fed2ea847c01</meta:generator>
  </office:meta>
</office:document-meta>
</file>