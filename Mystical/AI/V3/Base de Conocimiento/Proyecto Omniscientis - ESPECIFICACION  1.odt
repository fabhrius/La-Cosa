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c9211e" loext:opacity="100%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vamos a dividir el proyecto Omniscientis en tres subproyectos.</text:p>
      <text:p text:style-name="P1">1- el libro. que contiene la teoria en forma de laboratorios cientificos. y contiene la aventura de Elara en busca del conocimiento en un viaje a traves de Lluviara. (este es el proyecto original)</text:p>
      <text:p text:style-name="P1">2- los arcos narrativos en forma de vinetas que estamos publicando en Facebook con fines publicitarios.</text:p>
      <text:p text:style-name="P1">3- una serie de cuentos cortos dentro del universo de Omniscientis que publicaremos en Ko-fi y que nos serviran para validar <text:s/>la estrategia comercial y posiblemente conseguir las primeras ventas antes del lanzamiento del libro.</text:p>
      <text:p text:style-name="P1"/>
      <text:p text:style-name="P1">----------------</text:p>
      <text:p text:style-name="P1"/>
      <text:p text:style-name="P1">los tres subproyectos se desarrollaran simultaneamente.</text:p>
      <text:p text:style-name="P1">el libro no estara terminado este ano, mientras tanto los arcos narrativos daran a conocer el producto, y los cuentos cortos nos ayudaran a crear y probar la estrategia, incluyendo la plataforma de ventas, el marketing, y el producto mismo.</text:p>
      <text:p text:style-name="Standard"/>
      <text:p text:style-name="Standard"/>
      <text:p text:style-name="Standard">----------------</text:p>
      <text:p text:style-name="Standard"/>
      <text:p text:style-name="Horizontal_20_Line"/>
      <text:p text:style-name="Standard"/>
      <text:p text:style-name="Text_20_body">Me parece una división muy sólida porque cada subproyecto cumple una función diferente dentro de una misma estrategia.</text:p>
      <text:h text:style-name="Heading_20_2" text:outline-level="2">Subproyecto 1: El libro principal</text:h>
      <text:p text:style-name="Text_20_body"><text:span text:style-name="Strong_20_Emphasis">Omniscientis: El códice perdido de Lluviara</text:span></text:p>
      <text:p text:style-name="Text_20_body">Objetivo:</text:p>
      <text:list xml:id="list3123414773" text:style-name="L1">
        <text:list-item>
          <text:p text:style-name="P2">Desarrollar la teoría completa.</text:p>
        </text:list-item>
        <text:list-item>
          <text:p text:style-name="P2">Construir la aventura principal de Elara.</text:p>
        </text:list-item>
        <text:list-item>
          <text:p text:style-name="P2">Responder las grandes preguntas existenciales.</text:p>
        </text:list-item>
        <text:list-item>
          <text:p text:style-name="P2">Presentar la Máquina Lógica, los laboratorios y el modelo de la vida.</text:p>
        </text:list-item>
      </text:list>
      <text:p text:style-name="Text_20_body">Características:</text:p>
      <text:list xml:id="list1596021314" text:style-name="L2">
        <text:list-item>
          <text:p text:style-name="P3">Proyecto de largo plazo.</text:p>
        </text:list-item>
        <text:list-item>
          <text:p text:style-name="P3">Mayor complejidad.</text:p>
        </text:list-item>
        <text:list-item>
          <text:p text:style-name="P3">Producto principal de la marca.</text:p>
        </text:list-item>
      </text:list>
      <text:p text:style-name="Horizontal_20_Line"/>
      <text:h text:style-name="Heading_20_2" text:outline-level="2">Subproyecto 2: Arcos narrativos para Facebook</text:h>
      <text:p text:style-name="Text_20_body">Objetivo:</text:p>
      <text:list xml:id="list1286960405" text:style-name="L3">
        <text:list-item>
          <text:p text:style-name="P4"><text:soft-page-break/>Descubrir lectores potenciales.</text:p>
        </text:list-item>
        <text:list-item>
          <text:p text:style-name="P4">Crear audiencia.</text:p>
        </text:list-item>
        <text:list-item>
          <text:p text:style-name="P4">Generar interacción y discusión filosófica.</text:p>
        </text:list-item>
        <text:list-item>
          <text:p text:style-name="P4">Introducir personajes, lugares y misterios del universo.</text:p>
        </text:list-item>
      </text:list>
      <text:p text:style-name="Text_20_body">Características:</text:p>
      <text:list xml:id="list3492481715" text:style-name="L4">
        <text:list-item>
          <text:p text:style-name="P5">Historias breves.</text:p>
        </text:list-item>
        <text:list-item>
          <text:p text:style-name="P5">Publicación gratuita.</text:p>
        </text:list-item>
        <text:list-item>
          <text:p text:style-name="P5">Enfocadas en curiosidad y reflexión.</text:p>
        </text:list-item>
        <text:list-item>
          <text:p text:style-name="P5">Funcionan como "puertas de entrada" hacia Omniscientis.</text:p>
        </text:list-item>
      </text:list>
      <text:p text:style-name="Text_20_body">Ejemplos:</text:p>
      <text:list xml:id="list2319996449" text:style-name="L5">
        <text:list-item>
          <text:p text:style-name="P6">El Templo de la Lluvia.</text:p>
        </text:list-item>
        <text:list-item>
          <text:p text:style-name="P6">Los manuscritos prohibidos.</text:p>
        </text:list-item>
        <text:list-item>
          <text:p text:style-name="P6">Las enseñanzas de Fabhrius.</text:p>
        </text:list-item>
        <text:list-item>
          <text:p text:style-name="P6">Historias de Khrom.</text:p>
        </text:list-item>
        <text:list-item>
          <text:p text:style-name="P6">Leyendas de Lluviara.</text:p>
        </text:list-item>
      </text:list>
      <text:p text:style-name="Horizontal_20_Line"/>
      <text:h text:style-name="Heading_20_2" text:outline-level="2">Subproyecto 3: Cuentos cortos de Omniscientis (Ko-fi)</text:h>
      <text:p text:style-name="Text_20_body">Objetivo:</text:p>
      <text:list xml:id="list1611200483" text:style-name="L6">
        <text:list-item>
          <text:p text:style-name="P7">Validar la estrategia comercial.</text:p>
        </text:list-item>
        <text:list-item>
          <text:p text:style-name="P7">Aprender a vender ficción digital.</text:p>
        </text:list-item>
        <text:list-item>
          <text:p text:style-name="P7">Construir una biblioteca de contenido premium.</text:p>
        </text:list-item>
        <text:list-item>
          <text:p text:style-name="P7">Generar los primeros ingresos.</text:p>
        </text:list-item>
        <text:list-item>
          <text:p text:style-name="P7">Experimentar con formatos, precios y suscripciones.</text:p>
        </text:list-item>
      </text:list>
      <text:p text:style-name="Text_20_body">Características:</text:p>
      <text:list xml:id="list3470597598" text:style-name="L7">
        <text:list-item>
          <text:p text:style-name="P8">Relatos autoconclusivos.</text:p>
        </text:list-item>
        <text:list-item>
          <text:p text:style-name="P8">Entre 5.000 y 15.000 palabras aproximadamente.</text:p>
        </text:list-item>
        <text:list-item>
          <text:p text:style-name="P8">Ambientados en Lluviara.</text:p>
        </text:list-item>
        <text:list-item>
          <text:p text:style-name="P8">No necesitan a Elara como protagonista.</text:p>
        </text:list-item>
        <text:list-item>
          <text:p text:style-name="P8">Pueden ocurrir en cualquier época de la historia del mundo.</text:p>
        </text:list-item>
      </text:list>
      <text:p text:style-name="Text_20_body"><text:soft-page-break/>Este punto es especialmente importante porque permite probar el negocio antes de terminar el libro.</text:p>
      <text:p text:style-name="Text_20_body">No estamos validando solamente una historia.</text:p>
      <text:p text:style-name="Text_20_body">Estamos validando:</text:p>
      <text:list xml:id="list1776269961" text:style-name="L8">
        <text:list-item>
          <text:p text:style-name="P9">si la gente está dispuesta a pagar,</text:p>
        </text:list-item>
        <text:list-item>
          <text:p text:style-name="P9">qué tipo de historias prefieren,</text:p>
        </text:list-item>
        <text:list-item>
          <text:p text:style-name="P9">cuánto están dispuestos a gastar,</text:p>
        </text:list-item>
        <text:list-item>
          <text:p text:style-name="P9">qué plataforma funciona mejor,</text:p>
        </text:list-item>
        <text:list-item>
          <text:p text:style-name="P9">qué mensajes de marketing convierten lectores en compradores.</text:p>
        </text:list-item>
      </text:list>
      <text:p text:style-name="Text_20_body">Eso reduce enormemente el riesgo del lanzamiento futuro.</text:p>
      <text:p text:style-name="Horizontal_20_Line"/>
      <text:h text:style-name="Heading_20_2" text:outline-level="2">Una ventaja adicional</text:h>
      <text:p text:style-name="Text_20_body">Los cuentos cortos también pueden convertirse en un laboratorio creativo.</text:p>
      <text:p text:style-name="Text_20_body">Mientras desarrollamos el libro, podemos explorar:</text:p>
      <text:list xml:id="list2935699557" text:style-name="L9">
        <text:list-item>
          <text:p text:style-name="P10">personajes secundarios,</text:p>
        </text:list-item>
        <text:list-item>
          <text:p text:style-name="P10">ciudades de Lluviara,</text:p>
        </text:list-item>
        <text:list-item>
          <text:p text:style-name="P10">religiones,</text:p>
        </text:list-item>
        <text:list-item>
          <text:p text:style-name="P10">leyendas,</text:p>
        </text:list-item>
        <text:list-item>
          <text:p text:style-name="P10">conflictos históricos,</text:p>
        </text:list-item>
        <text:list-item>
          <text:p text:style-name="P10">ideas filosóficas.</text:p>
        </text:list-item>
      </text:list>
      <text:p text:style-name="Text_20_body">Y si alguno de esos elementos genera mucho interés, luego puede incorporarse al proyecto principal.</text:p>
      <text:p text:style-name="Horizontal_20_Line"/>
      <text:h text:style-name="Heading_20_3" text:outline-level="3">Propuesta para los cuentos cortos</text:h>
      <text:p text:style-name="Text_20_body">Yo establecería algunas reglas:</text:p>
      <text:p text:style-name="Text_20_body"><text:span text:style-name="Strong_20_Emphasis">1. Deben ser independientes.</text:span><text:line-break/>Un lector nuevo debe poder disfrutar el relato sin conocer Omniscientis.</text:p>
      <text:p text:style-name="Text_20_body"><text:span text:style-name="Strong_20_Emphasis">2. Deben contener una idea central poderosa.</text:span><text:line-break/>No venderíamos solo fantasía.<text:line-break/>Cada cuento debería girar alrededor de una pregunta o misterio.</text:p>
      <text:p text:style-name="Text_20_body">Por ejemplo:</text:p>
      <text:list xml:id="list212955934" text:style-name="L10">
        <text:list-item>
          <text:p text:style-name="P11">¿Qué es la identidad?</text:p>
        </text:list-item>
        <text:list-item>
          <text:p text:style-name="P11"><text:soft-page-break/>¿Qué es la memoria?</text:p>
        </text:list-item>
        <text:list-item>
          <text:p text:style-name="P11">¿Qué significa vivir?</text:p>
        </text:list-item>
        <text:list-item>
          <text:p text:style-name="P11">¿Qué significa elegir?</text:p>
        </text:list-item>
        <text:list-item>
          <text:p text:style-name="P11">¿Puede existir conocimiento absoluto?</text:p>
        </text:list-item>
        <text:list-item>
          <text:p text:style-name="P11">¿Puede una persona cambiar realmente?</text:p>
        </text:list-item>
      </text:list>
      <text:p text:style-name="Text_20_body"><text:span text:style-name="Strong_20_Emphasis">3. Deben expandir el universo.</text:span><text:line-break/>Cada historia debería revelar algo nuevo sobre Lluviara.</text:p>
      <text:p text:style-name="Text_20_body"><text:span text:style-name="Strong_20_Emphasis">4. Deben terminar con una idea memorable.</text:span><text:line-break/>Algo que haga al lector pensar después de terminarla.</text:p>
      <text:p text:style-name="Horizontal_20_Line"/>
      <text:p text:style-name="Text_20_body">Antes de diseñar el primer cuento, creo que conviene definir una cuestión fundamental:</text:p>
      <text:h text:style-name="Heading_20_3" text:outline-level="3">¿Qué papel tendrán estos relatos dentro del universo?</text:h>
      <text:p text:style-name="Text_20_body">Hay tres posibilidades:</text:p>
      <text:p text:style-name="Text_20_body"><text:span text:style-name="Strong_20_Emphasis">Modelo A: Aventuras puras</text:span><text:line-break/>Historias entretenidas ambientadas en Lluviara.</text:p>
      <text:p text:style-name="Text_20_body"><text:span text:style-name="Strong_20_Emphasis">Modelo B: Fábulas filosóficas</text:span><text:line-break/>Historias construidas alrededor de una pregunta existencial.</text:p>
      <text:p text:style-name="Text_20_body"><text:span text:style-name="Strong_20_Emphasis">Modelo C: Crónicas de Omniscientis</text:span><text:line-break/>Relatos que parecen documentos históricos encontrados dentro del propio universo, como si fueran textos recuperados del Códice Perdido.</text:p>
      <text:p text:style-name="Text_20_body">Mi impresión inicial es que el Modelo B encaja mejor con la identidad que has construido hasta ahora: relatos breves, emocionantes, pero siempre alrededor de una pregunta profunda. Eso los diferenciaría de la fantasía convencional y los conectaría directamente con el corazón de Omniscientis.</text:p>
      <text:p text:style-name="Text_20_body">La siguiente decisión sería definir la colección inicial: entre 5 y 10 cuentos que formen la primera temporada de publicaciones en Ko-fi. Ahí podríamos diseñar un catálogo completo en lugar de empezar con un único relato aislad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3T15:45:04.965000000</meta:creation-date>
    <dc:date>2026-06-23T15:46:58.695000000</dc:date>
    <meta:editing-duration>PT1M54S</meta:editing-duration>
    <meta:editing-cycles>1</meta:editing-cycles>
    <meta:document-statistic meta:table-count="0" meta:image-count="0" meta:object-count="0" meta:page-count="4" meta:paragraph-count="90" meta:word-count="731" meta:character-count="4800" meta:non-whitespace-character-count="4205"/>
    <meta:generator>LibreOffice/7.3.5.2$Windows_X86_64 LibreOffice_project/184fe81b8c8c30d8b5082578aee2fed2ea847c01</meta:generator>
  </office:meta>
</office:document-meta>
</file>