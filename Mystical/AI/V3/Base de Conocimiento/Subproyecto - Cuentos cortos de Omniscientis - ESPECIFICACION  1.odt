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color="#c9211e" loext:opacity="10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Los cuentos cortos pueden ser leidos independientemente.</text:p>
      <text:p text:style-name="P1">incluyen aventura, misterio, y alguna ensenanza filosofica relacionada con la existencia y con base cientifica extraida de las ciencias de la computacion.</text:p>
      <text:p text:style-name="P1">como es caracteristico en Omniscientis.</text:p>
      <text:p text:style-name="P1"/>
      <text:p text:style-name="P1">Estos cuentos cortos pueden o no tener a Elara como protagonista.</text:p>
      <text:p text:style-name="P1">Son cuentos de misterio, en donde sucede algo inesperado, <text:s/>no deseado, que crea una situacion de tension que debe ser corregida, al final la situacion se corrige de algun modo satisfactorio. sin embargo antes de terminar se insinua un cambio que vuelve a despertar inquietud y el cuento termina con final abierto.</text:p>
      <text:p text:style-name="P1">al estilo de las historias de la dimension desconocida.</text:p>
      <text:p text:style-name="P1">el relato no tiene porque estar relacionado con la ensenanza que trasmite.</text:p>
      <text:p text:style-name="P1">las ensenanzas seran ideas simples.</text:p>
      <text:p text:style-name="P1">pueden hablar de conceptos como redundancia, busqueda en profundidad, o incluso una maquina de turing, limite de tiempo, etc.</text:p>
      <text:p text:style-name="P1">cualquier concepto conocido en ciencias de la computacion puede transformarse en una ensenanza existencial.</text:p>
      <text:p text:style-name="P1">todos los cuentos suceden en la antiguedad o en la edad media.</text:p>
      <text:p text:style-name="P1"/>
      <text:p text:style-name="P1">pueden girar en torno a distintos objetos malditos, como por ejemplo una bola de cristal que muestra el futuro, pero cuando el usuario intenta cambiar los hechos se desencadena la desgracia.</text:p>
      <text:p text:style-name="P1"/>
      <text:p text:style-name="P1">tenemos Tambien la biblioteca infinita que puede servir como fondo del relato.</text:p>
      <text:p text:style-name="P1">digamos que al principio del relato Elara coge un libro de una estanteria, lo abre y empieza a leer.</text:p>
      <text:p text:style-name="P1">la camara se traslada a otro lugar adonde sucede el relato.</text:p>
      <text:p text:style-name="P1">al final del cuento la camara vuelve a la biblioteca, Elara cierra el libro y lo vuelve a colocar en la estanteria.</text:p>
      <text:p text:style-name="P1">en cada cuento Elara revisa un libro diferente.</text:p>
      <text:p text:style-name="P1"/>
      <text:p text:style-name="P1">los relatos son misteriosos, inquietantes, con giros inesperados y finales abiertos.</text:p>
      <text:p text:style-name="P1">Cuando Elara deja el libro esta asustada.</text:p>
      <text:p text:style-name="Standard"/>
      <text:p text:style-name="Standard"/>
      <text:p text:style-name="Horizontal_20_Line"/>
      <text:p text:style-name="Standard"/>
      <text:p text:style-name="Standard"/>
      <text:p text:style-name="Text_20_body">Creo que acabas de definir algo mucho más interesante que una simple colección de cuentos.</text:p>
      <text:p text:style-name="Text_20_body">Lo que describes es una estructura narrativa propia para Omniscientis.</text:p>
      <text:h text:style-name="Heading_20_2" text:outline-level="2">Estructura marco</text:h>
      <text:p text:style-name="Text_20_body">La <text:span text:style-name="Strong_20_Emphasis">Biblioteca Infinita</text:span> se convierte en el nexo entre todos los relatos.</text:p>
      <text:p text:style-name="Text_20_body">Cada cuento comienza igual:</text:p>
      <text:list xml:id="list3264048492" text:style-name="L1">
        <text:list-item>
          <text:p text:style-name="P2">Elara explora la Biblioteca Infinita.</text:p>
        </text:list-item>
        <text:list-item>
          <text:p text:style-name="P2"><text:soft-page-break/>Encuentra un libro extraño.</text:p>
        </text:list-item>
        <text:list-item>
          <text:p text:style-name="P2">El título o aspecto del libro despierta su curiosidad.</text:p>
        </text:list-item>
        <text:list-item>
          <text:p text:style-name="P2">Lo abre.</text:p>
        </text:list-item>
      </text:list>
      <text:p text:style-name="Text_20_body">Entonces la narración cambia.</text:p>
      <text:p text:style-name="Text_20_body">La cámara abandona la biblioteca.</text:p>
      <text:p text:style-name="Text_20_body">Entramos en la historia.</text:p>
      <text:p text:style-name="Text_20_body">Al final:</text:p>
      <text:list xml:id="list3578020645" text:style-name="L2">
        <text:list-item>
          <text:p text:style-name="P3">El problema parece resolverse.</text:p>
        </text:list-item>
        <text:list-item>
          <text:p text:style-name="P3">Surge una revelación inquietante.</text:p>
        </text:list-item>
        <text:list-item>
          <text:p text:style-name="P3">La historia termina.</text:p>
        </text:list-item>
      </text:list>
      <text:p text:style-name="Text_20_body">La cámara regresa a la Biblioteca Infinita.</text:p>
      <text:p text:style-name="Text_20_body">Elara cierra lentamente el libro.</text:p>
      <text:p text:style-name="Text_20_body">Y por primera vez comprende algo aterrador.</text:p>
      <text:p text:style-name="Text_20_body">Entonces vuelve a colocar el volumen en la estantería.</text:p>
      <text:p text:style-name="Text_20_body">Pero antes de marcharse observa otro libro.</text:p>
      <text:p text:style-name="Text_20_body">Un libro que parece aún más perturbador.</text:p>
      <text:p text:style-name="Text_20_body">Fin.</text:p>
      <text:p text:style-name="Text_20_body">Esto crea una continuidad entre relatos sin obligar al lector a leerlos en orden.</text:p>
      <text:p text:style-name="Horizontal_20_Line"/>
      <text:h text:style-name="Heading_20_2" text:outline-level="2">La función de Elara</text:h>
      <text:p text:style-name="Text_20_body">Lo interesante es que Elara no es la protagonista.</text:p>
      <text:p text:style-name="Text_20_body">Es la lectora.</text:p>
      <text:p text:style-name="Text_20_body">Y poco a poco va descubriendo que los libros parecen contener algo más que historias.</text:p>
      <text:p text:style-name="Text_20_body">Quizá:</text:p>
      <text:list xml:id="list1421611474" text:style-name="L3">
        <text:list-item>
          <text:p text:style-name="P4">son advertencias,</text:p>
        </text:list-item>
        <text:list-item>
          <text:p text:style-name="P4">son experimentos,</text:p>
        </text:list-item>
        <text:list-item>
          <text:p text:style-name="P4">son recuerdos,</text:p>
        </text:list-item>
        <text:list-item>
          <text:p text:style-name="P4">o describen hechos reales ocurridos en distintos lugares y épocas.</text:p>
        </text:list-item>
      </text:list>
      <text:p text:style-name="Text_20_body">Incluso podríamos insinuar que la Biblioteca Infinita no contiene ficción.</text:p>
      <text:p text:style-name="Text_20_body"><text:soft-page-break/>Contiene posibilidades.</text:p>
      <text:p text:style-name="Text_20_body">Eso encajaría perfectamente con los temas de computación y exploración de estados que aparecen en Omniscientis.</text:p>
      <text:p text:style-name="Horizontal_20_Line"/>
      <text:h text:style-name="Heading_20_2" text:outline-level="2">La estructura de cada cuento</text:h>
      <text:p text:style-name="Text_20_body">Veo una fórmula bastante clara.</text:p>
      <text:h text:style-name="Heading_20_3" text:outline-level="3">1. Objeto misterioso</text:h>
      <text:p text:style-name="Text_20_body">Algo aparentemente maravilloso.</text:p>
      <text:p text:style-name="Text_20_body">Por ejemplo:</text:p>
      <text:list xml:id="list905390534" text:style-name="L4">
        <text:list-item>
          <text:p text:style-name="P5">una bola de cristal,</text:p>
        </text:list-item>
        <text:list-item>
          <text:p text:style-name="P5">un espejo,</text:p>
        </text:list-item>
        <text:list-item>
          <text:p text:style-name="P5">un reloj,</text:p>
        </text:list-item>
        <text:list-item>
          <text:p text:style-name="P5">una llave,</text:p>
        </text:list-item>
        <text:list-item>
          <text:p text:style-name="P5">una brújula,</text:p>
        </text:list-item>
        <text:list-item>
          <text:p text:style-name="P5">una máscara,</text:p>
        </text:list-item>
        <text:list-item>
          <text:p text:style-name="P5">un libro,</text:p>
        </text:list-item>
        <text:list-item>
          <text:p text:style-name="P5">una campana,</text:p>
        </text:list-item>
        <text:list-item>
          <text:p text:style-name="P5">una moneda.</text:p>
        </text:list-item>
      </text:list>
      <text:p text:style-name="Horizontal_20_Line"/>
      <text:h text:style-name="Heading_20_3" text:outline-level="3">2. Promesa</text:h>
      <text:p text:style-name="Text_20_body">El objeto parece ofrecer una ventaja.</text:p>
      <text:p text:style-name="Text_20_body">Ejemplos:</text:p>
      <text:list xml:id="list2922865938" text:style-name="L5">
        <text:list-item>
          <text:p text:style-name="P6">conocer el futuro,</text:p>
        </text:list-item>
        <text:list-item>
          <text:p text:style-name="P6">hablar con los muertos,</text:p>
        </text:list-item>
        <text:list-item>
          <text:p text:style-name="P6">recordar vidas pasadas,</text:p>
        </text:list-item>
        <text:list-item>
          <text:p text:style-name="P6">encontrar cualquier tesoro,</text:p>
        </text:list-item>
        <text:list-item>
          <text:p text:style-name="P6">descubrir mentiras,</text:p>
        </text:list-item>
        <text:list-item>
          <text:p text:style-name="P6">detener el tiempo.</text:p>
        </text:list-item>
      </text:list>
      <text:p text:style-name="Horizontal_20_Line"/>
      <text:h text:style-name="Heading_20_3" text:outline-level="3"><text:soft-page-break/>3. Consecuencia inesperada</text:h>
      <text:p text:style-name="Text_20_body">La ventaja produce un problema.</text:p>
      <text:p text:style-name="Text_20_body">No porque el objeto sea maligno.</text:p>
      <text:p text:style-name="Text_20_body">Sino porque la realidad es más compleja de lo que parece.</text:p>
      <text:p text:style-name="Horizontal_20_Line"/>
      <text:h text:style-name="Heading_20_3" text:outline-level="3">4. Enseñanza filosófica</text:h>
      <text:p text:style-name="Text_20_body">La solución revela una idea relacionada con computación.</text:p>
      <text:p text:style-name="Text_20_body">No explicada académicamente.</text:p>
      <text:p text:style-name="Text_20_body">Transformada en reflexión existencial.</text:p>
      <text:p text:style-name="Text_20_body">Ejemplo:</text:p>
      <text:p text:style-name="Text_20_body"><text:span text:style-name="Strong_20_Emphasis">Redundancia</text:span></text:p>
      <text:p text:style-name="Text_20_body">"No fue la fuerza del reino lo que lo salvó. Fue tener muchas formas de fracasar."</text:p>
      <text:p text:style-name="Horizontal_20_Line"/>
      <text:h text:style-name="Heading_20_3" text:outline-level="3">5. Resolución</text:h>
      <text:p text:style-name="Text_20_body">La amenaza desaparece.</text:p>
      <text:p text:style-name="Horizontal_20_Line"/>
      <text:h text:style-name="Heading_20_3" text:outline-level="3">6. Giro final</text:h>
      <text:p text:style-name="Text_20_body">Algo demuestra que el problema no estaba realmente resuelto.</text:p>
      <text:p text:style-name="Horizontal_20_Line"/>
      <text:h text:style-name="Heading_20_3" text:outline-level="3">7. Regreso a la Biblioteca</text:h>
      <text:p text:style-name="Text_20_body">Elara queda inquieta.</text:p>
      <text:p text:style-name="Horizontal_20_Line"/>
      <text:h text:style-name="Heading_20_2" text:outline-level="2">Lo que más me gusta</text:h>
      <text:p text:style-name="Text_20_body">Las enseñanzas no necesitan estar conectadas directamente con el objeto.</text:p>
      <text:p text:style-name="Text_20_body">Por ejemplo:</text:p>
      <text:h text:style-name="Heading_20_3" text:outline-level="3">La bola de cristal</text:h>
      <text:p text:style-name="Text_20_body">Tema aparente:</text:p>
      <text:list xml:id="list3562618661" text:style-name="L6">
        <text:list-item>
          <text:p text:style-name="P7">conocer el futuro.</text:p>
        </text:list-item>
      </text:list>
      <text:p text:style-name="Text_20_body"><text:soft-page-break/>Tema real:</text:p>
      <text:list xml:id="list3203464579" text:style-name="L7">
        <text:list-item>
          <text:p text:style-name="P8">búsqueda en profundidad.</text:p>
        </text:list-item>
      </text:list>
      <text:p text:style-name="Text_20_body">El protagonista intenta evitar un accidente.</text:p>
      <text:p text:style-name="Text_20_body">Cada decisión genera otro accidente.</text:p>
      <text:p text:style-name="Text_20_body">Explora una rama tras otra.</text:p>
      <text:p text:style-name="Text_20_body">Finalmente descubre que el problema no era el accidente.</text:p>
      <text:p text:style-name="Text_20_body">Era el propio intento de controlar todas las posibilidades.</text:p>
      <text:p text:style-name="Horizontal_20_Line"/>
      <text:h text:style-name="Heading_20_3" text:outline-level="3">El espejo de los mil rostros</text:h>
      <text:p text:style-name="Text_20_body">Tema aparente:</text:p>
      <text:list xml:id="list2421104590" text:style-name="L8">
        <text:list-item>
          <text:p text:style-name="P9">identidad.</text:p>
        </text:list-item>
      </text:list>
      <text:p text:style-name="Text_20_body">Tema oculto:</text:p>
      <text:list xml:id="list2598463306" text:style-name="L9">
        <text:list-item>
          <text:p text:style-name="P10">redundancia.</text:p>
        </text:list-item>
      </text:list>
      <text:p text:style-name="Text_20_body">Cada copia del protagonista intenta resolver el mismo problema.</text:p>
      <text:p text:style-name="Text_20_body">Al final sobreviven varias soluciones distintas.</text:p>
      <text:p text:style-name="Horizontal_20_Line"/>
      <text:h text:style-name="Heading_20_3" text:outline-level="3">El reloj de arena negro</text:h>
      <text:p text:style-name="Text_20_body">Tema aparente:</text:p>
      <text:list xml:id="list4264144348" text:style-name="L10">
        <text:list-item>
          <text:p text:style-name="P11">detener el tiempo.</text:p>
        </text:list-item>
      </text:list>
      <text:p text:style-name="Text_20_body">Tema oculto:</text:p>
      <text:list xml:id="list2780079211" text:style-name="L11">
        <text:list-item>
          <text:p text:style-name="P12">límite temporal de computación.</text:p>
        </text:list-item>
      </text:list>
      <text:p text:style-name="Text_20_body">Algunas preguntas no pueden responderse antes de que el tiempo se agote.</text:p>
      <text:p text:style-name="Horizontal_20_Line"/>
      <text:h text:style-name="Heading_20_3" text:outline-level="3">El libro que nunca terminaba</text:h>
      <text:p text:style-name="Text_20_body">Tema aparente:</text:p>
      <text:list xml:id="list189026736" text:style-name="L12">
        <text:list-item>
          <text:p text:style-name="P13">un libro infinito.</text:p>
        </text:list-item>
      </text:list>
      <text:p text:style-name="Text_20_body">Tema oculto:</text:p>
      <text:list xml:id="list3566201793" text:style-name="L13">
        <text:list-item>
          <text:p text:style-name="P14">Máquina de Turing.</text:p>
        </text:list-item>
      </text:list>
      <text:p text:style-name="Text_20_body">El protagonista busca la última página.</text:p>
      <text:p text:style-name="Text_20_body"><text:soft-page-break/>Nunca la encuentra.</text:p>
      <text:p text:style-name="Text_20_body">Porque el proceso que genera las páginas jamás se detiene.</text:p>
      <text:p text:style-name="Horizontal_20_Line"/>
      <text:h text:style-name="Heading_20_2" text:outline-level="2">Algo especialmente poderoso</text:h>
      <text:p text:style-name="Text_20_body">Podríamos convertir cada relato en una especie de leyenda medieval acerca de un principio computacional.</text:p>
      <text:p text:style-name="Text_20_body">No decir jamás:</text:p>
      <text:p text:style-name="Quotations">"Esto representa una búsqueda en profundidad."</text:p>
      <text:p text:style-name="Text_20_body">Sino contar una historia donde el lector sienta intuitivamente esa idea.</text:p>
      <text:p text:style-name="Text_20_body">Después, al final, una frase breve atribuida a Fabhrius podría condensar la enseñanza.</text:p>
      <text:p text:style-name="Text_20_body">Por ejemplo:</text:p>
      <text:p text:style-name="Quotations">"El hombre teme perder caminos. La naturaleza teme quedarse con uno solo."</text:p>
      <text:p text:style-name="Quotations">—Fabhrius</text:p>
      <text:p text:style-name="Text_20_body">o</text:p>
      <text:p text:style-name="Quotations">"No toda pregunta carece de respuesta. Algunas simplemente tardan más que una vida."</text:p>
      <text:p text:style-name="Quotations">—Fabhrius</text:p>
      <text:p text:style-name="Text_20_body">Eso conectaría todos los cuentos con el universo intelectual de Omniscientis sin romper la atmósfera de misterio.</text:p>
      <text:p text:style-name="Text_20_body">Y además crea una ventaja comercial importante: cada relato puede prometer una experiencia completa de misterio y aventura, mientras que de forma silenciosa va introduciendo al lector en las ideas filosóficas y computacionales que más tarde encontrará desarrolladas en el libro principal.</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3T17:39:16.449000000</meta:creation-date>
    <dc:date>2026-06-23T17:42:06.097000000</dc:date>
    <meta:editing-duration>PT2M50S</meta:editing-duration>
    <meta:editing-cycles>1</meta:editing-cycles>
    <meta:document-statistic meta:table-count="0" meta:image-count="0" meta:object-count="0" meta:page-count="6" meta:paragraph-count="143" meta:word-count="990" meta:character-count="6118" meta:non-whitespace-character-count="5304"/>
    <meta:generator>LibreOffice/7.3.5.2$Windows_X86_64 LibreOffice_project/184fe81b8c8c30d8b5082578aee2fed2ea847c01</meta:generator>
  </office:meta>
</office:document-meta>
</file>