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25c810" style:font-size-asian="10pt" style:font-size-complex="10pt"/>
    </style:style>
    <style:style style:name="P4" style:family="paragraph" style:parent-style-name="Standard">
      <style:text-properties fo:font-size="10pt" officeooo:rsid="0025c810" officeooo:paragraph-rsid="0025c810" style:font-size-asian="10pt" style:font-size-complex="10pt"/>
    </style:style>
    <style:style style:name="P5" style:family="paragraph" style:parent-style-name="Standard">
      <style:text-properties fo:font-size="10pt" officeooo:rsid="0025c810" officeooo:paragraph-rsid="002fb678" style:font-size-asian="10pt" style:font-size-complex="10pt"/>
    </style:style>
    <style:style style:name="P6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7" style:family="paragraph" style:parent-style-name="Standard">
      <style:text-properties fo:font-size="10pt" officeooo:paragraph-rsid="00170b1e" style:font-size-asian="10pt" style:font-size-complex="10pt"/>
    </style:style>
    <style:style style:name="P8" style:family="paragraph" style:parent-style-name="Standard">
      <style:text-properties fo:font-size="10pt" officeooo:rsid="002a00d1" officeooo:paragraph-rsid="002a00d1" style:font-size-asian="10pt" style:font-size-complex="10pt"/>
    </style:style>
    <style:style style:name="P9" style:family="paragraph" style:parent-style-name="Standard">
      <style:text-properties fo:font-size="10pt" officeooo:rsid="002a00d1" officeooo:paragraph-rsid="00306b1e" style:font-size-asian="10pt" style:font-size-complex="10pt"/>
    </style:style>
    <style:style style:name="P10" style:family="paragraph" style:parent-style-name="Standard">
      <style:text-properties fo:font-size="10pt" officeooo:rsid="002a00d1" officeooo:paragraph-rsid="0035e522" style:font-size-asian="10pt" style:font-size-complex="10pt"/>
    </style:style>
    <style:style style:name="P11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12" style:family="paragraph" style:parent-style-name="Standard">
      <style:text-properties fo:font-size="10pt" officeooo:rsid="002aea52" officeooo:paragraph-rsid="002aea52" style:font-size-asian="10pt" style:font-size-complex="10pt"/>
    </style:style>
    <style:style style:name="P13" style:family="paragraph" style:parent-style-name="Standard">
      <style:text-properties fo:font-size="10pt" officeooo:rsid="002cbe64" officeooo:paragraph-rsid="002cbe64" style:font-size-asian="10pt" style:font-size-complex="10pt"/>
    </style:style>
    <style:style style:name="P14" style:family="paragraph" style:parent-style-name="Standard">
      <style:text-properties fo:font-size="10pt" officeooo:paragraph-rsid="001ea081" style:font-size-asian="10pt" style:font-size-complex="10pt"/>
    </style:style>
    <style:style style:name="P15" style:family="paragraph" style:parent-style-name="Standard">
      <style:text-properties fo:font-size="10pt" officeooo:rsid="002e20c0" officeooo:paragraph-rsid="002e20c0" style:font-size-asian="10pt" style:font-size-complex="10pt"/>
    </style:style>
    <style:style style:name="P16" style:family="paragraph" style:parent-style-name="Standard">
      <style:text-properties fo:font-size="10pt" officeooo:rsid="002a31c9" officeooo:paragraph-rsid="002fb678" style:font-size-asian="10pt" style:font-size-complex="10pt"/>
    </style:style>
    <style:style style:name="P17" style:family="paragraph" style:parent-style-name="Standard">
      <style:text-properties fo:font-size="10pt" officeooo:rsid="00306b1e" officeooo:paragraph-rsid="00306b1e" style:font-size-asian="10pt" style:font-size-complex="10pt"/>
    </style:style>
    <style:style style:name="P18" style:family="paragraph" style:parent-style-name="Standard">
      <style:text-properties fo:font-size="10pt" officeooo:paragraph-rsid="003134cc" style:font-size-asian="10pt" style:font-size-complex="10pt"/>
    </style:style>
    <style:style style:name="P19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0" style:family="paragraph" style:parent-style-name="Standard">
      <style:text-properties fo:font-size="10pt" officeooo:paragraph-rsid="003467a5" style:font-size-asian="10pt" style:font-size-complex="10pt"/>
    </style:style>
    <style:style style:name="P21" style:family="paragraph" style:parent-style-name="Standard">
      <style:text-properties fo:font-size="10pt" officeooo:rsid="0035e522" officeooo:paragraph-rsid="0035e522" style:font-size-asian="10pt" style:font-size-complex="10pt"/>
    </style:style>
    <style:style style:name="P22" style:family="paragraph" style:parent-style-name="Standard">
      <style:text-properties fo:font-size="10pt" officeooo:rsid="002e20c0" officeooo:paragraph-rsid="002e20c0" style:font-size-asian="10pt" style:font-size-complex="10pt"/>
    </style:style>
    <style:style style:name="P23" style:family="paragraph" style:parent-style-name="Standard">
      <style:text-properties fo:font-size="10pt" officeooo:rsid="0039041e" officeooo:paragraph-rsid="0039041e" style:font-size-asian="10pt" style:font-size-complex="10pt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officeooo:rsid="002a00d1" officeooo:paragraph-rsid="002a00d1" style:font-size-asian="10pt" style:font-size-complex="10pt"/>
    </style:style>
    <style:style style:name="P26" style:family="paragraph" style:parent-style-name="Standard">
      <style:text-properties fo:font-size="10pt" officeooo:rsid="002a00d1" officeooo:paragraph-rsid="0039beae" style:font-size-asian="10pt" style:font-size-complex="10pt"/>
    </style:style>
    <style:style style:name="P27" style:family="paragraph" style:parent-style-name="Standard">
      <style:text-properties fo:font-size="10pt" officeooo:rsid="0039beae" officeooo:paragraph-rsid="0039beae" style:font-size-asian="10pt" style:font-size-complex="10pt"/>
    </style:style>
    <style:style style:name="P28" style:family="paragraph" style:parent-style-name="Standard">
      <style:text-properties fo:font-size="10pt" officeooo:paragraph-rsid="00170b1e" style:font-size-asian="10pt" style:font-size-complex="10pt"/>
    </style:style>
    <style:style style:name="P29" style:family="paragraph" style:parent-style-name="Standard">
      <style:text-properties fo:font-size="10pt" officeooo:rsid="003ef837" officeooo:paragraph-rsid="003ef837" style:font-size-asian="10pt" style:font-size-complex="10pt"/>
    </style:style>
    <style:style style:name="P30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1" style:family="paragraph" style:parent-style-name="Standard">
      <style:text-properties fo:font-size="10pt" officeooo:rsid="0040f6a8" officeooo:paragraph-rsid="0040f6a8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  <style:style style:name="T18" style:family="text">
      <style:text-properties officeooo:rsid="0025c810"/>
    </style:style>
    <style:style style:name="T19" style:family="text">
      <style:text-properties officeooo:rsid="0027b580"/>
    </style:style>
    <style:style style:name="T20" style:family="text">
      <style:text-properties officeooo:rsid="00299c6e"/>
    </style:style>
    <style:style style:name="T21" style:family="text">
      <style:text-properties officeooo:rsid="002a291f"/>
    </style:style>
    <style:style style:name="T22" style:family="text">
      <style:text-properties officeooo:rsid="002be6f6"/>
    </style:style>
    <style:style style:name="T23" style:family="text">
      <style:text-properties officeooo:rsid="002fb678"/>
    </style:style>
    <style:style style:name="T24" style:family="text">
      <style:text-properties officeooo:rsid="00306b1e"/>
    </style:style>
    <style:style style:name="T25" style:family="text">
      <style:text-properties officeooo:rsid="003134cc"/>
    </style:style>
    <style:style style:name="T26" style:family="text">
      <style:text-properties officeooo:rsid="00328e1c"/>
    </style:style>
    <style:style style:name="T27" style:family="text">
      <style:text-properties officeooo:rsid="003467a5"/>
    </style:style>
    <style:style style:name="T28" style:family="text">
      <style:text-properties officeooo:rsid="0035e522"/>
    </style:style>
    <style:style style:name="T29" style:family="text">
      <style:text-properties officeooo:rsid="00373ebe"/>
    </style:style>
    <style:style style:name="T30" style:family="text">
      <style:text-properties officeooo:rsid="0039beae"/>
    </style:style>
    <style:style style:name="T31" style:family="text">
      <style:text-properties officeooo:rsid="003ef8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4">Guion: describe el pais Lluviara. La civilizacion. La ciudad. El proyecto Omniscientis. La creacion del libro. La destuccion de la ciudad</text:p>
      <text:p text:style-name="P1"><text:s text:c="4"/>- Cap. 2: Elara y la montaña. <text:s/></text:p>
      <text:p text:style-name="P4">Guion: presenta a los protagonistas, Elara. El lugar y el tiempo. La busqueda. El inicio de la aventura. </text:p>
      <text:p text:style-name="P1"/>
      <text:p text:style-name="Horizontal_20_Line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/>
      <text:p text:style-name="P18"><text:s text:c="3"/>- Cap. <text:span text:style-name="T25">X</text:span>: <text:span text:style-name="T25">El instinto. (impulso inconciente)</text:span></text:p>
      <text:p text:style-name="P1"><text:s text:c="4"/>- Cap. 3: Monstruos. <text:s/><text:span text:style-name="T25">(patrones logicos)</text:span></text:p>
      <text:p text:style-name="P1"><text:s text:c="4"/>- Cap. 4: La fe. <text:s/><text:span text:style-name="T25">(mamiferos y necesidad de proteccion)</text:span></text:p>
      <text:p text:style-name="P19"><text:s text:c="4"/>- Cap. 5: El amor. <text:s/><text:span text:style-name="T25">(lo que nos une)</text:span></text:p>
      <text:p text:style-name="P1"><text:s text:c="4"/>- Cap. 6: La magia. <text:s/><text:span text:style-name="T25">(lo desconocido)</text:span></text:p>
      <text:p text:style-name="P1"><text:s text:c="4"/>- Cap. 7: <text:span text:style-name="T1">Condicionantes del pensamiento</text:span>. <text:s/><text:span text:style-name="T25">(el pensamiento no es libre)</text:span></text:p>
      <text:p text:style-name="Horizontal_20_Line"/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Horizontal_20_Line"/>
      <text:p text:style-name="P12"/>
      <text:p text:style-name="P1">- Acto 4:<text:span text:style-name="T4"> </text:span><text:span text:style-name="T19">Un viaje </text:span><text:span text:style-name="T20">hacia la eternidad</text:span><text:span text:style-name="T19">.</text:span></text:p>
      <text:p text:style-name="P1"><text:s/>Analiza las características del sistema. <text:s text:c="2"/></text:p>
      <text:p text:style-name="P1"/>
      <text:p text:style-name="P26">(4-<text:span text:style-name="T30">0</text:span>)</text:p>
      <text:p text:style-name="P26"/>
      <text:p text:style-name="P26">Introduccion:</text:p>
      <text:p text:style-name="P26">hemos visto como el sistema ha encontrado la solucion al problema.</text:p>
      <text:p text:style-name="P26">Y lo ha hecho con extraordinaria facilidad.</text:p>
      <text:p text:style-name="P26">Funcionara del mismo modo con otros problemas?</text:p>
      <text:p text:style-name="P26">Que tipo de problemas puede resolver?</text:p>
      <text:p text:style-name="P26"/>
      <text:p text:style-name="P26">Es este sistema mas inteligente que un computador electronico?</text:p>
      <text:p text:style-name="P26">Es este sistema mas inteligente que un cerebro humano?</text:p>
      <text:p text:style-name="P26"/>
      <text:p text:style-name="P26">Es posible medir su potencia y compararlo con otros sistemas?</text:p>
      <text:p text:style-name="P26"/>
      <text:p text:style-name="P26">Esto es lo que nos proponemos en los siguientes capitulos.</text:p>
      <text:p text:style-name="P26">Empecemos por analizar algunas caracteristicas interesantes que hemos podido observar en el experimento.</text:p>
      <text:p text:style-name="P26"/>
      <text:p text:style-name="P26"><text:soft-page-break/></text:p>
      <text:p text:style-name="P26"/>
      <text:p text:style-name="P8">(4-1)</text:p>
      <text:p text:style-name="P8">- Cap. XX: Explorando el espacio.</text:p>
      <text:p text:style-name="P8"/>
      <text:p text:style-name="P8">Los hijos rodearan al padre. Y los nietos a los hijos. La familia se extendera por el espacio radialmente cubriendo cada palmo del terreno, sin dejar espacios sin explorar.</text:p>
      <text:p text:style-name="P8">Del mismo modo que un ciego avanza en la oscuridad, solo un paso, solo hasta donde es seguro.</text:p>
      <text:p text:style-name="P8">Es seguro aqui. Sigue siendo seguro si avanzo solo un paso<text:span text:style-name="T30"> mas</text:span>?</text:p>
      <text:p text:style-name="P8">Un individuo explora solo un paso hacia lo desconocido.</text:p>
      <text:p text:style-name="P8">Infinitas generaciones exploraran el espacio infinito.</text:p>
      <text:p text:style-name="P8">Pero cada individuo, solo un paso.</text:p>
      <text:p text:style-name="P27">Asi la exploracion avanza lentamente, solo un paso a la vez. Un paso simple, facil. Seguro. Sin complejidad. Sin riesgo.</text:p>
      <text:p text:style-name="P26"/>
      <text:p text:style-name="P8"/>
      <text:p text:style-name="P8">(4-2)</text:p>
      <text:p text:style-name="P1"><text:s text:c="4"/>- Cap. 1<text:span text:style-name="T13">4</text:span>: Eficiencia. <text:s/></text:p>
      <text:p text:style-name="P6">La solucion emerge tan pronto como es posible.<text:span text:style-name="T21"> El proceso avanza por el camino mas corto.</text:span></text:p>
      <text:p text:style-name="P11">sin dudar, como si conociera la solucion desde el principio, aun antes de empezar.</text:p>
      <text:p text:style-name="P6"/>
      <text:p text:style-name="P6"/>
      <text:p text:style-name="P9">(4-<text:span text:style-name="T24">3</text:span>)</text:p>
      <text:p text:style-name="P7"><text:s text:c="4"/>- Cap. 1<text:span text:style-name="T14">5</text:span>: Potencia. <text:s text:c="2"/></text:p>
      <text:p text:style-name="P6">La complejidad se desmenuza en operaciones triviales.</text:p>
      <text:p text:style-name="P13">Un individuo solo procesa una unica operacion trivial.</text:p>
      <text:p text:style-name="P13">El problema se procesa en paralelo, con un nodo por operacion trivial.</text:p>
      <text:p text:style-name="P13">Y la complejidad deja de existir.</text:p>
      <text:p text:style-name="P13"/>
      <text:p text:style-name="P6"/>
      <text:p text:style-name="P9">(4-<text:span text:style-name="T24">4</text:span>)</text:p>
      <text:p text:style-name="P14"><text:s text:c="4"/>- Cap. 1<text:span text:style-name="T15">6</text:span>: Coste</text:p>
      <text:p text:style-name="P14"/>
      <text:p text:style-name="P13">Contruimos un individuo con un CD.</text:p>
      <text:p text:style-name="P13">Recuento de individuos para el problema del laberinto. Aproximacion de coste en CDs.</text:p>
      <text:p text:style-name="P13">Esto prueba<text:span text:style-name="T31">, en la practica,</text:span> el coste infinito del sistema.</text:p>
      <text:p text:style-name="P13"/>
      <text:p text:style-name="P13">La vida en cambio no consume. Recicla la materia y aprovecha la energia libre disponible.</text:p>
      <text:p text:style-name="P13">No consume, no degrada, no tiene impacto.</text:p>
      <text:p text:style-name="P6">Siendo el coste infinito, el precio es cero.</text:p>
      <text:p text:style-name="P6"/>
      <text:p text:style-name="P9">(4-<text:span text:style-name="T24">5</text:span>)</text:p>
      <text:p text:style-name="P7"><text:s text:c="4"/>- Cap. 1<text:span text:style-name="T15">7</text:span>: Redundancia</text:p>
      <text:p text:style-name="P7"/>
      <text:p text:style-name="P29">Explicamos redundancia de sistemas informaticos.</text:p>
      <text:p text:style-name="P29">Adaptamos una version del relato biblico de Noe, representado en el laberinto.</text:p>
      <text:p text:style-name="P29">concluimos que</text:p>
      <text:p text:style-name="P11">La redundancia del sistema tiende a infinito.</text:p>
      <text:p text:style-name="P6">El proceso se vuelve mas robusto con el tiempo.</text:p>
      <text:p text:style-name="P6">Disenado para no detenerse jamas.</text:p>
      <text:p text:style-name="P6"/>
      <text:p text:style-name="P6"/>
      <text:p text:style-name="P9">(4-<text:span text:style-name="T24">6</text:span>)</text:p>
      <text:p text:style-name="P7"><text:s text:c="4"/>- Cap. 1<text:span text:style-name="T16">8</text:span>: Fiabilidad<text:span text:style-name="T11"> (gestion de memoria - colapso del sistema)</text:span></text:p>
      <text:p text:style-name="P7"/>
      <text:p text:style-name="P11">La Imposibilidad de la memoria infinita y la Solucion de la memoria dinamica y distribuida.</text:p>
      <text:p text:style-name="P15">El sistema no se detiene por limitaciones de recursos.</text:p>
      <text:p text:style-name="P15">Consigue asi abordar problemas de dimension infinita con recursos discretos.</text:p>
      <text:p text:style-name="P11"/>
      <text:p text:style-name="P9"><text:soft-page-break/>(4-<text:span text:style-name="T24">7</text:span>)</text:p>
      <text:p text:style-name="P1"><text:s text:c="4"/>- Cap. 1<text:span text:style-name="T16">9</text:span>: Poda. <text:s/><text:span text:style-name="T12">(porque morimos)</text:span></text:p>
      <text:p text:style-name="P2"/>
      <text:p text:style-name="P31">Mostramos un indicador utilizando la media aritmetica de los ultimos dias.</text:p>
      <text:p text:style-name="P31">Mostramos lo que sucede cuando incluimos un registro historico infinito.</text:p>
      <text:p text:style-name="P31">El mismo ejemplo de la media aritmetica imaginando a Socrates reproduciendose hoy.</text:p>
      <text:p text:style-name="P31">Esto cancela siglos de evolucion.</text:p>
      <text:p text:style-name="P31">Es facil imaginar como el sistema se estanca.</text:p>
      <text:p text:style-name="P2"/>
      <text:p text:style-name="P15">Los componentes que han realizado su trabajo son eliminados del sistema.</text:p>
      <text:p text:style-name="P15">El resultado es que solo los ultimos estados generan nuevos estados.</text:p>
      <text:p text:style-name="P15">De este modo el proceso solo puede avanzar.</text:p>
      <text:p text:style-name="P15"/>
      <text:p text:style-name="P23">La poda confiere al proceso <text:span text:style-name="T21">Direccion, </text:span>que asegura la <text:span text:style-name="T21">imposibilidad de retroceso o estancamiento.</text:span></text:p>
      <text:p text:style-name="P11"/>
      <text:p text:style-name="P11"/>
      <text:p text:style-name="P10">(4-<text:span text:style-name="T28">8</text:span>)</text:p>
      <text:p text:style-name="P10"><text:s text:c="4"/>- Cap. <text:span text:style-name="T28">XX</text:span>:<text:span text:style-name="T28"> Conclusiones</text:span></text:p>
      <text:p text:style-name="P10"/>
      <text:p text:style-name="P21">Las caracteristicas que hemos comentado sugieren que se trata de un sistema especial.<text:span text:style-name="T29"> Realmente potente.</text:span></text:p>
      <text:p text:style-name="P21">Pero como es de inteligente?</text:p>
      <text:p text:style-name="P21">Puede haber algo mas inteligente que esto?</text:p>
      <text:p text:style-name="P21"/>
      <text:p text:style-name="P10"/>
      <text:p text:style-name="Horizontal_20_Line"/>
      <text:p text:style-name="P11"/>
      <text:p text:style-name="P3">- Acto <text:span text:style-name="T18">5</text:span>: El limite final</text:p>
      <text:p text:style-name="P3"/>
      <text:p text:style-name="P5"><text:s text:c="2"/>- Cap. <text:span text:style-name="T23">XX: </text:span>Los limites de la inteligencia.</text:p>
      <text:p text:style-name="P5"/>
      <text:p text:style-name="P17">Exponemos aqui los limites fisicos.</text:p>
      <text:p text:style-name="P17">La inteligencia no puede ser infinita.</text:p>
      <text:p text:style-name="P17"/>
      <text:p text:style-name="P5"/>
      <text:p text:style-name="P5"><text:s/>- Cap. <text:span text:style-name="T23">XX: Analisis de caracteristicas de un sistema inteligente</text:span></text:p>
      <text:p text:style-name="P5"/>
      <text:p text:style-name="P17">Exponemos aqui las 6 areas de analisis.</text:p>
      <text:p text:style-name="P17">Eficiencia, Potencia, etc.</text:p>
      <text:p text:style-name="P17"/>
      <text:p text:style-name="P5"/>
      <text:p text:style-name="P5"><text:s/>- Cap. <text:span text:style-name="T23">XX: </text:span>Analisis comparativo de arquitecturas en sistemas inteligentes.</text:p>
      <text:p text:style-name="P3"/>
      <text:p text:style-name="P16"><text:span text:style-name="T18"><text:s/>- Cap. </text:span><text:span text:style-name="T23">XX: </text:span><text:span text:style-name="T22">Una</text:span> arquitectura que minimiza las limitaciones fisicas.</text:p>
      <text:p text:style-name="P16"/>
      <text:p text:style-name="P16"><text:span text:style-name="T18"><text:s/>- Cap. </text:span><text:span text:style-name="T23">XX: </text:span>La mas potente de las inteligencias posibles.</text:p>
      <text:p text:style-name="P3"/>
      <text:p text:style-name="Horizontal_20_Line"/>
      <text:p text:style-name="P2"/>
      <text:p text:style-name="P1">- Acto <text:span text:style-name="T18">6</text:span>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text:span text:style-name="T26">(redes autocataliticas, intencion estructural, inteligencia, el proceso infinito, el valor de la existencia)</text:span></text:p>
      <text:p text:style-name="P1"/>
      <text:p text:style-name="P1"><text:soft-page-break/></text:p>
      <text:p text:style-name="Horizontal_20_Line"/>
      <text:p text:style-name="Text_20_body"/>
      <text:p text:style-name="P1">- Acto <text:span text:style-name="T18">7</text:span>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27">la conciencia</text:span>)</text:p>
      <text:p text:style-name="P20"><text:s text:c="4"/>- Cap. 2<text:span text:style-name="T17">5</text:span>: Lo trascendente. <text:s/>(lo que hemos hecho<text:span text:style-name="T27">, <text:s/></text:span><text:span text:style-name="T8">la </text:span><text:span text:style-name="T27">mision</text:span><text:span text:style-name="T9">, sentimientos e instinto</text:span>)</text:p>
      <text:p text:style-name="P1"><text:s text:c="4"/>- Cap. 2<text:span text:style-name="T17">6</text:span>: La paz interior. <text:s/><text:span text:style-name="T6">(</text:span><text:span text:style-name="T27">uno indivisible, la inteligencia eterna, </text:span><text:span text:style-name="T6">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6-04-25T10:08:01.039000000</dc:date>
    <meta:editing-duration>PT5H10M24S</meta:editing-duration>
    <meta:editing-cycles>41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113" meta:word-count="963" meta:character-count="6042" meta:non-whitespace-character-count="5003"/>
  </office:meta>
</office:document-meta>
</file>